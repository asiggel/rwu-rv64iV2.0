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3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3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380"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383" style:family="graphic" style:parent-style-name="objectwithoutfill">
      <style:graphic-properties draw:fill="none" draw:fill-color="#ffffff" draw:textarea-vertical-align="middle" loext:decorative="false"/>
    </style:style>
    <style:style style:name="gr3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385"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386"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3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390"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3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3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3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40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4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4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4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42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42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42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425"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426"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2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28"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429"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30"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432" style:family="graphic" style:parent-style-name="standard">
      <style:graphic-properties draw:stroke="none" draw:fill="none" fo:min-height="1.273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43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4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4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4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45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456"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457" style:family="graphic" style:parent-style-name="standard">
      <style:graphic-properties draw:stroke="none" svg:stroke-color="#000000" draw:fill="none" draw:fill-color="#ffffff" draw:textarea-horizontal-align="left" draw:auto-grow-height="true" draw:auto-grow-width="true" fo:min-height="0.319cm" fo:min-width="0.679cm" loext:decorative="false"/>
      <style:paragraph-properties style:writing-mode="lr-tb"/>
    </style:style>
    <style:style style:name="gr458" style:family="graphic" style:parent-style-name="standard">
      <style:graphic-properties draw:stroke="none" svg:stroke-color="#000000" draw:fill="none" draw:fill-color="#ffffff" draw:textarea-horizontal-align="left" draw:auto-grow-height="true" draw:auto-grow-width="true" fo:min-height="0.319cm" fo:min-width="1.039cm" loext:decorative="false"/>
      <style:paragraph-properties style:writing-mode="lr-tb"/>
    </style:style>
    <style:style style:name="gr4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4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4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467"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4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4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4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4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4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4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475"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4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4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4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4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488"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48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4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49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4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49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4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49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500"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50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506"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50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510"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51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5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5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516"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5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5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5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521"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52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52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52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52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526"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52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528"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529"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542"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547"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56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56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5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5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567"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568"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569" style:family="graphic" style:parent-style-name="standard">
      <style:graphic-properties draw:stroke="none" svg:stroke-color="#000000" draw:fill="none" draw:fill-color="#ffffff" draw:textarea-horizontal-align="left" draw:auto-grow-height="true" draw:auto-grow-width="true" fo:min-height="0.319cm" fo:min-width="3.16cm"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true" fo:min-height="0.319cm" fo:min-width="2.047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319cm" fo:min-width="1.75cm" loext:decorative="false"/>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319cm" fo:min-width="2.411cm"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319cm" fo:min-width="2.064cm"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fo:min-height="0.319cm" fo:min-width="1.869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fo:min-height="0.319cm" fo:min-width="1.755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fo:min-height="0.319cm" fo:min-width="3.257cm" loext:decorative="false"/>
      <style:paragraph-properties style:writing-mode="lr-tb"/>
    </style:style>
    <style:style style:name="gr577" style:family="graphic" style:parent-style-name="standard">
      <style:graphic-properties draw:stroke="none" svg:stroke-color="#000000" draw:fill="none" draw:fill-color="#ffffff" draw:textarea-horizontal-align="left" draw:auto-grow-height="true" draw:auto-grow-width="true" fo:min-height="0.319cm" fo:min-width="1.848cm" loext:decorative="false"/>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319cm" fo:min-width="3.939cm" loext:decorative="false"/>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319cm" fo:min-width="3.702cm" loext:decorative="false"/>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637cm" fo:min-width="2.817cm" loext:decorative="false"/>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319cm" fo:min-width="1.717cm" loext:decorative="false"/>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true" fo:min-height="0.319cm" fo:min-width="4.951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fo:min-height="0.319cm" fo:min-width="2.804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fo:min-height="0.319cm" fo:min-width="1.924cm" loext:decorative="false"/>
      <style:paragraph-properties style:writing-mode="lr-tb"/>
    </style:style>
    <style:style style:name="gr585" style:family="graphic" style:parent-style-name="standard">
      <style:graphic-properties draw:stroke="none" svg:stroke-color="#000000" draw:fill="none" draw:fill-color="#ffffff" draw:textarea-horizontal-align="left" draw:auto-grow-height="true" draw:auto-grow-width="true" fo:min-height="0.715cm" fo:min-width="4.07cm" loext:decorative="false"/>
      <style:paragraph-properties style:writing-mode="lr-tb"/>
    </style:style>
    <style:style style:name="gr586" style:family="graphic" style:parent-style-name="standard">
      <style:graphic-properties draw:stroke="none" svg:stroke-color="#000000" draw:fill="none" draw:fill-color="#ffffff" draw:textarea-horizontal-align="left" draw:auto-grow-height="true" draw:auto-grow-width="true" fo:min-height="0.715cm" fo:min-width="4.13cm" loext:decorative="false"/>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0.715cm" fo:min-width="3.892cm" loext:decorative="false"/>
      <style:paragraph-properties style:writing-mode="lr-tb"/>
    </style:style>
    <style:style style:name="gr588"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1.8cm" loext:decorative="false"/>
    </style:style>
    <style:style style:name="gr589" style:family="graphic" style:parent-style-name="standard">
      <style:graphic-properties draw:stroke="none" svg:stroke-color="#000000" draw:fill="none" draw:fill-color="#ffffff" draw:textarea-horizontal-align="left" draw:auto-grow-height="true" draw:auto-grow-width="true" fo:min-height="0.319cm" fo:min-width="1.467cm" loext:decorative="false"/>
      <style:paragraph-properties style:writing-mode="lr-tb"/>
    </style:style>
    <style:style style:name="gr590" style:family="graphic" style:parent-style-name="standard">
      <style:graphic-properties draw:stroke="none" draw:fill="none" fo:min-height="0.32cm" loext:decorative="false"/>
      <style:paragraph-properties style:writing-mode="lr-tb"/>
    </style:style>
    <style:style style:name="gr591"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3.5cm" loext:decorative="false"/>
    </style:style>
    <style:style style:name="gr592"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593"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594"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595" style:family="graphic" style:parent-style-name="objectwithoutfill">
      <style:graphic-properties svg:stroke-color="#000000" draw:fill="none" draw:textarea-vertical-align="middle" loext:decorative="false"/>
    </style:style>
    <style:style style:name="gr596"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597"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598"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599"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600" style:family="graphic" style:parent-style-name="objectwithoutfill">
      <style:graphic-properties svg:stroke-color="#0066b3" draw:fill="none" draw:textarea-vertical-align="middle" loext:decorative="false"/>
    </style:style>
    <style:style style:name="gr601"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602"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603" style:family="graphic" style:parent-style-name="Standard_5f_1">
      <style:graphic-properties svg:stroke-color="#000000" draw:fill="none" draw:textarea-vertical-align="middle" draw:auto-grow-height="false" fo:min-height="0.888cm" fo:min-width="0cm" loext:decorative="false"/>
    </style:style>
    <style:style style:name="gr604"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605"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606"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607"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608"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609" style:family="graphic" style:parent-style-name="objectwithoutfill">
      <style:graphic-properties svg:stroke-color="#000000" draw:fill="none" draw:fill-color="#ffffff" draw:textarea-vertical-align="middle" loext:decorative="false"/>
    </style:style>
    <style:style style:name="gr610"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611"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612"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613"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614"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615"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616"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617"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618"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619"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620"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621"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622" style:family="graphic" style:parent-style-name="objectwithoutfill">
      <style:graphic-properties svg:stroke-color="#ed1c24" draw:fill="none" draw:textarea-vertical-align="middle" loext:decorative="false"/>
    </style:style>
    <style:style style:name="gr623"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624" style:family="graphic" style:parent-style-name="objectwithoutfill">
      <style:graphic-properties svg:stroke-color="#ed1c24" draw:fill="none" draw:fill-color="#ffffff" draw:textarea-vertical-align="middle" loext:decorative="false"/>
    </style:style>
    <style:style style:name="gr625"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626"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627"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628"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629"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633"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634"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636"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640"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648"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6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654" style:family="graphic" style:parent-style-name="standard">
      <style:graphic-properties draw:stroke="none" draw:fill="none" fo:min-height="0.476cm" loext:decorative="false"/>
      <style:paragraph-properties style:writing-mode="lr-tb"/>
    </style:style>
    <style:style style:name="gr655"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656"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659"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668"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669"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671"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672" style:family="graphic" style:parent-style-name="objectwithoutfill">
      <style:graphic-properties svg:stroke-color="#ff0000" draw:marker-end="Linienspitzen_20_21" draw:marker-end-width="0.3cm" draw:fill="none" draw:textarea-vertical-align="middle" loext:decorative="false"/>
    </style:style>
    <style:style style:name="gr673" style:family="graphic" style:parent-style-name="objectwithoutfill">
      <style:graphic-properties svg:stroke-color="#ff0000" draw:fill="none" draw:textarea-vertical-align="middle" loext:decorative="false"/>
    </style:style>
    <style:style style:name="gr674"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675" style:family="graphic" style:parent-style-name="objectwithoutfill">
      <style:graphic-properties svg:stroke-color="#ff0000" draw:marker-end="Linienspitzen_20_22" draw:marker-end-width="0.3cm" draw:fill="none" draw:textarea-vertical-align="middle" loext:decorative="false"/>
    </style:style>
    <style:style style:name="gr676" style:family="graphic" style:parent-style-name="objectwithoutfill">
      <style:graphic-properties svg:stroke-color="#ff0000" draw:marker-end="Linienspitzen_20_23" draw:marker-end-width="0.3cm" draw:fill="none" draw:textarea-vertical-align="middle" loext:decorative="false"/>
    </style:style>
    <style:style style:name="gr677" style:family="graphic" style:parent-style-name="objectwithoutfill">
      <style:graphic-properties svg:stroke-color="#ff0000" draw:marker-end="Linienspitzen_20_24" draw:marker-end-width="0.3cm" draw:fill="none" draw:textarea-vertical-align="middle" loext:decorative="false"/>
    </style:style>
    <style:style style:name="gr678"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679"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680" style:family="graphic" style:parent-style-name="objectwithoutfill">
      <style:graphic-properties draw:marker-end="Linienspitzen_20_26" draw:marker-end-width="0.3cm" draw:fill="none" draw:textarea-vertical-align="middle" loext:decorative="false"/>
    </style:style>
    <style:style style:name="gr6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682" style:family="graphic" style:parent-style-name="objectwithoutfill">
      <style:graphic-properties draw:marker-end="Linienspitzen_20_27" draw:marker-end-width="0.3cm" draw:fill="none" draw:textarea-vertical-align="middle" loext:decorative="false"/>
    </style:style>
    <style:style style:name="gr6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6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685"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686"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6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688"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689" style:family="graphic" style:parent-style-name="objectwithoutfill">
      <style:graphic-properties draw:marker-end="Linienspitzen_20_28" draw:marker-end-width="0.3cm" draw:fill="none" draw:textarea-vertical-align="middle" loext:decorative="false"/>
    </style:style>
    <style:style style:name="gr690" style:family="graphic" style:parent-style-name="objectwithoutfill">
      <style:graphic-properties draw:marker-end="Linienspitzen_20_29" draw:marker-end-width="0.3cm" draw:fill="none" draw:textarea-vertical-align="middle" loext:decorative="false"/>
    </style:style>
    <style:style style:name="gr691"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692"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693" style:family="graphic" style:parent-style-name="objectwithoutfill">
      <style:graphic-properties draw:marker-end="Linienspitzen_20_47" draw:marker-end-width="0.3cm" draw:fill="none" draw:textarea-vertical-align="middle" loext:decorative="false"/>
    </style:style>
    <style:style style:name="gr694"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695"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696" style:family="graphic" style:parent-style-name="objectwithoutfill">
      <style:graphic-properties draw:marker-end="Linienspitzen_20_48" draw:marker-end-width="0.3cm" draw:fill="none" draw:textarea-vertical-align="middle" loext:decorative="false"/>
    </style:style>
    <style:style style:name="gr697"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698" style:family="graphic" style:parent-style-name="objectwithoutfill">
      <style:graphic-properties draw:marker-end="Linienspitzen_20_49" draw:marker-end-width="0.3cm" draw:fill="none" draw:textarea-vertical-align="middle" loext:decorative="false"/>
    </style:style>
    <style:style style:name="gr699" style:family="graphic" style:parent-style-name="standard">
      <style:graphic-properties draw:textarea-horizontal-align="justify" draw:textarea-vertical-align="middle" draw:auto-grow-height="false" fo:min-height="0.6cm" fo:min-width="0cm" loext:decorative="false"/>
    </style:style>
    <style:style style:name="gr700"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701"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702"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703"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704"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707" style:family="graphic" style:parent-style-name="standard">
      <style:graphic-properties svg:stroke-color="#000000" draw:fill-color="#00a933" draw:textarea-vertical-align="middle" loext:decorative="false"/>
    </style:style>
    <style:style style:name="gr708" style:family="graphic" style:parent-style-name="objectwithoutfill">
      <style:graphic-properties draw:marker-end="Arrow_20_short" draw:marker-end-width="0.3cm" draw:fill="none" draw:textarea-vertical-align="middle" loext:decorative="false"/>
    </style:style>
    <style:style style:name="gr7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7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7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7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722"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723"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724"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7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7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7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7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733"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7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738"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7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7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748"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7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7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7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7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753" style:family="graphic" style:parent-style-name="objectwithoutfill">
      <style:graphic-properties svg:stroke-color="#ff0000" draw:marker-end="Linienspitzen_20_27" draw:marker-end-width="0.3cm" draw:fill="none" draw:textarea-vertical-align="middle" loext:decorative="false"/>
    </style:style>
    <style:style style:name="gr7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7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7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7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7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759"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760"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761"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762" style:family="graphic" style:parent-style-name="Standard_5f_2">
      <style:graphic-properties svg:stroke-color="#000000" draw:fill-color="#729fcf" draw:textarea-vertical-align="middle" loext:decorative="false"/>
    </style:style>
    <style:style style:name="gr763"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764"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765" style:family="graphic" style:parent-style-name="Standard_5f_2">
      <style:graphic-properties svg:stroke-color="#000000" draw:textarea-horizontal-align="justify" draw:textarea-vertical-align="middle" draw:auto-grow-height="false" fo:min-height="1.75cm" fo:min-width="0.5cm" loext:decorative="false"/>
    </style:style>
    <style:style style:name="gr766"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767"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768"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769"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770"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771" style:family="graphic" style:parent-style-name="objectwithoutfill">
      <style:graphic-properties draw:stroke="dash" draw:stroke-dash="Dashed_20__28_var_29_" svg:stroke-color="#000000" draw:fill="none" draw:textarea-vertical-align="middle" loext:decorative="false"/>
    </style:style>
    <style:style style:name="gr772"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773"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774"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775"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776"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777"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778"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779"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780"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781"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782"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783"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784"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785" style:family="graphic" style:parent-style-name="objectwithoutfill">
      <style:graphic-properties draw:marker-end="Linienspitzen_20_34" draw:marker-end-width="0.3cm" draw:fill="none" draw:textarea-vertical-align="middle" loext:decorative="false"/>
    </style:style>
    <style:style style:name="gr786" style:family="graphic" style:parent-style-name="objectwithoutfill">
      <style:graphic-properties draw:marker-end="Linienspitzen_20_35" draw:marker-end-width="0.3cm" draw:fill="none" draw:textarea-vertical-align="middle" loext:decorative="false"/>
    </style:style>
    <style:style style:name="gr787" style:family="graphic" style:parent-style-name="objectwithoutfill">
      <style:graphic-properties svg:stroke-color="#ff0000" draw:marker-end="Linienspitzen_20_36" draw:marker-end-width="0.3cm" draw:fill="none" draw:textarea-vertical-align="middle" loext:decorative="false"/>
    </style:style>
    <style:style style:name="gr788"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789"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790" style:family="graphic" style:parent-style-name="objectwithoutfill">
      <style:graphic-properties draw:marker-end="Linienspitzen_20_37" draw:marker-end-width="0.3cm" draw:fill="none" draw:textarea-vertical-align="middle" loext:decorative="false"/>
    </style:style>
    <style:style style:name="gr791" style:family="graphic" style:parent-style-name="objectwithoutfill">
      <style:graphic-properties draw:marker-end="Linienspitzen_20_38" draw:marker-end-width="0.3cm" draw:fill="none" draw:textarea-vertical-align="middle" loext:decorative="false"/>
    </style:style>
    <style:style style:name="gr792" style:family="graphic" style:parent-style-name="objectwithoutfill">
      <style:graphic-properties svg:stroke-color="#ff0000" draw:marker-end="Linienspitzen_20_39" draw:marker-end-width="0.3cm" draw:fill="none" draw:textarea-vertical-align="middle" loext:decorative="false"/>
    </style:style>
    <style:style style:name="gr793"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794"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795"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796"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797" style:family="graphic" style:parent-style-name="objectwithoutfill">
      <style:graphic-properties svg:stroke-color="#00a933" draw:fill="none" draw:textarea-vertical-align="middle" loext:decorative="false"/>
    </style:style>
    <style:style style:name="gr798"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799"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800"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801"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802"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803"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804"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805"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806"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807"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808"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809"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810"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811"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812"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813"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814"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815"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816"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817"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818"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819"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820"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821"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822"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823"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824" style:family="graphic" style:parent-style-name="objectwithoutfill">
      <style:graphic-properties svg:stroke-color="#00a933" draw:marker-end="Linienspitzen_20_45" draw:marker-end-width="0.3cm" draw:fill="none" draw:textarea-vertical-align="middle" loext:decorative="false"/>
    </style:style>
    <style:style style:name="gr825"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826"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827"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828"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829"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830"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831"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832" style:family="graphic" style:parent-style-name="objectwithoutfill">
      <style:graphic-properties svg:stroke-color="#ffbf00" draw:marker-end="Arrow_20_short" draw:fill="none" draw:textarea-vertical-align="middle" loext:decorative="false"/>
    </style:style>
    <style:style style:name="gr833"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834"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835"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836" style:family="graphic" style:parent-style-name="objectwithoutfill">
      <style:graphic-properties svg:stroke-color="#ffbf00" draw:marker-end="Linienspitzen_20_46" draw:marker-end-width="0.3cm" draw:fill="none" draw:textarea-vertical-align="middle" loext:decorative="false"/>
    </style:style>
    <style:style style:name="gr837"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838"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839"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840"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841" style:family="graphic" style:parent-style-name="objectwithoutfill">
      <style:graphic-properties draw:marker-end="Linienspitzen_20_40" draw:marker-end-width="0.3cm" draw:fill="none" draw:textarea-vertical-align="middle" loext:decorative="false"/>
    </style:style>
    <style:style style:name="gr842"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843"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844"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845"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846"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847" style:family="graphic" style:parent-style-name="objectwithoutfill">
      <style:graphic-properties draw:marker-end="Linienspitzen_20_41" draw:marker-end-width="0.3cm" draw:fill="none" draw:textarea-vertical-align="middle" loext:decorative="false"/>
    </style:style>
    <style:style style:name="gr848" style:family="graphic" style:parent-style-name="objectwithoutfill">
      <style:graphic-properties draw:marker-end="Linienspitzen_20_42" draw:marker-end-width="0.3cm" draw:fill="none" draw:textarea-vertical-align="middle" loext:decorative="false"/>
    </style:style>
    <style:style style:name="gr849"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850"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851"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852"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853"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854"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855"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856"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857"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858"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859"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860"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861"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862"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863"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864"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865"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866"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867" style:family="graphic" style:parent-style-name="objectwithoutfill">
      <style:graphic-properties svg:stroke-color="#ff4000" draw:marker-end="Linienspitzen_20_44" draw:marker-end-width="0.3cm" draw:fill="none" draw:textarea-vertical-align="middle" loext:decorative="false"/>
    </style:style>
    <style:style style:name="gr868"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869"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870"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871"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872"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873" style:family="graphic" style:parent-style-name="standard">
      <style:graphic-properties svg:stroke-color="#000000" draw:textarea-horizontal-align="justify" draw:textarea-vertical-align="middle" draw:auto-grow-height="false" fo:min-height="1.75cm" fo:min-width="0.5cm" loext:decorative="false"/>
    </style:style>
    <style:style style:name="gr874"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875"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876"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877"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878"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879"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880"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881"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882"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88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84"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885"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886"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887" style:family="graphic" style:parent-style-name="objectwithoutfill">
      <style:graphic-properties draw:marker-start="Arrowheads_20_42" draw:marker-start-width="0.3cm" draw:marker-end="" draw:marker-end-width="0.3cm" draw:fill="none" draw:textarea-vertical-align="middle" loext:decorative="false"/>
    </style:style>
    <style:style style:name="gr888"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889"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890"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891"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892"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893" style:family="graphic" style:parent-style-name="standard">
      <style:graphic-properties svg:stroke-color="#000000" draw:textarea-horizontal-align="justify" draw:textarea-vertical-align="middle" draw:auto-grow-height="false" fo:min-height="0.552cm" fo:min-width="0cm" loext:decorative="false"/>
    </style:style>
    <style:style style:name="gr894"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895"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896"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897"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898" style:family="graphic" style:parent-style-name="standard">
      <style:graphic-properties svg:stroke-color="#000000" draw:textarea-horizontal-align="justify" draw:textarea-vertical-align="middle" draw:auto-grow-height="false" fo:min-height="0.05cm" fo:min-width="8.5cm" loext:decorative="false"/>
    </style:style>
    <style:style style:name="gr899" style:family="graphic" style:parent-style-name="standard">
      <style:graphic-properties svg:stroke-color="#000000" draw:textarea-horizontal-align="justify" draw:textarea-vertical-align="middle" draw:auto-grow-height="false" fo:min-height="1.352cm" fo:min-width="0cm" loext:decorative="false"/>
    </style:style>
    <style:style style:name="gr900"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901"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902"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903"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904"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905" style:family="graphic" style:parent-style-name="standard">
      <style:graphic-properties svg:stroke-color="#000000" draw:textarea-horizontal-align="justify" draw:textarea-vertical-align="middle" draw:auto-grow-height="false" fo:min-height="1.75cm" fo:min-width="2.5cm" style:writing-mode="lr-tb" loext:decorative="false"/>
      <style:paragraph-properties style:writing-mode="lr-tb"/>
    </style:style>
    <style:style style:name="gr906"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907" style:family="graphic" style:parent-style-name="standard">
      <style:graphic-properties draw:stroke="none" svg:stroke-color="#000000" draw:fill="none" draw:fill-color="#ffffff" draw:textarea-horizontal-align="left" draw:auto-grow-height="true" draw:auto-grow-width="true" fo:min-height="0.712cm" fo:min-width="1.3cm" loext:decorative="false"/>
      <style:paragraph-properties style:writing-mode="lr-tb"/>
    </style:style>
    <style:style style:name="gr908"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909"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910"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911"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912"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913"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914"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915"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916"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917"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918"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919"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920" style:family="graphic" style:parent-style-name="objectwithoutfill">
      <style:graphic-properties draw:marker-end="Linienspitzen_20_13" draw:marker-end-width="0.3cm" draw:fill="none" draw:textarea-vertical-align="middle" loext:decorative="false"/>
    </style:style>
    <style:style style:name="gr921" style:family="graphic" style:parent-style-name="objectwithoutfill">
      <style:graphic-properties draw:marker-end="Linienspitzen_20_14" draw:marker-end-width="0.3cm" draw:fill="none" draw:textarea-vertical-align="middle" loext:decorative="false"/>
    </style:style>
    <style:style style:name="gr922"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923" style:family="graphic" style:parent-style-name="objectwithoutfill">
      <style:graphic-properties draw:marker-end="Linienspitzen_20_15" draw:marker-end-width="0.3cm" draw:fill="none" draw:textarea-vertical-align="middle" loext:decorative="false"/>
    </style:style>
    <style:style style:name="gr924" style:family="graphic" style:parent-style-name="objectwithoutfill">
      <style:graphic-properties draw:marker-end="Linienspitzen_20_18" draw:marker-end-width="0.3cm" draw:fill="none" draw:textarea-vertical-align="middle" loext:decorative="false"/>
    </style:style>
    <style:style style:name="gr925"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926" style:family="graphic" style:parent-style-name="objectwithoutfill">
      <style:graphic-properties draw:marker-end="Linienspitzen_20_19" draw:marker-end-width="0.3cm" draw:fill="none" draw:textarea-vertical-align="middle" loext:decorative="false"/>
    </style:style>
    <style:style style:name="gr927"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928"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929" style:family="graphic" style:parent-style-name="objectwithoutfill">
      <style:graphic-properties draw:marker-end="Linienspitzen_20_20" draw:marker-end-width="0.3cm" draw:fill="none" draw:textarea-vertical-align="middle" loext:decorative="false"/>
    </style:style>
    <style:style style:name="gr930"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931"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932"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933"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934"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935"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936"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937"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938"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939"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940"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941"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942"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943"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944"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945"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946"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947"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948"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949"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950"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951"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952"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953"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954"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955"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956"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957" style:family="graphic" style:parent-style-name="standard">
      <style:graphic-properties svg:stroke-color="#000000" draw:fill-color="#ffff00" draw:textarea-horizontal-align="left" draw:textarea-vertical-align="bottom" draw:auto-grow-height="false" fo:min-height="2.75cm" fo:min-width="4cm" style:writing-mode="lr-tb" loext:decorative="false"/>
      <style:paragraph-properties style:writing-mode="lr-tb"/>
    </style:style>
    <style:style style:name="gr9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9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9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9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9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9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9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965" style:family="graphic" style:parent-style-name="standard">
      <style:graphic-properties svg:stroke-color="#000000" draw:fill-color="#ffff00" draw:textarea-vertical-align="middle" loext:decorative="false"/>
    </style:style>
    <style:style style:name="gr9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06cm" loext:decorative="false"/>
      <style:paragraph-properties style:writing-mode="lr-tb"/>
    </style:style>
    <style:style style:name="gr9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cm" loext:decorative="false"/>
      <style:paragraph-properties style:writing-mode="lr-tb"/>
    </style:style>
    <style:style style:name="gr968" style:family="graphic" style:parent-style-name="objectwithoutfill">
      <style:graphic-properties draw:marker-end="Linienspitzen_20_16" draw:marker-end-width="0.3cm" draw:fill="none" draw:textarea-vertical-align="middle" loext:decorative="false"/>
    </style:style>
    <style:style style:name="gr969"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9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9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9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973"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974"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975"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976"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977"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978"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979"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980"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9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9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98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98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9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986"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987"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988"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989"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990"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991" style:family="graphic" style:parent-style-name="objectwithoutfill">
      <style:graphic-properties draw:stroke="dash" draw:stroke-dash="Long_20_Dot" draw:fill="none" draw:textarea-vertical-align="middle" loext:decorative="false"/>
    </style:style>
    <style:style style:name="gr992"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993"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994"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995" style:family="graphic" style:parent-style-name="standard">
      <style:graphic-properties svg:stroke-color="#000000" draw:textarea-horizontal-align="justify" draw:textarea-vertical-align="middle" draw:auto-grow-height="false" fo:min-height="3.756cm" fo:min-width="0cm" loext:decorative="false"/>
    </style:style>
    <style:style style:name="gr996"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997"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998"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999"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1000"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1001"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6" style:family="paragraph">
      <loext:graphic-properties draw:fill="none" draw:fill-color="#ffffff"/>
      <style:text-properties fo:font-size="8pt"/>
    </style:style>
    <style:style style:name="P37" style:family="paragraph">
      <loext:graphic-properties draw:fill="solid" draw:fill-color="#ff0000"/>
      <style:paragraph-properties fo:text-align="center"/>
    </style:style>
    <style:style style:name="P38" style:family="paragraph">
      <loext:graphic-properties draw:fill="none" draw:fill-color="#ffffff"/>
      <style:paragraph-properties fo:text-align="center"/>
    </style:style>
    <style:style style:name="P39" style:family="paragraph">
      <loext:graphic-properties draw:fill="none" draw:fill-color="#000000"/>
      <style:paragraph-properties fo:text-align="center"/>
    </style:style>
    <style:style style:name="P40" style:family="paragraph">
      <loext:graphic-properties draw:fill="none" draw:fill-color="#ffffff"/>
      <style:text-properties fo:color="#2a6099" loext:opacity="100%" fo:font-size="8pt" fo:font-style="italic" fo:font-weight="bold"/>
    </style:style>
    <style:style style:name="P41" style:family="paragraph">
      <loext:graphic-properties draw:fill-color="#ffffff"/>
      <style:paragraph-properties fo:text-align="start" style:writing-mode="lr-tb"/>
      <style:text-properties fo:font-size="8pt"/>
    </style:style>
    <style:style style:name="P42" style:family="paragraph">
      <style:paragraph-properties fo:text-align="start"/>
      <style:text-properties fo:font-size="8pt"/>
    </style:style>
    <style:style style:name="P43" style:family="paragraph">
      <loext:graphic-properties draw:fill-color="#00a933"/>
      <style:paragraph-properties fo:text-align="start" style:writing-mode="lr-tb"/>
      <style:text-properties fo:font-size="8pt"/>
    </style:style>
    <style:style style:name="P44" style:family="paragraph">
      <loext:graphic-properties draw:fill="none" draw:fill-color="#ffffff"/>
      <style:text-properties fo:color="#ff0000" loext:opacity="100%" fo:font-size="8pt"/>
    </style:style>
    <style:style style:name="P4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style:text-properties fo:font-size="8pt"/>
    </style:style>
    <style:style style:name="P47" style:family="paragraph">
      <loext:graphic-properties draw:fill="none" draw:fill-color="#ffffff"/>
      <style:text-properties fo:color="#00a933" loext:opacity="100%" fo:font-size="8pt" fo:font-style="italic" fo:font-weight="bold"/>
    </style:style>
    <style:style style:name="P48" style:family="paragraph">
      <style:paragraph-properties fo:text-align="center"/>
      <style:text-properties fo:font-size="8pt"/>
    </style:style>
    <style:style style:name="P49" style:family="paragraph">
      <loext:graphic-properties draw:fill-color="#ffff00"/>
      <style:paragraph-properties fo:text-align="center" style:writing-mode="lr-tb"/>
      <style:text-properties fo:font-size="8pt"/>
    </style:style>
    <style:style style:name="P50" style:family="paragraph">
      <style:paragraph-properties fo:text-align="center"/>
      <style:text-properties fo:color="#2a6099" loext:opacity="100%" fo:font-size="8pt" fo:font-style="italic" fo:font-weight="bold"/>
    </style:style>
    <style:style style:name="P51" style:family="paragraph">
      <loext:graphic-properties draw:fill-color="#ffff00"/>
      <style:paragraph-properties fo:text-align="center" style:writing-mode="lr-tb"/>
      <style:text-properties fo:color="#2a6099" loext:opacity="100%" fo:font-size="8pt" fo:font-style="italic" fo:font-weight="bold"/>
    </style:style>
    <style:style style:name="P52" style:family="paragraph">
      <loext:graphic-properties draw:fill="none" draw:fill-color="#ffffff"/>
      <style:text-properties fo:color="#000000" loext:opacity="100%" fo:font-size="8pt"/>
    </style:style>
    <style:style style:name="P53" style:family="paragraph">
      <loext:graphic-properties draw:fill="none"/>
    </style:style>
    <style:style style:name="P54" style:family="paragraph">
      <loext:graphic-properties draw:fill="none" draw:fill-color="#ffffff"/>
      <style:text-properties fo:font-size="6pt"/>
    </style:style>
    <style:style style:name="P55" style:family="paragraph">
      <style:paragraph-properties fo:text-align="center" style:writing-mode="lr-tb"/>
      <style:text-properties fo:font-size="8pt"/>
    </style:style>
    <style:style style:name="P56" style:family="paragraph">
      <loext:graphic-properties draw:fill-color="#00a933"/>
      <style:paragraph-properties fo:text-align="center"/>
    </style:style>
    <style:style style:name="P57" style:family="paragraph">
      <loext:graphic-properties draw:fill="none" draw:fill-color="#ffffff"/>
      <style:text-properties fo:color="#ff8000" loext:opacity="100%" fo:font-size="6pt" fo:font-style="italic"/>
    </style:style>
    <style:style style:name="P58" style:family="paragraph">
      <loext:graphic-properties draw:fill-color="#0066b3"/>
      <style:paragraph-properties fo:text-align="center"/>
    </style:style>
    <style:style style:name="P59" style:family="paragraph">
      <loext:graphic-properties draw:fill="none" draw:fill-color="#ffffff"/>
      <style:text-properties fo:font-size="12pt" style:font-size-asian="18pt" style:font-size-complex="18pt"/>
    </style:style>
    <style:style style:name="P60" style:family="paragraph">
      <style:paragraph-properties fo:text-align="center" style:writing-mode="lr-tb"/>
      <style:text-properties fo:font-size="12pt" style:font-size-asian="18pt" style:font-size-complex="18pt"/>
    </style:style>
    <style:style style:name="P61" style:family="paragraph">
      <loext:graphic-properties draw:fill="none"/>
      <style:paragraph-properties fo:text-align="center" style:writing-mode="lr-tb"/>
      <style:text-properties fo:font-size="12pt" style:font-size-asian="18pt" style:font-size-complex="18pt"/>
    </style:style>
    <style:style style:name="P62" style:family="paragraph">
      <loext:graphic-properties draw:fill="none" draw:fill-color="#ffffff"/>
      <style:text-properties fo:font-size="14pt" style:font-size-asian="18pt" style:font-size-complex="18pt"/>
    </style:style>
    <style:style style:name="P63" style:family="paragraph">
      <loext:graphic-properties draw:fill="none" draw:fill-color="#ffffff"/>
      <style:text-properties fo:color="#ed1c24" loext:opacity="100%" fo:font-size="12pt" style:font-size-asian="18pt" style:font-size-complex="18pt"/>
    </style:style>
    <style:style style:name="P64" style:family="paragraph">
      <loext:graphic-properties draw:fill-color="#ffffff"/>
      <style:paragraph-properties fo:text-align="center" style:writing-mode="lr-tb"/>
      <style:text-properties fo:font-size="18pt"/>
    </style:style>
    <style:style style:name="P65" style:family="paragraph">
      <loext:graphic-properties draw:fill="none"/>
      <style:paragraph-properties fo:text-align="center"/>
      <style:text-properties fo:color="#ed1c24" loext:opacity="100%" fo:font-size="18pt" style:font-size-asian="18pt" style:font-size-complex="18pt"/>
    </style:style>
    <style:style style:name="P66" style:family="paragraph">
      <loext:graphic-properties draw:fill-color="#ffffff"/>
      <style:paragraph-properties fo:text-align="center" style:writing-mode="lr-tb"/>
      <style:text-properties fo:color="#ed1c24" loext:opacity="100%" fo:font-size="14pt" style:font-size-asian="18pt" style:font-size-complex="18pt"/>
    </style:style>
    <style:style style:name="P67" style:family="paragraph">
      <loext:graphic-properties draw:fill="none"/>
      <style:paragraph-properties fo:text-align="center"/>
      <style:text-properties fo:color="#000000" loext:opacity="100%"/>
    </style:style>
    <style:style style:name="P68" style:family="paragraph">
      <style:paragraph-properties fo:text-align="start" style:writing-mode="lr-tb"/>
      <style:text-properties fo:font-size="8pt"/>
    </style:style>
    <style:style style:name="P69" style:family="paragraph">
      <loext:graphic-properties draw:fill="none" draw:fill-color="#ffffff"/>
      <style:text-properties fo:color="#ff0000" loext:opacity="100%" fo:font-size="12pt" style:font-size-asian="18pt" style:font-size-complex="18pt"/>
    </style:style>
    <style:style style:name="P70" style:family="paragraph">
      <loext:graphic-properties draw:fill="none" draw:fill-color="#ffffff"/>
      <style:text-properties fo:color="#ff0000" loext:opacity="100%" fo:font-size="8pt" style:font-size-asian="18pt" style:font-size-complex="18pt"/>
    </style:style>
    <style:style style:name="P71" style:family="paragraph">
      <loext:graphic-properties draw:fill-color="#729fcf"/>
      <style:paragraph-properties fo:text-align="center"/>
    </style:style>
    <style:style style:name="P72" style:family="paragraph">
      <loext:graphic-properties draw:fill-color="#ffffff"/>
      <style:paragraph-properties fo:text-align="center"/>
      <style:text-properties fo:font-size="14pt" style:font-size-asian="18pt" style:font-size-complex="18pt"/>
    </style:style>
    <style:style style:name="P73" style:family="paragraph">
      <loext:graphic-properties draw:fill-color="#729fcf"/>
      <style:paragraph-properties fo:text-align="center"/>
      <style:text-properties fo:font-size="14pt" style:font-size-asian="18pt" style:font-size-complex="18pt"/>
    </style:style>
    <style:style style:name="P74" style:family="paragraph">
      <loext:graphic-properties draw:fill="none" draw:fill-color="#ffffff"/>
      <style:text-properties fo:color="#ff0000" loext:opacity="100%"/>
    </style:style>
    <style:style style:name="P75" style:family="paragraph">
      <loext:graphic-properties draw:fill="none" draw:fill-color="#ffffff"/>
      <style:text-properties fo:font-size="8pt" style:font-size-asian="18pt" style:font-size-complex="18pt"/>
    </style:style>
    <style:style style:name="P76" style:family="paragraph">
      <loext:graphic-properties draw:fill="none" draw:fill-color="#ffffff"/>
      <style:text-properties fo:color="#00a933" loext:opacity="100%" fo:font-size="8pt" style:font-size-asian="18pt" style:font-size-complex="18pt"/>
    </style:style>
    <style:style style:name="P77" style:family="paragraph">
      <loext:graphic-properties draw:fill="none" draw:fill-color="#ffffff"/>
      <style:text-properties fo:color="#ffbf00" loext:opacity="100%" fo:font-size="8pt" style:font-size-asian="18pt" style:font-size-complex="18pt"/>
    </style:style>
    <style:style style:name="P78" style:family="paragraph">
      <loext:graphic-properties draw:fill="none" draw:fill-color="#ffffff"/>
      <style:text-properties fo:color="#8d1d75" loext:opacity="100%" fo:font-size="8pt" style:font-size-asian="18pt" style:font-size-complex="18pt"/>
    </style:style>
    <style:style style:name="P79" style:family="paragraph">
      <loext:graphic-properties draw:fill="none" draw:fill-color="#ffffff"/>
      <style:text-properties style:text-line-through-style="solid" style:text-line-through-type="single" fo:font-size="14pt" style:font-size-asian="18pt" style:font-size-complex="18pt"/>
    </style:style>
    <style:style style:name="P80" style:family="paragraph">
      <loext:graphic-properties draw:fill="none" draw:fill-color="#ffffff"/>
      <style:text-properties fo:color="#000000" loext:opacity="100%" fo:font-size="8pt" style:font-size-asian="18pt" style:font-size-complex="18pt"/>
    </style:style>
    <style:style style:name="P81" style:family="paragraph">
      <loext:graphic-properties draw:fill="solid" draw:fill-color="#729fcf" draw:opacity="30%"/>
      <style:paragraph-properties fo:text-align="center"/>
    </style:style>
    <style:style style:name="P82" style:family="paragraph">
      <loext:graphic-properties draw:fill="none" draw:fill-color="#ffffff"/>
      <style:text-properties fo:font-size="14pt"/>
    </style:style>
    <style:style style:name="P83" style:family="paragraph">
      <loext:graphic-properties draw:fill="solid" draw:fill-color="#ffff00"/>
      <style:paragraph-properties fo:text-align="center" style:writing-mode="lr-tb"/>
    </style:style>
    <style:style style:name="P84" style:family="paragraph">
      <loext:graphic-properties draw:fill="solid" draw:fill-color="#00a933"/>
      <style:paragraph-properties fo:text-align="center" style:writing-mode="lr-tb"/>
    </style:style>
    <style:style style:name="P85" style:family="paragraph">
      <loext:graphic-properties draw:fill="none" draw:fill-color="#ffffff"/>
      <style:text-properties fo:font-style="italic" style:font-style-asian="italic" style:font-style-complex="italic"/>
    </style:style>
    <style:style style:name="P86" style:family="paragraph">
      <loext:graphic-properties draw:fill-color="#ffff00"/>
      <style:paragraph-properties fo:text-align="center"/>
    </style:style>
    <style:style style:name="P87" style:family="paragraph">
      <style:paragraph-properties fo:text-align="center"/>
      <style:text-properties fo:font-size="14pt"/>
    </style:style>
    <style:style style:name="P88"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1" style:family="text">
      <style:text-properties fo:font-size="8pt"/>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font-size="12pt" style:font-size-asian="18pt" style:font-size-complex="18pt"/>
    </style:style>
    <style:style style:name="T20" style:family="text">
      <style:text-properties fo:font-size="14pt" style:font-size-asian="18pt" style:font-size-complex="18pt"/>
    </style:style>
    <style:style style:name="T21" style:family="text">
      <style:text-properties fo:color="#ed1c24" loext:opacity="100%" fo:font-size="12pt" style:font-size-asian="18pt" style:font-size-complex="18pt"/>
    </style:style>
    <style:style style:name="T22" style:family="text">
      <style:text-properties fo:color="#ff0000" loext:opacity="100%" fo:font-size="12pt" style:font-size-asian="18pt" style:font-size-complex="18pt"/>
    </style:style>
    <style:style style:name="T23" style:family="text">
      <style:text-properties fo:color="#ff0000" loext:opacity="100%" fo:font-size="8pt" style:font-size-asian="18pt" style:font-size-complex="18pt"/>
    </style:style>
    <style:style style:name="T24" style:family="text">
      <style:text-properties fo:color="#ff0000" loext:opacity="100%" fo:font-size="14pt" style:font-size-asian="18pt" style:font-size-complex="18pt"/>
    </style:style>
    <style:style style:name="T25"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color="#ff0000" loext:opacity="100%"/>
    </style:style>
    <style:style style:name="T28" style:family="text">
      <style:text-properties fo:font-size="8pt" style:font-size-asian="18pt" style:font-size-complex="18pt"/>
    </style:style>
    <style:style style:name="T29" style:family="text">
      <style:text-properties fo:color="#00a933" loext:opacity="100%" fo:font-size="8pt" style:font-size-asian="18pt" style:font-size-complex="18pt"/>
    </style:style>
    <style:style style:name="T30" style:family="text">
      <style:text-properties fo:color="#00a933" loext:opacity="100%" fo:font-size="14pt" style:font-size-asian="18pt" style:font-size-complex="18pt"/>
    </style:style>
    <style:style style:name="T31" style:family="text">
      <style:text-properties fo:color="#ffbf00" loext:opacity="100%" fo:font-size="8pt" style:font-size-asian="18pt" style:font-size-complex="18pt"/>
    </style:style>
    <style:style style:name="T32" style:family="text">
      <style:text-properties fo:color="#8d1d75" loext:opacity="100%" fo:font-size="8pt" style:font-size-asian="18pt" style:font-size-complex="18pt"/>
    </style:style>
    <style:style style:name="T33" style:family="text">
      <style:text-properties style:text-line-through-style="solid" style:text-line-through-type="single" fo:font-size="14pt" style:font-size-asian="18pt" style:font-size-complex="18pt"/>
    </style:style>
    <style:style style:name="T34" style:family="text">
      <style:text-properties fo:color="#00a933" loext:opacity="100%" style:text-line-through-style="solid" style:text-line-through-type="single" fo:font-size="14pt" style:font-size-asian="18pt" style:font-size-complex="18pt"/>
    </style:style>
    <style:style style:name="T35" style:family="text">
      <style:text-properties fo:color="#ff0000" loext:opacity="100%" style:text-line-through-style="solid" style:text-line-through-type="single" fo:font-size="14pt" style:font-size-asian="18pt" style:font-size-complex="18pt"/>
    </style:style>
    <style:style style:name="T36" style:family="text">
      <style:text-properties fo:color="#000000" loext:opacity="100%" fo:font-size="8pt" style:font-size-asian="18pt" style:font-size-complex="18pt"/>
    </style:style>
    <style:style style:name="T37" style:family="text">
      <style:text-properties fo:font-size="14pt"/>
    </style:style>
    <style:style style:name="T38"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text:span><text:span text:style-name="T1">opt/</text:span><text:span text:style-name="T1">riscv</text:span><text:span text:style-name="T1">/</text:span><text:span text:style-name="T1">bin/</text:span><text:span text:style-name="T1">riscv</text:span><text:span text:style-name="T1">64-</text:span><text:span text:style-name="T1">unk</text:span><text:span text:style-name="T1">now</text:span><text:span text:style-name="T1">n-</text:span><text:span text:style-name="T1">linux</text:span><text:span text:style-name="T1">-</text:span><text:span text:style-name="T1">gnu-</text:span><text:span text:style-name="T1">as -</text:span><text:span text:style-name="T1">mar</text:span><text:span text:style-name="T1">ch=r</text:span><text:span text:style-name="T1">v64i</text:span> -mlittle-endian -g -o asfirstasm01.o asfirstasm01.asm -al=asfirstasm01.lst</text:p>
            <text:p><text:span text:style-name="T1">/</text:span><text:span text:style-name="T1">opt/</text:span><text:span text:style-name="T1">riscv</text:span><text:span text:style-name="T1">/</text:span><text:span text:style-name="T1">bin/</text:span><text:span text:style-name="T1">riscv</text:span><text:span text:style-name="T1">64-</text:span><text:span text:style-name="T1">unk</text:span><text:span text:style-name="T1">now</text:span><text:span text:style-name="T1">n-</text:span><text:span text:style-name="T1">linux</text:span><text:span text:style-name="T1">-</text:span><text:span text:style-name="T1">gnu-</text:span><text:span text:style-name="T1">ld -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text:span><text:span text:style-name="T2">ata(31:</text:span><text:span text:style-name="T2">0)</text:span></text:p>
            </draw:text-box>
          </draw:frame>
          <draw:frame draw:style-name="gr55" draw:text-style-name="P9" draw:layer="layout" svg:width="3.313cm" svg:height="0.725cm" svg:x="7.987cm" svg:y="11.975cm">
            <draw:text-box>
              <text:p><text:span text:style-name="T2">loadAd</text:span><text:span text:style-name="T2">dr(63:</text:span><text:span text:style-name="T2">0)</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text:span><text:span text:style-name="T2">ddr(63</text:span><text:span text:style-name="T2">:0)</text:span></text:p>
            </draw:text-box>
          </draw:frame>
          <draw:frame draw:style-name="gr57" draw:text-style-name="P9" draw:layer="layout" svg:width="3.36cm" svg:height="0.725cm" svg:x="9.64cm" svg:y="15cm">
            <draw:text-box>
              <text:p><text:span text:style-name="T2">readD</text:span><text:span text:style-name="T2">ata(31:</text:span><text:span text:style-name="T2">0)</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nex</text:span><text:span text:style-name="T2">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text:span><text:span text:style-name="T2">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text:span><text:span text:style-name="T2">9:15):r</text:span><text:span text:style-name="T2">addr01</text:span><text:span text:style-name="T2">(4:0)</text:span></text:p>
            </draw:text-box>
          </draw:frame>
          <draw:frame draw:style-name="gr67" draw:text-style-name="P9" draw:layer="layout" svg:width="5.104cm" svg:height="0.725cm" svg:x="16.996cm" svg:y="16cm">
            <draw:text-box>
              <text:p><text:span text:style-name="T2">instr(2</text:span><text:span text:style-name="T2">4:20):r</text:span><text:span text:style-name="T2">addr02</text:span><text:span text:style-name="T2">(4:0)</text:span></text:p>
            </draw:text-box>
          </draw:frame>
          <draw:frame draw:style-name="gr68" draw:text-style-name="P9" draw:layer="layout" svg:width="4.998cm" svg:height="0.725cm" svg:x="17.002cm" svg:y="17cm">
            <draw:text-box>
              <text:p><text:span text:style-name="T2">instr(1</text:span><text:span text:style-name="T2">1:7):w</text:span><text:span text:style-name="T2">addr01</text:span><text:span text:style-name="T2">(4:0)</text:span></text:p>
            </draw:text-box>
          </draw:frame>
          <draw:frame draw:style-name="gr69" draw:text-style-name="P9" draw:layer="layout" svg:width="3.22cm" svg:height="0.725cm" svg:x="17cm" svg:y="18cm">
            <draw:text-box>
              <text:p><text:span text:style-name="T2">wdata</text:span><text:span text:style-name="T2">01(63:</text:span><text:span text:style-name="T2">0)</text:span></text:p>
            </draw:text-box>
          </draw:frame>
          <draw:frame draw:style-name="gr70" draw:text-style-name="P9" draw:layer="layout" svg:width="3.055cm" svg:height="0.725cm" svg:x="22.945cm" svg:y="18cm">
            <draw:text-box>
              <text:p><text:span text:style-name="T2">rdata0</text:span><text:span text:style-name="T2">2(63:0</text:span><text:span text:style-name="T2">)</text:span></text:p>
            </draw:text-box>
          </draw:frame>
          <draw:frame draw:style-name="gr70" draw:text-style-name="P9" draw:layer="layout" svg:width="3.055cm" svg:height="0.725cm" svg:x="22.945cm" svg:y="15cm">
            <draw:text-box>
              <text:p><text:span text:style-name="T2">rdata0</text:span><text:span text:style-name="T2">1(63:0</text:span><text:span text:style-name="T2">)</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text:span><text:span text:style-name="T2">1: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xt:span><text:span text:style-name="T2">te</text:span><text:span text:style-name="T2">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text:span><text:span text:style-name="T2">1:0)</text:span></text:p>
            </draw:text-box>
          </draw:frame>
          <draw:frame draw:style-name="gr75" draw:text-style-name="P9" draw:layer="layout" svg:width="1.916cm" svg:height="0.725cm" svg:x="18.083cm" svg:y="23.001cm">
            <draw:text-box>
              <text:p><text:span text:style-name="T2">sel(2:0</text:span><text:span text:style-name="T2">)</text:span></text:p>
            </draw:text-box>
          </draw:frame>
          <draw:frame draw:style-name="gr76" draw:text-style-name="P9" draw:layer="layout" svg:width="2.407cm" svg:height="0.725cm" svg:x="18.593cm" svg:y="25cm">
            <draw:text-box>
              <text:p><text:span text:style-name="T2">imm(6</text:span><text:span text:style-name="T2">3: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ll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text:span><text:span text:style-name="T2">e(6:0)</text:span></text:p>
            </draw:text-box>
          </draw:frame>
          <draw:frame draw:style-name="gr83" draw:text-style-name="P9" draw:layer="layout" svg:width="2.415cm" svg:height="0.725cm" svg:x="17.001cm" svg:y="3.001cm">
            <draw:text-box>
              <text:p><text:span text:style-name="T2">func3(</text:span><text:span text:style-name="T2">2:0)</text:span></text:p>
            </draw:text-box>
          </draw:frame>
          <draw:frame draw:style-name="gr84" draw:text-style-name="P9" draw:layer="layout" svg:width="2.018cm" svg:height="0.725cm" svg:x="17.001cm" svg:y="4.001cm">
            <draw:text-box>
              <text:p><text:span text:style-name="T2">func7b</text:span><text:span text:style-name="T2">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text:span><text:span text:style-name="T2">rc(1:0)</text:span></text:p>
            </draw:text-box>
          </draw:frame>
          <draw:frame draw:style-name="gr87" draw:text-style-name="P9" draw:layer="layout" svg:width="2.212cm" svg:height="0.725cm" svg:x="20.8cm" svg:y="3cm">
            <draw:text-box>
              <text:p><text:span text:style-name="T2">dMem</text:span><text:span text:style-name="T2">Wr</text:span></text:p>
            </draw:text-box>
          </draw:frame>
          <draw:frame draw:style-name="gr88" draw:text-style-name="P9" draw:layer="layout" svg:width="2.221cm" svg:height="0.725cm" svg:x="20.791cm" svg:y="4.001cm">
            <draw:text-box>
              <text:p><text:span text:style-name="T2">dMem</text:span><text:span text:style-name="T2">R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text:span><text:span text:style-name="T2">B</text:span></text:p>
            </draw:text-box>
          </draw:frame>
          <draw:frame draw:style-name="gr90" draw:text-style-name="P9" draw:layer="layout" svg:width="1.988cm" svg:height="0.725cm" svg:x="21.024cm" svg:y="7.002cm">
            <draw:text-box>
              <text:p><text:span text:style-name="T2">aluSrc</text:span><text:span text:style-name="T2">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text:span><text:span text:style-name="T2">c(2:0)</text:span></text:p>
            </draw:text-box>
          </draw:frame>
          <draw:frame draw:style-name="gr94" draw:text-style-name="P9" draw:layer="layout" svg:width="2.555cm" svg:height="0.725cm" svg:x="20.457cm" svg:y="11.002cm">
            <draw:text-box>
              <text:p><text:span text:style-name="T2">aluSel(</text:span><text:span text:style-name="T2">4: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ext:span><text:span text:style-name="T2">t(63: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text:span><text:span text:style-name="T2">c(2:0)</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text:span><text:span text:style-name="T2">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text:span><text:span text:style-name="T2">at(63:0</text:span><text:span text:style-name="T2">)</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text:span><text:span text:style-name="T2">3: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text:span><text:span text:style-name="T2">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text:span><text:span text:style-name="T2">u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text:span><text:span text:style-name="T2">Rd</text:span></text:p>
          </draw:text-box>
        </draw:frame>
        <draw:frame draw:style-name="gr118" draw:text-style-name="P9" draw:layer="layout" svg:width="2.212cm" svg:height="0.725cm" svg:x="32.801cm" svg:y="2.878cm">
          <draw:text-box>
            <text:p><text:span text:style-name="T2">dMem</text:span><text:span text:style-name="T2">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text:span><text:span text:style-name="T2">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text:span><text:span text:style-name="T2">4: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text:span><text:span text:style-name="T2">6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text:span><text:span text:style-name="T2">rc(1:0)</text:span></text:p>
          </draw:text-box>
        </draw:frame>
        <draw:frame draw:style-name="gr129" draw:text-style-name="P9" draw:layer="layout" svg:width="2.013cm" svg:height="0.725cm" svg:x="37.3cm" svg:y="13.375cm">
          <draw:text-box>
            <text:p><text:span text:style-name="T2">readD</text:span><text:span text:style-name="T2">a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text:span><text:span text:style-name="T2">X </text:span><text:span text:style-name="T2">RAM/</text:span><text:span text:style-name="T2">R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us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at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_tak</text:span><text:span text:style-name="T2">en = </text:span><text:span text:style-name="T2">mstatu</text:span><text:span text:style-name="T2">s.MIE </text:span><text:span text:style-name="T2">&amp;&amp; (| </text:span><text:span text:style-name="T2">(mie &amp; </text:span><text:span text:style-name="T2">mip))</text:span></text:p>
            <text:p><text:span text:style-name="T2"/></text:p>
            <text:p><text:span text:style-name="T2">If </text:span><text:span text:style-name="T2">irq_tak</text:span><text:span text:style-name="T2">en</text:span></text:p>
            <text:p><text:span text:style-name="T2"><text:s text:c="2"/></text:span><text:span text:style-name="T2">mepc </text:span><text:span text:style-name="T2">= </text:span><text:span text:style-name="T2">Pcnext</text:span></text:p>
            <text:p><text:span text:style-name="T2"><text:s text:c="2"/></text:span><text:span text:style-name="T2">Mcaus</text:span><text:span text:style-name="T2">e = {1, </text:span><text:span text:style-name="T2">irq_id </text:span><text:span text:style-name="T2">(11)}</text:span></text:p>
            <text:p><text:span text:style-name="T2"><text:s text:c="2"/></text:span><text:span text:style-name="T2">mstatu</text:span><text:span text:style-name="T2">s.MPI</text:span><text:span text:style-name="T2">E = </text:span><text:span text:style-name="T2">mstatu</text:span><text:span text:style-name="T2">s.MIE</text:span></text:p>
            <text:p><text:span text:style-name="T2"><text:s text:c="2"/></text:span><text:span text:style-name="T2">mstatu</text:span><text:span text:style-name="T2">s.MIE </text:span><text:span text:style-name="T2">= 0</text:span></text:p>
            <text:p text:style-name="P6"><text:span text:style-name="T3"><text:s text:c="2"/></text:span><text:span text:style-name="T2">PC = </text:span><text:span text:style-name="T2">mtvec</text:span></text:p>
            <text:p><text:span text:style-name="T2"/></text:p>
            <text:p><text:span text:style-name="T2">If mret </text:span></text:p>
            <text:p><text:span text:style-name="T2"><text:s text:c="2"/></text:span><text:span text:style-name="T2">PC = </text:span><text:span text:style-name="T2">mepc</text:span></text:p>
            <text:p><text:span text:style-name="T2"><text:s text:c="2"/></text:span><text:span text:style-name="T2">mstatu</text:span><text:span text:style-name="T2">s.MIE </text:span><text:span text:style-name="T2">= </text:span><text:span text:style-name="T2">mstatu</text:span><text:span text:style-name="T2">s.MPI</text:span><text:span text:style-name="T2">E</text:span></text:p>
            <text:p><text:span text:style-name="T2"/></text:p>
            <text:p><text:span text:style-name="T2">Examp</text:span><text:span text:style-name="T2">le:</text:span></text:p>
            <text:p><text:span text:style-name="T2">mip[7] </text:span><text:span text:style-name="T2">= </text:span><text:span text:style-name="T2">gpio[0]</text:span></text:p>
            <text:p><text:span text:style-name="T2">mie[7] </text:span><text:span text:style-name="T2">must </text:span><text:span text:style-name="T2">be 1</text:span></text:p>
            <text:p><text:span text:style-name="T2"/></text:p>
            <text:p><text:span text:style-name="T2">CLIC </text:span><text:span text:style-name="T2">= 0 =&gt; </text:span><text:span text:style-name="T2">CLINT </text:span><text:span text:style-name="T2">mode, </text:span><text:span text:style-name="T2">in </text:span><text:span text:style-name="T2">CLINT </text:span><text:span text:style-name="T2">mode, </text:span><text:span text:style-name="T2">non-</text:span><text:span text:style-name="T2">vector</text:span><text:span text:style-name="T2">ed </text:span><text:span text:style-name="T2">chose</text:span><text:span text:style-name="T2">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nex</text:span><text:span text:style-name="T2">t_mux</text:span></text:p>
          </draw:text-box>
        </draw:frame>
        <draw:frame draw:style-name="gr150" draw:text-style-name="P9" draw:layer="layout" svg:width="2.923cm" svg:height="0.725cm" draw:transform="rotate (1.5707963267949) translate (3.8cm 14.123cm)">
          <draw:text-box>
            <text:p><text:span text:style-name="T2">PCnex</text:span><text:span text:style-name="T2">t_i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_tak</text:span><text:span text:style-name="T2">en</text:span></text:p>
          </draw:text-box>
        </draw:frame>
        <draw:custom-shape draw:style-name="gr148" draw:text-style-name="P13" draw:layer="layout" svg:width="2cm" svg:height="1cm" draw:transform="rotate (1.5707963267949) translate (3.8cm 11.7cm)">
          <text:p text:style-name="P7"><text:span text:style-name="T2">mtv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nex</text:span><text:span text:style-name="T2">t_2mu</text:span><text:span text:style-name="T2">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_ext</text:span><text:span text:style-name="T2">_i[7]</text:span></text:p>
          </draw:text-box>
        </draw:frame>
        <draw:frame draw:style-name="gr157" draw:text-style-name="P9" draw:layer="layout" svg:width="3.558cm" svg:height="0.725cm" svg:x="18cm" svg:y="0.775cm">
          <draw:text-box>
            <text:p><text:span text:style-name="T2">irq_ext</text:span><text:span text:style-name="T2">_sync</text:span><text:span text:style-name="T2">1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_pe</text:span><text:span text:style-name="T2">nding_</text:span><text:span text:style-name="T2">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_mi</text:span><text:span text:style-name="T2">p_s[11</text:span><text:span text:style-name="T2">]</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_ext</text:span><text:span text:style-name="T2">_sync</text:span><text:span text:style-name="T2">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sD</text:span><text:span text:style-name="T2">ataRd</text:span><text:span text:style-name="T2">_s[31:</text:span><text:span text:style-name="T2">0]</text:span></text:p>
          </draw:text-box>
        </draw:frame>
        <draw:frame draw:style-name="gr151" draw:text-style-name="P9" draw:layer="layout" svg:width="2.242cm" svg:height="0.725cm" svg:x="0.978cm" svg:y="17.277cm">
          <draw:text-box>
            <text:p><text:span text:style-name="T2">ir_s[31</text:span><text:span text:style-name="T2">:0]</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mre</text:span><text:span text:style-name="T2">t_fetch</text:span><text:span text:style-name="T2">ed_s</text:span></text:p>
          </draw:text-box>
        </draw:frame>
        <draw:frame draw:style-name="gr172" draw:text-style-name="P9" draw:layer="layout" svg:width="2.335cm" svg:height="0.725cm" svg:x="6.001cm" svg:y="16.276cm">
          <draw:text-box>
            <text:p><text:span text:style-name="T2">is_mre</text:span><text:span text:style-name="T2">t_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_mi</text:span><text:span text:style-name="T2">e_s[11</text:span><text:span text:style-name="T2">]</text:span></text:p>
          </draw:text-box>
        </draw:frame>
        <draw:frame draw:style-name="gr162" draw:text-style-name="P9" draw:layer="layout" svg:width="3.106cm" svg:height="0.725cm" svg:x="4.398cm" svg:y="21.275cm">
          <draw:text-box>
            <text:p><text:span text:style-name="T2">csr_mi</text:span><text:span text:style-name="T2">p_s[11</text:span><text:span text:style-name="T2">]</text:span></text:p>
          </draw:text-box>
        </draw:frame>
        <draw:frame draw:style-name="gr173" draw:text-style-name="P9" draw:layer="layout" svg:width="3.698cm" svg:height="0.725cm" svg:x="3.9cm" svg:y="23.275cm">
          <draw:text-box>
            <text:p><text:span text:style-name="T2">csr_m</text:span><text:span text:style-name="T2">status</text:span><text:span text:style-name="T2">_s[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cod</text:span><text:span text:style-name="T2">e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p_ill</text:span><text:span text:style-name="T2">egal_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p_m</text:span><text:span text:style-name="T2">isalign</text:span><text:span text:style-name="T2">ed_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vali</text:span><text:span text:style-name="T2">d_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ec_</text:span><text:span text:style-name="T2">phase</text:span><text:span text:style-name="T2">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et_p</text:span><text:span text:style-name="T2">ending</text:span><text:span text:style-name="T2">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ch0</text:span><text:span text:style-name="T2">_phas</text:span><text:span text:style-name="T2">e_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p_ta</text:span><text:span text:style-name="T2">ken_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r_c</text:span><text:span text:style-name="T2">ommit</text:span><text:span text:style-name="T2">_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_pe</text:span><text:span text:style-name="T2">nding_</text:span><text:span text:style-name="T2">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_mi</text:span><text:span text:style-name="T2">e_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_m</text:span><text:span text:style-name="T2">status</text:span><text:span text:style-name="T2">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_m</text:span><text:span text:style-name="T2">ep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_mt</text:span><text:span text:style-name="T2">vec_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_m</text:span><text:span text:style-name="T2">cause</text:span><text:span text:style-name="T2">_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_in</text:span><text:span text:style-name="T2">st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ec_</text:span><text:span text:style-name="T2">phase</text:span><text:span text:style-name="T2">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vali</text:span><text:span text:style-name="T2">d_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_in</text:span><text:span text:style-name="T2">str_30</text:span><text:span text:style-name="T2">4</text:span></text:p>
          </draw:text-box>
        </draw:frame>
        <draw:frame draw:style-name="gr110" draw:text-style-name="P9" draw:layer="layout" svg:width="1.302cm" svg:height="0.725cm" svg:x="32.201cm" svg:y="5.6cm">
          <draw:text-box>
            <text:p><text:span text:style-name="T2">hold</text:span></text:p>
          </draw:text-box>
        </draw:frame>
        <draw:frame draw:style-name="gr110" draw:text-style-name="P9" draw:layer="layout" svg:width="1.302cm" svg:height="0.725cm" svg:x="33.201cm" svg:y="7.601cm">
          <draw:text-box>
            <text:p><text:span text:style-name="T2">hol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s[14</text:span><text:span text:style-name="T2">:1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A_</text:span><text:span text:style-name="T2">s</text:span></text:p>
          </draw:text-box>
        </draw:frame>
        <draw:frame draw:style-name="gr211" draw:text-style-name="P9" draw:layer="layout" svg:width="4.117cm" svg:height="0.725cm" svg:x="31.576cm" svg:y="10.1cm">
          <draw:text-box>
            <text:p><text:span text:style-name="T2">csr_mi</text:span><text:span text:style-name="T2">e_s | </text:span><text:span text:style-name="T2">regA_</text:span><text:span text:style-name="T2">s</text:span></text:p>
          </draw:text-box>
        </draw:frame>
        <draw:frame draw:style-name="gr212" draw:text-style-name="P9" draw:layer="layout" svg:width="4.536cm" svg:height="0.725cm" svg:x="31.157cm" svg:y="10.475cm">
          <draw:text-box>
            <text:p><text:span text:style-name="T2">csr_mi</text:span><text:span text:style-name="T2">e_s &amp; </text:span><text:span text:style-name="T2">~regA</text:span><text:span text:style-name="T2">_s</text:span></text:p>
          </draw:text-box>
        </draw:frame>
        <draw:frame draw:style-name="gr213" draw:text-style-name="P9" draw:layer="layout" svg:width="5.84cm" svg:height="0.725cm" svg:x="29.853cm" svg:y="10.876cm">
          <draw:text-box>
            <text:p><text:span text:style-name="T2">{{52{1'</text:span><text:span text:style-name="T2">b0}}, </text:span><text:span text:style-name="T2">ir_s[19</text:span><text:span text:style-name="T2">:15], </text:span><text:span text:style-name="T2">7'b0}</text:span></text:p>
          </draw:text-box>
        </draw:frame>
        <draw:frame draw:style-name="gr214" draw:text-style-name="P9" draw:layer="layout" svg:width="8.114cm" svg:height="0.725cm" svg:x="27.579cm" svg:y="11.3cm">
          <draw:text-box>
            <text:p><text:span text:style-name="T2">csr_mi</text:span><text:span text:style-name="T2">e_s | </text:span><text:span text:style-name="T2">{{52{1'</text:span><text:span text:style-name="T2">b0}}, </text:span><text:span text:style-name="T2">ir_s[19</text:span><text:span text:style-name="T2">:15], </text:span><text:span text:style-name="T2">7'b0}</text:span></text:p>
          </draw:text-box>
        </draw:frame>
        <draw:frame draw:style-name="gr215" draw:text-style-name="P9" draw:layer="layout" svg:width="8.533cm" svg:height="0.725cm" svg:x="27.16cm" svg:y="11.701cm">
          <draw:text-box>
            <text:p><text:span text:style-name="T2">csr_mi</text:span><text:span text:style-name="T2">e_s &amp; </text:span><text:span text:style-name="T2">~{{52{</text:span><text:span text:style-name="T2">1'b0}}, </text:span><text:span text:style-name="T2">ir_s[19</text:span><text:span text:style-name="T2">:15], </text:span><text:span text:style-name="T2">7'b0}</text:span></text:p>
          </draw:text-box>
        </draw:frame>
        <draw:frame draw:style-name="gr216" draw:text-style-name="P9" draw:layer="layout" svg:width="16.221cm" svg:height="8.309cm" svg:x="24.4cm" svg:y="13.175cm">
          <draw:text-box>
            <text:p><text:span text:style-name="T2">trap_ta</text:span><text:span text:style-name="T2">ken_s:</text:span></text:p>
            <text:p><text:span text:style-name="T3"><text:s/></text:span><text:span text:style-name="T3">- </text:span><text:span text:style-name="T3">csr_m</text:span><text:span text:style-name="T3">status</text:span><text:span text:style-name="T3">_s[7] = </text:span><text:span text:style-name="T2">csr_m</text:span><text:span text:style-name="T2">status</text:span><text:span text:style-name="T2">_s[3]</text:span></text:p>
            <text:p text:style-name="P6"><text:span text:style-name="T3"><text:s/></text:span><text:span text:style-name="T3">- </text:span><text:span text:style-name="T3">csr_m</text:span><text:span text:style-name="T3">status</text:span><text:span text:style-name="T3">_s[3] = </text:span><text:span text:style-name="T3">0</text:span></text:p>
            <text:p text:style-name="P6"><text:span text:style-name="T3">else</text:span></text:p>
            <text:p text:style-name="P6"><text:span text:style-name="T3"><text:s text:c="2"/></text:span><text:span text:style-name="T3">is_mre</text:span><text:span text:style-name="T3">t_s &amp;&amp; </text:span><text:span text:style-name="T3">exec_</text:span><text:span text:style-name="T3">phase</text:span><text:span text:style-name="T3">_s:</text:span></text:p>
            <text:p text:style-name="P6"><text:span text:style-name="T3"><text:s text:c="3"/></text:span><text:span text:style-name="T3">- </text:span><text:span text:style-name="T3">csr_m</text:span><text:span text:style-name="T3">status</text:span><text:span text:style-name="T3">_s[3] = </text:span><text:span text:style-name="T3">csr_m</text:span><text:span text:style-name="T3">status</text:span><text:span text:style-name="T3">_s[7]</text:span></text:p>
            <text:p text:style-name="P6"><text:span text:style-name="T3"><text:s text:c="3"/></text:span><text:span text:style-name="T3">- </text:span><text:span text:style-name="T3">csr_m</text:span><text:span text:style-name="T3">status</text:span><text:span text:style-name="T3">_s[7] = </text:span><text:span text:style-name="T3">1</text:span></text:p>
            <text:p text:style-name="P6"><text:span text:style-name="T3"><text:s text:c="2"/></text:span><text:span text:style-name="T3">else</text:span></text:p>
            <text:p text:style-name="P6"><text:span text:style-name="T3"><text:s text:c="4"/></text:span><text:span text:style-name="T3">exec_</text:span><text:span text:style-name="T3">phase</text:span><text:span text:style-name="T3">_s &amp;&amp; </text:span><text:span text:style-name="T3">ir_vali</text:span><text:span text:style-name="T3">d_s:</text:span></text:p>
            <text:p text:style-name="P6"><text:span text:style-name="T3"><text:s text:c="6"/></text:span><text:span text:style-name="T3">csr_in</text:span><text:span text:style-name="T3">str_30</text:span><text:span text:style-name="T3">0:</text:span></text:p>
            <text:p text:style-name="P6"><text:span text:style-name="T3"><text:s text:c="8"/></text:span><text:span text:style-name="T3">ir_s[14</text:span><text:span text:style-name="T3">:12]:</text:span></text:p>
            <text:p text:style-name="P6"><text:span text:style-name="T3"><text:s text:c="10"/></text:span><text:span text:style-name="T3">3'b001</text:span><text:span text:style-name="T3">: </text:span><text:span text:style-name="T3">csr_m</text:span><text:span text:style-name="T3">status</text:span><text:span text:style-name="T3">_s &lt;= </text:span><text:span text:style-name="T3">regA_</text:span><text:span text:style-name="T3">s;</text:span></text:p>
            <text:p text:style-name="P6"><text:span text:style-name="T3"><text:s text:c="12"/></text:span><text:span text:style-name="T3"><text:s text:c="4"/></text:span><text:span text:style-name="T3">3'b010</text:span><text:span text:style-name="T3">: </text:span><text:span text:style-name="T3">csr_m</text:span><text:span text:style-name="T3">status</text:span><text:span text:style-name="T3">_s &lt;= </text:span><text:span text:style-name="T3">csr_m</text:span><text:span text:style-name="T3">status</text:span><text:span text:style-name="T3">_s | </text:span><text:span text:style-name="T3">regA_</text:span><text:span text:style-name="T3">s;</text:span></text:p>
            <text:p text:style-name="P6"><text:span text:style-name="T3"><text:s text:c="12"/></text:span><text:span text:style-name="T3"><text:s text:c="4"/></text:span><text:span text:style-name="T3">3'b011</text:span><text:span text:style-name="T3">: </text:span><text:span text:style-name="T3">csr_m</text:span><text:span text:style-name="T3">status</text:span><text:span text:style-name="T3">_s &lt;= </text:span><text:span text:style-name="T3">csr_m</text:span><text:span text:style-name="T3">status</text:span><text:span text:style-name="T3">_s &amp; </text:span><text:span text:style-name="T3">~regA</text:span><text:span text:style-name="T3">_s;</text:span></text:p>
            <text:p text:style-name="P6"><text:span text:style-name="T3"><text:s text:c="12"/></text:span><text:span text:style-name="T3"><text:s text:c="4"/></text:span><text:span text:style-name="T3">3'b101</text:span><text:span text:style-name="T3">: </text:span><text:span text:style-name="T3">csr_m</text:span><text:span text:style-name="T3">status</text:span><text:span text:style-name="T3">_s &lt;= </text:span><text:span text:style-name="T3">{{52{1'</text:span><text:span text:style-name="T3">b0}}, </text:span><text:span text:style-name="T3">ir_s[19</text:span><text:span text:style-name="T3">:15], </text:span><text:span text:style-name="T3">7'b0};</text:span></text:p>
            <text:p text:style-name="P6"><text:span text:style-name="T3"><text:s text:c="12"/></text:span><text:span text:style-name="T3"><text:s text:c="4"/></text:span><text:span text:style-name="T3">3'b110</text:span><text:span text:style-name="T3">: </text:span><text:span text:style-name="T3">csr_m</text:span><text:span text:style-name="T3">status</text:span><text:span text:style-name="T3">_s &lt;= </text:span><text:span text:style-name="T3">csr_m</text:span><text:span text:style-name="T3">status</text:span><text:span text:style-name="T3">_s | </text:span><text:span text:style-name="T3">{{52{1'</text:span><text:span text:style-name="T3">b0}}, </text:span><text:span text:style-name="T3">ir_s[19</text:span><text:span text:style-name="T3">:15], </text:span><text:span text:style-name="T3">7'b0};</text:span></text:p>
            <text:p text:style-name="P6"><text:span text:style-name="T3"><text:s text:c="12"/></text:span><text:span text:style-name="T3"><text:s text:c="4"/></text:span><text:span text:style-name="T3">3'b111: </text:span><text:span text:style-name="T3">csr_m</text:span><text:span text:style-name="T3">status</text:span><text:span text:style-name="T3">_s &lt;= </text:span><text:span text:style-name="T3">csr_m</text:span><text:span text:style-name="T3">status</text:span><text:span text:style-name="T3">_s &amp; </text:span><text:span text:style-name="T3">~{{52{</text:span><text:span text:style-name="T3">1'b0}}, </text:span><text:span text:style-name="T3">ir_s[19</text:span><text:span text:style-name="T3">:15], </text:span><text:span text:style-name="T3">7'b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p_ta</text:span><text:span text:style-name="T2">ken_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_m</text:span><text:span text:style-name="T2">epc_s</text:span></text:p>
          </draw:text-box>
        </draw:frame>
        <draw:frame draw:style-name="gr220" draw:text-style-name="P9" draw:layer="layout" svg:width="3.584cm" svg:height="0.725cm" svg:x="1.958cm" svg:y="12.701cm">
          <draw:text-box>
            <text:p><text:span text:style-name="T2">csr_mt</text:span><text:span text:style-name="T2">vec_s, </text:span><text:span text:style-name="T2">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sA</text:span><text:span text:style-name="T6">ddr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vali</text:span><text:span text:style-name="T2">d_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sD</text:span><text:span text:style-name="T6">ataRd</text:span><text:span text:style-name="T6">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s[19</text:span><text:span text:style-name="T2">:25]</text:span></text:p>
          </draw:text-box>
        </draw:frame>
        <draw:frame draw:style-name="gr209" draw:text-style-name="P9" draw:layer="layout" svg:width="2.475cm" svg:height="0.725cm" svg:x="22.759cm" svg:y="8.901cm">
          <draw:text-box>
            <text:p><text:span text:style-name="T2">ir_s[24</text:span><text:span text:style-name="T2">:20]</text:span></text:p>
          </draw:text-box>
        </draw:frame>
        <draw:frame draw:style-name="gr231" draw:text-style-name="P9" draw:layer="layout" svg:width="2.208cm" svg:height="0.725cm" svg:x="23.026cm" svg:y="9.402cm">
          <draw:text-box>
            <text:p><text:span text:style-name="T2">ir_s[11</text:span><text:span text:style-name="T2">:7]</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file</text:span><text:span text:style-name="T2">_data_</text:span><text:span text:style-name="T2">w_s</text:span></text:p>
          </draw:text-box>
        </draw:frame>
        <draw:frame draw:style-name="gr162" draw:text-style-name="P9" draw:layer="layout" svg:width="3.106cm" svg:height="0.725cm" svg:x="23.094cm" svg:y="7.275cm">
          <draw:text-box>
            <text:p><text:span text:style-name="T2">regWr</text:span><text:span text:style-name="T2">_final_</text:span><text:span text:style-name="T2">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r_c</text:span><text:span text:style-name="T2">ommit</text:span><text:span text:style-name="T2">_s</text:span></text:p>
          </draw:text-box>
        </draw:frame>
        <draw:frame draw:style-name="gr238" draw:text-style-name="P25" draw:layer="layout" svg:width="2.094cm" svg:height="0.725cm" svg:x="22.101cm" svg:y="5.876cm">
          <draw:text-box>
            <text:p><text:span text:style-name="T7">regWr</text:span><text:span text:style-name="T7">_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A_</text:span><text:span text:style-name="T2">s</text:span></text:p>
          </draw:text-box>
        </draw:frame>
        <draw:frame draw:style-name="gr239" draw:text-style-name="P22" draw:layer="layout" svg:width="3.338cm" svg:height="0.725cm" svg:x="26.994cm" svg:y="12.276cm">
          <draw:text-box>
            <text:p><text:span text:style-name="T6">dBusD</text:span><text:span text:style-name="T6">ataWr</text:span><text:span text:style-name="T6">_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s</text:span></text:p>
          </draw:text-box>
        </draw:frame>
        <draw:frame draw:style-name="gr242" draw:text-style-name="P9" draw:layer="layout" svg:width="2.356cm" svg:height="0.725cm" svg:x="27.016cm" svg:y="14.776cm">
          <draw:text-box>
            <text:p><text:span text:style-name="T2">immEx</text:span><text:span text:style-name="T2">t_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mSr</text:span><text:span text:style-name="T7">cx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Src</text:span><text:span text:style-name="T7">B_s</text:span></text:p>
          </draw:text-box>
        </draw:frame>
        <draw:frame draw:style-name="gr244" draw:text-style-name="P9" draw:layer="layout" svg:width="1.793cm" svg:height="0.725cm" svg:x="32.007cm" svg:y="12.803cm">
          <draw:text-box>
            <text:p><text:span text:style-name="T2">srcB_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Src</text:span><text:span text:style-name="T7">A_s</text:span></text:p>
          </draw:text-box>
        </draw:frame>
        <draw:frame draw:style-name="gr244" draw:text-style-name="P9" draw:layer="layout" svg:width="1.793cm" svg:height="0.725cm" svg:x="32.007cm" svg:y="7.803cm">
          <draw:text-box>
            <text:p><text:span text:style-name="T2">srcA_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Res</text:span><text:span text:style-name="T2">_s</text:span></text:p>
          </draw:text-box>
        </draw:frame>
        <draw:frame draw:style-name="gr247" draw:text-style-name="P9" draw:layer="layout" svg:width="1.747cm" svg:height="0.725cm" svg:x="35.009cm" svg:y="12.305cm">
          <draw:text-box>
            <text:p><text:span text:style-name="T2">take_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Sel</text:span><text:span text:style-name="T7">a_s</text:span></text:p>
          </draw:text-box>
        </draw:frame>
        <draw:frame draw:style-name="gr248" draw:text-style-name="P25" draw:layer="layout" svg:width="2.36cm" svg:height="0.725cm" svg:x="33.24cm" svg:y="14.201cm">
          <draw:text-box>
            <text:p><text:span text:style-name="T7">aluSel</text:span><text:span text:style-name="T7">b_s</text:span></text:p>
          </draw:text-box>
        </draw:frame>
        <draw:frame draw:style-name="gr249" draw:text-style-name="P22" draw:layer="layout" svg:width="2.805cm" svg:height="0.725cm" svg:x="35.009cm" svg:y="7.905cm">
          <draw:text-box>
            <text:p><text:span text:style-name="T6">dBusA</text:span><text:span text:style-name="T6">ddr_s</text:span></text:p>
          </draw:text-box>
        </draw:frame>
        <draw:frame draw:style-name="gr250" draw:text-style-name="P9" draw:layer="layout" svg:width="3.11cm" svg:height="0.725cm" svg:x="35.01cm" svg:y="7.506cm">
          <draw:text-box>
            <text:p><text:span text:style-name="T2">aluCal</text:span><text:span text:style-name="T2">cRes_</text:span><text:span text:style-name="T2">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em</text:span></text:p>
          </draw:text-box>
        </draw:frame>
        <draw:frame draw:style-name="gr251" draw:text-style-name="P9" draw:layer="layout" svg:width="2.686cm" svg:height="0.725cm" svg:x="37.3cm" svg:y="10.275cm">
          <draw:text-box>
            <text:p><text:span text:style-name="T2">async. </text:span><text:span text:style-name="T2">rea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usD</text:span><text:span text:style-name="T6">ataRd</text:span><text:span text:style-name="T6">_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em</text:span><text:span text:style-name="T7">Wr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ec_</text:span><text:span text:style-name="T2">pha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ult_</text:span><text:span text:style-name="T2">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p4_</text:span><text:span text:style-name="T2">s</text:span></text:p>
          </draw:text-box>
        </draw:frame>
        <draw:frame draw:style-name="gr156" draw:text-style-name="P9" draw:layer="layout" svg:width="2.572cm" svg:height="0.725cm" svg:x="1.928cm" svg:y="17.5cm">
          <draw:text-box>
            <text:p><text:span text:style-name="T2">csr_da</text:span><text:span text:style-name="T2">ta_s</text:span></text:p>
          </draw:text-box>
        </draw:frame>
        <draw:frame draw:style-name="gr263" draw:text-style-name="P25" draw:layer="layout" svg:width="2.83cm" svg:height="0.725cm" svg:x="6.195cm" svg:y="19.1cm">
          <draw:text-box>
            <text:p><text:span text:style-name="T7">resultS</text:span><text:span text:style-name="T7">rcx_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rD</text:span><text:span text:style-name="T2">ecode</text:span></text:p>
          </draw:text-box>
        </draw:frame>
        <draw:frame draw:style-name="gr262" draw:text-style-name="P9" draw:layer="layout" svg:width="2.005cm" svg:height="0.725cm" svg:x="26.995cm" svg:y="21.4cm">
          <draw:text-box>
            <text:p><text:span text:style-name="T2">ir_s[6:</text:span><text:span text:style-name="T2">0]</text:span></text:p>
          </draw:text-box>
        </draw:frame>
        <draw:frame draw:style-name="gr209" draw:text-style-name="P9" draw:layer="layout" svg:width="2.475cm" svg:height="0.725cm" svg:x="26.525cm" svg:y="21.9cm">
          <draw:text-box>
            <text:p><text:span text:style-name="T2">ir_s[14</text:span><text:span text:style-name="T2">:12]</text:span></text:p>
          </draw:text-box>
        </draw:frame>
        <draw:frame draw:style-name="gr265" draw:text-style-name="P9" draw:layer="layout" svg:width="1.886cm" svg:height="0.725cm" svg:x="27.114cm" svg:y="22.4cm">
          <draw:text-box>
            <text:p><text:span text:style-name="T2">ir_s[30</text:span><text:span text:style-name="T2">]</text:span></text:p>
          </draw:text-box>
        </draw:frame>
        <draw:frame draw:style-name="gr247" draw:text-style-name="P9" draw:layer="layout" svg:width="1.747cm" svg:height="0.725cm" svg:x="27.253cm" svg:y="20.9cm">
          <draw:text-box>
            <text:p><text:span text:style-name="T2">take_s</text:span></text:p>
          </draw:text-box>
        </draw:frame>
        <draw:frame draw:style-name="gr263" draw:text-style-name="P25" draw:layer="layout" svg:width="2.83cm" svg:height="0.725cm" svg:x="30.96cm" svg:y="20.375cm">
          <draw:text-box>
            <text:p><text:span text:style-name="T7">resultS</text:span><text:span text:style-name="T7">rcx_s</text:span></text:p>
          </draw:text-box>
        </draw:frame>
        <draw:frame draw:style-name="gr256" draw:text-style-name="P25" draw:layer="layout" svg:width="2.657cm" svg:height="0.725cm" svg:x="30.96cm" svg:y="20.876cm">
          <draw:text-box>
            <text:p><text:span text:style-name="T7">dMem</text:span><text:span text:style-name="T7">Wr_s</text:span></text:p>
          </draw:text-box>
        </draw:frame>
        <draw:frame draw:style-name="gr198" draw:text-style-name="P25" draw:layer="layout" svg:width="2.428cm" svg:height="0.725cm" svg:x="30.96cm" svg:y="21.9cm">
          <draw:text-box>
            <text:p><text:span text:style-name="T7">aluSrc</text:span><text:span text:style-name="T7">A_s</text:span></text:p>
          </draw:text-box>
        </draw:frame>
        <draw:frame draw:style-name="gr198" draw:text-style-name="P25" draw:layer="layout" svg:width="2.428cm" svg:height="0.725cm" svg:x="30.96cm" svg:y="22.375cm">
          <draw:text-box>
            <text:p><text:span text:style-name="T7">aluSrc</text:span><text:span text:style-name="T7">B_s</text:span></text:p>
          </draw:text-box>
        </draw:frame>
        <draw:frame draw:style-name="gr238" draw:text-style-name="P25" draw:layer="layout" svg:width="2.094cm" svg:height="0.725cm" svg:x="30.96cm" svg:y="22.876cm">
          <draw:text-box>
            <text:p><text:span text:style-name="T7">regWr</text:span><text:span text:style-name="T7">_s</text:span></text:p>
          </draw:text-box>
        </draw:frame>
        <draw:frame draw:style-name="gr266" draw:text-style-name="P25" draw:layer="layout" svg:width="1.865cm" svg:height="0.725cm" svg:x="30.96cm" svg:y="23.375cm">
          <draw:text-box>
            <text:p><text:span text:style-name="T7">jump_</text:span><text:span text:style-name="T7">s</text:span></text:p>
          </draw:text-box>
        </draw:frame>
        <draw:frame draw:style-name="gr243" draw:text-style-name="P25" draw:layer="layout" svg:width="2.593cm" svg:height="0.725cm" svg:x="30.96cm" svg:y="23.876cm">
          <draw:text-box>
            <text:p><text:span text:style-name="T7">immSr</text:span><text:span text:style-name="T7">cx_s</text:span></text:p>
          </draw:text-box>
        </draw:frame>
        <draw:frame draw:style-name="gr248" draw:text-style-name="P25" draw:layer="layout" svg:width="2.36cm" svg:height="0.725cm" svg:x="30.96cm" svg:y="24.4cm">
          <draw:text-box>
            <text:p><text:span text:style-name="T7">aluSel</text:span><text:span text:style-name="T7">a_s</text:span></text:p>
          </draw:text-box>
        </draw:frame>
        <draw:frame draw:style-name="gr248" draw:text-style-name="P25" draw:layer="layout" svg:width="2.36cm" svg:height="0.725cm" svg:x="30.96cm" svg:y="24.875cm">
          <draw:text-box>
            <text:p><text:span text:style-name="T7">aluSel</text:span><text:span text:style-name="T7">b_s</text:span></text:p>
          </draw:text-box>
        </draw:frame>
        <draw:frame draw:style-name="gr267" draw:text-style-name="P25" draw:layer="layout" svg:width="4.24cm" svg:height="0.725cm" svg:x="30.96cm" svg:y="25.4cm">
          <draw:text-box>
            <text:p><text:span text:style-name="T7">trap_ill</text:span><text:span text:style-name="T7">egal_i</text:span><text:span text:style-name="T7">nstrx_</text:span><text:span text:style-name="T7">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p_ill</text:span><text:span text:style-name="T7">egal_i</text:span><text:span text:style-name="T7">nst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ec_</text:span><text:span text:style-name="T2">phase</text:span><text:span text:style-name="T2">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r_c</text:span><text:span text:style-name="T2">ommit</text:span><text:span text:style-name="T2">_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ec_</text:span><text:span text:style-name="T2">phase</text:span><text:span text:style-name="T2">_s</text:span></text:p>
          </draw:text-box>
        </draw:frame>
        <draw:frame draw:style-name="gr185" draw:text-style-name="P9" draw:layer="layout" svg:width="3.491cm" svg:height="0.725cm" svg:x="25cm" svg:y="0.775cm">
          <draw:text-box>
            <text:p><text:span text:style-name="T2">load_p</text:span><text:span text:style-name="T2">ending</text:span><text:span text:style-name="T2">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p4_</text:span><text:span text:style-name="T2">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orR</text:span><text:span text:style-name="T2">S1_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mp_</text:span><text:span text:style-name="T7">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A_</text:span><text:span text:style-name="T2">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br_</text:span><text:span text:style-name="T2">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mEx</text:span><text:span text:style-name="T2">t_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e_s</text:span></text:p>
          </draw:text-box>
        </draw:frame>
        <draw:frame draw:style-name="gr262" draw:text-style-name="P9" draw:layer="layout" svg:width="2.005cm" svg:height="0.725cm" svg:x="4.495cm" svg:y="7cm">
          <draw:text-box>
            <text:p><text:span text:style-name="T2">PCp4_</text:span><text:span text:style-name="T2">s</text:span></text:p>
          </draw:text-box>
        </draw:frame>
        <draw:frame draw:style-name="gr282" draw:text-style-name="P9" draw:layer="layout" svg:width="1.912cm" svg:height="0.725cm" svg:x="4.4cm" svg:y="8.1cm">
          <draw:text-box>
            <text:p><text:span text:style-name="T2">PCbr_</text:span><text:span text:style-name="T2">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ch0</text:span><text:span text:style-name="T2">_phas</text:span><text:span text:style-name="T2">e_s</text:span></text:p>
          </draw:text-box>
        </draw:frame>
        <draw:frame draw:style-name="gr187" draw:text-style-name="P9" draw:layer="layout" svg:width="3.537cm" svg:height="0.725cm" svg:x="3.501cm" svg:y="2.576cm">
          <draw:text-box>
            <text:p><text:span text:style-name="T2">mret_p</text:span><text:span text:style-name="T2">ending</text:span><text:span text:style-name="T2">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ret_p</text:span><text:span text:style-name="T7">ending</text:span><text:span text:style-name="T7">_s,</text:span></text:p>
            <text:p><text:span text:style-name="T7">trap_ta</text:span><text:span text:style-name="T7">ken</text:span></text:p>
            <text:p><text:span text:style-name="T7">is_mre</text:span><text:span text:style-name="T7">t &amp;&amp; </text:span><text:span text:style-name="T7">exec_</text:span><text:span text:style-name="T7">phase</text:span><text:span text:style-name="T7">_s</text:span></text:p>
          </draw:text-box>
        </draw:frame>
        <draw:frame draw:style-name="gr286" draw:text-style-name="P9" draw:layer="layout" svg:width="2.619cm" svg:height="0.725cm" svg:x="16.3cm" svg:y="10.7cm">
          <draw:text-box>
            <text:p><text:span text:style-name="T2">h0000</text:span><text:span text:style-name="T2">001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mre</text:span><text:span text:style-name="T2">t_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ch0</text:span><text:span text:style-name="T2">_phas</text:span><text:span text:style-name="T2">e_s</text:span></text:p>
            </draw:text-box>
          </draw:frame>
          <draw:frame draw:style-name="gr185" draw:text-style-name="P9" draw:layer="layout" svg:width="3.491cm" svg:height="0.725cm" svg:x="10cm" svg:y="23.275cm">
            <draw:text-box>
              <text:p><text:span text:style-name="T2">fetch1</text:span><text:span text:style-name="T2">_phas</text:span><text:span text:style-name="T2">e_s</text:span></text:p>
            </draw:text-box>
          </draw:frame>
          <draw:frame draw:style-name="gr199" draw:text-style-name="P9" draw:layer="layout" svg:width="3.228cm" svg:height="0.725cm" svg:x="10cm" svg:y="25.275cm">
            <draw:text-box>
              <text:p><text:span text:style-name="T2">exec_</text:span><text:span text:style-name="T2">phase</text:span><text:span text:style-name="T2">_s</text:span></text:p>
            </draw:text-box>
          </draw:frame>
          <draw:frame draw:style-name="gr288" draw:text-style-name="P9" draw:layer="layout" svg:width="3.626cm" svg:height="0.725cm" svg:x="11.753cm" svg:y="24.775cm">
            <draw:text-box>
              <text:p><text:span text:style-name="T2">(instr_</text:span><text:span text:style-name="T2">commi</text:span><text:span text:style-name="T2">t_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ecld</text:span><text:span text:style-name="T2">_phas</text:span><text:span text:style-name="T2">e_s</text:span></text:p>
            </draw:text-box>
          </draw:frame>
        </draw:g>
        <draw:frame draw:style-name="gr237" draw:text-style-name="P9" draw:layer="layout" svg:width="3.347cm" svg:height="0.725cm" svg:x="20.453cm" svg:y="1.475cm">
          <draw:text-box>
            <text:p><text:span text:style-name="T2">opcod</text:span><text:span text:style-name="T2">e_s == </text:span><text:span text:style-name="T2">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ec_</text:span><text:span text:style-name="T2">phase</text:span><text:span text:style-name="T2">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ecld</text:span><text:span text:style-name="T2">_phas</text:span><text:span text:style-name="T2">e_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rap_ta</text:span><text:span text:style-name="T7">ken_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d_p</text:span><text:span text:style-name="T2">ending</text:span><text:span text:style-name="T2">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text:span><text:span text:style-name="T9">Bu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text:span><text:span text:style-name="T9">Bu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313"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315"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text:span><text:span text:style-name="T2">e</text:span></text:p>
            </draw:text-box>
          </draw:frame>
          <draw:frame draw:style-name="gr316" draw:text-style-name="P9" draw:layer="layout" svg:width="1.538cm" svg:height="0.725cm" svg:x="11.787cm" svg:y="11.601cm">
            <draw:text-box>
              <text:p><text:span text:style-name="T2">func3</text:span></text:p>
            </draw:text-box>
          </draw:frame>
          <draw:frame draw:style-name="gr317" draw:text-style-name="P9" draw:layer="layout" svg:width="1.561cm" svg:height="0.725cm" svg:x="14.64cm" svg:y="9.6cm">
            <draw:text-box>
              <text:p><text:span text:style-name="T2">datao</text:span></text:p>
            </draw:text-box>
          </draw:frame>
          <draw:frame draw:style-name="gr318" draw:text-style-name="P9" draw:layer="layout" svg:width="1.82cm" svg:height="0.725cm" svg:x="14.381cm" svg:y="10.6cm">
            <draw:text-box>
              <text:p><text:span text:style-name="T2">byteEn</text:span></text:p>
            </draw:text-box>
          </draw:frame>
          <draw:frame draw:style-name="gr319" draw:text-style-name="P9" draw:layer="layout" svg:width="1.42cm" svg:height="0.725cm" svg:x="11.788cm" svg:y="10.602cm">
            <draw:text-box>
              <text:p><text:span text:style-name="T2">data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320"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text:span><text:span text:style-name="T2">e</text:span></text:p>
            </draw:text-box>
          </draw:frame>
          <draw:frame draw:style-name="gr316" draw:text-style-name="P9" draw:layer="layout" svg:width="1.538cm" svg:height="0.725cm" svg:x="26.801cm" svg:y="10.601cm">
            <draw:text-box>
              <text:p><text:span text:style-name="T2">func3</text:span></text:p>
            </draw:text-box>
          </draw:frame>
          <draw:frame draw:style-name="gr317" draw:text-style-name="P9" draw:layer="layout" svg:width="1.561cm" svg:height="0.725cm" svg:x="29.654cm" svg:y="8.6cm">
            <draw:text-box>
              <text:p><text:span text:style-name="T2">datao</text:span></text:p>
            </draw:text-box>
          </draw:frame>
          <draw:frame draw:style-name="gr319"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321" draw:text-style-name="P9" draw:layer="layout" svg:width="1.796cm" svg:height="0.725cm" svg:x="6cm" svg:y="6.6cm">
          <draw:text-box>
            <text:p><text:span text:style-name="T2">wrEn_i</text:span></text:p>
          </draw:text-box>
        </draw:frame>
        <draw:frame draw:style-name="gr322" draw:text-style-name="P9" draw:layer="layout" svg:width="1.726cm" svg:height="0.725cm" svg:x="6cm" svg:y="5.6cm">
          <draw:text-box>
            <text:p><text:span text:style-name="T2">rdEn_i</text:span></text:p>
          </draw:text-box>
        </draw:frame>
        <draw:frame draw:style-name="gr323" draw:text-style-name="P9" draw:layer="layout" svg:width="2.22cm" svg:height="0.725cm" svg:x="6cm" svg:y="12.6cm">
          <draw:text-box>
            <text:p><text:span text:style-name="T2">opcod</text:span><text:span text:style-name="T2">e_i</text:span></text:p>
          </draw:text-box>
        </draw:frame>
        <draw:frame draw:style-name="gr324" draw:text-style-name="P9" draw:layer="layout" svg:width="1.867cm" svg:height="0.725cm" svg:x="6.035cm" svg:y="11.6cm">
          <draw:text-box>
            <text:p><text:span text:style-name="T2">func3_</text:span><text:span text:style-name="T2">i</text:span></text:p>
          </draw:text-box>
        </draw:frame>
        <draw:frame draw:style-name="gr325" draw:text-style-name="P9" draw:layer="layout" svg:width="1.655cm" svg:height="0.725cm" svg:x="6.001cm" svg:y="10.6cm">
          <draw:text-box>
            <text:p><text:span text:style-name="T2">data_i</text:span></text:p>
          </draw:text-box>
        </draw:frame>
        <draw:frame draw:style-name="gr326" draw:text-style-name="P9" draw:layer="layout" svg:width="1.797cm" svg:height="0.725cm" svg:x="32.207cm" svg:y="8.575cm">
          <draw:text-box>
            <text:p><text:span text:style-name="T2">data_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dr_o</text:span></text:p>
            </draw:text-box>
          </draw:frame>
          <draw:frame draw:style-name="gr340" draw:text-style-name="P9" draw:layer="layout" svg:width="3.796cm" svg:height="0.725cm" svg:x="30cm" svg:y="20.875cm">
            <draw:text-box>
              <text:p><text:span text:style-name="T2">data_fr</text:span><text:span text:style-name="T2">om_co</text:span><text:span text:style-name="T2">re_i</text:span></text:p>
            </draw:text-box>
          </draw:frame>
          <draw:frame draw:style-name="gr341" draw:text-style-name="P9" draw:layer="layout" svg:width="3.444cm" svg:height="0.725cm" svg:x="5.2cm" svg:y="20.876cm">
            <draw:text-box>
              <text:p><text:span text:style-name="T2">data_t</text:span><text:span text:style-name="T2">o_core</text:span><text:span text:style-name="T2">_o</text:span></text:p>
            </draw:text-box>
          </draw:frame>
          <draw:frame draw:style-name="gr342"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325" draw:text-style-name="P9" draw:layer="layout" svg:width="1.655cm" svg:height="0.725cm" svg:x="5.102cm" svg:y="22.377cm">
            <draw:text-box>
              <text:p><text:span text:style-name="T2">data_i</text:span></text:p>
            </draw:text-box>
          </draw:frame>
          <draw:frame draw:style-name="gr326" draw:text-style-name="P9" draw:layer="layout" svg:width="1.797cm" svg:height="0.725cm" svg:x="19.107cm" svg:y="22.4cm">
            <draw:text-box>
              <text:p><text:span text:style-name="T2">data_o</text:span></text:p>
            </draw:text-box>
          </draw:frame>
          <draw:frame draw:style-name="gr343" draw:text-style-name="P9" draw:layer="layout" svg:width="1.373cm" svg:height="0.725cm" svg:x="1.33cm" svg:y="22.375cm">
            <draw:text-box>
              <text:p><text:span text:style-name="T2">we_i</text:span></text:p>
            </draw:text-box>
          </draw:frame>
          <draw:frame draw:style-name="gr343"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344" draw:text-style-name="P9" draw:layer="layout" svg:width="1.632cm" svg:height="0.725cm" svg:x="17.2cm" svg:y="22.38cm">
            <draw:text-box>
              <text:p><text:span text:style-name="T2">ack_o</text:span></text:p>
            </draw:text-box>
          </draw:frame>
          <draw:frame draw:style-name="gr345"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usA</text:span><text:span text:style-name="T2">ddr</text:span></text:p>
          </draw:text-box>
        </draw:frame>
        <draw:frame draw:style-name="gr351" draw:text-style-name="P9" draw:layer="layout" svg:width="2.894cm" svg:height="0.725cm" svg:x="4.7cm" svg:y="24.301cm">
          <draw:text-box>
            <text:p><text:span text:style-name="T2">dBusD</text:span><text:span text:style-name="T2">ataWr</text:span></text:p>
          </draw:text-box>
        </draw:frame>
        <draw:frame draw:style-name="gr352" draw:text-style-name="P9" draw:layer="layout" svg:width="2.902cm" svg:height="0.725cm" svg:x="20.002cm" svg:y="24.275cm">
          <draw:text-box>
            <text:p><text:span text:style-name="T2">dBusD</text:span><text:span text:style-name="T2">ataRd</text:span></text:p>
          </draw:text-box>
        </draw:frame>
        <draw:frame draw:style-name="gr313" draw:text-style-name="P9" draw:layer="layout" svg:width="1.82cm" svg:height="0.725cm" svg:x="1.1cm" svg:y="24.275cm">
          <draw:text-box>
            <text:p><text:span text:style-name="T2">wbdwe</text:span></text:p>
          </draw:text-box>
        </draw:frame>
        <draw:frame draw:style-name="gr313" draw:text-style-name="P9" draw:layer="layout" svg:width="1.82cm" svg:height="0.725cm" svg:x="8cm" svg:y="23cm">
          <draw:text-box>
            <text:p><text:span text:style-name="T2">wbdsel</text:span></text:p>
          </draw:text-box>
        </draw:frame>
        <draw:frame draw:style-name="gr353" draw:text-style-name="P9" draw:layer="layout" svg:width="1.843cm" svg:height="0.725cm" svg:x="9.96cm" svg:y="23cm">
          <draw:text-box>
            <text:p><text:span text:style-name="T2">wbdst</text:span><text:span text:style-name="T2">b</text:span></text:p>
          </draw:text-box>
        </draw:frame>
        <draw:frame draw:style-name="gr354" draw:text-style-name="P9" draw:layer="layout" svg:width="1.937cm" svg:height="0.8cm" svg:x="18cm" svg:y="24.2cm">
          <draw:text-box>
            <text:p><text:span text:style-name="T2">wbdac</text:span><text:span text:style-name="T2">k</text:span></text:p>
          </draw:text-box>
        </draw:frame>
        <draw:frame draw:style-name="gr355" draw:text-style-name="P9" draw:layer="layout" svg:width="1.914cm" svg:height="0.725cm" svg:x="12.001cm" svg:y="23cm">
          <draw:text-box>
            <text:p><text:span text:style-name="T2">wbdcy</text:span><text:span text:style-name="T2">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Standard">
        <draw:line draw:style-name="gr146" draw:text-style-name="P4" draw:layer="layout" svg:x1="13cm" svg:y1="21cm" svg:x2="12cm" svg:y2="22.999cm">
          <text:p/>
        </draw:line>
        <draw:line draw:style-name="gr38" draw:text-style-name="P4" draw:layer="layout" svg:x1="19cm" svg:y1="48.3cm" svg:x2="19cm" svg:y2="39.2cm">
          <text:p/>
        </draw:line>
        <draw:custom-shape draw:style-name="gr368" draw:text-style-name="P5" draw:layer="layout" svg:width="0.2cm" svg:height="0.2cm" svg:x="18.901cm" svg:y="4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43.5cm" svg:x2="23cm" svg:y2="41cm">
          <text:p/>
        </draw:line>
        <draw:line draw:style-name="gr38" draw:text-style-name="P4" draw:layer="layout" svg:x1="32cm" svg:y1="41cm" svg:x2="8.5cm" svg:y2="41cm">
          <text:p/>
        </draw:line>
        <draw:line draw:style-name="gr38" draw:text-style-name="P4" draw:layer="layout" svg:x1="8.5cm" svg:y1="41cm" svg:x2="8.5cm" svg:y2="42.1cm">
          <text:p/>
        </draw:line>
        <draw:custom-shape draw:style-name="gr368" draw:text-style-name="P5" draw:layer="layout" svg:width="0.2cm" svg:height="0.2cm" svg:x="18.902cm" svg:y="4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cm" svg:y1="39.2cm" svg:x2="54cm" svg:y2="39.2cm">
          <text:p/>
        </draw:line>
        <draw:line draw:style-name="gr38" draw:text-style-name="P4" draw:layer="layout" svg:x1="23cm" svg:y1="47.7cm" svg:x2="25cm" svg:y2="47.7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369" draw:text-style-name="P35" draw:layer="layout" svg:width="1cm" svg:height="1cm" svg:x="47cm" svg:y="49cm">
              <text:p text:style-name="P15"><text:span text:style-name="T10">&amp;</text:span></text:p>
            </draw:rect>
            <draw:line draw:style-name="gr370" draw:text-style-name="P17" draw:layer="layout" svg:x1="46.5cm" svg:y1="49.25cm" svg:x2="47cm" svg:y2="49.25cm">
              <text:p/>
            </draw:line>
            <draw:line draw:style-name="gr371" draw:text-style-name="P17" draw:layer="layout" svg:x1="46.5cm" svg:y1="49.75cm" svg:x2="47cm" svg:y2="49.75cm">
              <text:p/>
            </draw:line>
            <draw:line draw:style-name="gr372" draw:text-style-name="P17" draw:layer="layout" svg:x1="48cm" svg:y1="49.5cm" svg:x2="48.5cm" svg:y2="49.5cm">
              <text:p/>
            </draw:line>
            <draw:line draw:style-name="gr373" draw:text-style-name="P21" draw:layer="layout" svg:x1="46.5cm" svg:y1="49.5cm" svg:x2="47cm" svg:y2="49.5cm">
              <text:p/>
            </draw:line>
          </draw:g>
          <draw:frame draw:style-name="gr374" draw:text-style-name="P36" draw:layer="layout" svg:width="1.565cm" svg:height="0.569cm" svg:x="44.435cm" svg:y="48.731cm">
            <draw:text-box>
              <text:p><text:span text:style-name="T11">regWr_s</text:span></text:p>
            </draw:text-box>
          </draw:frame>
          <draw:frame draw:style-name="gr375" draw:text-style-name="P36" draw:layer="layout" svg:width="2.217cm" svg:height="0.569cm" svg:x="43.783cm" svg:y="49.031cm">
            <draw:text-box>
              <text:p><text:span text:style-name="T11">!</text:span><text:span text:style-name="T11">trap_take</text:span><text:span text:style-name="T11">n_s</text:span></text:p>
            </draw:text-box>
          </draw:frame>
          <draw:frame draw:style-name="gr376" draw:text-style-name="P36" draw:layer="layout" svg:width="2.407cm" svg:height="0.569cm" svg:x="43.576cm" svg:y="49.331cm">
            <draw:text-box>
              <text:p><text:span text:style-name="T11">instr_com</text:span><text:span text:style-name="T11">mit_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377" draw:text-style-name="P36" draw:layer="layout" svg:width="2.246cm" svg:height="0.569cm" svg:x="47.8cm" svg:y="49.4cm">
            <draw:text-box>
              <text:p><text:span text:style-name="T11">regWr_fin</text:span><text:span text:style-name="T11">al_s</text:span></text:p>
            </draw:text-box>
          </draw:frame>
        </draw:g>
        <draw:line draw:style-name="gr38" draw:text-style-name="P4" draw:layer="layout" svg:x1="38cm" svg:y1="53.1cm" svg:x2="38cm" svg:y2="37cm">
          <text:p/>
        </draw:line>
        <draw:custom-shape draw:style-name="gr368"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368"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8" draw:text-style-name="P36" draw:layer="layout" svg:width="2.043cm" svg:height="0.569cm" svg:x="59.8cm" svg:y="43.062cm">
          <draw:text-box>
            <text:p><text:span text:style-name="T11">dBusAddr</text:span><text:span text:style-name="T11">_s</text:span></text:p>
          </draw:text-box>
        </draw:frame>
        <draw:frame draw:style-name="gr379" draw:text-style-name="P36" draw:layer="layout" svg:width="2.25cm" svg:height="0.569cm" svg:x="59.8cm" svg:y="43.462cm">
          <draw:text-box>
            <text:p><text:span text:style-name="T11">aluCalcR</text:span><text:span text:style-name="T11">es_s</text:span></text:p>
          </draw:text-box>
        </draw:frame>
        <draw:custom-shape draw:style-name="gr368"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368"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368"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7.501cm" svg:x2="66cm" svg:y2="47.5cm">
          <text:p/>
        </draw:line>
        <draw:line draw:style-name="gr38" draw:text-style-name="P4" draw:layer="layout" svg:x1="62.5cm" svg:y1="52.701cm" svg:x2="62.5cm" svg:y2="47.5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368"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2.903cm" svg:y="4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cm" svg:y1="41cm" svg:x2="32cm" svg:y2="39.8cm">
          <text:p/>
        </draw:line>
        <draw:line draw:style-name="gr38" draw:text-style-name="P4" draw:layer="layout" svg:x1="32cm" svg:y1="39.8cm" svg:x2="74cm" svg:y2="39.8cm">
          <text:p/>
        </draw:lin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368" draw:text-style-name="P5" draw:layer="layout" svg:width="0.2cm" svg:height="0.2cm" svg:x="49.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381" draw:text-style-name="P36" draw:layer="layout" svg:width="1.886cm" svg:height="0.569cm" svg:x="43.328cm" svg:y="15.175cm">
            <draw:text-box>
              <text:p><text:span text:style-name="T11">irq_ext_i[</text:span><text:span text:style-name="T11">7]</text:span></text:p>
            </draw:text-box>
          </draw:frame>
          <draw:frame draw:style-name="gr382" draw:text-style-name="P36" draw:layer="layout" svg:width="2.551cm" svg:height="0.569cm" svg:x="45.3cm" svg:y="14.575cm">
            <draw:text-box>
              <text:p><text:span text:style-name="T11">irq_ext_s</text:span><text:span text:style-name="T11">ync1_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383" draw:text-style-name="P38" draw:layer="layout" svg:x1="44.3cm" svg:y1="14.8cm" svg:x2="44.7cm" svg:y2="15.2cm">
              <text:p/>
            </draw:line>
            <draw:line draw:style-name="gr383" draw:text-style-name="P38" draw:layer="layout" svg:x1="44.3cm" svg:y1="15.2cm" svg:x2="44.7cm" svg:y2="14.8cm">
              <text:p/>
            </draw:line>
          </draw:g>
          <draw:line draw:style-name="gr38" draw:text-style-name="P4" draw:layer="layout" svg:x1="48.5cm" svg:y1="15cm" svg:x2="51cm" svg:y2="15cm">
            <text:p/>
          </draw:line>
          <draw:frame draw:style-name="gr382" draw:text-style-name="P36" draw:layer="layout" svg:width="2.551cm" svg:height="0.569cm" svg:x="48.349cm" svg:y="14.531cm">
            <draw:text-box>
              <text:p><text:span text:style-name="T11">irq_ext_s</text:span><text:span text:style-name="T11">ync2_s</text:span></text:p>
            </draw:text-box>
          </draw:frame>
          <draw:custom-shape draw:style-name="gr384" draw:text-style-name="P39" draw:layer="layout" svg:width="8cm" svg:height="2cm" svg:x="43cm" svg:y="14cm">
            <text:p/>
            <draw:enhanced-geometry svg:viewBox="0 0 21600 21600" draw:type="rectangle" draw:enhanced-path="M 0 0 L 21600 0 21600 21600 0 21600 0 0 Z N"/>
          </draw:custom-shape>
          <draw:frame draw:style-name="gr385" draw:text-style-name="P40" draw:layer="layout" svg:width="1.857cm" svg:height="0.569cm" svg:x="45.8cm" svg:y="15.231cm">
            <draw:text-box>
              <text:p><text:span text:style-name="T12">IRQ: </text:span><text:span text:style-name="T12">Sync</text:span></text:p>
            </draw:text-box>
          </draw:frame>
          <draw:g draw:style-name="gr1">
            <draw:custom-shape draw:style-name="gr386" draw:text-style-name="P41"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386" draw:text-style-name="P41"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377" draw:text-style-name="P36" draw:layer="layout" svg:width="2.246cm" svg:height="0.569cm" svg:x="52.3cm" svg:y="14.5cm">
            <draw:text-box>
              <text:p><text:span text:style-name="T11">csr_mip_</text:span><text:span text:style-name="T11">s[11]</text:span></text:p>
            </draw:text-box>
          </draw:frame>
          <draw:line draw:style-name="gr38" draw:text-style-name="P4" draw:layer="layout" svg:x1="52.5cm" svg:y1="15cm" svg:x2="55cm" svg:y2="15cm">
            <text:p/>
          </draw:line>
          <draw:custom-shape draw:style-name="gr387" draw:text-style-name="P39" draw:layer="layout" svg:width="4cm" svg:height="2cm" svg:x="51cm" svg:y="14cm">
            <text:p/>
            <draw:enhanced-geometry svg:viewBox="0 0 21600 21600" draw:type="rectangle" draw:enhanced-path="M 0 0 L 21600 0 21600 21600 0 21600 0 0 Z N"/>
          </draw:custom-shape>
          <draw:frame draw:style-name="gr388" draw:text-style-name="P40" draw:layer="layout" svg:width="1.776cm" svg:height="0.569cm" svg:x="53.194cm" svg:y="14.031cm">
            <draw:text-box>
              <text:p><text:span text:style-name="T12">CSR: MIP</text:span></text:p>
            </draw:text-box>
          </draw:frame>
          <draw:g draw:style-name="gr1">
            <draw:custom-shape draw:style-name="gr386" draw:text-style-name="P41"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389" draw:text-style-name="P36" draw:layer="layout" svg:width="0.955cm" svg:height="0.569cm" svg:x="35.346cm" svg:y="45.73cm">
              <draw:text-box>
                <text:p><text:span text:style-name="T11">ir_s</text:span></text:p>
              </draw:text-box>
            </draw:frame>
            <draw:g draw:style-name="gr1">
              <draw:custom-shape draw:style-name="gr390" draw:text-style-name="P43" draw:layer="layout" svg:width="0.5cm" svg:height="1cm" svg:x="35.001cm" svg:y="46cm">
                <text:p text:style-name="P42"><text:span text:style-name="T11">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391" draw:text-style-name="P36" draw:layer="layout" svg:width="0.659cm" svg:height="0.569cm" svg:x="34.801cm" svg:y="45.931cm">
                <draw:text-box>
                  <text:p><text:span text:style-name="T11">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392" draw:text-style-name="P36" draw:layer="layout" svg:width="2.614cm" svg:height="0.569cm" svg:x="28.9cm" svg:y="48.1cm">
              <draw:text-box>
                <text:p><text:span text:style-name="T11">!</text:span><text:span text:style-name="T11">mret_pen</text:span><text:span text:style-name="T11">ding_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393" draw:text-style-name="P36" draw:layer="layout" svg:width="2.314cm" svg:height="0.569cm" svg:x="28.901cm" svg:y="47.331cm">
              <draw:text-box>
                <text:p><text:span text:style-name="T11">iBusData</text:span><text:span text:style-name="T11">Rd_s</text:span></text:p>
              </draw:text-box>
            </draw:frame>
            <draw:line draw:style-name="gr38" draw:text-style-name="P4" draw:layer="layout" svg:x1="35.501cm" svg:y1="46.7cm" svg:x2="37cm" svg:y2="46.7cm">
              <text:p/>
            </draw:line>
            <draw:frame draw:style-name="gr394" draw:text-style-name="P36" draw:layer="layout" svg:width="1.7cm" svg:height="0.569cm" svg:x="35.301cm" svg:y="46.261cm">
              <draw:text-box>
                <text:p><text:span text:style-name="T11">ir_valid_s</text:span></text:p>
              </draw:text-box>
            </draw:frame>
            <draw:line draw:style-name="gr38" draw:text-style-name="P4" draw:layer="layout" svg:x1="29.501cm" svg:y1="47.8cm" svg:x2="31.001cm" svg:y2="47.8cm">
              <text:p/>
            </draw:line>
            <draw:frame draw:style-name="gr395" draw:text-style-name="P36" draw:layer="layout" svg:width="1.035cm" svg:height="0.569cm" svg:x="30.201cm" svg:y="47.632cm">
              <draw:text-box>
                <text:p><text:span text:style-name="T11">1‘b1</text:span></text:p>
              </draw:text-box>
            </draw:frame>
            <draw:line draw:style-name="gr38" draw:text-style-name="P4" draw:layer="layout" svg:x1="29.5cm" svg:y1="47.199cm" svg:x2="31.001cm" svg:y2="47.2cm">
              <text:p/>
            </draw:line>
            <draw:frame draw:style-name="gr396" draw:text-style-name="P36" draw:layer="layout" svg:width="2.288cm" svg:height="0.569cm" svg:x="28.9cm" svg:y="46.83cm">
              <draw:text-box>
                <text:p><text:span text:style-name="T11">32'h0000</text:span><text:span text:style-name="T11">0013</text:span></text:p>
              </draw:text-box>
            </draw:frame>
            <draw:frame draw:style-name="gr395" draw:text-style-name="P36" draw:layer="layout" svg:width="1.035cm" svg:height="0.569cm" svg:x="30.18cm" svg:y="47.063cm">
              <draw:text-box>
                <text:p><text:span text:style-name="T11">1‘b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397" draw:text-style-name="P44" draw:layer="layout" svg:width="2.504cm" svg:height="0.569cm" svg:x="32.7cm" svg:y="47.03cm">
              <draw:text-box>
                <text:p><text:span text:style-name="T13">fetch1_ph</text:span><text:span text:style-name="T13">ase_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398" draw:text-style-name="P36" draw:layer="layout" svg:width="2.14cm" svg:height="0.569cm" svg:x="29.402cm" svg:y="46.031cm">
              <draw:text-box>
                <text:p><text:span text:style-name="T11">trap_take</text:span><text:span text:style-name="T11">n_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399" draw:text-style-name="P36" draw:layer="layout" svg:width="4.096cm" svg:height="0.569cm" svg:x="25.4cm" svg:y="43.999cm">
              <draw:text-box>
                <text:p><text:span text:style-name="T11">is_mret_s </text:span><text:span text:style-name="T11">&amp;&amp; </text:span><text:span text:style-name="T13">exec_pha</text:span><text:span text:style-name="T13">se_s</text:span></text:p>
              </draw:text-box>
            </draw:frame>
            <draw:line draw:style-name="gr38" draw:text-style-name="P4" draw:layer="layout" svg:x1="29.502cm" svg:y1="45.8cm" svg:x2="31.002cm" svg:y2="45.8cm">
              <text:p/>
            </draw:line>
            <draw:frame draw:style-name="gr395" draw:text-style-name="P36" draw:layer="layout" svg:width="1.035cm" svg:height="0.569cm" svg:x="30.202cm" svg:y="45.632cm">
              <draw:text-box>
                <text:p><text:span text:style-name="T11">1‘b0</text:span></text:p>
              </draw:text-box>
            </draw:frame>
            <draw:line draw:style-name="gr38" draw:text-style-name="P4" draw:layer="layout" svg:x1="30.5cm" svg:y1="45.199cm" svg:x2="31.002cm" svg:y2="45.2cm">
              <text:p/>
            </draw:line>
            <draw:frame draw:style-name="gr396" draw:text-style-name="P36" draw:layer="layout" svg:width="2.288cm" svg:height="0.569cm" svg:x="28.901cm" svg:y="45.33cm">
              <draw:text-box>
                <text:p><text:span text:style-name="T11">32'h0000</text:span><text:span text:style-name="T11">001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395" draw:text-style-name="P36" draw:layer="layout" svg:width="1.035cm" svg:height="0.569cm" svg:x="28.203cm" svg:y="43.632cm">
              <draw:text-box>
                <text:p><text:span text:style-name="T11">1‘b0</text:span></text:p>
              </draw:text-box>
            </draw:frame>
            <draw:line draw:style-name="gr38" draw:text-style-name="P4" draw:layer="layout" svg:x1="28.5cm" svg:y1="43.199cm" svg:x2="29.003cm" svg:y2="43.2cm">
              <text:p/>
            </draw:line>
            <draw:frame draw:style-name="gr396" draw:text-style-name="P36" draw:layer="layout" svg:width="2.288cm" svg:height="0.569cm" svg:x="26.902cm" svg:y="43.33cm">
              <draw:text-box>
                <text:p><text:span text:style-name="T11">32'h0000</text:span><text:span text:style-name="T11">0013</text:span></text:p>
              </draw:text-box>
            </draw:frame>
            <draw:frame draw:style-name="gr400" draw:text-style-name="P36" draw:layer="layout" svg:width="1.129cm" svg:height="0.569cm" svg:x="27.6cm" svg:y="42.93cm">
              <draw:text-box>
                <text:p><text:span text:style-name="T11">stor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401" draw:text-style-name="P40" draw:layer="layout" svg:width="2.094cm" svg:height="0.569cm" svg:x="33.506cm" svg:y="45cm">
            <draw:text-box>
              <text:p><text:span text:style-name="T12">IR: </text:span><text:span text:style-name="T12">Register</text:span></text:p>
            </draw:text-box>
          </draw:frame>
          <draw:custom-shape draw:style-name="gr402" draw:text-style-name="P39"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403" draw:text-style-name="P36" draw:layer="layout" svg:width="1.73cm" svg:height="0.569cm" svg:x="9.839cm" svg:y="10.031cm">
              <draw:text-box>
                <text:p><text:span text:style-name="T11">is_mret_s</text:span></text:p>
              </draw:text-box>
            </draw:frame>
            <draw:g draw:style-name="gr66">
              <draw:glue-point draw:id="4" svg:x="-5cm" svg:y="-2.5cm"/>
              <draw:glue-point draw:id="5" svg:x="-5cm" svg:y="2.5cm"/>
              <draw:rect draw:style-name="gr404" draw:text-style-name="P35" draw:layer="layout" svg:width="1cm" svg:height="1cm" svg:x="8.986cm" svg:y="10cm">
                <text:p text:style-name="P15"><text:span text:style-name="T10">&amp;</text:span></text:p>
              </draw:rect>
              <draw:line draw:style-name="gr405" draw:text-style-name="P17" draw:layer="layout" svg:x1="8.486cm" svg:y1="10.25cm" svg:x2="8.986cm" svg:y2="10.25cm">
                <text:p/>
              </draw:line>
              <draw:line draw:style-name="gr406" draw:text-style-name="P17" draw:layer="layout" svg:x1="8.486cm" svg:y1="10.75cm" svg:x2="8.986cm" svg:y2="10.75cm">
                <text:p/>
              </draw:line>
              <draw:line draw:style-name="gr407" draw:text-style-name="P17" draw:layer="layout" svg:x1="9.986cm" svg:y1="10.5cm" svg:x2="10.486cm" svg:y2="10.5cm">
                <text:p/>
              </draw:line>
              <draw:line draw:style-name="gr408" draw:text-style-name="P21" draw:layer="layout" svg:x1="8.486cm" svg:y1="10.5cm" svg:x2="8.986cm" svg:y2="10.5cm">
                <text:p/>
              </draw:line>
            </draw:g>
            <draw:frame draw:style-name="gr409" draw:text-style-name="P36" draw:layer="layout" svg:width="3.41cm" svg:height="0.569cm" svg:x="5.386cm" svg:y="9.8cm">
              <draw:text-box>
                <text:p><text:span text:style-name="T11">ir_s[6:0] </text:span><text:span text:style-name="T11">== </text:span><text:span text:style-name="T11">7'b111001</text:span><text:span text:style-name="T11">1</text:span></text:p>
              </draw:text-box>
            </draw:frame>
            <draw:frame draw:style-name="gr410" draw:text-style-name="P36" draw:layer="layout" svg:width="3.156cm" svg:height="0.569cm" svg:x="5.386cm" svg:y="10.1cm">
              <draw:text-box>
                <text:p><text:span text:style-name="T11">ir_s[14:12</text:span><text:span text:style-name="T11">] == </text:span><text:span text:style-name="T11">3'b000</text:span></text:p>
              </draw:text-box>
            </draw:frame>
            <draw:frame draw:style-name="gr411" draw:text-style-name="P36" draw:layer="layout" svg:width="3.313cm" svg:height="0.569cm" svg:x="5.386cm" svg:y="10.431cm">
              <draw:text-box>
                <text:p><text:span text:style-name="T11">ir_s[31:20</text:span><text:span text:style-name="T11">] == </text:span><text:span text:style-name="T11">12'h3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412" draw:text-style-name="P36" draw:layer="layout" svg:width="2.818cm" svg:height="0.569cm" svg:x="9.839cm" svg:y="12.031cm">
              <draw:text-box>
                <text:p><text:span text:style-name="T11">is_mret_f</text:span><text:span text:style-name="T11">etched_s</text:span></text:p>
              </draw:text-box>
            </draw:frame>
            <draw:g draw:style-name="gr66">
              <draw:glue-point draw:id="4" svg:x="-5cm" svg:y="-2.5cm"/>
              <draw:glue-point draw:id="5" svg:x="-5cm" svg:y="2.5cm"/>
              <draw:rect draw:style-name="gr413" draw:text-style-name="P35" draw:layer="layout" svg:width="1cm" svg:height="1cm" svg:x="8.986cm" svg:y="12cm">
                <text:p text:style-name="P15"><text:span text:style-name="T10">&amp;</text:span></text:p>
              </draw:rect>
              <draw:line draw:style-name="gr414" draw:text-style-name="P17" draw:layer="layout" svg:x1="8.486cm" svg:y1="12.25cm" svg:x2="8.986cm" svg:y2="12.25cm">
                <text:p/>
              </draw:line>
              <draw:line draw:style-name="gr415" draw:text-style-name="P17" draw:layer="layout" svg:x1="8.486cm" svg:y1="12.75cm" svg:x2="8.986cm" svg:y2="12.75cm">
                <text:p/>
              </draw:line>
              <draw:line draw:style-name="gr416" draw:text-style-name="P17" draw:layer="layout" svg:x1="9.986cm" svg:y1="12.5cm" svg:x2="10.486cm" svg:y2="12.5cm">
                <text:p/>
              </draw:line>
              <draw:line draw:style-name="gr417" draw:text-style-name="P21" draw:layer="layout" svg:x1="8.486cm" svg:y1="12.5cm" svg:x2="8.986cm" svg:y2="12.5cm">
                <text:p/>
              </draw:line>
            </draw:g>
            <draw:frame draw:style-name="gr418" draw:text-style-name="P36" draw:layer="layout" svg:width="4.765cm" svg:height="0.569cm" svg:x="3.786cm" svg:y="11.8cm">
              <draw:text-box>
                <text:p><text:span text:style-name="T11">iBusData</text:span><text:span text:style-name="T11">Rd_s[6:0] </text:span><text:span text:style-name="T11">== </text:span><text:span text:style-name="T11">7'b111001</text:span><text:span text:style-name="T11">1</text:span></text:p>
              </draw:text-box>
            </draw:frame>
            <draw:frame draw:style-name="gr419" draw:text-style-name="P36" draw:layer="layout" svg:width="4.511cm" svg:height="0.569cm" svg:x="3.786cm" svg:y="12.1cm">
              <draw:text-box>
                <text:p><text:span text:style-name="T11">iBusData</text:span><text:span text:style-name="T11">Rd_s[14:</text:span><text:span text:style-name="T11">12] == </text:span><text:span text:style-name="T11">3'b000</text:span></text:p>
              </draw:text-box>
            </draw:frame>
            <draw:frame draw:style-name="gr420" draw:text-style-name="P36" draw:layer="layout" svg:width="4.672cm" svg:height="0.569cm" svg:x="3.786cm" svg:y="12.4cm">
              <draw:text-box>
                <text:p><text:span text:style-name="T11">iBusData</text:span><text:span text:style-name="T11">Rd_s[31:</text:span><text:span text:style-name="T11">20] == </text:span><text:span text:style-name="T11">12'h3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421" draw:text-style-name="P40" draw:layer="layout" svg:width="2.322cm" svg:height="0.569cm" svg:x="9.936cm" svg:y="9.5cm">
            <draw:text-box>
              <text:p><text:span text:style-name="T12">MRET: </text:span><text:span text:style-name="T12">Detect</text:span></text:p>
            </draw:text-box>
          </draw:frame>
          <draw:custom-shape draw:style-name="gr422" draw:text-style-name="P39"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423" draw:text-style-name="P45" draw:layer="layout" svg:width="1.999cm" svg:height="1.999cm" svg:x="8.976cm" svg:y="22cm" svg:viewBox="0 0 2000 2000" svg:d="M2000 999c0-551-448-999-1001-999s-999 448-999 999 446 1001 999 1001 1001-450 1001-1001z">
                  <text:p/>
                </draw:path>
                <draw:path draw:style-name="gr424" draw:text-style-name="P45" draw:layer="layout" svg:width="1.757cm" svg:height="1.759cm" svg:x="9.096cm" svg:y="22.12cm" svg:viewBox="0 0 1758 1760" svg:d="M1758 879c0-485-393-879-881-879-485 0-877 394-877 879 0 488 392 881 877 881 488 0 881-393 881-881z">
                  <text:p/>
                </draw:path>
              </draw:g>
              <draw:frame draw:style-name="gr425" draw:text-style-name="P36" draw:layer="layout" svg:width="2.123cm" svg:height="0.569cm" svg:x="8.915cm" svg:y="22.716cm">
                <draw:text-box>
                  <text:p><text:span text:style-name="T11">FETCH0_</text:span><text:span text:style-name="T11">ST</text:span></text:p>
                </draw:text-box>
              </draw:frame>
            </draw:g>
            <draw:g draw:style-name="gr66">
              <draw:path draw:name="start-event-none" draw:style-name="gr426" draw:text-style-name="P45" draw:layer="layout" svg:width="1.999cm" svg:height="1.999cm" svg:x="11.976cm" svg:y="23.999cm" svg:viewBox="0 0 2000 2000" svg:d="M2000 999c0-551-450-999-1003-999-551 0-997 448-997 999s446 1001 997 1001c553 0 1003-450 1003-1001z">
                <svg:title>start-event-none</svg:title>
                <text:p/>
              </draw:path>
              <draw:frame draw:style-name="gr425" draw:text-style-name="P36" draw:layer="layout" svg:width="2.123cm" svg:height="0.569cm" svg:x="11.915cm" svg:y="24.715cm">
                <draw:text-box>
                  <text:p><text:span text:style-name="T11">FETCH1_</text:span><text:span text:style-name="T11">ST</text:span></text:p>
                </draw:text-box>
              </draw:frame>
            </draw:g>
            <draw:g draw:style-name="gr66">
              <draw:path draw:name="start-event-none 1" draw:style-name="gr427" draw:text-style-name="P45" draw:layer="layout" svg:width="1.999cm" svg:height="1.999cm" svg:x="9cm" svg:y="26cm" svg:viewBox="0 0 2000 2000" svg:d="M2000 999c0-551-450-999-1003-999-551 0-997 448-997 999s446 1001 997 1001c553 0 1003-450 1003-1001z">
                <svg:title>start-event-none</svg:title>
                <text:p/>
              </draw:path>
              <draw:frame draw:style-name="gr428" draw:text-style-name="P36" draw:layer="layout" svg:width="1.793cm" svg:height="0.569cm" svg:x="9.104cm" svg:y="26.716cm">
                <draw:text-box>
                  <text:p><text:span text:style-name="T11">EXEC_S</text:span><text:span text:style-name="T11">T</text:span></text:p>
                </draw:text-box>
              </draw:frame>
            </draw:g>
            <draw:g draw:style-name="gr66">
              <draw:path draw:name="start-event-none 2" draw:style-name="gr429" draw:text-style-name="P45" draw:layer="layout" svg:width="1.999cm" svg:height="1.999cm" svg:x="6.023cm" svg:y="24cm" svg:viewBox="0 0 2000 2000" svg:d="M2000 999c0-551-450-999-1003-999-551 0-997 448-997 999s446 1001 997 1001c553 0 1003-450 1003-1001z">
                <svg:title>start-event-none</svg:title>
                <text:p/>
              </draw:path>
              <draw:frame draw:style-name="gr430" draw:text-style-name="P36" draw:layer="layout" svg:width="2.153cm" svg:height="0.569cm" svg:x="5.947cm" svg:y="24.716cm">
                <draw:text-box>
                  <text:p><text:span text:style-name="T11">EXECLD</text:span><text:span text:style-name="T11">_S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431" draw:text-style-name="P36" draw:layer="layout" svg:width="2.6cm" svg:height="0.569cm" svg:x="6.4cm" svg:y="26.6cm">
              <draw:text-box>
                <text:p><text:span text:style-name="T11">load_pen</text:span><text:span text:style-name="T11">ding_s</text:span></text:p>
              </draw:text-box>
            </draw:frame>
            <draw:frame draw:style-name="gr431" draw:text-style-name="P36" draw:layer="layout" svg:width="2.6cm" svg:height="0.569cm" svg:x="9cm" svg:y="24.931cm">
              <draw:text-box>
                <text:p><text:span text:style-name="T11">!</text:span><text:span text:style-name="T11">load_pen</text:span><text:span text:style-name="T11">ding_s</text:span></text:p>
              </draw:text-box>
            </draw:frame>
            <draw:line draw:style-name="gr146" draw:text-style-name="P4" draw:layer="layout" svg:x1="7.02cm" svg:y1="24cm" svg:x2="8.976cm" svg:y2="22.999cm">
              <text:p/>
            </draw:line>
            <draw:frame draw:style-name="gr432" draw:text-style-name="P46" draw:layer="layout" svg:width="7.3cm" svg:height="1.523cm" svg:x="11.7cm" svg:y="26.477cm">
              <draw:text-box>
                <text:p><text:span text:style-name="T13">fetch0_ph</text:span><text:span text:style-name="T13">ase_s</text:span><text:span text:style-name="T11"> = </text:span><text:span text:style-name="T11">(state_s </text:span><text:span text:style-name="T11">== </text:span><text:span text:style-name="T11">FETCH0_</text:span><text:span text:style-name="T11">ST) ? 1 : </text:span><text:span text:style-name="T11">0;</text:span></text:p>
                <text:p><text:span text:style-name="T13">fetch1_ph</text:span><text:span text:style-name="T13">ase_s</text:span><text:span text:style-name="T11"> = </text:span><text:span text:style-name="T11">(state_s </text:span><text:span text:style-name="T11">== </text:span><text:span text:style-name="T11">FETCH1_</text:span><text:span text:style-name="T11">ST) ? 1 : </text:span><text:span text:style-name="T11">0;</text:span></text:p>
                <text:p><text:span text:style-name="T13">exec_pha</text:span><text:span text:style-name="T13">se_s</text:span><text:span text:style-name="T11"> <text:s text:c="2"/>= </text:span><text:span text:style-name="T11">(state_s </text:span><text:span text:style-name="T11">== </text:span><text:span text:style-name="T11">EXEC_S</text:span><text:span text:style-name="T11">T) <text:s text:c="2"/>? 1 : </text:span><text:span text:style-name="T11">0;</text:span></text:p>
                <text:p><text:span text:style-name="T13">execld_p</text:span><text:span text:style-name="T13">hase_s</text:span><text:span text:style-name="T11"> = </text:span><text:span text:style-name="T11">(state_s </text:span><text:span text:style-name="T11">== </text:span><text:span text:style-name="T11">EXECLD</text:span><text:span text:style-name="T11">_ST) <text:s text:c="2"/>? 1 </text:span><text:span text:style-name="T11">: 0;</text:span></text:p>
              </draw:text-box>
            </draw:frame>
          </draw:g>
          <draw:frame draw:style-name="gr433" draw:text-style-name="P40" draw:layer="layout" svg:width="3.495cm" svg:height="0.569cm" svg:x="13.4cm" svg:y="25.8cm">
            <draw:text-box>
              <text:p><text:span text:style-name="T12">FSM: I-</text:span><text:span text:style-name="T12">Mem </text:span><text:span text:style-name="T12">sync </text:span><text:span text:style-name="T12">read</text:span></text:p>
            </draw:text-box>
          </draw:frame>
          <draw:custom-shape draw:style-name="gr434" draw:text-style-name="P39"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435" draw:text-style-name="P16" draw:layer="layout" svg:width="1cm" svg:height="1cm" svg:x="14cm" svg:y="18cm">
                <text:p text:style-name="P15"><text:span text:style-name="T5">1</text:span></text:p>
              </draw:rect>
              <draw:line draw:style-name="gr436" draw:text-style-name="P17" draw:layer="layout" svg:x1="13.5cm" svg:y1="18.5cm" svg:x2="14cm" svg:y2="18.5cm">
                <text:p/>
              </draw:line>
              <draw:circle draw:style-name="gr437" draw:text-style-name="P21" draw:layer="layout" svg:width="0.125cm" svg:height="0.126cm" svg:x="15cm" svg:y="18.437cm">
                <text:p/>
              </draw:circle>
              <draw:line draw:style-name="gr438" draw:text-style-name="P21" draw:layer="layout" svg:x1="15.125cm" svg:y1="18.5cm" svg:x2="15.5cm" svg:y2="18.5cm">
                <text:p/>
              </draw:line>
            </draw:g>
            <draw:g draw:style-name="gr66">
              <draw:glue-point draw:id="4" svg:x="5cm" svg:y="0cm"/>
              <draw:glue-point draw:id="5" svg:x="-5cm" svg:y="-2.5cm"/>
              <draw:glue-point draw:id="6" svg:x="-5.005cm" svg:y="2.5cm"/>
              <draw:rect draw:style-name="gr439" draw:text-style-name="P16" draw:layer="layout" svg:width="1cm" svg:height="1cm" svg:x="16cm" svg:y="19cm">
                <text:p text:style-name="P15"><text:span text:style-name="T4">&amp;</text:span></text:p>
              </draw:rect>
              <draw:line draw:style-name="gr440" draw:text-style-name="P17" draw:layer="layout" svg:x1="15.5cm" svg:y1="19.25cm" svg:x2="16cm" svg:y2="19.25cm">
                <text:p/>
              </draw:line>
              <draw:line draw:style-name="gr441" draw:text-style-name="P17" draw:layer="layout" svg:x1="15.5cm" svg:y1="19.75cm" svg:x2="16cm" svg:y2="19.75cm">
                <text:p/>
              </draw:line>
              <draw:line draw:style-name="gr442" draw:text-style-name="P17" draw:layer="layout" svg:x1="17cm" svg:y1="19.5cm" svg:x2="17.5cm" svg:y2="19.5cm">
                <text:p/>
              </draw:line>
            </draw:g>
            <draw:g draw:style-name="gr66">
              <draw:glue-point draw:id="4" svg:x="5cm" svg:y="0cm"/>
              <draw:glue-point draw:id="5" svg:x="-5cm" svg:y="-2.5cm"/>
              <draw:glue-point draw:id="6" svg:x="-5.005cm" svg:y="2.5cm"/>
              <draw:rect draw:style-name="gr443" draw:text-style-name="P16" draw:layer="layout" svg:width="1cm" svg:height="1cm" svg:x="11cm" svg:y="18cm">
                <text:p text:style-name="P15"><text:span text:style-name="T4">&amp;</text:span></text:p>
              </draw:rect>
              <draw:line draw:style-name="gr444" draw:text-style-name="P17" draw:layer="layout" svg:x1="10.5cm" svg:y1="18.25cm" svg:x2="11cm" svg:y2="18.25cm">
                <text:p/>
              </draw:line>
              <draw:line draw:style-name="gr445" draw:text-style-name="P17" draw:layer="layout" svg:x1="10.5cm" svg:y1="18.75cm" svg:x2="11cm" svg:y2="18.75cm">
                <text:p/>
              </draw:line>
              <draw:line draw:style-name="gr446" draw:text-style-name="P17" draw:layer="layout" svg:x1="12cm" svg:y1="18.5cm" svg:x2="12.5cm" svg:y2="18.5cm">
                <text:p/>
              </draw:line>
            </draw:g>
            <draw:frame draw:style-name="gr376" draw:text-style-name="P36" draw:layer="layout" svg:width="2.407cm" svg:height="0.569cm" svg:x="18.853cm" svg:y="20.1cm">
              <draw:text-box>
                <text:p><text:span text:style-name="T11">instr_com</text:span><text:span text:style-name="T11">mit_s</text:span></text:p>
              </draw:text-box>
            </draw:frame>
            <draw:frame draw:style-name="gr447" draw:text-style-name="P44" draw:layer="layout" svg:width="2.331cm" svg:height="0.569cm" svg:x="8.854cm" svg:y="17.8cm">
              <draw:text-box>
                <text:p><text:span text:style-name="T13">exec_pha</text:span><text:span text:style-name="T13">se_s</text:span></text:p>
              </draw:text-box>
            </draw:frame>
            <draw:frame draw:style-name="gr397" draw:text-style-name="P36" draw:layer="layout" svg:width="2.504cm" svg:height="0.569cm" svg:x="11.8cm" svg:y="18.075cm">
              <draw:text-box>
                <text:p><text:span text:style-name="T11">load_pen</text:span><text:span text:style-name="T11">ding_s</text:span></text:p>
              </draw:text-box>
            </draw:frame>
            <draw:frame draw:style-name="gr448" draw:text-style-name="P36" draw:layer="layout" svg:width="2.377cm" svg:height="0.569cm" svg:x="8.853cm" svg:y="18.375cm">
              <draw:text-box>
                <text:p><text:span text:style-name="T11">opcode_s </text:span><text:span text:style-name="T11">== 3</text:span></text:p>
              </draw:text-box>
            </draw:frame>
            <draw:g draw:style-name="gr66">
              <draw:glue-point draw:id="4" svg:x="-5cm" svg:y="-2.5cm"/>
              <draw:glue-point draw:id="5" svg:x="-5cm" svg:y="2.5cm"/>
              <draw:glue-point draw:id="6" svg:x="5cm" svg:y="0cm"/>
              <draw:rect draw:style-name="gr449" draw:text-style-name="P16" draw:layer="layout" svg:width="1cm" svg:height="1cm" svg:x="18cm" svg:y="20cm">
                <text:p text:style-name="P15"><text:span text:style-name="T8">≥</text:span><text:span text:style-name="T5">1</text:span></text:p>
              </draw:rect>
              <draw:line draw:style-name="gr450" draw:text-style-name="P17" draw:layer="layout" svg:x1="17.5cm" svg:y1="20.25cm" svg:x2="18cm" svg:y2="20.25cm">
                <text:p/>
              </draw:line>
              <draw:line draw:style-name="gr451" draw:text-style-name="P17" draw:layer="layout" svg:x1="17.5cm" svg:y1="20.75cm" svg:x2="18cm" svg:y2="20.75cm">
                <text:p/>
              </draw:line>
              <draw:line draw:style-name="gr452" draw:text-style-name="P17" draw:layer="layout" svg:x1="19cm" svg:y1="20.5cm" svg:x2="19.5cm" svg:y2="20.5cm">
                <text:p/>
              </draw:line>
            </draw:g>
            <draw:frame draw:style-name="gr453" draw:text-style-name="P44" draw:layer="layout" svg:width="2.447cm" svg:height="0.569cm" svg:x="13.853cm" svg:y="19.3cm">
              <draw:text-box>
                <text:p><text:span text:style-name="T13">exec_pha</text:span><text:span text:style-name="T13">se_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382" draw:text-style-name="P44" draw:layer="layout" svg:width="2.551cm" svg:height="0.569cm" svg:x="15.653cm" svg:y="20.3cm">
              <draw:text-box>
                <text:p><text:span text:style-name="T13">execld_p</text:span><text:span text:style-name="T13">hase_s</text:span></text:p>
              </draw:text-box>
            </draw:frame>
            <draw:line draw:style-name="gr38" draw:text-style-name="P4" draw:layer="layout" svg:x1="19.5cm" svg:y1="20.5cm" svg:x2="22cm" svg:y2="20.5cm">
              <text:p/>
            </draw:line>
            <draw:frame draw:style-name="gr454" draw:text-style-name="P36" draw:layer="layout" svg:width="1.51cm" svg:height="0.569cm" svg:x="8.853cm" svg:y="18.731cm">
              <draw:text-box>
                <text:p><text:span text:style-name="T11">ir_s[6: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368"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455" draw:text-style-name="P39" draw:layer="layout" svg:width="14cm" svg:height="3.5cm" svg:x="8cm" svg:y="17.5cm">
            <text:p/>
            <draw:enhanced-geometry svg:viewBox="0 0 21600 21600" draw:type="rectangle" draw:enhanced-path="M 0 0 L 21600 0 21600 21600 0 21600 0 0 Z N"/>
          </draw:custom-shape>
          <draw:frame draw:style-name="gr456" draw:text-style-name="P40" draw:layer="layout" svg:width="2.204cm" svg:height="0.569cm" svg:x="16.696cm" svg:y="18.1cm">
            <draw:text-box>
              <text:p><text:span text:style-name="T12">Instr </text:span><text:span text:style-name="T12">commit</text:span></text:p>
            </draw:text-box>
          </draw:frame>
          <draw:frame draw:style-name="gr457" draw:text-style-name="P47" draw:layer="layout" svg:width="1.179cm" svg:height="0.569cm" svg:x="12.321cm" svg:y="17.6cm">
            <draw:text-box>
              <text:p><text:span text:style-name="T14">Load</text:span></text:p>
            </draw:text-box>
          </draw:frame>
          <draw:frame draw:style-name="gr458" draw:text-style-name="P47" draw:layer="layout" svg:width="1.539cm" svg:height="0.569cm" svg:x="18.5cm" svg:y="19cm">
            <draw:text-box>
              <text:p><text:span text:style-name="T14">No load</text:span></text:p>
            </draw:text-box>
          </draw:frame>
        </draw:g>
        <draw:g draw:style-name="gr1">
          <draw:g draw:style-name="gr66">
            <draw:glue-point draw:id="4" svg:x="-5cm" svg:y="-2.5cm"/>
            <draw:glue-point draw:id="5" svg:x="-5cm" svg:y="2.5cm"/>
            <draw:rect draw:style-name="gr459" draw:text-style-name="P35" draw:layer="layout" svg:width="1cm" svg:height="1cm" svg:x="60cm" svg:y="2cm">
              <text:p text:style-name="P15"><text:span text:style-name="T10">&amp;</text:span></text:p>
            </draw:rect>
            <draw:line draw:style-name="gr460" draw:text-style-name="P17" draw:layer="layout" svg:x1="59.5cm" svg:y1="2.25cm" svg:x2="60cm" svg:y2="2.25cm">
              <text:p/>
            </draw:line>
            <draw:line draw:style-name="gr461" draw:text-style-name="P17" draw:layer="layout" svg:x1="59.5cm" svg:y1="2.75cm" svg:x2="60cm" svg:y2="2.75cm">
              <text:p/>
            </draw:line>
            <draw:line draw:style-name="gr462" draw:text-style-name="P17" draw:layer="layout" svg:x1="61cm" svg:y1="2.5cm" svg:x2="61.5cm" svg:y2="2.5cm">
              <text:p/>
            </draw:line>
            <draw:line draw:style-name="gr463" draw:text-style-name="P21" draw:layer="layout" svg:x1="59.5cm" svg:y1="2.5cm" svg:x2="60cm" svg:y2="2.5cm">
              <text:p/>
            </draw:line>
          </draw:g>
          <draw:frame draw:style-name="gr464" draw:text-style-name="P36" draw:layer="layout" svg:width="2.28cm" svg:height="0.569cm" svg:x="60.8cm" svg:y="2cm">
            <draw:text-box>
              <text:p><text:span text:style-name="T11">irq_pendi</text:span><text:span text:style-name="T11">ng_s</text:span></text:p>
            </draw:text-box>
          </draw:frame>
          <draw:frame draw:style-name="gr377" draw:text-style-name="P36" draw:layer="layout" svg:width="2.246cm" svg:height="0.569cm" svg:x="57.054cm" svg:y="2.531cm">
            <draw:text-box>
              <text:p><text:span text:style-name="T11">csr_mip_</text:span><text:span text:style-name="T11">s[11]</text:span></text:p>
            </draw:text-box>
          </draw:frame>
          <draw:frame draw:style-name="gr377" draw:text-style-name="P36" draw:layer="layout" svg:width="2.246cm" svg:height="0.569cm" svg:x="57.1cm" svg:y="2cm">
            <draw:text-box>
              <text:p><text:span text:style-name="T11">csr_mie_</text:span><text:span text:style-name="T11">s[11]</text:span></text:p>
            </draw:text-box>
          </draw:frame>
          <draw:frame draw:style-name="gr465" draw:text-style-name="P36" draw:layer="layout" svg:width="2.644cm" svg:height="0.569cm" svg:x="57.2cm" svg:y="1.331cm">
            <draw:text-box>
              <text:p><text:span text:style-name="T11">csr_mstat</text:span><text:span text:style-name="T11">us_mie</text:span></text:p>
            </draw:text-box>
          </draw:frame>
          <draw:frame draw:style-name="gr465" draw:text-style-name="P36" draw:layer="layout" svg:width="2.644cm" svg:height="0.569cm" svg:x="57.056cm" svg:y="1.6cm">
            <draw:text-box>
              <text:p><text:span text:style-name="T11">csr_mstat</text:span><text:span text:style-name="T11">us_s[3]</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431" draw:text-style-name="P40" draw:layer="layout" svg:width="2.4cm" svg:height="0.569cm" svg:x="60.1cm" svg:y="1.3cm">
            <draw:text-box>
              <text:p><text:span text:style-name="T12">IRQ: </text:span><text:span text:style-name="T12">Pending</text:span></text:p>
            </draw:text-box>
          </draw:frame>
          <draw:custom-shape draw:style-name="gr466" draw:text-style-name="P39"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467" draw:text-style-name="P49" draw:layer="layout" svg:width="3cm" svg:height="1cm" svg:x="43cm" svg:y="41cm">
              <text:p text:style-name="P48"><text:span text:style-name="T11">ImmGen</text:span></text:p>
              <draw:enhanced-geometry svg:viewBox="0 0 21600 21600" draw:type="rectangle" draw:enhanced-path="M 0 0 L 21600 0 21600 21600 0 21600 0 0 Z N"/>
            </draw:custom-shape>
            <draw:frame draw:style-name="gr395" draw:text-style-name="P36" draw:layer="layout" svg:width="1.035cm" svg:height="0.569cm" svg:x="43cm" svg:y="41cm">
              <draw:text-box>
                <text:p><text:span text:style-name="T11">instr</text:span></text:p>
              </draw:text-box>
            </draw:frame>
            <draw:frame draw:style-name="gr468" draw:text-style-name="P36" draw:layer="layout" svg:width="1.603cm" svg:height="0.569cm" svg:x="44.197cm" svg:y="41.4cm">
              <draw:text-box>
                <text:p><text:span text:style-name="T11">immSrcx</text:span></text:p>
              </draw:text-box>
            </draw:frame>
            <draw:frame draw:style-name="gr469" draw:text-style-name="P36" draw:layer="layout" svg:width="1.446cm" svg:height="0.569cm" svg:x="44.554cm" svg:y="41.031cm">
              <draw:text-box>
                <text:p><text:span text:style-name="T11">immEx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470" draw:text-style-name="P36" draw:layer="layout" svg:width="1.903cm" svg:height="0.569cm" svg:x="44.8cm" svg:y="42.2cm">
            <draw:text-box>
              <text:p><text:span text:style-name="T11">immSrcx_</text:span><text:span text:style-name="T11">s</text:span></text:p>
            </draw:text-box>
          </draw:frame>
          <draw:frame draw:style-name="gr471" draw:text-style-name="P36" draw:layer="layout" svg:width="1.747cm" svg:height="0.569cm" svg:x="45.801cm" svg:y="40.832cm">
            <draw:text-box>
              <text:p><text:span text:style-name="T11">immExt_s</text:span></text:p>
            </draw:text-box>
          </draw:frame>
          <draw:frame draw:style-name="gr472" draw:text-style-name="P40" draw:layer="layout" svg:width="1.683cm" svg:height="0.569cm" svg:x="43.717cm" svg:y="40.331cm">
            <draw:text-box>
              <text:p><text:span text:style-name="T12">Imm-gen</text:span></text:p>
            </draw:text-box>
          </draw:frame>
          <draw:custom-shape draw:style-name="gr473" draw:text-style-name="P39"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474" draw:text-style-name="P36" draw:layer="layout" svg:width="2.17cm" svg:height="0.569cm" svg:x="46.946cm" svg:y="56.2cm">
          <draw:text-box>
            <text:p><text:span text:style-name="T11">trap_illeg</text:span><text:span text:style-name="T11">al_s</text:span></text:p>
          </draw:text-box>
        </draw:frame>
        <draw:g draw:style-name="gr1">
          <draw:g draw:style-name="gr1">
            <draw:custom-shape draw:style-name="gr475" draw:text-style-name="P51" draw:layer="layout" svg:width="5cm" svg:height="4cm" svg:x="62cm" svg:y="8cm">
              <text:p text:style-name="P50"><text:span text:style-name="T12">TrapMisAligned</text:span></text:p>
              <draw:enhanced-geometry svg:viewBox="0 0 21600 21600" draw:type="rectangle" draw:enhanced-path="M 0 0 L 21600 0 21600 21600 0 21600 0 0 Z N"/>
            </draw:custom-shape>
            <draw:frame draw:style-name="gr476" draw:text-style-name="P36" draw:layer="layout" svg:width="2.03cm" svg:height="0.569cm" svg:x="61.953cm" svg:y="8.031cm">
              <draw:text-box>
                <text:p><text:span text:style-name="T11">exec_pha</text:span><text:span text:style-name="T11">se</text:span></text:p>
              </draw:text-box>
            </draw:frame>
            <draw:frame draw:style-name="gr477" draw:text-style-name="P36" draw:layer="layout" svg:width="1.429cm" svg:height="0.569cm" svg:x="61.953cm" svg:y="8.831cm">
              <draw:text-box>
                <text:p><text:span text:style-name="T11">opcode</text:span></text:p>
              </draw:text-box>
            </draw:frame>
            <draw:frame draw:style-name="gr391" draw:text-style-name="P36" draw:layer="layout" svg:width="0.659cm" svg:height="0.569cm" svg:x="61.953cm" svg:y="9.231cm">
              <draw:text-box>
                <text:p><text:span text:style-name="T11">ir</text:span></text:p>
              </draw:text-box>
            </draw:frame>
            <draw:frame draw:style-name="gr478" draw:text-style-name="P36" draw:layer="layout" svg:width="1.399cm" svg:height="0.569cm" svg:x="61.953cm" svg:y="8.431cm">
              <draw:text-box>
                <text:p><text:span text:style-name="T11">ir_valid</text:span></text:p>
              </draw:text-box>
            </draw:frame>
            <draw:frame draw:style-name="gr479" draw:text-style-name="P36" draw:layer="layout" svg:width="2.5cm" svg:height="0.569cm" svg:x="64.5cm" svg:y="8cm">
              <draw:text-box>
                <text:p><text:span text:style-name="T11">trap_misa</text:span><text:span text:style-name="T11">ligned</text:span></text:p>
              </draw:text-box>
            </draw:frame>
            <draw:frame draw:style-name="gr471" draw:text-style-name="P36" draw:layer="layout" svg:width="1.747cm" svg:height="0.569cm" svg:x="61.953cm" svg:y="9.631cm">
              <draw:text-box>
                <text:p><text:span text:style-name="T11">dBusAddr</text:span></text:p>
              </draw:text-box>
            </draw:frame>
            <draw:frame draw:style-name="gr395" draw:text-style-name="P36" draw:layer="layout" svg:width="1.035cm" svg:height="0.569cm" svg:x="61.953cm" svg:y="10.032cm">
              <draw:text-box>
                <text:p><text:span text:style-name="T11">take</text:span></text:p>
              </draw:text-box>
            </draw:frame>
            <draw:frame draw:style-name="gr480" draw:text-style-name="P36" draw:layer="layout" svg:width="1.145cm" svg:height="0.569cm" svg:x="61.953cm" svg:y="10.433cm">
              <draw:text-box>
                <text:p><text:span text:style-name="T11">PCb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481" draw:text-style-name="P36" draw:layer="layout" svg:width="2.801cm" svg:height="0.569cm" svg:x="66.8cm" svg:y="7.831cm">
              <draw:text-box>
                <text:p><text:span text:style-name="T11">trap_misa</text:span><text:span text:style-name="T11">ligned_s</text:span></text:p>
              </draw:text-box>
            </draw:frame>
            <draw:frame draw:style-name="gr447" draw:text-style-name="P44" draw:layer="layout" svg:width="2.331cm" svg:height="0.569cm" svg:x="59.8cm" svg:y="7.8cm">
              <draw:text-box>
                <text:p><text:span text:style-name="T13">exec_pha</text:span><text:span text:style-name="T13">se_s</text:span></text:p>
              </draw:text-box>
            </draw:frame>
            <draw:frame draw:style-name="gr394" draw:text-style-name="P36" draw:layer="layout" svg:width="1.7cm" svg:height="0.569cm" svg:x="60.431cm" svg:y="8.231cm">
              <draw:text-box>
                <text:p><text:span text:style-name="T11">ir_valid_s</text:span></text:p>
              </draw:text-box>
            </draw:frame>
            <draw:frame draw:style-name="gr403" draw:text-style-name="P36" draw:layer="layout" svg:width="1.73cm" svg:height="0.569cm" svg:x="60.401cm" svg:y="8.631cm">
              <draw:text-box>
                <text:p><text:span text:style-name="T11">opcode_s</text:span></text:p>
              </draw:text-box>
            </draw:frame>
            <draw:frame draw:style-name="gr389" draw:text-style-name="P36" draw:layer="layout" svg:width="0.955cm" svg:height="0.569cm" svg:x="61.176cm" svg:y="9cm">
              <draw:text-box>
                <text:p><text:span text:style-name="T11">ir_s</text:span></text:p>
              </draw:text-box>
            </draw:frame>
            <draw:frame draw:style-name="gr378" draw:text-style-name="P36" draw:layer="layout" svg:width="2.043cm" svg:height="0.569cm" svg:x="60.088cm" svg:y="9.433cm">
              <draw:text-box>
                <text:p><text:span text:style-name="T11">dBusAddr</text:span><text:span text:style-name="T11">_s</text:span></text:p>
              </draw:text-box>
            </draw:frame>
            <draw:frame draw:style-name="gr482" draw:text-style-name="P36" draw:layer="layout" svg:width="1.336cm" svg:height="0.569cm" svg:x="60.795cm" svg:y="9.833cm">
              <draw:text-box>
                <text:p><text:span text:style-name="T11">take_s</text:span></text:p>
              </draw:text-box>
            </draw:frame>
            <draw:frame draw:style-name="gr469" draw:text-style-name="P36" draw:layer="layout" svg:width="1.446cm" svg:height="0.569cm" svg:x="60.685cm" svg:y="10.233cm">
              <draw:text-box>
                <text:p><text:span text:style-name="T11">PCbr_s</text:span></text:p>
              </draw:text-box>
            </draw:frame>
          </draw:g>
          <draw:frame draw:style-name="gr483" draw:text-style-name="P40" draw:layer="layout" svg:width="2.75cm" svg:height="0.569cm" svg:x="62.85cm" svg:y="7.231cm">
            <draw:text-box>
              <text:p><text:span text:style-name="T12">Trap: </text:span><text:span text:style-name="T12">Misalign</text:span><text:span text:style-name="T12">ed</text:span></text:p>
            </draw:text-box>
          </draw:frame>
          <draw:custom-shape draw:style-name="gr484" draw:text-style-name="P39"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485" draw:text-style-name="P36" draw:layer="layout" svg:width="2.534cm" svg:height="0.569cm" svg:x="20.287cm" svg:y="10.7cm">
              <draw:text-box>
                <text:p><text:span text:style-name="T11">mret_pen</text:span><text:span text:style-name="T11">ding_s</text:span></text:p>
              </draw:text-box>
            </draw:frame>
            <draw:g draw:style-name="gr1">
              <draw:custom-shape draw:style-name="gr386" draw:text-style-name="P41"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395" draw:text-style-name="P36" draw:layer="layout" svg:width="1.035cm" svg:height="0.569cm" svg:x="17.186cm" svg:y="11cm">
              <draw:text-box>
                <text:p><text:span text:style-name="T11">1‘b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486" draw:text-style-name="P44" draw:layer="layout" svg:width="5.18cm" svg:height="0.569cm" svg:x="16.186cm" svg:y="11.93cm">
              <draw:text-box>
                <text:p><text:span text:style-name="T13">exec_pha</text:span><text:span text:style-name="T13">se_s </text:span><text:span text:style-name="T15">&amp;&amp; </text:span><text:span text:style-name="T15">is_mret_f</text:span><text:span text:style-name="T15">etched_s</text:span></text:p>
              </draw:text-box>
            </draw:frame>
            <draw:polygon draw:style-name="gr58" draw:text-style-name="P1" draw:layer="layout" svg:width="0.499cm" svg:height="0.999cm" svg:x="15.988cm" svg:y="10cm" svg:viewBox="0 0 500 1000" draw:points="0,0 0,1000 500,850 500,150">
              <text:p/>
            </draw:polygon>
            <draw:frame draw:style-name="gr397" draw:text-style-name="P36" draw:layer="layout" svg:width="2.504cm" svg:height="0.569cm" svg:x="14.388cm" svg:y="11.231cm">
              <draw:text-box>
                <text:p text:style-name="P6"><text:span text:style-name="T13">fetch0_ph</text:span><text:span text:style-name="T13">ase_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487" draw:text-style-name="P36" draw:layer="layout" svg:width="1.027cm" svg:height="0.569cm" svg:x="15.187cm" svg:y="10.33cm">
              <draw:text-box>
                <text:p><text:span text:style-name="T11">1'b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400" draw:text-style-name="P36" draw:layer="layout" svg:width="1.129cm" svg:height="0.569cm" svg:x="14.986cm" svg:y="9.831cm">
              <draw:text-box>
                <text:p><text:span text:style-name="T11">stor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488" draw:text-style-name="P40" draw:layer="layout" svg:width="2.576cm" svg:height="0.569cm" svg:x="17.586cm" svg:y="9.831cm">
            <draw:text-box>
              <text:p><text:span text:style-name="T12">MRET: </text:span><text:span text:style-name="T12">Pending</text:span></text:p>
            </draw:text-box>
          </draw:frame>
          <draw:custom-shape draw:style-name="gr489" draw:text-style-name="P39"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490" draw:text-style-name="P36" draw:layer="layout" svg:width="2.299cm" svg:height="0.569cm" svg:x="77.001cm" svg:y="2.7cm">
              <draw:text-box>
                <text:p><text:span text:style-name="T11">trap_take</text:span><text:span text:style-name="T11">n_s</text:span></text:p>
              </draw:text-box>
            </draw:frame>
            <draw:g draw:style-name="gr1">
              <draw:custom-shape draw:style-name="gr386" draw:text-style-name="P41"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395" draw:text-style-name="P36" draw:layer="layout" svg:width="1.035cm" svg:height="0.569cm" svg:x="73.9cm" svg:y="2.6cm">
              <draw:text-box>
                <text:p><text:span text:style-name="T11">1‘b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491" draw:text-style-name="P52" draw:layer="layout" svg:width="4.253cm" svg:height="0.569cm" svg:x="74.1cm" svg:y="3.93cm">
              <draw:text-box>
                <text:p><text:span text:style-name="T15">instr_com</text:span><text:span text:style-name="T15">mit_s </text:span><text:span text:style-name="T15">&amp;&amp; !</text:span><text:span text:style-name="T15">is_mret_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487" draw:text-style-name="P36" draw:layer="layout" svg:width="1.027cm" svg:height="0.569cm" svg:x="71.901cm" svg:y="3.83cm">
              <draw:text-box>
                <text:p><text:span text:style-name="T11">1'b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474" draw:text-style-name="P52" draw:layer="layout" svg:width="2.17cm" svg:height="0.569cm" svg:x="72.247cm" svg:y="4.8cm">
              <draw:text-box>
                <text:p><text:span text:style-name="T15">trap_illeg</text:span><text:span text:style-name="T15">al_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487" draw:text-style-name="P36" draw:layer="layout" svg:width="1.027cm" svg:height="0.569cm" svg:x="69.902cm" svg:y="2.83cm">
              <draw:text-box>
                <text:p><text:span text:style-name="T11">1'b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481" draw:text-style-name="P52" draw:layer="layout" svg:width="2.801cm" svg:height="0.569cm" svg:x="69.048cm" svg:y="3.8cm">
              <draw:text-box>
                <text:p><text:span text:style-name="T15">trap_misa</text:span><text:span text:style-name="T15">ligned_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487" draw:text-style-name="P36" draw:layer="layout" svg:width="1.027cm" svg:height="0.569cm" svg:x="67.903cm" svg:y="1.83cm">
              <draw:text-box>
                <text:p><text:span text:style-name="T11">1'b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464" draw:text-style-name="P52" draw:layer="layout" svg:width="2.28cm" svg:height="0.569cm" svg:x="67.549cm" svg:y="2.7cm">
              <draw:text-box>
                <text:p><text:span text:style-name="T15">irq_pendi</text:span><text:span text:style-name="T15">ng_s</text:span></text:p>
              </draw:text-box>
            </draw:frame>
            <draw:frame draw:style-name="gr487" draw:text-style-name="P36" draw:layer="layout" svg:width="1.027cm" svg:height="0.569cm" svg:x="67.904cm" svg:y="1.431cm">
              <draw:text-box>
                <text:p><text:span text:style-name="T11">1'b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401" draw:text-style-name="P40" draw:layer="layout" svg:width="2.094cm" svg:height="0.569cm" svg:x="74.3cm" svg:y="1.831cm">
            <draw:text-box>
              <text:p><text:span text:style-name="T12">Trap: </text:span><text:span text:style-name="T12">Taken</text:span></text:p>
            </draw:text-box>
          </draw:frame>
          <draw:custom-shape draw:style-name="gr492" draw:text-style-name="P39" draw:layer="layout" svg:width="12.5cm" svg:height="5cm" svg:x="67.2cm" svg:y="1cm">
            <text:p/>
            <draw:enhanced-geometry svg:viewBox="0 0 21600 21600" draw:type="rectangle" draw:enhanced-path="M 0 0 L 21600 0 21600 21600 0 21600 0 0 Z N"/>
          </draw:custom-shape>
        </draw:g>
        <draw:g draw:style-name="gr1">
          <draw:frame draw:style-name="gr493" draw:text-style-name="P36" draw:layer="layout" svg:width="1.793cm" svg:height="0.569cm" svg:x="52.807cm" svg:y="9.731cm">
            <draw:text-box>
              <text:p><text:span text:style-name="T11">csr_mie_</text:span><text:span text:style-name="T11">s</text:span></text:p>
            </draw:text-box>
          </draw:frame>
          <draw:line draw:style-name="gr38" draw:text-style-name="P4" draw:layer="layout" svg:x1="53cm" svg:y1="10.2cm" svg:x2="55cm" svg:y2="10.2cm">
            <text:p/>
          </draw:line>
          <draw:custom-shape draw:style-name="gr494" draw:text-style-name="P39" draw:layer="layout" svg:width="15cm" svg:height="4cm" svg:x="40cm" svg:y="9cm">
            <text:p/>
            <draw:enhanced-geometry svg:viewBox="0 0 21600 21600" draw:type="rectangle" draw:enhanced-path="M 0 0 L 21600 0 21600 21600 0 21600 0 0 Z N"/>
          </draw:custom-shape>
          <draw:frame draw:style-name="gr388" draw:text-style-name="P40" draw:layer="layout" svg:width="1.776cm" svg:height="0.569cm" svg:x="44.8cm" svg:y="9.431cm">
            <draw:text-box>
              <text:p><text:span text:style-name="T12">CSR: MIE</text:span></text:p>
            </draw:text-box>
          </draw:frame>
          <draw:frame draw:style-name="gr495" draw:text-style-name="P53" draw:layer="layout" svg:width="2.88cm" svg:height="0.887cm" svg:x="49.62cm" svg:y="10.782cm">
            <draw:text-box>
              <text:p><text:span text:style-name="T13">exec_pha</text:span><text:span text:style-name="T13">se_s </text:span><text:span text:style-name="T15">&amp;&amp; </text:span></text:p>
              <text:p><text:span text:style-name="T15">ir_valid_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400" draw:text-style-name="P36" draw:layer="layout" svg:width="1.129cm" svg:height="0.569cm" svg:x="49.5cm" svg:y="9.335cm">
            <draw:text-box>
              <text:p><text:span text:style-name="T11">stor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400" draw:text-style-name="P36" draw:layer="layout" svg:width="1.129cm" svg:height="0.569cm" svg:x="47.998cm" svg:y="10.213cm">
            <draw:text-box>
              <text:p><text:span text:style-name="T11">stor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496" draw:text-style-name="P36" draw:layer="layout" svg:width="4.134cm" svg:height="0.887cm" svg:x="47.564cm" svg:y="11.613cm">
            <draw:text-box>
              <text:p><text:span text:style-name="T11">(ir_s[6:0] </text:span><text:span text:style-name="T11">== </text:span><text:span text:style-name="T11">7'b111001</text:span><text:span text:style-name="T11">1) &amp;&amp; </text:span></text:p>
              <text:p><text:span text:style-name="T11">(ir_s[31:2</text:span><text:span text:style-name="T11">0] == </text:span><text:span text:style-name="T11">12'h304)</text:span></text:p>
            </draw:text-box>
          </draw:frame>
          <draw:frame draw:style-name="gr497" draw:text-style-name="P54" draw:layer="layout" svg:width="8.122cm" svg:height="2.155cm" svg:x="40.478cm" svg:y="9.882cm">
            <draw:text-box>
              <text:p><text:span text:style-name="T16">case(ir_s[14:</text:span><text:span text:style-name="T16">12])</text:span></text:p>
              <text:p><text:span text:style-name="T16"><text:s text:c="12"/></text:span><text:span text:style-name="T16">3'b001: </text:span><text:span text:style-name="T16">csr_mie_s &lt;= </text:span><text:span text:style-name="T16">regA_s; <text:s text:c="10"/></text:span><text:span text:style-name="T16"><text:s text:c="23"/></text:span><text:span text:style-name="T16"><text:s text:c="6"/>// csrrw</text:span></text:p>
              <text:p><text:span text:style-name="T16"><text:s text:c="12"/></text:span><text:span text:style-name="T16">3'b010: </text:span><text:span text:style-name="T16">csr_mie_s &lt;= </text:span><text:span text:style-name="T16">csr_mie_s | </text:span><text:span text:style-name="T16">regA_s; <text:s text:c="10"/></text:span><text:span text:style-name="T16"><text:s text:c="17"/>// </text:span><text:span text:style-name="T16">csrrs</text:span></text:p>
              <text:p><text:span text:style-name="T16"><text:s text:c="12"/></text:span><text:span text:style-name="T16">3'b011: </text:span><text:span text:style-name="T16">csr_mie_s &lt;= </text:span><text:span text:style-name="T16">csr_mie_s &amp; </text:span><text:span text:style-name="T16">~regA_s; <text:s text:c="7"/></text:span><text:span text:style-name="T16"><text:s text:c="19"/>// </text:span><text:span text:style-name="T16">csrrc</text:span></text:p>
              <text:p><text:span text:style-name="T16"><text:s text:c="12"/></text:span><text:span text:style-name="T16">3'b101: </text:span><text:span text:style-name="T16">csr_mie_s &lt;= </text:span><text:span text:style-name="T16">{{52{1'b0}}, </text:span><text:span text:style-name="T16">ir_s[19:15], </text:span><text:span text:style-name="T16">7'b0}; <text:s text:c="13"/></text:span><text:span text:style-name="T16"><text:s/>// csrrwi</text:span></text:p>
              <text:p><text:span text:style-name="T16"><text:s text:c="12"/></text:span><text:span text:style-name="T16">3'b110: </text:span><text:span text:style-name="T16">csr_mie_s &lt;= </text:span><text:span text:style-name="T16">csr_mie_s | </text:span><text:span text:style-name="T16">{{52{1'b0}}, </text:span><text:span text:style-name="T16">ir_s[19:15], </text:span><text:span text:style-name="T16">7'b0}; <text:s text:c="2"/>// </text:span><text:span text:style-name="T16">csrrsi</text:span></text:p>
              <text:p><text:span text:style-name="T16"><text:s text:c="12"/></text:span><text:span text:style-name="T16">3'b111: </text:span><text:span text:style-name="T16">csr_mie_s &lt;= </text:span><text:span text:style-name="T16">csr_mie_s &amp; </text:span><text:span text:style-name="T16">~{{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498" draw:text-style-name="P36" draw:layer="layout" svg:width="2.327cm" svg:height="0.569cm" svg:x="52.3cm" svg:y="5.531cm">
            <draw:text-box>
              <text:p><text:span text:style-name="T11">csr_mstat</text:span><text:span text:style-name="T11">us_s</text:span></text:p>
            </draw:text-box>
          </draw:frame>
          <draw:line draw:style-name="gr38" draw:text-style-name="P4" draw:layer="layout" svg:x1="52.5cm" svg:y1="6cm" svg:x2="55cm" svg:y2="6cm">
            <text:p/>
          </draw:line>
          <draw:custom-shape draw:style-name="gr499" draw:text-style-name="P39"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500" draw:text-style-name="P40" draw:layer="layout" svg:width="2.602cm" svg:height="0.569cm" svg:x="49.6cm" svg:y="2.6cm">
            <draw:text-box>
              <text:p><text:span text:style-name="T12">CSR: </text:span><text:span text:style-name="T12">MSTATU</text:span><text:span text:style-name="T12">S</text:span></text:p>
            </draw:text-box>
          </draw:frame>
          <draw:frame draw:style-name="gr495" draw:text-style-name="P53" draw:layer="layout" svg:width="2.88cm" svg:height="0.887cm" svg:x="42.62cm" svg:y="2.782cm">
            <draw:text-box>
              <text:p><text:span text:style-name="T13">exec_pha</text:span><text:span text:style-name="T13">se_s </text:span><text:span text:style-name="T15">&amp;&amp; </text:span></text:p>
              <text:p><text:span text:style-name="T15">ir_valid_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400" draw:text-style-name="P36" draw:layer="layout" svg:width="1.129cm" svg:height="0.569cm" svg:x="42.5cm" svg:y="1.335cm">
            <draw:text-box>
              <text:p><text:span text:style-name="T11">stor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400" draw:text-style-name="P36" draw:layer="layout" svg:width="1.129cm" svg:height="0.569cm" svg:x="40.998cm" svg:y="2.213cm">
            <draw:text-box>
              <text:p><text:span text:style-name="T11">stor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496" draw:text-style-name="P36" draw:layer="layout" svg:width="4.134cm" svg:height="0.887cm" svg:x="40.564cm" svg:y="3.613cm">
            <draw:text-box>
              <text:p><text:span text:style-name="T11">(ir_s[6:0] </text:span><text:span text:style-name="T11">== </text:span><text:span text:style-name="T11">7'b111001</text:span><text:span text:style-name="T11">1) &amp;&amp; </text:span></text:p>
              <text:p><text:span text:style-name="T11">(ir_s[31:2</text:span><text:span text:style-name="T11">0] == </text:span><text:span text:style-name="T11">12'h300)</text:span></text:p>
            </draw:text-box>
          </draw:frame>
          <draw:frame draw:style-name="gr501" draw:text-style-name="P54" draw:layer="layout" svg:width="8.804cm" svg:height="2.155cm" svg:x="33.078cm" svg:y="1.882cm">
            <draw:text-box>
              <text:p><text:span text:style-name="T16">case(ir_s[14:</text:span><text:span text:style-name="T16">12])</text:span></text:p>
              <text:p><text:span text:style-name="T16"><text:s text:c="12"/></text:span><text:span text:style-name="T16">3'b001: </text:span><text:span text:style-name="T16">csr_mstatus_</text:span><text:span text:style-name="T16">s &lt;= regA_s; <text:s text:c="2"/></text:span><text:span text:style-name="T16"><text:s text:c="23"/></text:span><text:span text:style-name="T16"><text:s text:c="14"/>// </text:span><text:span text:style-name="T16">csrrw</text:span></text:p>
              <text:p><text:span text:style-name="T16"><text:s text:c="12"/></text:span><text:span text:style-name="T16">3'b010: </text:span><text:span text:style-name="T16">csr_mstatus_</text:span><text:span text:style-name="T16">s &lt;= </text:span><text:span text:style-name="T16">csr_mstatus_</text:span><text:span text:style-name="T16">s | regA_s; <text:s text:c="5"/></text:span><text:span text:style-name="T16"><text:s text:c="22"/></text:span><text:span text:style-name="T16">// csrrs</text:span></text:p>
              <text:p><text:span text:style-name="T16"><text:s text:c="12"/></text:span><text:span text:style-name="T16">3'b011: </text:span><text:span text:style-name="T16">csr_mstatus_</text:span><text:span text:style-name="T16">s &lt;= </text:span><text:span text:style-name="T16">csr_mstatus_</text:span><text:span text:style-name="T16">s &amp; ~regA_s; <text:s/></text:span><text:span text:style-name="T16"><text:s text:c="23"/></text:span><text:span text:style-name="T16"><text:s text:c="2"/>// csrrc</text:span></text:p>
              <text:p><text:span text:style-name="T16"><text:s text:c="12"/></text:span><text:span text:style-name="T16">3'b101: </text:span><text:span text:style-name="T16">csr_mstatus_</text:span><text:span text:style-name="T16">s &lt;= </text:span><text:span text:style-name="T16">{{52{1'b0}}, </text:span><text:span text:style-name="T16">ir_s[19:15], </text:span><text:span text:style-name="T16">7'b0}; <text:s text:c="13"/></text:span><text:span text:style-name="T16"><text:s/>// csrrwi</text:span></text:p>
              <text:p><text:span text:style-name="T16"><text:s text:c="12"/></text:span><text:span text:style-name="T16">3'b110: </text:span><text:span text:style-name="T16">csr_mstatus_</text:span><text:span text:style-name="T16">s &lt;= </text:span><text:span text:style-name="T16">csr_mstatus_</text:span><text:span text:style-name="T16">s | {{52{1'b0}}, </text:span><text:span text:style-name="T16">ir_s[19:15], </text:span><text:span text:style-name="T16">7'b0}; <text:s text:c="2"/>// </text:span><text:span text:style-name="T16">csrrsi</text:span></text:p>
              <text:p><text:span text:style-name="T16"><text:s text:c="12"/></text:span><text:span text:style-name="T16">3'b111: </text:span><text:span text:style-name="T16">csr_mstatus_</text:span><text:span text:style-name="T16">s &lt;= </text:span><text:span text:style-name="T16">csr_msttus_s </text:span><text:span text:style-name="T16">&amp; </text:span><text:span text:style-name="T16">~{{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398" draw:text-style-name="P36" draw:layer="layout" svg:width="2.14cm" svg:height="0.569cm" svg:x="50cm" svg:y="6.9cm">
            <draw:text-box>
              <text:p><text:span text:style-name="T11">trap_take</text:span><text:span text:style-name="T11">n_s</text:span></text:p>
            </draw:text-box>
          </draw:frame>
          <draw:frame draw:style-name="gr502" draw:text-style-name="P54" draw:layer="layout" svg:width="4.122cm" svg:height="0.727cm" svg:x="46.6cm" svg:y="5.873cm">
            <draw:text-box>
              <text:p><text:span text:style-name="T16">csr_mstatus_</text:span><text:span text:style-name="T16">s[7] &lt;= </text:span><text:span text:style-name="T16">csr_mstatus_</text:span><text:span text:style-name="T16">mie;</text:span></text:p>
              <text:p><text:span text:style-name="T16">csr_mstatus_</text:span><text:span text:style-name="T16">s[3] &lt;= 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503" draw:text-style-name="P36" draw:layer="layout" svg:width="2.331cm" svg:height="0.887cm" svg:x="47.7cm" svg:y="4.7cm">
            <draw:text-box>
              <text:p><text:span text:style-name="T11">is_mret_s </text:span><text:span text:style-name="T11">&amp;&amp; </text:span></text:p>
              <text:p><text:span text:style-name="T13">exec_pha</text:span><text:span text:style-name="T13">se_s</text:span></text:p>
            </draw:text-box>
          </draw:frame>
          <draw:frame draw:style-name="gr504" draw:text-style-name="P54" draw:layer="layout" svg:width="4.24cm" svg:height="0.727cm" svg:x="44.5cm" svg:y="3.873cm">
            <draw:text-box>
              <text:p><text:span text:style-name="T16">csr_mstatus_</text:span><text:span text:style-name="T16">s[3] &lt;= </text:span><text:span text:style-name="T16">csr_mstatus_</text:span><text:span text:style-name="T16">mpie;</text:span></text:p>
              <text:p><text:span text:style-name="T16">csr_mstatus_</text:span><text:span text:style-name="T16">s[7] &lt;= 1'b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476" draw:text-style-name="P36" draw:layer="layout" svg:width="2.03cm" svg:height="0.569cm" svg:x="52.3cm" svg:y="25.331cm">
            <draw:text-box>
              <text:p><text:span text:style-name="T11">csr_mepc</text:span><text:span text:style-name="T11">_s</text:span></text:p>
            </draw:text-box>
          </draw:frame>
          <draw:line draw:style-name="gr38" draw:text-style-name="P4" draw:layer="layout" svg:x1="52.5cm" svg:y1="25.8cm" svg:x2="55cm" svg:y2="25.8cm">
            <text:p/>
          </draw:line>
          <draw:custom-shape draw:style-name="gr505" draw:text-style-name="P39"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500" draw:text-style-name="P40" draw:layer="layout" svg:width="2.1cm" svg:height="0.569cm" svg:x="50.3cm" svg:y="24.5cm">
            <draw:text-box>
              <text:p><text:span text:style-name="T12">CSR: </text:span><text:span text:style-name="T12">MEPC</text:span></text:p>
            </draw:text-box>
          </draw:frame>
          <draw:frame draw:style-name="gr495" draw:text-style-name="P53" draw:layer="layout" svg:width="2.88cm" svg:height="0.887cm" svg:x="45.62cm" svg:y="23.782cm">
            <draw:text-box>
              <text:p><text:span text:style-name="T13">exec_pha</text:span><text:span text:style-name="T13">se_s </text:span><text:span text:style-name="T15">&amp;&amp; </text:span></text:p>
              <text:p><text:span text:style-name="T15">ir_valid_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400" draw:text-style-name="P36" draw:layer="layout" svg:width="1.129cm" svg:height="0.569cm" svg:x="45.5cm" svg:y="22.335cm">
            <draw:text-box>
              <text:p><text:span text:style-name="T11">stor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400" draw:text-style-name="P36" draw:layer="layout" svg:width="1.129cm" svg:height="0.569cm" svg:x="43.998cm" svg:y="23.213cm">
            <draw:text-box>
              <text:p><text:span text:style-name="T11">stor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496" draw:text-style-name="P36" draw:layer="layout" svg:width="4.134cm" svg:height="0.887cm" svg:x="43.564cm" svg:y="24.613cm">
            <draw:text-box>
              <text:p><text:span text:style-name="T11">(ir_s[6:0] </text:span><text:span text:style-name="T11">== </text:span><text:span text:style-name="T11">7'b111001</text:span><text:span text:style-name="T11">1) &amp;&amp; </text:span></text:p>
              <text:p><text:span text:style-name="T11">(ir_s[31:2</text:span><text:span text:style-name="T11">0] == </text:span><text:span text:style-name="T11">12'h341)</text:span></text:p>
            </draw:text-box>
          </draw:frame>
          <draw:frame draw:style-name="gr501" draw:text-style-name="P54" draw:layer="layout" svg:width="8.804cm" svg:height="2.155cm" svg:x="36.078cm" svg:y="22.882cm">
            <draw:text-box>
              <text:p><text:span text:style-name="T16">case(ir_s[14:</text:span><text:span text:style-name="T16">12])</text:span></text:p>
              <text:p><text:span text:style-name="T16"><text:s text:c="12"/></text:span><text:span text:style-name="T16">3'b001: </text:span><text:span text:style-name="T16">csr_mepc_s </text:span><text:span text:style-name="T16">&lt;= regA_s; <text:s text:c="4"/></text:span><text:span text:style-name="T16"><text:s text:c="23"/></text:span><text:span text:style-name="T16"><text:s text:c="12"/>// </text:span><text:span text:style-name="T16">csrrw</text:span></text:p>
              <text:p><text:span text:style-name="T16"><text:s text:c="12"/></text:span><text:span text:style-name="T16">3'b010: </text:span><text:span text:style-name="T16">csr_mepc_s </text:span><text:span text:style-name="T16">&lt;= </text:span><text:span text:style-name="T16">csr_mepc_s | </text:span><text:span text:style-name="T16">regA_s; <text:s text:c="10"/></text:span><text:span text:style-name="T16"><text:s text:c="17"/>// </text:span><text:span text:style-name="T16">csrrs</text:span></text:p>
              <text:p><text:span text:style-name="T16"><text:s text:c="12"/></text:span><text:span text:style-name="T16">3'b011: </text:span><text:span text:style-name="T16">csr_mepc_s </text:span><text:span text:style-name="T16">&lt;= </text:span><text:span text:style-name="T16">csr_mepc_s </text:span><text:span text:style-name="T16">&amp; ~regA_s; <text:s text:c="4"/></text:span><text:span text:style-name="T16"><text:s text:c="22"/></text:span><text:span text:style-name="T16">// csrrc</text:span></text:p>
              <text:p><text:span text:style-name="T16"><text:s text:c="12"/></text:span><text:span text:style-name="T16">3'b101: </text:span><text:span text:style-name="T16">csr_mepc_s </text:span><text:span text:style-name="T16">&lt;= </text:span><text:span text:style-name="T16">{{52{1'b0}}, </text:span><text:span text:style-name="T16">ir_s[19:15], </text:span><text:span text:style-name="T16">7'b0}; <text:s text:c="13"/></text:span><text:span text:style-name="T16"><text:s/>// csrrwi</text:span></text:p>
              <text:p><text:span text:style-name="T16"><text:s text:c="12"/></text:span><text:span text:style-name="T16">3'b110: </text:span><text:span text:style-name="T16">csr_mepc_s </text:span><text:span text:style-name="T16">&lt;= </text:span><text:span text:style-name="T16">csr_mepc_s | </text:span><text:span text:style-name="T16">{{52{1'b0}}, </text:span><text:span text:style-name="T16">ir_s[19:15], </text:span><text:span text:style-name="T16">7'b0}; <text:s text:c="2"/>// </text:span><text:span text:style-name="T16">csrrsi</text:span></text:p>
              <text:p><text:span text:style-name="T16"><text:s text:c="12"/></text:span><text:span text:style-name="T16">3'b111: </text:span><text:span text:style-name="T16">csr_mepc_s </text:span><text:span text:style-name="T16">&lt;= </text:span><text:span text:style-name="T16">csr_mepc_s </text:span><text:span text:style-name="T16">&amp; </text:span><text:span text:style-name="T16">~{{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398" draw:text-style-name="P36" draw:layer="layout" svg:width="2.14cm" svg:height="0.569cm" svg:x="49.7cm" svg:y="26.631cm">
            <draw:text-box>
              <text:p><text:span text:style-name="T11">trap_take</text:span><text:span text:style-name="T11">n_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506" draw:text-style-name="P36" draw:layer="layout" svg:width="2.801cm" svg:height="0.887cm" svg:x="47cm" svg:y="27.013cm">
            <draw:text-box>
              <text:p><text:span text:style-name="T11">trap_illeg</text:span><text:span text:style-name="T11">al_s || </text:span></text:p>
              <text:p><text:span text:style-name="T11">trap_misa</text:span><text:span text:style-name="T11">ligned_s</text:span></text:p>
            </draw:text-box>
          </draw:frame>
          <draw:line draw:style-name="gr38" draw:text-style-name="P4" draw:layer="layout" svg:x1="49.002cm" svg:y1="25.996cm" svg:x2="50cm" svg:y2="25.996cm">
            <text:p/>
          </draw:line>
          <draw:frame draw:style-name="gr507" draw:text-style-name="P36" draw:layer="layout" svg:width="1.192cm" svg:height="0.569cm" svg:x="47.5cm" svg:y="25.831cm">
            <draw:text-box>
              <text:p><text:span text:style-name="T11">PC_s</text:span></text:p>
            </draw:text-box>
          </draw:frame>
          <draw:frame draw:style-name="gr454" draw:text-style-name="P36" draw:layer="layout" svg:width="1.51cm" svg:height="0.569cm" svg:x="47.2cm" svg:y="25.431cm">
            <draw:text-box>
              <text:p><text:span text:style-name="T11">PCp4_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508" draw:text-style-name="P36" draw:layer="layout" svg:width="2.094cm" svg:height="0.569cm" svg:x="52.806cm" svg:y="17.531cm">
            <draw:text-box>
              <text:p><text:span text:style-name="T11">csr_mtve</text:span><text:span text:style-name="T11">c_s</text:span></text:p>
            </draw:text-box>
          </draw:frame>
          <draw:custom-shape draw:style-name="gr509" draw:text-style-name="P39"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500" draw:text-style-name="P40" draw:layer="layout" svg:width="2.3cm" svg:height="0.569cm" svg:x="51.7cm" svg:y="17.031cm">
            <draw:text-box>
              <text:p><text:span text:style-name="T12">CSR: </text:span><text:span text:style-name="T12">MTVEC</text:span></text:p>
            </draw:text-box>
          </draw:frame>
          <draw:frame draw:style-name="gr495" draw:text-style-name="P53" draw:layer="layout" svg:width="2.88cm" svg:height="0.887cm" svg:x="50.12cm" svg:y="18.782cm">
            <draw:text-box>
              <text:p><text:span text:style-name="T13">exec_pha</text:span><text:span text:style-name="T13">se_s </text:span><text:span text:style-name="T15">&amp;&amp; </text:span></text:p>
              <text:p><text:span text:style-name="T15">ir_valid_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400" draw:text-style-name="P36" draw:layer="layout" svg:width="1.129cm" svg:height="0.569cm" svg:x="50cm" svg:y="17.335cm">
            <draw:text-box>
              <text:p><text:span text:style-name="T11">stor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400" draw:text-style-name="P36" draw:layer="layout" svg:width="1.129cm" svg:height="0.569cm" svg:x="48.498cm" svg:y="18.213cm">
            <draw:text-box>
              <text:p><text:span text:style-name="T11">stor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496" draw:text-style-name="P36" draw:layer="layout" svg:width="4.134cm" svg:height="0.887cm" svg:x="48.064cm" svg:y="19.613cm">
            <draw:text-box>
              <text:p><text:span text:style-name="T11">(ir_s[6:0] </text:span><text:span text:style-name="T11">== </text:span><text:span text:style-name="T11">7'b111001</text:span><text:span text:style-name="T11">1) &amp;&amp; </text:span></text:p>
              <text:p><text:span text:style-name="T11">(ir_s[31:2</text:span><text:span text:style-name="T11">0] == </text:span><text:span text:style-name="T11">12'h305)</text:span></text:p>
            </draw:text-box>
          </draw:frame>
          <draw:frame draw:style-name="gr510" draw:text-style-name="P54" draw:layer="layout" svg:width="7.767cm" svg:height="2.155cm" svg:x="41.078cm" svg:y="17.882cm">
            <draw:text-box>
              <text:p><text:span text:style-name="T16">case(ir_s[14:</text:span><text:span text:style-name="T16">12])</text:span></text:p>
              <text:p><text:span text:style-name="T16"><text:s text:c="12"/></text:span><text:span text:style-name="T16">3'b001: </text:span><text:span text:style-name="T16">csr_mtvec_s </text:span><text:span text:style-name="T16">&lt;= regA_s;</text:span></text:p>
              <text:p><text:span text:style-name="T17"><text:s text:c="12"/></text:span><text:span text:style-name="T17">3'b010: </text:span><text:span text:style-name="T17">csr_mtvec_s </text:span><text:span text:style-name="T17">&lt;= </text:span><text:span text:style-name="T17">csr_m</text:span><text:span text:style-name="T16">tvec_s | </text:span><text:span text:style-name="T16">regA_s;</text:span></text:p>
              <text:p><text:span text:style-name="T17"><text:s text:c="12"/></text:span><text:span text:style-name="T17">3'b011: </text:span><text:span text:style-name="T17">csr_mtvec_s </text:span><text:span text:style-name="T17">&lt;= </text:span><text:span text:style-name="T17">csr_m</text:span><text:span text:style-name="T16">tvec_s </text:span><text:span text:style-name="T16">&amp; ~regA_s;</text:span></text:p>
              <text:p><text:span text:style-name="T17"><text:s text:c="12"/></text:span><text:span text:style-name="T17">3'b101: </text:span><text:span text:style-name="T17">csr_m</text:span><text:span text:style-name="T16">tvec_s </text:span><text:span text:style-name="T16">&lt;= </text:span><text:span text:style-name="T16">{{52{1'b0}}, </text:span><text:span text:style-name="T16">ir_s[19:15], </text:span><text:span text:style-name="T16">7'b0};</text:span></text:p>
              <text:p><text:span text:style-name="T17"><text:s text:c="12"/></text:span><text:span text:style-name="T17">3'b110: </text:span><text:span text:style-name="T17">csr_mtvec_s </text:span><text:span text:style-name="T17">&lt;= </text:span><text:span text:style-name="T17">csr_m</text:span><text:span text:style-name="T16">tvec_s | </text:span><text:span text:style-name="T16">{{52{1'b0}}, </text:span><text:span text:style-name="T16">ir_s[19:15], </text:span><text:span text:style-name="T16">7'b0};</text:span></text:p>
              <text:p><text:span text:style-name="T17"><text:s text:c="12"/></text:span><text:span text:style-name="T17">3'b111: </text:span><text:span text:style-name="T17">csr_mtvec_s </text:span><text:span text:style-name="T17">&lt;= </text:span><text:span text:style-name="T17">csr_m</text:span><text:span text:style-name="T16">tvec_s </text:span><text:span text:style-name="T16">&amp; </text:span><text:span text:style-name="T16">~{{52{1'b0}}, </text:span><text:span text:style-name="T16">ir_s[19:15], </text:span><text:span text:style-name="T16">7'b0};</text:span></text:p>
              <text:p><text:span text:style-name="T16"><text:s text:c="10"/></text:span><text:span text:style-name="T16">endcase</text:span></text:p>
            </draw:text-box>
          </draw:frame>
          <draw:g draw:style-name="gr1">
            <draw:custom-shape draw:style-name="gr386" draw:text-style-name="P41"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498" draw:text-style-name="P36" draw:layer="layout" svg:width="2.327cm" svg:height="0.569cm" svg:x="52.3cm" svg:y="32.331cm">
            <draw:text-box>
              <text:p><text:span text:style-name="T11">csr_mcau</text:span><text:span text:style-name="T11">se_s</text:span></text:p>
            </draw:text-box>
          </draw:frame>
          <draw:line draw:style-name="gr38" draw:text-style-name="P4" draw:layer="layout" svg:x1="52.5cm" svg:y1="32.9cm" svg:x2="55cm" svg:y2="32.9cm">
            <text:p/>
          </draw:line>
          <draw:custom-shape draw:style-name="gr511" draw:text-style-name="P39"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500" draw:text-style-name="P40" draw:layer="layout" svg:width="2.5cm" svg:height="0.569cm" svg:x="50.3cm" svg:y="31.5cm">
            <draw:text-box>
              <text:p><text:span text:style-name="T12">CSR: </text:span><text:span text:style-name="T12">MCAUS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400" draw:text-style-name="P36" draw:layer="layout" svg:width="1.129cm" svg:height="0.569cm" svg:x="43.6cm" svg:y="29.831cm">
            <draw:text-box>
              <text:p><text:span text:style-name="T11">store</text:span></text:p>
            </draw:text-box>
          </draw:frame>
          <draw:g draw:style-name="gr1">
            <draw:custom-shape draw:style-name="gr386" draw:text-style-name="P41"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398" draw:text-style-name="P36" draw:layer="layout" svg:width="2.14cm" svg:height="0.569cm" svg:x="49.7cm" svg:y="33.631cm">
            <draw:text-box>
              <text:p><text:span text:style-name="T11">trap_take</text:span><text:span text:style-name="T11">n_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474" draw:text-style-name="P36" draw:layer="layout" svg:width="2.17cm" svg:height="0.569cm" svg:x="47.6cm" svg:y="33.831cm">
            <draw:text-box>
              <text:p><text:span text:style-name="T11">trap_illeg</text:span><text:span text:style-name="T11">al_s</text:span></text:p>
            </draw:text-box>
          </draw:frame>
          <draw:line draw:style-name="gr38" draw:text-style-name="P4" draw:layer="layout" svg:x1="49.002cm" svg:y1="32.996cm" svg:x2="50cm" svg:y2="32.996cm">
            <text:p/>
          </draw:line>
          <draw:frame draw:style-name="gr512" draw:text-style-name="P36" draw:layer="layout" svg:width="1.184cm" svg:height="0.569cm" svg:x="47.516cm" svg:y="32.831cm">
            <draw:text-box>
              <text:p><text:span text:style-name="T11">64'd2</text:span></text:p>
            </draw:text-box>
          </draw:frame>
          <draw:frame draw:style-name="gr481" draw:text-style-name="P36" draw:layer="layout" svg:width="2.801cm" svg:height="0.569cm" svg:x="45cm" svg:y="32.8cm">
            <draw:text-box>
              <text:p><text:span text:style-name="T11">trap_misa</text:span><text:span text:style-name="T11">ligned_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513" draw:text-style-name="P36" draw:layer="layout" svg:width="1.95cm" svg:height="0.569cm" svg:x="43.601cm" svg:y="33.301cm">
            <draw:text-box>
              <text:p><text:span text:style-name="T11">dMemRd</text:span><text:span text:style-name="T11">_s</text:span></text:p>
            </draw:text-box>
          </draw:frame>
          <draw:frame draw:style-name="gr512" draw:text-style-name="P36" draw:layer="layout" svg:width="1.184cm" svg:height="0.569cm" svg:x="43.516cm" svg:y="32.331cm">
            <draw:text-box>
              <text:p><text:span text:style-name="T11">64'd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512" draw:text-style-name="P36" draw:layer="layout" svg:width="1.184cm" svg:height="0.569cm" svg:x="41.516cm" svg:y="31.8cm">
            <draw:text-box>
              <text:p><text:span text:style-name="T11">64'd6</text:span></text:p>
            </draw:text-box>
          </draw:frame>
          <draw:frame draw:style-name="gr514" draw:text-style-name="P36" draw:layer="layout" svg:width="1.946cm" svg:height="0.569cm" svg:x="41.701cm" svg:y="32.802cm">
            <draw:text-box>
              <text:p><text:span text:style-name="T11">dMemWr</text:span><text:span text:style-name="T11">_s</text:span></text:p>
            </draw:text-box>
          </draw:frame>
          <draw:frame draw:style-name="gr512" draw:text-style-name="P36" draw:layer="layout" svg:width="1.184cm" svg:height="0.569cm" svg:x="41.516cm" svg:y="31.401cm">
            <draw:text-box>
              <text:p><text:span text:style-name="T11">64'd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515" draw:text-style-name="P36" draw:layer="layout" svg:width="2.195cm" svg:height="0.569cm" svg:x="42.5cm" svg:y="30.231cm">
            <draw:text-box>
              <text:p><text:span text:style-name="T11">{1'b1, </text:span><text:span text:style-name="T11">63'd11}</text:span></text:p>
            </draw:text-box>
          </draw:frame>
          <draw:frame draw:style-name="gr464" draw:text-style-name="P36" draw:layer="layout" svg:width="2.28cm" svg:height="0.569cm" svg:x="43.7cm" svg:y="31.231cm">
            <draw:text-box>
              <text:p><text:span text:style-name="T11">irq_pendi</text:span><text:span text:style-name="T11">ng_s</text:span></text:p>
            </draw:text-box>
          </draw:frame>
          <draw:frame draw:style-name="gr400" draw:text-style-name="P36" draw:layer="layout" svg:width="1.129cm" svg:height="0.569cm" svg:x="49.601cm" svg:y="32.132cm">
            <draw:text-box>
              <text:p><text:span text:style-name="T11">stor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516" draw:text-style-name="P51" draw:layer="layout" svg:width="3cm" svg:height="3cm" svg:x="70.5cm" svg:y="31cm">
                <text:p text:style-name="P50"><text:span text:style-name="T12">CSR: Dec</text:span></text:p>
                <draw:enhanced-geometry svg:viewBox="0 0 21600 21600" draw:type="rectangle" draw:enhanced-path="M 0 0 L 21600 0 21600 21600 0 21600 0 0 Z N"/>
              </draw:custom-shape>
              <draw:frame draw:style-name="gr517" draw:text-style-name="P36" draw:layer="layout" svg:width="1.493cm" svg:height="0.569cm" svg:x="70.407cm" svg:y="31cm">
                <draw:text-box>
                  <text:p><text:span text:style-name="T11">mstatus</text:span></text:p>
                </draw:text-box>
              </draw:frame>
              <draw:frame draw:style-name="gr389" draw:text-style-name="P36" draw:layer="layout" svg:width="0.955cm" svg:height="0.569cm" svg:x="70.407cm" svg:y="31.431cm">
                <draw:text-box>
                  <text:p><text:span text:style-name="T11">mie</text:span></text:p>
                </draw:text-box>
              </draw:frame>
              <draw:frame draw:style-name="gr391" draw:text-style-name="P36" draw:layer="layout" svg:width="0.659cm" svg:height="0.569cm" svg:x="71.941cm" svg:y="33.4cm">
                <draw:text-box>
                  <text:p><text:span text:style-name="T11">ir</text:span></text:p>
                </draw:text-box>
              </draw:frame>
              <draw:frame draw:style-name="gr518" draw:text-style-name="P36" draw:layer="layout" svg:width="1.586cm" svg:height="0.569cm" svg:x="71.9cm" svg:y="31cm">
                <draw:text-box>
                  <text:p><text:span text:style-name="T11">csr_data</text:span></text:p>
                </draw:text-box>
              </draw:frame>
              <draw:frame draw:style-name="gr519" draw:text-style-name="P36" draw:layer="layout" svg:width="1.256cm" svg:height="0.569cm" svg:x="70.407cm" svg:y="31.831cm">
                <draw:text-box>
                  <text:p><text:span text:style-name="T11">mtvec</text:span></text:p>
                </draw:text-box>
              </draw:frame>
              <draw:frame draw:style-name="gr507" draw:text-style-name="P36" draw:layer="layout" svg:width="1.192cm" svg:height="0.569cm" svg:x="70.407cm" svg:y="32.231cm">
                <draw:text-box>
                  <text:p><text:span text:style-name="T11">mepc</text:span></text:p>
                </draw:text-box>
              </draw:frame>
              <draw:frame draw:style-name="gr517" draw:text-style-name="P36" draw:layer="layout" svg:width="1.493cm" svg:height="0.569cm" svg:x="70.407cm" svg:y="32.631cm">
                <draw:text-box>
                  <text:p><text:span text:style-name="T11">mcause</text:span></text:p>
                </draw:text-box>
              </draw:frame>
              <draw:frame draw:style-name="gr389" draw:text-style-name="P36" draw:layer="layout" svg:width="0.955cm" svg:height="0.569cm" svg:x="70.407cm" svg:y="33.031cm">
                <draw:text-box>
                  <text:p><text:span text:style-name="T11">mip</text:span></text:p>
                </draw:text-box>
              </draw:frame>
            </draw:g>
            <draw:frame draw:style-name="gr381" draw:text-style-name="P36" draw:layer="layout" svg:width="1.886cm" svg:height="0.569cm" svg:x="73.3cm" svg:y="30.9cm">
              <draw:text-box>
                <text:p><text:span text:style-name="T11">csr_data_</text:span><text:span text:style-name="T11">s</text:span></text:p>
              </draw:text-box>
            </draw:frame>
            <draw:frame draw:style-name="gr498" draw:text-style-name="P36" draw:layer="layout" svg:width="2.327cm" svg:height="0.569cm" svg:x="68.402cm" svg:y="30.831cm">
              <draw:text-box>
                <text:p><text:span text:style-name="T11">csr_mstat</text:span><text:span text:style-name="T11">us_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520" draw:text-style-name="P36" draw:layer="layout" svg:width="1.093cm" svg:height="0.569cm" svg:x="72.007cm" svg:y="33.931cm">
              <draw:text-box>
                <text:p><text:span text:style-name="T11">ir_s</text:span></text:p>
              </draw:text-box>
            </draw:frame>
            <draw:line draw:style-name="gr38" draw:text-style-name="P4" draw:layer="layout" svg:x1="72.2cm" svg:y1="34cm" svg:x2="72.2cm" svg:y2="35cm">
              <text:p/>
            </draw:line>
            <draw:frame draw:style-name="gr493" draw:text-style-name="P36" draw:layer="layout" svg:width="1.793cm" svg:height="0.569cm" svg:x="68.936cm" svg:y="31.232cm">
              <draw:text-box>
                <text:p><text:span text:style-name="T11">csr_mie_</text:span><text:span text:style-name="T11">s</text:span></text:p>
              </draw:text-box>
            </draw:frame>
            <draw:frame draw:style-name="gr508" draw:text-style-name="P36" draw:layer="layout" svg:width="2.094cm" svg:height="0.569cm" svg:x="68.635cm" svg:y="31.633cm">
              <draw:text-box>
                <text:p><text:span text:style-name="T11">csr_mtve</text:span><text:span text:style-name="T11">c_s</text:span></text:p>
              </draw:text-box>
            </draw:frame>
            <draw:frame draw:style-name="gr476" draw:text-style-name="P36" draw:layer="layout" svg:width="2.03cm" svg:height="0.569cm" svg:x="68.699cm" svg:y="32.034cm">
              <draw:text-box>
                <text:p><text:span text:style-name="T11">csr_mepc</text:span><text:span text:style-name="T11">_s</text:span></text:p>
              </draw:text-box>
            </draw:frame>
            <draw:frame draw:style-name="gr498" draw:text-style-name="P36" draw:layer="layout" svg:width="2.327cm" svg:height="0.569cm" svg:x="68.402cm" svg:y="32.435cm">
              <draw:text-box>
                <text:p><text:span text:style-name="T11">csr_mcau</text:span><text:span text:style-name="T11">se_s</text:span></text:p>
              </draw:text-box>
            </draw:frame>
            <draw:frame draw:style-name="gr493" draw:text-style-name="P36" draw:layer="layout" svg:width="1.793cm" svg:height="0.569cm" svg:x="68.936cm" svg:y="32.836cm">
              <draw:text-box>
                <text:p><text:span text:style-name="T11">csr_mip_</text:span><text:span text:style-name="T11">s</text:span></text:p>
              </draw:text-box>
            </draw:frame>
          </draw:g>
          <draw:frame draw:style-name="gr521" draw:text-style-name="P40" draw:layer="layout" svg:width="2.297cm" svg:height="0.569cm" svg:x="68.903cm" svg:y="34.1cm">
            <draw:text-box>
              <text:p><text:span text:style-name="T12">CSR: </text:span><text:span text:style-name="T12">Decode</text:span></text:p>
            </draw:text-box>
          </draw:frame>
          <draw:custom-shape draw:style-name="gr522" draw:text-style-name="P39"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507" draw:text-style-name="P36" draw:layer="layout" svg:width="1.192cm" svg:height="0.569cm" svg:x="16.799cm" svg:y="47.9cm">
              <draw:text-box>
                <text:p><text:span text:style-name="T11">PC_s</text:span></text:p>
              </draw:text-box>
            </draw:frame>
            <draw:g draw:style-name="gr1">
              <draw:custom-shape draw:style-name="gr390" draw:text-style-name="P43" draw:layer="layout" svg:width="0.5cm" svg:height="1cm" svg:x="16.499cm" svg:y="47.8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523" draw:text-style-name="P36" draw:layer="layout" svg:width="0.815cm" svg:height="0.569cm" svg:x="16.299cm" svg:y="48.2cm">
                <draw:text-box>
                  <text:p><text:span text:style-name="T11">en</text:span></text:p>
                </draw:text-box>
              </draw:frame>
              <draw:frame draw:style-name="gr391" draw:text-style-name="P36" draw:layer="layout" svg:width="0.659cm" svg:height="0.569cm" svg:x="16.299cm" svg:y="47.731cm">
                <draw:text-box>
                  <text:p><text:span text:style-name="T11">d</text:span></text:p>
                </draw:text-box>
              </draw:frame>
            </draw:g>
            <draw:polygon draw:style-name="gr58" draw:text-style-name="P1" draw:layer="layout" svg:width="0.499cm" svg:height="0.999cm" svg:x="14.499cm" svg:y="45.8cm" svg:viewBox="0 0 500 1000" draw:points="0,0 0,1000 500,850 500,150">
              <text:p/>
            </draw:polygon>
            <draw:frame draw:style-name="gr397" draw:text-style-name="P44" draw:layer="layout" svg:width="2.504cm" svg:height="0.569cm" svg:x="14.199cm" svg:y="48.05cm">
              <draw:text-box>
                <text:p><text:span text:style-name="T13">fetch0_ph</text:span><text:span text:style-name="T13">ase_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398" draw:text-style-name="P36" draw:layer="layout" svg:width="2.14cm" svg:height="0.569cm" svg:x="12.899cm" svg:y="46.831cm">
              <draw:text-box>
                <text:p><text:span text:style-name="T11">trap_take</text:span><text:span text:style-name="T11">n_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524" draw:text-style-name="P36" draw:layer="layout" svg:width="3.834cm" svg:height="0.569cm" svg:x="10.899cm" svg:y="46.131cm">
              <draw:text-box>
                <text:p><text:span text:style-name="T11">{csr_mtve</text:span><text:span text:style-name="T11">c_s[63:2], </text:span><text:span text:style-name="T11">2'b00}</text:span></text:p>
              </draw:text-box>
            </draw:frame>
            <draw:polygon draw:style-name="gr58" draw:text-style-name="P1" draw:layer="layout" svg:width="0.499cm" svg:height="0.999cm" svg:x="12.499cm" svg:y="43.8cm" svg:viewBox="0 0 500 1000" draw:points="0,0 0,1000 500,850 500,150">
              <text:p/>
            </draw:polygon>
            <draw:frame draw:style-name="gr485" draw:text-style-name="P36" draw:layer="layout" svg:width="2.534cm" svg:height="0.569cm" svg:x="10.499cm" svg:y="44.831cm">
              <draw:text-box>
                <text:p><text:span text:style-name="T11">mret_pen</text:span><text:span text:style-name="T11">ding_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476" draw:text-style-name="P36" draw:layer="layout" svg:width="2.03cm" svg:height="0.569cm" svg:x="10.699cm" svg:y="44.031cm">
              <draw:text-box>
                <text:p><text:span text:style-name="T11">csr_mepc</text:span><text:span text:style-name="T11">_s</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482" draw:text-style-name="P36" draw:layer="layout" svg:width="1.336cm" svg:height="0.569cm" svg:x="9.7cm" svg:y="42.831cm">
              <draw:text-box>
                <text:p><text:span text:style-name="T11">take_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frame draw:style-name="gr469" draw:text-style-name="P36" draw:layer="layout" svg:width="1.446cm" svg:height="0.569cm" svg:x="9.3cm" svg:y="42.131cm">
              <draw:text-box>
                <text:p><text:span text:style-name="T11">PCbr_s</text:span></text:p>
              </draw:text-box>
            </draw:frame>
            <draw:line draw:style-name="gr38" draw:text-style-name="P4" draw:layer="layout" svg:x1="11cm" svg:y1="42.3cm" svg:x2="12cm" svg:y2="42.3cm">
              <text:p/>
            </draw:line>
            <draw:line draw:style-name="gr38" draw:text-style-name="P4" draw:layer="layout" svg:x1="11.999cm" svg:y1="42.3cm" svg:x2="11.999cm" svg:y2="44.1cm">
              <text:p/>
            </draw:line>
            <draw:frame draw:style-name="gr454" draw:text-style-name="P36" draw:layer="layout" svg:width="1.51cm" svg:height="0.569cm" svg:x="9.2cm" svg:y="41.732cm">
              <draw:text-box>
                <text:p><text:span text:style-name="T11">PCp4_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525" draw:text-style-name="P39" draw:layer="layout" svg:width="9cm" svg:height="8cm" svg:x="9cm" svg:y="41.3cm">
            <text:p/>
            <draw:enhanced-geometry svg:viewBox="0 0 21600 21600" draw:type="rectangle" draw:enhanced-path="M 0 0 L 21600 0 21600 21600 0 21600 0 0 Z N"/>
          </draw:custom-shape>
          <draw:frame draw:style-name="gr456" draw:text-style-name="P40" draw:layer="layout" svg:width="2.204cm" svg:height="0.569cm" svg:x="14.095cm" svg:y="48.631cm">
            <draw:text-box>
              <text:p><text:span text:style-name="T12">PC: </text:span><text:span text:style-name="T12">Register</text:span></text:p>
            </draw:text-box>
          </draw:frame>
        </draw:g>
        <draw:line draw:style-name="gr38" draw:text-style-name="P4" draw:layer="layout" svg:x1="18cm" svg:y1="48.3cm" svg:x2="20.7cm" svg:y2="48.3cm">
          <text:p/>
        </draw:line>
        <draw:g draw:style-name="gr1">
          <draw:g draw:style-name="gr1">
            <draw:custom-shape draw:style-name="gr526" draw:text-style-name="P55" draw:layer="layout" svg:width="1cm" svg:height="1cm" svg:x="20.5cm" svg:y="42.998cm">
              <text:p text:style-name="P48"><text:span text:style-name="T11">+</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391" draw:text-style-name="P36" draw:layer="layout" svg:width="0.659cm" svg:height="0.569cm" svg:x="19.748cm" svg:y="42.8cm">
              <draw:text-box>
                <text:p><text:span text:style-name="T11">4</text:span></text:p>
              </draw:text-box>
            </draw:frame>
            <draw:line draw:style-name="gr38" draw:text-style-name="P4" draw:layer="layout" svg:x1="21.5cm" svg:y1="43.5cm" svg:x2="22.5cm" svg:y2="43.5cm">
              <text:p/>
            </draw:line>
          </draw:g>
          <draw:custom-shape draw:style-name="gr527" draw:text-style-name="P39" draw:layer="layout" svg:width="3cm" svg:height="2cm" svg:x="19.5cm" svg:y="42.5cm">
            <text:p/>
            <draw:enhanced-geometry svg:viewBox="0 0 21600 21600" draw:type="rectangle" draw:enhanced-path="M 0 0 L 21600 0 21600 21600 0 21600 0 0 Z N"/>
          </draw:custom-shape>
          <draw:frame draw:style-name="gr528" draw:text-style-name="P40" draw:layer="layout" svg:width="1.391cm" svg:height="0.569cm" svg:x="20.209cm" svg:y="42.531cm">
            <draw:text-box>
              <text:p><text:span text:style-name="T12">PC: +4</text:span></text:p>
            </draw:text-box>
          </draw:frame>
        </draw:g>
        <draw:line draw:style-name="gr38" draw:text-style-name="P4" draw:layer="layout" svg:x1="22.5cm" svg:y1="43.5cm" svg:x2="23cm" svg:y2="43.5cm">
          <text:p/>
        </draw:line>
        <draw:line draw:style-name="gr38" draw:text-style-name="P4" draw:layer="layout" svg:x1="19cm" svg:y1="43.698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529" draw:text-style-name="P49" draw:layer="layout" svg:width="4.507cm" svg:height="3cm" svg:x="41.993cm" svg:y="44.001cm">
              <text:p text:style-name="P48"><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530" draw:text-style-name="P36" draw:layer="layout" svg:width="3.576cm" svg:height="0.569cm" svg:x="41.995cm" svg:y="44.701cm">
              <draw:text-box>
                <text:p><text:span text:style-name="T11">instr(19:1</text:span><text:span text:style-name="T11">5):raddr0</text:span><text:span text:style-name="T11">1(4:0)</text:span></text:p>
              </draw:text-box>
            </draw:frame>
            <draw:frame draw:style-name="gr530" draw:text-style-name="P36" draw:layer="layout" svg:width="3.576cm" svg:height="0.569cm" svg:x="41.993cm" svg:y="45.132cm">
              <draw:text-box>
                <text:p><text:span text:style-name="T11">instr(24:2</text:span><text:span text:style-name="T11">0):raddr0</text:span><text:span text:style-name="T11">2(4:0)</text:span></text:p>
              </draw:text-box>
            </draw:frame>
            <draw:frame draw:style-name="gr531" draw:text-style-name="P36" draw:layer="layout" svg:width="3.508cm" svg:height="0.569cm" svg:x="41.987cm" svg:y="45.601cm">
              <draw:text-box>
                <text:p><text:span text:style-name="T11">instr(11:7)</text:span><text:span text:style-name="T11">:waddr01(</text:span><text:span text:style-name="T11">4:0)</text:span></text:p>
              </draw:text-box>
            </draw:frame>
            <draw:frame draw:style-name="gr532" draw:text-style-name="P36" draw:layer="layout" svg:width="2.315cm" svg:height="0.569cm" svg:x="41.981cm" svg:y="44.332cm">
              <draw:text-box>
                <text:p><text:span text:style-name="T11">wdata01(</text:span><text:span text:style-name="T11">63:0)</text:span></text:p>
              </draw:text-box>
            </draw:frame>
            <draw:frame draw:style-name="gr533" draw:text-style-name="P36" draw:layer="layout" svg:width="2.204cm" svg:height="0.569cm" svg:x="44.291cm" svg:y="44.101cm">
              <draw:text-box>
                <text:p><text:span text:style-name="T11">rdata01(6</text:span><text:span text:style-name="T11">3:0)</text:span></text:p>
              </draw:text-box>
            </draw:frame>
            <draw:frame draw:style-name="gr533" draw:text-style-name="P36" draw:layer="layout" svg:width="2.204cm" svg:height="0.569cm" svg:x="44.295cm" svg:y="46.132cm">
              <draw:text-box>
                <text:p><text:span text:style-name="T11">rdata02(6</text:span><text:span text:style-name="T11">3:0)</text:span></text:p>
              </draw:text-box>
            </draw:frame>
            <draw:frame draw:style-name="gr534" draw:text-style-name="P36" draw:layer="layout" svg:width="0.865cm" svg:height="0.569cm" svg:x="43.537cm" svg:y="46.432cm">
              <draw:text-box>
                <text:p><text:span text:style-name="T11">w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501cm" svg:x2="49cm" svg:y2="46.501cm">
            <text:p/>
          </draw:line>
          <draw:frame draw:style-name="gr465" draw:text-style-name="P36" draw:layer="layout" svg:width="2.644cm" svg:height="0.569cm" svg:x="39.5cm" svg:y="44.132cm">
            <draw:text-box>
              <text:p><text:span text:style-name="T11">regfile_da</text:span><text:span text:style-name="T11">ta_w_s</text:span></text:p>
            </draw:text-box>
          </draw:frame>
          <draw:frame draw:style-name="gr517" draw:text-style-name="P36" draw:layer="layout" svg:width="1.493cm" svg:height="0.569cm" svg:x="40.6cm" svg:y="43.833cm">
            <draw:text-box>
              <text:p><text:span text:style-name="T11">result_s</text:span></text:p>
            </draw:text-box>
          </draw:frame>
          <draw:line draw:style-name="gr38" draw:text-style-name="P4" draw:layer="layout" svg:x1="44cm" svg:y1="47.5cm" svg:x2="44cm" svg:y2="47.001cm">
            <text:p/>
          </draw:line>
          <draw:frame draw:style-name="gr535" draw:text-style-name="P36" draw:layer="layout" svg:width="1.823cm" svg:height="0.569cm" svg:x="40.358cm" svg:y="44.563cm">
            <draw:text-box>
              <text:p><text:span text:style-name="T11">ir_s[19:15</text:span><text:span text:style-name="T11">]</text:span></text:p>
            </draw:text-box>
          </draw:frame>
          <draw:frame draw:style-name="gr535" draw:text-style-name="P36" draw:layer="layout" svg:width="1.823cm" svg:height="0.569cm" svg:x="40.277cm" svg:y="44.932cm">
            <draw:text-box>
              <text:p><text:span text:style-name="T11">ir_s[24:20</text:span><text:span text:style-name="T11">]</text:span></text:p>
            </draw:text-box>
          </draw:frame>
          <draw:frame draw:style-name="gr536" draw:text-style-name="P36" draw:layer="layout" svg:width="1.645cm" svg:height="0.569cm" svg:x="40.558cm" svg:y="45.501cm">
            <draw:text-box>
              <text:p><text:span text:style-name="T11">ir_s[11:7]</text:span></text:p>
            </draw:text-box>
          </draw:frame>
          <draw:frame draw:style-name="gr478" draw:text-style-name="P36" draw:layer="layout" svg:width="1.399cm" svg:height="0.569cm" svg:x="46.307cm" svg:y="43.901cm">
            <draw:text-box>
              <text:p><text:span text:style-name="T11">regA_s</text:span></text:p>
            </draw:text-box>
          </draw:frame>
          <draw:frame draw:style-name="gr537" draw:text-style-name="P36" draw:layer="layout" svg:width="2.403cm" svg:height="0.569cm" svg:x="46.297cm" svg:y="46.032cm">
            <draw:text-box>
              <text:p><text:span text:style-name="T11">dBusData</text:span><text:span text:style-name="T11">Wr_s</text:span></text:p>
            </draw:text-box>
          </draw:frame>
          <draw:custom-shape draw:style-name="gr422" draw:text-style-name="P39" draw:layer="layout" svg:width="10cm" svg:height="4cm" svg:x="39cm" svg:y="43.5cm">
            <text:p/>
            <draw:enhanced-geometry svg:viewBox="0 0 21600 21600" draw:type="rectangle" draw:enhanced-path="M 0 0 L 21600 0 21600 21600 0 21600 0 0 Z N"/>
          </draw:custom-shape>
          <draw:frame draw:style-name="gr538" draw:text-style-name="P40" draw:layer="layout" svg:width="1.522cm" svg:height="0.569cm" svg:x="43.078cm" svg:y="43.532cm">
            <draw:text-box>
              <text:p><text:span text:style-name="T12">RegFile</text:span></text:p>
            </draw:text-box>
          </draw:frame>
        </draw:g>
        <draw:line draw:style-name="gr38" draw:text-style-name="P4" draw:layer="layout" svg:x1="49cm" svg:y1="44.3cm" svg:x2="50cm" svg:y2="44.3cm">
          <text:p/>
        </draw:line>
        <draw:line draw:style-name="gr38" draw:text-style-name="P4" draw:layer="layout" svg:x1="49cm" svg:y1="46.501cm" svg:x2="49.9cm" svg:y2="46.5cm">
          <text:p/>
        </draw:line>
        <draw:g draw:style-name="gr1">
          <draw:polygon draw:style-name="gr58" draw:text-style-name="P1" draw:layer="layout" svg:width="0.499cm" svg:height="0.999cm" svg:x="51.5cm" svg:y="44.1cm" svg:viewBox="0 0 500 1000" draw:points="0,0 0,1000 500,850 500,150">
            <text:p/>
          </draw:polygon>
          <draw:frame draw:style-name="gr493" draw:text-style-name="P36" draw:layer="layout" svg:width="1.793cm" svg:height="0.569cm" svg:x="50.1cm" svg:y="45.031cm">
            <draw:text-box>
              <text:p><text:span text:style-name="T11">aluSrcA_</text:span><text:span text:style-name="T11">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539" draw:text-style-name="P36" draw:layer="layout" svg:width="1.366cm" svg:height="0.569cm" svg:x="51.834cm" svg:y="44.131cm">
            <draw:text-box>
              <text:p><text:span text:style-name="T11">srcA_s</text:span></text:p>
            </draw:text-box>
          </draw:frame>
          <draw:line draw:style-name="gr38" draw:text-style-name="P4" draw:layer="layout" svg:x1="50cm" svg:y1="44.6cm" svg:x2="51.5cm" svg:y2="44.6cm">
            <text:p/>
          </draw:line>
          <draw:frame draw:style-name="gr391" draw:text-style-name="P36" draw:layer="layout" svg:width="0.659cm" svg:height="0.569cm" svg:x="50.541cm" svg:y="44.631cm">
            <draw:text-box>
              <text:p><text:span text:style-name="T11">0</text:span></text:p>
            </draw:text-box>
          </draw:frame>
          <draw:frame draw:style-name="gr507" draw:text-style-name="P36" draw:layer="layout" svg:width="1.192cm" svg:height="0.569cm" svg:x="50.508cm" svg:y="44.2cm">
            <draw:text-box>
              <text:p><text:span text:style-name="T11">PC_s</text:span></text:p>
            </draw:text-box>
          </draw:frame>
          <draw:custom-shape draw:style-name="gr527" draw:text-style-name="P39" draw:layer="layout" svg:width="3cm" svg:height="2cm" svg:x="50cm" svg:y="43.6cm">
            <text:p/>
            <draw:enhanced-geometry svg:viewBox="0 0 21600 21600" draw:type="rectangle" draw:enhanced-path="M 0 0 L 21600 0 21600 21600 0 21600 0 0 Z N"/>
          </draw:custom-shape>
          <draw:frame draw:style-name="gr540" draw:text-style-name="P40" draw:layer="layout" svg:width="1.497cm" svg:height="0.569cm" svg:x="50.803cm" svg:y="43.631cm">
            <draw:text-box>
              <text:p><text:span text:style-name="T12">MUX: 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493" draw:text-style-name="P36" draw:layer="layout" svg:width="1.793cm" svg:height="0.569cm" svg:x="50.1cm" svg:y="48.431cm">
            <draw:text-box>
              <text:p><text:span text:style-name="T11">aluSrcB_</text:span><text:span text:style-name="T11">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539" draw:text-style-name="P36" draw:layer="layout" svg:width="1.366cm" svg:height="0.569cm" svg:x="51.834cm" svg:y="47.531cm">
            <draw:text-box>
              <text:p><text:span text:style-name="T11">srcB_s</text:span></text:p>
            </draw:text-box>
          </draw:frame>
          <draw:custom-shape draw:style-name="gr527" draw:text-style-name="P39" draw:layer="layout" svg:width="3cm" svg:height="2cm" svg:x="50cm" svg:y="47cm">
            <text:p/>
            <draw:enhanced-geometry svg:viewBox="0 0 21600 21600" draw:type="rectangle" draw:enhanced-path="M 0 0 L 21600 0 21600 21600 0 21600 0 0 Z N"/>
          </draw:custom-shape>
          <draw:frame draw:style-name="gr541" draw:text-style-name="P40" draw:layer="layout" svg:width="1.51cm" svg:height="0.569cm" svg:x="50.803cm" svg:y="47.031cm">
            <draw:text-box>
              <text:p><text:span text:style-name="T12">MUX: B</text:span></text:p>
            </draw:text-box>
          </draw:frame>
        </draw:g>
        <draw:line draw:style-name="gr38" draw:text-style-name="P4" draw:layer="layout" svg:x1="49.6cm" svg:y1="48.2cm" svg:x2="50cm" svg:y2="48.2cm">
          <text:p/>
        </draw:line>
        <draw:g draw:style-name="gr1">
          <draw:g draw:style-name="gr1">
            <draw:g draw:style-name="gr1">
              <draw:custom-shape draw:style-name="gr542" draw:text-style-name="P49" draw:layer="layout" svg:width="3cm" svg:height="2.031cm" svg:x="57cm" svg:y="43.5cm">
                <text:p text:style-name="P48"><text:span text:style-name="T11">alua</text:span></text:p>
                <draw:enhanced-geometry svg:viewBox="0 0 21600 21600" draw:type="rectangle" draw:enhanced-path="M 0 0 L 21600 0 21600 21600 0 21600 0 0 Z N"/>
              </draw:custom-shape>
              <draw:frame draw:style-name="gr543" draw:text-style-name="P36" draw:layer="layout" svg:width="1.37cm" svg:height="0.569cm" svg:x="57cm" svg:y="43.531cm">
                <draw:text-box>
                  <text:p><text:span text:style-name="T11">data01</text:span></text:p>
                </draw:text-box>
              </draw:frame>
              <draw:frame draw:style-name="gr543" draw:text-style-name="P36" draw:layer="layout" svg:width="1.37cm" svg:height="0.569cm" svg:x="57cm" svg:y="44cm">
                <draw:text-box>
                  <text:p><text:span text:style-name="T11">data02</text:span></text:p>
                </draw:text-box>
              </draw:frame>
              <draw:frame draw:style-name="gr469" draw:text-style-name="P36" draw:layer="layout" svg:width="1.446cm" svg:height="0.569cm" svg:x="58.054cm" svg:y="44.962cm">
                <draw:text-box>
                  <text:p><text:span text:style-name="T11">aluSela</text:span></text:p>
                </draw:text-box>
              </draw:frame>
              <draw:frame draw:style-name="gr544" draw:text-style-name="P36" draw:layer="layout" svg:width="1.683cm" svg:height="0.569cm" svg:x="58.3cm" svg:y="44.4cm">
                <draw:text-box>
                  <text:p><text:span text:style-name="T11">aluResult</text:span></text:p>
                </draw:text-box>
              </draw:frame>
            </draw:g>
            <draw:frame draw:style-name="gr544" draw:text-style-name="P36" draw:layer="layout" svg:width="1.683cm" svg:height="0.569cm" svg:x="59.817cm" svg:y="44.031cm">
              <draw:text-box>
                <text:p><text:span text:style-name="T11">aluRes_s</text:span></text:p>
              </draw:text-box>
            </draw:frame>
            <draw:frame draw:style-name="gr471" draw:text-style-name="P36" draw:layer="layout" svg:width="1.747cm" svg:height="0.569cm" svg:x="58.383cm" svg:y="45.431cm">
              <draw:text-box>
                <text:p><text:span text:style-name="T11">aluSela_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473" draw:text-style-name="P39" draw:layer="layout" svg:width="5.5cm" svg:height="3cm" svg:x="55.983cm" svg:y="43cm">
            <text:p/>
            <draw:enhanced-geometry svg:viewBox="0 0 21600 21600" draw:type="rectangle" draw:enhanced-path="M 0 0 L 21600 0 21600 21600 0 21600 0 0 Z N"/>
          </draw:custom-shape>
          <draw:frame draw:style-name="gr545" draw:text-style-name="P40" draw:layer="layout" svg:width="1.874cm" svg:height="0.569cm" svg:x="57.509cm" svg:y="43.031cm">
            <draw:text-box>
              <text:p><text:span text:style-name="T12">ALU: </text:span><text:span text:style-name="T12">Algo</text:span></text:p>
            </draw:text-box>
          </draw:frame>
        </draw:g>
        <draw:g draw:style-name="gr1">
          <draw:g draw:style-name="gr1">
            <draw:g draw:style-name="gr1">
              <draw:custom-shape draw:style-name="gr542" draw:text-style-name="P49" draw:layer="layout" svg:width="3cm" svg:height="2.031cm" svg:x="57cm" svg:y="49.5cm">
                <text:p text:style-name="P48"><text:span text:style-name="T11">alub</text:span></text:p>
                <draw:enhanced-geometry svg:viewBox="0 0 21600 21600" draw:type="rectangle" draw:enhanced-path="M 0 0 L 21600 0 21600 21600 0 21600 0 0 Z N"/>
              </draw:custom-shape>
              <draw:frame draw:style-name="gr543" draw:text-style-name="P36" draw:layer="layout" svg:width="1.37cm" svg:height="0.569cm" svg:x="57cm" svg:y="49.531cm">
                <draw:text-box>
                  <text:p><text:span text:style-name="T11">data01</text:span></text:p>
                </draw:text-box>
              </draw:frame>
              <draw:frame draw:style-name="gr543" draw:text-style-name="P36" draw:layer="layout" svg:width="1.37cm" svg:height="0.569cm" svg:x="57cm" svg:y="50cm">
                <draw:text-box>
                  <text:p><text:span text:style-name="T11">data02</text:span></text:p>
                </draw:text-box>
              </draw:frame>
              <draw:frame draw:style-name="gr469" draw:text-style-name="P36" draw:layer="layout" svg:width="1.446cm" svg:height="0.569cm" svg:x="58.054cm" svg:y="50.962cm">
                <draw:text-box>
                  <text:p><text:span text:style-name="T11">aluSelb</text:span></text:p>
                </draw:text-box>
              </draw:frame>
              <draw:frame draw:style-name="gr395" draw:text-style-name="P36" draw:layer="layout" svg:width="1.035cm" svg:height="0.569cm" svg:x="58.9cm" svg:y="50.4cm">
                <draw:text-box>
                  <text:p><text:span text:style-name="T11">take</text:span></text:p>
                </draw:text-box>
              </draw:frame>
            </draw:g>
            <draw:frame draw:style-name="gr482" draw:text-style-name="P36" draw:layer="layout" svg:width="1.336cm" svg:height="0.569cm" svg:x="59.817cm" svg:y="50.031cm">
              <draw:text-box>
                <text:p><text:span text:style-name="T11">take_s</text:span></text:p>
              </draw:text-box>
            </draw:frame>
            <draw:frame draw:style-name="gr471" draw:text-style-name="P36" draw:layer="layout" svg:width="1.747cm" svg:height="0.569cm" svg:x="58.264cm" svg:y="51.4cm">
              <draw:text-box>
                <text:p><text:span text:style-name="T11">aluSelb_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473" draw:text-style-name="P39" draw:layer="layout" svg:width="5.5cm" svg:height="3cm" svg:x="56cm" svg:y="49cm">
            <text:p/>
            <draw:enhanced-geometry svg:viewBox="0 0 21600 21600" draw:type="rectangle" draw:enhanced-path="M 0 0 L 21600 0 21600 21600 0 21600 0 0 Z N"/>
          </draw:custom-shape>
          <draw:frame draw:style-name="gr546" draw:text-style-name="P40" draw:layer="layout" svg:width="2.233cm" svg:height="0.569cm" svg:x="57.5cm" svg:y="49.031cm">
            <draw:text-box>
              <text:p><text:span text:style-name="T12">ALU: </text:span><text:span text:style-name="T12">Branch</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2.5cm" svg:y1="46.5cm" svg:x2="49.9cm" svg:y2="46.5cm">
          <text:p/>
        </draw:line>
        <draw:line draw:style-name="gr38" draw:text-style-name="P4" draw:layer="layout" svg:x1="62.5cm" svg:y1="45.5cm" svg:x2="66cm" svg:y2="45.5cm">
          <text:p/>
        </draw:line>
        <draw:line draw:style-name="gr38" draw:text-style-name="P4" draw:layer="layout" svg:x1="62.5cm" svg:y1="45.5cm" svg:x2="62.5cm" svg:y2="44.5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547" draw:text-style-name="P49" draw:layer="layout" svg:width="4cm" svg:height="5cm" svg:x="43cm" svg:y="52.001cm">
                <text:p text:style-name="P48"><text:span text:style-name="T11">control</text:span></text:p>
                <draw:enhanced-geometry svg:viewBox="0 0 21600 21600" draw:type="rectangle" draw:enhanced-path="M 0 0 L 21600 0 21600 21600 0 21600 0 0 Z N"/>
              </draw:custom-shape>
              <draw:frame draw:style-name="gr548" draw:text-style-name="P36" draw:layer="layout" svg:width="1.429cm" svg:height="0.569cm" svg:x="43cm" svg:y="52.001cm">
                <draw:text-box>
                  <text:p><text:span text:style-name="T11">opcode</text:span></text:p>
                </draw:text-box>
              </draw:frame>
              <draw:frame draw:style-name="gr549" draw:text-style-name="P36" draw:layer="layout" svg:width="1.192cm" svg:height="0.569cm" svg:x="43cm" svg:y="52.432cm">
                <draw:text-box>
                  <text:p><text:span text:style-name="T11">func3</text:span></text:p>
                </draw:text-box>
              </draw:frame>
              <draw:frame draw:style-name="gr541" draw:text-style-name="P36" draw:layer="layout" svg:width="1.51cm" svg:height="0.569cm" svg:x="43cm" svg:y="52.832cm">
                <draw:text-box>
                  <text:p><text:span text:style-name="T11">func7b5</text:span></text:p>
                </draw:text-box>
              </draw:frame>
              <draw:frame draw:style-name="gr550" draw:text-style-name="P36" draw:layer="layout" svg:width="1.054cm" svg:height="0.569cm" svg:x="43cm" svg:y="53.232cm">
                <draw:text-box>
                  <text:p><text:span text:style-name="T11">take</text:span></text:p>
                </draw:text-box>
              </draw:frame>
              <draw:frame draw:style-name="gr551" draw:text-style-name="P36" draw:layer="layout" svg:width="1.62cm" svg:height="0.569cm" svg:x="45.326cm" svg:y="52.032cm">
                <draw:text-box>
                  <text:p><text:span text:style-name="T11">resultSrc</text:span></text:p>
                </draw:text-box>
              </draw:frame>
              <draw:frame draw:style-name="gr552" draw:text-style-name="P36" draw:layer="layout" svg:width="1.645cm" svg:height="0.569cm" svg:x="45.301cm" svg:y="52.432cm">
                <draw:text-box>
                  <text:p><text:span text:style-name="T11">dMemWr</text:span></text:p>
                </draw:text-box>
              </draw:frame>
              <draw:frame draw:style-name="gr553" draw:text-style-name="P36" draw:layer="layout" svg:width="1.649cm" svg:height="0.569cm" svg:x="45.297cm" svg:y="52.832cm">
                <draw:text-box>
                  <text:p><text:span text:style-name="T11">dMemRd</text:span></text:p>
                </draw:text-box>
              </draw:frame>
              <draw:frame draw:style-name="gr554" draw:text-style-name="P36" draw:layer="layout" svg:width="1.493cm" svg:height="0.569cm" svg:x="45.453cm" svg:y="53.232cm">
                <draw:text-box>
                  <text:p><text:span text:style-name="T11">aluSrcB</text:span></text:p>
                </draw:text-box>
              </draw:frame>
              <draw:frame draw:style-name="gr554" draw:text-style-name="P36" draw:layer="layout" svg:width="1.493cm" svg:height="0.569cm" svg:x="45.453cm" svg:y="53.632cm">
                <draw:text-box>
                  <text:p><text:span text:style-name="T11">aluSrcA</text:span></text:p>
                </draw:text-box>
              </draw:frame>
              <draw:frame draw:style-name="gr555" draw:text-style-name="P36" draw:layer="layout" svg:width="1.268cm" svg:height="0.569cm" svg:x="45.678cm" svg:y="54.032cm">
                <draw:text-box>
                  <text:p><text:span text:style-name="T11">regWr</text:span></text:p>
                </draw:text-box>
              </draw:frame>
              <draw:frame draw:style-name="gr556" draw:text-style-name="P36" draw:layer="layout" svg:width="1.117cm" svg:height="0.569cm" svg:x="45.829cm" svg:y="54.432cm">
                <draw:text-box>
                  <text:p><text:span text:style-name="T11">jump</text:span></text:p>
                </draw:text-box>
              </draw:frame>
              <draw:frame draw:style-name="gr557" draw:text-style-name="P36" draw:layer="layout" svg:width="1.463cm" svg:height="0.569cm" svg:x="45.483cm" svg:y="54.832cm">
                <draw:text-box>
                  <text:p><text:span text:style-name="T11">immSrc</text:span></text:p>
                </draw:text-box>
              </draw:frame>
              <draw:frame draw:style-name="gr558" draw:text-style-name="P36" draw:layer="layout" svg:width="1.446cm" svg:height="0.569cm" svg:x="45.5cm" svg:y="55.201cm">
                <draw:text-box>
                  <text:p><text:span text:style-name="T11">aluSela</text:span></text:p>
                </draw:text-box>
              </draw:frame>
              <draw:frame draw:style-name="gr559" draw:text-style-name="P36" draw:layer="layout" svg:width="2.708cm" svg:height="0.569cm" svg:x="44.238cm" svg:y="56.001cm">
                <draw:text-box>
                  <text:p><text:span text:style-name="T11">trap_illeg</text:span><text:span text:style-name="T11">al_instrx</text:span></text:p>
                </draw:text-box>
              </draw:frame>
              <draw:frame draw:style-name="gr558" draw:text-style-name="P36" draw:layer="layout" svg:width="1.446cm" svg:height="0.569cm" svg:x="45.5cm" svg:y="55.601cm">
                <draw:text-box>
                  <text:p><text:span text:style-name="T11">aluSelb</text:span></text:p>
                </draw:text-box>
              </draw:frame>
            </draw:g>
            <draw:frame draw:style-name="gr454" draw:text-style-name="P36" draw:layer="layout" svg:width="1.51cm" svg:height="0.569cm" svg:x="41.7cm" svg:y="51.832cm">
              <draw:text-box>
                <text:p><text:span text:style-name="T11">ir_s[6:0]</text:span></text:p>
              </draw:text-box>
            </draw:frame>
            <draw:frame draw:style-name="gr535" draw:text-style-name="P36" draw:layer="layout" svg:width="1.823cm" svg:height="0.569cm" svg:x="41.4cm" svg:y="52.232cm">
              <draw:text-box>
                <text:p><text:span text:style-name="T11">ir_s[14:12</text:span><text:span text:style-name="T11">]</text:span></text:p>
              </draw:text-box>
            </draw:frame>
            <draw:frame draw:style-name="gr477" draw:text-style-name="P36" draw:layer="layout" svg:width="1.429cm" svg:height="0.569cm" svg:x="41.771cm" svg:y="52.632cm">
              <draw:text-box>
                <text:p><text:span text:style-name="T11">ir_s[30]</text:span></text:p>
              </draw:text-box>
            </draw:frame>
            <draw:frame draw:style-name="gr482" draw:text-style-name="P36" draw:layer="layout" svg:width="1.336cm" svg:height="0.569cm" svg:x="41.9cm" svg:y="53.032cm">
              <draw:text-box>
                <text:p><text:span text:style-name="T11">take_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560" draw:text-style-name="P36" draw:layer="layout" svg:width="2.06cm" svg:height="0.569cm" svg:x="46.8cm" svg:y="51.833cm">
              <draw:text-box>
                <text:p><text:span text:style-name="T11">resultSrcx</text:span><text:span text:style-name="T11">_s</text:span></text:p>
              </draw:text-box>
            </draw:frame>
            <draw:frame draw:style-name="gr514" draw:text-style-name="P36" draw:layer="layout" svg:width="1.946cm" svg:height="0.569cm" svg:x="46.8cm" svg:y="52.234cm">
              <draw:text-box>
                <text:p><text:span text:style-name="T11">dMemWr</text:span><text:span text:style-name="T11">_s</text:span></text:p>
              </draw:text-box>
            </draw:frame>
            <draw:frame draw:style-name="gr513" draw:text-style-name="P36" draw:layer="layout" svg:width="1.95cm" svg:height="0.569cm" svg:x="46.8cm" svg:y="52.635cm">
              <draw:text-box>
                <text:p><text:span text:style-name="T11">dMemRd</text:span><text:span text:style-name="T11">_s</text:span></text:p>
              </draw:text-box>
            </draw:frame>
            <draw:frame draw:style-name="gr493" draw:text-style-name="P36" draw:layer="layout" svg:width="1.793cm" svg:height="0.569cm" svg:x="46.8cm" svg:y="53.036cm">
              <draw:text-box>
                <text:p><text:span text:style-name="T11">aluSrcB_</text:span><text:span text:style-name="T11">s</text:span></text:p>
              </draw:text-box>
            </draw:frame>
            <draw:frame draw:style-name="gr493" draw:text-style-name="P36" draw:layer="layout" svg:width="1.793cm" svg:height="0.569cm" svg:x="46.801cm" svg:y="53.437cm">
              <draw:text-box>
                <text:p><text:span text:style-name="T11">aluSrcA_</text:span><text:span text:style-name="T11">s</text:span></text:p>
              </draw:text-box>
            </draw:frame>
            <draw:frame draw:style-name="gr374" draw:text-style-name="P36" draw:layer="layout" svg:width="1.565cm" svg:height="0.569cm" svg:x="46.802cm" svg:y="53.838cm">
              <draw:text-box>
                <text:p><text:span text:style-name="T11">regWr_s</text:span></text:p>
              </draw:text-box>
            </draw:frame>
            <draw:frame draw:style-name="gr561" draw:text-style-name="P36" draw:layer="layout" svg:width="1.412cm" svg:height="0.569cm" svg:x="46.803cm" svg:y="54.239cm">
              <draw:text-box>
                <text:p><text:span text:style-name="T11">jump_s</text:span></text:p>
              </draw:text-box>
            </draw:frame>
            <draw:frame draw:style-name="gr470" draw:text-style-name="P36" draw:layer="layout" svg:width="1.903cm" svg:height="0.569cm" svg:x="46.803cm" svg:y="54.64cm">
              <draw:text-box>
                <text:p><text:span text:style-name="T11">immSrcx_</text:span><text:span text:style-name="T11">s</text:span></text:p>
              </draw:text-box>
            </draw:frame>
            <draw:frame draw:style-name="gr471" draw:text-style-name="P36" draw:layer="layout" svg:width="1.747cm" svg:height="0.569cm" svg:x="46.804cm" svg:y="55.041cm">
              <draw:text-box>
                <text:p><text:span text:style-name="T11">aluSela_s</text:span></text:p>
              </draw:text-box>
            </draw:frame>
            <draw:frame draw:style-name="gr471" draw:text-style-name="P36" draw:layer="layout" svg:width="1.747cm" svg:height="0.569cm" svg:x="46.805cm" svg:y="55.442cm">
              <draw:text-box>
                <text:p><text:span text:style-name="T11">aluSelb_s</text:span></text:p>
              </draw:text-box>
            </draw:frame>
            <draw:frame draw:style-name="gr562" draw:text-style-name="P36" draw:layer="layout" svg:width="3.008cm" svg:height="0.569cm" svg:x="46.806cm" svg:y="55.843cm">
              <draw:text-box>
                <text:p><text:span text:style-name="T11">trap_illeg</text:span><text:span text:style-name="T11">al_instrx_</text:span><text:span text:style-name="T11">s</text:span></text:p>
              </draw:text-box>
            </draw:frame>
          </draw:g>
          <draw:custom-shape draw:style-name="gr563" draw:text-style-name="P39" draw:layer="layout" svg:width="9cm" svg:height="6cm" svg:x="41cm" svg:y="51.5cm">
            <text:p/>
            <draw:enhanced-geometry svg:viewBox="0 0 21600 21600" draw:type="rectangle" draw:enhanced-path="M 0 0 L 21600 0 21600 21600 0 21600 0 0 Z N"/>
          </draw:custom-shape>
          <draw:frame draw:style-name="gr521" draw:text-style-name="P40" draw:layer="layout" svg:width="2.297cm" svg:height="0.569cm" svg:x="43.603cm" svg:y="51.531cm">
            <draw:text-box>
              <text:p><text:span text:style-name="T12">Instr.-</text:span><text:span text:style-name="T12">Decode</text:span></text:p>
            </draw:text-box>
          </draw:frame>
        </draw:g>
        <draw:line draw:style-name="gr38" draw:text-style-name="P4" draw:layer="layout" svg:x1="76cm" svg:y1="46.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380" draw:text-style-name="P37"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380" draw:text-style-name="P37"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560" draw:text-style-name="P36" draw:layer="layout" svg:width="2.06cm" svg:height="0.569cm" svg:x="78cm" svg:y="41.2cm">
              <draw:text-box>
                <text:p><text:span text:style-name="T11">resultSrcx</text:span><text:span text:style-name="T11">_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517" draw:text-style-name="P36" draw:layer="layout" svg:width="1.493cm" svg:height="0.569cm" svg:x="79.807cm" svg:y="40.2cm">
              <draw:text-box>
                <text:p><text:span text:style-name="T11">result_s</text:span></text:p>
              </draw:text-box>
            </draw:frame>
            <draw:line draw:style-name="gr38" draw:text-style-name="P4" draw:layer="layout" svg:x1="77cm" svg:y1="40.9cm" svg:x2="79.5cm" svg:y2="40.9cm">
              <text:p/>
            </draw:line>
            <draw:frame draw:style-name="gr376" draw:text-style-name="P36" draw:layer="layout" svg:width="2.407cm" svg:height="0.569cm" svg:x="77.293cm" svg:y="40.731cm">
              <draw:text-box>
                <text:p><text:span text:style-name="T11">dBusData</text:span><text:span text:style-name="T11">Rd_s</text:span></text:p>
              </draw:text-box>
            </draw:frame>
            <draw:frame draw:style-name="gr379" draw:text-style-name="P36" draw:layer="layout" svg:width="2.25cm" svg:height="0.569cm" svg:x="77.45cm" svg:y="40.431cm">
              <draw:text-box>
                <text:p><text:span text:style-name="T11">aluCalcR</text:span><text:span text:style-name="T11">es_s</text:span></text:p>
              </draw:text-box>
            </draw:frame>
            <draw:line draw:style-name="gr38" draw:text-style-name="P4" draw:layer="layout" svg:x1="77cm" svg:y1="40.5cm" svg:x2="79.5cm" svg:y2="40.5cm">
              <text:p/>
            </draw:line>
            <draw:frame draw:style-name="gr454" draw:text-style-name="P36" draw:layer="layout" svg:width="1.51cm" svg:height="0.569cm" svg:x="78.2cm" svg:y="40.031cm">
              <draw:text-box>
                <text:p><text:span text:style-name="T11">PCp4_s</text:span></text:p>
              </draw:text-box>
            </draw:frame>
            <draw:frame draw:style-name="gr381" draw:text-style-name="P36" draw:layer="layout" svg:width="1.886cm" svg:height="0.569cm" svg:x="77.814cm" svg:y="39.731cm">
              <draw:text-box>
                <text:p><text:span text:style-name="T11">csr_data_</text:span><text:span text:style-name="T11">s</text:span></text:p>
              </draw:text-box>
            </draw:frame>
          </draw:g>
          <draw:custom-shape draw:style-name="gr564" draw:text-style-name="P39" draw:layer="layout" svg:width="4.5cm" svg:height="2.5cm" svg:x="77cm" svg:y="39.7cm">
            <text:p/>
            <draw:enhanced-geometry svg:viewBox="0 0 21600 21600" draw:type="rectangle" draw:enhanced-path="M 0 0 L 21600 0 21600 21600 0 21600 0 0 Z N"/>
          </draw:custom-shape>
          <draw:frame draw:style-name="gr521" draw:text-style-name="P40" draw:layer="layout" svg:width="2.297cm" svg:height="0.569cm" svg:x="77.503cm" svg:y="41.631cm">
            <draw:text-box>
              <text:p><text:span text:style-name="T12">MUX: </text:span><text:span text:style-name="T12">Resu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561" draw:text-style-name="P36" draw:layer="layout" svg:width="1.412cm" svg:height="0.569cm" svg:x="56.1cm" svg:y="41.331cm">
              <draw:text-box>
                <text:p><text:span text:style-name="T11">jump_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478" draw:text-style-name="P36" draw:layer="layout" svg:width="1.399cm" svg:height="0.569cm" svg:x="55.8cm" svg:y="40.631cm">
              <draw:text-box>
                <text:p><text:span text:style-name="T11">regA_s</text:span></text:p>
              </draw:text-box>
            </draw:frame>
            <draw:line draw:style-name="gr38" draw:text-style-name="P4" draw:layer="layout" svg:x1="57.5cm" svg:y1="40.8cm" svg:x2="58.5cm" svg:y2="40.8cm">
              <text:p/>
            </draw:line>
            <draw:frame draw:style-name="gr513" draw:text-style-name="P36" draw:layer="layout" svg:width="1.95cm" svg:height="0.569cm" svg:x="55.2cm" svg:y="40.232cm">
              <draw:text-box>
                <text:p><text:span text:style-name="T11">iBusAddr</text:span><text:span text:style-name="T11">_s</text:span></text:p>
              </draw:text-box>
            </draw:frame>
            <draw:frame draw:style-name="gr565" draw:text-style-name="P36" draw:layer="layout" svg:width="1.996cm" svg:height="0.569cm" svg:x="57.3cm" svg:y="40.4cm">
              <draw:text-box>
                <text:p><text:span text:style-name="T11">PCorRS1</text:span><text:span text:style-name="T11">_s</text:span></text:p>
              </draw:text-box>
            </draw:frame>
            <draw:custom-shape draw:style-name="gr526" draw:text-style-name="P55" draw:layer="layout" svg:width="1cm" svg:height="1cm" svg:x="59.5cm" svg:y="40.5cm">
              <text:p text:style-name="P48"><text:span text:style-name="T11">+</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471" draw:text-style-name="P36" draw:layer="layout" svg:width="1.747cm" svg:height="0.569cm" svg:x="57.6cm" svg:y="40.731cm">
              <draw:text-box>
                <text:p><text:span text:style-name="T11">immExt_s</text:span></text:p>
              </draw:text-box>
            </draw:frame>
            <draw:line draw:style-name="gr38" draw:text-style-name="P4" draw:layer="layout" svg:x1="60.5cm" svg:y1="41cm" svg:x2="62cm" svg:y2="41cm">
              <text:p/>
            </draw:line>
            <draw:frame draw:style-name="gr469" draw:text-style-name="P36" draw:layer="layout" svg:width="1.446cm" svg:height="0.569cm" svg:x="60.254cm" svg:y="40.6cm">
              <draw:text-box>
                <text:p><text:span text:style-name="T11">PCbr_s</text:span></text:p>
              </draw:text-box>
            </draw:frame>
            <draw:line draw:style-name="gr38" draw:text-style-name="P4" draw:layer="layout" svg:x1="58.5cm" svg:y1="41.2cm" svg:x2="58.5cm" svg:y2="42cm">
              <text:p/>
            </draw:line>
          </draw:g>
          <draw:custom-shape draw:style-name="gr566" draw:text-style-name="P39" draw:layer="layout" svg:width="7cm" svg:height="2cm" svg:x="55cm" svg:y="40cm">
            <text:p/>
            <draw:enhanced-geometry svg:viewBox="0 0 21600 21600" draw:type="rectangle" draw:enhanced-path="M 0 0 L 21600 0 21600 21600 0 21600 0 0 Z N"/>
          </draw:custom-shape>
          <draw:frame draw:style-name="gr567" draw:text-style-name="P40" draw:layer="layout" svg:width="2.043cm" svg:height="0.569cm" svg:x="59.8cm" svg:y="41.4cm">
            <draw:text-box>
              <text:p><text:span text:style-name="T12">PC: </text:span><text:span text:style-name="T12">Branch</text:span></text:p>
            </draw:text-box>
          </draw:frame>
        </draw:g>
        <draw:line draw:style-name="gr38" draw:text-style-name="P4" draw:layer="layout" svg:x1="74cm" svg:y1="40.5cm" svg:x2="77cm" svg:y2="40.5cm">
          <text:p/>
        </draw:line>
        <draw:line draw:style-name="gr38" draw:text-style-name="P4" draw:layer="layout" svg:x1="74cm" svg:y1="40.5cm" svg:x2="74cm" svg:y2="39.8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368"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368"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368"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368"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8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8cm" svg:y1="42.5cm" svg:x2="8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368"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368"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368"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368"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368"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368"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368"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368"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368"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368"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368"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368"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368"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368"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6"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9" draw:text-style-name="P47" draw:layer="layout" svg:width="3.66cm" svg:height="0.569cm" svg:x="23.04cm" svg:y="10.4cm">
          <draw:text-box>
            <text:p><text:span text:style-name="T14">MRET: </text:span><text:span text:style-name="T14">Return </text:span><text:span text:style-name="T14">from IRQ</text:span></text:p>
          </draw:text-box>
        </draw:frame>
        <draw:custom-shape draw:style-name="gr568" draw:text-style-name="P56"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9" draw:text-style-name="P47" draw:layer="layout" svg:width="3.66cm" svg:height="0.569cm" svg:x="30.54cm" svg:y="6.2cm">
          <draw:text-box>
            <text:p><text:span text:style-name="T14">MRET: </text:span><text:span text:style-name="T14">Return </text:span><text:span text:style-name="T14">from IRQ</text:span></text:p>
          </draw:text-box>
        </draw:frame>
        <draw:custom-shape draw:style-name="gr568" draw:text-style-name="P56"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0" draw:text-style-name="P47" draw:layer="layout" svg:width="2.547cm" svg:height="0.569cm" svg:x="22.453cm" svg:y="19.7cm">
          <draw:text-box>
            <text:p><text:span text:style-name="T14">Phase: </text:span><text:span text:style-name="T14">No load</text:span></text:p>
          </draw:text-box>
        </draw:frame>
        <draw:custom-shape draw:style-name="gr568" draw:text-style-name="P56"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1" draw:text-style-name="P47" draw:layer="layout" svg:width="2.25cm" svg:height="0.569cm" svg:x="38.54cm" svg:y="34.301cm">
          <draw:text-box>
            <text:p><text:span text:style-name="T14">TRAP: </text:span><text:span text:style-name="T14">Illegal</text:span></text:p>
          </draw:text-box>
        </draw:frame>
        <draw:custom-shape draw:style-name="gr568" draw:text-style-name="P56"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2" draw:text-style-name="P47" draw:layer="layout" svg:width="2.911cm" svg:height="0.569cm" svg:x="38.541cm" svg:y="33.302cm">
          <draw:text-box>
            <text:p><text:span text:style-name="T14">TRAP: </text:span><text:span text:style-name="T14">Misalign</text:span><text:span text:style-name="T14">ed</text:span></text:p>
          </draw:text-box>
        </draw:frame>
        <draw:custom-shape draw:style-name="gr568" draw:text-style-name="P56"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3" draw:text-style-name="P47" draw:layer="layout" svg:width="2.564cm" svg:height="0.569cm" svg:x="38.542cm" svg:y="29.303cm">
          <draw:text-box>
            <text:p><text:span text:style-name="T14">TRAP: </text:span><text:span text:style-name="T14">Pending</text:span></text:p>
          </draw:text-box>
        </draw:frame>
        <draw:custom-shape draw:style-name="gr568" draw:text-style-name="P56"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1" draw:text-style-name="P47" draw:layer="layout" svg:width="2.25cm" svg:height="0.569cm" svg:x="33.54cm" svg:y="27.303cm">
          <draw:text-box>
            <text:p><text:span text:style-name="T14">TRAP: </text:span><text:span text:style-name="T14">Illegal</text:span></text:p>
          </draw:text-box>
        </draw:frame>
        <draw:custom-shape draw:style-name="gr568" draw:text-style-name="P56"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2" draw:text-style-name="P47" draw:layer="layout" svg:width="2.911cm" svg:height="0.569cm" svg:x="33.541cm" svg:y="26.304cm">
          <draw:text-box>
            <text:p><text:span text:style-name="T14">TRAP: </text:span><text:span text:style-name="T14">Misalign</text:span><text:span text:style-name="T14">ed</text:span></text:p>
          </draw:text-box>
        </draw:frame>
        <draw:custom-shape draw:style-name="gr568" draw:text-style-name="P56"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1" draw:text-style-name="P47" draw:layer="layout" svg:width="2.25cm" svg:height="0.569cm" svg:x="50.541cm" svg:y="56.902cm">
          <draw:text-box>
            <text:p><text:span text:style-name="T14">TRAP: </text:span><text:span text:style-name="T14">Illegal</text:span></text:p>
          </draw:text-box>
        </draw:frame>
        <draw:custom-shape draw:style-name="gr568" draw:text-style-name="P56"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3" draw:text-style-name="P47" draw:layer="layout" svg:width="2.564cm" svg:height="0.569cm" svg:x="63.542cm" svg:y="1.304cm">
          <draw:text-box>
            <text:p><text:span text:style-name="T14">TRAP: </text:span><text:span text:style-name="T14">Pending</text:span></text:p>
          </draw:text-box>
        </draw:frame>
        <draw:custom-shape draw:style-name="gr568" draw:text-style-name="P56"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4" draw:text-style-name="P47" draw:layer="layout" svg:width="2.369cm" svg:height="0.569cm" svg:x="38.541cm" svg:y="32.302cm">
          <draw:text-box>
            <text:p><text:span text:style-name="T14">DMEM: </text:span><text:span text:style-name="T14">Rd/Wr</text:span></text:p>
          </draw:text-box>
        </draw:frame>
        <draw:custom-shape draw:style-name="gr568" draw:text-style-name="P56"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2" draw:text-style-name="P47" draw:layer="layout" svg:width="2.911cm" svg:height="0.569cm" svg:x="69.942cm" svg:y="8.305cm">
          <draw:text-box>
            <text:p><text:span text:style-name="T14">TRAP: </text:span><text:span text:style-name="T14">Misalign</text:span><text:span text:style-name="T14">ed</text:span></text:p>
          </draw:text-box>
        </draw:frame>
        <draw:custom-shape draw:style-name="gr568" draw:text-style-name="P56"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2" draw:text-style-name="P47" draw:layer="layout" svg:width="2.911cm" svg:height="0.569cm" svg:x="64.743cm" svg:y="3.306cm">
          <draw:text-box>
            <text:p><text:span text:style-name="T14">TRAP: </text:span><text:span text:style-name="T14">Misalign</text:span><text:span text:style-name="T14">ed</text:span></text:p>
          </draw:text-box>
        </draw:frame>
        <draw:custom-shape draw:style-name="gr568" draw:text-style-name="P56"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79.542cm" svg:y="1.305cm">
          <draw:text-box>
            <text:p><text:span text:style-name="T14">TRAP: </text:span><text:span text:style-name="T14">Taken</text:span></text:p>
          </draw:text-box>
        </draw:frame>
        <draw:custom-shape draw:style-name="gr568" draw:text-style-name="P56"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0" draw:text-style-name="P47" draw:layer="layout" svg:width="2.547cm" svg:height="0.569cm" svg:x="64.953cm" svg:y="4.2cm">
          <draw:text-box>
            <text:p><text:span text:style-name="T14">Phase: </text:span><text:span text:style-name="T14">No load</text:span></text:p>
          </draw:text-box>
        </draw:frame>
        <draw:custom-shape draw:style-name="gr568" draw:text-style-name="P56"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1" draw:text-style-name="P47" draw:layer="layout" svg:width="2.25cm" svg:height="0.569cm" svg:x="64.74cm" svg:y="5.3cm">
          <draw:text-box>
            <text:p><text:span text:style-name="T14">TRAP: </text:span><text:span text:style-name="T14">Illegal</text:span></text:p>
          </draw:text-box>
        </draw:frame>
        <draw:custom-shape draw:style-name="gr568" draw:text-style-name="P56"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6" draw:text-style-name="P47" draw:layer="layout" svg:width="3.757cm" svg:height="0.569cm" svg:x="64.74cm" svg:y="6.101cm">
          <draw:text-box>
            <text:p><text:span text:style-name="T14">MRET: !</text:span><text:span text:style-name="T14">Return </text:span><text:span text:style-name="T14">from IRQ</text:span></text:p>
          </draw:text-box>
        </draw:frame>
        <draw:custom-shape draw:style-name="gr568" draw:text-style-name="P56"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9" draw:text-style-name="P47" draw:layer="layout" svg:width="3.66cm" svg:height="0.569cm" svg:x="4.5cm" svg:y="45.2cm">
          <draw:text-box>
            <text:p><text:span text:style-name="T14">MRET: </text:span><text:span text:style-name="T14">Return </text:span><text:span text:style-name="T14">from IRQ</text:span></text:p>
          </draw:text-box>
        </draw:frame>
        <draw:custom-shape draw:style-name="gr568" draw:text-style-name="P56"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9" draw:text-style-name="P47" draw:layer="layout" svg:width="3.66cm" svg:height="0.569cm" svg:x="22.54cm" svg:y="44.2cm">
          <draw:text-box>
            <text:p><text:span text:style-name="T14">MRET: </text:span><text:span text:style-name="T14">Return </text:span><text:span text:style-name="T14">from IRQ</text:span></text:p>
          </draw:text-box>
        </draw:frame>
        <draw:custom-shape draw:style-name="gr568" draw:text-style-name="P56"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22.54cm" svg:y="45.3cm">
          <draw:text-box>
            <text:p><text:span text:style-name="T14">TRAP: </text:span><text:span text:style-name="T14">Taken</text:span></text:p>
          </draw:text-box>
        </draw:frame>
        <draw:custom-shape draw:style-name="gr568" draw:text-style-name="P56"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38.541cm" svg:y="31.301cm">
          <draw:text-box>
            <text:p><text:span text:style-name="T14">TRAP: </text:span><text:span text:style-name="T14">Taken</text:span></text:p>
          </draw:text-box>
        </draw:frame>
        <draw:custom-shape draw:style-name="gr568" draw:text-style-name="P56"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33.542cm" svg:y="25.302cm">
          <draw:text-box>
            <text:p><text:span text:style-name="T14">TRAP: </text:span><text:span text:style-name="T14">Taken</text:span></text:p>
          </draw:text-box>
        </draw:frame>
        <draw:custom-shape draw:style-name="gr380" draw:text-style-name="P37"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6"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30.543cm" svg:y="5.303cm">
          <draw:text-box>
            <text:p><text:span text:style-name="T14">TRAP: </text:span><text:span text:style-name="T14">Taken</text:span></text:p>
          </draw:text-box>
        </draw:frame>
        <draw:custom-shape draw:style-name="gr380" draw:text-style-name="P37"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6"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5" draw:text-style-name="P47" draw:layer="layout" svg:width="2.255cm" svg:height="0.569cm" svg:x="4.543cm" svg:y="46.303cm">
          <draw:text-box>
            <text:p><text:span text:style-name="T14">TRAP: </text:span><text:span text:style-name="T14">Taken</text:span></text:p>
          </draw:text-box>
        </draw:frame>
        <draw:custom-shape draw:style-name="gr568" draw:text-style-name="P56"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0" draw:text-style-name="P47" draw:layer="layout" svg:width="2.547cm" svg:height="0.569cm" svg:x="39.253cm" svg:y="49.2cm">
          <draw:text-box>
            <text:p><text:span text:style-name="T14">Phase: </text:span><text:span text:style-name="T14">No load</text:span></text:p>
          </draw:text-box>
        </draw:frame>
        <draw:custom-shape draw:style-name="gr568" draw:text-style-name="P56"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7" draw:text-style-name="P47" draw:layer="layout" svg:width="2.348cm" svg:height="0.569cm" svg:x="39.04cm" svg:y="48.3cm">
          <draw:text-box>
            <text:p><text:span text:style-name="T14">TRAP: !</text:span><text:span text:style-name="T14">Taken</text:span></text:p>
          </draw:text-box>
        </draw:frame>
        <draw:custom-shape draw:style-name="gr568" draw:text-style-name="P56"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4" draw:text-style-name="P47" draw:layer="layout" svg:width="2.369cm" svg:height="0.569cm" svg:x="50.54cm" svg:y="55.8cm">
          <draw:text-box>
            <text:p><text:span text:style-name="T14">DMEM: </text:span><text:span text:style-name="T14">Rd/Wr</text:span></text:p>
          </draw:text-box>
        </draw:frame>
        <draw:frame draw:style-name="gr578" draw:text-style-name="P47" draw:layer="layout" svg:width="4.439cm" svg:height="0.569cm" svg:x="13.2cm" svg:y="42.5cm">
          <draw:text-box>
            <text:p><text:span text:style-name="T14">fetch0: </text:span><text:span text:style-name="T14">set </text:span><text:span text:style-name="T14">address </text:span><text:span text:style-name="T14">for I-Mem</text:span></text:p>
          </draw:text-box>
        </draw:frame>
        <draw:frame draw:style-name="gr579" draw:text-style-name="P47" draw:layer="layout" svg:width="4.202cm" svg:height="0.569cm" svg:x="31.9cm" svg:y="48cm">
          <draw:text-box>
            <text:p><text:span text:style-name="T14">fetch1: </text:span><text:span text:style-name="T14">get data </text:span><text:span text:style-name="T14">from I-</text:span><text:span text:style-name="T14">Mem</text:span></text:p>
          </draw:text-box>
        </draw:frame>
        <draw:frame draw:style-name="gr580" draw:text-style-name="P47" draw:layer="layout" svg:width="3.465cm" svg:height="0.887cm" svg:x="66.535cm" svg:y="47.213cm">
          <draw:text-box>
            <text:p><text:span text:style-name="T14">exec: </text:span><text:span text:style-name="T14">execute </text:span><text:span text:style-name="T14">&amp; write </text:span></text:p>
            <text:p><text:span text:style-name="T14">data to </text:span><text:span text:style-name="T14">D-Mem</text:span></text:p>
          </draw:text-box>
        </draw:frame>
        <draw:frame draw:style-name="gr581" draw:text-style-name="P47" draw:layer="layout" svg:width="2.217cm" svg:height="0.569cm" svg:x="16.4cm" svg:y="18.431cm">
          <draw:text-box>
            <text:p><text:span text:style-name="T14">No load </text:span><text:span text:style-name="T14">path</text:span></text:p>
          </draw:text-box>
        </draw:frame>
        <draw:frame draw:style-name="gr582" draw:text-style-name="P47" draw:layer="layout" svg:width="5.451cm" svg:height="0.569cm" svg:x="12.8cm" svg:y="20.531cm">
          <draw:text-box>
            <text:p><text:span text:style-name="T14">Load </text:span><text:span text:style-name="T14">path: </text:span><text:span text:style-name="T14">load is </text:span><text:span text:style-name="T14">over, </text:span><text:span text:style-name="T14">now </text:span><text:span text:style-name="T14">execute</text:span></text:p>
          </draw:text-box>
        </draw:frame>
        <draw:custom-shape draw:style-name="gr568" draw:text-style-name="P56" draw:layer="layout" svg:width="2cm" svg:height="0.4cm" svg:x="22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3" draw:text-style-name="P47" draw:layer="layout" svg:width="3.304cm" svg:height="0.569cm" svg:x="21.5cm" svg:y="48.3cm">
          <draw:text-box>
            <text:p><text:span text:style-name="T14">Instr: </text:span><text:span text:style-name="T14">Before </text:span><text:span text:style-name="T14">register</text:span></text:p>
          </draw:text-box>
        </draw:frame>
        <draw:custom-shape draw:style-name="gr568" draw:text-style-name="P56"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4" draw:text-style-name="P47" draw:layer="layout" svg:width="2.424cm" svg:height="0.569cm" svg:x="34.5cm" svg:y="44.3cm">
          <draw:text-box>
            <text:p><text:span text:style-name="T14">Instr: </text:span><text:span text:style-name="T14">Register</text:span></text:p>
          </draw:text-box>
        </draw:frame>
        <draw:custom-shape draw:style-name="gr568" draw:text-style-name="P56"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3" draw:text-style-name="P47" draw:layer="layout" svg:width="3.304cm" svg:height="0.569cm" svg:x="1.502cm" svg:y="11.3cm">
          <draw:text-box>
            <text:p><text:span text:style-name="T14">Instr: </text:span><text:span text:style-name="T14">Before </text:span><text:span text:style-name="T14">register</text:span></text:p>
          </draw:text-box>
        </draw:frame>
        <draw:custom-shape draw:style-name="gr568" draw:text-style-name="P56"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4" draw:text-style-name="P47" draw:layer="layout" svg:width="2.424cm" svg:height="0.569cm" svg:x="1.502cm" svg:y="9.3cm">
          <draw:text-box>
            <text:p><text:span text:style-name="T14">Instr: </text:span><text:span text:style-name="T14">Register</text:span></text:p>
          </draw:text-box>
        </draw:frame>
        <draw:frame draw:style-name="gr585" draw:text-style-name="P57" draw:layer="layout" svg:width="4.63cm" svg:height="0.965cm" svg:x="11.2cm" svg:y="41.4cm">
          <draw:text-box>
            <text:p><text:span text:style-name="T18">When a </text:span><text:span text:style-name="T18">„branch </text:span><text:span text:style-name="T18">taken“ has </text:span><text:span text:style-name="T18">been </text:span><text:span text:style-name="T18">detected,, </text:span></text:p>
            <text:p><text:span text:style-name="T18">the new </text:span><text:span text:style-name="T18">address will </text:span><text:span text:style-name="T18">be Pcbr </text:span><text:span text:style-name="T18">otherwise the </text:span></text:p>
            <text:p><text:span text:style-name="T18">next </text:span><text:span text:style-name="T18">instruction in </text:span><text:span text:style-name="T18">the I-Mem will </text:span><text:span text:style-name="T18">be taken.</text:span></text:p>
          </draw:text-box>
        </draw:frame>
        <draw:frame draw:style-name="gr586" draw:text-style-name="P57" draw:layer="layout" svg:width="4.63cm" svg:height="0.965cm" svg:x="12.999cm" svg:y="43.335cm">
          <draw:text-box>
            <text:p><text:span text:style-name="T18">When a </text:span><text:span text:style-name="T18">„return from </text:span><text:span text:style-name="T18">interrupt“ is </text:span><text:span text:style-name="T18">registered, </text:span></text:p>
            <text:p><text:span text:style-name="T18">the new </text:span><text:span text:style-name="T18">address will </text:span><text:span text:style-name="T18">be the return </text:span><text:span text:style-name="T18">address, </text:span></text:p>
            <text:p><text:span text:style-name="T18">which was </text:span><text:span text:style-name="T18">stored in </text:span><text:span text:style-name="T18">register </text:span><text:span text:style-name="T18">MEPC.</text:span></text:p>
          </draw:text-box>
        </draw:frame>
        <draw:frame draw:style-name="gr587" draw:text-style-name="P57" draw:layer="layout" svg:width="4.392cm" svg:height="0.965cm" svg:x="13.8cm" svg:y="44.7cm">
          <draw:text-box>
            <text:p><text:span text:style-name="T18">When a „trap </text:span><text:span text:style-name="T18">taken“ is </text:span><text:span text:style-name="T18">registered, </text:span></text:p>
            <text:p><text:span text:style-name="T18">the new </text:span><text:span text:style-name="T18">address will </text:span><text:span text:style-name="T18">be the ISR </text:span><text:span text:style-name="T18">address, </text:span></text:p>
            <text:p><text:span text:style-name="T18">which was </text:span><text:span text:style-name="T18">stored in </text:span><text:span text:style-name="T18">register </text:span><text:span text:style-name="T18">MTVEC.</text:span></text:p>
          </draw:text-box>
        </draw:frame>
        <draw:g draw:style-name="gr1">
          <draw:custom-shape draw:style-name="gr165" draw:text-style-name="P14" draw:layer="layout" svg:width="0.4cm" svg:height="0.4cm" svg:x="20.5cm" svg:y="48.1cm">
            <text:p/>
            <draw:enhanced-geometry svg:viewBox="0 0 21600 21600" draw:type="rectangle" draw:enhanced-path="M 0 0 L 21600 0 21600 21600 0 21600 0 0 Z N"/>
          </draw:custom-shape>
          <draw:line draw:style-name="gr38" draw:text-style-name="P4" draw:layer="layout" svg:x1="20.5cm" svg:y1="48.1cm" svg:x2="20.9cm" svg:y2="48.5cm">
            <text:p/>
          </draw:line>
          <draw:line draw:style-name="gr38" draw:text-style-name="P4" draw:layer="layout" svg:x1="20.5cm" svg:y1="48.5cm" svg:x2="20.9cm" svg:y2="48.1cm">
            <text:p/>
          </draw:line>
        </draw:g>
        <draw:frame draw:style-name="gr513" draw:text-style-name="P36" draw:layer="layout" svg:width="1.967cm" svg:height="0.569cm" svg:x="19.033cm" svg:y="47.632cm">
          <draw:text-box>
            <text:p><text:span text:style-name="T11">iBusAddr</text:span><text:span text:style-name="T11">_o</text:span></text:p>
          </draw:text-box>
        </draw:frame>
        <draw:frame draw:style-name="gr393" draw:text-style-name="P36" draw:layer="layout" svg:width="2.314cm" svg:height="0.569cm" svg:x="22.986cm" svg:y="47.031cm">
          <draw:text-box>
            <text:p><text:span text:style-name="T11">iBusData</text:span><text:span text:style-name="T11">Rd_i</text:span></text:p>
          </draw:text-box>
        </draw:frame>
        <draw:g draw:style-name="gr1">
          <draw:custom-shape draw:style-name="gr165" draw:text-style-name="P14" draw:layer="layout" svg:width="0.4cm" svg:height="0.4cm" svg:x="22.8cm" svg:y="47.5cm">
            <text:p/>
            <draw:enhanced-geometry svg:viewBox="0 0 21600 21600" draw:type="rectangle" draw:enhanced-path="M 0 0 L 21600 0 21600 21600 0 21600 0 0 Z N"/>
          </draw:custom-shape>
          <draw:line draw:style-name="gr38" draw:text-style-name="P4" draw:layer="layout" svg:x1="22.8cm" svg:y1="47.5cm" svg:x2="23.2cm" svg:y2="47.9cm">
            <text:p/>
          </draw:line>
          <draw:line draw:style-name="gr38" draw:text-style-name="P4" draw:layer="layout" svg:x1="22.8cm" svg:y1="47.9cm" svg:x2="23.2cm" svg:y2="47.5cm">
            <text:p/>
          </draw:line>
        </draw:g>
        <draw:custom-shape draw:style-name="gr588" draw:text-style-name="P4" draw:layer="layout" svg:width="2.3cm" svg:height="3.7cm" svg:x="20.7cm" svg:y="46.7cm">
          <text:p/>
          <draw:enhanced-geometry svg:viewBox="0 0 21600 21600" draw:type="rectangle" draw:enhanced-path="M 0 0 L 21600 0 21600 21600 0 21600 0 0 Z N"/>
        </draw:custom-shape>
        <draw:frame draw:style-name="gr589" draw:text-style-name="P40" draw:layer="layout" svg:width="1.967cm" svg:height="0.887cm" svg:x="20.833cm" svg:y="46.8cm">
          <draw:text-box>
            <text:p><text:span text:style-name="T12">I-Mem:</text:span></text:p>
            <text:p><text:span text:style-name="T12">- on Top</text:span></text:p>
          </draw:text-box>
        </draw:frame>
        <draw:g draw:style-name="gr1">
          <draw:custom-shape draw:style-name="gr165" draw:text-style-name="P14" draw:layer="layout" svg:width="0.4cm" svg:height="0.4cm" svg:x="65.8cm" svg:y="45.3cm">
            <text:p/>
            <draw:enhanced-geometry svg:viewBox="0 0 21600 21600" draw:type="rectangle" draw:enhanced-path="M 0 0 L 21600 0 21600 21600 0 21600 0 0 Z N"/>
          </draw:custom-shape>
          <draw:line draw:style-name="gr38" draw:text-style-name="P4" draw:layer="layout" svg:x1="65.8cm" svg:y1="45.3cm" svg:x2="66.2cm" svg:y2="45.7cm">
            <text:p/>
          </draw:line>
          <draw:line draw:style-name="gr38" draw:text-style-name="P4" draw:layer="layout" svg:x1="65.8cm" svg:y1="45.7cm" svg:x2="66.2cm" svg:y2="45.3cm">
            <text:p/>
          </draw:line>
        </draw:g>
        <draw:frame draw:style-name="gr513" draw:text-style-name="P36" draw:layer="layout" svg:width="2.06cm" svg:height="0.569cm" svg:x="63.9cm" svg:y="44.931cm">
          <draw:text-box>
            <text:p><text:span text:style-name="T11">dBusAddr</text:span><text:span text:style-name="T11">_o</text:span></text:p>
          </draw:text-box>
        </draw:frame>
        <draw:frame draw:style-name="gr393" draw:text-style-name="P36" draw:layer="layout" svg:width="2.331cm" svg:height="0.569cm" svg:x="69.969cm" svg:y="45.831cm">
          <draw:text-box>
            <text:p><text:span text:style-name="T11">dBusData</text:span><text:span text:style-name="T11">Rd_i</text:span></text:p>
          </draw:text-box>
        </draw:frame>
        <draw:g draw:style-name="gr1">
          <draw:custom-shape draw:style-name="gr165" draw:text-style-name="P14" draw:layer="layout" svg:width="0.4cm" svg:height="0.4cm" svg:x="69.783cm" svg:y="46.3cm">
            <text:p/>
            <draw:enhanced-geometry svg:viewBox="0 0 21600 21600" draw:type="rectangle" draw:enhanced-path="M 0 0 L 21600 0 21600 21600 0 21600 0 0 Z N"/>
          </draw:custom-shape>
          <draw:line draw:style-name="gr38" draw:text-style-name="P4" draw:layer="layout" svg:x1="69.783cm" svg:y1="46.3cm" svg:x2="70.183cm" svg:y2="46.7cm">
            <text:p/>
          </draw:line>
          <draw:line draw:style-name="gr38" draw:text-style-name="P4" draw:layer="layout" svg:x1="69.783cm" svg:y1="46.7cm" svg:x2="70.183cm" svg:y2="46.3cm">
            <text:p/>
          </draw:line>
        </draw:g>
        <draw:frame draw:style-name="gr393" draw:text-style-name="P36" draw:layer="layout" svg:width="2.42cm" svg:height="0.569cm" svg:x="63.58cm" svg:y="45.931cm">
          <draw:text-box>
            <text:p><text:span text:style-name="T11">dBusData</text:span><text:span text:style-name="T11">Wr_o</text:span></text:p>
          </draw:text-box>
        </draw:frame>
        <draw:g draw:style-name="gr1">
          <draw:custom-shape draw:style-name="gr165" draw:text-style-name="P14" draw:layer="layout" svg:width="0.4cm" svg:height="0.4cm" svg:x="65.8cm" svg:y="47.3cm">
            <text:p/>
            <draw:enhanced-geometry svg:viewBox="0 0 21600 21600" draw:type="rectangle" draw:enhanced-path="M 0 0 L 21600 0 21600 21600 0 21600 0 0 Z N"/>
          </draw:custom-shape>
          <draw:line draw:style-name="gr38" draw:text-style-name="P4" draw:layer="layout" svg:x1="65.8cm" svg:y1="47.3cm" svg:x2="66.2cm" svg:y2="47.7cm">
            <text:p/>
          </draw:line>
          <draw:line draw:style-name="gr38" draw:text-style-name="P4" draw:layer="layout" svg:x1="65.8cm" svg:y1="47.7cm" svg:x2="66.2cm" svg:y2="47.3cm">
            <text:p/>
          </draw:line>
        </draw:g>
        <draw:frame draw:style-name="gr513" draw:text-style-name="P36" draw:layer="layout" svg:width="1.95cm" svg:height="0.569cm" svg:x="64.1cm" svg:y="46.932cm">
          <draw:text-box>
            <text:p><text:span text:style-name="T11">dBusWe_</text:span><text:span text:style-name="T11">o</text:span></text:p>
          </draw:text-box>
        </draw:frame>
        <draw:line draw:style-name="gr38" draw:text-style-name="P4" draw:layer="layout" svg:x1="62.5cm" svg:y1="46.5cm" svg:x2="66cm" svg:y2="46.5cm">
          <text:p/>
        </draw:line>
        <draw:g draw:style-name="gr1">
          <draw:custom-shape draw:style-name="gr165" draw:text-style-name="P14" draw:layer="layout" svg:width="0.4cm" svg:height="0.4cm" svg:x="65.8cm" svg:y="46.3cm">
            <text:p/>
            <draw:enhanced-geometry svg:viewBox="0 0 21600 21600" draw:type="rectangle" draw:enhanced-path="M 0 0 L 21600 0 21600 21600 0 21600 0 0 Z N"/>
          </draw:custom-shape>
          <draw:line draw:style-name="gr38" draw:text-style-name="P4" draw:layer="layout" svg:x1="65.8cm" svg:y1="46.3cm" svg:x2="66.2cm" svg:y2="46.7cm">
            <text:p/>
          </draw:line>
          <draw:line draw:style-name="gr38" draw:text-style-name="P4" draw:layer="layout" svg:x1="65.8cm" svg:y1="46.7cm" svg:x2="66.2cm" svg:y2="46.3cm">
            <text:p/>
          </draw:line>
        </draw:g>
        <draw:frame draw:style-name="gr590" draw:text-style-name="P53" draw:layer="layout" svg:width="4.308cm" svg:height="0.57cm" svg:x="59.9cm" svg:y="47cm">
          <draw:text-box>
            <text:p><text:span text:style-name="T11">dMemWr</text:span><text:span text:style-name="T11">_s &amp;&amp; </text:span><text:span text:style-name="T13">exec_pha</text:span><text:span text:style-name="T13">se_s</text:span></text:p>
          </draw:text-box>
        </draw:frame>
        <draw:custom-shape draw:style-name="gr591" draw:text-style-name="P4" draw:layer="layout" svg:width="4cm" svg:height="3.7cm" svg:x="66cm" svg:y="45cm">
          <text:p/>
          <draw:enhanced-geometry svg:viewBox="0 0 21600 21600" draw:type="rectangle" draw:enhanced-path="M 0 0 L 21600 0 21600 21600 0 21600 0 0 Z N"/>
        </draw:custom-shape>
        <draw:frame draw:style-name="gr589" draw:text-style-name="P40" draw:layer="layout" svg:width="1.967cm" svg:height="0.887cm" svg:x="66.133cm" svg:y="45.1cm">
          <draw:text-box>
            <text:p><text:span text:style-name="T12">D-Mem:</text:span></text:p>
            <text:p><text:span text:style-name="T12">- on Top</text:span></text:p>
          </draw:text-box>
        </draw:frame>
        <draw:line draw:style-name="gr38" draw:text-style-name="P4" draw:layer="layout" svg:x1="70cm" svg:y1="46.5cm" svg:x2="76cm" svg:y2="46.5cm">
          <text:p/>
        </draw:line>
      </draw:page>
      <draw:page draw:name="page11" draw:style-name="dp1" draw:master-page-name="Standard">
        <draw:line draw:style-name="gr592" draw:text-style-name="P4" draw:layer="layout" svg:x1="22.5cm" svg:y1="15.9cm" svg:x2="23.5cm" svg:y2="15.9cm">
          <text:p/>
        </draw:line>
        <draw:line draw:style-name="gr593" draw:text-style-name="P4" draw:layer="layout" svg:x1="14.4cm" svg:y1="19.6cm" svg:x2="14.4cm" svg:y2="18.3cm">
          <text:p/>
        </draw:line>
        <draw:line draw:style-name="gr592" draw:text-style-name="P4" draw:layer="layout" svg:x1="13cm" svg:y1="20cm" svg:x2="16.5cm" svg:y2="20cm">
          <text:p/>
        </draw:line>
        <draw:line draw:style-name="gr593" draw:text-style-name="P4" draw:layer="layout" svg:x1="33cm" svg:y1="20.6cm" svg:x2="33cm" svg:y2="17.8cm">
          <text:p/>
        </draw:line>
        <draw:line draw:style-name="gr593" draw:text-style-name="P4" draw:layer="layout" svg:x1="33cm" svg:y1="15cm" svg:x2="33cm" svg:y2="15.8cm">
          <text:p/>
        </draw:line>
        <draw:line draw:style-name="gr594" draw:text-style-name="P4" draw:layer="layout" svg:x1="30.5cm" svg:y1="16.4cm" svg:x2="32cm" svg:y2="16.4cm">
          <text:p/>
        </draw:line>
        <draw:line draw:style-name="gr592" draw:text-style-name="P4" draw:layer="layout" svg:x1="25cm" svg:y1="17cm" svg:x2="27cm" svg:y2="17cm">
          <text:p/>
        </draw:line>
        <draw:line draw:style-name="gr595" draw:text-style-name="P4" draw:layer="layout" svg:x1="28cm" svg:y1="17cm" svg:x2="30cm" svg:y2="17cm">
          <text:p/>
        </draw:line>
        <draw:line draw:style-name="gr596" draw:text-style-name="P4" draw:layer="layout" svg:x1="19cm" svg:y1="17.7cm" svg:x2="21.6cm" svg:y2="17.7cm">
          <text:p/>
        </draw:line>
        <draw:line draw:style-name="gr595" draw:text-style-name="P4" draw:layer="layout" svg:x1="21cm" svg:y1="20cm" svg:x2="21cm" svg:y2="12.5cm">
          <text:p/>
        </draw:line>
        <draw:line draw:style-name="gr595" draw:text-style-name="P4" draw:layer="layout" svg:x1="21cm" svg:y1="18.3cm" svg:x2="21.6cm" svg:y2="18.3cm">
          <text:p/>
        </draw:line>
        <draw:custom-shape draw:style-name="gr368"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0.5cm" svg:y1="17.7cm" svg:x2="20.5cm" svg:y2="19cm">
          <text:p/>
        </draw:line>
        <draw:line draw:style-name="gr593" draw:text-style-name="P4" draw:layer="layout" svg:x1="37.2cm" svg:y1="19cm" svg:x2="37.2cm" svg:y2="17.4cm">
          <text:p/>
        </draw:line>
        <draw:custom-shape draw:style-name="gr368"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30cm" svg:y1="17cm" svg:x2="30cm" svg:y2="21cm">
          <text:p/>
        </draw:line>
        <draw:line draw:style-name="gr595" draw:text-style-name="P4" draw:layer="layout" svg:x1="36cm" svg:y1="21cm" svg:x2="36.4cm" svg:y2="21cm">
          <text:p/>
        </draw:line>
        <draw:line draw:style-name="gr595" draw:text-style-name="P4" draw:layer="layout" svg:x1="36.4cm" svg:y1="21cm" svg:x2="36.4cm" svg:y2="17.3cm">
          <text:p/>
        </draw:line>
        <draw:line draw:style-name="gr597" draw:text-style-name="P4" draw:layer="layout" svg:x1="13cm" svg:y1="16.2cm" svg:x2="13.512cm" svg:y2="16.2cm">
          <text:p/>
        </draw:line>
        <draw:line draw:style-name="gr598" draw:text-style-name="P4" draw:layer="layout" svg:x1="13cm" svg:y1="8cm" svg:x2="37.5cm" svg:y2="8cm">
          <text:p/>
        </draw:line>
        <draw:line draw:style-name="gr598" draw:text-style-name="P4" draw:layer="layout" svg:x1="13cm" svg:y1="8cm" svg:x2="13cm" svg:y2="16.2cm">
          <text:p/>
        </draw:line>
        <draw:line draw:style-name="gr598" draw:text-style-name="P4" draw:layer="layout" svg:x1="37.5cm" svg:y1="17cm" svg:x2="37.5cm" svg:y2="8cm">
          <text:p/>
        </draw:line>
        <draw:line draw:style-name="gr592" draw:text-style-name="P4" draw:layer="layout" svg:x1="22.5cm" svg:y1="12.5cm" svg:x2="24cm" svg:y2="12.5cm">
          <text:p/>
        </draw:line>
        <draw:line draw:style-name="gr594" draw:text-style-name="P4" draw:layer="layout" svg:x1="9.5cm" svg:y1="10.5cm" svg:x2="18cm" svg:y2="10.5cm">
          <text:p/>
        </draw:line>
        <draw:line draw:style-name="gr594" draw:text-style-name="P4" draw:layer="layout" svg:x1="4.5cm" svg:y1="11.5cm" svg:x2="6cm" svg:y2="11.5cm">
          <text:p/>
        </draw:line>
        <draw:line draw:style-name="gr592" draw:text-style-name="P4" draw:layer="layout" svg:x1="5cm" svg:y1="10.9cm" svg:x2="6cm" svg:y2="10.9cm">
          <text:p/>
        </draw:line>
        <draw:frame draw:style-name="gr599" draw:text-style-name="P34" draw:layer="layout" svg:width="0.855cm" svg:height="0.962cm" svg:x="4.4cm" svg:y="10.4cm">
          <draw:text-box>
            <text:p><text:span text:style-name="T9">4</text:span></text:p>
          </draw:text-box>
        </draw:frame>
        <draw:line draw:style-name="gr600" draw:text-style-name="P4" draw:layer="layout" svg:x1="4.5cm" svg:y1="12.5cm" svg:x2="8cm" svg:y2="12.5cm">
          <text:p/>
        </draw:line>
        <draw:line draw:style-name="gr600" draw:text-style-name="P4" draw:layer="layout" svg:x1="8cm" svg:y1="12.5cm" svg:x2="8cm" svg:y2="10.5cm">
          <text:p/>
        </draw:line>
        <draw:custom-shape draw:style-name="gr601" draw:text-style-name="P58"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0" draw:text-style-name="P4" draw:layer="layout" svg:x1="2cm" svg:y1="8cm" svg:x2="5.9cm" svg:y2="8cm">
          <text:p/>
        </draw:line>
        <draw:line draw:style-name="gr600" draw:text-style-name="P4" draw:layer="layout" svg:x1="26cm" svg:y1="11.5cm" svg:x2="26cm" svg:y2="7.7cm">
          <text:p/>
        </draw:line>
        <draw:line draw:style-name="gr602" draw:text-style-name="P4" draw:layer="layout" svg:x1="7.5cm" svg:y1="11.2cm" svg:x2="7.5cm" svg:y2="8.3cm">
          <text:p/>
        </draw:line>
        <draw:line draw:style-name="gr600" draw:text-style-name="P4" draw:layer="layout" svg:x1="6.975cm" svg:y1="11.201cm" svg:x2="7.5cm" svg:y2="11.2cm">
          <text:p/>
        </draw:line>
        <draw:line draw:style-name="gr600" draw:text-style-name="P4" draw:layer="layout" svg:x1="6.4cm" svg:y1="8.3cm" svg:x2="7.5cm" svg:y2="8.3cm">
          <text:p/>
        </draw:line>
        <draw:line draw:style-name="gr600" draw:text-style-name="P4" draw:layer="layout" svg:x1="6.4cm" svg:y1="7.7cm" svg:x2="26cm" svg:y2="7.7cm">
          <text:p/>
        </draw:line>
        <draw:line draw:style-name="gr594" draw:text-style-name="P4" draw:layer="layout" svg:x1="4cm" svg:y1="17.4cm" svg:x2="5cm" svg:y2="17.4cm">
          <text:p/>
        </draw:line>
        <draw:line draw:style-name="gr592" draw:text-style-name="P4" draw:layer="layout" svg:x1="7.5cm" svg:y1="17cm" svg:x2="8.5cm" svg:y2="17cm">
          <text:p/>
        </draw:line>
        <draw:custom-shape draw:style-name="gr60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1" draw:text-style-name="P58"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2cm" svg:y1="17.4cm" svg:x2="3.5cm" svg:y2="17.4cm">
          <text:p/>
        </draw:line>
        <draw:line draw:style-name="gr595" draw:text-style-name="P4" draw:layer="layout" svg:x1="10cm" svg:y1="17cm" svg:x2="10cm" svg:y2="20cm">
          <text:p/>
        </draw:line>
        <draw:frame draw:style-name="gr604" draw:text-style-name="P59" draw:layer="layout" svg:width="2.06cm" svg:height="0.725cm" svg:x="4.84cm" svg:y="16.6cm">
          <draw:text-box>
            <text:p><text:span text:style-name="T19">Addre</text:span><text:span text:style-name="T19">ss</text:span></text:p>
          </draw:text-box>
        </draw:frame>
        <draw:frame draw:style-name="gr605" draw:text-style-name="P59" draw:layer="layout" svg:width="1.42cm" svg:height="0.725cm" svg:x="7.3cm" svg:y="16.9cm">
          <draw:text-box>
            <text:p><text:span text:style-name="T19">Instr.</text:span></text:p>
          </draw:text-box>
        </draw:frame>
        <draw:line draw:style-name="gr600" draw:text-style-name="P4" draw:layer="layout" svg:x1="2cm" svg:y1="8cm" svg:x2="2cm" svg:y2="17.4cm">
          <text:p/>
        </draw:line>
        <draw:line draw:style-name="gr602" draw:text-style-name="P4" draw:layer="layout" svg:x1="4.5cm" svg:y1="17.4cm" svg:x2="4.5cm" svg:y2="11.5cm">
          <text:p/>
        </draw:line>
        <draw:line draw:style-name="gr595" draw:text-style-name="P4" draw:layer="layout" svg:x1="10cm" svg:y1="20cm" svg:x2="13cm" svg:y2="20cm">
          <text:p/>
        </draw:line>
        <draw:line draw:style-name="gr594" draw:text-style-name="P4" draw:layer="layout" svg:x1="10.5cm" svg:y1="16.8cm" svg:x2="13.512cm" svg:y2="16.8cm">
          <text:p/>
        </draw:line>
        <draw:line draw:style-name="gr594" draw:text-style-name="P4" draw:layer="layout" svg:x1="10.1cm" svg:y1="16.5cm" svg:x2="13.512cm" svg:y2="16.5cm">
          <text:p/>
        </draw:line>
        <draw:custom-shape draw:style-name="gr606" draw:text-style-name="P61" draw:layer="layout" svg:width="1cm" svg:height="1.6cm" svg:x="21.5cm" svg:y="11.7cm">
          <text:p text:style-name="P60"><text:span text:style-name="T19">Shift</text:span></text:p>
          <text:p text:style-name="P60"><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2" draw:text-style-name="P4" draw:layer="layout" svg:x1="21cm" svg:y1="12.5cm" svg:x2="21.5cm" svg:y2="12.5cm">
          <text:p/>
        </draw:line>
        <draw:frame draw:style-name="gr607" draw:text-style-name="P59" draw:layer="layout" svg:width="3.787cm" svg:height="0.725cm" svg:x="10.2cm" svg:y="15.9cm">
          <draw:text-box>
            <text:p><text:span text:style-name="T19">Instr.</text:span><text:span text:style-name="T19">[19-15]</text:span></text:p>
          </draw:text-box>
        </draw:frame>
        <draw:frame draw:style-name="gr607" draw:text-style-name="P59" draw:layer="layout" svg:width="3.787cm" svg:height="0.725cm" svg:x="10.2cm" svg:y="16.4cm">
          <draw:text-box>
            <text:p><text:span text:style-name="T19">Instr.</text:span><text:span text:style-name="T19">[24-20]</text:span></text:p>
          </draw:text-box>
        </draw:frame>
        <draw:frame draw:style-name="gr608" draw:text-style-name="P59" draw:layer="layout" svg:width="8.545cm" svg:height="0.725cm" svg:x="28.8cm" svg:y="21.975cm">
          <draw:text-box>
            <text:p><text:span text:style-name="T19">Regist</text:span><text:span text:style-name="T19">er </text:span><text:span text:style-name="T19">addres</text:span><text:span text:style-name="T19">s: </text:span><text:span text:style-name="T19">delaye</text:span><text:span text:style-name="T19">d </text:span><text:span text:style-name="T19">instruc</text:span><text:span text:style-name="T19">tion[11</text:span><text:span text:style-name="T19">-7]</text:span></text:p>
          </draw:text-box>
        </draw:frame>
        <draw:line draw:style-name="gr609" draw:text-style-name="P38" draw:layer="layout" svg:x1="10.704cm" svg:y1="19.806cm" svg:x2="11.104cm" svg:y2="20.206cm">
          <text:p/>
        </draw:line>
        <draw:frame draw:style-name="gr610" draw:text-style-name="P59" draw:layer="layout" svg:width="0.976cm" svg:height="0.725cm" svg:x="10.3cm" svg:y="19.277cm">
          <draw:text-box>
            <text:p><text:span text:style-name="T19">32</text:span></text:p>
          </draw:text-box>
        </draw:frame>
        <draw:line draw:style-name="gr593" draw:text-style-name="P4" draw:layer="layout" svg:x1="21.3cm" svg:y1="25.7cm" svg:x2="21.3cm" svg:y2="11.2cm">
          <text:p/>
        </draw:line>
        <draw:line draw:style-name="gr38" draw:text-style-name="P4" draw:layer="layout" svg:x1="36cm" svg:y1="17cm" svg:x2="36.8cm" svg:y2="17cm">
          <text:p/>
        </draw:line>
        <draw:g draw:style-name="gr1">
          <draw:custom-shape draw:style-name="gr611" draw:text-style-name="P29" draw:layer="layout" svg:width="0.5cm" svg:height="13cm" svg:x="18cm" svg:y="9cm">
            <text:p/>
            <draw:enhanced-geometry svg:viewBox="0 0 21600 21600" draw:type="rectangle" draw:enhanced-path="M 0 0 L 21600 0 21600 21600 0 21600 0 0 Z N"/>
          </draw:custom-shape>
          <draw:custom-shape draw:style-name="gr611" draw:text-style-name="P29" draw:layer="layout" svg:width="0.5cm" svg:height="13cm" svg:x="18.5cm" svg:y="9cm">
            <text:p/>
            <draw:enhanced-geometry svg:viewBox="0 0 21600 21600" draw:type="rectangle" draw:enhanced-path="M 0 0 L 21600 0 21600 21600 0 21600 0 0 Z N"/>
          </draw:custom-shape>
        </draw:g>
        <draw:frame draw:style-name="gr612" draw:text-style-name="P62" draw:layer="layout" svg:width="1.797cm" svg:height="0.806cm" svg:x="17.7cm" svg:y="8.2cm">
          <draw:text-box>
            <text:p><text:span text:style-name="T20">ID/EX</text:span></text:p>
          </draw:text-box>
        </draw:frame>
        <draw:g draw:style-name="gr1">
          <draw:custom-shape draw:style-name="gr611" draw:text-style-name="P29" draw:layer="layout" svg:width="0.5cm" svg:height="13cm" svg:x="8.5cm" svg:y="9.001cm">
            <text:p/>
            <draw:enhanced-geometry svg:viewBox="0 0 21600 21600" draw:type="rectangle" draw:enhanced-path="M 0 0 L 21600 0 21600 21600 0 21600 0 0 Z N"/>
          </draw:custom-shape>
          <draw:custom-shape draw:style-name="gr611" draw:text-style-name="P29" draw:layer="layout" svg:width="0.5cm" svg:height="13cm" svg:x="9cm" svg:y="9.001cm">
            <text:p/>
            <draw:enhanced-geometry svg:viewBox="0 0 21600 21600" draw:type="rectangle" draw:enhanced-path="M 0 0 L 21600 0 21600 21600 0 21600 0 0 Z N"/>
          </draw:custom-shape>
        </draw:g>
        <draw:frame draw:style-name="gr613" draw:text-style-name="P62" draw:layer="layout" svg:width="1.577cm" svg:height="0.806cm" svg:x="8.2cm" svg:y="8.201cm">
          <draw:text-box>
            <text:p><text:span text:style-name="T20">IF/ID</text:span></text:p>
          </draw:text-box>
        </draw:frame>
        <draw:g draw:style-name="gr1">
          <draw:custom-shape draw:style-name="gr611" draw:text-style-name="P29" draw:layer="layout" svg:width="0.5cm" svg:height="13cm" svg:x="27cm" svg:y="9.002cm">
            <text:p/>
            <draw:enhanced-geometry svg:viewBox="0 0 21600 21600" draw:type="rectangle" draw:enhanced-path="M 0 0 L 21600 0 21600 21600 0 21600 0 0 Z N"/>
          </draw:custom-shape>
          <draw:custom-shape draw:style-name="gr611" draw:text-style-name="P29" draw:layer="layout" svg:width="0.5cm" svg:height="13cm" svg:x="27.5cm" svg:y="9.002cm">
            <text:p/>
            <draw:enhanced-geometry svg:viewBox="0 0 21600 21600" draw:type="rectangle" draw:enhanced-path="M 0 0 L 21600 0 21600 21600 0 21600 0 0 Z N"/>
          </draw:custom-shape>
        </draw:g>
        <draw:frame draw:style-name="gr614" draw:text-style-name="P62" draw:layer="layout" svg:width="2.456cm" svg:height="0.806cm" svg:x="26.6cm" svg:y="8.202cm">
          <draw:text-box>
            <text:p><text:span text:style-name="T20">EX/</text:span><text:span text:style-name="T20">MEM</text:span></text:p>
          </draw:text-box>
        </draw:frame>
        <draw:g draw:style-name="gr1">
          <draw:custom-shape draw:style-name="gr611" draw:text-style-name="P29" draw:layer="layout" svg:width="0.5cm" svg:height="13cm" svg:x="35.001cm" svg:y="9.003cm">
            <text:p/>
            <draw:enhanced-geometry svg:viewBox="0 0 21600 21600" draw:type="rectangle" draw:enhanced-path="M 0 0 L 21600 0 21600 21600 0 21600 0 0 Z N"/>
          </draw:custom-shape>
          <draw:custom-shape draw:style-name="gr611" draw:text-style-name="P29" draw:layer="layout" svg:width="0.5cm" svg:height="13cm" svg:x="35.501cm" svg:y="9.003cm">
            <text:p/>
            <draw:enhanced-geometry svg:viewBox="0 0 21600 21600" draw:type="rectangle" draw:enhanced-path="M 0 0 L 21600 0 21600 21600 0 21600 0 0 Z N"/>
          </draw:custom-shape>
        </draw:g>
        <draw:frame draw:style-name="gr615" draw:text-style-name="P62" draw:layer="layout" svg:width="2.593cm" svg:height="0.806cm" svg:x="34.101cm" svg:y="8.203cm">
          <draw:text-box>
            <text:p><text:span text:style-name="T20">MEM/</text:span><text:span text:style-name="T20">WB</text:span></text:p>
          </draw:text-box>
        </draw:frame>
        <draw:line draw:style-name="gr594" draw:text-style-name="P4" draw:layer="layout" svg:x1="8cm" svg:y1="10.5cm" svg:x2="8.5cm" svg:y2="10.5cm">
          <text:p/>
        </draw:line>
        <draw:line draw:style-name="gr594" draw:text-style-name="P4" draw:layer="layout" svg:x1="19cm" svg:y1="10.5cm" svg:x2="21cm" svg:y2="10.5cm">
          <text:p/>
        </draw:line>
        <draw:line draw:style-name="gr592" draw:text-style-name="P4" draw:layer="layout" svg:x1="17cm" svg:y1="16cm" svg:x2="18cm" svg:y2="16cm">
          <text:p/>
        </draw:line>
        <draw:line draw:style-name="gr592" draw:text-style-name="P4" draw:layer="layout" svg:x1="17cm" svg:y1="17.7cm" svg:x2="18cm" svg:y2="17.7cm">
          <text:p/>
        </draw:line>
        <draw:line draw:style-name="gr592" draw:text-style-name="P4" draw:layer="layout" svg:x1="17.5cm" svg:y1="20cm" svg:x2="18cm" svg:y2="20cm">
          <text:p/>
        </draw:line>
        <draw:line draw:style-name="gr592" draw:text-style-name="P4" draw:layer="layout" svg:x1="20.5cm" svg:y1="19cm" svg:x2="27cm" svg:y2="19cm">
          <text:p/>
        </draw:line>
        <draw:line draw:style-name="gr592" draw:text-style-name="P4" draw:layer="layout" svg:x1="34cm" svg:y1="17cm" svg:x2="35cm" svg:y2="17cm">
          <text:p/>
        </draw:line>
        <draw:line draw:style-name="gr616" draw:text-style-name="P4" draw:layer="layout" svg:x1="30cm" svg:y1="21cm" svg:x2="35cm" svg:y2="21cm">
          <text:p/>
        </draw:line>
        <draw:line draw:style-name="gr38" draw:text-style-name="P4" draw:layer="layout" svg:x1="9.5cm" svg:y1="17cm" svg:x2="10.3cm" svg:y2="17cm">
          <text:p/>
        </draw:line>
        <draw:custom-shape draw:style-name="gr36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7" draw:text-style-name="P4" draw:layer="layout" svg:x1="10cm" svg:y1="20cm" svg:x2="10cm" svg:y2="24.2cm">
          <text:p/>
        </draw:line>
        <draw:line draw:style-name="gr618" draw:text-style-name="P4" draw:layer="layout" svg:x1="10cm" svg:y1="21.9cm" svg:x2="18cm" svg:y2="21.9cm">
          <text:p/>
        </draw:line>
        <draw:line draw:style-name="gr618" draw:text-style-name="P4" draw:layer="layout" svg:x1="19cm" svg:y1="21.9cm" svg:x2="27cm" svg:y2="21.9cm">
          <text:p/>
        </draw:line>
        <draw:line draw:style-name="gr618" draw:text-style-name="P4" draw:layer="layout" svg:x1="28cm" svg:y1="21.9cm" svg:x2="35cm" svg:y2="21.9cm">
          <text:p/>
        </draw:line>
        <draw:line draw:style-name="gr619" draw:text-style-name="P4" draw:layer="layout" svg:x1="36cm" svg:y1="21.9cm" svg:x2="37cm" svg:y2="21.9cm">
          <text:p/>
        </draw:line>
        <draw:line draw:style-name="gr619" draw:text-style-name="P4" draw:layer="layout" svg:x1="37cm" svg:y1="21.9cm" svg:x2="37cm" svg:y2="22.5cm">
          <text:p/>
        </draw:line>
        <draw:line draw:style-name="gr619" draw:text-style-name="P4" draw:layer="layout" svg:x1="37cm" svg:y1="22.5cm" svg:x2="9.7cm" svg:y2="22.5cm">
          <text:p/>
        </draw:line>
        <draw:line draw:style-name="gr619" draw:text-style-name="P4" draw:layer="layout" svg:x1="9.7cm" svg:y1="17.2cm" svg:x2="9.7cm" svg:y2="22.5cm">
          <text:p/>
        </draw:line>
        <draw:line draw:style-name="gr594" draw:text-style-name="P4" draw:layer="layout" svg:x1="9.7cm" svg:y1="17.2cm" svg:x2="13.512cm" svg:y2="17.2cm">
          <text:p/>
        </draw:line>
        <draw:frame draw:style-name="gr620" draw:text-style-name="P63" draw:layer="layout" svg:width="1.725cm" svg:height="0.725cm" svg:x="6.701cm" svg:y="6.476cm">
          <draw:text-box>
            <text:p><text:span text:style-name="T21">PCSrc</text:span></text:p>
          </draw:text-box>
        </draw:frame>
        <draw:custom-shape draw:style-name="gr621" draw:text-style-name="P64"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622" draw:text-style-name="P65" draw:layer="layout" svg:x1="26.4cm" svg:y1="6.3cm" svg:x2="24cm" svg:y2="6.3cm">
          <text:p/>
        </draw:line>
        <draw:line draw:style-name="gr622" draw:text-style-name="P4" draw:layer="layout" svg:x1="26.2cm" svg:y1="7.3cm" svg:x2="24cm" svg:y2="7.301cm">
          <text:p/>
        </draw:line>
        <draw:frame draw:style-name="gr623" draw:text-style-name="P63" draw:layer="layout" svg:width="2.243cm" svg:height="0.725cm" svg:x="24.001cm" svg:y="5.577cm">
          <draw:text-box>
            <text:p><text:span text:style-name="T21">branch</text:span><text:span text:style-name="T21">_s</text:span></text:p>
          </draw:text-box>
        </draw:frame>
        <draw:line draw:style-name="gr622" draw:text-style-name="P4" draw:layer="layout" svg:x1="26.2cm" svg:y1="16.7cm" svg:x2="26.2cm" svg:y2="7.3cm">
          <text:p/>
        </draw:line>
        <draw:line draw:style-name="gr622" draw:text-style-name="P4" draw:layer="layout" svg:x1="26.2cm" svg:y1="16.7cm" svg:x2="25cm" svg:y2="16.7cm">
          <text:p/>
        </draw:line>
        <draw:line draw:style-name="gr593" draw:text-style-name="P4" draw:layer="layout" svg:x1="24.5cm" svg:y1="26.3cm" svg:x2="24.5cm" svg:y2="17.7cm">
          <text:p/>
        </draw:line>
        <draw:line draw:style-name="gr624" draw:text-style-name="P38" draw:layer="layout" svg:x1="24.3cm" svg:y1="18.4cm" svg:x2="24.7cm" svg:y2="18.8cm">
          <text:p/>
        </draw:line>
        <draw:line draw:style-name="gr622" draw:text-style-name="P4" draw:layer="layout" svg:x1="19cm" svg:y1="26.3cm" svg:x2="24.5cm" svg:y2="26.3cm">
          <text:p/>
        </draw:line>
        <draw:custom-shape draw:style-name="gr625" draw:text-style-name="P66" draw:layer="layout" svg:width="1cm" svg:height="3.5cm" svg:x="18cm" svg:y="23.5cm">
          <text:p/>
          <draw:enhanced-geometry svg:viewBox="0 0 21600 21600" draw:type="rectangle" draw:enhanced-path="M 0 0 L 21600 0 21600 21600 0 21600 0 0 Z N"/>
        </draw:custom-shape>
        <draw:custom-shape draw:style-name="gr625" draw:text-style-name="P66" draw:layer="layout" svg:width="1cm" svg:height="3.5cm" svg:x="27cm" svg:y="23.5cm">
          <text:p/>
          <draw:enhanced-geometry svg:viewBox="0 0 21600 21600" draw:type="rectangle" draw:enhanced-path="M 0 0 L 21600 0 21600 21600 0 21600 0 0 Z N"/>
        </draw:custom-shape>
        <draw:custom-shape draw:style-name="gr626" draw:text-style-name="P66" draw:layer="layout" svg:width="1cm" svg:height="4cm" svg:x="35cm" svg:y="23cm">
          <text:p/>
          <draw:enhanced-geometry svg:viewBox="0 0 21600 21600" draw:type="rectangle" draw:enhanced-path="M 0 0 L 21600 0 21600 21600 0 21600 0 0 Z N"/>
        </draw:custom-shape>
        <draw:line draw:style-name="gr627" draw:text-style-name="P67" draw:layer="layout" svg:x1="19cm" svg:y1="25.4cm" svg:x2="27cm" svg:y2="25.4cm">
          <text:p/>
        </draw:line>
        <draw:line draw:style-name="gr627" draw:text-style-name="P67" draw:layer="layout" svg:x1="28cm" svg:y1="25.4cm" svg:x2="35cm" svg:y2="25.4cm">
          <text:p/>
        </draw:line>
        <draw:line draw:style-name="gr627" draw:text-style-name="P67" draw:layer="layout" svg:x1="28cm" svg:y1="23.7cm" svg:x2="35cm" svg:y2="23.7cm">
          <text:p/>
        </draw:line>
        <draw:line draw:style-name="gr627" draw:text-style-name="P67" draw:layer="layout" svg:x1="15cm" svg:y1="26.6cm" svg:x2="18cm" svg:y2="26.6cm">
          <text:p/>
        </draw:line>
        <draw:line draw:style-name="gr627" draw:text-style-name="P67" draw:layer="layout" svg:x1="15cm" svg:y1="26.9cm" svg:x2="18cm" svg:y2="26.9cm">
          <text:p/>
        </draw:line>
        <draw:line draw:style-name="gr622" draw:text-style-name="P4" draw:layer="layout" svg:x1="26.4cm" svg:y1="26.6cm" svg:x2="26.4cm" svg:y2="6.3cm">
          <text:p/>
        </draw:line>
        <draw:line draw:style-name="gr622" draw:text-style-name="P4" draw:layer="layout" svg:x1="34.4cm" svg:y1="20.3cm" svg:x2="34.4cm" svg:y2="15cm">
          <text:p/>
        </draw:line>
        <draw:line draw:style-name="gr622" draw:text-style-name="P4" draw:layer="layout" svg:x1="33cm" svg:y1="15cm" svg:x2="34.4cm" svg:y2="15cm">
          <text:p/>
        </draw:line>
        <draw:line draw:style-name="gr622" draw:text-style-name="P4" draw:layer="layout" svg:x1="33.2cm" svg:y1="20.3cm" svg:x2="34.4cm" svg:y2="20.3cm">
          <text:p/>
        </draw:line>
        <draw:line draw:style-name="gr622" draw:text-style-name="P4" draw:layer="layout" svg:x1="33cm" svg:y1="24.3cm" svg:x2="33cm" svg:y2="20.6cm">
          <text:p/>
        </draw:line>
        <draw:line draw:style-name="gr622" draw:text-style-name="P4" draw:layer="layout" svg:x1="33.2cm" svg:y1="24cm" svg:x2="33.2cm" svg:y2="20.3cm">
          <text:p/>
        </draw:line>
        <draw:line draw:style-name="gr622" draw:text-style-name="P4" draw:layer="layout" svg:x1="28cm" svg:y1="24cm" svg:x2="33.2cm" svg:y2="24cm">
          <text:p/>
        </draw:line>
        <draw:frame draw:style-name="gr628" draw:text-style-name="P63" draw:layer="layout" svg:width="1.4cm" svg:height="0.725cm" svg:x="24.9cm" svg:y="16.075cm">
          <draw:text-box>
            <text:p><text:span text:style-name="T21">Zero</text:span></text:p>
          </draw:text-box>
        </draw:frame>
        <draw:line draw:style-name="gr622" draw:text-style-name="P4" draw:layer="layout" svg:x1="14.4cm" svg:y1="22.7cm" svg:x2="36.5cm" svg:y2="22.7cm">
          <text:p/>
        </draw:line>
        <draw:line draw:style-name="gr622" draw:text-style-name="P4" draw:layer="layout" svg:x1="14.4cm" svg:y1="22.7cm" svg:x2="14.4cm" svg:y2="19.6cm">
          <text:p/>
        </draw:line>
        <draw:line draw:style-name="gr622" draw:text-style-name="P4" draw:layer="layout" svg:x1="36cm" svg:y1="25.4cm" svg:x2="36.5cm" svg:y2="25.4cm">
          <text:p/>
        </draw:line>
        <draw:line draw:style-name="gr622" draw:text-style-name="P4" draw:layer="layout" svg:x1="36cm" svg:y1="23.7cm" svg:x2="37.2cm" svg:y2="23.7cm">
          <text:p/>
        </draw:line>
        <draw:line draw:style-name="gr622" draw:text-style-name="P4" draw:layer="layout" svg:x1="36.5cm" svg:y1="25.4cm" svg:x2="36.5cm" svg:y2="22.7cm">
          <text:p/>
        </draw:line>
        <draw:line draw:style-name="gr622" draw:text-style-name="P4" draw:layer="layout" svg:x1="37.2cm" svg:y1="23.7cm" svg:x2="37.2cm" svg:y2="19cm">
          <text:p/>
        </draw:line>
        <draw:line draw:style-name="gr592" draw:text-style-name="P4" draw:layer="layout" svg:x1="10cm" svg:y1="24cm" svg:x2="11cm" svg:y2="24cm">
          <text:p/>
        </draw:line>
        <draw:g draw:style-name="gr1">
          <draw:custom-shape draw:style-name="gr629" draw:text-style-name="P49" draw:layer="layout" svg:width="2.5cm" svg:height="3cm" svg:x="5cm" svg:y="15.1cm">
            <text:p text:style-name="P48"><text:span text:style-name="T11">IMem</text:span></text:p>
            <draw:enhanced-geometry svg:viewBox="0 0 21600 21600" draw:mirror-horizontal="false" draw:mirror-vertical="false" draw:type="rectangle" draw:enhanced-path="M 0 0 L 21600 0 21600 21600 0 21600 0 0 Z N"/>
          </draw:custom-shape>
          <draw:frame draw:style-name="gr630" draw:text-style-name="P36" draw:layer="layout" svg:width="2.378cm" svg:height="0.569cm" svg:x="4.8cm" svg:y="15.431cm">
            <draw:text-box>
              <text:p><text:span text:style-name="T11">loadData(</text:span><text:span text:style-name="T11">31:0)</text:span></text:p>
            </draw:text-box>
          </draw:frame>
          <draw:frame draw:style-name="gr630" draw:text-style-name="P36" draw:layer="layout" svg:width="2.378cm" svg:height="0.569cm" svg:x="4.812cm" svg:y="15.116cm">
            <draw:text-box>
              <text:p><text:span text:style-name="T11">loadAddr(</text:span><text:span text:style-name="T11">63:0)</text:span></text:p>
            </draw:text-box>
          </draw:frame>
          <draw:frame draw:style-name="gr631" draw:text-style-name="P36" draw:layer="layout" svg:width="1.148cm" svg:height="0.569cm" svg:x="4.85cm" svg:y="15.716cm">
            <draw:text-box>
              <text:p><text:span text:style-name="T11">wrEn</text:span></text:p>
            </draw:text-box>
          </draw:frame>
          <draw:frame draw:style-name="gr632" draw:text-style-name="P36" draw:layer="layout" svg:width="2.41cm" svg:height="0.569cm" svg:x="4.82cm" svg:y="17.088cm">
            <draw:text-box>
              <text:p><text:span text:style-name="T11">readAddr(</text:span><text:span text:style-name="T11">63:0)</text:span></text:p>
            </draw:text-box>
          </draw:frame>
          <draw:frame draw:style-name="gr632" draw:text-style-name="P36" draw:layer="layout" svg:width="2.41cm" svg:height="0.569cm" svg:x="5.297cm" svg:y="16.7cm">
            <draw:text-box>
              <text:p><text:span text:style-name="T11">readData(</text:span><text:span text:style-name="T11">31:0)</text:span></text:p>
            </draw:text-box>
          </draw:frame>
        </draw:g>
        <draw:g draw:style-name="gr1">
          <draw:custom-shape draw:style-name="gr633" draw:text-style-name="P68" draw:layer="layout" svg:width="0.5cm" svg:height="1cm" svg:x="3.5cm" svg:y="16.9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ext:span><text:span text:style-name="T2">t</text:span></text:p>
          </draw:text-box>
        </draw:frame>
        <draw:frame draw:style-name="gr61" draw:text-style-name="P9" draw:layer="layout" svg:width="1.09cm" svg:height="0.725cm" svg:x="3.9cm" svg:y="17.4cm">
          <draw:text-box>
            <text:p><text:span text:style-name="T2">PC</text:span></text:p>
          </draw:text-box>
        </draw:frame>
        <draw:custom-shape draw:style-name="gr526" draw:text-style-name="P55" draw:layer="layout" svg:width="1cm" svg:height="1cm" svg:x="6cm" svg:y="10.7cm">
          <text:p text:style-name="P48"><text:span text:style-name="T11">+</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593" draw:text-style-name="P4" draw:layer="layout" svg:x1="6.2cm" svg:y1="7cm" svg:x2="6.2cm" svg:y2="7.6cm">
          <text:p/>
        </draw:line>
        <draw:line draw:style-name="gr622" draw:text-style-name="P4" draw:layer="layout" svg:x1="19.4cm" svg:y1="7cm" svg:x2="6.2cm" svg:y2="7cm">
          <text:p/>
        </draw:line>
        <draw:g draw:style-name="gr1">
          <draw:custom-shape draw:style-name="gr634" draw:text-style-name="P49" draw:layer="layout" svg:width="3.506cm" svg:height="2.5cm" svg:x="13.512cm" svg:y="15.8cm">
            <text:p text:style-name="P48"><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530" draw:text-style-name="P36" draw:layer="layout" svg:width="3.576cm" svg:height="0.569cm" svg:x="13.314cm" svg:y="16.2cm">
            <draw:text-box>
              <text:p><text:span text:style-name="T11">instr(19:1</text:span><text:span text:style-name="T11">5):raddr0</text:span><text:span text:style-name="T11">1(4:0)</text:span></text:p>
            </draw:text-box>
          </draw:frame>
          <draw:frame draw:style-name="gr530" draw:text-style-name="P36" draw:layer="layout" svg:width="3.576cm" svg:height="0.569cm" svg:x="13.312cm" svg:y="16.531cm">
            <draw:text-box>
              <text:p><text:span text:style-name="T11">instr(24:2</text:span><text:span text:style-name="T11">0):raddr0</text:span><text:span text:style-name="T11">2(4:0)</text:span></text:p>
            </draw:text-box>
          </draw:frame>
          <draw:frame draw:style-name="gr531" draw:text-style-name="P36" draw:layer="layout" svg:width="3.508cm" svg:height="0.569cm" svg:x="13.306cm" svg:y="16.9cm">
            <draw:text-box>
              <text:p><text:span text:style-name="T11">instr(11:7)</text:span><text:span text:style-name="T11">:waddr01(</text:span><text:span text:style-name="T11">4:0)</text:span></text:p>
            </draw:text-box>
          </draw:frame>
          <draw:frame draw:style-name="gr532" draw:text-style-name="P36" draw:layer="layout" svg:width="2.315cm" svg:height="0.569cm" svg:x="13.3cm" svg:y="15.931cm">
            <draw:text-box>
              <text:p><text:span text:style-name="T11">wdata01(</text:span><text:span text:style-name="T11">63:0)</text:span></text:p>
            </draw:text-box>
          </draw:frame>
          <draw:frame draw:style-name="gr635" draw:text-style-name="P36" draw:layer="layout" svg:width="2.205cm" svg:height="0.569cm" svg:x="15.01cm" svg:y="15.7cm">
            <draw:text-box>
              <text:p><text:span text:style-name="T11">rdata01(6</text:span><text:span text:style-name="T11">3:0)</text:span></text:p>
            </draw:text-box>
          </draw:frame>
          <draw:frame draw:style-name="gr635" draw:text-style-name="P36" draw:layer="layout" svg:width="2.205cm" svg:height="0.569cm" svg:x="15.014cm" svg:y="17.431cm">
            <draw:text-box>
              <text:p><text:span text:style-name="T11">rdata02(6</text:span><text:span text:style-name="T11">3:0)</text:span></text:p>
            </draw:text-box>
          </draw:frame>
          <draw:frame draw:style-name="gr534" draw:text-style-name="P36" draw:layer="layout" svg:width="0.865cm" svg:height="0.569cm" svg:x="14.056cm" svg:y="17.831cm">
            <draw:text-box>
              <text:p><text:span text:style-name="T11">we</text:span></text:p>
            </draw:text-box>
          </draw:frame>
        </draw:g>
        <draw:g draw:style-name="gr1">
          <draw:custom-shape draw:style-name="gr636" draw:text-style-name="P49" draw:layer="layout" svg:width="1.5cm" svg:height="2cm" svg:x="23.5cm" svg:y="15.7cm">
            <text:p text:style-name="P48"><text:span text:style-name="T11">alu</text:span></text:p>
            <draw:enhanced-geometry svg:viewBox="0 0 21600 21600" draw:type="rectangle" draw:enhanced-path="M 0 0 L 21600 0 21600 21600 0 21600 0 0 Z N"/>
          </draw:custom-shape>
          <draw:frame draw:style-name="gr543" draw:text-style-name="P36" draw:layer="layout" svg:width="1.37cm" svg:height="0.569cm" svg:x="23.282cm" svg:y="15.6cm">
            <draw:text-box>
              <text:p><text:span text:style-name="T11">data01</text:span></text:p>
            </draw:text-box>
          </draw:frame>
          <draw:frame draw:style-name="gr543" draw:text-style-name="P36" draw:layer="layout" svg:width="1.37cm" svg:height="0.569cm" svg:x="23.282cm" svg:y="15.869cm">
            <draw:text-box>
              <text:p><text:span text:style-name="T11">data02</text:span></text:p>
            </draw:text-box>
          </draw:frame>
          <draw:frame draw:style-name="gr637" draw:text-style-name="P36" draw:layer="layout" svg:width="1.29cm" svg:height="0.569cm" svg:x="23.859cm" svg:y="17.3cm">
            <draw:text-box>
              <text:p><text:span text:style-name="T11">aluSel</text:span></text:p>
            </draw:text-box>
          </draw:frame>
          <draw:frame draw:style-name="gr638" draw:text-style-name="P36" draw:layer="layout" svg:width="1.054cm" svg:height="0.569cm" svg:x="24.148cm" svg:y="16.4cm">
            <draw:text-box>
              <text:p><text:span text:style-name="T11">zero</text:span></text:p>
            </draw:text-box>
          </draw:frame>
          <draw:frame draw:style-name="gr639" draw:text-style-name="P36" draw:layer="layout" svg:width="1.684cm" svg:height="0.569cm" svg:x="23.517cm" svg:y="16.7cm">
            <draw:text-box>
              <text:p><text:span text:style-name="T11">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592" draw:text-style-name="P4" draw:layer="layout" svg:x1="23cm" svg:y1="16.2cm" svg:x2="23.5cm" svg:y2="16.2cm">
          <text:p/>
        </draw:line>
        <draw:line draw:style-name="gr595" draw:text-style-name="P4" draw:layer="layout" svg:x1="22.1cm" svg:y1="18cm" svg:x2="23cm" svg:y2="18cm">
          <text:p/>
        </draw:line>
        <draw:line draw:style-name="gr38" draw:text-style-name="P4" draw:layer="layout" svg:x1="23cm" svg:y1="18cm" svg:x2="23cm" svg:y2="16.2cm">
          <text:p/>
        </draw:line>
        <draw:line draw:style-name="gr595" draw:text-style-name="P4" draw:layer="layout" svg:x1="21.4cm" svg:y1="15.6cm" svg:x2="22cm" svg:y2="15.6cm">
          <text:p/>
        </draw:line>
        <draw:line draw:style-name="gr595" draw:text-style-name="P4" draw:layer="layout" svg:x1="20.2cm" svg:y1="16.2cm" svg:x2="22cm" svg:y2="16.2cm">
          <text:p/>
        </draw:line>
        <draw:g draw:style-name="gr1">
          <draw:custom-shape draw:style-name="gr640" draw:text-style-name="P49" draw:layer="layout" svg:width="2.607cm" svg:height="1cm" svg:x="14.924cm" svg:y="19.6cm">
            <text:p text:style-name="P48"><text:span text:style-name="T11">extend</text:span></text:p>
            <draw:enhanced-geometry svg:viewBox="0 0 21600 21600" draw:type="rectangle" draw:enhanced-path="M 0 0 L 21600 0 21600 21600 0 21600 0 0 Z N"/>
          </draw:custom-shape>
          <draw:frame draw:style-name="gr641" draw:text-style-name="P36" draw:layer="layout" svg:width="1.779cm" svg:height="0.569cm" svg:x="14.713cm" svg:y="19.7cm">
            <draw:text-box>
              <text:p><text:span text:style-name="T11">instr(31:0)</text:span></text:p>
            </draw:text-box>
          </draw:frame>
          <draw:frame draw:style-name="gr642" draw:text-style-name="P36" draw:layer="layout" svg:width="1.448cm" svg:height="0.569cm" svg:x="16.114cm" svg:y="20.2cm">
            <draw:text-box>
              <text:p><text:span text:style-name="T11">sel(2:0)</text:span></text:p>
            </draw:text-box>
          </draw:frame>
          <draw:frame draw:style-name="gr643" draw:text-style-name="P36" draw:layer="layout" svg:width="1.778cm" svg:height="0.569cm" svg:x="16.024cm" svg:y="19.667cm">
            <draw:text-box>
              <text:p><text:span text:style-name="T11">imm(63:0)</text:span></text:p>
            </draw:text-box>
          </draw:frame>
        </draw:g>
        <draw:frame draw:style-name="gr644" draw:text-style-name="P9" draw:layer="layout" svg:width="3.302cm" svg:height="0.725cm" svg:x="20.9cm" svg:y="13.075cm">
          <draw:text-box>
            <text:p><text:span text:style-name="T2">Inside </text:span><text:span text:style-name="T2">„exten</text:span><text:span text:style-name="T2">d“</text:span></text:p>
          </draw:text-box>
        </draw:frame>
        <draw:line draw:style-name="gr593" draw:text-style-name="P4" draw:layer="layout" svg:x1="16.8cm" svg:y1="25.932cm" svg:x2="16.8cm" svg:y2="20.6cm">
          <text:p/>
        </draw:line>
        <draw:custom-shape draw:style-name="gr526" draw:text-style-name="P55" draw:layer="layout" svg:width="1cm" svg:height="1cm" svg:x="24cm" svg:y="11.7cm">
          <text:p text:style-name="P48"><text:span text:style-name="T11">+</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600" draw:text-style-name="P4" draw:layer="layout" svg:x1="24.975cm" svg:y1="12.201cm" svg:x2="26cm" svg:y2="12.2cm">
          <text:p/>
        </draw:line>
        <draw:line draw:style-name="gr602" draw:text-style-name="P4" draw:layer="layout" svg:x1="26cm" svg:y1="12.2cm" svg:x2="26cm" svg:y2="11.5cm">
          <text:p/>
        </draw:line>
        <draw:line draw:style-name="gr59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645" draw:text-style-name="P9" draw:layer="layout" svg:width="1.678cm" svg:height="0.725cm" svg:x="19.4cm" svg:y="9.875cm">
          <draw:text-box>
            <text:p><text:span text:style-name="T2">for jalr</text:span></text:p>
          </draw:text-box>
        </draw:frame>
        <draw:custom-shape draw:style-name="gr36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0.5cm" svg:y1="11.1cm" svg:x2="20.5cm" svg:y2="16cm">
          <text:p/>
        </draw:line>
        <draw:line draw:style-name="gr619" draw:text-style-name="P4" draw:layer="layout" svg:x1="20.2cm" svg:y1="10.475cm" svg:x2="20.2cm" svg:y2="16.2cm">
          <text:p/>
        </draw:line>
        <draw:frame draw:style-name="gr646"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594" draw:text-style-name="P4" draw:layer="layout" svg:x1="7.5cm" svg:y1="10cm" svg:x2="8.5cm" svg:y2="10cm">
          <text:p/>
        </draw:line>
        <draw:custom-shape draw:style-name="gr601" draw:text-style-name="P58"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9.5cm" svg:y1="10cm" svg:x2="18cm" svg:y2="10cm">
          <text:p/>
        </draw:line>
        <draw:line draw:style-name="gr594" draw:text-style-name="P4" draw:layer="layout" svg:x1="19cm" svg:y1="10cm" svg:x2="27cm" svg:y2="10cm">
          <text:p/>
        </draw:line>
        <draw:frame draw:style-name="gr647"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594" draw:text-style-name="P4" draw:layer="layout" svg:x1="28cm" svg:y1="10cm" svg:x2="35.001cm" svg:y2="10cm">
          <text:p/>
        </draw:line>
        <draw:line draw:style-name="gr600" draw:text-style-name="P4" draw:layer="layout" svg:x1="36cm" svg:y1="10cm" svg:x2="36.5cm" svg:y2="10cm">
          <text:p/>
        </draw:line>
        <draw:line draw:style-name="gr600" draw:text-style-name="P4" draw:layer="layout" svg:x1="36.5cm" svg:y1="16.7cm" svg:x2="36.5cm" svg:y2="10cm">
          <text:p/>
        </draw:line>
        <draw:line draw:style-name="gr60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593" draw:text-style-name="P4" draw:layer="layout" svg:x1="22.3cm" svg:y1="25.1cm" svg:x2="22.3cm" svg:y2="16.301cm">
          <text:p/>
        </draw:line>
        <draw:line draw:style-name="gr593" draw:text-style-name="P4" draw:layer="layout" svg:x1="21.9cm" svg:y1="24.8cm" svg:x2="21.9cm" svg:y2="18.402cm">
          <text:p/>
        </draw:line>
        <draw:g draw:style-name="gr1">
          <draw:custom-shape draw:style-name="gr648" draw:text-style-name="P49" draw:layer="layout" svg:width="2cm" svg:height="2cm" svg:x="32cm" svg:y="15.8cm">
            <text:p text:style-name="P48"><text:span text:style-name="T11">DMem</text:span></text:p>
            <draw:enhanced-geometry svg:viewBox="0 0 21600 21600" draw:type="rectangle" draw:enhanced-path="M 0 0 L 21600 0 21600 21600 0 21600 0 0 Z N"/>
          </draw:custom-shape>
          <draw:frame draw:style-name="gr631" draw:text-style-name="P36" draw:layer="layout" svg:width="1.148cm" svg:height="0.569cm" svg:x="32.555cm" svg:y="15.7cm">
            <draw:text-box>
              <text:p><text:span text:style-name="T11">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649" draw:text-style-name="P36" draw:layer="layout" svg:width="1.101cm" svg:height="0.569cm" svg:x="32.9cm" svg:y="17.331cm">
            <draw:text-box>
              <text:p><text:span text:style-name="T11">rdEn</text:span></text:p>
            </draw:text-box>
          </draw:frame>
          <draw:frame draw:style-name="gr650" draw:text-style-name="P36" draw:layer="layout" svg:width="1.038cm" svg:height="0.569cm" svg:x="31.8cm" svg:y="16.7cm">
            <draw:text-box>
              <text:p><text:span text:style-name="T11">instr</text:span></text:p>
            </draw:text-box>
          </draw:frame>
          <draw:frame draw:style-name="gr651" draw:text-style-name="P36" draw:layer="layout" svg:width="1.07cm" svg:height="0.569cm" svg:x="31.8cm" svg:y="16.1cm">
            <draw:text-box>
              <text:p><text:span text:style-name="T11">addr</text:span></text:p>
            </draw:text-box>
          </draw:frame>
          <draw:frame draw:style-name="gr652" draw:text-style-name="P36" draw:layer="layout" svg:width="1.117cm" svg:height="0.569cm" svg:x="31.8cm" svg:y="16.4cm">
            <draw:text-box>
              <text:p><text:span text:style-name="T11">datai</text:span></text:p>
            </draw:text-box>
          </draw:frame>
          <draw:frame draw:style-name="gr653" draw:text-style-name="P36" draw:layer="layout" svg:width="1.212cm" svg:height="0.569cm" svg:x="32.991cm" svg:y="16.7cm">
            <draw:text-box>
              <text:p><text:span text:style-name="T11">datao</text:span></text:p>
            </draw:text-box>
          </draw:frame>
        </draw:g>
        <draw:line draw:style-name="gr592" draw:text-style-name="P4" draw:layer="layout" svg:x1="31cm" svg:y1="16.7cm" svg:x2="32cm" svg:y2="16.7cm">
          <text:p/>
        </draw:line>
        <draw:line draw:style-name="gr592" draw:text-style-name="P4" draw:layer="layout" svg:x1="31.5cm" svg:y1="17cm" svg:x2="32cm" svg:y2="17cm">
          <text:p/>
        </draw:line>
        <draw:line draw:style-name="gr600" draw:text-style-name="P4" draw:layer="layout" svg:x1="30cm" svg:y1="17cm" svg:x2="30.5cm" svg:y2="17cm">
          <text:p/>
        </draw:line>
        <draw:line draw:style-name="gr602"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6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4" draw:text-style-name="P53" draw:layer="layout" svg:width="2.5cm" svg:height="0.726cm" svg:x="10.1cm" svg:y="21.402cm">
          <draw:text-box>
            <text:p><text:span text:style-name="T19">Instr.</text:span><text:span text:style-name="T19">[11-7]</text:span></text:p>
          </draw:text-box>
        </draw:frame>
        <draw:frame draw:style-name="gr655" draw:text-style-name="P59" draw:layer="layout" svg:width="3.585cm" svg:height="0.725cm" svg:x="10.102cm" svg:y="20.975cm">
          <draw:text-box>
            <text:p><text:span text:style-name="T19">Instr.</text:span><text:span text:style-name="T19">[14-12, </text:span><text:span text:style-name="T19">6-0]</text:span></text:p>
          </draw:text-box>
        </draw:frame>
        <draw:line draw:style-name="gr616" draw:text-style-name="P4" draw:layer="layout" svg:x1="10cm" svg:y1="21.5cm" svg:x2="18cm" svg:y2="21.5cm">
          <text:p/>
        </draw:line>
        <draw:custom-shape draw:style-name="gr36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656" draw:text-style-name="P49" draw:layer="layout" svg:width="4cm" svg:height="3.527cm" svg:x="11cm" svg:y="23.473cm">
            <text:p text:style-name="P48"><text:span text:style-name="T11">controllAll</text:span></text:p>
            <draw:enhanced-geometry svg:viewBox="0 0 21600 21600" draw:type="rectangle" draw:enhanced-path="M 0 0 L 21600 0 21600 21600 0 21600 0 0 Z N"/>
          </draw:custom-shape>
          <draw:frame draw:style-name="gr657" draw:text-style-name="P36" draw:layer="layout" svg:width="2.016cm" svg:height="0.569cm" svg:x="10.8cm" svg:y="23.46cm">
            <draw:text-box>
              <text:p><text:span text:style-name="T11">opcode(6:</text:span><text:span text:style-name="T11">0)</text:span></text:p>
            </draw:text-box>
          </draw:frame>
          <draw:frame draw:style-name="gr658" draw:text-style-name="P36" draw:layer="layout" svg:width="1.779cm" svg:height="0.569cm" svg:x="10.824cm" svg:y="23.716cm">
            <draw:text-box>
              <text:p><text:span text:style-name="T11">func3(2:0)</text:span></text:p>
            </draw:text-box>
          </draw:frame>
          <draw:frame draw:style-name="gr659" draw:text-style-name="P36" draw:layer="layout" svg:width="1.511cm" svg:height="0.569cm" svg:x="10.8cm" svg:y="23.973cm">
            <draw:text-box>
              <text:p><text:span text:style-name="T11">func7b5</text:span></text:p>
            </draw:text-box>
          </draw:frame>
          <draw:frame draw:style-name="gr550" draw:text-style-name="P36" draw:layer="layout" svg:width="1.054cm" svg:height="0.569cm" svg:x="10.872cm" svg:y="24.229cm">
            <draw:text-box>
              <text:p><text:span text:style-name="T11">zero</text:span></text:p>
            </draw:text-box>
          </draw:frame>
          <draw:frame draw:style-name="gr456" draw:text-style-name="P36" draw:layer="layout" svg:width="2.204cm" svg:height="0.569cm" svg:x="13.035cm" svg:y="23.373cm">
            <draw:text-box>
              <text:p><text:span text:style-name="T11">resultSrc(</text:span><text:span text:style-name="T11">1:0)</text:span></text:p>
            </draw:text-box>
          </draw:frame>
          <draw:frame draw:style-name="gr660" draw:text-style-name="P36" draw:layer="layout" svg:width="1.647cm" svg:height="0.569cm" svg:x="13.6cm" svg:y="23.657cm">
            <draw:text-box>
              <text:p><text:span text:style-name="T11">dMemWr</text:span></text:p>
            </draw:text-box>
          </draw:frame>
          <draw:frame draw:style-name="gr661" draw:text-style-name="P36" draw:layer="layout" svg:width="1.653cm" svg:height="0.569cm" svg:x="13.6cm" svg:y="23.941cm">
            <draw:text-box>
              <text:p><text:span text:style-name="T11">dMemRd</text:span></text:p>
            </draw:text-box>
          </draw:frame>
          <draw:frame draw:style-name="gr662" draw:text-style-name="P36" draw:layer="layout" svg:width="1.321cm" svg:height="0.569cm" svg:x="13.887cm" svg:y="24.226cm">
            <draw:text-box>
              <text:p><text:span text:style-name="T11">PCSrc</text:span></text:p>
            </draw:text-box>
          </draw:frame>
          <draw:frame draw:style-name="gr663" draw:text-style-name="P36" draw:layer="layout" svg:width="1.495cm" svg:height="0.569cm" svg:x="13.724cm" svg:y="24.51cm">
            <draw:text-box>
              <text:p><text:span text:style-name="T11">aluSrcB</text:span></text:p>
            </draw:text-box>
          </draw:frame>
          <draw:frame draw:style-name="gr663" draw:text-style-name="P36" draw:layer="layout" svg:width="1.495cm" svg:height="0.569cm" svg:x="13.724cm" svg:y="24.794cm">
            <draw:text-box>
              <text:p><text:span text:style-name="T11">aluSrcA</text:span></text:p>
            </draw:text-box>
          </draw:frame>
          <draw:frame draw:style-name="gr664" draw:text-style-name="P36" draw:layer="layout" svg:width="1.269cm" svg:height="0.569cm" svg:x="13.963cm" svg:y="25.078cm">
            <draw:text-box>
              <text:p><text:span text:style-name="T11">regWr</text:span></text:p>
            </draw:text-box>
          </draw:frame>
          <draw:frame draw:style-name="gr556" draw:text-style-name="P36" draw:layer="layout" svg:width="1.117cm" svg:height="0.569cm" svg:x="14.091cm" svg:y="25.363cm">
            <draw:text-box>
              <text:p><text:span text:style-name="T11">jump</text:span></text:p>
            </draw:text-box>
          </draw:frame>
          <draw:frame draw:style-name="gr665" draw:text-style-name="P36" draw:layer="layout" svg:width="2.046cm" svg:height="0.569cm" svg:x="13.207cm" svg:y="25.647cm">
            <draw:text-box>
              <text:p><text:span text:style-name="T11">immSrc(2</text:span><text:span text:style-name="T11">:0)</text:span></text:p>
            </draw:text-box>
          </draw:frame>
          <draw:frame draw:style-name="gr545" draw:text-style-name="P36" draw:layer="layout" svg:width="1.874cm" svg:height="0.569cm" svg:x="13.357cm" svg:y="25.931cm">
            <draw:text-box>
              <text:p><text:span text:style-name="T11">aluSel(4:0</text:span><text:span text:style-name="T11">)</text:span></text:p>
            </draw:text-box>
          </draw:frame>
          <draw:frame draw:style-name="gr666" draw:text-style-name="P36" draw:layer="layout" svg:width="1.669cm" svg:height="0.569cm" svg:x="13.557cm" svg:y="26.232cm">
            <draw:text-box>
              <text:p><text:span text:style-name="T11">branch_s</text:span></text:p>
            </draw:text-box>
          </draw:frame>
          <draw:frame draw:style-name="gr667" draw:text-style-name="P36" draw:layer="layout" svg:width="1.416cm" svg:height="0.569cm" svg:x="13.757cm" svg:y="26.533cm">
            <draw:text-box>
              <text:p><text:span text:style-name="T11">jump_s</text:span></text:p>
            </draw:text-box>
          </draw:frame>
        </draw:g>
        <draw:line draw:style-name="gr592" draw:text-style-name="P4" draw:layer="layout" svg:x1="10cm" svg:y1="23.8cm" svg:x2="11cm" svg:y2="23.8cm">
          <text:p/>
        </draw:line>
        <draw:line draw:style-name="gr592" draw:text-style-name="P4" draw:layer="layout" svg:x1="10cm" svg:y1="24.2cm" svg:x2="11cm" svg:y2="24.2cm">
          <text:p/>
        </draw:line>
        <draw:custom-shape draw:style-name="gr36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7" draw:text-style-name="P67" draw:layer="layout" svg:x1="10cm" svg:y1="24.5cm" svg:x2="11cm" svg:y2="24.5cm">
          <text:p/>
        </draw:line>
        <draw:frame draw:style-name="gr668" draw:text-style-name="P9" draw:layer="layout" svg:width="10.573cm" svg:height="2.147cm" svg:x="4.527cm" svg:y="25.5cm">
          <draw:text-box>
            <text:p><text:span text:style-name="T2">In </text:span><text:span text:style-name="T2">pipelin</text:span><text:span text:style-name="T2">ed </text:span><text:span text:style-name="T2">versio</text:span><text:span text:style-name="T2">n:</text:span></text:p>
            <text:p><text:span text:style-name="T2">- </text:span><text:span text:style-name="T2">PCSrc </text:span><text:span text:style-name="T2">not </text:span><text:span text:style-name="T2">conne</text:span><text:span text:style-name="T2">cted</text:span></text:p>
            <text:p><text:span text:style-name="T2">- zero </text:span><text:span text:style-name="T2">not </text:span><text:span text:style-name="T2">used</text:span></text:p>
            <text:p><text:span text:style-name="T2">- </text:span><text:span text:style-name="T2">forwar</text:span><text:span text:style-name="T2">d </text:span><text:span text:style-name="T2">branch</text:span><text:span text:style-name="T2">_s and </text:span><text:span text:style-name="T2">jump_</text:span><text:span text:style-name="T2">s and </text:span><text:span text:style-name="T2">conne</text:span><text:span text:style-name="T2">ct with </text:span><text:span text:style-name="T2">zero</text:span></text:p>
          </draw:text-box>
        </draw:frame>
        <draw:custom-shape draw:style-name="gr621" draw:text-style-name="P64"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669" draw:text-style-name="P63" draw:layer="layout" svg:width="1.867cm" svg:height="0.725cm" svg:x="21.301cm" svg:y="4.778cm">
          <draw:text-box>
            <text:p><text:span text:style-name="T21">jump_</text:span><text:span text:style-name="T21">s</text:span></text:p>
          </draw:text-box>
        </draw:frame>
        <draw:line draw:style-name="gr622" draw:text-style-name="P4" draw:layer="layout" svg:x1="23cm" svg:y1="6.4cm" svg:x2="21.4cm" svg:y2="6.402cm">
          <text:p/>
        </draw:line>
        <draw:line draw:style-name="gr622" draw:text-style-name="P4" draw:layer="layout" svg:x1="26.6cm" svg:y1="5.403cm" svg:x2="21.4cm" svg:y2="5.403cm">
          <text:p/>
        </draw:line>
        <draw:line draw:style-name="gr622" draw:text-style-name="P4" draw:layer="layout" svg:x1="20.4cm" svg:y1="5.802cm" svg:x2="19.4cm" svg:y2="5.803cm">
          <text:p/>
        </draw:line>
        <draw:line draw:style-name="gr622" draw:text-style-name="P4" draw:layer="layout" svg:x1="19.4cm" svg:y1="7cm" svg:x2="19.4cm" svg:y2="5.8cm">
          <text:p/>
        </draw:line>
        <draw:frame draw:style-name="gr670" draw:text-style-name="P9" draw:layer="layout" svg:width="1.444cm" svg:height="0.725cm" svg:x="8.758cm" svg:y="24.1cm">
          <draw:text-box>
            <text:p><text:span text:style-name="T2">open</text:span></text:p>
          </draw:text-box>
        </draw:frame>
        <draw:line draw:style-name="gr622" draw:text-style-name="P4" draw:layer="layout" svg:x1="15cm" svg:y1="25.932cm" svg:x2="16.8cm" svg:y2="25.932cm">
          <text:p/>
        </draw:line>
        <draw:line draw:style-name="gr627" draw:text-style-name="P67" draw:layer="layout" svg:x1="15cm" svg:y1="25.4cm" svg:x2="18cm" svg:y2="25.4cm">
          <text:p/>
        </draw:line>
        <draw:line draw:style-name="gr622" draw:text-style-name="P4" draw:layer="layout" svg:x1="26.6cm" svg:y1="26.9cm" svg:x2="26.6cm" svg:y2="5.403cm">
          <text:p/>
        </draw:line>
        <draw:line draw:style-name="gr622" draw:text-style-name="P4" draw:layer="layout" svg:x1="19cm" svg:y1="26.6cm" svg:x2="26.4cm" svg:y2="26.6cm">
          <text:p/>
        </draw:line>
        <draw:line draw:style-name="gr627" draw:text-style-name="P67" draw:layer="layout" svg:x1="15cm" svg:y1="26.3cm" svg:x2="18cm" svg:y2="26.3cm">
          <text:p/>
        </draw:line>
        <draw:line draw:style-name="gr627" draw:text-style-name="P67" draw:layer="layout" svg:x1="15cm" svg:y1="25.7cm" svg:x2="18cm" svg:y2="25.7cm">
          <text:p/>
        </draw:line>
        <draw:line draw:style-name="gr622" draw:text-style-name="P4" draw:layer="layout" svg:x1="19cm" svg:y1="25.7cm" svg:x2="21.3cm" svg:y2="25.7cm">
          <text:p/>
        </draw:line>
        <draw:line draw:style-name="gr627" draw:text-style-name="P67" draw:layer="layout" svg:x1="15cm" svg:y1="25.1cm" svg:x2="18cm" svg:y2="25.1cm">
          <text:p/>
        </draw:line>
        <draw:line draw:style-name="gr627" draw:text-style-name="P67" draw:layer="layout" svg:x1="15cm" svg:y1="24.8cm" svg:x2="18cm" svg:y2="24.8cm">
          <text:p/>
        </draw:line>
        <draw:line draw:style-name="gr622" draw:text-style-name="P4" draw:layer="layout" svg:x1="19cm" svg:y1="25.1cm" svg:x2="22.3cm" svg:y2="25.1cm">
          <text:p/>
        </draw:line>
        <draw:line draw:style-name="gr622" draw:text-style-name="P4" draw:layer="layout" svg:x1="19cm" svg:y1="24.8cm" svg:x2="21.9cm" svg:y2="24.8cm">
          <text:p/>
        </draw:line>
        <draw:line draw:style-name="gr622" draw:text-style-name="P4" draw:layer="layout" svg:x1="15cm" svg:y1="24.532cm" svg:x2="15.4cm" svg:y2="24.532cm">
          <text:p/>
        </draw:line>
        <draw:line draw:style-name="gr627" draw:text-style-name="P67" draw:layer="layout" svg:x1="15cm" svg:y1="24.3cm" svg:x2="18cm" svg:y2="24.3cm">
          <text:p/>
        </draw:line>
        <draw:line draw:style-name="gr627" draw:text-style-name="P67" draw:layer="layout" svg:x1="15cm" svg:y1="24cm" svg:x2="18cm" svg:y2="24cm">
          <text:p/>
        </draw:line>
        <draw:line draw:style-name="gr627" draw:text-style-name="P67" draw:layer="layout" svg:x1="15cm" svg:y1="23.7cm" svg:x2="18cm" svg:y2="23.7cm">
          <text:p/>
        </draw:line>
        <draw:line draw:style-name="gr627" draw:text-style-name="P67" draw:layer="layout" svg:x1="19cm" svg:y1="24.3cm" svg:x2="27cm" svg:y2="24.3cm">
          <text:p/>
        </draw:line>
        <draw:line draw:style-name="gr627" draw:text-style-name="P67" draw:layer="layout" svg:x1="19cm" svg:y1="24cm" svg:x2="27cm" svg:y2="24cm">
          <text:p/>
        </draw:line>
        <draw:line draw:style-name="gr627" draw:text-style-name="P67" draw:layer="layout" svg:x1="19cm" svg:y1="23.7cm" svg:x2="27cm" svg:y2="23.7cm">
          <text:p/>
        </draw:line>
        <draw:line draw:style-name="gr622" draw:text-style-name="P4" draw:layer="layout" svg:x1="28cm" svg:y1="24.3cm" svg:x2="33cm" svg:y2="24.3cm">
          <text:p/>
        </draw:line>
        <draw:frame draw:style-name="gr671" draw:text-style-name="P9" draw:layer="layout" svg:width="3.302cm" svg:height="1.673cm" svg:x="1cm" svg:y="18.1cm">
          <draw:text-box>
            <text:p><text:span text:style-name="T2">Instruc</text:span><text:span text:style-name="T2">tionBu</text:span><text:span text:style-name="T2">s:</text:span></text:p>
            <text:p><text:span text:style-name="T2">- </text:span><text:span text:style-name="T2">Addre</text:span><text:span text:style-name="T2">ss</text:span></text:p>
            <text:p><text:span text:style-name="T2">- Data</text:span></text:p>
          </draw:text-box>
        </draw:frame>
        <draw:line draw:style-name="gr672" draw:text-style-name="P4" draw:layer="layout" svg:x1="5.2cm" svg:y1="19.5cm" svg:x2="8cm" svg:y2="17.626cm">
          <text:p/>
        </draw:line>
        <draw:line draw:style-name="gr672" draw:text-style-name="P4" draw:layer="layout" svg:x1="3.1cm" svg:y1="19cm" svg:x2="4.4cm" svg:y2="18cm">
          <text:p/>
        </draw:line>
        <draw:line draw:style-name="gr673" draw:text-style-name="P4" draw:layer="layout" svg:x1="2.5cm" svg:y1="19.5cm" svg:x2="5.2cm" svg:y2="19.5cm">
          <text:p/>
        </draw:line>
        <draw:frame draw:style-name="gr674" draw:text-style-name="P9" draw:layer="layout" svg:width="3.3cm" svg:height="2.147cm" svg:x="31cm" svg:y="10.853cm">
          <draw:text-box>
            <text:p><text:span text:style-name="T2">DataB</text:span><text:span text:style-name="T2">us:</text:span></text:p>
            <text:p><text:span text:style-name="T2">- </text:span><text:span text:style-name="T2">Addre</text:span><text:span text:style-name="T2">ss</text:span></text:p>
            <text:p><text:span text:style-name="T2">- Data </text:span><text:span text:style-name="T2">write</text:span></text:p>
            <text:p><text:span text:style-name="T2">- Data </text:span><text:span text:style-name="T2">read</text:span></text:p>
          </draw:text-box>
        </draw:frame>
        <draw:line draw:style-name="gr675" draw:text-style-name="P4" draw:layer="layout" svg:x1="31.2cm" svg:y1="11.7cm" svg:x2="30.5cm" svg:y2="16.4cm">
          <text:p/>
        </draw:line>
        <draw:line draw:style-name="gr676" draw:text-style-name="P4" draw:layer="layout" svg:x1="31.2cm" svg:y1="12.2cm" svg:x2="31.1cm" svg:y2="16.7cm">
          <text:p/>
        </draw:line>
        <draw:line draw:style-name="gr677" draw:text-style-name="P4" draw:layer="layout" svg:x1="33.1cm" svg:y1="12.8cm" svg:x2="34.3cm" svg:y2="17cm">
          <text:p/>
        </draw:line>
        <draw:custom-shape draw:style-name="gr601" draw:text-style-name="P58"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678" draw:text-style-name="P49" draw:layer="layout" svg:width="1cm" svg:height="1cm" svg:x="19.7cm" svg:y="20.1cm">
          <text:p text:style-name="P48"><text:span text:style-name="T11">FW</text:span></text:p>
          <draw:enhanced-geometry svg:viewBox="0 0 21600 21600" draw:type="rectangle" draw:enhanced-path="M 0 0 L 21600 0 21600 21600 0 21600 0 0 Z N"/>
        </draw:custom-shape>
        <draw:line draw:style-name="gr593" draw:text-style-name="P4" draw:layer="layout" svg:x1="19.8cm" svg:y1="20.1cm" svg:x2="19.8cm" svg:y2="18.402cm">
          <text:p/>
        </draw:line>
        <draw:line draw:style-name="gr622" draw:text-style-name="P4" draw:layer="layout" svg:x1="20.2cm" svg:y1="20.1cm" svg:x2="20.2cm" svg:y2="17cm">
          <text:p/>
        </draw:line>
        <draw:line draw:style-name="gr593"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595" draw:text-style-name="P4" draw:layer="layout" svg:x1="19.2cm" svg:y1="8cm" svg:x2="19.2cm" svg:y2="18cm">
          <text:p/>
        </draw:line>
        <draw:custom-shape draw:style-name="gr368"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9.4cm" svg:y1="16.6cm" svg:x2="19.4cm" svg:y2="23cm">
          <text:p/>
        </draw:line>
        <draw:line draw:style-name="gr595" draw:text-style-name="P4" draw:layer="layout" svg:x1="20.5cm" svg:y1="17.7cm" svg:x2="20.5cm" svg:y2="19cm">
          <text:p/>
        </draw:line>
        <draw:frame draw:style-name="gr679" draw:text-style-name="P69" draw:layer="layout" svg:width="1.584cm" svg:height="0.725cm" svg:x="19.418cm" svg:y="16.775cm">
          <draw:text-box>
            <text:p><text:span text:style-name="T22">forwA</text:span></text:p>
          </draw:text-box>
        </draw:frame>
        <draw:frame draw:style-name="gr679" draw:text-style-name="P69" draw:layer="layout" svg:width="1.584cm" svg:height="0.725cm" svg:x="19.4cm" svg:y="18.875cm">
          <draw:text-box>
            <text:p><text:span text:style-name="T22">forwB</text:span></text:p>
          </draw:text-box>
        </draw:frame>
        <draw:line draw:style-name="gr38" draw:text-style-name="P4" draw:layer="layout" svg:x1="19cm" svg:y1="20cm" svg:x2="21cm" svg:y2="20cm">
          <text:p/>
        </draw:line>
        <draw:line draw:style-name="gr595" draw:text-style-name="P4" draw:layer="layout" svg:x1="28.3cm" svg:y1="17cm" svg:x2="28.3cm" svg:y2="23cm">
          <text:p/>
        </draw:line>
        <draw:custom-shape draw:style-name="gr368"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680" draw:text-style-name="P4" draw:layer="layout" svg:x1="20cm" svg:y1="21.5cm" svg:x2="20cm" svg:y2="21.1cm">
          <text:p/>
        </draw:line>
        <draw:line draw:style-name="gr680" draw:text-style-name="P4" draw:layer="layout" svg:x1="20.4cm" svg:y1="21.501cm" svg:x2="20.4cm" svg:y2="21.101cm">
          <text:p/>
        </draw:line>
        <draw:custom-shape draw:style-name="gr368"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1" draw:text-style-name="P36" draw:layer="layout" svg:width="1.006cm" svg:height="0.569cm" svg:x="19.394cm" svg:y="21.431cm">
          <draw:text-box>
            <text:p><text:span text:style-name="T11">Rs1</text:span></text:p>
          </draw:text-box>
        </draw:frame>
        <draw:frame draw:style-name="gr681" draw:text-style-name="P36" draw:layer="layout" svg:width="1.006cm" svg:height="0.569cm" svg:x="19.9cm" svg:y="21.431cm">
          <draw:text-box>
            <text:p><text:span text:style-name="T11">Rs2</text:span></text:p>
          </draw:text-box>
        </draw:frame>
        <draw:line draw:style-name="gr682" draw:text-style-name="P4" draw:layer="layout" svg:x1="23cm" svg:y1="20.4cm" svg:x2="20.7cm" svg:y2="20.4cm">
          <text:p/>
        </draw:line>
        <draw:line draw:style-name="gr682" draw:text-style-name="P4" draw:layer="layout" svg:x1="22.601cm" svg:y1="20.8cm" svg:x2="20.701cm" svg:y2="20.8cm">
          <text:p/>
        </draw:line>
        <draw:frame draw:style-name="gr683" draw:text-style-name="P36" draw:layer="layout" svg:width="2.583cm" svg:height="0.569cm" svg:x="22.119cm" svg:y="20cm">
          <draw:text-box>
            <text:p><text:span text:style-name="T11">EX/</text:span><text:span text:style-name="T11">MEM.Reg</text:span><text:span text:style-name="T11">Rd</text:span></text:p>
          </draw:text-box>
        </draw:frame>
        <draw:frame draw:style-name="gr684" draw:text-style-name="P36" draw:layer="layout" svg:width="2.661cm" svg:height="0.569cm" svg:x="22.1cm" svg:y="22.131cm">
          <draw:text-box>
            <text:p><text:span text:style-name="T11">MEM/</text:span><text:span text:style-name="T11">WB.RegR</text:span><text:span text:style-name="T11">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368"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368"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3" draw:text-style-name="P4" draw:layer="layout" svg:x1="20.7cm" svg:y1="22.7cm" svg:x2="20.7cm" svg:y2="21.1cm">
          <text:p/>
        </draw:line>
        <draw:custom-shape draw:style-name="gr685"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19.7cm" svg:y1="23.2cm" svg:x2="29cm" svg:y2="23.2cm">
          <text:p/>
        </draw:line>
        <draw:line draw:style-name="gr593" draw:text-style-name="P4" draw:layer="layout" svg:x1="19.7cm" svg:y1="23.2cm" svg:x2="19.7cm" svg:y2="21.1cm">
          <text:p/>
        </draw:line>
        <draw:custom-shape draw:style-name="gr685"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29cm" svg:y1="25.4cm" svg:x2="29cm" svg:y2="23.2cm">
          <text:p/>
        </draw:line>
        <draw:custom-shape draw:style-name="gr686" draw:text-style-name="P49" draw:layer="layout" svg:width="2cm" svg:height="2cm" svg:x="10cm" svg:y="11cm">
          <text:p text:style-name="P48"><text:span text:style-name="T11">Hazard</text:span></text:p>
          <draw:enhanced-geometry svg:viewBox="0 0 21600 21600" draw:type="rectangle" draw:enhanced-path="M 0 0 L 21600 0 21600 21600 0 21600 0 0 Z N"/>
        </draw:custom-shape>
        <draw:line draw:style-name="gr594" draw:text-style-name="P4" draw:layer="layout" svg:x1="10.302cm" svg:y1="16.5cm" svg:x2="10.3cm" svg:y2="13cm">
          <text:p/>
        </draw:line>
        <draw:custom-shape draw:style-name="gr601" draw:text-style-name="P58"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10.7cm" svg:y1="16.8cm" svg:x2="10.7cm" svg:y2="13.001cm">
          <text:p/>
        </draw:line>
        <draw:custom-shape draw:style-name="gr601" draw:text-style-name="P58"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3" draw:text-style-name="P4" draw:layer="layout" svg:x1="11cm" svg:y1="23.4cm" svg:x2="11cm" svg:y2="13cm">
          <text:p/>
        </draw:line>
        <draw:custom-shape draw:style-name="gr685"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20cm" svg:y1="24.3cm" svg:x2="20cm" svg:y2="23.4cm">
          <text:p/>
        </draw:line>
        <draw:line draw:style-name="gr622" draw:text-style-name="P4" draw:layer="layout" svg:x1="11cm" svg:y1="23.4cm" svg:x2="20cm" svg:y2="23.4cm">
          <text:p/>
        </draw:line>
        <draw:line draw:style-name="gr600" draw:text-style-name="P4" draw:layer="layout" svg:x1="11.3cm" svg:y1="23cm" svg:x2="19.2cm" svg:y2="23cm">
          <text:p/>
        </draw:line>
        <draw:line draw:style-name="gr594" draw:text-style-name="P4" draw:layer="layout" svg:x1="11.3cm" svg:y1="23cm" svg:x2="11.3cm" svg:y2="13.002cm">
          <text:p/>
        </draw:line>
        <draw:line draw:style-name="gr619" draw:text-style-name="P4" draw:layer="layout" svg:x1="19.2cm" svg:y1="21.9cm" svg:x2="19.2cm" svg:y2="23cm">
          <text:p/>
        </draw:line>
        <draw:custom-shape draw:style-name="gr601" draw:text-style-name="P58"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2" draw:text-style-name="P4" draw:layer="layout" svg:x1="12cm" svg:y1="12cm" svg:x2="14cm" svg:y2="12cm">
          <text:p/>
        </draw:line>
        <draw:frame draw:style-name="gr687" draw:text-style-name="P9" draw:layer="layout" svg:width="1.255cm" svg:height="0.725cm" svg:x="13.777cm" svg:y="11.9cm">
          <draw:text-box>
            <text:p><text:span text:style-name="T2">stall</text:span></text:p>
          </draw:text-box>
        </draw:frame>
        <draw:line draw:style-name="gr592" draw:text-style-name="P4" draw:layer="layout" svg:x1="10.3cm" svg:y1="8.4cm" svg:x2="9.5cm" svg:y2="9.007cm">
          <text:p/>
        </draw:line>
        <draw:frame draw:style-name="gr687" draw:text-style-name="P9" draw:layer="layout" svg:width="1.255cm" svg:height="0.725cm" svg:x="10.1cm" svg:y="8cm">
          <draw:text-box>
            <text:p><text:span text:style-name="T2">stall</text:span></text:p>
          </draw:text-box>
        </draw:frame>
        <draw:line draw:style-name="gr592" draw:text-style-name="P4" draw:layer="layout" svg:x1="3cm" svg:y1="15.593cm" svg:x2="3.5cm" svg:y2="16.9cm">
          <text:p/>
        </draw:line>
        <draw:frame draw:style-name="gr687"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688" draw:text-style-name="P59" draw:layer="layout" svg:width="0.737cm" svg:height="0.725cm" svg:x="15.465cm" svg:y="26.9cm">
          <draw:text-box>
            <text:p><text:span text:style-name="T19">0</text:span></text:p>
          </draw:text-box>
        </draw:frame>
        <draw:line draw:style-name="gr689" draw:text-style-name="P4" draw:layer="layout" svg:x1="16cm" svg:y1="27.2cm" svg:x2="17cm" svg:y2="27.1cm">
          <text:p/>
        </draw:line>
        <draw:frame draw:style-name="gr687" draw:text-style-name="P9" draw:layer="layout" svg:width="1.255cm" svg:height="0.725cm" svg:x="17.749cm" svg:y="27.2cm">
          <draw:text-box>
            <text:p><text:span text:style-name="T2">stall</text:span></text:p>
          </draw:text-box>
        </draw:frame>
        <draw:line draw:style-name="gr690" draw:text-style-name="P4" draw:layer="layout" svg:x1="17.9cm" svg:y1="27.6cm" svg:x2="17.3cm" svg:y2="27.2cm">
          <text:p/>
        </draw:line>
        <draw:line draw:style-name="gr691" draw:text-style-name="P4" draw:layer="layout" svg:x1="35.001cm" svg:y1="21cm" svg:x2="36cm" svg:y2="21cm">
          <text:p/>
        </draw:line>
        <draw:line draw:style-name="gr691" draw:text-style-name="P4" draw:layer="layout" svg:x1="35.002cm" svg:y1="21.9cm" svg:x2="36.001cm" svg:y2="21.9cm">
          <text:p/>
        </draw:line>
        <draw:line draw:style-name="gr691" draw:text-style-name="P4" draw:layer="layout" svg:x1="35.002cm" svg:y1="17cm" svg:x2="36.001cm" svg:y2="17cm">
          <text:p/>
        </draw:line>
        <draw:line draw:style-name="gr691" draw:text-style-name="P4" draw:layer="layout" svg:x1="35.003cm" svg:y1="10cm" svg:x2="36.002cm" svg:y2="10cm">
          <text:p/>
        </draw:line>
        <draw:line draw:style-name="gr691" draw:text-style-name="P4" draw:layer="layout" svg:x1="35.004cm" svg:y1="23.7cm" svg:x2="36.003cm" svg:y2="23.7cm">
          <text:p/>
        </draw:line>
        <draw:line draw:style-name="gr691" draw:text-style-name="P4" draw:layer="layout" svg:x1="35.005cm" svg:y1="25.4cm" svg:x2="36.004cm" svg:y2="25.4cm">
          <text:p/>
        </draw:line>
        <draw:frame draw:style-name="gr692" draw:text-style-name="P62" draw:layer="layout" svg:width="10.193cm" svg:height="0.806cm" svg:x="27.5cm" svg:y="4.594cm">
          <draw:text-box>
            <text:p><text:span text:style-name="T20">Beca</text:span><text:span text:style-name="T20">use </text:span><text:span text:style-name="T20">of the </text:span><text:span text:style-name="T20">write </text:span><text:span text:style-name="T20">clock </text:span><text:span text:style-name="T20">of the </text:span><text:span text:style-name="T20">regist</text:span><text:span text:style-name="T20">er file</text:span></text:p>
          </draw:text-box>
        </draw:frame>
        <draw:line draw:style-name="gr693" draw:text-style-name="P4" draw:layer="layout" svg:x1="32.8cm" svg:y1="5.4cm" svg:x2="35.501cm" svg:y2="10cm">
          <text:p/>
        </draw:line>
        <draw:line draw:style-name="gr691" draw:text-style-name="P4" draw:layer="layout" svg:x1="27.001cm" svg:y1="19cm" svg:x2="28cm" svg:y2="19cm">
          <text:p/>
        </draw:line>
        <draw:line draw:style-name="gr691" draw:text-style-name="P4" draw:layer="layout" svg:x1="27.001cm" svg:y1="24cm" svg:x2="28cm" svg:y2="24cm">
          <text:p/>
        </draw:line>
        <draw:line draw:style-name="gr694" draw:text-style-name="P4" draw:layer="layout" svg:x1="27cm" svg:y1="17cm" svg:x2="27.999cm" svg:y2="17cm">
          <text:p/>
        </draw:line>
        <draw:frame draw:style-name="gr695" draw:text-style-name="P62" draw:layer="layout" svg:width="2.897cm" svg:height="1.361cm" svg:x="27.7cm" svg:y="13.3cm">
          <draw:text-box>
            <text:p><text:span text:style-name="T20">… </text:span><text:span text:style-name="T20">only </text:span><text:span text:style-name="T20">for </text:span></text:p>
            <text:p><text:span text:style-name="T20">store</text:span></text:p>
          </draw:text-box>
        </draw:frame>
        <draw:line draw:style-name="gr696" draw:text-style-name="P4" draw:layer="layout" svg:x1="28.6cm" svg:y1="14.5cm" svg:x2="27.5cm" svg:y2="17cm">
          <text:p/>
        </draw:line>
        <draw:frame draw:style-name="gr697" draw:text-style-name="P62" draw:layer="layout" svg:width="10.99cm" svg:height="0.806cm" svg:x="28.008cm" svg:y="27.594cm">
          <draw:text-box>
            <text:p><text:span text:style-name="T20">Beca</text:span><text:span text:style-name="T20">use </text:span><text:span text:style-name="T20">of the </text:span><text:span text:style-name="T20">write </text:span><text:span text:style-name="T20">clock </text:span><text:span text:style-name="T20">of the </text:span><text:span text:style-name="T20">d_me</text:span><text:span text:style-name="T20">m </text:span><text:span text:style-name="T20">(store</text:span><text:span text:style-name="T20">)</text:span></text:p>
          </draw:text-box>
        </draw:frame>
        <draw:line draw:style-name="gr698" draw:text-style-name="P4" draw:layer="layout" svg:x1="29.4cm" svg:y1="27.594cm" svg:x2="27.5cm" svg:y2="24cm">
          <text:p/>
        </draw:line>
        <draw:custom-shape draw:style-name="gr699"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Standard">
        <draw:line draw:style-name="gr592" draw:text-style-name="P4" draw:layer="layout" svg:x1="22.5cm" svg:y1="15.9cm" svg:x2="23.5cm" svg:y2="15.9cm">
          <text:p/>
        </draw:line>
        <draw:line draw:style-name="gr593" draw:text-style-name="P4" draw:layer="layout" svg:x1="14.4cm" svg:y1="19.6cm" svg:x2="14.4cm" svg:y2="18.3cm">
          <text:p/>
        </draw:line>
        <draw:line draw:style-name="gr592" draw:text-style-name="P4" draw:layer="layout" svg:x1="13cm" svg:y1="20cm" svg:x2="16.5cm" svg:y2="20cm">
          <text:p/>
        </draw:line>
        <draw:line draw:style-name="gr593" draw:text-style-name="P4" draw:layer="layout" svg:x1="33cm" svg:y1="20.6cm" svg:x2="33cm" svg:y2="17.8cm">
          <text:p/>
        </draw:line>
        <draw:line draw:style-name="gr593" draw:text-style-name="P4" draw:layer="layout" svg:x1="33cm" svg:y1="15cm" svg:x2="33cm" svg:y2="15.8cm">
          <text:p/>
        </draw:line>
        <draw:line draw:style-name="gr594" draw:text-style-name="P4" draw:layer="layout" svg:x1="30.5cm" svg:y1="16.4cm" svg:x2="32cm" svg:y2="16.4cm">
          <text:p/>
        </draw:line>
        <draw:line draw:style-name="gr592" draw:text-style-name="P4" draw:layer="layout" svg:x1="25cm" svg:y1="17cm" svg:x2="27cm" svg:y2="17cm">
          <text:p/>
        </draw:line>
        <draw:line draw:style-name="gr595" draw:text-style-name="P4" draw:layer="layout" svg:x1="28cm" svg:y1="17cm" svg:x2="28.3cm" svg:y2="17cm">
          <text:p/>
        </draw:line>
        <draw:line draw:style-name="gr596" draw:text-style-name="P4" draw:layer="layout" svg:x1="19cm" svg:y1="17.7cm" svg:x2="21.6cm" svg:y2="17.7cm">
          <text:p/>
        </draw:line>
        <draw:line draw:style-name="gr595" draw:text-style-name="P4" draw:layer="layout" svg:x1="21cm" svg:y1="20cm" svg:x2="21cm" svg:y2="12.5cm">
          <text:p/>
        </draw:line>
        <draw:line draw:style-name="gr595" draw:text-style-name="P4" draw:layer="layout" svg:x1="21cm" svg:y1="18.3cm" svg:x2="21.6cm" svg:y2="18.3cm">
          <text:p/>
        </draw:line>
        <draw:line draw:style-name="gr595" draw:text-style-name="P4" draw:layer="layout" svg:x1="20.5cm" svg:y1="17.7cm" svg:x2="20.5cm" svg:y2="19cm">
          <text:p/>
        </draw:line>
        <draw:line draw:style-name="gr593" draw:text-style-name="P4" draw:layer="layout" svg:x1="37.2cm" svg:y1="19cm" svg:x2="37.2cm" svg:y2="17.4cm">
          <text:p/>
        </draw:line>
        <draw:custom-shape draw:style-name="gr368"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30cm" svg:y1="17.5cm" svg:x2="30cm" svg:y2="21cm">
          <text:p/>
        </draw:line>
        <draw:line draw:style-name="gr595" draw:text-style-name="P4" draw:layer="layout" svg:x1="36cm" svg:y1="21cm" svg:x2="36.4cm" svg:y2="21cm">
          <text:p/>
        </draw:line>
        <draw:line draw:style-name="gr595" draw:text-style-name="P4" draw:layer="layout" svg:x1="36.4cm" svg:y1="21cm" svg:x2="36.4cm" svg:y2="17.3cm">
          <text:p/>
        </draw:line>
        <draw:line draw:style-name="gr597" draw:text-style-name="P4" draw:layer="layout" svg:x1="13cm" svg:y1="16.2cm" svg:x2="13.512cm" svg:y2="16.2cm">
          <text:p/>
        </draw:line>
        <draw:line draw:style-name="gr598" draw:text-style-name="P4" draw:layer="layout" svg:x1="13cm" svg:y1="8cm" svg:x2="37.5cm" svg:y2="8cm">
          <text:p/>
        </draw:line>
        <draw:line draw:style-name="gr598" draw:text-style-name="P4" draw:layer="layout" svg:x1="13cm" svg:y1="8cm" svg:x2="13cm" svg:y2="16.2cm">
          <text:p/>
        </draw:line>
        <draw:line draw:style-name="gr598" draw:text-style-name="P4" draw:layer="layout" svg:x1="37.5cm" svg:y1="17cm" svg:x2="37.5cm" svg:y2="8cm">
          <text:p/>
        </draw:line>
        <draw:line draw:style-name="gr592" draw:text-style-name="P4" draw:layer="layout" svg:x1="22.5cm" svg:y1="12.5cm" svg:x2="24cm" svg:y2="12.5cm">
          <text:p/>
        </draw:line>
        <draw:line draw:style-name="gr594" draw:text-style-name="P4" draw:layer="layout" svg:x1="9.5cm" svg:y1="10.5cm" svg:x2="18cm" svg:y2="10.5cm">
          <text:p/>
        </draw:line>
        <draw:line draw:style-name="gr594" draw:text-style-name="P4" draw:layer="layout" svg:x1="4.5cm" svg:y1="11.5cm" svg:x2="6cm" svg:y2="11.5cm">
          <text:p/>
        </draw:line>
        <draw:line draw:style-name="gr592" draw:text-style-name="P4" draw:layer="layout" svg:x1="5cm" svg:y1="10.9cm" svg:x2="6cm" svg:y2="10.9cm">
          <text:p/>
        </draw:line>
        <draw:frame draw:style-name="gr599" draw:text-style-name="P34" draw:layer="layout" svg:width="0.855cm" svg:height="0.962cm" svg:x="4.4cm" svg:y="10.4cm">
          <draw:text-box>
            <text:p><text:span text:style-name="T9">4</text:span></text:p>
          </draw:text-box>
        </draw:frame>
        <draw:line draw:style-name="gr600" draw:text-style-name="P4" draw:layer="layout" svg:x1="4.5cm" svg:y1="12.5cm" svg:x2="8cm" svg:y2="12.5cm">
          <text:p/>
        </draw:line>
        <draw:line draw:style-name="gr600" draw:text-style-name="P4" draw:layer="layout" svg:x1="8cm" svg:y1="12.5cm" svg:x2="8cm" svg:y2="10.5cm">
          <text:p/>
        </draw:line>
        <draw:custom-shape draw:style-name="gr601" draw:text-style-name="P58"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0" draw:text-style-name="P4" draw:layer="layout" svg:x1="2cm" svg:y1="8cm" svg:x2="5.9cm" svg:y2="8cm">
          <text:p/>
        </draw:line>
        <draw:line draw:style-name="gr600" draw:text-style-name="P4" draw:layer="layout" svg:x1="26cm" svg:y1="11.5cm" svg:x2="26cm" svg:y2="7.7cm">
          <text:p/>
        </draw:line>
        <draw:line draw:style-name="gr602" draw:text-style-name="P4" draw:layer="layout" svg:x1="7.5cm" svg:y1="11.2cm" svg:x2="7.5cm" svg:y2="8.3cm">
          <text:p/>
        </draw:line>
        <draw:line draw:style-name="gr600" draw:text-style-name="P4" draw:layer="layout" svg:x1="6.975cm" svg:y1="11.201cm" svg:x2="7.5cm" svg:y2="11.2cm">
          <text:p/>
        </draw:line>
        <draw:line draw:style-name="gr600" draw:text-style-name="P4" draw:layer="layout" svg:x1="6.4cm" svg:y1="8.3cm" svg:x2="7.5cm" svg:y2="8.3cm">
          <text:p/>
        </draw:line>
        <draw:line draw:style-name="gr600" draw:text-style-name="P4" draw:layer="layout" svg:x1="6.4cm" svg:y1="7.7cm" svg:x2="26cm" svg:y2="7.7cm">
          <text:p/>
        </draw:line>
        <draw:line draw:style-name="gr594" draw:text-style-name="P4" draw:layer="layout" svg:x1="4cm" svg:y1="17.4cm" svg:x2="5cm" svg:y2="17.4cm">
          <text:p/>
        </draw:line>
        <draw:line draw:style-name="gr592" draw:text-style-name="P4" draw:layer="layout" svg:x1="7.5cm" svg:y1="17cm" svg:x2="8.5cm" svg:y2="17cm">
          <text:p/>
        </draw:line>
        <draw:custom-shape draw:style-name="gr60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1" draw:text-style-name="P58"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2cm" svg:y1="17.4cm" svg:x2="3.5cm" svg:y2="17.4cm">
          <text:p/>
        </draw:line>
        <draw:line draw:style-name="gr595" draw:text-style-name="P4" draw:layer="layout" svg:x1="10cm" svg:y1="17cm" svg:x2="10cm" svg:y2="20cm">
          <text:p/>
        </draw:line>
        <draw:frame draw:style-name="gr604" draw:text-style-name="P59" draw:layer="layout" svg:width="2.06cm" svg:height="0.725cm" svg:x="4.84cm" svg:y="16.6cm">
          <draw:text-box>
            <text:p><text:span text:style-name="T19">Addre</text:span><text:span text:style-name="T19">ss</text:span></text:p>
          </draw:text-box>
        </draw:frame>
        <draw:frame draw:style-name="gr605" draw:text-style-name="P59" draw:layer="layout" svg:width="1.42cm" svg:height="0.725cm" svg:x="7.3cm" svg:y="16.9cm">
          <draw:text-box>
            <text:p><text:span text:style-name="T19">Instr.</text:span></text:p>
          </draw:text-box>
        </draw:frame>
        <draw:line draw:style-name="gr600" draw:text-style-name="P4" draw:layer="layout" svg:x1="2cm" svg:y1="8cm" svg:x2="2cm" svg:y2="17.4cm">
          <text:p/>
        </draw:line>
        <draw:line draw:style-name="gr602" draw:text-style-name="P4" draw:layer="layout" svg:x1="4.5cm" svg:y1="17.4cm" svg:x2="4.5cm" svg:y2="11.5cm">
          <text:p/>
        </draw:line>
        <draw:line draw:style-name="gr595" draw:text-style-name="P4" draw:layer="layout" svg:x1="10cm" svg:y1="20cm" svg:x2="13cm" svg:y2="20cm">
          <text:p/>
        </draw:line>
        <draw:line draw:style-name="gr594" draw:text-style-name="P4" draw:layer="layout" svg:x1="10.5cm" svg:y1="16.8cm" svg:x2="13.512cm" svg:y2="16.8cm">
          <text:p/>
        </draw:line>
        <draw:line draw:style-name="gr594" draw:text-style-name="P4" draw:layer="layout" svg:x1="10.502cm" svg:y1="16.5cm" svg:x2="13.512cm" svg:y2="16.5cm">
          <text:p/>
        </draw:line>
        <draw:custom-shape draw:style-name="gr606" draw:text-style-name="P61" draw:layer="layout" svg:width="1cm" svg:height="1.6cm" svg:x="21.5cm" svg:y="11.7cm">
          <text:p text:style-name="P60"><text:span text:style-name="T19">Shift</text:span></text:p>
          <text:p text:style-name="P60"><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2" draw:text-style-name="P4" draw:layer="layout" svg:x1="21cm" svg:y1="12.5cm" svg:x2="21.5cm" svg:y2="12.5cm">
          <text:p/>
        </draw:line>
        <draw:frame draw:style-name="gr607" draw:text-style-name="P59" draw:layer="layout" svg:width="3.787cm" svg:height="0.725cm" svg:x="10.2cm" svg:y="15.9cm">
          <draw:text-box>
            <text:p><text:span text:style-name="T19">Instr.</text:span><text:span text:style-name="T19">[19-15]</text:span></text:p>
          </draw:text-box>
        </draw:frame>
        <draw:frame draw:style-name="gr607" draw:text-style-name="P59" draw:layer="layout" svg:width="3.787cm" svg:height="0.725cm" svg:x="10.2cm" svg:y="16.4cm">
          <draw:text-box>
            <text:p><text:span text:style-name="T19">Instr.</text:span><text:span text:style-name="T19">[24-20]</text:span></text:p>
          </draw:text-box>
        </draw:frame>
        <draw:frame draw:style-name="gr608" draw:text-style-name="P59" draw:layer="layout" svg:width="8.545cm" svg:height="0.725cm" svg:x="28.8cm" svg:y="21.975cm">
          <draw:text-box>
            <text:p><text:span text:style-name="T19">Regist</text:span><text:span text:style-name="T19">er </text:span><text:span text:style-name="T19">addres</text:span><text:span text:style-name="T19">s: </text:span><text:span text:style-name="T19">delaye</text:span><text:span text:style-name="T19">d </text:span><text:span text:style-name="T19">instruc</text:span><text:span text:style-name="T19">tion[11</text:span><text:span text:style-name="T19">-7]</text:span></text:p>
          </draw:text-box>
        </draw:frame>
        <draw:line draw:style-name="gr609" draw:text-style-name="P38" draw:layer="layout" svg:x1="10.704cm" svg:y1="19.806cm" svg:x2="11.104cm" svg:y2="20.206cm">
          <text:p/>
        </draw:line>
        <draw:frame draw:style-name="gr610" draw:text-style-name="P59" draw:layer="layout" svg:width="0.976cm" svg:height="0.725cm" svg:x="10.3cm" svg:y="19.277cm">
          <draw:text-box>
            <text:p><text:span text:style-name="T19">32</text:span></text:p>
          </draw:text-box>
        </draw:frame>
        <draw:line draw:style-name="gr593" draw:text-style-name="P4" draw:layer="layout" svg:x1="21.3cm" svg:y1="25.7cm" svg:x2="21.3cm" svg:y2="11.2cm">
          <text:p/>
        </draw:line>
        <draw:line draw:style-name="gr38" draw:text-style-name="P4" draw:layer="layout" svg:x1="36cm" svg:y1="17cm" svg:x2="36.8cm" svg:y2="17cm">
          <text:p/>
        </draw:line>
        <draw:g draw:style-name="gr1">
          <draw:custom-shape draw:style-name="gr611" draw:text-style-name="P29" draw:layer="layout" svg:width="0.5cm" svg:height="13cm" svg:x="18cm" svg:y="9cm">
            <text:p/>
            <draw:enhanced-geometry svg:viewBox="0 0 21600 21600" draw:type="rectangle" draw:enhanced-path="M 0 0 L 21600 0 21600 21600 0 21600 0 0 Z N"/>
          </draw:custom-shape>
          <draw:custom-shape draw:style-name="gr611" draw:text-style-name="P29" draw:layer="layout" svg:width="0.5cm" svg:height="13cm" svg:x="18.5cm" svg:y="9cm">
            <text:p/>
            <draw:enhanced-geometry svg:viewBox="0 0 21600 21600" draw:type="rectangle" draw:enhanced-path="M 0 0 L 21600 0 21600 21600 0 21600 0 0 Z N"/>
          </draw:custom-shape>
        </draw:g>
        <draw:frame draw:style-name="gr612" draw:text-style-name="P62" draw:layer="layout" svg:width="1.797cm" svg:height="0.806cm" svg:x="17.7cm" svg:y="8.2cm">
          <draw:text-box>
            <text:p><text:span text:style-name="T20">ID/EX</text:span></text:p>
          </draw:text-box>
        </draw:frame>
        <draw:g draw:style-name="gr1">
          <draw:custom-shape draw:style-name="gr611" draw:text-style-name="P29" draw:layer="layout" svg:width="0.5cm" svg:height="13cm" svg:x="8.5cm" svg:y="9.001cm">
            <text:p/>
            <draw:enhanced-geometry svg:viewBox="0 0 21600 21600" draw:type="rectangle" draw:enhanced-path="M 0 0 L 21600 0 21600 21600 0 21600 0 0 Z N"/>
          </draw:custom-shape>
          <draw:custom-shape draw:style-name="gr611" draw:text-style-name="P29" draw:layer="layout" svg:width="0.5cm" svg:height="13cm" svg:x="9cm" svg:y="9.001cm">
            <text:p/>
            <draw:enhanced-geometry svg:viewBox="0 0 21600 21600" draw:type="rectangle" draw:enhanced-path="M 0 0 L 21600 0 21600 21600 0 21600 0 0 Z N"/>
          </draw:custom-shape>
        </draw:g>
        <draw:frame draw:style-name="gr613" draw:text-style-name="P62" draw:layer="layout" svg:width="1.577cm" svg:height="0.806cm" svg:x="8.2cm" svg:y="8.201cm">
          <draw:text-box>
            <text:p><text:span text:style-name="T20">IF/ID</text:span></text:p>
          </draw:text-box>
        </draw:frame>
        <draw:g draw:style-name="gr1">
          <draw:custom-shape draw:style-name="gr611" draw:text-style-name="P29" draw:layer="layout" svg:width="0.5cm" svg:height="13cm" svg:x="27cm" svg:y="9.002cm">
            <text:p/>
            <draw:enhanced-geometry svg:viewBox="0 0 21600 21600" draw:type="rectangle" draw:enhanced-path="M 0 0 L 21600 0 21600 21600 0 21600 0 0 Z N"/>
          </draw:custom-shape>
          <draw:custom-shape draw:style-name="gr611" draw:text-style-name="P29" draw:layer="layout" svg:width="0.5cm" svg:height="13cm" svg:x="27.5cm" svg:y="9.002cm">
            <text:p/>
            <draw:enhanced-geometry svg:viewBox="0 0 21600 21600" draw:type="rectangle" draw:enhanced-path="M 0 0 L 21600 0 21600 21600 0 21600 0 0 Z N"/>
          </draw:custom-shape>
        </draw:g>
        <draw:frame draw:style-name="gr614" draw:text-style-name="P62" draw:layer="layout" svg:width="2.456cm" svg:height="0.806cm" svg:x="26.6cm" svg:y="8.202cm">
          <draw:text-box>
            <text:p><text:span text:style-name="T20">EX/</text:span><text:span text:style-name="T20">MEM</text:span></text:p>
          </draw:text-box>
        </draw:frame>
        <draw:g draw:style-name="gr1">
          <draw:custom-shape draw:style-name="gr611" draw:text-style-name="P29" draw:layer="layout" svg:width="0.5cm" svg:height="13cm" svg:x="35.001cm" svg:y="9.003cm">
            <text:p/>
            <draw:enhanced-geometry svg:viewBox="0 0 21600 21600" draw:type="rectangle" draw:enhanced-path="M 0 0 L 21600 0 21600 21600 0 21600 0 0 Z N"/>
          </draw:custom-shape>
          <draw:custom-shape draw:style-name="gr611" draw:text-style-name="P29" draw:layer="layout" svg:width="0.5cm" svg:height="13cm" svg:x="35.501cm" svg:y="9.003cm">
            <text:p/>
            <draw:enhanced-geometry svg:viewBox="0 0 21600 21600" draw:type="rectangle" draw:enhanced-path="M 0 0 L 21600 0 21600 21600 0 21600 0 0 Z N"/>
          </draw:custom-shape>
        </draw:g>
        <draw:frame draw:style-name="gr615" draw:text-style-name="P62" draw:layer="layout" svg:width="2.593cm" svg:height="0.806cm" svg:x="34.101cm" svg:y="8.203cm">
          <draw:text-box>
            <text:p><text:span text:style-name="T20">MEM/</text:span><text:span text:style-name="T20">WB</text:span></text:p>
          </draw:text-box>
        </draw:frame>
        <draw:line draw:style-name="gr594" draw:text-style-name="P4" draw:layer="layout" svg:x1="8cm" svg:y1="10.5cm" svg:x2="8.5cm" svg:y2="10.5cm">
          <text:p/>
        </draw:line>
        <draw:line draw:style-name="gr594" draw:text-style-name="P4" draw:layer="layout" svg:x1="19cm" svg:y1="10.5cm" svg:x2="21cm" svg:y2="10.5cm">
          <text:p/>
        </draw:line>
        <draw:line draw:style-name="gr592" draw:text-style-name="P4" draw:layer="layout" svg:x1="17cm" svg:y1="16cm" svg:x2="18cm" svg:y2="16cm">
          <text:p/>
        </draw:line>
        <draw:line draw:style-name="gr592" draw:text-style-name="P4" draw:layer="layout" svg:x1="17cm" svg:y1="17.7cm" svg:x2="18cm" svg:y2="17.7cm">
          <text:p/>
        </draw:line>
        <draw:line draw:style-name="gr592" draw:text-style-name="P4" draw:layer="layout" svg:x1="17.5cm" svg:y1="20cm" svg:x2="18cm" svg:y2="20cm">
          <text:p/>
        </draw:line>
        <draw:line draw:style-name="gr592" draw:text-style-name="P4" draw:layer="layout" svg:x1="20.5cm" svg:y1="19cm" svg:x2="27cm" svg:y2="19cm">
          <text:p/>
        </draw:line>
        <draw:line draw:style-name="gr592" draw:text-style-name="P4" draw:layer="layout" svg:x1="34cm" svg:y1="17cm" svg:x2="35cm" svg:y2="17cm">
          <text:p/>
        </draw:line>
        <draw:line draw:style-name="gr616" draw:text-style-name="P4" draw:layer="layout" svg:x1="30cm" svg:y1="21cm" svg:x2="35cm" svg:y2="21cm">
          <text:p/>
        </draw:line>
        <draw:line draw:style-name="gr38" draw:text-style-name="P4" draw:layer="layout" svg:x1="9.5cm" svg:y1="17cm" svg:x2="10.3cm" svg:y2="17cm">
          <text:p/>
        </draw:line>
        <draw:custom-shape draw:style-name="gr36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7" draw:text-style-name="P4" draw:layer="layout" svg:x1="10cm" svg:y1="20cm" svg:x2="10cm" svg:y2="24.2cm">
          <text:p/>
        </draw:line>
        <draw:line draw:style-name="gr618" draw:text-style-name="P4" draw:layer="layout" svg:x1="10cm" svg:y1="21.9cm" svg:x2="18cm" svg:y2="21.9cm">
          <text:p/>
        </draw:line>
        <draw:line draw:style-name="gr618" draw:text-style-name="P4" draw:layer="layout" svg:x1="19cm" svg:y1="21.9cm" svg:x2="27cm" svg:y2="21.9cm">
          <text:p/>
        </draw:line>
        <draw:line draw:style-name="gr618" draw:text-style-name="P4" draw:layer="layout" svg:x1="28cm" svg:y1="21.9cm" svg:x2="35cm" svg:y2="21.9cm">
          <text:p/>
        </draw:line>
        <draw:line draw:style-name="gr619" draw:text-style-name="P4" draw:layer="layout" svg:x1="36cm" svg:y1="21.9cm" svg:x2="37cm" svg:y2="21.9cm">
          <text:p/>
        </draw:line>
        <draw:line draw:style-name="gr619" draw:text-style-name="P4" draw:layer="layout" svg:x1="37cm" svg:y1="21.9cm" svg:x2="37cm" svg:y2="22.5cm">
          <text:p/>
        </draw:line>
        <draw:line draw:style-name="gr619" draw:text-style-name="P4" draw:layer="layout" svg:x1="37cm" svg:y1="22.5cm" svg:x2="9.7cm" svg:y2="22.5cm">
          <text:p/>
        </draw:line>
        <draw:line draw:style-name="gr619" draw:text-style-name="P4" draw:layer="layout" svg:x1="9.7cm" svg:y1="17.2cm" svg:x2="9.7cm" svg:y2="22.5cm">
          <text:p/>
        </draw:line>
        <draw:line draw:style-name="gr594" draw:text-style-name="P4" draw:layer="layout" svg:x1="9.7cm" svg:y1="17.2cm" svg:x2="13.512cm" svg:y2="17.2cm">
          <text:p/>
        </draw:line>
        <draw:frame draw:style-name="gr620" draw:text-style-name="P63" draw:layer="layout" svg:width="1.725cm" svg:height="0.725cm" svg:x="6.701cm" svg:y="6.476cm">
          <draw:text-box>
            <text:p><text:span text:style-name="T21">PCSrc</text:span></text:p>
          </draw:text-box>
        </draw:frame>
        <draw:custom-shape draw:style-name="gr621" draw:text-style-name="P64"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622" draw:text-style-name="P65" draw:layer="layout" svg:x1="26.4cm" svg:y1="6.3cm" svg:x2="24cm" svg:y2="6.3cm">
          <text:p/>
        </draw:line>
        <draw:line draw:style-name="gr622" draw:text-style-name="P4" draw:layer="layout" svg:x1="26.2cm" svg:y1="7.3cm" svg:x2="24cm" svg:y2="7.301cm">
          <text:p/>
        </draw:line>
        <draw:frame draw:style-name="gr623" draw:text-style-name="P63" draw:layer="layout" svg:width="2.243cm" svg:height="0.725cm" svg:x="24.001cm" svg:y="5.577cm">
          <draw:text-box>
            <text:p><text:span text:style-name="T21">branch</text:span><text:span text:style-name="T21">_s</text:span></text:p>
          </draw:text-box>
        </draw:frame>
        <draw:line draw:style-name="gr622" draw:text-style-name="P4" draw:layer="layout" svg:x1="26.2cm" svg:y1="16.7cm" svg:x2="26.2cm" svg:y2="7.3cm">
          <text:p/>
        </draw:line>
        <draw:line draw:style-name="gr622" draw:text-style-name="P4" draw:layer="layout" svg:x1="26.2cm" svg:y1="16.7cm" svg:x2="25cm" svg:y2="16.7cm">
          <text:p/>
        </draw:line>
        <draw:line draw:style-name="gr593" draw:text-style-name="P4" draw:layer="layout" svg:x1="24.5cm" svg:y1="26.3cm" svg:x2="24.5cm" svg:y2="17.7cm">
          <text:p/>
        </draw:line>
        <draw:line draw:style-name="gr624" draw:text-style-name="P38" draw:layer="layout" svg:x1="24.3cm" svg:y1="18.4cm" svg:x2="24.7cm" svg:y2="18.8cm">
          <text:p/>
        </draw:line>
        <draw:line draw:style-name="gr622" draw:text-style-name="P4" draw:layer="layout" svg:x1="19cm" svg:y1="26.3cm" svg:x2="24.5cm" svg:y2="26.3cm">
          <text:p/>
        </draw:line>
        <draw:custom-shape draw:style-name="gr625" draw:text-style-name="P66" draw:layer="layout" svg:width="1cm" svg:height="3.5cm" svg:x="18cm" svg:y="23.5cm">
          <text:p/>
          <draw:enhanced-geometry svg:viewBox="0 0 21600 21600" draw:type="rectangle" draw:enhanced-path="M 0 0 L 21600 0 21600 21600 0 21600 0 0 Z N"/>
        </draw:custom-shape>
        <draw:custom-shape draw:style-name="gr625" draw:text-style-name="P66" draw:layer="layout" svg:width="1cm" svg:height="3.5cm" svg:x="27cm" svg:y="23.5cm">
          <text:p/>
          <draw:enhanced-geometry svg:viewBox="0 0 21600 21600" draw:type="rectangle" draw:enhanced-path="M 0 0 L 21600 0 21600 21600 0 21600 0 0 Z N"/>
        </draw:custom-shape>
        <draw:custom-shape draw:style-name="gr626" draw:text-style-name="P66" draw:layer="layout" svg:width="1cm" svg:height="4cm" svg:x="35cm" svg:y="23cm">
          <text:p/>
          <draw:enhanced-geometry svg:viewBox="0 0 21600 21600" draw:type="rectangle" draw:enhanced-path="M 0 0 L 21600 0 21600 21600 0 21600 0 0 Z N"/>
        </draw:custom-shape>
        <draw:line draw:style-name="gr627" draw:text-style-name="P67" draw:layer="layout" svg:x1="19cm" svg:y1="25.4cm" svg:x2="27cm" svg:y2="25.4cm">
          <text:p/>
        </draw:line>
        <draw:line draw:style-name="gr627" draw:text-style-name="P67" draw:layer="layout" svg:x1="28cm" svg:y1="25.4cm" svg:x2="35cm" svg:y2="25.4cm">
          <text:p/>
        </draw:line>
        <draw:line draw:style-name="gr627" draw:text-style-name="P67" draw:layer="layout" svg:x1="28cm" svg:y1="23.7cm" svg:x2="35cm" svg:y2="23.7cm">
          <text:p/>
        </draw:line>
        <draw:line draw:style-name="gr627" draw:text-style-name="P67" draw:layer="layout" svg:x1="15cm" svg:y1="26.6cm" svg:x2="18cm" svg:y2="26.6cm">
          <text:p/>
        </draw:line>
        <draw:line draw:style-name="gr627" draw:text-style-name="P67" draw:layer="layout" svg:x1="15cm" svg:y1="26.9cm" svg:x2="18cm" svg:y2="26.9cm">
          <text:p/>
        </draw:line>
        <draw:line draw:style-name="gr622" draw:text-style-name="P4" draw:layer="layout" svg:x1="26.4cm" svg:y1="26.6cm" svg:x2="26.4cm" svg:y2="6.3cm">
          <text:p/>
        </draw:line>
        <draw:line draw:style-name="gr622" draw:text-style-name="P4" draw:layer="layout" svg:x1="34.4cm" svg:y1="20.3cm" svg:x2="34.4cm" svg:y2="15cm">
          <text:p/>
        </draw:line>
        <draw:line draw:style-name="gr622" draw:text-style-name="P4" draw:layer="layout" svg:x1="33cm" svg:y1="15cm" svg:x2="34.4cm" svg:y2="15cm">
          <text:p/>
        </draw:line>
        <draw:line draw:style-name="gr622" draw:text-style-name="P4" draw:layer="layout" svg:x1="33.2cm" svg:y1="20.3cm" svg:x2="34.4cm" svg:y2="20.3cm">
          <text:p/>
        </draw:line>
        <draw:line draw:style-name="gr622" draw:text-style-name="P4" draw:layer="layout" svg:x1="33cm" svg:y1="24.3cm" svg:x2="33cm" svg:y2="20.6cm">
          <text:p/>
        </draw:line>
        <draw:line draw:style-name="gr622" draw:text-style-name="P4" draw:layer="layout" svg:x1="33.2cm" svg:y1="24cm" svg:x2="33.2cm" svg:y2="20.3cm">
          <text:p/>
        </draw:line>
        <draw:line draw:style-name="gr622" draw:text-style-name="P4" draw:layer="layout" svg:x1="28cm" svg:y1="24cm" svg:x2="33.2cm" svg:y2="24cm">
          <text:p/>
        </draw:line>
        <draw:frame draw:style-name="gr628" draw:text-style-name="P63" draw:layer="layout" svg:width="1.4cm" svg:height="0.725cm" svg:x="24.9cm" svg:y="16.075cm">
          <draw:text-box>
            <text:p><text:span text:style-name="T21">Zero</text:span></text:p>
          </draw:text-box>
        </draw:frame>
        <draw:line draw:style-name="gr622" draw:text-style-name="P4" draw:layer="layout" svg:x1="14.4cm" svg:y1="22.7cm" svg:x2="36.5cm" svg:y2="22.7cm">
          <text:p/>
        </draw:line>
        <draw:line draw:style-name="gr622" draw:text-style-name="P4" draw:layer="layout" svg:x1="14.4cm" svg:y1="22.7cm" svg:x2="14.4cm" svg:y2="19.6cm">
          <text:p/>
        </draw:line>
        <draw:line draw:style-name="gr622" draw:text-style-name="P4" draw:layer="layout" svg:x1="36cm" svg:y1="25.4cm" svg:x2="36.5cm" svg:y2="25.4cm">
          <text:p/>
        </draw:line>
        <draw:line draw:style-name="gr622" draw:text-style-name="P4" draw:layer="layout" svg:x1="36cm" svg:y1="23.7cm" svg:x2="37.2cm" svg:y2="23.7cm">
          <text:p/>
        </draw:line>
        <draw:line draw:style-name="gr622" draw:text-style-name="P4" draw:layer="layout" svg:x1="36.5cm" svg:y1="25.4cm" svg:x2="36.5cm" svg:y2="22.7cm">
          <text:p/>
        </draw:line>
        <draw:line draw:style-name="gr622" draw:text-style-name="P4" draw:layer="layout" svg:x1="37.2cm" svg:y1="23.7cm" svg:x2="37.2cm" svg:y2="19cm">
          <text:p/>
        </draw:line>
        <draw:line draw:style-name="gr592" draw:text-style-name="P4" draw:layer="layout" svg:x1="10cm" svg:y1="24cm" svg:x2="11cm" svg:y2="24cm">
          <text:p/>
        </draw:line>
        <draw:g draw:style-name="gr1">
          <draw:custom-shape draw:style-name="gr629" draw:text-style-name="P49" draw:layer="layout" svg:width="2.5cm" svg:height="3cm" svg:x="5cm" svg:y="15.1cm">
            <text:p text:style-name="P48"><text:span text:style-name="T11">IMem</text:span></text:p>
            <draw:enhanced-geometry svg:viewBox="0 0 21600 21600" draw:mirror-horizontal="false" draw:mirror-vertical="false" draw:type="rectangle" draw:enhanced-path="M 0 0 L 21600 0 21600 21600 0 21600 0 0 Z N"/>
          </draw:custom-shape>
          <draw:frame draw:style-name="gr630" draw:text-style-name="P36" draw:layer="layout" svg:width="2.378cm" svg:height="0.569cm" svg:x="4.8cm" svg:y="15.431cm">
            <draw:text-box>
              <text:p><text:span text:style-name="T11">loadData(</text:span><text:span text:style-name="T11">31:0)</text:span></text:p>
            </draw:text-box>
          </draw:frame>
          <draw:frame draw:style-name="gr630" draw:text-style-name="P36" draw:layer="layout" svg:width="2.378cm" svg:height="0.569cm" svg:x="4.812cm" svg:y="15.116cm">
            <draw:text-box>
              <text:p><text:span text:style-name="T11">loadAddr(</text:span><text:span text:style-name="T11">63:0)</text:span></text:p>
            </draw:text-box>
          </draw:frame>
          <draw:frame draw:style-name="gr631" draw:text-style-name="P36" draw:layer="layout" svg:width="1.148cm" svg:height="0.569cm" svg:x="4.85cm" svg:y="15.716cm">
            <draw:text-box>
              <text:p><text:span text:style-name="T11">wrEn</text:span></text:p>
            </draw:text-box>
          </draw:frame>
          <draw:frame draw:style-name="gr632" draw:text-style-name="P36" draw:layer="layout" svg:width="2.41cm" svg:height="0.569cm" svg:x="4.82cm" svg:y="17.088cm">
            <draw:text-box>
              <text:p><text:span text:style-name="T11">readAddr(</text:span><text:span text:style-name="T11">63:0)</text:span></text:p>
            </draw:text-box>
          </draw:frame>
          <draw:frame draw:style-name="gr632" draw:text-style-name="P36" draw:layer="layout" svg:width="2.41cm" svg:height="0.569cm" svg:x="5.297cm" svg:y="16.7cm">
            <draw:text-box>
              <text:p><text:span text:style-name="T11">readData(</text:span><text:span text:style-name="T11">31:0)</text:span></text:p>
            </draw:text-box>
          </draw:frame>
        </draw:g>
        <draw:g draw:style-name="gr1">
          <draw:custom-shape draw:style-name="gr633" draw:text-style-name="P68" draw:layer="layout" svg:width="0.5cm" svg:height="1cm" svg:x="3.5cm" svg:y="16.9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ext:span><text:span text:style-name="T2">t</text:span></text:p>
          </draw:text-box>
        </draw:frame>
        <draw:frame draw:style-name="gr61" draw:text-style-name="P9" draw:layer="layout" svg:width="1.09cm" svg:height="0.725cm" svg:x="3.9cm" svg:y="17.4cm">
          <draw:text-box>
            <text:p><text:span text:style-name="T2">PC</text:span></text:p>
          </draw:text-box>
        </draw:frame>
        <draw:custom-shape draw:style-name="gr526" draw:text-style-name="P55" draw:layer="layout" svg:width="1cm" svg:height="1cm" svg:x="6cm" svg:y="10.7cm">
          <text:p text:style-name="P48"><text:span text:style-name="T11">+</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593" draw:text-style-name="P4" draw:layer="layout" svg:x1="6.2cm" svg:y1="7cm" svg:x2="6.2cm" svg:y2="7.6cm">
          <text:p/>
        </draw:line>
        <draw:line draw:style-name="gr622" draw:text-style-name="P4" draw:layer="layout" svg:x1="19.4cm" svg:y1="7cm" svg:x2="6.2cm" svg:y2="7cm">
          <text:p/>
        </draw:line>
        <draw:g draw:style-name="gr1">
          <draw:custom-shape draw:style-name="gr634" draw:text-style-name="P49" draw:layer="layout" svg:width="3.506cm" svg:height="2.5cm" svg:x="13.512cm" svg:y="15.8cm">
            <text:p text:style-name="P48"><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530" draw:text-style-name="P36" draw:layer="layout" svg:width="3.576cm" svg:height="0.569cm" svg:x="13.314cm" svg:y="16.2cm">
            <draw:text-box>
              <text:p><text:span text:style-name="T11">instr(19:1</text:span><text:span text:style-name="T11">5):raddr0</text:span><text:span text:style-name="T11">1(4:0)</text:span></text:p>
            </draw:text-box>
          </draw:frame>
          <draw:frame draw:style-name="gr530" draw:text-style-name="P36" draw:layer="layout" svg:width="3.576cm" svg:height="0.569cm" svg:x="13.312cm" svg:y="16.531cm">
            <draw:text-box>
              <text:p><text:span text:style-name="T11">instr(24:2</text:span><text:span text:style-name="T11">0):raddr0</text:span><text:span text:style-name="T11">2(4:0)</text:span></text:p>
            </draw:text-box>
          </draw:frame>
          <draw:frame draw:style-name="gr531" draw:text-style-name="P36" draw:layer="layout" svg:width="3.508cm" svg:height="0.569cm" svg:x="13.306cm" svg:y="16.9cm">
            <draw:text-box>
              <text:p><text:span text:style-name="T11">instr(11:7)</text:span><text:span text:style-name="T11">:waddr01(</text:span><text:span text:style-name="T11">4:0)</text:span></text:p>
            </draw:text-box>
          </draw:frame>
          <draw:frame draw:style-name="gr532" draw:text-style-name="P36" draw:layer="layout" svg:width="2.315cm" svg:height="0.569cm" svg:x="13.3cm" svg:y="15.931cm">
            <draw:text-box>
              <text:p><text:span text:style-name="T11">wdata01(</text:span><text:span text:style-name="T11">63:0)</text:span></text:p>
            </draw:text-box>
          </draw:frame>
          <draw:frame draw:style-name="gr635" draw:text-style-name="P36" draw:layer="layout" svg:width="2.205cm" svg:height="0.569cm" svg:x="15.01cm" svg:y="15.7cm">
            <draw:text-box>
              <text:p><text:span text:style-name="T11">rdata01(6</text:span><text:span text:style-name="T11">3:0)</text:span></text:p>
            </draw:text-box>
          </draw:frame>
          <draw:frame draw:style-name="gr635" draw:text-style-name="P36" draw:layer="layout" svg:width="2.205cm" svg:height="0.569cm" svg:x="15.014cm" svg:y="17.431cm">
            <draw:text-box>
              <text:p><text:span text:style-name="T11">rdata02(6</text:span><text:span text:style-name="T11">3:0)</text:span></text:p>
            </draw:text-box>
          </draw:frame>
          <draw:frame draw:style-name="gr534" draw:text-style-name="P36" draw:layer="layout" svg:width="0.865cm" svg:height="0.569cm" svg:x="14.056cm" svg:y="17.831cm">
            <draw:text-box>
              <text:p><text:span text:style-name="T11">we</text:span></text:p>
            </draw:text-box>
          </draw:frame>
        </draw:g>
        <draw:g draw:style-name="gr1">
          <draw:custom-shape draw:style-name="gr636" draw:text-style-name="P49" draw:layer="layout" svg:width="1.5cm" svg:height="2cm" svg:x="23.5cm" svg:y="15.7cm">
            <text:p text:style-name="P48"><text:span text:style-name="T11">alu</text:span></text:p>
            <draw:enhanced-geometry svg:viewBox="0 0 21600 21600" draw:type="rectangle" draw:enhanced-path="M 0 0 L 21600 0 21600 21600 0 21600 0 0 Z N"/>
          </draw:custom-shape>
          <draw:frame draw:style-name="gr543" draw:text-style-name="P36" draw:layer="layout" svg:width="1.37cm" svg:height="0.569cm" svg:x="23.282cm" svg:y="15.6cm">
            <draw:text-box>
              <text:p><text:span text:style-name="T11">data01</text:span></text:p>
            </draw:text-box>
          </draw:frame>
          <draw:frame draw:style-name="gr543" draw:text-style-name="P36" draw:layer="layout" svg:width="1.37cm" svg:height="0.569cm" svg:x="23.282cm" svg:y="15.869cm">
            <draw:text-box>
              <text:p><text:span text:style-name="T11">data02</text:span></text:p>
            </draw:text-box>
          </draw:frame>
          <draw:frame draw:style-name="gr637" draw:text-style-name="P36" draw:layer="layout" svg:width="1.29cm" svg:height="0.569cm" svg:x="23.859cm" svg:y="17.3cm">
            <draw:text-box>
              <text:p><text:span text:style-name="T11">aluSel</text:span></text:p>
            </draw:text-box>
          </draw:frame>
          <draw:frame draw:style-name="gr638" draw:text-style-name="P36" draw:layer="layout" svg:width="1.054cm" svg:height="0.569cm" svg:x="24.148cm" svg:y="16.4cm">
            <draw:text-box>
              <text:p><text:span text:style-name="T11">zero</text:span></text:p>
            </draw:text-box>
          </draw:frame>
          <draw:frame draw:style-name="gr639" draw:text-style-name="P36" draw:layer="layout" svg:width="1.684cm" svg:height="0.569cm" svg:x="23.517cm" svg:y="16.7cm">
            <draw:text-box>
              <text:p><text:span text:style-name="T11">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592" draw:text-style-name="P4" draw:layer="layout" svg:x1="23cm" svg:y1="16.2cm" svg:x2="23.5cm" svg:y2="16.2cm">
          <text:p/>
        </draw:line>
        <draw:line draw:style-name="gr595" draw:text-style-name="P4" draw:layer="layout" svg:x1="22.1cm" svg:y1="18cm" svg:x2="23cm" svg:y2="18cm">
          <text:p/>
        </draw:line>
        <draw:line draw:style-name="gr38" draw:text-style-name="P4" draw:layer="layout" svg:x1="23cm" svg:y1="18cm" svg:x2="23cm" svg:y2="16.2cm">
          <text:p/>
        </draw:line>
        <draw:line draw:style-name="gr595" draw:text-style-name="P4" draw:layer="layout" svg:x1="21.4cm" svg:y1="15.6cm" svg:x2="22cm" svg:y2="15.6cm">
          <text:p/>
        </draw:line>
        <draw:line draw:style-name="gr595" draw:text-style-name="P4" draw:layer="layout" svg:x1="20.2cm" svg:y1="16.2cm" svg:x2="22cm" svg:y2="16.2cm">
          <text:p/>
        </draw:line>
        <draw:g draw:style-name="gr1">
          <draw:custom-shape draw:style-name="gr640" draw:text-style-name="P49" draw:layer="layout" svg:width="2.607cm" svg:height="1cm" svg:x="14.924cm" svg:y="19.6cm">
            <text:p text:style-name="P48"><text:span text:style-name="T11">extend</text:span></text:p>
            <draw:enhanced-geometry svg:viewBox="0 0 21600 21600" draw:type="rectangle" draw:enhanced-path="M 0 0 L 21600 0 21600 21600 0 21600 0 0 Z N"/>
          </draw:custom-shape>
          <draw:frame draw:style-name="gr641" draw:text-style-name="P36" draw:layer="layout" svg:width="1.779cm" svg:height="0.569cm" svg:x="14.713cm" svg:y="19.7cm">
            <draw:text-box>
              <text:p><text:span text:style-name="T11">instr(31:0)</text:span></text:p>
            </draw:text-box>
          </draw:frame>
          <draw:frame draw:style-name="gr642" draw:text-style-name="P36" draw:layer="layout" svg:width="1.448cm" svg:height="0.569cm" svg:x="16.114cm" svg:y="20.2cm">
            <draw:text-box>
              <text:p><text:span text:style-name="T11">sel(2:0)</text:span></text:p>
            </draw:text-box>
          </draw:frame>
          <draw:frame draw:style-name="gr643" draw:text-style-name="P36" draw:layer="layout" svg:width="1.778cm" svg:height="0.569cm" svg:x="16.024cm" svg:y="19.667cm">
            <draw:text-box>
              <text:p><text:span text:style-name="T11">imm(63:0)</text:span></text:p>
            </draw:text-box>
          </draw:frame>
        </draw:g>
        <draw:frame draw:style-name="gr644" draw:text-style-name="P9" draw:layer="layout" svg:width="3.302cm" svg:height="0.725cm" svg:x="20.9cm" svg:y="13.075cm">
          <draw:text-box>
            <text:p><text:span text:style-name="T2">Inside </text:span><text:span text:style-name="T2">„exten</text:span><text:span text:style-name="T2">d“</text:span></text:p>
          </draw:text-box>
        </draw:frame>
        <draw:line draw:style-name="gr593" draw:text-style-name="P4" draw:layer="layout" svg:x1="16.8cm" svg:y1="25.932cm" svg:x2="16.8cm" svg:y2="20.6cm">
          <text:p/>
        </draw:line>
        <draw:custom-shape draw:style-name="gr526" draw:text-style-name="P55" draw:layer="layout" svg:width="1cm" svg:height="1cm" svg:x="24cm" svg:y="11.7cm">
          <text:p text:style-name="P48"><text:span text:style-name="T11">+</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600" draw:text-style-name="P4" draw:layer="layout" svg:x1="24.975cm" svg:y1="12.201cm" svg:x2="26cm" svg:y2="12.2cm">
          <text:p/>
        </draw:line>
        <draw:line draw:style-name="gr602" draw:text-style-name="P4" draw:layer="layout" svg:x1="26cm" svg:y1="12.2cm" svg:x2="26cm" svg:y2="11.5cm">
          <text:p/>
        </draw:line>
        <draw:line draw:style-name="gr59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645" draw:text-style-name="P9" draw:layer="layout" svg:width="1.678cm" svg:height="0.725cm" svg:x="19.4cm" svg:y="9.875cm">
          <draw:text-box>
            <text:p><text:span text:style-name="T2">for jalr</text:span></text:p>
          </draw:text-box>
        </draw:frame>
        <draw:custom-shape draw:style-name="gr36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0.5cm" svg:y1="11.1cm" svg:x2="20.5cm" svg:y2="16cm">
          <text:p/>
        </draw:line>
        <draw:line draw:style-name="gr619" draw:text-style-name="P4" draw:layer="layout" svg:x1="20.2cm" svg:y1="10.475cm" svg:x2="20.2cm" svg:y2="16.2cm">
          <text:p/>
        </draw:line>
        <draw:frame draw:style-name="gr646"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594" draw:text-style-name="P4" draw:layer="layout" svg:x1="7.5cm" svg:y1="10cm" svg:x2="8.5cm" svg:y2="10cm">
          <text:p/>
        </draw:line>
        <draw:custom-shape draw:style-name="gr601" draw:text-style-name="P58"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9.5cm" svg:y1="10cm" svg:x2="18cm" svg:y2="10cm">
          <text:p/>
        </draw:line>
        <draw:line draw:style-name="gr594" draw:text-style-name="P4" draw:layer="layout" svg:x1="19cm" svg:y1="10cm" svg:x2="27cm" svg:y2="10cm">
          <text:p/>
        </draw:line>
        <draw:frame draw:style-name="gr647"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594" draw:text-style-name="P4" draw:layer="layout" svg:x1="28cm" svg:y1="10cm" svg:x2="35.001cm" svg:y2="10cm">
          <text:p/>
        </draw:line>
        <draw:line draw:style-name="gr600" draw:text-style-name="P4" draw:layer="layout" svg:x1="36cm" svg:y1="10cm" svg:x2="36.5cm" svg:y2="10cm">
          <text:p/>
        </draw:line>
        <draw:line draw:style-name="gr600" draw:text-style-name="P4" draw:layer="layout" svg:x1="36.5cm" svg:y1="16.7cm" svg:x2="36.5cm" svg:y2="10cm">
          <text:p/>
        </draw:line>
        <draw:line draw:style-name="gr60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593" draw:text-style-name="P4" draw:layer="layout" svg:x1="22.3cm" svg:y1="25.1cm" svg:x2="22.3cm" svg:y2="16.301cm">
          <text:p/>
        </draw:line>
        <draw:line draw:style-name="gr593" draw:text-style-name="P4" draw:layer="layout" svg:x1="21.9cm" svg:y1="24.8cm" svg:x2="21.9cm" svg:y2="18.402cm">
          <text:p/>
        </draw:line>
        <draw:g draw:style-name="gr1">
          <draw:custom-shape draw:style-name="gr648" draw:text-style-name="P49" draw:layer="layout" svg:width="2cm" svg:height="2cm" svg:x="32cm" svg:y="15.8cm">
            <text:p text:style-name="P48"><text:span text:style-name="T11">DMem</text:span></text:p>
            <draw:enhanced-geometry svg:viewBox="0 0 21600 21600" draw:type="rectangle" draw:enhanced-path="M 0 0 L 21600 0 21600 21600 0 21600 0 0 Z N"/>
          </draw:custom-shape>
          <draw:frame draw:style-name="gr631" draw:text-style-name="P36" draw:layer="layout" svg:width="1.148cm" svg:height="0.569cm" svg:x="32.555cm" svg:y="15.7cm">
            <draw:text-box>
              <text:p><text:span text:style-name="T11">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649" draw:text-style-name="P36" draw:layer="layout" svg:width="1.101cm" svg:height="0.569cm" svg:x="32.9cm" svg:y="17.331cm">
            <draw:text-box>
              <text:p><text:span text:style-name="T11">rdEn</text:span></text:p>
            </draw:text-box>
          </draw:frame>
          <draw:frame draw:style-name="gr650" draw:text-style-name="P36" draw:layer="layout" svg:width="1.038cm" svg:height="0.569cm" svg:x="31.8cm" svg:y="16.7cm">
            <draw:text-box>
              <text:p><text:span text:style-name="T11">instr</text:span></text:p>
            </draw:text-box>
          </draw:frame>
          <draw:frame draw:style-name="gr651" draw:text-style-name="P36" draw:layer="layout" svg:width="1.07cm" svg:height="0.569cm" svg:x="31.8cm" svg:y="16.1cm">
            <draw:text-box>
              <text:p><text:span text:style-name="T11">addr</text:span></text:p>
            </draw:text-box>
          </draw:frame>
          <draw:frame draw:style-name="gr652" draw:text-style-name="P36" draw:layer="layout" svg:width="1.117cm" svg:height="0.569cm" svg:x="31.8cm" svg:y="16.4cm">
            <draw:text-box>
              <text:p><text:span text:style-name="T11">datai</text:span></text:p>
            </draw:text-box>
          </draw:frame>
          <draw:frame draw:style-name="gr653" draw:text-style-name="P36" draw:layer="layout" svg:width="1.212cm" svg:height="0.569cm" svg:x="32.991cm" svg:y="16.7cm">
            <draw:text-box>
              <text:p><text:span text:style-name="T11">datao</text:span></text:p>
            </draw:text-box>
          </draw:frame>
        </draw:g>
        <draw:line draw:style-name="gr592" draw:text-style-name="P4" draw:layer="layout" svg:x1="31cm" svg:y1="16.7cm" svg:x2="32cm" svg:y2="16.7cm">
          <text:p/>
        </draw:line>
        <draw:line draw:style-name="gr592" draw:text-style-name="P4" draw:layer="layout" svg:x1="31.5cm" svg:y1="17cm" svg:x2="32cm" svg:y2="17cm">
          <text:p/>
        </draw:line>
        <draw:line draw:style-name="gr602"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6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4" draw:text-style-name="P53" draw:layer="layout" svg:width="2.5cm" svg:height="0.726cm" svg:x="10.1cm" svg:y="21.402cm">
          <draw:text-box>
            <text:p><text:span text:style-name="T19">Instr.</text:span><text:span text:style-name="T19">[11-7]</text:span></text:p>
          </draw:text-box>
        </draw:frame>
        <draw:frame draw:style-name="gr655" draw:text-style-name="P59" draw:layer="layout" svg:width="3.585cm" svg:height="0.725cm" svg:x="10.102cm" svg:y="20.975cm">
          <draw:text-box>
            <text:p><text:span text:style-name="T19">Instr.</text:span><text:span text:style-name="T19">[14-12, </text:span><text:span text:style-name="T19">6-0]</text:span></text:p>
          </draw:text-box>
        </draw:frame>
        <draw:line draw:style-name="gr616" draw:text-style-name="P4" draw:layer="layout" svg:x1="10cm" svg:y1="21.5cm" svg:x2="18cm" svg:y2="21.5cm">
          <text:p/>
        </draw:line>
        <draw:custom-shape draw:style-name="gr36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656" draw:text-style-name="P49" draw:layer="layout" svg:width="4cm" svg:height="3.527cm" svg:x="11cm" svg:y="23.473cm">
            <text:p text:style-name="P48"><text:span text:style-name="T11">controllAll</text:span></text:p>
            <draw:enhanced-geometry svg:viewBox="0 0 21600 21600" draw:type="rectangle" draw:enhanced-path="M 0 0 L 21600 0 21600 21600 0 21600 0 0 Z N"/>
          </draw:custom-shape>
          <draw:frame draw:style-name="gr657" draw:text-style-name="P36" draw:layer="layout" svg:width="2.016cm" svg:height="0.569cm" svg:x="10.8cm" svg:y="23.46cm">
            <draw:text-box>
              <text:p><text:span text:style-name="T11">opcode(6:</text:span><text:span text:style-name="T11">0)</text:span></text:p>
            </draw:text-box>
          </draw:frame>
          <draw:frame draw:style-name="gr658" draw:text-style-name="P36" draw:layer="layout" svg:width="1.779cm" svg:height="0.569cm" svg:x="10.824cm" svg:y="23.716cm">
            <draw:text-box>
              <text:p><text:span text:style-name="T11">func3(2:0)</text:span></text:p>
            </draw:text-box>
          </draw:frame>
          <draw:frame draw:style-name="gr659" draw:text-style-name="P36" draw:layer="layout" svg:width="1.511cm" svg:height="0.569cm" svg:x="10.8cm" svg:y="23.973cm">
            <draw:text-box>
              <text:p><text:span text:style-name="T11">func7b5</text:span></text:p>
            </draw:text-box>
          </draw:frame>
          <draw:frame draw:style-name="gr550" draw:text-style-name="P36" draw:layer="layout" svg:width="1.054cm" svg:height="0.569cm" svg:x="10.872cm" svg:y="24.229cm">
            <draw:text-box>
              <text:p><text:span text:style-name="T11">zero</text:span></text:p>
            </draw:text-box>
          </draw:frame>
          <draw:frame draw:style-name="gr456" draw:text-style-name="P36" draw:layer="layout" svg:width="2.204cm" svg:height="0.569cm" svg:x="13.035cm" svg:y="23.373cm">
            <draw:text-box>
              <text:p><text:span text:style-name="T11">resultSrc(</text:span><text:span text:style-name="T11">1:0)</text:span></text:p>
            </draw:text-box>
          </draw:frame>
          <draw:frame draw:style-name="gr660" draw:text-style-name="P36" draw:layer="layout" svg:width="1.647cm" svg:height="0.569cm" svg:x="13.6cm" svg:y="23.657cm">
            <draw:text-box>
              <text:p><text:span text:style-name="T11">dMemWr</text:span></text:p>
            </draw:text-box>
          </draw:frame>
          <draw:frame draw:style-name="gr661" draw:text-style-name="P36" draw:layer="layout" svg:width="1.653cm" svg:height="0.569cm" svg:x="13.6cm" svg:y="23.941cm">
            <draw:text-box>
              <text:p><text:span text:style-name="T11">dMemRd</text:span></text:p>
            </draw:text-box>
          </draw:frame>
          <draw:frame draw:style-name="gr662" draw:text-style-name="P36" draw:layer="layout" svg:width="1.321cm" svg:height="0.569cm" svg:x="13.887cm" svg:y="24.226cm">
            <draw:text-box>
              <text:p><text:span text:style-name="T11">PCSrc</text:span></text:p>
            </draw:text-box>
          </draw:frame>
          <draw:frame draw:style-name="gr663" draw:text-style-name="P36" draw:layer="layout" svg:width="1.495cm" svg:height="0.569cm" svg:x="13.724cm" svg:y="24.51cm">
            <draw:text-box>
              <text:p><text:span text:style-name="T11">aluSrcB</text:span></text:p>
            </draw:text-box>
          </draw:frame>
          <draw:frame draw:style-name="gr663" draw:text-style-name="P36" draw:layer="layout" svg:width="1.495cm" svg:height="0.569cm" svg:x="13.724cm" svg:y="24.794cm">
            <draw:text-box>
              <text:p><text:span text:style-name="T11">aluSrcA</text:span></text:p>
            </draw:text-box>
          </draw:frame>
          <draw:frame draw:style-name="gr664" draw:text-style-name="P36" draw:layer="layout" svg:width="1.269cm" svg:height="0.569cm" svg:x="13.963cm" svg:y="25.078cm">
            <draw:text-box>
              <text:p><text:span text:style-name="T11">regWr</text:span></text:p>
            </draw:text-box>
          </draw:frame>
          <draw:frame draw:style-name="gr556" draw:text-style-name="P36" draw:layer="layout" svg:width="1.117cm" svg:height="0.569cm" svg:x="14.091cm" svg:y="25.363cm">
            <draw:text-box>
              <text:p><text:span text:style-name="T11">jump</text:span></text:p>
            </draw:text-box>
          </draw:frame>
          <draw:frame draw:style-name="gr665" draw:text-style-name="P36" draw:layer="layout" svg:width="2.046cm" svg:height="0.569cm" svg:x="13.207cm" svg:y="25.647cm">
            <draw:text-box>
              <text:p><text:span text:style-name="T11">immSrc(2</text:span><text:span text:style-name="T11">:0)</text:span></text:p>
            </draw:text-box>
          </draw:frame>
          <draw:frame draw:style-name="gr545" draw:text-style-name="P36" draw:layer="layout" svg:width="1.874cm" svg:height="0.569cm" svg:x="13.357cm" svg:y="25.931cm">
            <draw:text-box>
              <text:p><text:span text:style-name="T11">aluSel(4:0</text:span><text:span text:style-name="T11">)</text:span></text:p>
            </draw:text-box>
          </draw:frame>
          <draw:frame draw:style-name="gr666" draw:text-style-name="P36" draw:layer="layout" svg:width="1.669cm" svg:height="0.569cm" svg:x="13.557cm" svg:y="26.232cm">
            <draw:text-box>
              <text:p><text:span text:style-name="T11">branch_s</text:span></text:p>
            </draw:text-box>
          </draw:frame>
          <draw:frame draw:style-name="gr667" draw:text-style-name="P36" draw:layer="layout" svg:width="1.416cm" svg:height="0.569cm" svg:x="13.757cm" svg:y="26.533cm">
            <draw:text-box>
              <text:p><text:span text:style-name="T11">jump_s</text:span></text:p>
            </draw:text-box>
          </draw:frame>
        </draw:g>
        <draw:line draw:style-name="gr592" draw:text-style-name="P4" draw:layer="layout" svg:x1="10cm" svg:y1="23.8cm" svg:x2="11cm" svg:y2="23.8cm">
          <text:p/>
        </draw:line>
        <draw:line draw:style-name="gr592" draw:text-style-name="P4" draw:layer="layout" svg:x1="10cm" svg:y1="24.2cm" svg:x2="11cm" svg:y2="24.2cm">
          <text:p/>
        </draw:line>
        <draw:custom-shape draw:style-name="gr36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7" draw:text-style-name="P67" draw:layer="layout" svg:x1="10cm" svg:y1="24.5cm" svg:x2="11cm" svg:y2="24.5cm">
          <text:p/>
        </draw:line>
        <draw:frame draw:style-name="gr668" draw:text-style-name="P9" draw:layer="layout" svg:width="10.573cm" svg:height="2.147cm" svg:x="4.527cm" svg:y="25.5cm">
          <draw:text-box>
            <text:p><text:span text:style-name="T2">In </text:span><text:span text:style-name="T2">pipelin</text:span><text:span text:style-name="T2">ed </text:span><text:span text:style-name="T2">versio</text:span><text:span text:style-name="T2">n:</text:span></text:p>
            <text:p><text:span text:style-name="T2">- </text:span><text:span text:style-name="T2">PCSrc </text:span><text:span text:style-name="T2">not </text:span><text:span text:style-name="T2">conne</text:span><text:span text:style-name="T2">cted</text:span></text:p>
            <text:p><text:span text:style-name="T2">- zero </text:span><text:span text:style-name="T2">not </text:span><text:span text:style-name="T2">used</text:span></text:p>
            <text:p><text:span text:style-name="T2">- </text:span><text:span text:style-name="T2">forwar</text:span><text:span text:style-name="T2">d </text:span><text:span text:style-name="T2">branch</text:span><text:span text:style-name="T2">_s and </text:span><text:span text:style-name="T2">jump_</text:span><text:span text:style-name="T2">s and </text:span><text:span text:style-name="T2">conne</text:span><text:span text:style-name="T2">ct with </text:span><text:span text:style-name="T2">zero</text:span></text:p>
          </draw:text-box>
        </draw:frame>
        <draw:custom-shape draw:style-name="gr621" draw:text-style-name="P64"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669" draw:text-style-name="P63" draw:layer="layout" svg:width="1.867cm" svg:height="0.725cm" svg:x="21.301cm" svg:y="4.778cm">
          <draw:text-box>
            <text:p><text:span text:style-name="T21">jump_</text:span><text:span text:style-name="T21">s</text:span></text:p>
          </draw:text-box>
        </draw:frame>
        <draw:line draw:style-name="gr622" draw:text-style-name="P4" draw:layer="layout" svg:x1="23cm" svg:y1="6.4cm" svg:x2="21.4cm" svg:y2="6.402cm">
          <text:p/>
        </draw:line>
        <draw:line draw:style-name="gr622" draw:text-style-name="P4" draw:layer="layout" svg:x1="26.6cm" svg:y1="5.403cm" svg:x2="21.4cm" svg:y2="5.403cm">
          <text:p/>
        </draw:line>
        <draw:line draw:style-name="gr622" draw:text-style-name="P4" draw:layer="layout" svg:x1="20.4cm" svg:y1="5.802cm" svg:x2="19.4cm" svg:y2="5.803cm">
          <text:p/>
        </draw:line>
        <draw:line draw:style-name="gr622" draw:text-style-name="P4" draw:layer="layout" svg:x1="19.4cm" svg:y1="7cm" svg:x2="19.4cm" svg:y2="5.8cm">
          <text:p/>
        </draw:line>
        <draw:frame draw:style-name="gr670" draw:text-style-name="P9" draw:layer="layout" svg:width="1.444cm" svg:height="0.725cm" svg:x="8.758cm" svg:y="24.1cm">
          <draw:text-box>
            <text:p><text:span text:style-name="T2">open</text:span></text:p>
          </draw:text-box>
        </draw:frame>
        <draw:line draw:style-name="gr622" draw:text-style-name="P4" draw:layer="layout" svg:x1="15cm" svg:y1="25.932cm" svg:x2="16.8cm" svg:y2="25.932cm">
          <text:p/>
        </draw:line>
        <draw:line draw:style-name="gr627" draw:text-style-name="P67" draw:layer="layout" svg:x1="15cm" svg:y1="25.4cm" svg:x2="18cm" svg:y2="25.4cm">
          <text:p/>
        </draw:line>
        <draw:line draw:style-name="gr622" draw:text-style-name="P4" draw:layer="layout" svg:x1="26.6cm" svg:y1="26.9cm" svg:x2="26.6cm" svg:y2="5.403cm">
          <text:p/>
        </draw:line>
        <draw:line draw:style-name="gr622" draw:text-style-name="P4" draw:layer="layout" svg:x1="19cm" svg:y1="26.6cm" svg:x2="26.4cm" svg:y2="26.6cm">
          <text:p/>
        </draw:line>
        <draw:line draw:style-name="gr627" draw:text-style-name="P67" draw:layer="layout" svg:x1="15cm" svg:y1="26.3cm" svg:x2="18cm" svg:y2="26.3cm">
          <text:p/>
        </draw:line>
        <draw:line draw:style-name="gr627" draw:text-style-name="P67" draw:layer="layout" svg:x1="15cm" svg:y1="25.7cm" svg:x2="18cm" svg:y2="25.7cm">
          <text:p/>
        </draw:line>
        <draw:line draw:style-name="gr622" draw:text-style-name="P4" draw:layer="layout" svg:x1="19cm" svg:y1="25.7cm" svg:x2="21.3cm" svg:y2="25.7cm">
          <text:p/>
        </draw:line>
        <draw:line draw:style-name="gr627" draw:text-style-name="P67" draw:layer="layout" svg:x1="15cm" svg:y1="25.1cm" svg:x2="18cm" svg:y2="25.1cm">
          <text:p/>
        </draw:line>
        <draw:line draw:style-name="gr627" draw:text-style-name="P67" draw:layer="layout" svg:x1="15cm" svg:y1="24.8cm" svg:x2="18cm" svg:y2="24.8cm">
          <text:p/>
        </draw:line>
        <draw:line draw:style-name="gr622" draw:text-style-name="P4" draw:layer="layout" svg:x1="19cm" svg:y1="25.1cm" svg:x2="22.3cm" svg:y2="25.1cm">
          <text:p/>
        </draw:line>
        <draw:line draw:style-name="gr622" draw:text-style-name="P4" draw:layer="layout" svg:x1="19cm" svg:y1="24.8cm" svg:x2="21.9cm" svg:y2="24.8cm">
          <text:p/>
        </draw:line>
        <draw:line draw:style-name="gr622" draw:text-style-name="P4" draw:layer="layout" svg:x1="15cm" svg:y1="24.532cm" svg:x2="15.4cm" svg:y2="24.532cm">
          <text:p/>
        </draw:line>
        <draw:line draw:style-name="gr627" draw:text-style-name="P67" draw:layer="layout" svg:x1="15cm" svg:y1="24.3cm" svg:x2="18cm" svg:y2="24.3cm">
          <text:p/>
        </draw:line>
        <draw:line draw:style-name="gr627" draw:text-style-name="P67" draw:layer="layout" svg:x1="15cm" svg:y1="24cm" svg:x2="18cm" svg:y2="24cm">
          <text:p/>
        </draw:line>
        <draw:line draw:style-name="gr627" draw:text-style-name="P67" draw:layer="layout" svg:x1="15cm" svg:y1="23.7cm" svg:x2="18cm" svg:y2="23.7cm">
          <text:p/>
        </draw:line>
        <draw:line draw:style-name="gr627" draw:text-style-name="P67" draw:layer="layout" svg:x1="19cm" svg:y1="24.3cm" svg:x2="27cm" svg:y2="24.3cm">
          <text:p/>
        </draw:line>
        <draw:line draw:style-name="gr627" draw:text-style-name="P67" draw:layer="layout" svg:x1="19cm" svg:y1="24cm" svg:x2="27cm" svg:y2="24cm">
          <text:p/>
        </draw:line>
        <draw:line draw:style-name="gr627" draw:text-style-name="P67" draw:layer="layout" svg:x1="19cm" svg:y1="23.7cm" svg:x2="27cm" svg:y2="23.7cm">
          <text:p/>
        </draw:line>
        <draw:line draw:style-name="gr622" draw:text-style-name="P4" draw:layer="layout" svg:x1="28cm" svg:y1="24.3cm" svg:x2="33cm" svg:y2="24.3cm">
          <text:p/>
        </draw:line>
        <draw:frame draw:style-name="gr671" draw:text-style-name="P9" draw:layer="layout" svg:width="3.302cm" svg:height="1.673cm" svg:x="1cm" svg:y="18.1cm">
          <draw:text-box>
            <text:p><text:span text:style-name="T2">Instruc</text:span><text:span text:style-name="T2">tionBu</text:span><text:span text:style-name="T2">s:</text:span></text:p>
            <text:p><text:span text:style-name="T2">- </text:span><text:span text:style-name="T2">Addre</text:span><text:span text:style-name="T2">ss</text:span></text:p>
            <text:p><text:span text:style-name="T2">- Data</text:span></text:p>
          </draw:text-box>
        </draw:frame>
        <draw:line draw:style-name="gr672" draw:text-style-name="P4" draw:layer="layout" svg:x1="5.2cm" svg:y1="19.5cm" svg:x2="8cm" svg:y2="17.626cm">
          <text:p/>
        </draw:line>
        <draw:line draw:style-name="gr672" draw:text-style-name="P4" draw:layer="layout" svg:x1="3.1cm" svg:y1="19cm" svg:x2="4.4cm" svg:y2="18cm">
          <text:p/>
        </draw:line>
        <draw:line draw:style-name="gr673" draw:text-style-name="P4" draw:layer="layout" svg:x1="2.5cm" svg:y1="19.5cm" svg:x2="5.2cm" svg:y2="19.5cm">
          <text:p/>
        </draw:line>
        <draw:frame draw:style-name="gr674" draw:text-style-name="P9" draw:layer="layout" svg:width="3.3cm" svg:height="2.147cm" svg:x="31cm" svg:y="10.853cm">
          <draw:text-box>
            <text:p><text:span text:style-name="T2">DataB</text:span><text:span text:style-name="T2">us:</text:span></text:p>
            <text:p><text:span text:style-name="T2">- </text:span><text:span text:style-name="T2">Addre</text:span><text:span text:style-name="T2">ss</text:span></text:p>
            <text:p><text:span text:style-name="T2">- Data </text:span><text:span text:style-name="T2">write</text:span></text:p>
            <text:p><text:span text:style-name="T2">- Data </text:span><text:span text:style-name="T2">read</text:span></text:p>
          </draw:text-box>
        </draw:frame>
        <draw:line draw:style-name="gr675" draw:text-style-name="P4" draw:layer="layout" svg:x1="31.2cm" svg:y1="11.7cm" svg:x2="30.4cm" svg:y2="15.5cm">
          <text:p/>
        </draw:line>
        <draw:line draw:style-name="gr676" draw:text-style-name="P4" draw:layer="layout" svg:x1="31.5cm" svg:y1="12.3cm" svg:x2="31.3cm" svg:y2="15.9cm">
          <text:p/>
        </draw:line>
        <draw:line draw:style-name="gr677" draw:text-style-name="P4" draw:layer="layout" svg:x1="33.1cm" svg:y1="12.8cm" svg:x2="34.3cm" svg:y2="17cm">
          <text:p/>
        </draw:line>
        <draw:custom-shape draw:style-name="gr601" draw:text-style-name="P58"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19cm" svg:y1="26.9cm" svg:x2="26.6cm" svg:y2="26.9cm">
          <text:p/>
        </draw:line>
        <draw:line draw:style-name="gr595" draw:text-style-name="P4" draw:layer="layout" svg:x1="20.5cm" svg:y1="17.7cm" svg:x2="20.5cm" svg:y2="19cm">
          <text:p/>
        </draw:line>
        <draw:line draw:style-name="gr38" draw:text-style-name="P4" draw:layer="layout" svg:x1="19cm" svg:y1="20cm" svg:x2="21cm" svg:y2="20cm">
          <text:p/>
        </draw:line>
        <draw:line draw:style-name="gr592" draw:text-style-name="P4" draw:layer="layout" svg:x1="3cm" svg:y1="15.593cm" svg:x2="3.5cm" svg:y2="16.9cm">
          <text:p/>
        </draw:line>
        <draw:frame draw:style-name="gr687" draw:text-style-name="P9" draw:layer="layout" svg:width="1.255cm" svg:height="0.725cm" svg:x="2.349cm" svg:y="14.975cm">
          <draw:text-box>
            <text:p><text:span text:style-name="T2">stall</text:span></text:p>
          </draw:text-box>
        </draw:frame>
        <draw:line draw:style-name="gr691" draw:text-style-name="P4" draw:layer="layout" svg:x1="35.001cm" svg:y1="21cm" svg:x2="36cm" svg:y2="21cm">
          <text:p/>
        </draw:line>
        <draw:line draw:style-name="gr691" draw:text-style-name="P4" draw:layer="layout" svg:x1="35.002cm" svg:y1="21.9cm" svg:x2="36.001cm" svg:y2="21.9cm">
          <text:p/>
        </draw:line>
        <draw:line draw:style-name="gr691" draw:text-style-name="P4" draw:layer="layout" svg:x1="35.002cm" svg:y1="17cm" svg:x2="36.001cm" svg:y2="17cm">
          <text:p/>
        </draw:line>
        <draw:line draw:style-name="gr691" draw:text-style-name="P4" draw:layer="layout" svg:x1="35.003cm" svg:y1="10cm" svg:x2="36.002cm" svg:y2="10cm">
          <text:p/>
        </draw:line>
        <draw:line draw:style-name="gr691" draw:text-style-name="P4" draw:layer="layout" svg:x1="35.004cm" svg:y1="23.7cm" svg:x2="36.003cm" svg:y2="23.7cm">
          <text:p/>
        </draw:line>
        <draw:line draw:style-name="gr691" draw:text-style-name="P4" draw:layer="layout" svg:x1="35.005cm" svg:y1="25.4cm" svg:x2="36.004cm" svg:y2="25.4cm">
          <text:p/>
        </draw:line>
        <draw:frame draw:style-name="gr692" draw:text-style-name="P62" draw:layer="layout" svg:width="10.193cm" svg:height="0.806cm" svg:x="27.5cm" svg:y="4.594cm">
          <draw:text-box>
            <text:p><text:span text:style-name="T20">Beca</text:span><text:span text:style-name="T20">use </text:span><text:span text:style-name="T20">of the </text:span><text:span text:style-name="T20">write </text:span><text:span text:style-name="T20">clock </text:span><text:span text:style-name="T20">of the </text:span><text:span text:style-name="T20">regist</text:span><text:span text:style-name="T20">er file</text:span></text:p>
          </draw:text-box>
        </draw:frame>
        <draw:line draw:style-name="gr693" draw:text-style-name="P4" draw:layer="layout" svg:x1="32.8cm" svg:y1="5.4cm" svg:x2="35.501cm" svg:y2="10cm">
          <text:p/>
        </draw:line>
        <draw:line draw:style-name="gr691" draw:text-style-name="P4" draw:layer="layout" svg:x1="27.001cm" svg:y1="19cm" svg:x2="28cm" svg:y2="19cm">
          <text:p/>
        </draw:line>
        <draw:line draw:style-name="gr691" draw:text-style-name="P4" draw:layer="layout" svg:x1="27.001cm" svg:y1="24cm" svg:x2="28cm" svg:y2="24cm">
          <text:p/>
        </draw:line>
        <draw:line draw:style-name="gr694" draw:text-style-name="P4" draw:layer="layout" svg:x1="27cm" svg:y1="17cm" svg:x2="27.999cm" svg:y2="17cm">
          <text:p/>
        </draw:line>
        <draw:frame draw:style-name="gr695" draw:text-style-name="P62" draw:layer="layout" svg:width="2.897cm" svg:height="1.361cm" svg:x="26.7cm" svg:y="11.4cm">
          <draw:text-box>
            <text:p><text:span text:style-name="T20">… </text:span><text:span text:style-name="T20">only </text:span><text:span text:style-name="T20">for </text:span></text:p>
            <text:p><text:span text:style-name="T20">store</text:span></text:p>
          </draw:text-box>
        </draw:frame>
        <draw:line draw:style-name="gr696" draw:text-style-name="P4" draw:layer="layout" svg:x1="27.7cm" svg:y1="12.8cm" svg:x2="27.5cm" svg:y2="17cm">
          <text:p/>
        </draw:line>
        <draw:frame draw:style-name="gr697" draw:text-style-name="P62" draw:layer="layout" svg:width="10.99cm" svg:height="0.806cm" svg:x="28.008cm" svg:y="27.594cm">
          <draw:text-box>
            <text:p><text:span text:style-name="T20">Beca</text:span><text:span text:style-name="T20">use </text:span><text:span text:style-name="T20">of the </text:span><text:span text:style-name="T20">write </text:span><text:span text:style-name="T20">clock </text:span><text:span text:style-name="T20">of the </text:span><text:span text:style-name="T20">d_me</text:span><text:span text:style-name="T20">m </text:span><text:span text:style-name="T20">(store</text:span><text:span text:style-name="T20">)</text:span></text:p>
          </draw:text-box>
        </draw:frame>
        <draw:line draw:style-name="gr698" draw:text-style-name="P4" draw:layer="layout" svg:x1="29.4cm" svg:y1="27.594cm" svg:x2="27.5cm" svg:y2="24cm">
          <text:p/>
        </draw:line>
        <draw:custom-shape draw:style-name="gr36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0" draw:text-style-name="P59" draw:layer="layout" svg:width="4.008cm" svg:height="0.725cm" draw:transform="rotate (1.5707963267949) translate (37.3cm 12.6cm)">
          <draw:text-box>
            <text:p><text:span text:style-name="T19">result_</text:span><text:span text:style-name="T19">writeb</text:span><text:span text:style-name="T19">ack_s</text:span></text:p>
          </draw:text-box>
        </draw:frame>
        <draw:frame draw:style-name="gr701" draw:text-style-name="P59" draw:layer="layout" svg:width="5.843cm" svg:height="0.725cm" draw:transform="rotate (1.5707963267949) translate (37cm 23.8cm)">
          <draw:text-box>
            <text:p><text:span text:style-name="T19">result_</text:span><text:span text:style-name="T19">mux_s</text:span><text:span text:style-name="T19">rc_writ</text:span><text:span text:style-name="T19">eback</text:span><text:span text:style-name="T19">_s</text:span></text:p>
          </draw:text-box>
        </draw:frame>
        <draw:frame draw:style-name="gr702" draw:text-style-name="P59" draw:layer="layout" svg:width="4cm" svg:height="0.725cm" draw:transform="rotate (1.5707963267949) translate (36.3cm 13.9cm)">
          <draw:text-box>
            <text:p><text:span text:style-name="T19">pc_4_</text:span><text:span text:style-name="T19">writeb</text:span><text:span text:style-name="T19">ack_s</text:span></text:p>
          </draw:text-box>
        </draw:frame>
        <draw:frame draw:style-name="gr703" draw:text-style-name="P59" draw:layer="layout" svg:width="6cm" svg:height="0.725cm" svg:x="36.6cm" svg:y="14.2cm">
          <draw:text-box>
            <text:p><text:span text:style-name="T19">dmem</text:span><text:span text:style-name="T19">_data_</text:span><text:span text:style-name="T19">rd_writ</text:span><text:span text:style-name="T19">eback</text:span><text:span text:style-name="T19">_s</text:span></text:p>
          </draw:text-box>
        </draw:frame>
        <draw:frame draw:style-name="gr704" draw:text-style-name="P59" draw:layer="layout" svg:width="4.808cm" svg:height="0.725cm" draw:transform="rotate (1.5707963267949) translate (36.175cm 21.9cm)">
          <draw:text-box>
            <text:p><text:span text:style-name="T19">alu_re</text:span><text:span text:style-name="T19">sult_w</text:span><text:span text:style-name="T19">ritebac</text:span><text:span text:style-name="T19">k_s</text:span></text:p>
          </draw:text-box>
        </draw:frame>
        <draw:line draw:style-name="gr146" draw:text-style-name="P4" draw:layer="layout" svg:x1="37.1cm" svg:y1="14.8cm" svg:x2="36.3cm" svg:y2="17cm">
          <text:p/>
        </draw:line>
        <draw:frame draw:style-name="gr705" draw:text-style-name="P36" draw:layer="layout" svg:width="3.845cm" svg:height="0.569cm" svg:x="28cm" svg:y="13.8cm">
          <draw:text-box>
            <text:p><text:span text:style-name="T11">instr_exe</text:span><text:span text:style-name="T11">cute_s[6:</text:span><text:span text:style-name="T11">0] == 35</text:span></text:p>
          </draw:text-box>
        </draw:frame>
        <draw:frame draw:style-name="gr706" draw:text-style-name="P36" draw:layer="layout" svg:width="1.992cm" svg:height="0.569cm" svg:x="28cm" svg:y="13.401cm">
          <draw:text-box>
            <text:p><text:span text:style-name="T11">instr = </text:span><text:span text:style-name="T11">store</text:span></text:p>
          </draw:text-box>
        </draw:frame>
        <draw:line draw:style-name="gr593" draw:text-style-name="P4" draw:layer="layout" svg:x1="29.718cm" svg:y1="14.3cm" svg:x2="29.718cm" svg:y2="15.1cm">
          <text:p/>
        </draw:line>
        <draw:polygon draw:style-name="gr707" draw:text-style-name="P56" draw:layer="layout" svg:width="0.499cm" svg:height="0.999cm" svg:x="29.5cm" svg:y="15cm" svg:viewBox="0 0 500 1000" draw:points="0,0 0,1000 500,850 500,150">
          <text:p/>
        </draw:polygon>
        <draw:line draw:style-name="gr619" draw:text-style-name="P4" draw:layer="layout" svg:x1="30cm" svg:y1="15.5cm" svg:x2="30.5cm" svg:y2="15.5cm">
          <text:p/>
        </draw:line>
        <draw:custom-shape draw:style-name="gr368"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708"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709" draw:text-style-name="P36" draw:layer="layout" svg:width="3.183cm" svg:height="0.569cm" svg:x="26.535cm" svg:y="14.831cm">
          <draw:text-box>
            <text:p><text:span text:style-name="T11">alu_result</text:span><text:span text:style-name="T11">_execute</text:span><text:span text:style-name="T11">_s</text:span></text:p>
          </draw:text-box>
        </draw:frame>
        <draw:line draw:style-name="gr38" draw:text-style-name="P4" draw:layer="layout" svg:x1="28cm" svg:y1="17.5cm" svg:x2="30cm" svg:y2="17.5cm">
          <text:p/>
        </draw:line>
        <draw:frame draw:style-name="gr710" draw:text-style-name="P36" draw:layer="layout" svg:width="2.819cm" svg:height="0.569cm" svg:x="27.781cm" svg:y="17.031cm">
          <draw:text-box>
            <text:p><text:span text:style-name="T11">alu_result</text:span><text:span text:style-name="T11">_mem_s</text:span></text:p>
          </draw:text-box>
        </draw:frame>
        <draw:frame draw:style-name="gr711" draw:text-style-name="P36" draw:layer="layout" svg:width="2.047cm" svg:height="0.569cm" svg:x="30.2cm" svg:y="15.9cm">
          <draw:text-box>
            <text:p><text:span text:style-name="T11">dBusAddr</text:span><text:span text:style-name="T11">_s</text:span></text:p>
          </draw:text-box>
        </draw:frame>
        <draw:frame draw:style-name="gr712" draw:text-style-name="P36" draw:layer="layout" svg:width="2.404cm" svg:height="0.569cm" svg:x="29.6cm" svg:y="16.331cm">
          <draw:text-box>
            <text:p><text:span text:style-name="T11">dBusData</text:span><text:span text:style-name="T11">Wr_s</text:span></text:p>
          </draw:text-box>
        </draw:frame>
        <draw:frame draw:style-name="gr713" draw:text-style-name="P36" draw:layer="layout" svg:width="2.141cm" svg:height="0.569cm" draw:transform="rotate (1.5707963267949) translate (31.291cm 20.24cm)">
          <draw:text-box>
            <text:p><text:span text:style-name="T11">instr_me</text:span><text:span text:style-name="T11">m_o</text:span></text:p>
          </draw:text-box>
        </draw:frame>
        <draw:frame draw:style-name="gr714" draw:text-style-name="P36" draw:layer="layout" svg:width="3.497cm" svg:height="0.569cm" svg:x="31.8cm" svg:y="13.031cm">
          <draw:text-box>
            <text:p><text:span text:style-name="T11">dmem_da</text:span><text:span text:style-name="T11">ta_rd_me</text:span><text:span text:style-name="T11">m_s</text:span></text:p>
          </draw:text-box>
        </draw:frame>
        <draw:frame draw:style-name="gr632" draw:text-style-name="P36" draw:layer="layout" svg:width="2.41cm" svg:height="0.569cm" svg:x="31.79cm" svg:y="13.331cm">
          <draw:text-box>
            <text:p><text:span text:style-name="T11">dBusData</text:span><text:span text:style-name="T11">Rd_s</text:span></text:p>
          </draw:text-box>
        </draw:frame>
        <draw:frame draw:style-name="gr715" draw:text-style-name="P36" draw:layer="layout" svg:width="2.788cm" svg:height="0.569cm" draw:transform="rotate (1.5707963267949) translate (32.84cm 20.38cm)">
          <draw:text-box>
            <text:p><text:span text:style-name="T11">dmem_rd</text:span><text:span text:style-name="T11">_mem_s</text:span></text:p>
          </draw:text-box>
        </draw:frame>
        <draw:frame draw:style-name="gr716" draw:text-style-name="P36" draw:layer="layout" svg:width="2.835cm" svg:height="0.569cm" draw:transform="rotate (1.5707963267949) translate (34.24cm 20.24cm)">
          <draw:text-box>
            <text:p><text:span text:style-name="T11">dmem_wr</text:span><text:span text:style-name="T11">_mem_s</text:span></text:p>
          </draw:text-box>
        </draw:frame>
        <draw:frame draw:style-name="gr717" draw:text-style-name="P36" draw:layer="layout" svg:width="3.513cm" svg:height="0.569cm" svg:x="28.3cm" svg:y="23.231cm">
          <draw:text-box>
            <text:p><text:span text:style-name="T11">result_mu</text:span><text:span text:style-name="T11">x_src_me</text:span><text:span text:style-name="T11">m_s</text:span></text:p>
          </draw:text-box>
        </draw:frame>
        <draw:frame draw:style-name="gr718" draw:text-style-name="P36" draw:layer="layout" svg:width="2.457cm" svg:height="0.569cm" svg:x="28.6cm" svg:y="24.931cm">
          <draw:text-box>
            <text:p><text:span text:style-name="T11">reg_wr_m</text:span><text:span text:style-name="T11">em_s</text:span></text:p>
          </draw:text-box>
        </draw:frame>
        <draw:frame draw:style-name="gr532" draw:text-style-name="P36" draw:layer="layout" svg:width="2.315cm" svg:height="0.569cm" svg:x="27.785cm" svg:y="18.531cm">
          <draw:text-box>
            <text:p><text:span text:style-name="T11">reg_b_me</text:span><text:span text:style-name="T11">m_s</text:span></text:p>
          </draw:text-box>
        </draw:frame>
        <draw:polygon draw:style-name="gr707" draw:text-style-name="P56" draw:layer="layout" svg:width="0.499cm" svg:height="0.999cm" draw:transform="rotate (1.5707963267949) translate (30.95cm 20.65cm)" svg:viewBox="0 0 500 1000" draw:points="0,0 0,1000 500,850 500,150">
          <text:p/>
        </draw:polygon>
        <draw:frame draw:style-name="gr719" draw:text-style-name="P36" draw:layer="layout" svg:width="2.678cm" svg:height="0.569cm" svg:x="18.5cm" svg:y="17.3cm">
          <draw:text-box>
            <text:p><text:span text:style-name="T11">reg_b_ex</text:span><text:span text:style-name="T11">ecute_s</text:span></text:p>
          </draw:text-box>
        </draw:frame>
        <draw:frame draw:style-name="gr532" draw:text-style-name="P36" draw:layer="layout" svg:width="2.315cm" svg:height="0.569cm" svg:x="17.985cm" svg:y="10.3cm">
          <draw:text-box>
            <text:p><text:span text:style-name="T11">pc_execu</text:span><text:span text:style-name="T11">te_s</text:span></text:p>
          </draw:text-box>
        </draw:frame>
        <draw:frame draw:style-name="gr719" draw:text-style-name="P36" draw:layer="layout" svg:width="2.678cm" svg:height="0.569cm" svg:x="17.6cm" svg:y="15.501cm">
          <draw:text-box>
            <text:p><text:span text:style-name="T11">reg_a_ex</text:span><text:span text:style-name="T11">ecute_s</text:span></text:p>
          </draw:text-box>
        </draw:frame>
        <draw:frame draw:style-name="gr720" draw:text-style-name="P36" draw:layer="layout" svg:width="2.488cm" svg:height="0.569cm" svg:x="18.7cm" svg:y="19.501cm">
          <draw:text-box>
            <text:p><text:span text:style-name="T11">imm_exe</text:span><text:span text:style-name="T11">cute_s</text:span></text:p>
          </draw:text-box>
        </draw:frame>
        <draw:frame draw:style-name="gr721" draw:text-style-name="P3" draw:layer="layout" svg:width="15.09cm" svg:height="0.962cm" svg:x="6.5cm" svg:y="1.6cm">
          <draw:text-box>
            <text:p>RWU-RV64I with pipeline (without stall and forward)</text:p>
          </draw:text-box>
        </draw:frame>
      </draw:page>
      <draw:page draw:name="page13" draw:style-name="dp1" draw:master-page-name="Standard">
        <draw:line draw:style-name="gr592" draw:text-style-name="P4" draw:layer="layout" svg:x1="17.5cm" svg:y1="10.9cm" svg:x2="21.5cm" svg:y2="10.9cm">
          <text:p/>
        </draw:line>
        <draw:line draw:style-name="gr593" draw:text-style-name="P4" draw:layer="layout" svg:x1="5.9cm" svg:y1="14.6cm" svg:x2="5.9cm" svg:y2="13.3cm">
          <text:p/>
        </draw:line>
        <draw:line draw:style-name="gr592" draw:text-style-name="P4" draw:layer="layout" svg:x1="4.5cm" svg:y1="15cm" svg:x2="8cm" svg:y2="15cm">
          <text:p/>
        </draw:line>
        <draw:line draw:style-name="gr593" draw:text-style-name="P4" draw:layer="layout" svg:x1="32cm" svg:y1="15.6cm" svg:x2="32cm" svg:y2="12.8cm">
          <text:p/>
        </draw:line>
        <draw:line draw:style-name="gr593" draw:text-style-name="P4" draw:layer="layout" svg:x1="32cm" svg:y1="10cm" svg:x2="32cm" svg:y2="10.8cm">
          <text:p/>
        </draw:line>
        <draw:line draw:style-name="gr594" draw:text-style-name="P4" draw:layer="layout" svg:x1="28.5cm" svg:y1="11.4cm" svg:x2="31cm" svg:y2="11.4cm">
          <text:p/>
        </draw:line>
        <draw:line draw:style-name="gr592" draw:text-style-name="P4" draw:layer="layout" svg:x1="23cm" svg:y1="12cm" svg:x2="25cm" svg:y2="12cm">
          <text:p/>
        </draw:line>
        <draw:line draw:style-name="gr595" draw:text-style-name="P4" draw:layer="layout" svg:x1="26cm" svg:y1="12cm" svg:x2="27cm" svg:y2="12cm">
          <text:p/>
        </draw:line>
        <draw:line draw:style-name="gr596" draw:text-style-name="P4" draw:layer="layout" svg:x1="10.5cm" svg:y1="12.7cm" svg:x2="16.6cm" svg:y2="12.7cm">
          <text:p/>
        </draw:line>
        <draw:line draw:style-name="gr595" draw:text-style-name="P4" draw:layer="layout" svg:x1="16cm" svg:y1="15cm" svg:x2="16cm" svg:y2="7.5cm">
          <text:p/>
        </draw:line>
        <draw:line draw:style-name="gr595" draw:text-style-name="P4" draw:layer="layout" svg:x1="16cm" svg:y1="13.3cm" svg:x2="16.6cm" svg:y2="13.3cm">
          <text:p/>
        </draw:line>
        <draw:custom-shape draw:style-name="gr368"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5.5cm" svg:y1="12.7cm" svg:x2="15.5cm" svg:y2="14cm">
          <text:p/>
        </draw:line>
        <draw:line draw:style-name="gr593" draw:text-style-name="P4" draw:layer="layout" svg:x1="39.2cm" svg:y1="14cm" svg:x2="39.2cm" svg:y2="12.4cm">
          <text:p/>
        </draw:line>
        <draw:custom-shape draw:style-name="gr368"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8cm" svg:y1="13cm" svg:x2="28cm" svg:y2="16cm">
          <text:p/>
        </draw:line>
        <draw:line draw:style-name="gr595" draw:text-style-name="P4" draw:layer="layout" svg:x1="37cm" svg:y1="16cm" svg:x2="38.4cm" svg:y2="16cm">
          <text:p/>
        </draw:line>
        <draw:line draw:style-name="gr595" draw:text-style-name="P4" draw:layer="layout" svg:x1="38.4cm" svg:y1="16cm" svg:x2="38.4cm" svg:y2="12.3cm">
          <text:p/>
        </draw:line>
        <draw:line draw:style-name="gr597" draw:text-style-name="P4" draw:layer="layout" svg:x1="4.5cm" svg:y1="11.2cm" svg:x2="5.012cm" svg:y2="11.2cm">
          <text:p/>
        </draw:line>
        <draw:line draw:style-name="gr598" draw:text-style-name="P4" draw:layer="layout" svg:x1="4.5cm" svg:y1="3cm" svg:x2="39.5cm" svg:y2="3cm">
          <text:p/>
        </draw:line>
        <draw:line draw:style-name="gr598" draw:text-style-name="P4" draw:layer="layout" svg:x1="4.5cm" svg:y1="3cm" svg:x2="4.5cm" svg:y2="11.2cm">
          <text:p/>
        </draw:line>
        <draw:line draw:style-name="gr598" draw:text-style-name="P4" draw:layer="layout" svg:x1="39.5cm" svg:y1="12cm" svg:x2="39.5cm" svg:y2="3cm">
          <text:p/>
        </draw:line>
        <draw:line draw:style-name="gr592" draw:text-style-name="P4" draw:layer="layout" svg:x1="17.5cm" svg:y1="7.5cm" svg:x2="22cm" svg:y2="7.5cm">
          <text:p/>
        </draw:line>
        <draw:line draw:style-name="gr594" draw:text-style-name="P4" draw:layer="layout" svg:x1="1cm" svg:y1="5.5cm" svg:x2="9.5cm" svg:y2="5.5cm">
          <text:p/>
        </draw:line>
        <draw:line draw:style-name="gr600" draw:text-style-name="P4" draw:layer="layout" svg:x1="24cm" svg:y1="6.5cm" svg:x2="24cm" svg:y2="2.7cm">
          <text:p/>
        </draw:line>
        <draw:line draw:style-name="gr600" draw:text-style-name="P4" draw:layer="layout" svg:x1="23cm" svg:y1="2.7cm" svg:x2="24cm" svg:y2="2.7cm">
          <text:p/>
        </draw:line>
        <draw:custom-shape draw:style-name="gr603"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5cm" svg:y1="12cm" svg:x2="1.5cm" svg:y2="15cm">
          <text:p/>
        </draw:line>
        <draw:line draw:style-name="gr595" draw:text-style-name="P4" draw:layer="layout" svg:x1="1.5cm" svg:y1="15cm" svg:x2="4.5cm" svg:y2="15cm">
          <text:p/>
        </draw:line>
        <draw:line draw:style-name="gr594" draw:text-style-name="P4" draw:layer="layout" svg:x1="2cm" svg:y1="11.8cm" svg:x2="5.012cm" svg:y2="11.8cm">
          <text:p/>
        </draw:line>
        <draw:line draw:style-name="gr594" draw:text-style-name="P4" draw:layer="layout" svg:x1="1.6cm" svg:y1="11.5cm" svg:x2="5.012cm" svg:y2="11.5cm">
          <text:p/>
        </draw:line>
        <draw:custom-shape draw:style-name="gr606" draw:text-style-name="P61" draw:layer="layout" svg:width="1cm" svg:height="1.6cm" svg:x="16.5cm" svg:y="6.7cm">
          <text:p text:style-name="P60"><text:span text:style-name="T19">Shift</text:span></text:p>
          <text:p text:style-name="P60"><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2" draw:text-style-name="P4" draw:layer="layout" svg:x1="16cm" svg:y1="7.5cm" svg:x2="16.5cm" svg:y2="7.5cm">
          <text:p/>
        </draw:line>
        <draw:frame draw:style-name="gr607" draw:text-style-name="P59" draw:layer="layout" svg:width="3.787cm" svg:height="0.725cm" svg:x="1.7cm" svg:y="10.9cm">
          <draw:text-box>
            <text:p><text:span text:style-name="T19">Instr.</text:span><text:span text:style-name="T19">[19-15]</text:span></text:p>
          </draw:text-box>
        </draw:frame>
        <draw:frame draw:style-name="gr607" draw:text-style-name="P59" draw:layer="layout" svg:width="3.787cm" svg:height="0.725cm" svg:x="1.7cm" svg:y="11.4cm">
          <draw:text-box>
            <text:p><text:span text:style-name="T19">Instr.</text:span><text:span text:style-name="T19">[24-20]</text:span></text:p>
          </draw:text-box>
        </draw:frame>
        <draw:line draw:style-name="gr609" draw:text-style-name="P38" draw:layer="layout" svg:x1="2.204cm" svg:y1="14.806cm" svg:x2="2.604cm" svg:y2="15.206cm">
          <text:p/>
        </draw:line>
        <draw:frame draw:style-name="gr610" draw:text-style-name="P59" draw:layer="layout" svg:width="0.976cm" svg:height="0.725cm" svg:x="1.8cm" svg:y="14.277cm">
          <draw:text-box>
            <text:p><text:span text:style-name="T19">32</text:span></text:p>
          </draw:text-box>
        </draw:frame>
        <draw:line draw:style-name="gr593" draw:text-style-name="P4" draw:layer="layout" svg:x1="16.3cm" svg:y1="24.7cm" svg:x2="16.3cm" svg:y2="6.2cm">
          <text:p/>
        </draw:line>
        <draw:line draw:style-name="gr38" draw:text-style-name="P4" draw:layer="layout" svg:x1="37cm" svg:y1="12cm" svg:x2="38.8cm" svg:y2="12cm">
          <text:p/>
        </draw:line>
        <draw:g draw:style-name="gr1">
          <draw:custom-shape draw:style-name="gr611" draw:text-style-name="P29" draw:layer="layout" svg:width="0.5cm" svg:height="13cm" svg:x="9.5cm" svg:y="4cm">
            <text:p/>
            <draw:enhanced-geometry svg:viewBox="0 0 21600 21600" draw:type="rectangle" draw:enhanced-path="M 0 0 L 21600 0 21600 21600 0 21600 0 0 Z N"/>
          </draw:custom-shape>
          <draw:custom-shape draw:style-name="gr611" draw:text-style-name="P29" draw:layer="layout" svg:width="0.5cm" svg:height="13cm" svg:x="10cm" svg:y="4cm">
            <text:p/>
            <draw:enhanced-geometry svg:viewBox="0 0 21600 21600" draw:type="rectangle" draw:enhanced-path="M 0 0 L 21600 0 21600 21600 0 21600 0 0 Z N"/>
          </draw:custom-shape>
        </draw:g>
        <draw:frame draw:style-name="gr612" draw:text-style-name="P62" draw:layer="layout" svg:width="1.797cm" svg:height="0.806cm" svg:x="9.1cm" svg:y="3.2cm">
          <draw:text-box>
            <text:p><text:span text:style-name="T20">ID/EX</text:span></text:p>
          </draw:text-box>
        </draw:frame>
        <draw:g draw:style-name="gr1">
          <draw:custom-shape draw:style-name="gr611" draw:text-style-name="P29" draw:layer="layout" svg:width="0.5cm" svg:height="13cm" svg:x="0cm" svg:y="4.001cm">
            <text:p/>
            <draw:enhanced-geometry svg:viewBox="0 0 21600 21600" draw:type="rectangle" draw:enhanced-path="M 0 0 L 21600 0 21600 21600 0 21600 0 0 Z N"/>
          </draw:custom-shape>
          <draw:custom-shape draw:style-name="gr611" draw:text-style-name="P29" draw:layer="layout" svg:width="0.5cm" svg:height="13cm" svg:x="0.5cm" svg:y="4.001cm">
            <text:p/>
            <draw:enhanced-geometry svg:viewBox="0 0 21600 21600" draw:type="rectangle" draw:enhanced-path="M 0 0 L 21600 0 21600 21600 0 21600 0 0 Z N"/>
          </draw:custom-shape>
        </draw:g>
        <draw:frame draw:style-name="gr613" draw:text-style-name="P62" draw:layer="layout" svg:width="1.577cm" svg:height="0.806cm" svg:x="-0.3cm" svg:y="3.201cm">
          <draw:text-box>
            <text:p><text:span text:style-name="T20">IF/ID</text:span></text:p>
          </draw:text-box>
        </draw:frame>
        <draw:g draw:style-name="gr1">
          <draw:custom-shape draw:style-name="gr611" draw:text-style-name="P29" draw:layer="layout" svg:width="0.5cm" svg:height="13cm" svg:x="25cm" svg:y="4.002cm">
            <text:p/>
            <draw:enhanced-geometry svg:viewBox="0 0 21600 21600" draw:type="rectangle" draw:enhanced-path="M 0 0 L 21600 0 21600 21600 0 21600 0 0 Z N"/>
          </draw:custom-shape>
          <draw:custom-shape draw:style-name="gr611" draw:text-style-name="P29" draw:layer="layout" svg:width="0.5cm" svg:height="13cm" svg:x="25.5cm" svg:y="4.002cm">
            <text:p/>
            <draw:enhanced-geometry svg:viewBox="0 0 21600 21600" draw:type="rectangle" draw:enhanced-path="M 0 0 L 21600 0 21600 21600 0 21600 0 0 Z N"/>
          </draw:custom-shape>
        </draw:g>
        <draw:frame draw:style-name="gr614" draw:text-style-name="P62" draw:layer="layout" svg:width="2.456cm" svg:height="0.806cm" svg:x="24.6cm" svg:y="3.202cm">
          <draw:text-box>
            <text:p><text:span text:style-name="T20">EX/</text:span><text:span text:style-name="T20">MEM</text:span></text:p>
          </draw:text-box>
        </draw:frame>
        <draw:g draw:style-name="gr1">
          <draw:custom-shape draw:style-name="gr722" draw:text-style-name="P29" draw:layer="layout" svg:width="0.5cm" svg:height="13.997cm" svg:x="36.001cm" svg:y="4.003cm">
            <text:p/>
            <draw:enhanced-geometry svg:viewBox="0 0 21600 21600" draw:type="rectangle" draw:enhanced-path="M 0 0 L 21600 0 21600 21600 0 21600 0 0 Z N"/>
          </draw:custom-shape>
          <draw:custom-shape draw:style-name="gr722" draw:text-style-name="P29" draw:layer="layout" svg:width="0.5cm" svg:height="13.997cm" svg:x="36.501cm" svg:y="4.003cm">
            <text:p/>
            <draw:enhanced-geometry svg:viewBox="0 0 21600 21600" draw:type="rectangle" draw:enhanced-path="M 0 0 L 21600 0 21600 21600 0 21600 0 0 Z N"/>
          </draw:custom-shape>
        </draw:g>
        <draw:frame draw:style-name="gr615" draw:text-style-name="P62" draw:layer="layout" svg:width="2.593cm" svg:height="0.806cm" svg:x="35.101cm" svg:y="3.203cm">
          <draw:text-box>
            <text:p><text:span text:style-name="T20">MEM/</text:span><text:span text:style-name="T20">WB</text:span></text:p>
          </draw:text-box>
        </draw:frame>
        <draw:line draw:style-name="gr594" draw:text-style-name="P4" draw:layer="layout" svg:x1="10.5cm" svg:y1="5.5cm" svg:x2="16cm" svg:y2="5.5cm">
          <text:p/>
        </draw:line>
        <draw:line draw:style-name="gr592" draw:text-style-name="P4" draw:layer="layout" svg:x1="8.5cm" svg:y1="11cm" svg:x2="9.5cm" svg:y2="11cm">
          <text:p/>
        </draw:line>
        <draw:line draw:style-name="gr592" draw:text-style-name="P4" draw:layer="layout" svg:x1="8.5cm" svg:y1="12.7cm" svg:x2="9.5cm" svg:y2="12.7cm">
          <text:p/>
        </draw:line>
        <draw:line draw:style-name="gr592" draw:text-style-name="P4" draw:layer="layout" svg:x1="9cm" svg:y1="15cm" svg:x2="9.5cm" svg:y2="15cm">
          <text:p/>
        </draw:line>
        <draw:line draw:style-name="gr592" draw:text-style-name="P4" draw:layer="layout" svg:x1="22.3cm" svg:y1="14cm" svg:x2="25cm" svg:y2="14cm">
          <text:p/>
        </draw:line>
        <draw:line draw:style-name="gr592" draw:text-style-name="P4" draw:layer="layout" svg:x1="33cm" svg:y1="12cm" svg:x2="36.001cm" svg:y2="12cm">
          <text:p/>
        </draw:line>
        <draw:line draw:style-name="gr616" draw:text-style-name="P4" draw:layer="layout" svg:x1="28cm" svg:y1="16cm" svg:x2="36.001cm" svg:y2="16cm">
          <text:p/>
        </draw:line>
        <draw:line draw:style-name="gr38" draw:text-style-name="P4" draw:layer="layout" svg:x1="1cm" svg:y1="12cm" svg:x2="1.8cm" svg:y2="12cm">
          <text:p/>
        </draw:line>
        <draw:custom-shape draw:style-name="gr368"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7" draw:text-style-name="P4" draw:layer="layout" svg:x1="1.5cm" svg:y1="15cm" svg:x2="1.5cm" svg:y2="23cm">
          <text:p/>
        </draw:line>
        <draw:line draw:style-name="gr618" draw:text-style-name="P4" draw:layer="layout" svg:x1="1.5cm" svg:y1="16.9cm" svg:x2="9.5cm" svg:y2="16.9cm">
          <text:p/>
        </draw:line>
        <draw:line draw:style-name="gr723" draw:text-style-name="P4" draw:layer="layout" svg:x1="10.5cm" svg:y1="16.9cm" svg:x2="25cm" svg:y2="16.9cm">
          <text:p/>
        </draw:line>
        <draw:line draw:style-name="gr723" draw:text-style-name="P4" draw:layer="layout" svg:x1="26cm" svg:y1="16.9cm" svg:x2="36.001cm" svg:y2="16.9cm">
          <text:p/>
        </draw:line>
        <draw:line draw:style-name="gr598" draw:text-style-name="P4" draw:layer="layout" svg:x1="37cm" svg:y1="16.9cm" svg:x2="38cm" svg:y2="16.9cm">
          <text:p/>
        </draw:line>
        <draw:line draw:style-name="gr598" draw:text-style-name="P4" draw:layer="layout" svg:x1="38cm" svg:y1="16.9cm" svg:x2="38cm" svg:y2="20.8cm">
          <text:p/>
        </draw:line>
        <draw:line draw:style-name="gr598" draw:text-style-name="P4" draw:layer="layout" svg:x1="38cm" svg:y1="20.8cm" svg:x2="17.801cm" svg:y2="20.8cm">
          <text:p/>
        </draw:line>
        <draw:line draw:style-name="gr619" draw:text-style-name="P4" draw:layer="layout" svg:x1="1.2cm" svg:y1="12.2cm" svg:x2="1.2cm" svg:y2="20.7cm">
          <text:p/>
        </draw:line>
        <draw:line draw:style-name="gr594" draw:text-style-name="P4" draw:layer="layout" svg:x1="1.2cm" svg:y1="12.2cm" svg:x2="5.012cm" svg:y2="12.2cm">
          <text:p/>
        </draw:line>
        <draw:line draw:style-name="gr622" draw:text-style-name="P4" draw:layer="layout" svg:x1="24.2cm" svg:y1="11.7cm" svg:x2="24.2cm" svg:y2="2.3cm">
          <text:p/>
        </draw:line>
        <draw:line draw:style-name="gr622" draw:text-style-name="P4" draw:layer="layout" svg:x1="24.2cm" svg:y1="11.7cm" svg:x2="23cm" svg:y2="11.7cm">
          <text:p/>
        </draw:line>
        <draw:line draw:style-name="gr593" draw:text-style-name="P4" draw:layer="layout" svg:x1="22.5cm" svg:y1="25.3cm" svg:x2="22.5cm" svg:y2="12.7cm">
          <text:p/>
        </draw:line>
        <draw:line draw:style-name="gr624" draw:text-style-name="P38" draw:layer="layout" svg:x1="22.3cm" svg:y1="13.4cm" svg:x2="22.7cm" svg:y2="13.8cm">
          <text:p/>
        </draw:line>
        <draw:line draw:style-name="gr622" draw:text-style-name="P4" draw:layer="layout" svg:x1="10.5cm" svg:y1="25.3cm" svg:x2="22.5cm" svg:y2="25.3cm">
          <text:p/>
        </draw:line>
        <draw:custom-shape draw:style-name="gr625" draw:text-style-name="P66" draw:layer="layout" svg:width="1cm" svg:height="3.5cm" svg:x="9.5cm" svg:y="22.5cm">
          <text:p/>
          <draw:enhanced-geometry svg:viewBox="0 0 21600 21600" draw:type="rectangle" draw:enhanced-path="M 0 0 L 21600 0 21600 21600 0 21600 0 0 Z N"/>
        </draw:custom-shape>
        <draw:custom-shape draw:style-name="gr625" draw:text-style-name="P66" draw:layer="layout" svg:width="1cm" svg:height="3.5cm" svg:x="25cm" svg:y="22.5cm">
          <text:p/>
          <draw:enhanced-geometry svg:viewBox="0 0 21600 21600" draw:type="rectangle" draw:enhanced-path="M 0 0 L 21600 0 21600 21600 0 21600 0 0 Z N"/>
        </draw:custom-shape>
        <draw:custom-shape draw:style-name="gr626" draw:text-style-name="P66" draw:layer="layout" svg:width="1cm" svg:height="4cm" svg:x="36cm" svg:y="22cm">
          <text:p/>
          <draw:enhanced-geometry svg:viewBox="0 0 21600 21600" draw:type="rectangle" draw:enhanced-path="M 0 0 L 21600 0 21600 21600 0 21600 0 0 Z N"/>
        </draw:custom-shape>
        <draw:line draw:style-name="gr627" draw:text-style-name="P67" draw:layer="layout" svg:x1="10.5cm" svg:y1="24.4cm" svg:x2="25cm" svg:y2="24.4cm">
          <text:p/>
        </draw:line>
        <draw:line draw:style-name="gr627" draw:text-style-name="P67" draw:layer="layout" svg:x1="26cm" svg:y1="24.4cm" svg:x2="36cm" svg:y2="24.4cm">
          <text:p/>
        </draw:line>
        <draw:line draw:style-name="gr627" draw:text-style-name="P67" draw:layer="layout" svg:x1="26cm" svg:y1="22.7cm" svg:x2="36.004cm" svg:y2="22.7cm">
          <text:p/>
        </draw:line>
        <draw:line draw:style-name="gr627" draw:text-style-name="P67" draw:layer="layout" svg:x1="6.5cm" svg:y1="25.6cm" svg:x2="9.5cm" svg:y2="25.6cm">
          <text:p/>
        </draw:line>
        <draw:line draw:style-name="gr627" draw:text-style-name="P67" draw:layer="layout" svg:x1="6.5cm" svg:y1="25.9cm" svg:x2="9.5cm" svg:y2="25.9cm">
          <text:p/>
        </draw:line>
        <draw:line draw:style-name="gr622" draw:text-style-name="P4" draw:layer="layout" svg:x1="24.4cm" svg:y1="25.6cm" svg:x2="24.4cm" svg:y2="1.5cm">
          <text:p/>
        </draw:line>
        <draw:line draw:style-name="gr622" draw:text-style-name="P4" draw:layer="layout" svg:x1="33.4cm" svg:y1="15.3cm" svg:x2="33.4cm" svg:y2="8cm">
          <text:p/>
        </draw:line>
        <draw:line draw:style-name="gr622" draw:text-style-name="P4" draw:layer="layout" svg:x1="32cm" svg:y1="10cm" svg:x2="33.4cm" svg:y2="10cm">
          <text:p/>
        </draw:line>
        <draw:line draw:style-name="gr622" draw:text-style-name="P4" draw:layer="layout" svg:x1="32.2cm" svg:y1="15.3cm" svg:x2="33.4cm" svg:y2="15.3cm">
          <text:p/>
        </draw:line>
        <draw:line draw:style-name="gr622" draw:text-style-name="P4" draw:layer="layout" svg:x1="32cm" svg:y1="23.3cm" svg:x2="32cm" svg:y2="15.6cm">
          <text:p/>
        </draw:line>
        <draw:line draw:style-name="gr622" draw:text-style-name="P4" draw:layer="layout" svg:x1="32.2cm" svg:y1="23cm" svg:x2="32.2cm" svg:y2="15.3cm">
          <text:p/>
        </draw:line>
        <draw:line draw:style-name="gr622" draw:text-style-name="P4" draw:layer="layout" svg:x1="26cm" svg:y1="23cm" svg:x2="32.2cm" svg:y2="23cm">
          <text:p/>
        </draw:line>
        <draw:line draw:style-name="gr622" draw:text-style-name="P4" draw:layer="layout" svg:x1="5.9cm" svg:y1="21.7cm" svg:x2="37.5cm" svg:y2="21.7cm">
          <text:p/>
        </draw:line>
        <draw:line draw:style-name="gr622" draw:text-style-name="P4" draw:layer="layout" svg:x1="5.9cm" svg:y1="21.7cm" svg:x2="5.9cm" svg:y2="14.6cm">
          <text:p/>
        </draw:line>
        <draw:line draw:style-name="gr622" draw:text-style-name="P4" draw:layer="layout" svg:x1="37cm" svg:y1="24.4cm" svg:x2="37.5cm" svg:y2="24.4cm">
          <text:p/>
        </draw:line>
        <draw:line draw:style-name="gr622" draw:text-style-name="P4" draw:layer="layout" svg:x1="37cm" svg:y1="22.7cm" svg:x2="39.2cm" svg:y2="22.7cm">
          <text:p/>
        </draw:line>
        <draw:line draw:style-name="gr622" draw:text-style-name="P4" draw:layer="layout" svg:x1="37.5cm" svg:y1="24.4cm" svg:x2="37.5cm" svg:y2="21.7cm">
          <text:p/>
        </draw:line>
        <draw:line draw:style-name="gr622" draw:text-style-name="P4" draw:layer="layout" svg:x1="39.2cm" svg:y1="22.7cm" svg:x2="39.2cm" svg:y2="14cm">
          <text:p/>
        </draw:line>
        <draw:line draw:style-name="gr592" draw:text-style-name="P4" draw:layer="layout" svg:x1="1.5cm" svg:y1="23cm" svg:x2="2.5cm" svg:y2="23cm">
          <text:p/>
        </draw:line>
        <draw:g draw:style-name="gr1">
          <draw:custom-shape draw:style-name="gr634" draw:text-style-name="P49" draw:layer="layout" svg:width="3.506cm" svg:height="2.5cm" svg:x="5.012cm" svg:y="10.8cm">
            <text:p text:style-name="P48"><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530" draw:text-style-name="P36" draw:layer="layout" svg:width="3.576cm" svg:height="0.569cm" svg:x="4.814cm" svg:y="11.2cm">
            <draw:text-box>
              <text:p><text:span text:style-name="T11">instr(19:1</text:span><text:span text:style-name="T11">5):raddr0</text:span><text:span text:style-name="T11">1(4:0)</text:span></text:p>
            </draw:text-box>
          </draw:frame>
          <draw:frame draw:style-name="gr530" draw:text-style-name="P36" draw:layer="layout" svg:width="3.576cm" svg:height="0.569cm" svg:x="4.812cm" svg:y="11.531cm">
            <draw:text-box>
              <text:p><text:span text:style-name="T11">instr(24:2</text:span><text:span text:style-name="T11">0):raddr0</text:span><text:span text:style-name="T11">2(4:0)</text:span></text:p>
            </draw:text-box>
          </draw:frame>
          <draw:frame draw:style-name="gr531" draw:text-style-name="P36" draw:layer="layout" svg:width="3.508cm" svg:height="0.569cm" svg:x="4.806cm" svg:y="11.9cm">
            <draw:text-box>
              <text:p><text:span text:style-name="T11">instr(11:7)</text:span><text:span text:style-name="T11">:waddr01(</text:span><text:span text:style-name="T11">4:0)</text:span></text:p>
            </draw:text-box>
          </draw:frame>
          <draw:frame draw:style-name="gr532" draw:text-style-name="P36" draw:layer="layout" svg:width="2.315cm" svg:height="0.569cm" svg:x="4.8cm" svg:y="10.931cm">
            <draw:text-box>
              <text:p><text:span text:style-name="T11">wdata01(</text:span><text:span text:style-name="T11">63:0)</text:span></text:p>
            </draw:text-box>
          </draw:frame>
          <draw:frame draw:style-name="gr635" draw:text-style-name="P36" draw:layer="layout" svg:width="2.205cm" svg:height="0.569cm" svg:x="6.51cm" svg:y="10.7cm">
            <draw:text-box>
              <text:p><text:span text:style-name="T11">rdata01(6</text:span><text:span text:style-name="T11">3:0)</text:span></text:p>
            </draw:text-box>
          </draw:frame>
          <draw:frame draw:style-name="gr635" draw:text-style-name="P36" draw:layer="layout" svg:width="2.205cm" svg:height="0.569cm" svg:x="6.514cm" svg:y="12.431cm">
            <draw:text-box>
              <text:p><text:span text:style-name="T11">rdata02(6</text:span><text:span text:style-name="T11">3:0)</text:span></text:p>
            </draw:text-box>
          </draw:frame>
          <draw:frame draw:style-name="gr534" draw:text-style-name="P36" draw:layer="layout" svg:width="0.865cm" svg:height="0.569cm" svg:x="5.556cm" svg:y="12.831cm">
            <draw:text-box>
              <text:p><text:span text:style-name="T11">we</text:span></text:p>
            </draw:text-box>
          </draw:frame>
        </draw:g>
        <draw:g draw:style-name="gr1">
          <draw:custom-shape draw:style-name="gr636" draw:text-style-name="P49" draw:layer="layout" svg:width="1.5cm" svg:height="2cm" svg:x="21.5cm" svg:y="10.7cm">
            <text:p text:style-name="P48"><text:span text:style-name="T11">alu</text:span></text:p>
            <draw:enhanced-geometry svg:viewBox="0 0 21600 21600" draw:type="rectangle" draw:enhanced-path="M 0 0 L 21600 0 21600 21600 0 21600 0 0 Z N"/>
          </draw:custom-shape>
          <draw:frame draw:style-name="gr543" draw:text-style-name="P36" draw:layer="layout" svg:width="1.37cm" svg:height="0.569cm" svg:x="21.282cm" svg:y="10.6cm">
            <draw:text-box>
              <text:p><text:span text:style-name="T11">data01</text:span></text:p>
            </draw:text-box>
          </draw:frame>
          <draw:frame draw:style-name="gr543" draw:text-style-name="P36" draw:layer="layout" svg:width="1.37cm" svg:height="0.569cm" svg:x="21.282cm" svg:y="10.869cm">
            <draw:text-box>
              <text:p><text:span text:style-name="T11">data02</text:span></text:p>
            </draw:text-box>
          </draw:frame>
          <draw:frame draw:style-name="gr637" draw:text-style-name="P36" draw:layer="layout" svg:width="1.29cm" svg:height="0.569cm" svg:x="21.859cm" svg:y="12.3cm">
            <draw:text-box>
              <text:p><text:span text:style-name="T11">aluSel</text:span></text:p>
            </draw:text-box>
          </draw:frame>
          <draw:frame draw:style-name="gr638" draw:text-style-name="P36" draw:layer="layout" svg:width="1.054cm" svg:height="0.569cm" svg:x="22.148cm" svg:y="11.4cm">
            <draw:text-box>
              <text:p><text:span text:style-name="T11">zero</text:span></text:p>
            </draw:text-box>
          </draw:frame>
          <draw:frame draw:style-name="gr639" draw:text-style-name="P36" draw:layer="layout" svg:width="1.684cm" svg:height="0.569cm" svg:x="21.517cm" svg:y="11.7cm">
            <draw:text-box>
              <text:p><text:span text:style-name="T11">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592" draw:text-style-name="P4" draw:layer="layout" svg:x1="21cm" svg:y1="11.2cm" svg:x2="21.5cm" svg:y2="11.2cm">
          <text:p/>
        </draw:line>
        <draw:line draw:style-name="gr595" draw:text-style-name="P4" draw:layer="layout" svg:x1="17.1cm" svg:y1="13cm" svg:x2="21cm" svg:y2="13cm">
          <text:p/>
        </draw:line>
        <draw:line draw:style-name="gr38" draw:text-style-name="P4" draw:layer="layout" svg:x1="21cm" svg:y1="13cm" svg:x2="21cm" svg:y2="11.2cm">
          <text:p/>
        </draw:line>
        <draw:line draw:style-name="gr595" draw:text-style-name="P4" draw:layer="layout" svg:x1="16.4cm" svg:y1="10.6cm" svg:x2="17cm" svg:y2="10.6cm">
          <text:p/>
        </draw:line>
        <draw:line draw:style-name="gr595" draw:text-style-name="P4" draw:layer="layout" svg:x1="15.2cm" svg:y1="11.2cm" svg:x2="17cm" svg:y2="11.2cm">
          <text:p/>
        </draw:line>
        <draw:g draw:style-name="gr1">
          <draw:custom-shape draw:style-name="gr640" draw:text-style-name="P49" draw:layer="layout" svg:width="2.607cm" svg:height="1cm" svg:x="6.424cm" svg:y="14.6cm">
            <text:p text:style-name="P48"><text:span text:style-name="T11">extend</text:span></text:p>
            <draw:enhanced-geometry svg:viewBox="0 0 21600 21600" draw:type="rectangle" draw:enhanced-path="M 0 0 L 21600 0 21600 21600 0 21600 0 0 Z N"/>
          </draw:custom-shape>
          <draw:frame draw:style-name="gr641" draw:text-style-name="P36" draw:layer="layout" svg:width="1.779cm" svg:height="0.569cm" svg:x="6.213cm" svg:y="14.7cm">
            <draw:text-box>
              <text:p><text:span text:style-name="T11">instr(31:0)</text:span></text:p>
            </draw:text-box>
          </draw:frame>
          <draw:frame draw:style-name="gr642" draw:text-style-name="P36" draw:layer="layout" svg:width="1.448cm" svg:height="0.569cm" svg:x="7.614cm" svg:y="15.2cm">
            <draw:text-box>
              <text:p><text:span text:style-name="T11">sel(2:0)</text:span></text:p>
            </draw:text-box>
          </draw:frame>
          <draw:frame draw:style-name="gr643" draw:text-style-name="P36" draw:layer="layout" svg:width="1.778cm" svg:height="0.569cm" svg:x="7.524cm" svg:y="14.667cm">
            <draw:text-box>
              <text:p><text:span text:style-name="T11">imm(63:0)</text:span></text:p>
            </draw:text-box>
          </draw:frame>
        </draw:g>
        <draw:line draw:style-name="gr593" draw:text-style-name="P4" draw:layer="layout" svg:x1="8.3cm" svg:y1="24.932cm" svg:x2="8.3cm" svg:y2="15.6cm">
          <text:p/>
        </draw:line>
        <draw:custom-shape draw:style-name="gr526" draw:text-style-name="P55" draw:layer="layout" svg:width="1cm" svg:height="1cm" svg:x="22cm" svg:y="6.7cm">
          <text:p text:style-name="P48"><text:span text:style-name="T11">+</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600" draw:text-style-name="P4" draw:layer="layout" svg:x1="22.975cm" svg:y1="7.201cm" svg:x2="24cm" svg:y2="7.2cm">
          <text:p/>
        </draw:line>
        <draw:line draw:style-name="gr602" draw:text-style-name="P4" draw:layer="layout" svg:x1="24cm" svg:y1="7.2cm" svg:x2="24cm" svg:y2="6.5cm">
          <text:p/>
        </draw:line>
        <draw:line draw:style-name="gr594"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368"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5.5cm" svg:y1="6.1cm" svg:x2="15.5cm" svg:y2="11cm">
          <text:p/>
        </draw:line>
        <draw:line draw:style-name="gr619"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594" draw:text-style-name="P4" draw:layer="layout" svg:x1="1cm" svg:y1="5cm" svg:x2="9.5cm" svg:y2="5cm">
          <text:p/>
        </draw:line>
        <draw:line draw:style-name="gr594" draw:text-style-name="P4" draw:layer="layout" svg:x1="10.5cm" svg:y1="5cm" svg:x2="25cm" svg:y2="5cm">
          <text:p/>
        </draw:line>
        <draw:line draw:style-name="gr594" draw:text-style-name="P4" draw:layer="layout" svg:x1="26cm" svg:y1="5cm" svg:x2="36.003cm" svg:y2="5cm">
          <text:p/>
        </draw:line>
        <draw:line draw:style-name="gr600" draw:text-style-name="P4" draw:layer="layout" svg:x1="37cm" svg:y1="5cm" svg:x2="38.5cm" svg:y2="5cm">
          <text:p/>
        </draw:line>
        <draw:line draw:style-name="gr600" draw:text-style-name="P4" draw:layer="layout" svg:x1="38.5cm" svg:y1="11.7cm" svg:x2="38.5cm" svg:y2="5cm">
          <text:p/>
        </draw:line>
        <draw:line draw:style-name="gr600"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593" draw:text-style-name="P4" draw:layer="layout" svg:x1="17.4cm" svg:y1="24.1cm" svg:x2="17.4cm" svg:y2="11.301cm">
          <text:p/>
        </draw:line>
        <draw:line draw:style-name="gr593" draw:text-style-name="P4" draw:layer="layout" svg:x1="17cm" svg:y1="23.8cm" svg:x2="17cm" svg:y2="13.402cm">
          <text:p/>
        </draw:line>
        <draw:g draw:style-name="gr1">
          <draw:custom-shape draw:style-name="gr648" draw:text-style-name="P49" draw:layer="layout" svg:width="2cm" svg:height="2cm" svg:x="31cm" svg:y="10.8cm">
            <text:p text:style-name="P48"><text:span text:style-name="T11">DMem</text:span></text:p>
            <draw:enhanced-geometry svg:viewBox="0 0 21600 21600" draw:type="rectangle" draw:enhanced-path="M 0 0 L 21600 0 21600 21600 0 21600 0 0 Z N"/>
          </draw:custom-shape>
          <draw:frame draw:style-name="gr631" draw:text-style-name="P36" draw:layer="layout" svg:width="1.148cm" svg:height="0.569cm" svg:x="31.555cm" svg:y="10.7cm">
            <draw:text-box>
              <text:p><text:span text:style-name="T11">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649" draw:text-style-name="P36" draw:layer="layout" svg:width="1.101cm" svg:height="0.569cm" svg:x="31.9cm" svg:y="12.331cm">
            <draw:text-box>
              <text:p><text:span text:style-name="T11">rdEn</text:span></text:p>
            </draw:text-box>
          </draw:frame>
          <draw:frame draw:style-name="gr650" draw:text-style-name="P36" draw:layer="layout" svg:width="1.038cm" svg:height="0.569cm" svg:x="30.8cm" svg:y="11.7cm">
            <draw:text-box>
              <text:p><text:span text:style-name="T11">instr</text:span></text:p>
            </draw:text-box>
          </draw:frame>
          <draw:frame draw:style-name="gr651" draw:text-style-name="P36" draw:layer="layout" svg:width="1.07cm" svg:height="0.569cm" svg:x="30.8cm" svg:y="11.1cm">
            <draw:text-box>
              <text:p><text:span text:style-name="T11">addr</text:span></text:p>
            </draw:text-box>
          </draw:frame>
          <draw:frame draw:style-name="gr652" draw:text-style-name="P36" draw:layer="layout" svg:width="1.117cm" svg:height="0.569cm" svg:x="30.8cm" svg:y="11.4cm">
            <draw:text-box>
              <text:p><text:span text:style-name="T11">datai</text:span></text:p>
            </draw:text-box>
          </draw:frame>
          <draw:frame draw:style-name="gr653" draw:text-style-name="P36" draw:layer="layout" svg:width="1.212cm" svg:height="0.569cm" svg:x="31.991cm" svg:y="11.7cm">
            <draw:text-box>
              <text:p><text:span text:style-name="T11">datao</text:span></text:p>
            </draw:text-box>
          </draw:frame>
        </draw:g>
        <draw:line draw:style-name="gr592" draw:text-style-name="P4" draw:layer="layout" svg:x1="29.2cm" svg:y1="11.7cm" svg:x2="31cm" svg:y2="11.7cm">
          <text:p/>
        </draw:line>
        <draw:line draw:style-name="gr592"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368"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4" draw:text-style-name="P53" draw:layer="layout" svg:width="2.5cm" svg:height="0.726cm" svg:x="1.6cm" svg:y="16.402cm">
          <draw:text-box>
            <text:p><text:span text:style-name="T19">Instr.</text:span><text:span text:style-name="T19">[11-7]</text:span></text:p>
          </draw:text-box>
        </draw:frame>
        <draw:line draw:style-name="gr38" draw:text-style-name="P4" draw:layer="layout" svg:x1="29.5cm" svg:y1="16.9cm" svg:x2="29.5cm" svg:y2="12cm">
          <text:p/>
        </draw:line>
        <draw:g draw:style-name="gr1">
          <draw:custom-shape draw:style-name="gr656" draw:text-style-name="P49" draw:layer="layout" svg:width="4cm" svg:height="3.527cm" svg:x="2.5cm" svg:y="22.473cm">
            <text:p text:style-name="P48"><text:span text:style-name="T11">controllAll</text:span></text:p>
            <draw:enhanced-geometry svg:viewBox="0 0 21600 21600" draw:type="rectangle" draw:enhanced-path="M 0 0 L 21600 0 21600 21600 0 21600 0 0 Z N"/>
          </draw:custom-shape>
          <draw:frame draw:style-name="gr657" draw:text-style-name="P36" draw:layer="layout" svg:width="2.016cm" svg:height="0.569cm" svg:x="2.3cm" svg:y="22.46cm">
            <draw:text-box>
              <text:p><text:span text:style-name="T11">opcode(6:</text:span><text:span text:style-name="T11">0)</text:span></text:p>
            </draw:text-box>
          </draw:frame>
          <draw:frame draw:style-name="gr658" draw:text-style-name="P36" draw:layer="layout" svg:width="1.779cm" svg:height="0.569cm" svg:x="2.324cm" svg:y="22.716cm">
            <draw:text-box>
              <text:p><text:span text:style-name="T11">func3(2:0)</text:span></text:p>
            </draw:text-box>
          </draw:frame>
          <draw:frame draw:style-name="gr659" draw:text-style-name="P36" draw:layer="layout" svg:width="1.511cm" svg:height="0.569cm" svg:x="2.3cm" svg:y="22.973cm">
            <draw:text-box>
              <text:p><text:span text:style-name="T11">func7b5</text:span></text:p>
            </draw:text-box>
          </draw:frame>
          <draw:frame draw:style-name="gr550" draw:text-style-name="P36" draw:layer="layout" svg:width="1.054cm" svg:height="0.569cm" svg:x="2.372cm" svg:y="23.229cm">
            <draw:text-box>
              <text:p><text:span text:style-name="T11">zero</text:span></text:p>
            </draw:text-box>
          </draw:frame>
          <draw:frame draw:style-name="gr456" draw:text-style-name="P36" draw:layer="layout" svg:width="2.204cm" svg:height="0.569cm" svg:x="4.535cm" svg:y="22.373cm">
            <draw:text-box>
              <text:p><text:span text:style-name="T11">resultSrc(</text:span><text:span text:style-name="T11">1:0)</text:span></text:p>
            </draw:text-box>
          </draw:frame>
          <draw:frame draw:style-name="gr660" draw:text-style-name="P36" draw:layer="layout" svg:width="1.647cm" svg:height="0.569cm" svg:x="5.1cm" svg:y="22.657cm">
            <draw:text-box>
              <text:p><text:span text:style-name="T11">dMemWr</text:span></text:p>
            </draw:text-box>
          </draw:frame>
          <draw:frame draw:style-name="gr661" draw:text-style-name="P36" draw:layer="layout" svg:width="1.653cm" svg:height="0.569cm" svg:x="5.1cm" svg:y="22.941cm">
            <draw:text-box>
              <text:p><text:span text:style-name="T11">dMemRd</text:span></text:p>
            </draw:text-box>
          </draw:frame>
          <draw:frame draw:style-name="gr662" draw:text-style-name="P36" draw:layer="layout" svg:width="1.321cm" svg:height="0.569cm" svg:x="5.387cm" svg:y="23.226cm">
            <draw:text-box>
              <text:p><text:span text:style-name="T11">PCSrc</text:span></text:p>
            </draw:text-box>
          </draw:frame>
          <draw:frame draw:style-name="gr663" draw:text-style-name="P36" draw:layer="layout" svg:width="1.495cm" svg:height="0.569cm" svg:x="5.224cm" svg:y="23.51cm">
            <draw:text-box>
              <text:p><text:span text:style-name="T11">aluSrcB</text:span></text:p>
            </draw:text-box>
          </draw:frame>
          <draw:frame draw:style-name="gr663" draw:text-style-name="P36" draw:layer="layout" svg:width="1.495cm" svg:height="0.569cm" svg:x="5.224cm" svg:y="23.794cm">
            <draw:text-box>
              <text:p><text:span text:style-name="T11">aluSrcA</text:span></text:p>
            </draw:text-box>
          </draw:frame>
          <draw:frame draw:style-name="gr664" draw:text-style-name="P36" draw:layer="layout" svg:width="1.269cm" svg:height="0.569cm" svg:x="5.463cm" svg:y="24.078cm">
            <draw:text-box>
              <text:p><text:span text:style-name="T11">regWr</text:span></text:p>
            </draw:text-box>
          </draw:frame>
          <draw:frame draw:style-name="gr556" draw:text-style-name="P36" draw:layer="layout" svg:width="1.117cm" svg:height="0.569cm" svg:x="5.591cm" svg:y="24.363cm">
            <draw:text-box>
              <text:p><text:span text:style-name="T11">jump</text:span></text:p>
            </draw:text-box>
          </draw:frame>
          <draw:frame draw:style-name="gr665" draw:text-style-name="P36" draw:layer="layout" svg:width="2.046cm" svg:height="0.569cm" svg:x="4.707cm" svg:y="24.647cm">
            <draw:text-box>
              <text:p><text:span text:style-name="T11">immSrc(2</text:span><text:span text:style-name="T11">:0)</text:span></text:p>
            </draw:text-box>
          </draw:frame>
          <draw:frame draw:style-name="gr545" draw:text-style-name="P36" draw:layer="layout" svg:width="1.874cm" svg:height="0.569cm" svg:x="4.857cm" svg:y="24.931cm">
            <draw:text-box>
              <text:p><text:span text:style-name="T11">aluSel(4:0</text:span><text:span text:style-name="T11">)</text:span></text:p>
            </draw:text-box>
          </draw:frame>
          <draw:frame draw:style-name="gr666" draw:text-style-name="P36" draw:layer="layout" svg:width="1.669cm" svg:height="0.569cm" svg:x="5.057cm" svg:y="25.232cm">
            <draw:text-box>
              <text:p><text:span text:style-name="T11">branch_s</text:span></text:p>
            </draw:text-box>
          </draw:frame>
          <draw:frame draw:style-name="gr667" draw:text-style-name="P36" draw:layer="layout" svg:width="1.416cm" svg:height="0.569cm" svg:x="5.257cm" svg:y="25.533cm">
            <draw:text-box>
              <text:p><text:span text:style-name="T11">jump_s</text:span></text:p>
            </draw:text-box>
          </draw:frame>
        </draw:g>
        <draw:line draw:style-name="gr592" draw:text-style-name="P4" draw:layer="layout" svg:x1="1.5cm" svg:y1="22.8cm" svg:x2="2.5cm" svg:y2="22.8cm">
          <text:p/>
        </draw:line>
        <draw:line draw:style-name="gr592" draw:text-style-name="P4" draw:layer="layout" svg:x1="1.5cm" svg:y1="23.2cm" svg:x2="2.5cm" svg:y2="23.2cm">
          <text:p/>
        </draw:line>
        <draw:custom-shape draw:style-name="gr368"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7" draw:text-style-name="P67" draw:layer="layout" svg:x1="1.5cm" svg:y1="23.5cm" svg:x2="2.5cm" svg:y2="23.5cm">
          <text:p/>
        </draw:line>
        <draw:frame draw:style-name="gr670" draw:text-style-name="P9" draw:layer="layout" svg:width="1.444cm" svg:height="0.725cm" svg:x="0.258cm" svg:y="23.1cm">
          <draw:text-box>
            <text:p><text:span text:style-name="T2">open</text:span></text:p>
          </draw:text-box>
        </draw:frame>
        <draw:line draw:style-name="gr622" draw:text-style-name="P4" draw:layer="layout" svg:x1="6.5cm" svg:y1="24.932cm" svg:x2="8.3cm" svg:y2="24.932cm">
          <text:p/>
        </draw:line>
        <draw:line draw:style-name="gr627" draw:text-style-name="P67" draw:layer="layout" svg:x1="6.5cm" svg:y1="24.4cm" svg:x2="9.5cm" svg:y2="24.4cm">
          <text:p/>
        </draw:line>
        <draw:line draw:style-name="gr622" draw:text-style-name="P4" draw:layer="layout" svg:x1="24.6cm" svg:y1="25.9cm" svg:x2="24.6cm" svg:y2="0.403cm">
          <text:p/>
        </draw:line>
        <draw:line draw:style-name="gr622" draw:text-style-name="P4" draw:layer="layout" svg:x1="10.5cm" svg:y1="25.6cm" svg:x2="24.4cm" svg:y2="25.6cm">
          <text:p/>
        </draw:line>
        <draw:line draw:style-name="gr627" draw:text-style-name="P67" draw:layer="layout" svg:x1="6.5cm" svg:y1="25.3cm" svg:x2="9.5cm" svg:y2="25.3cm">
          <text:p/>
        </draw:line>
        <draw:line draw:style-name="gr627" draw:text-style-name="P67" draw:layer="layout" svg:x1="6.5cm" svg:y1="24.7cm" svg:x2="9.5cm" svg:y2="24.7cm">
          <text:p/>
        </draw:line>
        <draw:line draw:style-name="gr622" draw:text-style-name="P4" draw:layer="layout" svg:x1="10.5cm" svg:y1="24.7cm" svg:x2="16.3cm" svg:y2="24.7cm">
          <text:p/>
        </draw:line>
        <draw:line draw:style-name="gr627" draw:text-style-name="P67" draw:layer="layout" svg:x1="6.5cm" svg:y1="24.1cm" svg:x2="9.5cm" svg:y2="24.1cm">
          <text:p/>
        </draw:line>
        <draw:line draw:style-name="gr627" draw:text-style-name="P67" draw:layer="layout" svg:x1="6.5cm" svg:y1="23.8cm" svg:x2="9.5cm" svg:y2="23.8cm">
          <text:p/>
        </draw:line>
        <draw:line draw:style-name="gr622" draw:text-style-name="P4" draw:layer="layout" svg:x1="10.5cm" svg:y1="24.1cm" svg:x2="17.4cm" svg:y2="24.1cm">
          <text:p/>
        </draw:line>
        <draw:line draw:style-name="gr622" draw:text-style-name="P4" draw:layer="layout" svg:x1="10.5cm" svg:y1="23.8cm" svg:x2="17cm" svg:y2="23.8cm">
          <text:p/>
        </draw:line>
        <draw:line draw:style-name="gr622" draw:text-style-name="P4" draw:layer="layout" svg:x1="6.5cm" svg:y1="23.532cm" svg:x2="6.9cm" svg:y2="23.532cm">
          <text:p/>
        </draw:line>
        <draw:line draw:style-name="gr627" draw:text-style-name="P67" draw:layer="layout" svg:x1="6.5cm" svg:y1="23.3cm" svg:x2="9.5cm" svg:y2="23.3cm">
          <text:p/>
        </draw:line>
        <draw:line draw:style-name="gr627" draw:text-style-name="P67" draw:layer="layout" svg:x1="6.5cm" svg:y1="23cm" svg:x2="9.5cm" svg:y2="23cm">
          <text:p/>
        </draw:line>
        <draw:line draw:style-name="gr627" draw:text-style-name="P67" draw:layer="layout" svg:x1="6.5cm" svg:y1="22.7cm" svg:x2="9.5cm" svg:y2="22.7cm">
          <text:p/>
        </draw:line>
        <draw:line draw:style-name="gr627" draw:text-style-name="P67" draw:layer="layout" svg:x1="10.5cm" svg:y1="23.4cm" svg:x2="25cm" svg:y2="23.3cm">
          <text:p/>
        </draw:line>
        <draw:line draw:style-name="gr627" draw:text-style-name="P67" draw:layer="layout" svg:x1="10.5cm" svg:y1="23cm" svg:x2="25cm" svg:y2="23cm">
          <text:p/>
        </draw:line>
        <draw:line draw:style-name="gr627" draw:text-style-name="P67" draw:layer="layout" svg:x1="10.5cm" svg:y1="22.7cm" svg:x2="25cm" svg:y2="22.7cm">
          <text:p/>
        </draw:line>
        <draw:line draw:style-name="gr622" draw:text-style-name="P4" draw:layer="layout" svg:x1="26cm" svg:y1="23.3cm" svg:x2="32cm" svg:y2="23.3cm">
          <text:p/>
        </draw:line>
        <draw:custom-shape draw:style-name="gr601" draw:text-style-name="P58"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678" draw:text-style-name="P49" draw:layer="layout" svg:width="1cm" svg:height="1cm" svg:x="12.7cm" svg:y="15.1cm">
          <text:p text:style-name="P48"><text:span text:style-name="T11">FW</text:span></text:p>
          <draw:enhanced-geometry svg:viewBox="0 0 21600 21600" draw:type="rectangle" draw:enhanced-path="M 0 0 L 21600 0 21600 21600 0 21600 0 0 Z N"/>
        </draw:custom-shape>
        <draw:line draw:style-name="gr593" draw:text-style-name="P4" draw:layer="layout" svg:x1="12.8cm" svg:y1="15.1cm" svg:x2="12.8cm" svg:y2="13.402cm">
          <text:p/>
        </draw:line>
        <draw:line draw:style-name="gr622" draw:text-style-name="P4" draw:layer="layout" svg:x1="13.2cm" svg:y1="15.1cm" svg:x2="13.2cm" svg:y2="12cm">
          <text:p/>
        </draw:line>
        <draw:line draw:style-name="gr593"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595" draw:text-style-name="P4" draw:layer="layout" svg:x1="11.4cm" svg:y1="11.3cm" svg:x2="11.4cm" svg:y2="21.1cm">
          <text:p/>
        </draw:line>
        <draw:custom-shape draw:style-name="gr368"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1.7cm" svg:y1="11.6cm" svg:x2="11.7cm" svg:y2="17.5cm">
          <text:p/>
        </draw:line>
        <draw:line draw:style-name="gr595" draw:text-style-name="P4" draw:layer="layout" svg:x1="15.5cm" svg:y1="12.7cm" svg:x2="15.5cm" svg:y2="14cm">
          <text:p/>
        </draw:line>
        <draw:frame draw:style-name="gr724" draw:text-style-name="P70" draw:layer="layout" svg:width="1.227cm" svg:height="0.569cm" svg:x="12.418cm" svg:y="11.775cm">
          <draw:text-box>
            <text:p><text:span text:style-name="T23">forwA</text:span></text:p>
          </draw:text-box>
        </draw:frame>
        <draw:frame draw:style-name="gr724" draw:text-style-name="P70" draw:layer="layout" svg:width="1.227cm" svg:height="0.569cm" svg:x="12.1cm" svg:y="13.875cm">
          <draw:text-box>
            <text:p><text:span text:style-name="T23">forwB</text:span></text:p>
          </draw:text-box>
        </draw:frame>
        <draw:line draw:style-name="gr38" draw:text-style-name="P4" draw:layer="layout" svg:x1="10.5cm" svg:y1="15cm" svg:x2="16cm" svg:y2="15cm">
          <text:p/>
        </draw:line>
        <draw:line draw:style-name="gr595" draw:text-style-name="P4" draw:layer="layout" svg:x1="26.3cm" svg:y1="13cm" svg:x2="26.3cm" svg:y2="17.5cm">
          <text:p/>
        </draw:line>
        <draw:custom-shape draw:style-name="gr368"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680" draw:text-style-name="P4" draw:layer="layout" svg:x1="13cm" svg:y1="16.9cm" svg:x2="13cm" svg:y2="16.1cm">
          <text:p/>
        </draw:line>
        <draw:line draw:style-name="gr680" draw:text-style-name="P4" draw:layer="layout" svg:x1="13.4cm" svg:y1="16.9cm" svg:x2="13.4cm" svg:y2="16.101cm">
          <text:p/>
        </draw:line>
        <draw:custom-shape draw:style-name="gr368"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5" draw:text-style-name="P36" draw:layer="layout" svg:width="2.599cm" svg:height="0.569cm" svg:x="10.6cm" svg:y="16.5cm">
          <draw:text-box>
            <text:p><text:span text:style-name="T11">id_ex_reg</text:span><text:span text:style-name="T11">_rs1_s</text:span></text:p>
          </draw:text-box>
        </draw:frame>
        <draw:line draw:style-name="gr682" draw:text-style-name="P4" draw:layer="layout" svg:x1="18.1cm" svg:y1="15.4cm" svg:x2="13.7cm" svg:y2="15.4cm">
          <text:p/>
        </draw:line>
        <draw:line draw:style-name="gr682" draw:text-style-name="P4" draw:layer="layout" svg:x1="17.801cm" svg:y1="15.8cm" svg:x2="13.7cm" svg:y2="15.8cm">
          <text:p/>
        </draw:line>
        <draw:frame draw:style-name="gr726" draw:text-style-name="P36" draw:layer="layout" svg:width="2.867cm" svg:height="0.569cm" svg:x="13.8cm" svg:y="15.013cm">
          <draw:text-box>
            <text:p><text:span text:style-name="T11">ex_mem_</text:span><text:span text:style-name="T11">reg_rd_s</text:span></text:p>
          </draw:text-box>
        </draw:frame>
        <draw:frame draw:style-name="gr727" draw:text-style-name="P36" draw:layer="layout" svg:width="2.93cm" svg:height="0.569cm" svg:x="13.82cm" svg:y="15.4cm">
          <draw:text-box>
            <text:p><text:span text:style-name="T11">mem_wb</text:span><text:span text:style-name="T11">_reg_rd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368"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368"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3" draw:text-style-name="P4" draw:layer="layout" svg:x1="13.7cm" svg:y1="21.6cm" svg:x2="13.7cm" svg:y2="16.1cm">
          <text:p/>
        </draw:line>
        <draw:line draw:style-name="gr622" draw:text-style-name="P4" draw:layer="layout" svg:x1="12.7cm" svg:y1="22cm" svg:x2="27cm" svg:y2="22cm">
          <text:p/>
        </draw:line>
        <draw:line draw:style-name="gr593" draw:text-style-name="P4" draw:layer="layout" svg:x1="12.7cm" svg:y1="22cm" svg:x2="12.7cm" svg:y2="16.1cm">
          <text:p/>
        </draw:line>
        <draw:custom-shape draw:style-name="gr685"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27cm" svg:y1="24.4cm" svg:x2="27cm" svg:y2="22cm">
          <text:p/>
        </draw:line>
        <draw:custom-shape draw:style-name="gr686" draw:text-style-name="P49" draw:layer="layout" svg:width="2cm" svg:height="2cm" svg:x="1.5cm" svg:y="6cm">
          <text:p text:style-name="P48"><text:span text:style-name="T11">Hazard</text:span></text:p>
          <draw:enhanced-geometry svg:viewBox="0 0 21600 21600" draw:type="rectangle" draw:enhanced-path="M 0 0 L 21600 0 21600 21600 0 21600 0 0 Z N"/>
        </draw:custom-shape>
        <draw:line draw:style-name="gr594" draw:text-style-name="P4" draw:layer="layout" svg:x1="1.802cm" svg:y1="11.5cm" svg:x2="1.8cm" svg:y2="8cm">
          <text:p/>
        </draw:line>
        <draw:custom-shape draw:style-name="gr601" draw:text-style-name="P58"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4" draw:text-style-name="P4" draw:layer="layout" svg:x1="2.2cm" svg:y1="11.8cm" svg:x2="2.2cm" svg:y2="8.001cm">
          <text:p/>
        </draw:line>
        <draw:custom-shape draw:style-name="gr601" draw:text-style-name="P58"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3" draw:text-style-name="P4" draw:layer="layout" svg:x1="2.5cm" svg:y1="22.3cm" svg:x2="2.5cm" svg:y2="8cm">
          <text:p/>
        </draw:line>
        <draw:custom-shape draw:style-name="gr685"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18cm" svg:y1="23.3cm" svg:x2="18cm" svg:y2="22.3cm">
          <text:p/>
        </draw:line>
        <draw:line draw:style-name="gr622" draw:text-style-name="P4" draw:layer="layout" svg:x1="2.5cm" svg:y1="22.3cm" svg:x2="18cm" svg:y2="22.3cm">
          <text:p/>
        </draw:line>
        <draw:line draw:style-name="gr600" draw:text-style-name="P4" draw:layer="layout" svg:x1="2.8cm" svg:y1="17.9cm" svg:x2="11cm" svg:y2="17.9cm">
          <text:p/>
        </draw:line>
        <draw:line draw:style-name="gr594" draw:text-style-name="P4" draw:layer="layout" svg:x1="2.8cm" svg:y1="17.9cm" svg:x2="2.8cm" svg:y2="8.002cm">
          <text:p/>
        </draw:line>
        <draw:line draw:style-name="gr619" draw:text-style-name="P4" draw:layer="layout" svg:x1="11cm" svg:y1="16.9cm" svg:x2="11cm" svg:y2="17.9cm">
          <text:p/>
        </draw:line>
        <draw:custom-shape draw:style-name="gr601" draw:text-style-name="P58"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2" draw:text-style-name="P4" draw:layer="layout" svg:x1="3.5cm" svg:y1="7cm" svg:x2="5.5cm" svg:y2="7cm">
          <text:p/>
        </draw:line>
        <draw:frame draw:style-name="gr687" draw:text-style-name="P9" draw:layer="layout" svg:width="1.255cm" svg:height="0.725cm" svg:x="5.277cm" svg:y="6.9cm">
          <draw:text-box>
            <text:p><text:span text:style-name="T2">stall</text:span></text:p>
          </draw:text-box>
        </draw:frame>
        <draw:line draw:style-name="gr592" draw:text-style-name="P4" draw:layer="layout" svg:x1="1.8cm" svg:y1="3.4cm" svg:x2="1cm" svg:y2="4.007cm">
          <text:p/>
        </draw:line>
        <draw:frame draw:style-name="gr687"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688" draw:text-style-name="P59" draw:layer="layout" svg:width="0.737cm" svg:height="0.725cm" svg:x="6.965cm" svg:y="25.9cm">
          <draw:text-box>
            <text:p><text:span text:style-name="T19">0</text:span></text:p>
          </draw:text-box>
        </draw:frame>
        <draw:line draw:style-name="gr689" draw:text-style-name="P4" draw:layer="layout" svg:x1="7.5cm" svg:y1="26.2cm" svg:x2="8.5cm" svg:y2="26.1cm">
          <text:p/>
        </draw:line>
        <draw:frame draw:style-name="gr687" draw:text-style-name="P9" draw:layer="layout" svg:width="1.255cm" svg:height="0.725cm" svg:x="9.249cm" svg:y="26.2cm">
          <draw:text-box>
            <text:p><text:span text:style-name="T2">stall</text:span></text:p>
          </draw:text-box>
        </draw:frame>
        <draw:line draw:style-name="gr690" draw:text-style-name="P4" draw:layer="layout" svg:x1="9.4cm" svg:y1="26.6cm" svg:x2="8.8cm" svg:y2="26.2cm">
          <text:p/>
        </draw:line>
        <draw:line draw:style-name="gr691" draw:text-style-name="P4" draw:layer="layout" svg:x1="36.001cm" svg:y1="16cm" svg:x2="37cm" svg:y2="16cm">
          <text:p/>
        </draw:line>
        <draw:line draw:style-name="gr691" draw:text-style-name="P4" draw:layer="layout" svg:x1="36cm" svg:y1="17.4cm" svg:x2="36.999cm" svg:y2="17.4cm">
          <text:p/>
        </draw:line>
        <draw:line draw:style-name="gr691" draw:text-style-name="P4" draw:layer="layout" svg:x1="36.002cm" svg:y1="12cm" svg:x2="37.001cm" svg:y2="12cm">
          <text:p/>
        </draw:line>
        <draw:line draw:style-name="gr691" draw:text-style-name="P4" draw:layer="layout" svg:x1="36.003cm" svg:y1="5cm" svg:x2="37.002cm" svg:y2="5cm">
          <text:p/>
        </draw:line>
        <draw:line draw:style-name="gr691" draw:text-style-name="P4" draw:layer="layout" svg:x1="36.004cm" svg:y1="22.7cm" svg:x2="37.003cm" svg:y2="22.7cm">
          <text:p/>
        </draw:line>
        <draw:line draw:style-name="gr691" draw:text-style-name="P4" draw:layer="layout" svg:x1="36.005cm" svg:y1="24.4cm" svg:x2="37.004cm" svg:y2="24.4cm">
          <text:p/>
        </draw:line>
        <draw:line draw:style-name="gr691" draw:text-style-name="P4" draw:layer="layout" svg:x1="25.001cm" svg:y1="14cm" svg:x2="26cm" svg:y2="14cm">
          <text:p/>
        </draw:line>
        <draw:line draw:style-name="gr691" draw:text-style-name="P4" draw:layer="layout" svg:x1="25.001cm" svg:y1="23cm" svg:x2="26cm" svg:y2="23cm">
          <text:p/>
        </draw:line>
        <draw:custom-shape draw:style-name="gr368"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8" draw:text-style-name="P36" draw:layer="layout" svg:width="2.772cm" svg:height="0.569cm" draw:transform="rotate (-1.5707963267949) translate (38.99cm 9.099cm)">
          <draw:text-box>
            <text:p><text:span text:style-name="T11">pc_4_writ</text:span><text:span text:style-name="T11">eback_s</text:span></text:p>
          </draw:text-box>
        </draw:frame>
        <draw:frame draw:style-name="gr729" draw:text-style-name="P36" draw:layer="layout" svg:width="2.851cm" svg:height="0.569cm" draw:transform="rotate (-1.5707963267949) translate (39.991cm 9.4cm)">
          <draw:text-box>
            <text:p><text:span text:style-name="T11">result_wri</text:span><text:span text:style-name="T11">teback_s</text:span></text:p>
          </draw:text-box>
        </draw:frame>
        <draw:frame draw:style-name="gr730" draw:text-style-name="P36" draw:layer="layout" svg:width="4.08cm" svg:height="0.569cm" draw:transform="rotate (-1.5707963267949) translate (39.692cm 12.301cm)">
          <draw:text-box>
            <text:p><text:span text:style-name="T11">result_mu</text:span><text:span text:style-name="T11">x_src_writ</text:span><text:span text:style-name="T11">eback_s</text:span></text:p>
          </draw:text-box>
        </draw:frame>
        <draw:frame draw:style-name="gr731" draw:text-style-name="P36" draw:layer="layout" svg:width="4.065cm" svg:height="0.569cm" svg:x="34.9cm" svg:y="11.531cm">
          <draw:text-box>
            <text:p><text:span text:style-name="T11">dmem_da</text:span><text:span text:style-name="T11">ta_rd_writ</text:span><text:span text:style-name="T11">eback_s</text:span></text:p>
          </draw:text-box>
        </draw:frame>
        <draw:frame draw:style-name="gr732" draw:text-style-name="P36" draw:layer="layout" svg:width="2.847cm" svg:height="0.569cm" draw:transform="rotate (-1.5707963267949) translate (38.892cm 12.901cm)">
          <draw:text-box>
            <text:p><text:span text:style-name="T11">alu_result</text:span><text:span text:style-name="T11">_mem_s</text:span></text:p>
          </draw:text-box>
        </draw:frame>
        <draw:frame draw:style-name="gr714" draw:text-style-name="P36" draw:layer="layout" svg:width="3.497cm" svg:height="0.569cm" svg:x="32.8cm" svg:y="11.9cm">
          <draw:text-box>
            <text:p><text:span text:style-name="T11">dmem_da</text:span><text:span text:style-name="T11">ta_rd_me</text:span><text:span text:style-name="T11">m_s</text:span></text:p>
          </draw:text-box>
        </draw:frame>
        <draw:frame draw:style-name="gr717" draw:text-style-name="P36" draw:layer="layout" svg:width="3.513cm" svg:height="0.569cm" svg:x="32.4cm" svg:y="22.3cm">
          <draw:text-box>
            <text:p><text:span text:style-name="T11">result_mu</text:span><text:span text:style-name="T11">x_src_me</text:span><text:span text:style-name="T11">m_s</text:span></text:p>
          </draw:text-box>
        </draw:frame>
        <draw:frame draw:style-name="gr635" draw:text-style-name="P36" draw:layer="layout" svg:width="2.205cm" svg:height="0.569cm" svg:x="33.2cm" svg:y="4.5cm">
          <draw:text-box>
            <text:p><text:span text:style-name="T11">pc_4_me</text:span><text:span text:style-name="T11">m_s</text:span></text:p>
          </draw:text-box>
        </draw:frame>
        <draw:line draw:style-name="gr592" draw:text-style-name="P4" draw:layer="layout" svg:x1="34cm" svg:y1="9cm" svg:x2="36.001cm" svg:y2="9cm">
          <text:p/>
        </draw:line>
        <draw:custom-shape draw:style-name="gr368"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733" draw:text-style-name="P29" draw:layer="layout" svg:width="0.5cm" svg:height="1cm" svg:x="40cm" svg:y="8.499cm">
            <text:p/>
            <draw:enhanced-geometry svg:viewBox="0 0 21600 21600" draw:type="rectangle" draw:enhanced-path="M 0 0 L 21600 0 21600 21600 0 21600 0 0 Z N"/>
          </draw:custom-shape>
          <draw:custom-shape draw:style-name="gr733" draw:text-style-name="P29" draw:layer="layout" svg:width="0.5cm" svg:height="1cm" svg:x="40.5cm" svg:y="8.499cm">
            <text:p/>
            <draw:enhanced-geometry svg:viewBox="0 0 21600 21600" draw:type="rectangle" draw:enhanced-path="M 0 0 L 21600 0 21600 21600 0 21600 0 0 Z N"/>
          </draw:custom-shape>
        </draw:g>
        <draw:line draw:style-name="gr592" draw:text-style-name="P4" draw:layer="layout" svg:x1="37.001cm" svg:y1="9cm" svg:x2="40.001cm" svg:y2="9cm">
          <text:p/>
        </draw:line>
        <draw:frame draw:style-name="gr734" draw:text-style-name="P36" draw:layer="layout" svg:width="4.223cm" svg:height="0.569cm" svg:x="36.8cm" svg:y="8.531cm">
          <draw:text-box>
            <text:p><text:span text:style-name="T11">dmem_da</text:span><text:span text:style-name="T11">ta_rd_writ</text:span><text:span text:style-name="T11">eback2_s</text:span></text:p>
          </draw:text-box>
        </draw:frame>
        <draw:line draw:style-name="gr592" draw:text-style-name="P4" draw:layer="layout" svg:x1="41cm" svg:y1="9cm" svg:x2="43.001cm" svg:y2="9cm">
          <text:p/>
        </draw:line>
        <draw:frame draw:style-name="gr734" draw:text-style-name="P36" draw:layer="layout" svg:width="4.223cm" svg:height="0.569cm" svg:x="40.8cm" svg:y="8.501cm">
          <draw:text-box>
            <text:p><text:span text:style-name="T11">dmem_da</text:span><text:span text:style-name="T11">ta_rd_writ</text:span><text:span text:style-name="T11">eback3_s</text:span></text:p>
          </draw:text-box>
        </draw:frame>
        <draw:frame draw:style-name="gr716" draw:text-style-name="P36" draw:layer="layout" svg:width="2.835cm" svg:height="0.569cm" draw:transform="rotate (-1.5707963267949) translate (33.891cm 8.8cm)">
          <draw:text-box>
            <text:p><text:span text:style-name="T11">dmem_wr</text:span><text:span text:style-name="T11">_mem_s</text:span></text:p>
          </draw:text-box>
        </draw:frame>
        <draw:custom-shape draw:style-name="gr368"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7" draw:text-style-name="P67" draw:layer="layout" svg:x1="33.4cm" svg:y1="8cm" svg:x2="36cm" svg:y2="8cm">
          <text:p/>
        </draw:line>
        <draw:g draw:style-name="gr1">
          <draw:custom-shape draw:style-name="gr733" draw:text-style-name="P29" draw:layer="layout" svg:width="0.5cm" svg:height="1cm" svg:x="40cm" svg:y="7.499cm">
            <text:p/>
            <draw:enhanced-geometry svg:viewBox="0 0 21600 21600" draw:type="rectangle" draw:enhanced-path="M 0 0 L 21600 0 21600 21600 0 21600 0 0 Z N"/>
          </draw:custom-shape>
          <draw:custom-shape draw:style-name="gr733" draw:text-style-name="P29" draw:layer="layout" svg:width="0.5cm" svg:height="1cm" svg:x="40.5cm" svg:y="7.499cm">
            <text:p/>
            <draw:enhanced-geometry svg:viewBox="0 0 21600 21600" draw:type="rectangle" draw:enhanced-path="M 0 0 L 21600 0 21600 21600 0 21600 0 0 Z N"/>
          </draw:custom-shape>
        </draw:g>
        <draw:line draw:style-name="gr627" draw:text-style-name="P67" draw:layer="layout" svg:x1="37cm" svg:y1="8cm" svg:x2="40cm" svg:y2="8cm">
          <text:p/>
        </draw:line>
        <draw:frame draw:style-name="gr735" draw:text-style-name="P36" draw:layer="layout" svg:width="3.402cm" svg:height="0.569cm" svg:x="36.801cm" svg:y="7.532cm">
          <draw:text-box>
            <text:p><text:span text:style-name="T11">dmem_wr</text:span><text:span text:style-name="T11">_writebac</text:span><text:span text:style-name="T11">k_s</text:span></text:p>
          </draw:text-box>
        </draw:frame>
        <draw:g draw:style-name="gr1">
          <draw:custom-shape draw:style-name="gr733" draw:text-style-name="P29" draw:layer="layout" svg:width="0.5cm" svg:height="1cm" svg:x="40cm" svg:y="15.999cm">
            <text:p/>
            <draw:enhanced-geometry svg:viewBox="0 0 21600 21600" draw:type="rectangle" draw:enhanced-path="M 0 0 L 21600 0 21600 21600 0 21600 0 0 Z N"/>
          </draw:custom-shape>
          <draw:custom-shape draw:style-name="gr733" draw:text-style-name="P29" draw:layer="layout" svg:width="0.5cm" svg:height="1cm" svg:x="40.5cm" svg:y="15.999cm">
            <text:p/>
            <draw:enhanced-geometry svg:viewBox="0 0 21600 21600" draw:type="rectangle" draw:enhanced-path="M 0 0 L 21600 0 21600 21600 0 21600 0 0 Z N"/>
          </draw:custom-shape>
        </draw:g>
        <draw:line draw:style-name="gr592" draw:text-style-name="P4" draw:layer="layout" svg:x1="37.001cm" svg:y1="16.5cm" svg:x2="40cm" svg:y2="16.5cm">
          <text:p/>
        </draw:line>
        <draw:custom-shape draw:style-name="gr368"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592" draw:text-style-name="P4" draw:layer="layout" svg:x1="35cm" svg:y1="16.5cm" svg:x2="36.001cm" svg:y2="16.5cm">
          <text:p/>
        </draw:line>
        <draw:frame draw:style-name="gr736" draw:text-style-name="P36" draw:layer="layout" svg:width="3.8cm" svg:height="0.569cm" svg:x="36.8cm" svg:y="15.999cm">
          <draw:text-box>
            <text:p><text:span text:style-name="T11">alu_result</text:span><text:span text:style-name="T11">_writebac</text:span><text:span text:style-name="T11">k_s</text:span></text:p>
          </draw:text-box>
        </draw:frame>
        <draw:frame draw:style-name="gr705" draw:text-style-name="P36" draw:layer="layout" svg:width="3.845cm" svg:height="0.569cm" svg:x="26.582cm" svg:y="9.5cm">
          <draw:text-box>
            <text:p><text:span text:style-name="T11">instr_exe</text:span><text:span text:style-name="T11">cute_s[6:</text:span><text:span text:style-name="T11">0] == 35</text:span></text:p>
          </draw:text-box>
        </draw:frame>
        <draw:frame draw:style-name="gr737" draw:text-style-name="P36" draw:layer="layout" svg:width="3.024cm" svg:height="0.569cm" svg:x="36.8cm" svg:y="26cm">
          <draw:text-box>
            <text:p><text:span text:style-name="T11">reg_wr_w</text:span><text:span text:style-name="T11">riteback_</text:span><text:span text:style-name="T11">s</text:span></text:p>
          </draw:text-box>
        </draw:frame>
        <draw:frame draw:style-name="gr718" draw:text-style-name="P36" draw:layer="layout" svg:width="2.457cm" svg:height="0.569cm" svg:x="32.901cm" svg:y="23.901cm">
          <draw:text-box>
            <text:p><text:span text:style-name="T11">reg_wr_m</text:span><text:span text:style-name="T11">em_s</text:span></text:p>
          </draw:text-box>
        </draw:frame>
        <draw:custom-shape draw:style-name="gr738" draw:text-style-name="P66" draw:layer="layout" svg:width="1cm" svg:height="1cm" svg:x="36cm" svg:y="26cm">
          <text:p/>
          <draw:enhanced-geometry svg:viewBox="0 0 21600 21600" draw:type="rectangle" draw:enhanced-path="M 0 0 L 21600 0 21600 21600 0 21600 0 0 Z N"/>
        </draw:custom-shape>
        <draw:custom-shape draw:style-name="gr685"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7" draw:text-style-name="P67" draw:layer="layout" svg:x1="34cm" svg:y1="26.5cm" svg:x2="36cm" svg:y2="26.5cm">
          <text:p/>
        </draw:line>
        <draw:line draw:style-name="gr622" draw:text-style-name="P4" draw:layer="layout" svg:x1="34.001cm" svg:y1="26.5cm" svg:x2="34.001cm" svg:y2="24.4cm">
          <text:p/>
        </draw:line>
        <draw:line draw:style-name="gr627" draw:text-style-name="P67" draw:layer="layout" svg:x1="37cm" svg:y1="26.5cm" svg:x2="39cm" svg:y2="26.5cm">
          <text:p/>
        </draw:line>
        <draw:frame draw:style-name="gr718" draw:text-style-name="P36" draw:layer="layout" svg:width="2.457cm" svg:height="0.569cm" svg:x="36.801cm" svg:y="23.902cm">
          <draw:text-box>
            <text:p><text:span text:style-name="T11">reg_wr_m</text:span><text:span text:style-name="T11">em_s</text:span></text:p>
          </draw:text-box>
        </draw:frame>
        <draw:frame draw:style-name="gr532" draw:text-style-name="P36" draw:layer="layout" svg:width="2.315cm" svg:height="0.569cm" svg:x="25.8cm" svg:y="13.5cm">
          <draw:text-box>
            <text:p><text:span text:style-name="T11">reg_b_me</text:span><text:span text:style-name="T11">m_s</text:span></text:p>
          </draw:text-box>
        </draw:frame>
        <draw:frame draw:style-name="gr739" draw:text-style-name="P36" draw:layer="layout" svg:width="3.021cm" svg:height="0.569cm" svg:x="36.801cm" svg:y="16.402cm">
          <draw:text-box>
            <text:p><text:span text:style-name="T11">instr_writ</text:span><text:span text:style-name="T11">eback_s</text:span></text:p>
          </draw:text-box>
        </draw:frame>
        <draw:custom-shape draw:style-name="gr368"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3" draw:text-style-name="P36" draw:layer="layout" svg:width="2.141cm" svg:height="0.569cm" draw:transform="rotate (-1.5707963267949) translate (29.993cm 11.902cm)">
          <draw:text-box>
            <text:p><text:span text:style-name="T11">instr_me</text:span><text:span text:style-name="T11">m_o</text:span></text:p>
          </draw:text-box>
        </draw:frame>
        <draw:frame draw:style-name="gr740" draw:text-style-name="P36" draw:layer="layout" svg:width="2.125cm" svg:height="0.569cm" svg:x="32.701cm" svg:y="16.402cm">
          <draw:text-box>
            <text:p><text:span text:style-name="T11">instr_me</text:span><text:span text:style-name="T11">m_s</text:span></text:p>
          </draw:text-box>
        </draw:frame>
        <draw:frame draw:style-name="gr712" draw:text-style-name="P36" draw:layer="layout" svg:width="2.404cm" svg:height="0.569cm" svg:x="28.7cm" svg:y="11.301cm">
          <draw:text-box>
            <text:p><text:span text:style-name="T11">dBusData</text:span><text:span text:style-name="T11">Wr_s</text:span></text:p>
          </draw:text-box>
        </draw:frame>
        <draw:frame draw:style-name="gr632" draw:text-style-name="P36" draw:layer="layout" svg:width="2.41cm" svg:height="0.569cm" svg:x="32.701cm" svg:y="11.501cm">
          <draw:text-box>
            <text:p><text:span text:style-name="T11">dBusData</text:span><text:span text:style-name="T11">Rd_s</text:span></text:p>
          </draw:text-box>
        </draw:frame>
        <draw:polygon draw:style-name="gr707" draw:text-style-name="P56" draw:layer="layout" svg:width="0.499cm" svg:height="0.999cm" svg:x="28.4cm" svg:y="10.9cm" svg:viewBox="0 0 500 1000" draw:points="0,0 0,1000 500,850 500,150">
          <text:p/>
        </draw:polygon>
        <draw:frame draw:style-name="gr710" draw:text-style-name="P36" draw:layer="layout" svg:width="2.819cm" svg:height="0.569cm" svg:x="33.2cm" svg:y="15.501cm">
          <draw:text-box>
            <text:p><text:span text:style-name="T11">alu_result</text:span><text:span text:style-name="T11">_mem_s</text:span></text:p>
          </draw:text-box>
        </draw:frame>
        <draw:frame draw:style-name="gr706" draw:text-style-name="P36" draw:layer="layout" svg:width="1.992cm" svg:height="0.569cm" svg:x="26.582cm" svg:y="9.101cm">
          <draw:text-box>
            <text:p><text:span text:style-name="T11">instr = </text:span><text:span text:style-name="T11">store</text:span></text:p>
          </draw:text-box>
        </draw:frame>
        <draw:line draw:style-name="gr593" draw:text-style-name="P4" draw:layer="layout" svg:x1="28.7cm" svg:y1="10.2cm" svg:x2="28.7cm" svg:y2="11cm">
          <text:p/>
        </draw:line>
        <draw:frame draw:style-name="gr710" draw:text-style-name="P36" draw:layer="layout" svg:width="2.819cm" svg:height="0.569cm" svg:x="25.8cm" svg:y="12.531cm">
          <draw:text-box>
            <text:p><text:span text:style-name="T11">alu_result</text:span><text:span text:style-name="T11">_mem_s</text:span></text:p>
          </draw:text-box>
        </draw:frame>
        <draw:frame draw:style-name="gr709" draw:text-style-name="P36" draw:layer="layout" svg:width="3.183cm" svg:height="0.569cm" svg:x="25.4cm" svg:y="10.632cm">
          <draw:text-box>
            <text:p><text:span text:style-name="T11">alu_result</text:span><text:span text:style-name="T11">_execute</text:span><text:span text:style-name="T11">_s</text:span></text:p>
          </draw:text-box>
        </draw:frame>
        <draw:frame draw:style-name="gr711" draw:text-style-name="P36" draw:layer="layout" svg:width="2.047cm" svg:height="0.569cm" svg:x="28.7cm" svg:y="10.9cm">
          <draw:text-box>
            <text:p><text:span text:style-name="T11">dBusAddr</text:span><text:span text:style-name="T11">_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709" draw:text-style-name="P36" draw:layer="layout" svg:width="3.183cm" svg:height="0.569cm" svg:x="22.8cm" svg:y="11.533cm">
          <draw:text-box>
            <text:p><text:span text:style-name="T11">alu_result</text:span><text:span text:style-name="T11">_execute</text:span><text:span text:style-name="T11">_s</text:span></text:p>
          </draw:text-box>
        </draw:frame>
        <draw:line draw:style-name="gr592" draw:text-style-name="P4" draw:layer="layout" svg:x1="24cm" svg:y1="13cm" svg:x2="25cm" svg:y2="13cm">
          <text:p/>
        </draw:line>
        <draw:custom-shape draw:style-name="gr368"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691" draw:text-style-name="P4" draw:layer="layout" svg:x1="25.002cm" svg:y1="12cm" svg:x2="26.001cm" svg:y2="12cm">
          <text:p/>
        </draw:line>
        <draw:line draw:style-name="gr595"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741" draw:text-style-name="P36" draw:layer="layout" svg:width="3.198cm" svg:height="0.569cm" svg:x="21.8cm" svg:y="22.601cm">
          <draw:text-box>
            <text:p><text:span text:style-name="T11">dmem_wr</text:span><text:span text:style-name="T11">_execute</text:span><text:span text:style-name="T11">_s</text:span></text:p>
          </draw:text-box>
        </draw:frame>
        <draw:frame draw:style-name="gr742" draw:text-style-name="P36" draw:layer="layout" svg:width="3.194cm" svg:height="0.569cm" svg:x="25.8cm" svg:y="22.602cm">
          <draw:text-box>
            <text:p><text:span text:style-name="T11">dmem_wr</text:span><text:span text:style-name="T11">_mem_s</text:span></text:p>
          </draw:text-box>
        </draw:frame>
        <draw:frame draw:style-name="gr743" draw:text-style-name="P36" draw:layer="layout" svg:width="2.536cm" svg:height="0.569cm" svg:x="22.4cm" svg:y="13.501cm">
          <draw:text-box>
            <text:p><text:span text:style-name="T11">data_to_s</text:span><text:span text:style-name="T11">tore_s</text:span></text:p>
          </draw:text-box>
        </draw:frame>
        <draw:frame draw:style-name="gr715" draw:text-style-name="P36" draw:layer="layout" svg:width="2.788cm" svg:height="0.569cm" draw:transform="rotate (-1.5707963267949) translate (32.492cm 12.601cm)">
          <draw:text-box>
            <text:p><text:span text:style-name="T11">dmem_rd</text:span><text:span text:style-name="T11">_mem_s</text:span></text:p>
          </draw:text-box>
        </draw:frame>
        <draw:frame draw:style-name="gr742" draw:text-style-name="P36" draw:layer="layout" svg:width="3.194cm" svg:height="0.569cm" svg:x="25.8cm" svg:y="22.903cm">
          <draw:text-box>
            <text:p><text:span text:style-name="T11">dmem_rd</text:span><text:span text:style-name="T11">_mem_s</text:span></text:p>
          </draw:text-box>
        </draw:frame>
        <draw:frame draw:style-name="gr742" draw:text-style-name="P36" draw:layer="layout" svg:width="3.194cm" svg:height="0.569cm" svg:x="21.8cm" svg:y="22.904cm">
          <draw:text-box>
            <text:p><text:span text:style-name="T11">dmem_rd</text:span><text:span text:style-name="T11">_execute</text:span><text:span text:style-name="T11">_s</text:span></text:p>
          </draw:text-box>
        </draw:frame>
        <draw:frame draw:style-name="gr744" draw:text-style-name="P36" draw:layer="layout" svg:width="3.876cm" svg:height="0.569cm" svg:x="21.2cm" svg:y="22.301cm">
          <draw:text-box>
            <text:p><text:span text:style-name="T11">result_mu</text:span><text:span text:style-name="T11">x_src_ex</text:span><text:span text:style-name="T11">ecute_s</text:span></text:p>
          </draw:text-box>
        </draw:frame>
        <draw:frame draw:style-name="gr745" draw:text-style-name="P36" draw:layer="layout" svg:width="2.82cm" svg:height="0.569cm" svg:x="22.201cm" svg:y="24.002cm">
          <draw:text-box>
            <text:p><text:span text:style-name="T11">reg_wr_e</text:span><text:span text:style-name="T11">xecute_s</text:span></text:p>
          </draw:text-box>
        </draw:frame>
        <draw:frame draw:style-name="gr746" draw:text-style-name="P36" draw:layer="layout" svg:width="2.489cm" svg:height="0.569cm" svg:x="22.702cm" svg:y="16.403cm">
          <draw:text-box>
            <text:p><text:span text:style-name="T11">instr_exe</text:span><text:span text:style-name="T11">cute_s</text:span></text:p>
          </draw:text-box>
        </draw:frame>
        <draw:frame draw:style-name="gr747" draw:text-style-name="P36" draw:layer="layout" svg:width="2.568cm" svg:height="0.569cm" svg:x="21cm" svg:y="4.501cm">
          <draw:text-box>
            <text:p><text:span text:style-name="T11">pc_4_exe</text:span><text:span text:style-name="T11">cute_s</text:span></text:p>
          </draw:text-box>
        </draw:frame>
        <draw:g draw:style-name="gr66">
          <draw:polygon draw:style-name="gr707" draw:text-style-name="P56"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707" draw:text-style-name="P56"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593" draw:text-style-name="P4" draw:layer="layout" svg:x1="20.7cm" svg:y1="15.2cm" svg:x2="20.7cm" svg:y2="14.503cm">
          <text:p/>
        </draw:line>
        <draw:line draw:style-name="gr593" draw:text-style-name="P4" draw:layer="layout" svg:x1="21.8cm" svg:y1="15.101cm" svg:x2="21.8cm" svg:y2="14.404cm">
          <text:p/>
        </draw:line>
        <draw:frame draw:style-name="gr724" draw:text-style-name="P70" draw:layer="layout" svg:width="1.227cm" svg:height="0.569cm" svg:x="20cm" svg:y="14.976cm">
          <draw:text-box>
            <text:p><text:span text:style-name="T23">forwB</text:span></text:p>
          </draw:text-box>
        </draw:frame>
        <draw:frame draw:style-name="gr748" draw:text-style-name="P70" draw:layer="layout" svg:width="1.385cm" svg:height="0.569cm" svg:x="21.2cm" svg:y="14.877cm">
          <draw:text-box>
            <text:p><text:span text:style-name="T23">forwSd</text:span></text:p>
          </draw:text-box>
        </draw:frame>
        <draw:frame draw:style-name="gr749" draw:text-style-name="P36" draw:layer="layout" svg:width="3.308cm" svg:height="0.569cm" svg:x="12.8cm" svg:y="12.302cm">
          <draw:text-box>
            <text:p><text:span text:style-name="T11">forward_b</text:span><text:span text:style-name="T11">_mux_out</text:span><text:span text:style-name="T11">_s</text:span></text:p>
          </draw:text-box>
        </draw:frame>
        <draw:frame draw:style-name="gr749" draw:text-style-name="P36" draw:layer="layout" svg:width="3.308cm" svg:height="0.569cm" svg:x="12.8cm" svg:y="10.603cm">
          <draw:text-box>
            <text:p><text:span text:style-name="T11">forward_a</text:span><text:span text:style-name="T11">_mux_out</text:span><text:span text:style-name="T11">_s</text:span></text:p>
          </draw:text-box>
        </draw:frame>
        <draw:line draw:style-name="gr595" draw:text-style-name="P4" draw:layer="layout" svg:x1="15.5cm" svg:y1="14cm" svg:x2="19cm" svg:y2="14cm">
          <text:p/>
        </draw:line>
        <draw:frame draw:style-name="gr750" draw:text-style-name="P36" draw:layer="layout" svg:width="0.66cm" svg:height="0.569cm" svg:x="21.24cm" svg:y="13.431cm">
          <draw:text-box>
            <text:p><text:span text:style-name="T11">0</text:span></text:p>
          </draw:text-box>
        </draw:frame>
        <draw:frame draw:style-name="gr750" draw:text-style-name="P36" draw:layer="layout" svg:width="0.66cm" svg:height="0.569cm" svg:x="21.24cm" svg:y="13.833cm">
          <draw:text-box>
            <text:p><text:span text:style-name="T11">2</text:span></text:p>
          </draw:text-box>
        </draw:frame>
        <draw:frame draw:style-name="gr750" draw:text-style-name="P36" draw:layer="layout" svg:width="0.66cm" svg:height="0.569cm" svg:x="21.24cm" svg:y="13.632cm">
          <draw:text-box>
            <text:p><text:span text:style-name="T11">1</text:span></text:p>
          </draw:text-box>
        </draw:frame>
        <draw:frame draw:style-name="gr750" draw:text-style-name="P36" draw:layer="layout" svg:width="0.66cm" svg:height="0.569cm" svg:x="21.24cm" svg:y="14.034cm">
          <draw:text-box>
            <text:p><text:span text:style-name="T11">3</text:span></text:p>
          </draw:text-box>
        </draw:frame>
        <draw:frame draw:style-name="gr750" draw:text-style-name="P36" draw:layer="layout" svg:width="0.66cm" svg:height="0.569cm" svg:x="20.14cm" svg:y="13.531cm">
          <draw:text-box>
            <text:p><text:span text:style-name="T11">0</text:span></text:p>
          </draw:text-box>
        </draw:frame>
        <draw:frame draw:style-name="gr750" draw:text-style-name="P36" draw:layer="layout" svg:width="0.66cm" svg:height="0.569cm" svg:x="20.14cm" svg:y="13.933cm">
          <draw:text-box>
            <text:p><text:span text:style-name="T11">2</text:span></text:p>
          </draw:text-box>
        </draw:frame>
        <draw:frame draw:style-name="gr750" draw:text-style-name="P36" draw:layer="layout" svg:width="0.66cm" svg:height="0.569cm" svg:x="20.14cm" svg:y="13.732cm">
          <draw:text-box>
            <text:p><text:span text:style-name="T11">1</text:span></text:p>
          </draw:text-box>
        </draw:frame>
        <draw:frame draw:style-name="gr750" draw:text-style-name="P36" draw:layer="layout" svg:width="0.66cm" svg:height="0.569cm" svg:x="20.14cm" svg:y="14.134cm">
          <draw:text-box>
            <text:p><text:span text:style-name="T11">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598" draw:text-style-name="P4" draw:layer="layout" svg:x1="41.6cm" svg:y1="21.4cm" svg:x2="21.1cm" svg:y2="21.4cm">
          <text:p/>
        </draw:line>
        <draw:line draw:style-name="gr38" draw:text-style-name="P4" draw:layer="layout" svg:x1="41.6cm" svg:y1="9cm" svg:x2="41.6cm" svg:y2="21.4cm">
          <text:p/>
        </draw:line>
        <draw:custom-shape draw:style-name="gr368"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368"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598" draw:text-style-name="P4" draw:layer="layout" svg:x1="39.6cm" svg:y1="21.1cm" svg:x2="11.4cm" svg:y2="21.1cm">
          <text:p/>
        </draw:line>
        <draw:line draw:style-name="gr38" draw:text-style-name="P4" draw:layer="layout" svg:x1="39.6cm" svg:y1="16.5cm" svg:x2="39.6cm" svg:y2="21.1cm">
          <text:p/>
        </draw:line>
        <draw:custom-shape draw:style-name="gr368"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368"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368"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37.5cm" svg:y1="20.5cm" svg:x2="19.3cm" svg:y2="20.5cm">
          <text:p/>
        </draw:line>
        <draw:line draw:style-name="gr38" draw:text-style-name="P4" draw:layer="layout" svg:x1="37.5cm" svg:y1="9cm" svg:x2="37.5cm" svg:y2="20.5cm">
          <text:p/>
        </draw:line>
        <draw:custom-shape draw:style-name="gr368"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8" draw:text-style-name="P49" draw:layer="layout" svg:width="1cm" svg:height="1cm" svg:x="21.3cm" svg:y="15.4cm">
          <text:p text:style-name="P48"><text:span text:style-name="T11">FW</text:span></text:p>
          <draw:enhanced-geometry svg:viewBox="0 0 21600 21600" draw:type="rectangle" draw:enhanced-path="M 0 0 L 21600 0 21600 21600 0 21600 0 0 Z N"/>
        </draw:custom-shape>
        <draw:frame draw:style-name="gr727" draw:text-style-name="P36" draw:layer="layout" svg:width="2.93cm" svg:height="0.569cm" svg:x="22.1cm" svg:y="15.7cm">
          <draw:text-box>
            <text:p><text:span text:style-name="T11">mem_wb</text:span><text:span text:style-name="T11">_reg_rd_s</text:span></text:p>
          </draw:text-box>
        </draw:frame>
        <draw:frame draw:style-name="gr751" draw:text-style-name="P36" draw:layer="layout" svg:width="3.009cm" svg:height="0.569cm" svg:x="19.1cm" svg:y="16.8cm">
          <draw:text-box>
            <text:p><text:span text:style-name="T11">ex_mem_</text:span><text:span text:style-name="T11">reg_rs2_s</text:span></text:p>
          </draw:text-box>
        </draw:frame>
        <draw:frame draw:style-name="gr725" draw:text-style-name="P36" draw:layer="layout" svg:width="2.599cm" svg:height="0.569cm" svg:x="19.2cm" svg:y="16.2cm">
          <draw:text-box>
            <text:p><text:span text:style-name="T11">id_ex_reg</text:span><text:span text:style-name="T11">_rs2_s</text:span></text:p>
          </draw:text-box>
        </draw:frame>
        <draw:frame draw:style-name="gr752" draw:text-style-name="P36" draw:layer="layout" svg:width="2.928cm" svg:height="0.569cm" svg:x="22.1cm" svg:y="15.3cm">
          <draw:text-box>
            <text:p><text:span text:style-name="T11">dmem_wr</text:span><text:span text:style-name="T11">_mem_s</text:span></text:p>
          </draw:text-box>
        </draw:frame>
        <draw:line draw:style-name="gr680" draw:text-style-name="P4" draw:layer="layout" svg:x1="21.6cm" svg:y1="16.9cm" svg:x2="21.6cm" svg:y2="16.401cm">
          <text:p/>
        </draw:line>
        <draw:line draw:style-name="gr680" draw:text-style-name="P4" draw:layer="layout" svg:x1="22cm" svg:y1="17.2cm" svg:x2="22cm" svg:y2="16.402cm">
          <text:p/>
        </draw:line>
        <draw:custom-shape draw:style-name="gr368"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3" draw:text-style-name="P4" draw:layer="layout" svg:x1="23.3cm" svg:y1="15.703cm" svg:x2="22.301cm" svg:y2="15.7cm">
          <text:p/>
        </draw:line>
        <draw:line draw:style-name="gr682" draw:text-style-name="P4" draw:layer="layout" svg:x1="23cm" svg:y1="16.1cm" svg:x2="22.302cm" svg:y2="16.1cm">
          <text:p/>
        </draw:line>
        <draw:custom-shape draw:style-name="gr368"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685"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2" draw:text-style-name="P4" draw:layer="layout" svg:x1="28.6cm" svg:y1="23cm" svg:x2="28.6cm" svg:y2="20.2cm">
          <text:p/>
        </draw:line>
        <draw:line draw:style-name="gr622" draw:text-style-name="P4" draw:layer="layout" svg:x1="23.3cm" svg:y1="20.2cm" svg:x2="28.6cm" svg:y2="20.2cm">
          <text:p/>
        </draw:line>
        <draw:line draw:style-name="gr622" draw:text-style-name="P4" draw:layer="layout" svg:x1="23.3cm" svg:y1="20.2cm" svg:x2="23.3cm" svg:y2="15.703cm">
          <text:p/>
        </draw:line>
        <draw:frame draw:style-name="gr562" draw:text-style-name="P36" draw:layer="layout" svg:width="3.008cm" svg:height="0.569cm" svg:x="13.481cm" svg:y="21.148cm">
          <draw:text-box>
            <text:p><text:span text:style-name="T11">mem_wb</text:span><text:span text:style-name="T11">_reg_wr_</text:span><text:span text:style-name="T11">s</text:span></text:p>
          </draw:text-box>
        </draw:frame>
        <draw:frame draw:style-name="gr562" draw:text-style-name="P36" draw:layer="layout" svg:width="3.008cm" svg:height="0.569cm" svg:x="12.481cm" svg:y="21.548cm">
          <draw:text-box>
            <text:p><text:span text:style-name="T11">ex_mem_</text:span><text:span text:style-name="T11">reg_wr_s</text:span></text:p>
          </draw:text-box>
        </draw:frame>
        <draw:line draw:style-name="gr622" draw:text-style-name="P4" draw:layer="layout" svg:x1="13.7cm" svg:y1="21.6cm" svg:x2="37.8cm" svg:y2="21.6cm">
          <text:p/>
        </draw:line>
        <draw:line draw:style-name="gr622" draw:text-style-name="P4" draw:layer="layout" svg:x1="37.8cm" svg:y1="26.5cm" svg:x2="37.8cm" svg:y2="21.6cm">
          <text:p/>
        </draw:line>
        <draw:custom-shape draw:style-name="gr685"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4" draw:text-style-name="P36" draw:layer="layout" svg:width="5.192cm" svg:height="0.569cm" svg:x="5.681cm" svg:y="21.249cm">
          <draw:text-box>
            <text:p><text:span text:style-name="T11">ex_mem_</text:span><text:span text:style-name="T11">reg_wr_s </text:span><text:span text:style-name="T11">= </text:span><text:span text:style-name="T11">reg_wr_m</text:span><text:span text:style-name="T11">em_s</text:span></text:p>
          </draw:text-box>
        </draw:frame>
        <draw:frame draw:style-name="gr725" draw:text-style-name="P36" draw:layer="layout" svg:width="2.599cm" svg:height="0.569cm" svg:x="13.201cm" svg:y="16.501cm">
          <draw:text-box>
            <text:p><text:span text:style-name="T11">id_ex_reg</text:span><text:span text:style-name="T11">_rs2_s</text:span></text:p>
          </draw:text-box>
        </draw:frame>
        <draw:frame draw:style-name="gr719" draw:text-style-name="P36" draw:layer="layout" svg:width="2.678cm" svg:height="0.569cm" svg:x="10.092cm" svg:y="12.231cm">
          <draw:text-box>
            <text:p><text:span text:style-name="T11">reg_b_ex</text:span><text:span text:style-name="T11">ecute_s</text:span></text:p>
          </draw:text-box>
        </draw:frame>
        <draw:frame draw:style-name="gr755" draw:text-style-name="P36" draw:layer="layout" svg:width="3.387cm" svg:height="0.569cm" svg:x="9.392cm" svg:y="12.532cm">
          <draw:text-box>
            <text:p><text:span text:style-name="T11">alu_result</text:span><text:span text:style-name="T11">_writebac</text:span><text:span text:style-name="T11">k_s</text:span></text:p>
          </draw:text-box>
        </draw:frame>
        <draw:frame draw:style-name="gr710" draw:text-style-name="P36" draw:layer="layout" svg:width="2.819cm" svg:height="0.569cm" svg:x="9.893cm" svg:y="12.833cm">
          <draw:text-box>
            <text:p><text:span text:style-name="T11">alu_result</text:span><text:span text:style-name="T11">_mem_s</text:span></text:p>
          </draw:text-box>
        </draw:frame>
        <draw:custom-shape draw:style-name="gr368"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9" draw:text-style-name="P36" draw:layer="layout" svg:width="2.678cm" svg:height="0.569cm" svg:x="10.092cm" svg:y="10.532cm">
          <draw:text-box>
            <text:p><text:span text:style-name="T11">reg_a_ex</text:span><text:span text:style-name="T11">ecute_s</text:span></text:p>
          </draw:text-box>
        </draw:frame>
        <draw:frame draw:style-name="gr756" draw:text-style-name="P36" draw:layer="layout" svg:width="6.12cm" svg:height="0.569cm" svg:x="9.894cm" svg:y="11.134cm">
          <draw:text-box>
            <text:p><text:span text:style-name="T11">alu_result</text:span><text:span text:style-name="T11">_mem_s </text:span><text:span text:style-name="T11">|| </text:span><text:span text:style-name="T11">dmem_da</text:span><text:span text:style-name="T11">ta_rd_me</text:span><text:span text:style-name="T11">m_s</text:span></text:p>
          </draw:text-box>
        </draw:frame>
        <draw:frame draw:style-name="gr757" draw:text-style-name="P36" draw:layer="layout" svg:width="2.508cm" svg:height="0.569cm" svg:x="10.292cm" svg:y="5.033cm">
          <draw:text-box>
            <text:p><text:span text:style-name="T11">pc_execu</text:span><text:span text:style-name="T11">te_s</text:span></text:p>
          </draw:text-box>
        </draw:frame>
        <draw:frame draw:style-name="gr758" draw:text-style-name="P36" draw:layer="layout" svg:width="2.709cm" svg:height="0.569cm" svg:x="17.3cm" svg:y="10.5cm">
          <draw:text-box>
            <text:p><text:span text:style-name="T11">exec.alu_</text:span><text:span text:style-name="T11">src_a_s</text:span></text:p>
          </draw:text-box>
        </draw:frame>
        <draw:frame draw:style-name="gr758" draw:text-style-name="P36" draw:layer="layout" svg:width="2.709cm" svg:height="0.569cm" svg:x="16.901cm" svg:y="12.601cm">
          <draw:text-box>
            <text:p><text:span text:style-name="T11">exec.alu_</text:span><text:span text:style-name="T11">src_b_s</text:span></text:p>
          </draw:text-box>
        </draw:frame>
        <draw:frame draw:style-name="gr726" draw:text-style-name="P36" draw:layer="layout" svg:width="2.867cm" svg:height="0.569cm" svg:x="10.301cm" svg:y="14.614cm">
          <draw:text-box>
            <text:p><text:span text:style-name="T11">imm_exe</text:span><text:span text:style-name="T11">cute_s</text:span></text:p>
          </draw:text-box>
        </draw:frame>
        <draw:custom-shape draw:style-name="gr368"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592" draw:text-style-name="P4" draw:layer="layout" svg:x1="35cm" svg:y1="17.375cm" svg:x2="36.001cm" svg:y2="17.375cm">
          <text:p/>
        </draw:line>
        <draw:frame draw:style-name="gr740" draw:text-style-name="P36" draw:layer="layout" svg:width="2.125cm" svg:height="0.569cm" svg:x="36.775cm" svg:y="16.9cm">
          <draw:text-box>
            <text:p><text:span text:style-name="T11">instr_me</text:span><text:span text:style-name="T11">m_s</text:span></text:p>
          </draw:text-box>
        </draw:frame>
        <draw:line draw:style-name="gr598" draw:text-style-name="P4" draw:layer="layout" svg:x1="37cm" svg:y1="17.4cm" svg:x2="37.9cm" svg:y2="17.4cm">
          <text:p/>
        </draw:line>
        <draw:line draw:style-name="gr598" draw:text-style-name="P4" draw:layer="layout" svg:x1="37.9cm" svg:y1="17.4cm" svg:x2="37.9cm" svg:y2="20.7cm">
          <text:p/>
        </draw:line>
        <draw:line draw:style-name="gr598" draw:text-style-name="P4" draw:layer="layout" svg:x1="37.9cm" svg:y1="20.7cm" svg:x2="1.2cm" svg:y2="20.7cm">
          <text:p/>
        </draw:line>
      </draw:page>
      <draw:page draw:name="page14" draw:style-name="dp1" draw:master-page-name="Standard">
        <draw:frame draw:style-name="gr759" draw:text-style-name="P34" draw:layer="layout" svg:width="4.807cm" svg:height="3.095cm" svg:x="1cm" svg:y="3.005cm">
          <draw:text-box>
            <text:p><text:span text:style-name="T9">Pro</text:span><text:span text:style-name="T9">gra</text:span><text:span text:style-name="T9">m</text:span></text:p>
            <text:p><text:span text:style-name="T9">exe</text:span><text:span text:style-name="T9">cuti</text:span><text:span text:style-name="T9">on</text:span></text:p>
            <text:p><text:span text:style-name="T9">orde</text:span><text:span text:style-name="T9">r</text:span></text:p>
            <text:p><text:span text:style-name="T9">(in </text:span><text:span text:style-name="T9">instr</text:span><text:span text:style-name="T9">ucti</text:span><text:span text:style-name="T9">ons)</text:span></text:p>
          </draw:text-box>
        </draw:frame>
        <draw:frame draw:style-name="gr760" draw:text-style-name="P62" draw:layer="layout" svg:width="3.601cm" svg:height="0.806cm" svg:x="1.008cm" svg:y="6.6cm">
          <draw:text-box>
            <text:p><text:span text:style-name="T20">sub </text:span><text:span text:style-name="T24">x2</text:span><text:span text:style-name="T20">, </text:span><text:span text:style-name="T20">x1, </text:span><text:span text:style-name="T20">x3</text:span></text:p>
          </draw:text-box>
        </draw:frame>
        <draw:frame draw:style-name="gr761" draw:text-style-name="P34" draw:layer="layout" svg:width="6.124cm" svg:height="0.962cm" svg:x="5.699cm" svg:y="4.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2" draw:text-style-name="P71" draw:layer="layout" svg:width="1.999cm" svg:height="2.999cm" svg:x="14.999cm" svg:y="5.5cm" svg:viewBox="0 0 2000 3000" draw:points="0,0 0,1100 400,1500 0,1900 0,3000 2000,2000 2000,1000">
            <text:p/>
          </draw:polygon>
          <draw:frame draw:style-name="gr763" draw:text-style-name="P62" draw:layer="layout" svg:width="1.466cm" svg:height="0.806cm" svg:x="15.399cm" svg:y="6.594cm">
            <draw:text-box>
              <text:p><text:span text:style-name="T20">ALU</text:span></text:p>
            </draw:text-box>
          </draw:frame>
        </draw:g>
        <draw:g draw:style-name="gr1">
          <draw:g draw:style-name="gr1">
            <draw:custom-shape draw:style-name="gr764" draw:text-style-name="P14" draw:layer="layout" svg:width="1cm" svg:height="2cm" svg:x="6.999cm" svg:y="6cm">
              <text:p/>
              <draw:enhanced-geometry svg:viewBox="0 0 21600 21600" draw:type="rectangle" draw:enhanced-path="M 0 0 L 21600 0 21600 21600 0 21600 0 0 Z N"/>
            </draw:custom-shape>
            <draw:custom-shape draw:style-name="gr76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6.597cm">
              <draw:text-box>
                <text:p><text:span text:style-name="T20">IM</text:span></text:p>
              </draw:text-box>
            </draw:frame>
          </draw:g>
        </draw:g>
        <draw:g draw:style-name="gr1">
          <draw:g draw:style-name="gr1">
            <draw:custom-shape draw:style-name="gr767" draw:text-style-name="P14" draw:layer="layout" svg:width="1cm" svg:height="2cm" svg:x="10.999cm" svg:y="6cm">
              <text:p/>
              <draw:enhanced-geometry svg:viewBox="0 0 21600 21600" draw:type="rectangle" draw:enhanced-path="M 0 0 L 21600 0 21600 21600 0 21600 0 0 Z N"/>
            </draw:custom-shape>
            <draw:custom-shape draw:style-name="gr76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6.597cm">
              <draw:text-box>
                <text:p><text:span text:style-name="T20">Reg</text:span></text:p>
              </draw:text-box>
            </draw:frame>
          </draw:g>
        </draw:g>
        <draw:g draw:style-name="gr1">
          <draw:g draw:style-name="gr1">
            <draw:custom-shape draw:style-name="gr76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2" draw:text-style-name="P71" draw:layer="layout" svg:width="1.999cm" svg:height="2.999cm" svg:x="18.999cm" svg:y="8.5cm" svg:viewBox="0 0 2000 3000" draw:points="0,0 0,1100 400,1500 0,1900 0,3000 2000,2000 2000,1000">
            <text:p/>
          </draw:polygon>
          <draw:frame draw:style-name="gr763" draw:text-style-name="P62" draw:layer="layout" svg:width="1.466cm" svg:height="0.806cm" svg:x="19.399cm" svg:y="9.594cm">
            <draw:text-box>
              <text:p><text:span text:style-name="T20">ALU</text:span></text:p>
            </draw:text-box>
          </draw:frame>
        </draw:g>
        <draw:g draw:style-name="gr1">
          <draw:g draw:style-name="gr1">
            <draw:custom-shape draw:style-name="gr764" draw:text-style-name="P14" draw:layer="layout" svg:width="1cm" svg:height="2cm" svg:x="10.999cm" svg:y="9cm">
              <text:p/>
              <draw:enhanced-geometry svg:viewBox="0 0 21600 21600" draw:type="rectangle" draw:enhanced-path="M 0 0 L 21600 0 21600 21600 0 21600 0 0 Z N"/>
            </draw:custom-shape>
            <draw:custom-shape draw:style-name="gr76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9.597cm">
              <draw:text-box>
                <text:p><text:span text:style-name="T20">IM</text:span></text:p>
              </draw:text-box>
            </draw:frame>
          </draw:g>
        </draw:g>
        <draw:g draw:style-name="gr1">
          <draw:g draw:style-name="gr1">
            <draw:custom-shape draw:style-name="gr767" draw:text-style-name="P14" draw:layer="layout" svg:width="1cm" svg:height="2cm" svg:x="14.999cm" svg:y="9cm">
              <text:p/>
              <draw:enhanced-geometry svg:viewBox="0 0 21600 21600" draw:type="rectangle" draw:enhanced-path="M 0 0 L 21600 0 21600 21600 0 21600 0 0 Z N"/>
            </draw:custom-shape>
            <draw:custom-shape draw:style-name="gr76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9.597cm">
              <draw:text-box>
                <text:p><text:span text:style-name="T20">REG</text:span></text:p>
              </draw:text-box>
            </draw:frame>
          </draw:g>
        </draw:g>
        <draw:g draw:style-name="gr1">
          <draw:g draw:style-name="gr1">
            <draw:custom-shape draw:style-name="gr76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770" draw:text-style-name="P62" draw:layer="layout" svg:width="3.861cm" svg:height="0.806cm" svg:x="1.009cm" svg:y="9.6cm">
          <draw:text-box>
            <text:p><text:span text:style-name="T20">and </text:span><text:span text:style-name="T20">x12, </text:span><text:span text:style-name="T24">x2</text:span><text:span text:style-name="T20">, </text:span><text:span text:style-name="T20">x5</text:span></text:p>
          </draw:text-box>
        </draw:frame>
        <draw:line draw:style-name="gr771" draw:text-style-name="P4" draw:layer="layout" svg:x1="9.999cm" svg:y1="5cm" svg:x2="9.999cm" svg:y2="21cm">
          <text:p/>
        </draw:line>
        <draw:line draw:style-name="gr771" draw:text-style-name="P4" draw:layer="layout" svg:x1="13.999cm" svg:y1="5cm" svg:x2="13.999cm" svg:y2="21cm">
          <text:p/>
        </draw:line>
        <draw:line draw:style-name="gr771" draw:text-style-name="P4" draw:layer="layout" svg:x1="17.999cm" svg:y1="5cm" svg:x2="17.999cm" svg:y2="21cm">
          <text:p/>
        </draw:line>
        <draw:line draw:style-name="gr771" draw:text-style-name="P4" draw:layer="layout" svg:x1="21.999cm" svg:y1="5cm" svg:x2="21.999cm" svg:y2="21cm">
          <text:p/>
        </draw:line>
        <draw:line draw:style-name="gr771" draw:text-style-name="P4" draw:layer="layout" svg:x1="25.999cm" svg:y1="5cm" svg:x2="25.999cm" svg:y2="21cm">
          <text:p/>
        </draw:line>
        <draw:line draw:style-name="gr771" draw:text-style-name="P4" draw:layer="layout" svg:x1="29.999cm" svg:y1="5cm" svg:x2="29.999cm" svg:y2="21cm">
          <text:p/>
        </draw:line>
        <draw:line draw:style-name="gr771" draw:text-style-name="P4" draw:layer="layout" svg:x1="33.999cm" svg:y1="5cm" svg:x2="33.999cm" svg:y2="21cm">
          <text:p/>
        </draw:line>
        <draw:frame draw:style-name="gr772" draw:text-style-name="P3" draw:layer="layout" svg:width="1.949cm" svg:height="0.962cm" svg:x="7.053cm" svg:y="5cm">
          <draw:text-box>
            <text:p>CC 1</text:p>
          </draw:text-box>
        </draw:frame>
        <draw:frame draw:style-name="gr772" draw:text-style-name="P3" draw:layer="layout" svg:width="1.949cm" svg:height="0.962cm" svg:x="11.053cm" svg:y="5cm">
          <draw:text-box>
            <text:p>CC 2</text:p>
          </draw:text-box>
        </draw:frame>
        <draw:frame draw:style-name="gr772" draw:text-style-name="P3" draw:layer="layout" svg:width="1.949cm" svg:height="0.962cm" svg:x="15.053cm" svg:y="5cm">
          <draw:text-box>
            <text:p>CC 3</text:p>
          </draw:text-box>
        </draw:frame>
        <draw:frame draw:style-name="gr772" draw:text-style-name="P3" draw:layer="layout" svg:width="1.949cm" svg:height="0.962cm" svg:x="23.053cm" svg:y="5cm">
          <draw:text-box>
            <text:p>CC 5</text:p>
          </draw:text-box>
        </draw:frame>
        <draw:frame draw:style-name="gr772" draw:text-style-name="P3" draw:layer="layout" svg:width="1.949cm" svg:height="0.962cm" svg:x="27.053cm" svg:y="5cm">
          <draw:text-box>
            <text:p>CC 6</text:p>
          </draw:text-box>
        </draw:frame>
        <draw:frame draw:style-name="gr772" draw:text-style-name="P3" draw:layer="layout" svg:width="1.949cm" svg:height="0.962cm" svg:x="31.053cm" svg:y="5cm">
          <draw:text-box>
            <text:p>CC 7</text:p>
          </draw:text-box>
        </draw:frame>
        <draw:frame draw:style-name="gr773" draw:text-style-name="P62" draw:layer="layout" svg:width="3.575cm" svg:height="0.806cm" svg:x="1.01cm" svg:y="12.6cm">
          <draw:text-box>
            <text:p text:style-name="P6"><text:span text:style-name="T25">or </text:span><text:span text:style-name="T25">x13, </text:span><text:span text:style-name="T26">x6, </text:span><text:span text:style-name="T24">x2</text:span></text:p>
          </draw:text-box>
        </draw:frame>
        <draw:frame draw:style-name="gr772" draw:text-style-name="P3" draw:layer="layout" svg:width="1.949cm" svg:height="0.962cm" svg:x="18.999cm" svg:y="5cm">
          <draw:text-box>
            <text:p>CC 4</text:p>
          </draw:text-box>
        </draw:frame>
        <draw:g draw:style-name="gr1">
          <draw:g draw:style-name="gr1">
            <draw:custom-shape draw:style-name="gr764" draw:text-style-name="P72"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4" draw:text-style-name="P72"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2" draw:text-style-name="P71" draw:layer="layout" svg:width="1.999cm" svg:height="2.999cm" svg:x="22.999cm" svg:y="11.5cm" svg:viewBox="0 0 2000 3000" draw:points="0,0 0,1100 400,1500 0,1900 0,3000 2000,2000 2000,1000">
            <text:p/>
          </draw:polygon>
          <draw:frame draw:style-name="gr763" draw:text-style-name="P62" draw:layer="layout" svg:width="1.466cm" svg:height="0.806cm" svg:x="23.399cm" svg:y="12.594cm">
            <draw:text-box>
              <text:p><text:span text:style-name="T20">ALU</text:span></text:p>
            </draw:text-box>
          </draw:frame>
        </draw:g>
        <draw:g draw:style-name="gr1">
          <draw:g draw:style-name="gr1">
            <draw:custom-shape draw:style-name="gr764" draw:text-style-name="P14" draw:layer="layout" svg:width="1cm" svg:height="2cm" svg:x="14.999cm" svg:y="12cm">
              <text:p/>
              <draw:enhanced-geometry svg:viewBox="0 0 21600 21600" draw:type="rectangle" draw:enhanced-path="M 0 0 L 21600 0 21600 21600 0 21600 0 0 Z N"/>
            </draw:custom-shape>
            <draw:custom-shape draw:style-name="gr76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2.597cm">
              <draw:text-box>
                <text:p><text:span text:style-name="T20">IM</text:span></text:p>
              </draw:text-box>
            </draw:frame>
          </draw:g>
        </draw:g>
        <draw:g draw:style-name="gr1">
          <draw:g draw:style-name="gr1">
            <draw:custom-shape draw:style-name="gr767" draw:text-style-name="P14" draw:layer="layout" svg:width="1cm" svg:height="2cm" svg:x="18.999cm" svg:y="12cm">
              <text:p/>
              <draw:enhanced-geometry svg:viewBox="0 0 21600 21600" draw:type="rectangle" draw:enhanced-path="M 0 0 L 21600 0 21600 21600 0 21600 0 0 Z N"/>
            </draw:custom-shape>
            <draw:custom-shape draw:style-name="gr76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2.597cm">
              <draw:text-box>
                <text:p><text:span text:style-name="T20">REG</text:span></text:p>
              </draw:text-box>
            </draw:frame>
          </draw:g>
        </draw:g>
        <draw:g draw:style-name="gr1">
          <draw:g draw:style-name="gr1">
            <draw:custom-shape draw:style-name="gr76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4" draw:text-style-name="P72"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771" draw:text-style-name="P4" draw:layer="layout" svg:x1="37.999cm" svg:y1="5cm" svg:x2="37.999cm" svg:y2="21cm">
          <text:p/>
        </draw:line>
        <draw:g draw:style-name="gr66">
          <draw:polygon draw:style-name="gr762" draw:text-style-name="P71" draw:layer="layout" svg:width="1.999cm" svg:height="2.999cm" svg:x="26.999cm" svg:y="14.5cm" svg:viewBox="0 0 2000 3000" draw:points="0,0 0,1100 400,1500 0,1900 0,3000 2000,2000 2000,1000">
            <text:p/>
          </draw:polygon>
          <draw:frame draw:style-name="gr763" draw:text-style-name="P62" draw:layer="layout" svg:width="1.466cm" svg:height="0.806cm" svg:x="27.399cm" svg:y="15.594cm">
            <draw:text-box>
              <text:p><text:span text:style-name="T20">ALU</text:span></text:p>
            </draw:text-box>
          </draw:frame>
        </draw:g>
        <draw:g draw:style-name="gr1">
          <draw:g draw:style-name="gr1">
            <draw:custom-shape draw:style-name="gr764" draw:text-style-name="P14" draw:layer="layout" svg:width="1cm" svg:height="2cm" svg:x="18.999cm" svg:y="15cm">
              <text:p/>
              <draw:enhanced-geometry svg:viewBox="0 0 21600 21600" draw:type="rectangle" draw:enhanced-path="M 0 0 L 21600 0 21600 21600 0 21600 0 0 Z N"/>
            </draw:custom-shape>
            <draw:custom-shape draw:style-name="gr76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5.597cm">
              <draw:text-box>
                <text:p><text:span text:style-name="T20">IM</text:span></text:p>
              </draw:text-box>
            </draw:frame>
          </draw:g>
        </draw:g>
        <draw:g draw:style-name="gr1">
          <draw:g draw:style-name="gr1">
            <draw:custom-shape draw:style-name="gr767" draw:text-style-name="P14" draw:layer="layout" svg:width="1cm" svg:height="2cm" svg:x="22.999cm" svg:y="15cm">
              <text:p/>
              <draw:enhanced-geometry svg:viewBox="0 0 21600 21600" draw:type="rectangle" draw:enhanced-path="M 0 0 L 21600 0 21600 21600 0 21600 0 0 Z N"/>
            </draw:custom-shape>
            <draw:custom-shape draw:style-name="gr76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5.597cm">
              <draw:text-box>
                <text:p><text:span text:style-name="T20">REG</text:span></text:p>
              </draw:text-box>
            </draw:frame>
          </draw:g>
        </draw:g>
        <draw:g draw:style-name="gr1">
          <draw:g draw:style-name="gr1">
            <draw:custom-shape draw:style-name="gr76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4" draw:text-style-name="P72"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2" draw:text-style-name="P71" draw:layer="layout" svg:width="1.999cm" svg:height="2.999cm" svg:x="30.999cm" svg:y="17.5cm" svg:viewBox="0 0 2000 3000" draw:points="0,0 0,1100 400,1500 0,1900 0,3000 2000,2000 2000,1000">
            <text:p/>
          </draw:polygon>
          <draw:frame draw:style-name="gr763" draw:text-style-name="P62" draw:layer="layout" svg:width="1.466cm" svg:height="0.806cm" svg:x="31.399cm" svg:y="18.594cm">
            <draw:text-box>
              <text:p><text:span text:style-name="T20">ALU</text:span></text:p>
            </draw:text-box>
          </draw:frame>
        </draw:g>
        <draw:g draw:style-name="gr1">
          <draw:g draw:style-name="gr1">
            <draw:custom-shape draw:style-name="gr764" draw:text-style-name="P14" draw:layer="layout" svg:width="1cm" svg:height="2cm" svg:x="22.999cm" svg:y="18cm">
              <text:p/>
              <draw:enhanced-geometry svg:viewBox="0 0 21600 21600" draw:type="rectangle" draw:enhanced-path="M 0 0 L 21600 0 21600 21600 0 21600 0 0 Z N"/>
            </draw:custom-shape>
            <draw:custom-shape draw:style-name="gr76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8.597cm">
              <draw:text-box>
                <text:p><text:span text:style-name="T20">IM</text:span></text:p>
              </draw:text-box>
            </draw:frame>
          </draw:g>
        </draw:g>
        <draw:g draw:style-name="gr1">
          <draw:g draw:style-name="gr1">
            <draw:custom-shape draw:style-name="gr767" draw:text-style-name="P14" draw:layer="layout" svg:width="1cm" svg:height="2cm" svg:x="26.999cm" svg:y="18cm">
              <text:p/>
              <draw:enhanced-geometry svg:viewBox="0 0 21600 21600" draw:type="rectangle" draw:enhanced-path="M 0 0 L 21600 0 21600 21600 0 21600 0 0 Z N"/>
            </draw:custom-shape>
            <draw:custom-shape draw:style-name="gr76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8.597cm">
              <draw:text-box>
                <text:p><text:span text:style-name="T20">REG</text:span></text:p>
              </draw:text-box>
            </draw:frame>
          </draw:g>
        </draw:g>
        <draw:g draw:style-name="gr1">
          <draw:g draw:style-name="gr1">
            <draw:custom-shape draw:style-name="gr76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4" draw:text-style-name="P72"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770" draw:text-style-name="P62" draw:layer="layout" svg:width="3.861cm" svg:height="0.806cm" svg:x="1.011cm" svg:y="15.6cm">
          <draw:text-box>
            <text:p><text:span text:style-name="T20">add </text:span><text:span text:style-name="T20">x14, </text:span><text:span text:style-name="T24">x2</text:span><text:span text:style-name="T20">, </text:span><text:span text:style-name="T24">x2</text:span></text:p>
          </draw:text-box>
        </draw:frame>
        <draw:frame draw:style-name="gr776" draw:text-style-name="P62" draw:layer="layout" svg:width="3.916cm" svg:height="0.806cm" svg:x="1.012cm" svg:y="18.6cm">
          <draw:text-box>
            <text:p><text:span text:style-name="T20">sd </text:span><text:span text:style-name="T20">x15, </text:span><text:span text:style-name="T20">100(</text:span><text:span text:style-name="T24">x</text:span><text:span text:style-name="T24">2</text:span><text:span text:style-name="T20">)</text:span></text:p>
          </draw:text-box>
        </draw:frame>
        <draw:custom-shape draw:style-name="gr777"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29cm" svg:y="7.1cm">
          <draw:text-box>
            <text:p><text:span text:style-name="T27">x2</text:span></text:p>
          </draw:text-box>
        </draw:frame>
        <draw:line draw:style-name="gr779" draw:text-style-name="P4" draw:layer="layout" svg:x1="23.6cm" svg:y1="8cm" svg:x2="15.999cm" svg:y2="9.597cm">
          <text:p/>
        </draw:line>
        <draw:line draw:style-name="gr780" draw:text-style-name="P4" draw:layer="layout" svg:x1="23.6cm" svg:y1="8cm" svg:x2="19.999cm" svg:y2="12.7cm">
          <text:p/>
        </draw:line>
        <draw:line draw:style-name="gr781" draw:text-style-name="P4" draw:layer="layout" svg:x1="23.6cm" svg:y1="8cm" svg:x2="23.999cm" svg:y2="15.597cm">
          <text:p/>
        </draw:line>
        <draw:line draw:style-name="gr782" draw:text-style-name="P4" draw:layer="layout" svg:x1="23.6cm" svg:y1="8cm" svg:x2="27.999cm" svg:y2="18.7cm">
          <text:p/>
        </draw:line>
        <draw:frame draw:style-name="gr783" draw:text-style-name="P62" draw:layer="layout" svg:width="5.83cm" svg:height="0.806cm" svg:x="17.96cm" svg:y="1.994cm">
          <draw:text-box>
            <text:p><text:span text:style-name="T20">and: </text:span><text:span text:style-name="T20">id_ex</text:span><text:span text:style-name="T20">_reg_</text:span><text:span text:style-name="T20">rs1 = </text:span><text:span text:style-name="T20">x2</text:span></text:p>
          </draw:text-box>
        </draw:frame>
        <draw:frame draw:style-name="gr784" draw:text-style-name="P62" draw:layer="layout" svg:width="6.27cm" svg:height="0.806cm" svg:x="18.96cm" svg:y="2.994cm">
          <draw:text-box>
            <text:p><text:span text:style-name="T20">sub: </text:span><text:span text:style-name="T20">ex_m</text:span><text:span text:style-name="T20">em_r</text:span><text:span text:style-name="T20">eg_rd </text:span><text:span text:style-name="T20">= x2</text:span></text:p>
          </draw:text-box>
        </draw:frame>
        <draw:line draw:style-name="gr785" draw:text-style-name="P4" draw:layer="layout" svg:x1="20.1cm" svg:y1="3.6cm" svg:x2="17.999cm" svg:y2="5.5cm">
          <text:p/>
        </draw:line>
        <draw:line draw:style-name="gr786" draw:text-style-name="P4" draw:layer="layout" svg:x1="19.1cm" svg:y1="2.6cm" svg:x2="17.999cm" svg:y2="9.3cm">
          <text:p/>
        </draw:line>
        <draw:line draw:style-name="gr787" draw:text-style-name="P4" draw:layer="layout" svg:x1="18.1cm" svg:y1="7cm" svg:x2="18.7cm" svg:y2="9.5cm">
          <text:p/>
        </draw:line>
        <draw:frame draw:style-name="gr788" draw:text-style-name="P62" draw:layer="layout" svg:width="5.444cm" svg:height="0.806cm" svg:x="25.96cm" svg:y="1.994cm">
          <draw:text-box>
            <text:p><text:span text:style-name="T20">or: </text:span><text:span text:style-name="T20">id_ex</text:span><text:span text:style-name="T20">_reg_</text:span><text:span text:style-name="T20">rs2 = </text:span><text:span text:style-name="T20">x2</text:span></text:p>
          </draw:text-box>
        </draw:frame>
        <draw:frame draw:style-name="gr789" draw:text-style-name="P62" draw:layer="layout" svg:width="6.38cm" svg:height="0.806cm" svg:x="26.96cm" svg:y="2.994cm">
          <draw:text-box>
            <text:p><text:span text:style-name="T20">sub: </text:span><text:span text:style-name="T20">mem</text:span><text:span text:style-name="T20">_wb_</text:span><text:span text:style-name="T20">reg_r</text:span><text:span text:style-name="T20">d = </text:span><text:span text:style-name="T20">x2</text:span></text:p>
          </draw:text-box>
        </draw:frame>
        <draw:line draw:style-name="gr790" draw:text-style-name="P4" draw:layer="layout" svg:x1="28cm" svg:y1="3.6cm" svg:x2="21.999cm" svg:y2="5.5cm">
          <text:p/>
        </draw:line>
        <draw:line draw:style-name="gr791" draw:text-style-name="P4" draw:layer="layout" svg:x1="26.7cm" svg:y1="2.6cm" svg:x2="21.999cm" svg:y2="12.2cm">
          <text:p/>
        </draw:line>
        <draw:line draw:style-name="gr792" draw:text-style-name="P4" draw:layer="layout" svg:x1="22.1cm" svg:y1="7cm" svg:x2="22.7cm" svg:y2="12.5cm">
          <text:p/>
        </draw:line>
        <draw:frame draw:style-name="gr793" draw:text-style-name="P62" draw:layer="layout" svg:width="5.93cm" svg:height="0.806cm" svg:x="17.96cm" svg:y="0.994cm">
          <draw:text-box>
            <text:p><text:span text:style-name="T20">sub: </text:span><text:span text:style-name="T20">ex_m</text:span><text:span text:style-name="T20">em_r</text:span><text:span text:style-name="T20">egWr </text:span><text:span text:style-name="T20">= 1</text:span></text:p>
          </draw:text-box>
        </draw:frame>
        <draw:frame draw:style-name="gr794" draw:text-style-name="P62" draw:layer="layout" svg:width="6.04cm" svg:height="0.806cm" svg:x="26.061cm" svg:y="0.994cm">
          <draw:text-box>
            <text:p><text:span text:style-name="T20">sub: </text:span><text:span text:style-name="T20">mem</text:span><text:span text:style-name="T20">_wb_</text:span><text:span text:style-name="T20">regW</text:span><text:span text:style-name="T20">r = 1</text:span></text:p>
          </draw:text-box>
        </draw:frame>
      </draw:page>
      <draw:page draw:name="page15" draw:style-name="dp1" draw:master-page-name="Standard">
        <draw:frame draw:style-name="gr795" draw:text-style-name="P62" draw:layer="layout" svg:width="4.522cm" svg:height="0.806cm" svg:x="1.008cm" svg:y="5.6cm">
          <draw:text-box>
            <text:p><text:span text:style-name="T20">addi </text:span><text:span text:style-name="T24">x2</text:span><text:span text:style-name="T20">, </text:span><text:span text:style-name="T20">x0, </text:span><text:span text:style-name="T20">0x10</text:span><text:span text:style-name="T20">0</text:span></text:p>
          </draw:text-box>
        </draw:frame>
        <draw:frame draw:style-name="gr761" draw:text-style-name="P34" draw:layer="layout" svg:width="6.124cm" svg:height="0.962cm" svg:x="5.699cm" svg:y="1.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2" draw:text-style-name="P71" draw:layer="layout" svg:width="1.999cm" svg:height="2.999cm" svg:x="14.999cm" svg:y="4.5cm" svg:viewBox="0 0 2000 3000" draw:points="0,0 0,1100 400,1500 0,1900 0,3000 2000,2000 2000,1000">
            <text:p/>
          </draw:polygon>
          <draw:frame draw:style-name="gr763" draw:text-style-name="P62" draw:layer="layout" svg:width="1.466cm" svg:height="0.806cm" svg:x="15.399cm" svg:y="5.594cm">
            <draw:text-box>
              <text:p><text:span text:style-name="T20">ALU</text:span></text:p>
            </draw:text-box>
          </draw:frame>
        </draw:g>
        <draw:g draw:style-name="gr1">
          <draw:g draw:style-name="gr1">
            <draw:custom-shape draw:style-name="gr764" draw:text-style-name="P14" draw:layer="layout" svg:width="1cm" svg:height="2cm" svg:x="6.999cm" svg:y="5cm">
              <text:p/>
              <draw:enhanced-geometry svg:viewBox="0 0 21600 21600" draw:type="rectangle" draw:enhanced-path="M 0 0 L 21600 0 21600 21600 0 21600 0 0 Z N"/>
            </draw:custom-shape>
            <draw:custom-shape draw:style-name="gr76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5.597cm">
              <draw:text-box>
                <text:p><text:span text:style-name="T20">IM</text:span></text:p>
              </draw:text-box>
            </draw:frame>
          </draw:g>
        </draw:g>
        <draw:g draw:style-name="gr1">
          <draw:g draw:style-name="gr1">
            <draw:custom-shape draw:style-name="gr767" draw:text-style-name="P14" draw:layer="layout" svg:width="1cm" svg:height="2cm" svg:x="10.999cm" svg:y="5cm">
              <text:p/>
              <draw:enhanced-geometry svg:viewBox="0 0 21600 21600" draw:type="rectangle" draw:enhanced-path="M 0 0 L 21600 0 21600 21600 0 21600 0 0 Z N"/>
            </draw:custom-shape>
            <draw:custom-shape draw:style-name="gr76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5.597cm">
              <draw:text-box>
                <text:p><text:span text:style-name="T20">Reg</text:span></text:p>
              </draw:text-box>
            </draw:frame>
          </draw:g>
        </draw:g>
        <draw:g draw:style-name="gr1">
          <draw:g draw:style-name="gr1">
            <draw:custom-shape draw:style-name="gr76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2" draw:text-style-name="P71" draw:layer="layout" svg:width="1.999cm" svg:height="2.999cm" svg:x="18.999cm" svg:y="7.5cm" svg:viewBox="0 0 2000 3000" draw:points="0,0 0,1100 400,1500 0,1900 0,3000 2000,2000 2000,1000">
            <text:p/>
          </draw:polygon>
          <draw:frame draw:style-name="gr763" draw:text-style-name="P62" draw:layer="layout" svg:width="1.466cm" svg:height="0.806cm" svg:x="19.399cm" svg:y="8.594cm">
            <draw:text-box>
              <text:p><text:span text:style-name="T20">ALU</text:span></text:p>
            </draw:text-box>
          </draw:frame>
        </draw:g>
        <draw:g draw:style-name="gr1">
          <draw:g draw:style-name="gr1">
            <draw:custom-shape draw:style-name="gr764" draw:text-style-name="P14" draw:layer="layout" svg:width="1cm" svg:height="2cm" svg:x="10.999cm" svg:y="8cm">
              <text:p/>
              <draw:enhanced-geometry svg:viewBox="0 0 21600 21600" draw:type="rectangle" draw:enhanced-path="M 0 0 L 21600 0 21600 21600 0 21600 0 0 Z N"/>
            </draw:custom-shape>
            <draw:custom-shape draw:style-name="gr76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8.597cm">
              <draw:text-box>
                <text:p><text:span text:style-name="T20">IM</text:span></text:p>
              </draw:text-box>
            </draw:frame>
          </draw:g>
        </draw:g>
        <draw:g draw:style-name="gr1">
          <draw:g draw:style-name="gr1">
            <draw:custom-shape draw:style-name="gr767" draw:text-style-name="P14" draw:layer="layout" svg:width="1cm" svg:height="2cm" svg:x="14.999cm" svg:y="8cm">
              <text:p/>
              <draw:enhanced-geometry svg:viewBox="0 0 21600 21600" draw:type="rectangle" draw:enhanced-path="M 0 0 L 21600 0 21600 21600 0 21600 0 0 Z N"/>
            </draw:custom-shape>
            <draw:custom-shape draw:style-name="gr76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8.597cm">
              <draw:text-box>
                <text:p><text:span text:style-name="T20">REG</text:span></text:p>
              </draw:text-box>
            </draw:frame>
          </draw:g>
        </draw:g>
        <draw:g draw:style-name="gr1">
          <draw:g draw:style-name="gr1">
            <draw:custom-shape draw:style-name="gr76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6" draw:text-style-name="P62"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1" draw:text-style-name="P4" draw:layer="layout" svg:x1="9.999cm" svg:y1="4cm" svg:x2="9.999cm" svg:y2="20cm">
          <text:p/>
        </draw:line>
        <draw:line draw:style-name="gr771" draw:text-style-name="P4" draw:layer="layout" svg:x1="13.999cm" svg:y1="4cm" svg:x2="13.999cm" svg:y2="20cm">
          <text:p/>
        </draw:line>
        <draw:line draw:style-name="gr771" draw:text-style-name="P4" draw:layer="layout" svg:x1="17.999cm" svg:y1="4cm" svg:x2="17.999cm" svg:y2="20cm">
          <text:p/>
        </draw:line>
        <draw:line draw:style-name="gr771" draw:text-style-name="P4" draw:layer="layout" svg:x1="21.999cm" svg:y1="4cm" svg:x2="21.999cm" svg:y2="20cm">
          <text:p/>
        </draw:line>
        <draw:line draw:style-name="gr771" draw:text-style-name="P4" draw:layer="layout" svg:x1="25.999cm" svg:y1="4cm" svg:x2="25.999cm" svg:y2="20cm">
          <text:p/>
        </draw:line>
        <draw:line draw:style-name="gr771" draw:text-style-name="P4" draw:layer="layout" svg:x1="29.999cm" svg:y1="4cm" svg:x2="29.999cm" svg:y2="20cm">
          <text:p/>
        </draw:line>
        <draw:line draw:style-name="gr771" draw:text-style-name="P4" draw:layer="layout" svg:x1="33.999cm" svg:y1="4cm" svg:x2="33.999cm" svg:y2="20cm">
          <text:p/>
        </draw:line>
        <draw:frame draw:style-name="gr772" draw:text-style-name="P3" draw:layer="layout" svg:width="1.949cm" svg:height="0.962cm" svg:x="7.053cm" svg:y="2cm">
          <draw:text-box>
            <text:p>CC 1</text:p>
          </draw:text-box>
        </draw:frame>
        <draw:frame draw:style-name="gr772" draw:text-style-name="P3" draw:layer="layout" svg:width="1.949cm" svg:height="0.962cm" svg:x="11.053cm" svg:y="2cm">
          <draw:text-box>
            <text:p>CC 2</text:p>
          </draw:text-box>
        </draw:frame>
        <draw:frame draw:style-name="gr772" draw:text-style-name="P3" draw:layer="layout" svg:width="1.949cm" svg:height="0.962cm" svg:x="15.053cm" svg:y="2cm">
          <draw:text-box>
            <text:p>CC 3</text:p>
          </draw:text-box>
        </draw:frame>
        <draw:frame draw:style-name="gr772" draw:text-style-name="P3" draw:layer="layout" svg:width="1.949cm" svg:height="0.962cm" svg:x="23.053cm" svg:y="2cm">
          <draw:text-box>
            <text:p>CC 5</text:p>
          </draw:text-box>
        </draw:frame>
        <draw:frame draw:style-name="gr772" draw:text-style-name="P3" draw:layer="layout" svg:width="1.949cm" svg:height="0.962cm" svg:x="27.053cm" svg:y="2cm">
          <draw:text-box>
            <text:p>CC 6</text:p>
          </draw:text-box>
        </draw:frame>
        <draw:frame draw:style-name="gr772" draw:text-style-name="P3" draw:layer="layout" svg:width="1.949cm" svg:height="0.962cm" svg:x="31.053cm" svg:y="2cm">
          <draw:text-box>
            <text:p>CC 7</text:p>
          </draw:text-box>
        </draw:frame>
        <draw:frame draw:style-name="gr772" draw:text-style-name="P3" draw:layer="layout" svg:width="1.949cm" svg:height="0.962cm" svg:x="18.999cm" svg:y="2cm">
          <draw:text-box>
            <text:p>CC 4</text:p>
          </draw:text-box>
        </draw:frame>
        <draw:g draw:style-name="gr1">
          <draw:g draw:style-name="gr1">
            <draw:custom-shape draw:style-name="gr764" draw:text-style-name="P72"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5.599cm">
            <draw:text-box>
              <text:p><text:span text:style-name="T20">DM</text:span></text:p>
            </draw:text-box>
          </draw:frame>
        </draw:g>
        <draw:line draw:style-name="gr797" draw:text-style-name="P4" draw:layer="layout" svg:x1="18.499cm" svg:y1="6cm" svg:x2="18.499cm" svg:y2="7.2cm">
          <text:p/>
        </draw:line>
        <draw:line draw:style-name="gr797" draw:text-style-name="P4" draw:layer="layout" svg:x1="18.499cm" svg:y1="7.2cm" svg:x2="21.499cm" svg:y2="7.2cm">
          <text:p/>
        </draw:line>
        <draw:line draw:style-name="gr797" draw:text-style-name="P4" draw:layer="layout" svg:x1="21.499cm" svg:y1="7.2cm" svg:x2="21.999cm" svg:y2="6cm">
          <text:p/>
        </draw:line>
        <draw:g draw:style-name="gr1">
          <draw:g draw:style-name="gr1">
            <draw:custom-shape draw:style-name="gr764" draw:text-style-name="P72"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8.599cm">
            <draw:text-box>
              <text:p><text:span text:style-name="T20">DM</text:span></text:p>
            </draw:text-box>
          </draw:frame>
        </draw:g>
        <draw:line draw:style-name="gr797" draw:text-style-name="P4" draw:layer="layout" svg:x1="22.499cm" svg:y1="9cm" svg:x2="22.499cm" svg:y2="10.2cm">
          <text:p/>
        </draw:line>
        <draw:line draw:style-name="gr797" draw:text-style-name="P4" draw:layer="layout" svg:x1="22.499cm" svg:y1="10.2cm" svg:x2="25.499cm" svg:y2="10.2cm">
          <text:p/>
        </draw:line>
        <draw:line draw:style-name="gr797" draw:text-style-name="P4" draw:layer="layout" svg:x1="25.499cm" svg:y1="10.2cm" svg:x2="25.999cm" svg:y2="9cm">
          <text:p/>
        </draw:line>
        <draw:g draw:style-name="gr66">
          <draw:polygon draw:style-name="gr762" draw:text-style-name="P71" draw:layer="layout" svg:width="1.999cm" svg:height="2.999cm" svg:x="22.999cm" svg:y="10.5cm" svg:viewBox="0 0 2000 3000" draw:points="0,0 0,1100 400,1500 0,1900 0,3000 2000,2000 2000,1000">
            <text:p/>
          </draw:polygon>
          <draw:frame draw:style-name="gr763" draw:text-style-name="P62" draw:layer="layout" svg:width="1.466cm" svg:height="0.806cm" svg:x="23.399cm" svg:y="11.594cm">
            <draw:text-box>
              <text:p><text:span text:style-name="T20">ALU</text:span></text:p>
            </draw:text-box>
          </draw:frame>
        </draw:g>
        <draw:g draw:style-name="gr1">
          <draw:g draw:style-name="gr1">
            <draw:custom-shape draw:style-name="gr764" draw:text-style-name="P14" draw:layer="layout" svg:width="1cm" svg:height="2cm" svg:x="14.999cm" svg:y="11cm">
              <text:p/>
              <draw:enhanced-geometry svg:viewBox="0 0 21600 21600" draw:type="rectangle" draw:enhanced-path="M 0 0 L 21600 0 21600 21600 0 21600 0 0 Z N"/>
            </draw:custom-shape>
            <draw:custom-shape draw:style-name="gr76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1.597cm">
              <draw:text-box>
                <text:p><text:span text:style-name="T20">IM</text:span></text:p>
              </draw:text-box>
            </draw:frame>
          </draw:g>
        </draw:g>
        <draw:g draw:style-name="gr1">
          <draw:g draw:style-name="gr1">
            <draw:custom-shape draw:style-name="gr767" draw:text-style-name="P14" draw:layer="layout" svg:width="1cm" svg:height="2cm" svg:x="18.999cm" svg:y="11cm">
              <text:p/>
              <draw:enhanced-geometry svg:viewBox="0 0 21600 21600" draw:type="rectangle" draw:enhanced-path="M 0 0 L 21600 0 21600 21600 0 21600 0 0 Z N"/>
            </draw:custom-shape>
            <draw:custom-shape draw:style-name="gr76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1.597cm">
              <draw:text-box>
                <text:p><text:span text:style-name="T20">REG</text:span></text:p>
              </draw:text-box>
            </draw:frame>
          </draw:g>
        </draw:g>
        <draw:g draw:style-name="gr1">
          <draw:g draw:style-name="gr1">
            <draw:custom-shape draw:style-name="gr76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4" draw:text-style-name="P72"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771" draw:text-style-name="P4" draw:layer="layout" svg:x1="37.999cm" svg:y1="4cm" svg:x2="37.999cm" svg:y2="20cm">
          <text:p/>
        </draw:line>
        <draw:g draw:style-name="gr66">
          <draw:polygon draw:style-name="gr762" draw:text-style-name="P71" draw:layer="layout" svg:width="1.999cm" svg:height="2.999cm" svg:x="26.999cm" svg:y="13.5cm" svg:viewBox="0 0 2000 3000" draw:points="0,0 0,1100 400,1500 0,1900 0,3000 2000,2000 2000,1000">
            <text:p/>
          </draw:polygon>
          <draw:frame draw:style-name="gr763" draw:text-style-name="P62" draw:layer="layout" svg:width="1.466cm" svg:height="0.806cm" svg:x="27.399cm" svg:y="14.594cm">
            <draw:text-box>
              <text:p><text:span text:style-name="T20">ALU</text:span></text:p>
            </draw:text-box>
          </draw:frame>
        </draw:g>
        <draw:g draw:style-name="gr1">
          <draw:g draw:style-name="gr1">
            <draw:custom-shape draw:style-name="gr764" draw:text-style-name="P14" draw:layer="layout" svg:width="1cm" svg:height="2cm" svg:x="18.999cm" svg:y="14cm">
              <text:p/>
              <draw:enhanced-geometry svg:viewBox="0 0 21600 21600" draw:type="rectangle" draw:enhanced-path="M 0 0 L 21600 0 21600 21600 0 21600 0 0 Z N"/>
            </draw:custom-shape>
            <draw:custom-shape draw:style-name="gr76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4.597cm">
              <draw:text-box>
                <text:p><text:span text:style-name="T20">IM</text:span></text:p>
              </draw:text-box>
            </draw:frame>
          </draw:g>
        </draw:g>
        <draw:g draw:style-name="gr1">
          <draw:g draw:style-name="gr1">
            <draw:custom-shape draw:style-name="gr767" draw:text-style-name="P14" draw:layer="layout" svg:width="1cm" svg:height="2cm" svg:x="22.999cm" svg:y="14cm">
              <text:p/>
              <draw:enhanced-geometry svg:viewBox="0 0 21600 21600" draw:type="rectangle" draw:enhanced-path="M 0 0 L 21600 0 21600 21600 0 21600 0 0 Z N"/>
            </draw:custom-shape>
            <draw:custom-shape draw:style-name="gr76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4.597cm">
              <draw:text-box>
                <text:p><text:span text:style-name="T20">REG</text:span></text:p>
              </draw:text-box>
            </draw:frame>
          </draw:g>
        </draw:g>
        <draw:g draw:style-name="gr1">
          <draw:g draw:style-name="gr1">
            <draw:custom-shape draw:style-name="gr76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4" draw:text-style-name="P72"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2" draw:text-style-name="P71" draw:layer="layout" svg:width="1.999cm" svg:height="2.999cm" svg:x="30.999cm" svg:y="16.5cm" svg:viewBox="0 0 2000 3000" draw:points="0,0 0,1100 400,1500 0,1900 0,3000 2000,2000 2000,1000">
            <text:p/>
          </draw:polygon>
          <draw:frame draw:style-name="gr763" draw:text-style-name="P62" draw:layer="layout" svg:width="1.466cm" svg:height="0.806cm" svg:x="31.399cm" svg:y="17.594cm">
            <draw:text-box>
              <text:p><text:span text:style-name="T20">ALU</text:span></text:p>
            </draw:text-box>
          </draw:frame>
        </draw:g>
        <draw:g draw:style-name="gr1">
          <draw:g draw:style-name="gr1">
            <draw:custom-shape draw:style-name="gr764" draw:text-style-name="P14" draw:layer="layout" svg:width="1cm" svg:height="2cm" svg:x="22.999cm" svg:y="17cm">
              <text:p/>
              <draw:enhanced-geometry svg:viewBox="0 0 21600 21600" draw:type="rectangle" draw:enhanced-path="M 0 0 L 21600 0 21600 21600 0 21600 0 0 Z N"/>
            </draw:custom-shape>
            <draw:custom-shape draw:style-name="gr76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7.597cm">
              <draw:text-box>
                <text:p><text:span text:style-name="T20">IM</text:span></text:p>
              </draw:text-box>
            </draw:frame>
          </draw:g>
        </draw:g>
        <draw:g draw:style-name="gr1">
          <draw:g draw:style-name="gr1">
            <draw:custom-shape draw:style-name="gr767" draw:text-style-name="P14" draw:layer="layout" svg:width="1cm" svg:height="2cm" svg:x="26.999cm" svg:y="17cm">
              <text:p/>
              <draw:enhanced-geometry svg:viewBox="0 0 21600 21600" draw:type="rectangle" draw:enhanced-path="M 0 0 L 21600 0 21600 21600 0 21600 0 0 Z N"/>
            </draw:custom-shape>
            <draw:custom-shape draw:style-name="gr76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7.597cm">
              <draw:text-box>
                <text:p><text:span text:style-name="T20">REG</text:span></text:p>
              </draw:text-box>
            </draw:frame>
          </draw:g>
        </draw:g>
        <draw:g draw:style-name="gr1">
          <draw:g draw:style-name="gr1">
            <draw:custom-shape draw:style-name="gr76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4" draw:text-style-name="P72"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29cm" svg:y="6.1cm">
          <draw:text-box>
            <text:p><text:span text:style-name="T27">x2</text:span></text:p>
          </draw:text-box>
        </draw:frame>
        <draw:frame draw:style-name="gr798" draw:text-style-name="P75" draw:layer="layout" svg:width="2.479cm" svg:height="0.569cm" svg:x="9.8cm" svg:y="3.901cm">
          <draw:text-box>
            <text:p><text:span text:style-name="T28">if_id_reg_</text:span><text:span text:style-name="T28">rd=2</text:span></text:p>
          </draw:text-box>
        </draw:frame>
        <draw:frame draw:style-name="gr799" draw:text-style-name="P75" draw:layer="layout" svg:width="2.465cm" svg:height="0.569cm" svg:x="9.8cm" svg:y="4.231cm">
          <draw:text-box>
            <text:p><text:span text:style-name="T28">if_id_reg_</text:span><text:span text:style-name="T28">rs1=0</text:span></text:p>
          </draw:text-box>
        </draw:frame>
        <draw:frame draw:style-name="gr800" draw:text-style-name="P75" draw:layer="layout" svg:width="2.462cm" svg:height="0.569cm" svg:x="9.8cm" svg:y="4.532cm">
          <draw:text-box>
            <text:p><text:span text:style-name="T28">if_id_reg_</text:span><text:span text:style-name="T28">rs2=-</text:span></text:p>
          </draw:text-box>
        </draw:frame>
        <draw:frame draw:style-name="gr798" draw:text-style-name="P75" draw:layer="layout" svg:width="2.479cm" svg:height="0.569cm" svg:x="13.801cm" svg:y="6.901cm">
          <draw:text-box>
            <text:p><text:span text:style-name="T28">if_id_reg_</text:span><text:span text:style-name="T28">rd=2</text:span></text:p>
          </draw:text-box>
        </draw:frame>
        <draw:frame draw:style-name="gr799" draw:text-style-name="P75" draw:layer="layout" svg:width="2.465cm" svg:height="0.569cm" svg:x="13.801cm" svg:y="7.231cm">
          <draw:text-box>
            <text:p><text:span text:style-name="T28">if_id_reg_</text:span><text:span text:style-name="T28">rs1=2</text:span></text:p>
          </draw:text-box>
        </draw:frame>
        <draw:frame draw:style-name="gr800" draw:text-style-name="P75" draw:layer="layout" svg:width="2.462cm" svg:height="0.569cm" svg:x="13.801cm" svg:y="7.532cm">
          <draw:text-box>
            <text:p><text:span text:style-name="T28">if_id_reg_</text:span><text:span text:style-name="T28">rs2=-</text:span></text:p>
          </draw:text-box>
        </draw:frame>
        <draw:frame draw:style-name="gr801" draw:text-style-name="P75" draw:layer="layout" svg:width="2.481cm" svg:height="0.569cm" svg:x="13.801cm" svg:y="3.901cm">
          <draw:text-box>
            <text:p><text:span text:style-name="T28">id_ex_reg</text:span><text:span text:style-name="T28">_rd=2</text:span></text:p>
          </draw:text-box>
        </draw:frame>
        <draw:frame draw:style-name="gr802" draw:text-style-name="P75" draw:layer="layout" svg:width="2.623cm" svg:height="0.569cm" svg:x="13.801cm" svg:y="4.231cm">
          <draw:text-box>
            <text:p><text:span text:style-name="T28">id_ex_reg</text:span><text:span text:style-name="T28">_rs1=0</text:span></text:p>
          </draw:text-box>
        </draw:frame>
        <draw:frame draw:style-name="gr803" draw:text-style-name="P75" draw:layer="layout" svg:width="2.56cm" svg:height="0.569cm" svg:x="13.801cm" svg:y="4.532cm">
          <draw:text-box>
            <text:p><text:span text:style-name="T28">id_ex_reg</text:span><text:span text:style-name="T28">_rs2=-</text:span></text:p>
          </draw:text-box>
        </draw:frame>
        <draw:frame draw:style-name="gr804" draw:text-style-name="P70" draw:layer="layout" svg:width="2.891cm" svg:height="0.569cm" svg:x="17.802cm" svg:y="3.901cm">
          <draw:text-box>
            <text:p><text:span text:style-name="T23">ex_mem_</text:span><text:span text:style-name="T23">reg_rd=2</text:span></text:p>
          </draw:text-box>
        </draw:frame>
        <draw:frame draw:style-name="gr805" draw:text-style-name="P75" draw:layer="layout" svg:width="3.032cm" svg:height="0.569cm" svg:x="17.802cm" svg:y="4.231cm">
          <draw:text-box>
            <text:p><text:span text:style-name="T28">ex_mem_</text:span><text:span text:style-name="T28">reg_rs1=0</text:span></text:p>
          </draw:text-box>
        </draw:frame>
        <draw:frame draw:style-name="gr806" draw:text-style-name="P75" draw:layer="layout" svg:width="2.969cm" svg:height="0.569cm" svg:x="17.802cm" svg:y="4.532cm">
          <draw:text-box>
            <text:p><text:span text:style-name="T28">ex_mem_</text:span><text:span text:style-name="T28">reg_rs2=-</text:span></text:p>
          </draw:text-box>
        </draw:frame>
        <draw:frame draw:style-name="gr807" draw:text-style-name="P75" draw:layer="layout" svg:width="2.954cm" svg:height="0.569cm" svg:x="21.803cm" svg:y="3.901cm">
          <draw:text-box>
            <text:p><text:span text:style-name="T28">mem_wb</text:span><text:span text:style-name="T28">_reg_rd=</text:span><text:span text:style-name="T28">2</text:span></text:p>
          </draw:text-box>
        </draw:frame>
        <draw:frame draw:style-name="gr808" draw:text-style-name="P75" draw:layer="layout" svg:width="3.095cm" svg:height="0.569cm" svg:x="21.803cm" svg:y="4.231cm">
          <draw:text-box>
            <text:p><text:span text:style-name="T28">mem_wb</text:span><text:span text:style-name="T28">_reg_rs1=</text:span><text:span text:style-name="T28">0</text:span></text:p>
          </draw:text-box>
        </draw:frame>
        <draw:frame draw:style-name="gr805" draw:text-style-name="P75" draw:layer="layout" svg:width="3.032cm" svg:height="0.569cm" svg:x="21.803cm" svg:y="4.532cm">
          <draw:text-box>
            <text:p><text:span text:style-name="T28">mem_wb</text:span><text:span text:style-name="T28">_reg_rs2=</text:span><text:span text:style-name="T28">-</text:span></text:p>
          </draw:text-box>
        </draw:frame>
        <draw:frame draw:style-name="gr801" draw:text-style-name="P75" draw:layer="layout" svg:width="2.481cm" svg:height="0.569cm" svg:x="17.802cm" svg:y="6.901cm">
          <draw:text-box>
            <text:p><text:span text:style-name="T28">id_ex_reg</text:span><text:span text:style-name="T28">_rd=2</text:span></text:p>
          </draw:text-box>
        </draw:frame>
        <draw:frame draw:style-name="gr802" draw:text-style-name="P70" draw:layer="layout" svg:width="2.623cm" svg:height="0.569cm" svg:x="17.802cm" svg:y="7.231cm">
          <draw:text-box>
            <text:p><text:span text:style-name="T23">id_ex_reg</text:span><text:span text:style-name="T23">_rs1=2</text:span></text:p>
          </draw:text-box>
        </draw:frame>
        <draw:frame draw:style-name="gr803" draw:text-style-name="P75" draw:layer="layout" svg:width="2.56cm" svg:height="0.569cm" svg:x="17.802cm" svg:y="7.532cm">
          <draw:text-box>
            <text:p><text:span text:style-name="T28">id_ex_reg</text:span><text:span text:style-name="T28">_rs2=-</text:span></text:p>
          </draw:text-box>
        </draw:frame>
        <draw:frame draw:style-name="gr804" draw:text-style-name="P75" draw:layer="layout" svg:width="2.891cm" svg:height="0.569cm" svg:x="21.803cm" svg:y="6.901cm">
          <draw:text-box>
            <text:p><text:span text:style-name="T28">ex_mem_</text:span><text:span text:style-name="T28">reg_rd=2</text:span></text:p>
          </draw:text-box>
        </draw:frame>
        <draw:frame draw:style-name="gr805" draw:text-style-name="P75" draw:layer="layout" svg:width="3.032cm" svg:height="0.569cm" svg:x="21.803cm" svg:y="7.231cm">
          <draw:text-box>
            <text:p><text:span text:style-name="T28">ex_mem_</text:span><text:span text:style-name="T28">reg_rs1=2</text:span></text:p>
          </draw:text-box>
        </draw:frame>
        <draw:frame draw:style-name="gr806" draw:text-style-name="P75" draw:layer="layout" svg:width="2.969cm" svg:height="0.569cm" svg:x="21.803cm" svg:y="7.532cm">
          <draw:text-box>
            <text:p><text:span text:style-name="T28">ex_mem_</text:span><text:span text:style-name="T28">reg_rs2=-</text:span></text:p>
          </draw:text-box>
        </draw:frame>
        <draw:frame draw:style-name="gr807" draw:text-style-name="P75" draw:layer="layout" svg:width="2.954cm" svg:height="0.569cm" svg:x="25.804cm" svg:y="6.901cm">
          <draw:text-box>
            <text:p><text:span text:style-name="T28">mem_wb</text:span><text:span text:style-name="T28">_reg_rd=</text:span><text:span text:style-name="T28">2</text:span></text:p>
          </draw:text-box>
        </draw:frame>
        <draw:frame draw:style-name="gr808" draw:text-style-name="P75" draw:layer="layout" svg:width="3.095cm" svg:height="0.569cm" svg:x="25.804cm" svg:y="7.231cm">
          <draw:text-box>
            <text:p><text:span text:style-name="T28">mem_wb</text:span><text:span text:style-name="T28">_reg_rs1=</text:span><text:span text:style-name="T28">2</text:span></text:p>
          </draw:text-box>
        </draw:frame>
        <draw:frame draw:style-name="gr805" draw:text-style-name="P75" draw:layer="layout" svg:width="3.032cm" svg:height="0.569cm" svg:x="25.804cm" svg:y="7.532cm">
          <draw:text-box>
            <text:p><text:span text:style-name="T28">mem_wb</text:span><text:span text:style-name="T28">_reg_rs2=</text:span><text:span text:style-name="T28">-</text:span></text:p>
          </draw:text-box>
        </draw:frame>
        <draw:frame draw:style-name="gr809" draw:text-style-name="P70" draw:layer="layout" svg:width="2.087cm" svg:height="0.569cm" svg:x="16.762cm" svg:y="5.5cm">
          <draw:text-box>
            <text:p><text:span text:style-name="T23">forward_a</text:span><text:span text:style-name="T23">=2</text:span></text:p>
          </draw:text-box>
        </draw:frame>
        <draw:line draw:style-name="gr810" draw:text-style-name="P4" draw:layer="layout" svg:x1="23.601cm" svg:y1="6.743cm" svg:x2="16cm" svg:y2="8.34cm">
          <text:p/>
        </draw:line>
        <draw:line draw:style-name="gr787" draw:text-style-name="P4" draw:layer="layout" svg:x1="18.138cm" svg:y1="6cm" svg:x2="18.738cm" svg:y2="8.5cm">
          <text:p/>
        </draw:line>
        <draw:frame draw:style-name="gr811" draw:text-style-name="P70" draw:layer="layout" svg:width="5.949cm" svg:height="0.569cm" svg:x="16.463cm" svg:y="3.401cm">
          <draw:text-box>
            <text:p><text:span text:style-name="T23">forward_a</text:span><text:span text:style-name="T23">_mux_out</text:span><text:span text:style-name="T23">_s = </text:span><text:span text:style-name="T23">alu_result</text:span><text:span text:style-name="T23">_mem_s</text:span></text:p>
          </draw:text-box>
        </draw:frame>
        <draw:frame draw:style-name="gr812" draw:text-style-name="P75" draw:layer="layout" svg:width="2.051cm" svg:height="0.569cm" svg:x="22.948cm" svg:y="5.3cm">
          <draw:text-box>
            <text:p><text:span text:style-name="T28">x2=0x100</text:span></text:p>
          </draw:text-box>
        </draw:frame>
        <draw:frame draw:style-name="gr813" draw:text-style-name="P75" draw:layer="layout" svg:width="2.291cm" svg:height="0.569cm" svg:x="12.2cm" svg:y="6.1cm">
          <draw:text-box>
            <text:p><text:span text:style-name="T28">imm_d=0</text:span><text:span text:style-name="T28">x100</text:span></text:p>
          </draw:text-box>
        </draw:frame>
        <draw:frame draw:style-name="gr812" draw:text-style-name="P75" draw:layer="layout" svg:width="2.051cm" svg:height="0.569cm" svg:x="12.301cm" svg:y="5.101cm">
          <draw:text-box>
            <text:p><text:span text:style-name="T28">reg_a=0</text:span></text:p>
          </draw:text-box>
        </draw:frame>
        <draw:frame draw:style-name="gr814" draw:text-style-name="P75" draw:layer="layout" svg:width="2.67cm" svg:height="0.569cm" svg:x="15.33cm" svg:y="6.031cm">
          <draw:text-box>
            <text:p><text:span text:style-name="T28">alu_result</text:span><text:span text:style-name="T28">=0x100</text:span></text:p>
          </draw:text-box>
        </draw:frame>
        <draw:frame draw:style-name="gr812" draw:text-style-name="P75" draw:layer="layout" svg:width="2.051cm" svg:height="0.569cm" svg:x="14.949cm" svg:y="8.301cm">
          <draw:text-box>
            <text:p><text:span text:style-name="T28">x2=0x???</text:span></text:p>
          </draw:text-box>
        </draw:frame>
        <draw:frame draw:style-name="gr812" draw:text-style-name="P75" draw:layer="layout" svg:width="2.051cm" svg:height="0.569cm" svg:x="16.2cm" svg:y="9.1cm">
          <draw:text-box>
            <text:p><text:span text:style-name="T28">imm_d=8</text:span></text:p>
          </draw:text-box>
        </draw:frame>
        <draw:frame draw:style-name="gr812" draw:text-style-name="P75" draw:layer="layout" svg:width="2.051cm" svg:height="0.569cm" svg:x="16.301cm" svg:y="8.101cm">
          <draw:text-box>
            <text:p><text:span text:style-name="T28">reg_a=??</text:span></text:p>
          </draw:text-box>
        </draw:frame>
        <draw:frame draw:style-name="gr815" draw:text-style-name="P75" draw:layer="layout" svg:width="2.986cm" svg:height="0.569cm" svg:x="19.031cm" svg:y="9.032cm">
          <draw:text-box>
            <text:p><text:span text:style-name="T28">alu_result</text:span><text:span text:style-name="T28">=0x10000</text:span></text:p>
          </draw:text-box>
        </draw:frame>
        <draw:frame draw:style-name="gr816" draw:text-style-name="P75" draw:layer="layout" svg:width="2.055cm" svg:height="0.569cm" svg:x="26.949cm" svg:y="8.301cm">
          <draw:text-box>
            <text:p><text:span text:style-name="T28">x2=0x100</text:span><text:span text:style-name="T28">00</text:span></text:p>
          </draw:text-box>
        </draw:frame>
      </draw:page>
      <draw:page draw:name="page16" draw:style-name="dp1" draw:master-page-name="Standard">
        <draw:frame draw:style-name="gr795" draw:text-style-name="P62" draw:layer="layout" svg:width="4.522cm" svg:height="0.806cm" svg:x="1.008cm" svg:y="5.6cm">
          <draw:text-box>
            <text:p><text:span text:style-name="T20">addi </text:span><text:span text:style-name="T24">x2</text:span><text:span text:style-name="T20">, </text:span><text:span text:style-name="T20">x0, </text:span><text:span text:style-name="T20">0x10</text:span><text:span text:style-name="T20">0</text:span></text:p>
          </draw:text-box>
        </draw:frame>
        <draw:frame draw:style-name="gr761" draw:text-style-name="P34" draw:layer="layout" svg:width="6.124cm" svg:height="0.962cm" svg:x="5.699cm" svg:y="1.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2" draw:text-style-name="P71" draw:layer="layout" svg:width="1.999cm" svg:height="2.999cm" svg:x="14.999cm" svg:y="4.5cm" svg:viewBox="0 0 2000 3000" draw:points="0,0 0,1100 400,1500 0,1900 0,3000 2000,2000 2000,1000">
            <text:p/>
          </draw:polygon>
          <draw:frame draw:style-name="gr763" draw:text-style-name="P62" draw:layer="layout" svg:width="1.466cm" svg:height="0.806cm" svg:x="15.399cm" svg:y="5.594cm">
            <draw:text-box>
              <text:p><text:span text:style-name="T20">ALU</text:span></text:p>
            </draw:text-box>
          </draw:frame>
        </draw:g>
        <draw:g draw:style-name="gr1">
          <draw:g draw:style-name="gr1">
            <draw:custom-shape draw:style-name="gr764" draw:text-style-name="P14" draw:layer="layout" svg:width="1cm" svg:height="2cm" svg:x="6.999cm" svg:y="5cm">
              <text:p/>
              <draw:enhanced-geometry svg:viewBox="0 0 21600 21600" draw:type="rectangle" draw:enhanced-path="M 0 0 L 21600 0 21600 21600 0 21600 0 0 Z N"/>
            </draw:custom-shape>
            <draw:custom-shape draw:style-name="gr76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5.597cm">
              <draw:text-box>
                <text:p><text:span text:style-name="T20">IM</text:span></text:p>
              </draw:text-box>
            </draw:frame>
          </draw:g>
        </draw:g>
        <draw:g draw:style-name="gr1">
          <draw:g draw:style-name="gr1">
            <draw:custom-shape draw:style-name="gr767" draw:text-style-name="P14" draw:layer="layout" svg:width="1cm" svg:height="2cm" svg:x="10.999cm" svg:y="5cm">
              <text:p/>
              <draw:enhanced-geometry svg:viewBox="0 0 21600 21600" draw:type="rectangle" draw:enhanced-path="M 0 0 L 21600 0 21600 21600 0 21600 0 0 Z N"/>
            </draw:custom-shape>
            <draw:custom-shape draw:style-name="gr76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5.597cm">
              <draw:text-box>
                <text:p><text:span text:style-name="T20">Reg</text:span></text:p>
              </draw:text-box>
            </draw:frame>
          </draw:g>
        </draw:g>
        <draw:g draw:style-name="gr1">
          <draw:g draw:style-name="gr1">
            <draw:custom-shape draw:style-name="gr76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2" draw:text-style-name="P71" draw:layer="layout" svg:width="1.999cm" svg:height="2.999cm" svg:x="18.999cm" svg:y="7.5cm" svg:viewBox="0 0 2000 3000" draw:points="0,0 0,1100 400,1500 0,1900 0,3000 2000,2000 2000,1000">
            <text:p/>
          </draw:polygon>
          <draw:frame draw:style-name="gr763" draw:text-style-name="P62" draw:layer="layout" svg:width="1.466cm" svg:height="0.806cm" svg:x="19.399cm" svg:y="8.594cm">
            <draw:text-box>
              <text:p><text:span text:style-name="T20">ALU</text:span></text:p>
            </draw:text-box>
          </draw:frame>
        </draw:g>
        <draw:g draw:style-name="gr1">
          <draw:g draw:style-name="gr1">
            <draw:custom-shape draw:style-name="gr764" draw:text-style-name="P14" draw:layer="layout" svg:width="1cm" svg:height="2cm" svg:x="10.999cm" svg:y="8cm">
              <text:p/>
              <draw:enhanced-geometry svg:viewBox="0 0 21600 21600" draw:type="rectangle" draw:enhanced-path="M 0 0 L 21600 0 21600 21600 0 21600 0 0 Z N"/>
            </draw:custom-shape>
            <draw:custom-shape draw:style-name="gr76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8.597cm">
              <draw:text-box>
                <text:p><text:span text:style-name="T20">IM</text:span></text:p>
              </draw:text-box>
            </draw:frame>
          </draw:g>
        </draw:g>
        <draw:g draw:style-name="gr1">
          <draw:g draw:style-name="gr1">
            <draw:custom-shape draw:style-name="gr767" draw:text-style-name="P14" draw:layer="layout" svg:width="1cm" svg:height="2cm" svg:x="14.999cm" svg:y="8cm">
              <text:p/>
              <draw:enhanced-geometry svg:viewBox="0 0 21600 21600" draw:type="rectangle" draw:enhanced-path="M 0 0 L 21600 0 21600 21600 0 21600 0 0 Z N"/>
            </draw:custom-shape>
            <draw:custom-shape draw:style-name="gr76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8.597cm">
              <draw:text-box>
                <text:p><text:span text:style-name="T20">REG</text:span></text:p>
              </draw:text-box>
            </draw:frame>
          </draw:g>
        </draw:g>
        <draw:g draw:style-name="gr1">
          <draw:g draw:style-name="gr1">
            <draw:custom-shape draw:style-name="gr76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6" draw:text-style-name="P62"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1" draw:text-style-name="P4" draw:layer="layout" svg:x1="9.999cm" svg:y1="4cm" svg:x2="9.999cm" svg:y2="20cm">
          <text:p/>
        </draw:line>
        <draw:line draw:style-name="gr771" draw:text-style-name="P4" draw:layer="layout" svg:x1="13.999cm" svg:y1="4cm" svg:x2="13.999cm" svg:y2="20cm">
          <text:p/>
        </draw:line>
        <draw:line draw:style-name="gr771" draw:text-style-name="P4" draw:layer="layout" svg:x1="17.999cm" svg:y1="4cm" svg:x2="17.999cm" svg:y2="20cm">
          <text:p/>
        </draw:line>
        <draw:line draw:style-name="gr771" draw:text-style-name="P4" draw:layer="layout" svg:x1="21.999cm" svg:y1="4cm" svg:x2="21.999cm" svg:y2="20cm">
          <text:p/>
        </draw:line>
        <draw:line draw:style-name="gr771" draw:text-style-name="P4" draw:layer="layout" svg:x1="25.999cm" svg:y1="4cm" svg:x2="25.999cm" svg:y2="20cm">
          <text:p/>
        </draw:line>
        <draw:line draw:style-name="gr771" draw:text-style-name="P4" draw:layer="layout" svg:x1="29.999cm" svg:y1="4cm" svg:x2="29.999cm" svg:y2="20cm">
          <text:p/>
        </draw:line>
        <draw:line draw:style-name="gr771" draw:text-style-name="P4" draw:layer="layout" svg:x1="33.999cm" svg:y1="4cm" svg:x2="33.999cm" svg:y2="20cm">
          <text:p/>
        </draw:line>
        <draw:frame draw:style-name="gr772" draw:text-style-name="P3" draw:layer="layout" svg:width="1.949cm" svg:height="0.962cm" svg:x="7.053cm" svg:y="2cm">
          <draw:text-box>
            <text:p>CC 1</text:p>
          </draw:text-box>
        </draw:frame>
        <draw:frame draw:style-name="gr772" draw:text-style-name="P3" draw:layer="layout" svg:width="1.949cm" svg:height="0.962cm" svg:x="11.053cm" svg:y="2cm">
          <draw:text-box>
            <text:p>CC 2</text:p>
          </draw:text-box>
        </draw:frame>
        <draw:frame draw:style-name="gr772" draw:text-style-name="P3" draw:layer="layout" svg:width="1.949cm" svg:height="0.962cm" svg:x="15.053cm" svg:y="2cm">
          <draw:text-box>
            <text:p>CC 3</text:p>
          </draw:text-box>
        </draw:frame>
        <draw:frame draw:style-name="gr772" draw:text-style-name="P3" draw:layer="layout" svg:width="1.949cm" svg:height="0.962cm" svg:x="23.053cm" svg:y="2cm">
          <draw:text-box>
            <text:p>CC 5</text:p>
          </draw:text-box>
        </draw:frame>
        <draw:frame draw:style-name="gr772" draw:text-style-name="P3" draw:layer="layout" svg:width="1.949cm" svg:height="0.962cm" svg:x="27.053cm" svg:y="2cm">
          <draw:text-box>
            <text:p>CC 6</text:p>
          </draw:text-box>
        </draw:frame>
        <draw:frame draw:style-name="gr772" draw:text-style-name="P3" draw:layer="layout" svg:width="1.949cm" svg:height="0.962cm" svg:x="31.053cm" svg:y="2cm">
          <draw:text-box>
            <text:p>CC 7</text:p>
          </draw:text-box>
        </draw:frame>
        <draw:frame draw:style-name="gr772" draw:text-style-name="P3" draw:layer="layout" svg:width="1.949cm" svg:height="0.962cm" svg:x="18.999cm" svg:y="2cm">
          <draw:text-box>
            <text:p>CC 4</text:p>
          </draw:text-box>
        </draw:frame>
        <draw:g draw:style-name="gr1">
          <draw:g draw:style-name="gr1">
            <draw:custom-shape draw:style-name="gr764" draw:text-style-name="P72"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5.599cm">
            <draw:text-box>
              <text:p><text:span text:style-name="T20">DM</text:span></text:p>
            </draw:text-box>
          </draw:frame>
        </draw:g>
        <draw:line draw:style-name="gr797" draw:text-style-name="P4" draw:layer="layout" svg:x1="18.499cm" svg:y1="6cm" svg:x2="18.499cm" svg:y2="7.2cm">
          <text:p/>
        </draw:line>
        <draw:line draw:style-name="gr797" draw:text-style-name="P4" draw:layer="layout" svg:x1="18.499cm" svg:y1="7.2cm" svg:x2="21.499cm" svg:y2="7.2cm">
          <text:p/>
        </draw:line>
        <draw:line draw:style-name="gr797" draw:text-style-name="P4" draw:layer="layout" svg:x1="21.499cm" svg:y1="7.2cm" svg:x2="21.999cm" svg:y2="6cm">
          <text:p/>
        </draw:line>
        <draw:g draw:style-name="gr1">
          <draw:g draw:style-name="gr1">
            <draw:custom-shape draw:style-name="gr764" draw:text-style-name="P72"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8.599cm">
            <draw:text-box>
              <text:p><text:span text:style-name="T20">DM</text:span></text:p>
            </draw:text-box>
          </draw:frame>
        </draw:g>
        <draw:line draw:style-name="gr797" draw:text-style-name="P4" draw:layer="layout" svg:x1="22.499cm" svg:y1="9cm" svg:x2="22.499cm" svg:y2="10.2cm">
          <text:p/>
        </draw:line>
        <draw:line draw:style-name="gr797" draw:text-style-name="P4" draw:layer="layout" svg:x1="22.499cm" svg:y1="10.2cm" svg:x2="25.499cm" svg:y2="10.2cm">
          <text:p/>
        </draw:line>
        <draw:line draw:style-name="gr797" draw:text-style-name="P4" draw:layer="layout" svg:x1="25.499cm" svg:y1="10.2cm" svg:x2="25.999cm" svg:y2="9cm">
          <text:p/>
        </draw:line>
        <draw:g draw:style-name="gr66">
          <draw:polygon draw:style-name="gr762" draw:text-style-name="P71" draw:layer="layout" svg:width="1.999cm" svg:height="2.999cm" svg:x="22.999cm" svg:y="10.5cm" svg:viewBox="0 0 2000 3000" draw:points="0,0 0,1100 400,1500 0,1900 0,3000 2000,2000 2000,1000">
            <text:p/>
          </draw:polygon>
          <draw:frame draw:style-name="gr763" draw:text-style-name="P62" draw:layer="layout" svg:width="1.466cm" svg:height="0.806cm" svg:x="23.399cm" svg:y="11.594cm">
            <draw:text-box>
              <text:p><text:span text:style-name="T20">ALU</text:span></text:p>
            </draw:text-box>
          </draw:frame>
        </draw:g>
        <draw:g draw:style-name="gr1">
          <draw:g draw:style-name="gr1">
            <draw:custom-shape draw:style-name="gr764" draw:text-style-name="P14" draw:layer="layout" svg:width="1cm" svg:height="2cm" svg:x="14.999cm" svg:y="11cm">
              <text:p/>
              <draw:enhanced-geometry svg:viewBox="0 0 21600 21600" draw:type="rectangle" draw:enhanced-path="M 0 0 L 21600 0 21600 21600 0 21600 0 0 Z N"/>
            </draw:custom-shape>
            <draw:custom-shape draw:style-name="gr76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1.597cm">
              <draw:text-box>
                <text:p><text:span text:style-name="T20">IM</text:span></text:p>
              </draw:text-box>
            </draw:frame>
          </draw:g>
        </draw:g>
        <draw:g draw:style-name="gr1">
          <draw:g draw:style-name="gr1">
            <draw:custom-shape draw:style-name="gr767" draw:text-style-name="P14" draw:layer="layout" svg:width="1cm" svg:height="2cm" svg:x="18.999cm" svg:y="11cm">
              <text:p/>
              <draw:enhanced-geometry svg:viewBox="0 0 21600 21600" draw:type="rectangle" draw:enhanced-path="M 0 0 L 21600 0 21600 21600 0 21600 0 0 Z N"/>
            </draw:custom-shape>
            <draw:custom-shape draw:style-name="gr76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1.597cm">
              <draw:text-box>
                <text:p><text:span text:style-name="T20">REG</text:span></text:p>
              </draw:text-box>
            </draw:frame>
          </draw:g>
        </draw:g>
        <draw:g draw:style-name="gr1">
          <draw:g draw:style-name="gr1">
            <draw:custom-shape draw:style-name="gr76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4" draw:text-style-name="P72"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771" draw:text-style-name="P4" draw:layer="layout" svg:x1="37.999cm" svg:y1="4cm" svg:x2="37.999cm" svg:y2="20cm">
          <text:p/>
        </draw:line>
        <draw:g draw:style-name="gr66">
          <draw:polygon draw:style-name="gr762" draw:text-style-name="P71" draw:layer="layout" svg:width="1.999cm" svg:height="2.999cm" svg:x="26.999cm" svg:y="13.5cm" svg:viewBox="0 0 2000 3000" draw:points="0,0 0,1100 400,1500 0,1900 0,3000 2000,2000 2000,1000">
            <text:p/>
          </draw:polygon>
          <draw:frame draw:style-name="gr763" draw:text-style-name="P62" draw:layer="layout" svg:width="1.466cm" svg:height="0.806cm" svg:x="27.399cm" svg:y="14.594cm">
            <draw:text-box>
              <text:p><text:span text:style-name="T20">ALU</text:span></text:p>
            </draw:text-box>
          </draw:frame>
        </draw:g>
        <draw:g draw:style-name="gr1">
          <draw:g draw:style-name="gr1">
            <draw:custom-shape draw:style-name="gr764" draw:text-style-name="P14" draw:layer="layout" svg:width="1cm" svg:height="2cm" svg:x="18.999cm" svg:y="14cm">
              <text:p/>
              <draw:enhanced-geometry svg:viewBox="0 0 21600 21600" draw:type="rectangle" draw:enhanced-path="M 0 0 L 21600 0 21600 21600 0 21600 0 0 Z N"/>
            </draw:custom-shape>
            <draw:custom-shape draw:style-name="gr76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4.597cm">
              <draw:text-box>
                <text:p><text:span text:style-name="T20">IM</text:span></text:p>
              </draw:text-box>
            </draw:frame>
          </draw:g>
        </draw:g>
        <draw:g draw:style-name="gr1">
          <draw:g draw:style-name="gr1">
            <draw:custom-shape draw:style-name="gr767" draw:text-style-name="P14" draw:layer="layout" svg:width="1cm" svg:height="2cm" svg:x="22.999cm" svg:y="14cm">
              <text:p/>
              <draw:enhanced-geometry svg:viewBox="0 0 21600 21600" draw:type="rectangle" draw:enhanced-path="M 0 0 L 21600 0 21600 21600 0 21600 0 0 Z N"/>
            </draw:custom-shape>
            <draw:custom-shape draw:style-name="gr76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4.597cm">
              <draw:text-box>
                <text:p><text:span text:style-name="T20">REG</text:span></text:p>
              </draw:text-box>
            </draw:frame>
          </draw:g>
        </draw:g>
        <draw:g draw:style-name="gr1">
          <draw:g draw:style-name="gr1">
            <draw:custom-shape draw:style-name="gr76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4" draw:text-style-name="P72"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2" draw:text-style-name="P71" draw:layer="layout" svg:width="1.999cm" svg:height="2.999cm" svg:x="30.999cm" svg:y="16.5cm" svg:viewBox="0 0 2000 3000" draw:points="0,0 0,1100 400,1500 0,1900 0,3000 2000,2000 2000,1000">
            <text:p/>
          </draw:polygon>
          <draw:frame draw:style-name="gr763" draw:text-style-name="P62" draw:layer="layout" svg:width="1.466cm" svg:height="0.806cm" svg:x="31.399cm" svg:y="17.594cm">
            <draw:text-box>
              <text:p><text:span text:style-name="T20">ALU</text:span></text:p>
            </draw:text-box>
          </draw:frame>
        </draw:g>
        <draw:g draw:style-name="gr1">
          <draw:g draw:style-name="gr1">
            <draw:custom-shape draw:style-name="gr764" draw:text-style-name="P14" draw:layer="layout" svg:width="1cm" svg:height="2cm" svg:x="22.999cm" svg:y="17cm">
              <text:p/>
              <draw:enhanced-geometry svg:viewBox="0 0 21600 21600" draw:type="rectangle" draw:enhanced-path="M 0 0 L 21600 0 21600 21600 0 21600 0 0 Z N"/>
            </draw:custom-shape>
            <draw:custom-shape draw:style-name="gr76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7.597cm">
              <draw:text-box>
                <text:p><text:span text:style-name="T20">IM</text:span></text:p>
              </draw:text-box>
            </draw:frame>
          </draw:g>
        </draw:g>
        <draw:g draw:style-name="gr1">
          <draw:g draw:style-name="gr1">
            <draw:custom-shape draw:style-name="gr767" draw:text-style-name="P14" draw:layer="layout" svg:width="1cm" svg:height="2cm" svg:x="26.999cm" svg:y="17cm">
              <text:p/>
              <draw:enhanced-geometry svg:viewBox="0 0 21600 21600" draw:type="rectangle" draw:enhanced-path="M 0 0 L 21600 0 21600 21600 0 21600 0 0 Z N"/>
            </draw:custom-shape>
            <draw:custom-shape draw:style-name="gr76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7.597cm">
              <draw:text-box>
                <text:p><text:span text:style-name="T20">REG</text:span></text:p>
              </draw:text-box>
            </draw:frame>
          </draw:g>
        </draw:g>
        <draw:g draw:style-name="gr1">
          <draw:g draw:style-name="gr1">
            <draw:custom-shape draw:style-name="gr76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4" draw:text-style-name="P72"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29cm" svg:y="6.1cm">
          <draw:text-box>
            <text:p><text:span text:style-name="T27">x2</text:span></text:p>
          </draw:text-box>
        </draw:frame>
        <draw:frame draw:style-name="gr798" draw:text-style-name="P75" draw:layer="layout" svg:width="2.479cm" svg:height="0.569cm" svg:x="9.8cm" svg:y="3.901cm">
          <draw:text-box>
            <text:p><text:span text:style-name="T28">if_id_reg_</text:span><text:span text:style-name="T28">rd=2</text:span></text:p>
          </draw:text-box>
        </draw:frame>
        <draw:frame draw:style-name="gr799" draw:text-style-name="P75" draw:layer="layout" svg:width="2.465cm" svg:height="0.569cm" svg:x="9.8cm" svg:y="4.231cm">
          <draw:text-box>
            <text:p><text:span text:style-name="T28">if_id_reg_</text:span><text:span text:style-name="T28">rs1=0</text:span></text:p>
          </draw:text-box>
        </draw:frame>
        <draw:frame draw:style-name="gr800" draw:text-style-name="P75" draw:layer="layout" svg:width="2.462cm" svg:height="0.569cm" svg:x="9.8cm" svg:y="4.532cm">
          <draw:text-box>
            <text:p><text:span text:style-name="T28">if_id_reg_</text:span><text:span text:style-name="T28">rs2=-</text:span></text:p>
          </draw:text-box>
        </draw:frame>
        <draw:frame draw:style-name="gr798" draw:text-style-name="P75" draw:layer="layout" svg:width="2.479cm" svg:height="0.569cm" svg:x="13.801cm" svg:y="6.901cm">
          <draw:text-box>
            <text:p><text:span text:style-name="T28">if_id_reg_</text:span><text:span text:style-name="T28">rd=2</text:span></text:p>
          </draw:text-box>
        </draw:frame>
        <draw:frame draw:style-name="gr799" draw:text-style-name="P75" draw:layer="layout" svg:width="2.465cm" svg:height="0.569cm" svg:x="13.801cm" svg:y="7.231cm">
          <draw:text-box>
            <text:p><text:span text:style-name="T28">if_id_reg_</text:span><text:span text:style-name="T28">rs1=2</text:span></text:p>
          </draw:text-box>
        </draw:frame>
        <draw:frame draw:style-name="gr800" draw:text-style-name="P75" draw:layer="layout" svg:width="2.462cm" svg:height="0.569cm" svg:x="13.801cm" svg:y="7.532cm">
          <draw:text-box>
            <text:p><text:span text:style-name="T28">if_id_reg_</text:span><text:span text:style-name="T28">rs2=-</text:span></text:p>
          </draw:text-box>
        </draw:frame>
        <draw:frame draw:style-name="gr801" draw:text-style-name="P75" draw:layer="layout" svg:width="2.481cm" svg:height="0.569cm" svg:x="13.801cm" svg:y="3.901cm">
          <draw:text-box>
            <text:p><text:span text:style-name="T28">id_ex_reg</text:span><text:span text:style-name="T28">_rd=2</text:span></text:p>
          </draw:text-box>
        </draw:frame>
        <draw:frame draw:style-name="gr802" draw:text-style-name="P75" draw:layer="layout" svg:width="2.623cm" svg:height="0.569cm" svg:x="13.801cm" svg:y="4.231cm">
          <draw:text-box>
            <text:p><text:span text:style-name="T28">id_ex_reg</text:span><text:span text:style-name="T28">_rs1=0</text:span></text:p>
          </draw:text-box>
        </draw:frame>
        <draw:frame draw:style-name="gr803" draw:text-style-name="P75" draw:layer="layout" svg:width="2.56cm" svg:height="0.569cm" svg:x="13.801cm" svg:y="4.532cm">
          <draw:text-box>
            <text:p><text:span text:style-name="T28">id_ex_reg</text:span><text:span text:style-name="T28">_rs2=-</text:span></text:p>
          </draw:text-box>
        </draw:frame>
        <draw:frame draw:style-name="gr804" draw:text-style-name="P70" draw:layer="layout" svg:width="2.891cm" svg:height="0.569cm" svg:x="17.802cm" svg:y="3.901cm">
          <draw:text-box>
            <text:p><text:span text:style-name="T23">ex_mem_</text:span><text:span text:style-name="T23">reg_rd=2</text:span></text:p>
          </draw:text-box>
        </draw:frame>
        <draw:frame draw:style-name="gr805" draw:text-style-name="P75" draw:layer="layout" svg:width="3.032cm" svg:height="0.569cm" svg:x="17.802cm" svg:y="4.231cm">
          <draw:text-box>
            <text:p><text:span text:style-name="T28">ex_mem_</text:span><text:span text:style-name="T28">reg_rs1=0</text:span></text:p>
          </draw:text-box>
        </draw:frame>
        <draw:frame draw:style-name="gr806" draw:text-style-name="P75" draw:layer="layout" svg:width="2.969cm" svg:height="0.569cm" svg:x="17.802cm" svg:y="4.532cm">
          <draw:text-box>
            <text:p><text:span text:style-name="T28">ex_mem_</text:span><text:span text:style-name="T28">reg_rs2=-</text:span></text:p>
          </draw:text-box>
        </draw:frame>
        <draw:frame draw:style-name="gr807" draw:text-style-name="P75" draw:layer="layout" svg:width="2.954cm" svg:height="0.569cm" svg:x="21.803cm" svg:y="3.901cm">
          <draw:text-box>
            <text:p><text:span text:style-name="T28">mem_wb</text:span><text:span text:style-name="T28">_reg_rd=</text:span><text:span text:style-name="T28">2</text:span></text:p>
          </draw:text-box>
        </draw:frame>
        <draw:frame draw:style-name="gr808" draw:text-style-name="P75" draw:layer="layout" svg:width="3.095cm" svg:height="0.569cm" svg:x="21.803cm" svg:y="4.231cm">
          <draw:text-box>
            <text:p><text:span text:style-name="T28">mem_wb</text:span><text:span text:style-name="T28">_reg_rs1=</text:span><text:span text:style-name="T28">0</text:span></text:p>
          </draw:text-box>
        </draw:frame>
        <draw:frame draw:style-name="gr805" draw:text-style-name="P75" draw:layer="layout" svg:width="3.032cm" svg:height="0.569cm" svg:x="21.803cm" svg:y="4.532cm">
          <draw:text-box>
            <text:p><text:span text:style-name="T28">mem_wb</text:span><text:span text:style-name="T28">_reg_rs2=</text:span><text:span text:style-name="T28">-</text:span></text:p>
          </draw:text-box>
        </draw:frame>
        <draw:frame draw:style-name="gr801" draw:text-style-name="P75" draw:layer="layout" svg:width="2.481cm" svg:height="0.569cm" svg:x="17.802cm" svg:y="6.901cm">
          <draw:text-box>
            <text:p><text:span text:style-name="T28">id_ex_reg</text:span><text:span text:style-name="T28">_rd=2</text:span></text:p>
          </draw:text-box>
        </draw:frame>
        <draw:frame draw:style-name="gr802" draw:text-style-name="P70" draw:layer="layout" svg:width="2.623cm" svg:height="0.569cm" svg:x="17.802cm" svg:y="7.231cm">
          <draw:text-box>
            <text:p><text:span text:style-name="T23">id_ex_reg</text:span><text:span text:style-name="T23">_rs1=2</text:span></text:p>
          </draw:text-box>
        </draw:frame>
        <draw:frame draw:style-name="gr803" draw:text-style-name="P75" draw:layer="layout" svg:width="2.56cm" svg:height="0.569cm" svg:x="17.802cm" svg:y="7.532cm">
          <draw:text-box>
            <text:p><text:span text:style-name="T28">id_ex_reg</text:span><text:span text:style-name="T28">_rs2=-</text:span></text:p>
          </draw:text-box>
        </draw:frame>
        <draw:frame draw:style-name="gr804" draw:text-style-name="P70" draw:layer="layout" svg:width="2.891cm" svg:height="0.569cm" svg:x="21.803cm" svg:y="6.901cm">
          <draw:text-box>
            <text:p><text:span text:style-name="T23">ex_mem_</text:span><text:span text:style-name="T23">reg_rd=2</text:span></text:p>
          </draw:text-box>
        </draw:frame>
        <draw:frame draw:style-name="gr805" draw:text-style-name="P75" draw:layer="layout" svg:width="3.032cm" svg:height="0.569cm" svg:x="21.803cm" svg:y="7.231cm">
          <draw:text-box>
            <text:p><text:span text:style-name="T28">ex_mem_</text:span><text:span text:style-name="T28">reg_rs1=2</text:span></text:p>
          </draw:text-box>
        </draw:frame>
        <draw:frame draw:style-name="gr806" draw:text-style-name="P75" draw:layer="layout" svg:width="2.969cm" svg:height="0.569cm" svg:x="21.803cm" svg:y="7.532cm">
          <draw:text-box>
            <text:p><text:span text:style-name="T28">ex_mem_</text:span><text:span text:style-name="T28">reg_rs2=-</text:span></text:p>
          </draw:text-box>
        </draw:frame>
        <draw:frame draw:style-name="gr807" draw:text-style-name="P75" draw:layer="layout" svg:width="2.954cm" svg:height="0.569cm" svg:x="25.804cm" svg:y="6.901cm">
          <draw:text-box>
            <text:p><text:span text:style-name="T28">mem_wb</text:span><text:span text:style-name="T28">_reg_rd=</text:span><text:span text:style-name="T28">2</text:span></text:p>
          </draw:text-box>
        </draw:frame>
        <draw:frame draw:style-name="gr808" draw:text-style-name="P75" draw:layer="layout" svg:width="3.095cm" svg:height="0.569cm" svg:x="25.804cm" svg:y="7.231cm">
          <draw:text-box>
            <text:p><text:span text:style-name="T28">mem_wb</text:span><text:span text:style-name="T28">_reg_rs1=</text:span><text:span text:style-name="T28">2</text:span></text:p>
          </draw:text-box>
        </draw:frame>
        <draw:frame draw:style-name="gr805" draw:text-style-name="P75" draw:layer="layout" svg:width="3.032cm" svg:height="0.569cm" svg:x="25.804cm" svg:y="7.532cm">
          <draw:text-box>
            <text:p><text:span text:style-name="T28">mem_wb</text:span><text:span text:style-name="T28">_reg_rs2=</text:span><text:span text:style-name="T28">-</text:span></text:p>
          </draw:text-box>
        </draw:frame>
        <draw:frame draw:style-name="gr809" draw:text-style-name="P70" draw:layer="layout" svg:width="2.087cm" svg:height="0.569cm" svg:x="16.762cm" svg:y="5.5cm">
          <draw:text-box>
            <text:p><text:span text:style-name="T23">forward_a</text:span><text:span text:style-name="T23">=2</text:span></text:p>
          </draw:text-box>
        </draw:frame>
        <draw:line draw:style-name="gr810" draw:text-style-name="P4" draw:layer="layout" svg:x1="23.601cm" svg:y1="6.843cm" svg:x2="16cm" svg:y2="8.44cm">
          <text:p/>
        </draw:line>
        <draw:line draw:style-name="gr787" draw:text-style-name="P4" draw:layer="layout" svg:x1="18.138cm" svg:y1="6cm" svg:x2="18.738cm" svg:y2="8.5cm">
          <text:p/>
        </draw:line>
        <draw:frame draw:style-name="gr811" draw:text-style-name="P70" draw:layer="layout" svg:width="5.949cm" svg:height="0.569cm" svg:x="16.063cm" svg:y="5.201cm">
          <draw:text-box>
            <text:p><text:span text:style-name="T23">forward_a</text:span><text:span text:style-name="T23">_mux_out</text:span><text:span text:style-name="T23">_s = </text:span><text:span text:style-name="T23">alu_result</text:span><text:span text:style-name="T23">_mem_s</text:span></text:p>
          </draw:text-box>
        </draw:frame>
        <draw:frame draw:style-name="gr812" draw:text-style-name="P75" draw:layer="layout" svg:width="2.051cm" svg:height="0.569cm" svg:x="22.948cm" svg:y="5.3cm">
          <draw:text-box>
            <text:p><text:span text:style-name="T28">x2=0x100</text:span></text:p>
          </draw:text-box>
        </draw:frame>
        <draw:frame draw:style-name="gr813" draw:text-style-name="P75" draw:layer="layout" svg:width="2.291cm" svg:height="0.569cm" svg:x="12.2cm" svg:y="6.1cm">
          <draw:text-box>
            <text:p><text:span text:style-name="T28">imm_d=0</text:span><text:span text:style-name="T28">x100</text:span></text:p>
          </draw:text-box>
        </draw:frame>
        <draw:frame draw:style-name="gr812" draw:text-style-name="P75" draw:layer="layout" svg:width="2.051cm" svg:height="0.569cm" svg:x="12.301cm" svg:y="5.101cm">
          <draw:text-box>
            <text:p><text:span text:style-name="T28">reg_a=0</text:span></text:p>
          </draw:text-box>
        </draw:frame>
        <draw:frame draw:style-name="gr814" draw:text-style-name="P75" draw:layer="layout" svg:width="2.67cm" svg:height="0.569cm" svg:x="15.33cm" svg:y="6.031cm">
          <draw:text-box>
            <text:p><text:span text:style-name="T28">alu_result</text:span><text:span text:style-name="T28">=0x100</text:span></text:p>
          </draw:text-box>
        </draw:frame>
        <draw:frame draw:style-name="gr812" draw:text-style-name="P75" draw:layer="layout" svg:width="2.051cm" svg:height="0.569cm" svg:x="14.949cm" svg:y="8.301cm">
          <draw:text-box>
            <text:p><text:span text:style-name="T28">x2=0x???</text:span></text:p>
          </draw:text-box>
        </draw:frame>
        <draw:frame draw:style-name="gr812" draw:text-style-name="P75" draw:layer="layout" svg:width="2.051cm" svg:height="0.569cm" svg:x="16.2cm" svg:y="9.1cm">
          <draw:text-box>
            <text:p><text:span text:style-name="T28">imm_d=8</text:span></text:p>
          </draw:text-box>
        </draw:frame>
        <draw:frame draw:style-name="gr812" draw:text-style-name="P75" draw:layer="layout" svg:width="2.051cm" svg:height="0.569cm" svg:x="16.301cm" svg:y="8.101cm">
          <draw:text-box>
            <text:p><text:span text:style-name="T28">reg_a=??</text:span></text:p>
          </draw:text-box>
        </draw:frame>
        <draw:frame draw:style-name="gr815" draw:text-style-name="P75" draw:layer="layout" svg:width="2.986cm" svg:height="0.569cm" svg:x="19.031cm" svg:y="9.032cm">
          <draw:text-box>
            <text:p><text:span text:style-name="T28">alu_result</text:span><text:span text:style-name="T28">=0x10000</text:span></text:p>
          </draw:text-box>
        </draw:frame>
        <draw:frame draw:style-name="gr816" draw:text-style-name="P75" draw:layer="layout" svg:width="2.055cm" svg:height="0.569cm" svg:x="26.949cm" svg:y="8.301cm">
          <draw:text-box>
            <text:p><text:span text:style-name="T28">x2=0x100</text:span><text:span text:style-name="T28">00</text:span></text:p>
          </draw:text-box>
        </draw:frame>
        <draw:frame draw:style-name="gr796" draw:text-style-name="P62" draw:layer="layout" svg:width="3.855cm" svg:height="0.806cm" svg:x="1.01cm" svg:y="11.6cm">
          <draw:text-box>
            <text:p><text:span text:style-name="T20">ld x3, </text:span><text:span text:style-name="T20">0(</text:span><text:span text:style-name="T24">x2</text:span><text:span text:style-name="T20">)</text:span></text:p>
          </draw:text-box>
        </draw:frame>
        <draw:frame draw:style-name="gr798" draw:text-style-name="P75" draw:layer="layout" svg:width="2.479cm" svg:height="0.569cm" svg:x="17.801cm" svg:y="9.902cm">
          <draw:text-box>
            <text:p><text:span text:style-name="T28">if_id_reg_</text:span><text:span text:style-name="T28">rd=3</text:span></text:p>
          </draw:text-box>
        </draw:frame>
        <draw:frame draw:style-name="gr799" draw:text-style-name="P75" draw:layer="layout" svg:width="2.465cm" svg:height="0.569cm" svg:x="17.801cm" svg:y="10.232cm">
          <draw:text-box>
            <text:p><text:span text:style-name="T28">if_id_reg_</text:span><text:span text:style-name="T28">rs1=2</text:span></text:p>
          </draw:text-box>
        </draw:frame>
        <draw:frame draw:style-name="gr800" draw:text-style-name="P75" draw:layer="layout" svg:width="2.462cm" svg:height="0.569cm" svg:x="17.801cm" svg:y="10.533cm">
          <draw:text-box>
            <text:p><text:span text:style-name="T28">if_id_reg_</text:span><text:span text:style-name="T28">rs2=-</text:span></text:p>
          </draw:text-box>
        </draw:frame>
        <draw:frame draw:style-name="gr801" draw:text-style-name="P75" draw:layer="layout" svg:width="2.481cm" svg:height="0.569cm" svg:x="21.802cm" svg:y="9.902cm">
          <draw:text-box>
            <text:p><text:span text:style-name="T28">id_ex_reg</text:span><text:span text:style-name="T28">_rd=3</text:span></text:p>
          </draw:text-box>
        </draw:frame>
        <draw:frame draw:style-name="gr802" draw:text-style-name="P70" draw:layer="layout" svg:width="2.623cm" svg:height="0.569cm" svg:x="21.802cm" svg:y="10.232cm">
          <draw:text-box>
            <text:p><text:span text:style-name="T23">id_ex_reg</text:span><text:span text:style-name="T23">_rs1=2</text:span></text:p>
          </draw:text-box>
        </draw:frame>
        <draw:frame draw:style-name="gr803" draw:text-style-name="P75" draw:layer="layout" svg:width="2.56cm" svg:height="0.569cm" svg:x="21.802cm" svg:y="10.533cm">
          <draw:text-box>
            <text:p><text:span text:style-name="T28">id_ex_reg</text:span><text:span text:style-name="T28">_rs2=-</text:span></text:p>
          </draw:text-box>
        </draw:frame>
        <draw:frame draw:style-name="gr804" draw:text-style-name="P75" draw:layer="layout" svg:width="2.891cm" svg:height="0.569cm" svg:x="25.803cm" svg:y="9.902cm">
          <draw:text-box>
            <text:p><text:span text:style-name="T28">ex_mem_</text:span><text:span text:style-name="T28">reg_rd=3</text:span></text:p>
          </draw:text-box>
        </draw:frame>
        <draw:frame draw:style-name="gr805" draw:text-style-name="P75" draw:layer="layout" svg:width="3.032cm" svg:height="0.569cm" svg:x="25.803cm" svg:y="10.232cm">
          <draw:text-box>
            <text:p><text:span text:style-name="T28">ex_mem_</text:span><text:span text:style-name="T28">reg_rs1=2</text:span></text:p>
          </draw:text-box>
        </draw:frame>
        <draw:frame draw:style-name="gr806" draw:text-style-name="P75" draw:layer="layout" svg:width="2.969cm" svg:height="0.569cm" svg:x="25.803cm" svg:y="10.533cm">
          <draw:text-box>
            <text:p><text:span text:style-name="T28">ex_mem_</text:span><text:span text:style-name="T28">reg_rs2=-</text:span></text:p>
          </draw:text-box>
        </draw:frame>
        <draw:frame draw:style-name="gr807" draw:text-style-name="P75" draw:layer="layout" svg:width="2.954cm" svg:height="0.569cm" svg:x="29.804cm" svg:y="9.902cm">
          <draw:text-box>
            <text:p><text:span text:style-name="T28">mem_wb</text:span><text:span text:style-name="T28">_reg_rd=</text:span><text:span text:style-name="T28">3</text:span></text:p>
          </draw:text-box>
        </draw:frame>
        <draw:frame draw:style-name="gr808" draw:text-style-name="P75" draw:layer="layout" svg:width="3.095cm" svg:height="0.569cm" svg:x="29.804cm" svg:y="10.232cm">
          <draw:text-box>
            <text:p><text:span text:style-name="T28">mem_wb</text:span><text:span text:style-name="T28">_reg_rs1=</text:span><text:span text:style-name="T28">2</text:span></text:p>
          </draw:text-box>
        </draw:frame>
        <draw:frame draw:style-name="gr805" draw:text-style-name="P75" draw:layer="layout" svg:width="3.032cm" svg:height="0.569cm" svg:x="29.804cm" svg:y="10.533cm">
          <draw:text-box>
            <text:p><text:span text:style-name="T28">mem_wb</text:span><text:span text:style-name="T28">_reg_rs2=</text:span><text:span text:style-name="T28">-</text:span></text:p>
          </draw:text-box>
        </draw:frame>
        <draw:frame draw:style-name="gr812" draw:text-style-name="P75" draw:layer="layout" svg:width="2.051cm" svg:height="0.569cm" svg:x="18.95cm" svg:y="11.302cm">
          <draw:text-box>
            <text:p><text:span text:style-name="T28">x2=0x???</text:span></text:p>
          </draw:text-box>
        </draw:frame>
        <draw:line draw:style-name="gr810" draw:text-style-name="P4" draw:layer="layout" svg:x1="27.627cm" svg:y1="9.783cm" svg:x2="20.026cm" svg:y2="11.38cm">
          <text:p/>
        </draw:line>
        <draw:frame draw:style-name="gr812" draw:text-style-name="P75" draw:layer="layout" svg:width="2.051cm" svg:height="0.569cm" svg:x="20.201cm" svg:y="12.101cm">
          <draw:text-box>
            <text:p><text:span text:style-name="T28">imm_d=0</text:span></text:p>
          </draw:text-box>
        </draw:frame>
        <draw:frame draw:style-name="gr812" draw:text-style-name="P75" draw:layer="layout" svg:width="2.051cm" svg:height="0.569cm" svg:x="20.302cm" svg:y="11.102cm">
          <draw:text-box>
            <text:p><text:span text:style-name="T28">reg_a=??</text:span></text:p>
          </draw:text-box>
        </draw:frame>
        <draw:line draw:style-name="gr787" draw:text-style-name="P4" draw:layer="layout" svg:x1="22.176cm" svg:y1="9cm" svg:x2="22.776cm" svg:y2="11.5cm">
          <text:p/>
        </draw:line>
        <draw:frame draw:style-name="gr809" draw:text-style-name="P70" draw:layer="layout" svg:width="2.087cm" svg:height="0.569cm" svg:x="20.763cm" svg:y="8.501cm">
          <draw:text-box>
            <text:p><text:span text:style-name="T23">forward_a</text:span><text:span text:style-name="T23">=2</text:span></text:p>
          </draw:text-box>
        </draw:frame>
        <draw:frame draw:style-name="gr811" draw:text-style-name="P70" draw:layer="layout" svg:width="5.949cm" svg:height="0.569cm" svg:x="20.063cm" svg:y="8.202cm">
          <draw:text-box>
            <text:p><text:span text:style-name="T23">forward_a</text:span><text:span text:style-name="T23">_mux_out</text:span><text:span text:style-name="T23">_s = </text:span><text:span text:style-name="T23">alu_result</text:span><text:span text:style-name="T23">_mem_s</text:span></text:p>
          </draw:text-box>
        </draw:frame>
        <draw:frame draw:style-name="gr815" draw:text-style-name="P75" draw:layer="layout" svg:width="2.986cm" svg:height="0.569cm" svg:x="23.032cm" svg:y="12.033cm">
          <draw:text-box>
            <text:p><text:span text:style-name="T28">alu_result</text:span><text:span text:style-name="T28">=0x10000</text:span></text:p>
          </draw:text-box>
        </draw:frame>
        <draw:frame draw:style-name="gr817" draw:text-style-name="P75" draw:layer="layout" svg:width="1.07cm" svg:height="0.569cm" svg:x="26.131cm" svg:y="11.6cm">
          <draw:text-box>
            <text:p><text:span text:style-name="T28">addr</text:span></text:p>
          </draw:text-box>
        </draw:frame>
        <draw:frame draw:style-name="gr818" draw:text-style-name="P75" draw:layer="layout" svg:width="2.308cm" svg:height="0.569cm" svg:x="26.795cm" svg:y="11cm">
          <draw:text-box>
            <text:p><text:span text:style-name="T28">M[0x1000</text:span><text:span text:style-name="T28">0]=1</text:span></text:p>
          </draw:text-box>
        </draw:frame>
        <draw:frame draw:style-name="gr819" draw:text-style-name="P75" draw:layer="layout" svg:width="1.574cm" svg:height="0.569cm" svg:x="27.227cm" svg:y="11.231cm">
          <draw:text-box>
            <text:p><text:span text:style-name="T28">GPIO.ID</text:span></text:p>
          </draw:text-box>
        </draw:frame>
        <draw:frame draw:style-name="gr816" draw:text-style-name="P75" draw:layer="layout" svg:width="2.055cm" svg:height="0.569cm" svg:x="30.999cm" svg:y="11.331cm">
          <draw:text-box>
            <text:p><text:span text:style-name="T28">x2=0x100</text:span><text:span text:style-name="T28">00</text:span></text:p>
          </draw:text-box>
        </draw:frame>
        <draw:frame draw:style-name="gr812" draw:text-style-name="P75" draw:layer="layout" svg:width="2.051cm" svg:height="0.569cm" svg:x="31cm" svg:y="12.032cm">
          <draw:text-box>
            <text:p><text:span text:style-name="T28">x3=0x1</text:span></text:p>
          </draw:text-box>
        </draw:frame>
      </draw:page>
      <draw:page draw:name="page17" draw:style-name="dp1" draw:master-page-name="Standard">
        <draw:frame draw:style-name="gr795" draw:text-style-name="P62" draw:layer="layout" svg:width="4.522cm" svg:height="0.806cm" svg:x="1.008cm" svg:y="5.6cm">
          <draw:text-box>
            <text:p><text:span text:style-name="T20">addi </text:span><text:span text:style-name="T24">x2</text:span><text:span text:style-name="T20">, </text:span><text:span text:style-name="T20">x0, </text:span><text:span text:style-name="T20">0x10</text:span><text:span text:style-name="T20">0</text:span></text:p>
          </draw:text-box>
        </draw:frame>
        <draw:frame draw:style-name="gr761" draw:text-style-name="P34" draw:layer="layout" svg:width="6.124cm" svg:height="0.962cm" svg:x="5.699cm" svg:y="1.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2" draw:text-style-name="P71" draw:layer="layout" svg:width="1.999cm" svg:height="2.999cm" svg:x="14.999cm" svg:y="4.5cm" svg:viewBox="0 0 2000 3000" draw:points="0,0 0,1100 400,1500 0,1900 0,3000 2000,2000 2000,1000">
            <text:p/>
          </draw:polygon>
          <draw:frame draw:style-name="gr763" draw:text-style-name="P62" draw:layer="layout" svg:width="1.466cm" svg:height="0.806cm" svg:x="15.399cm" svg:y="5.594cm">
            <draw:text-box>
              <text:p><text:span text:style-name="T20">ALU</text:span></text:p>
            </draw:text-box>
          </draw:frame>
        </draw:g>
        <draw:g draw:style-name="gr1">
          <draw:g draw:style-name="gr1">
            <draw:custom-shape draw:style-name="gr764" draw:text-style-name="P14" draw:layer="layout" svg:width="1cm" svg:height="2cm" svg:x="6.999cm" svg:y="5cm">
              <text:p/>
              <draw:enhanced-geometry svg:viewBox="0 0 21600 21600" draw:type="rectangle" draw:enhanced-path="M 0 0 L 21600 0 21600 21600 0 21600 0 0 Z N"/>
            </draw:custom-shape>
            <draw:custom-shape draw:style-name="gr76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5.597cm">
              <draw:text-box>
                <text:p><text:span text:style-name="T20">IM</text:span></text:p>
              </draw:text-box>
            </draw:frame>
          </draw:g>
        </draw:g>
        <draw:g draw:style-name="gr1">
          <draw:g draw:style-name="gr1">
            <draw:custom-shape draw:style-name="gr767" draw:text-style-name="P14" draw:layer="layout" svg:width="1cm" svg:height="2cm" svg:x="10.999cm" svg:y="5cm">
              <text:p/>
              <draw:enhanced-geometry svg:viewBox="0 0 21600 21600" draw:type="rectangle" draw:enhanced-path="M 0 0 L 21600 0 21600 21600 0 21600 0 0 Z N"/>
            </draw:custom-shape>
            <draw:custom-shape draw:style-name="gr76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5.597cm">
              <draw:text-box>
                <text:p><text:span text:style-name="T20">Reg</text:span></text:p>
              </draw:text-box>
            </draw:frame>
          </draw:g>
        </draw:g>
        <draw:g draw:style-name="gr1">
          <draw:g draw:style-name="gr1">
            <draw:custom-shape draw:style-name="gr76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2" draw:text-style-name="P71" draw:layer="layout" svg:width="1.999cm" svg:height="2.999cm" svg:x="18.999cm" svg:y="7.5cm" svg:viewBox="0 0 2000 3000" draw:points="0,0 0,1100 400,1500 0,1900 0,3000 2000,2000 2000,1000">
            <text:p/>
          </draw:polygon>
          <draw:frame draw:style-name="gr763" draw:text-style-name="P62" draw:layer="layout" svg:width="1.466cm" svg:height="0.806cm" svg:x="19.399cm" svg:y="8.594cm">
            <draw:text-box>
              <text:p><text:span text:style-name="T20">ALU</text:span></text:p>
            </draw:text-box>
          </draw:frame>
        </draw:g>
        <draw:g draw:style-name="gr1">
          <draw:g draw:style-name="gr1">
            <draw:custom-shape draw:style-name="gr764" draw:text-style-name="P14" draw:layer="layout" svg:width="1cm" svg:height="2cm" svg:x="10.999cm" svg:y="8cm">
              <text:p/>
              <draw:enhanced-geometry svg:viewBox="0 0 21600 21600" draw:type="rectangle" draw:enhanced-path="M 0 0 L 21600 0 21600 21600 0 21600 0 0 Z N"/>
            </draw:custom-shape>
            <draw:custom-shape draw:style-name="gr76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8.597cm">
              <draw:text-box>
                <text:p><text:span text:style-name="T20">IM</text:span></text:p>
              </draw:text-box>
            </draw:frame>
          </draw:g>
        </draw:g>
        <draw:g draw:style-name="gr1">
          <draw:g draw:style-name="gr1">
            <draw:custom-shape draw:style-name="gr767" draw:text-style-name="P14" draw:layer="layout" svg:width="1cm" svg:height="2cm" svg:x="14.999cm" svg:y="8cm">
              <text:p/>
              <draw:enhanced-geometry svg:viewBox="0 0 21600 21600" draw:type="rectangle" draw:enhanced-path="M 0 0 L 21600 0 21600 21600 0 21600 0 0 Z N"/>
            </draw:custom-shape>
            <draw:custom-shape draw:style-name="gr76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8.597cm">
              <draw:text-box>
                <text:p><text:span text:style-name="T20">REG</text:span></text:p>
              </draw:text-box>
            </draw:frame>
          </draw:g>
        </draw:g>
        <draw:g draw:style-name="gr1">
          <draw:g draw:style-name="gr1">
            <draw:custom-shape draw:style-name="gr76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6" draw:text-style-name="P62"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1" draw:text-style-name="P4" draw:layer="layout" svg:x1="9.999cm" svg:y1="4cm" svg:x2="9.999cm" svg:y2="20cm">
          <text:p/>
        </draw:line>
        <draw:line draw:style-name="gr771" draw:text-style-name="P4" draw:layer="layout" svg:x1="13.999cm" svg:y1="4cm" svg:x2="13.999cm" svg:y2="20cm">
          <text:p/>
        </draw:line>
        <draw:line draw:style-name="gr771" draw:text-style-name="P4" draw:layer="layout" svg:x1="17.999cm" svg:y1="4cm" svg:x2="17.999cm" svg:y2="20cm">
          <text:p/>
        </draw:line>
        <draw:line draw:style-name="gr771" draw:text-style-name="P4" draw:layer="layout" svg:x1="21.999cm" svg:y1="4cm" svg:x2="21.999cm" svg:y2="20cm">
          <text:p/>
        </draw:line>
        <draw:line draw:style-name="gr771" draw:text-style-name="P4" draw:layer="layout" svg:x1="25.999cm" svg:y1="4cm" svg:x2="25.999cm" svg:y2="20cm">
          <text:p/>
        </draw:line>
        <draw:line draw:style-name="gr771" draw:text-style-name="P4" draw:layer="layout" svg:x1="29.999cm" svg:y1="4cm" svg:x2="29.999cm" svg:y2="20cm">
          <text:p/>
        </draw:line>
        <draw:line draw:style-name="gr771" draw:text-style-name="P4" draw:layer="layout" svg:x1="33.999cm" svg:y1="4cm" svg:x2="33.999cm" svg:y2="20cm">
          <text:p/>
        </draw:line>
        <draw:frame draw:style-name="gr772" draw:text-style-name="P3" draw:layer="layout" svg:width="1.949cm" svg:height="0.962cm" svg:x="7.053cm" svg:y="2cm">
          <draw:text-box>
            <text:p>CC 1</text:p>
          </draw:text-box>
        </draw:frame>
        <draw:frame draw:style-name="gr772" draw:text-style-name="P3" draw:layer="layout" svg:width="1.949cm" svg:height="0.962cm" svg:x="11.053cm" svg:y="2cm">
          <draw:text-box>
            <text:p>CC 2</text:p>
          </draw:text-box>
        </draw:frame>
        <draw:frame draw:style-name="gr772" draw:text-style-name="P3" draw:layer="layout" svg:width="1.949cm" svg:height="0.962cm" svg:x="15.053cm" svg:y="2cm">
          <draw:text-box>
            <text:p>CC 3</text:p>
          </draw:text-box>
        </draw:frame>
        <draw:frame draw:style-name="gr772" draw:text-style-name="P3" draw:layer="layout" svg:width="1.949cm" svg:height="0.962cm" svg:x="23.053cm" svg:y="2cm">
          <draw:text-box>
            <text:p>CC 5</text:p>
          </draw:text-box>
        </draw:frame>
        <draw:frame draw:style-name="gr772" draw:text-style-name="P3" draw:layer="layout" svg:width="1.949cm" svg:height="0.962cm" svg:x="27.053cm" svg:y="2cm">
          <draw:text-box>
            <text:p>CC 6</text:p>
          </draw:text-box>
        </draw:frame>
        <draw:frame draw:style-name="gr772" draw:text-style-name="P3" draw:layer="layout" svg:width="1.949cm" svg:height="0.962cm" svg:x="31.053cm" svg:y="2cm">
          <draw:text-box>
            <text:p>CC 7</text:p>
          </draw:text-box>
        </draw:frame>
        <draw:frame draw:style-name="gr772" draw:text-style-name="P3" draw:layer="layout" svg:width="1.949cm" svg:height="0.962cm" svg:x="18.999cm" svg:y="2cm">
          <draw:text-box>
            <text:p>CC 4</text:p>
          </draw:text-box>
        </draw:frame>
        <draw:g draw:style-name="gr1">
          <draw:g draw:style-name="gr1">
            <draw:custom-shape draw:style-name="gr764" draw:text-style-name="P72"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5.599cm">
            <draw:text-box>
              <text:p><text:span text:style-name="T20">DM</text:span></text:p>
            </draw:text-box>
          </draw:frame>
        </draw:g>
        <draw:line draw:style-name="gr797" draw:text-style-name="P4" draw:layer="layout" svg:x1="18.499cm" svg:y1="6cm" svg:x2="18.499cm" svg:y2="7.2cm">
          <text:p/>
        </draw:line>
        <draw:line draw:style-name="gr797" draw:text-style-name="P4" draw:layer="layout" svg:x1="18.499cm" svg:y1="7.2cm" svg:x2="21.499cm" svg:y2="7.2cm">
          <text:p/>
        </draw:line>
        <draw:line draw:style-name="gr797" draw:text-style-name="P4" draw:layer="layout" svg:x1="21.499cm" svg:y1="7.2cm" svg:x2="21.999cm" svg:y2="6cm">
          <text:p/>
        </draw:line>
        <draw:g draw:style-name="gr1">
          <draw:g draw:style-name="gr1">
            <draw:custom-shape draw:style-name="gr764" draw:text-style-name="P72"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8.599cm">
            <draw:text-box>
              <text:p><text:span text:style-name="T20">DM</text:span></text:p>
            </draw:text-box>
          </draw:frame>
        </draw:g>
        <draw:line draw:style-name="gr797" draw:text-style-name="P4" draw:layer="layout" svg:x1="22.499cm" svg:y1="9cm" svg:x2="22.499cm" svg:y2="10.2cm">
          <text:p/>
        </draw:line>
        <draw:line draw:style-name="gr797" draw:text-style-name="P4" draw:layer="layout" svg:x1="22.499cm" svg:y1="10.2cm" svg:x2="25.499cm" svg:y2="10.2cm">
          <text:p/>
        </draw:line>
        <draw:line draw:style-name="gr797" draw:text-style-name="P4" draw:layer="layout" svg:x1="25.499cm" svg:y1="10.2cm" svg:x2="25.999cm" svg:y2="9cm">
          <text:p/>
        </draw:line>
        <draw:g draw:style-name="gr66">
          <draw:polygon draw:style-name="gr762" draw:text-style-name="P71" draw:layer="layout" svg:width="1.999cm" svg:height="2.999cm" svg:x="22.999cm" svg:y="10.5cm" svg:viewBox="0 0 2000 3000" draw:points="0,0 0,1100 400,1500 0,1900 0,3000 2000,2000 2000,1000">
            <text:p/>
          </draw:polygon>
          <draw:frame draw:style-name="gr763" draw:text-style-name="P62" draw:layer="layout" svg:width="1.466cm" svg:height="0.806cm" svg:x="23.399cm" svg:y="11.594cm">
            <draw:text-box>
              <text:p><text:span text:style-name="T20">ALU</text:span></text:p>
            </draw:text-box>
          </draw:frame>
        </draw:g>
        <draw:g draw:style-name="gr1">
          <draw:g draw:style-name="gr1">
            <draw:custom-shape draw:style-name="gr764" draw:text-style-name="P14" draw:layer="layout" svg:width="1cm" svg:height="2cm" svg:x="14.999cm" svg:y="11cm">
              <text:p/>
              <draw:enhanced-geometry svg:viewBox="0 0 21600 21600" draw:type="rectangle" draw:enhanced-path="M 0 0 L 21600 0 21600 21600 0 21600 0 0 Z N"/>
            </draw:custom-shape>
            <draw:custom-shape draw:style-name="gr76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1.597cm">
              <draw:text-box>
                <text:p><text:span text:style-name="T20">IM</text:span></text:p>
              </draw:text-box>
            </draw:frame>
          </draw:g>
        </draw:g>
        <draw:g draw:style-name="gr1">
          <draw:g draw:style-name="gr1">
            <draw:custom-shape draw:style-name="gr767" draw:text-style-name="P14" draw:layer="layout" svg:width="1cm" svg:height="2cm" svg:x="18.999cm" svg:y="11cm">
              <text:p/>
              <draw:enhanced-geometry svg:viewBox="0 0 21600 21600" draw:type="rectangle" draw:enhanced-path="M 0 0 L 21600 0 21600 21600 0 21600 0 0 Z N"/>
            </draw:custom-shape>
            <draw:custom-shape draw:style-name="gr76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1.597cm">
              <draw:text-box>
                <text:p><text:span text:style-name="T20">REG</text:span></text:p>
              </draw:text-box>
            </draw:frame>
          </draw:g>
        </draw:g>
        <draw:g draw:style-name="gr1">
          <draw:g draw:style-name="gr1">
            <draw:custom-shape draw:style-name="gr76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4" draw:text-style-name="P72"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771" draw:text-style-name="P4" draw:layer="layout" svg:x1="37.999cm" svg:y1="4cm" svg:x2="37.999cm" svg:y2="20cm">
          <text:p/>
        </draw:line>
        <draw:g draw:style-name="gr66">
          <draw:polygon draw:style-name="gr762" draw:text-style-name="P71" draw:layer="layout" svg:width="1.999cm" svg:height="2.999cm" svg:x="26.999cm" svg:y="13.5cm" svg:viewBox="0 0 2000 3000" draw:points="0,0 0,1100 400,1500 0,1900 0,3000 2000,2000 2000,1000">
            <text:p/>
          </draw:polygon>
          <draw:frame draw:style-name="gr763" draw:text-style-name="P62" draw:layer="layout" svg:width="1.466cm" svg:height="0.806cm" svg:x="27.399cm" svg:y="14.594cm">
            <draw:text-box>
              <text:p><text:span text:style-name="T20">ALU</text:span></text:p>
            </draw:text-box>
          </draw:frame>
        </draw:g>
        <draw:g draw:style-name="gr1">
          <draw:g draw:style-name="gr1">
            <draw:custom-shape draw:style-name="gr764" draw:text-style-name="P14" draw:layer="layout" svg:width="1cm" svg:height="2cm" svg:x="18.999cm" svg:y="14cm">
              <text:p/>
              <draw:enhanced-geometry svg:viewBox="0 0 21600 21600" draw:type="rectangle" draw:enhanced-path="M 0 0 L 21600 0 21600 21600 0 21600 0 0 Z N"/>
            </draw:custom-shape>
            <draw:custom-shape draw:style-name="gr76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4.597cm">
              <draw:text-box>
                <text:p><text:span text:style-name="T20">IM</text:span></text:p>
              </draw:text-box>
            </draw:frame>
          </draw:g>
        </draw:g>
        <draw:g draw:style-name="gr1">
          <draw:g draw:style-name="gr1">
            <draw:custom-shape draw:style-name="gr767" draw:text-style-name="P14" draw:layer="layout" svg:width="1cm" svg:height="2cm" svg:x="22.999cm" svg:y="14cm">
              <text:p/>
              <draw:enhanced-geometry svg:viewBox="0 0 21600 21600" draw:type="rectangle" draw:enhanced-path="M 0 0 L 21600 0 21600 21600 0 21600 0 0 Z N"/>
            </draw:custom-shape>
            <draw:custom-shape draw:style-name="gr76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4.597cm">
              <draw:text-box>
                <text:p><text:span text:style-name="T20">REG</text:span></text:p>
              </draw:text-box>
            </draw:frame>
          </draw:g>
        </draw:g>
        <draw:g draw:style-name="gr1">
          <draw:g draw:style-name="gr1">
            <draw:custom-shape draw:style-name="gr76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4" draw:text-style-name="P72"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2" draw:text-style-name="P71" draw:layer="layout" svg:width="1.999cm" svg:height="2.999cm" svg:x="30.999cm" svg:y="16.5cm" svg:viewBox="0 0 2000 3000" draw:points="0,0 0,1100 400,1500 0,1900 0,3000 2000,2000 2000,1000">
            <text:p/>
          </draw:polygon>
          <draw:frame draw:style-name="gr763" draw:text-style-name="P62" draw:layer="layout" svg:width="1.466cm" svg:height="0.806cm" svg:x="31.399cm" svg:y="17.594cm">
            <draw:text-box>
              <text:p><text:span text:style-name="T20">ALU</text:span></text:p>
            </draw:text-box>
          </draw:frame>
        </draw:g>
        <draw:g draw:style-name="gr1">
          <draw:g draw:style-name="gr1">
            <draw:custom-shape draw:style-name="gr764" draw:text-style-name="P14" draw:layer="layout" svg:width="1cm" svg:height="2cm" svg:x="22.999cm" svg:y="17cm">
              <text:p/>
              <draw:enhanced-geometry svg:viewBox="0 0 21600 21600" draw:type="rectangle" draw:enhanced-path="M 0 0 L 21600 0 21600 21600 0 21600 0 0 Z N"/>
            </draw:custom-shape>
            <draw:custom-shape draw:style-name="gr76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7.597cm">
              <draw:text-box>
                <text:p><text:span text:style-name="T20">IM</text:span></text:p>
              </draw:text-box>
            </draw:frame>
          </draw:g>
        </draw:g>
        <draw:g draw:style-name="gr1">
          <draw:g draw:style-name="gr1">
            <draw:custom-shape draw:style-name="gr767" draw:text-style-name="P14" draw:layer="layout" svg:width="1cm" svg:height="2cm" svg:x="26.999cm" svg:y="17cm">
              <text:p/>
              <draw:enhanced-geometry svg:viewBox="0 0 21600 21600" draw:type="rectangle" draw:enhanced-path="M 0 0 L 21600 0 21600 21600 0 21600 0 0 Z N"/>
            </draw:custom-shape>
            <draw:custom-shape draw:style-name="gr76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7.597cm">
              <draw:text-box>
                <text:p><text:span text:style-name="T20">REG</text:span></text:p>
              </draw:text-box>
            </draw:frame>
          </draw:g>
        </draw:g>
        <draw:g draw:style-name="gr1">
          <draw:g draw:style-name="gr1">
            <draw:custom-shape draw:style-name="gr76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4" draw:text-style-name="P72"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29cm" svg:y="6.1cm">
          <draw:text-box>
            <text:p><text:span text:style-name="T27">x2</text:span></text:p>
          </draw:text-box>
        </draw:frame>
        <draw:frame draw:style-name="gr798" draw:text-style-name="P75" draw:layer="layout" svg:width="2.479cm" svg:height="0.569cm" svg:x="9.8cm" svg:y="3.901cm">
          <draw:text-box>
            <text:p><text:span text:style-name="T28">if_id_reg_</text:span><text:span text:style-name="T28">rd=2</text:span></text:p>
          </draw:text-box>
        </draw:frame>
        <draw:frame draw:style-name="gr799" draw:text-style-name="P75" draw:layer="layout" svg:width="2.465cm" svg:height="0.569cm" svg:x="9.8cm" svg:y="4.231cm">
          <draw:text-box>
            <text:p><text:span text:style-name="T28">if_id_reg_</text:span><text:span text:style-name="T28">rs1=0</text:span></text:p>
          </draw:text-box>
        </draw:frame>
        <draw:frame draw:style-name="gr800" draw:text-style-name="P75" draw:layer="layout" svg:width="2.462cm" svg:height="0.569cm" svg:x="9.8cm" svg:y="4.532cm">
          <draw:text-box>
            <text:p><text:span text:style-name="T28">if_id_reg_</text:span><text:span text:style-name="T28">rs2=-</text:span></text:p>
          </draw:text-box>
        </draw:frame>
        <draw:frame draw:style-name="gr798" draw:text-style-name="P75" draw:layer="layout" svg:width="2.479cm" svg:height="0.569cm" svg:x="13.801cm" svg:y="6.901cm">
          <draw:text-box>
            <text:p><text:span text:style-name="T28">if_id_reg_</text:span><text:span text:style-name="T28">rd=2</text:span></text:p>
          </draw:text-box>
        </draw:frame>
        <draw:frame draw:style-name="gr799" draw:text-style-name="P75" draw:layer="layout" svg:width="2.465cm" svg:height="0.569cm" svg:x="13.801cm" svg:y="7.231cm">
          <draw:text-box>
            <text:p><text:span text:style-name="T28">if_id_reg_</text:span><text:span text:style-name="T28">rs1=2</text:span></text:p>
          </draw:text-box>
        </draw:frame>
        <draw:frame draw:style-name="gr800" draw:text-style-name="P75" draw:layer="layout" svg:width="2.462cm" svg:height="0.569cm" svg:x="13.801cm" svg:y="7.532cm">
          <draw:text-box>
            <text:p><text:span text:style-name="T28">if_id_reg_</text:span><text:span text:style-name="T28">rs2=-</text:span></text:p>
          </draw:text-box>
        </draw:frame>
        <draw:frame draw:style-name="gr801" draw:text-style-name="P75" draw:layer="layout" svg:width="2.481cm" svg:height="0.569cm" svg:x="13.801cm" svg:y="3.901cm">
          <draw:text-box>
            <text:p><text:span text:style-name="T28">id_ex_reg</text:span><text:span text:style-name="T28">_rd=2</text:span></text:p>
          </draw:text-box>
        </draw:frame>
        <draw:frame draw:style-name="gr802" draw:text-style-name="P75" draw:layer="layout" svg:width="2.623cm" svg:height="0.569cm" svg:x="13.801cm" svg:y="4.231cm">
          <draw:text-box>
            <text:p><text:span text:style-name="T28">id_ex_reg</text:span><text:span text:style-name="T28">_rs1=0</text:span></text:p>
          </draw:text-box>
        </draw:frame>
        <draw:frame draw:style-name="gr803" draw:text-style-name="P75" draw:layer="layout" svg:width="2.56cm" svg:height="0.569cm" svg:x="13.801cm" svg:y="4.532cm">
          <draw:text-box>
            <text:p><text:span text:style-name="T28">id_ex_reg</text:span><text:span text:style-name="T28">_rs2=-</text:span></text:p>
          </draw:text-box>
        </draw:frame>
        <draw:frame draw:style-name="gr804" draw:text-style-name="P70" draw:layer="layout" svg:width="2.891cm" svg:height="0.569cm" svg:x="17.802cm" svg:y="3.901cm">
          <draw:text-box>
            <text:p><text:span text:style-name="T23">ex_mem_</text:span><text:span text:style-name="T23">reg_rd=2</text:span></text:p>
          </draw:text-box>
        </draw:frame>
        <draw:frame draw:style-name="gr805" draw:text-style-name="P75" draw:layer="layout" svg:width="3.032cm" svg:height="0.569cm" svg:x="17.802cm" svg:y="4.231cm">
          <draw:text-box>
            <text:p><text:span text:style-name="T28">ex_mem_</text:span><text:span text:style-name="T28">reg_rs1=0</text:span></text:p>
          </draw:text-box>
        </draw:frame>
        <draw:frame draw:style-name="gr806" draw:text-style-name="P75" draw:layer="layout" svg:width="2.969cm" svg:height="0.569cm" svg:x="17.802cm" svg:y="4.532cm">
          <draw:text-box>
            <text:p><text:span text:style-name="T28">ex_mem_</text:span><text:span text:style-name="T28">reg_rs2=-</text:span></text:p>
          </draw:text-box>
        </draw:frame>
        <draw:frame draw:style-name="gr807" draw:text-style-name="P75" draw:layer="layout" svg:width="2.954cm" svg:height="0.569cm" svg:x="21.803cm" svg:y="3.901cm">
          <draw:text-box>
            <text:p><text:span text:style-name="T28">mem_wb</text:span><text:span text:style-name="T28">_reg_rd=</text:span><text:span text:style-name="T28">2</text:span></text:p>
          </draw:text-box>
        </draw:frame>
        <draw:frame draw:style-name="gr808" draw:text-style-name="P75" draw:layer="layout" svg:width="3.095cm" svg:height="0.569cm" svg:x="21.803cm" svg:y="4.231cm">
          <draw:text-box>
            <text:p><text:span text:style-name="T28">mem_wb</text:span><text:span text:style-name="T28">_reg_rs1=</text:span><text:span text:style-name="T28">0</text:span></text:p>
          </draw:text-box>
        </draw:frame>
        <draw:frame draw:style-name="gr805" draw:text-style-name="P75" draw:layer="layout" svg:width="3.032cm" svg:height="0.569cm" svg:x="21.803cm" svg:y="4.532cm">
          <draw:text-box>
            <text:p><text:span text:style-name="T28">mem_wb</text:span><text:span text:style-name="T28">_reg_rs2=</text:span><text:span text:style-name="T28">-</text:span></text:p>
          </draw:text-box>
        </draw:frame>
        <draw:frame draw:style-name="gr801" draw:text-style-name="P75" draw:layer="layout" svg:width="2.481cm" svg:height="0.569cm" svg:x="17.802cm" svg:y="6.901cm">
          <draw:text-box>
            <text:p><text:span text:style-name="T28">id_ex_reg</text:span><text:span text:style-name="T28">_rd=2</text:span></text:p>
          </draw:text-box>
        </draw:frame>
        <draw:frame draw:style-name="gr802" draw:text-style-name="P70" draw:layer="layout" svg:width="2.623cm" svg:height="0.569cm" svg:x="17.802cm" svg:y="7.231cm">
          <draw:text-box>
            <text:p><text:span text:style-name="T23">id_ex_reg</text:span><text:span text:style-name="T23">_rs1=2</text:span></text:p>
          </draw:text-box>
        </draw:frame>
        <draw:frame draw:style-name="gr803" draw:text-style-name="P75" draw:layer="layout" svg:width="2.56cm" svg:height="0.569cm" svg:x="17.802cm" svg:y="7.532cm">
          <draw:text-box>
            <text:p><text:span text:style-name="T28">id_ex_reg</text:span><text:span text:style-name="T28">_rs2=-</text:span></text:p>
          </draw:text-box>
        </draw:frame>
        <draw:frame draw:style-name="gr804" draw:text-style-name="P70" draw:layer="layout" svg:width="2.891cm" svg:height="0.569cm" svg:x="21.803cm" svg:y="6.901cm">
          <draw:text-box>
            <text:p><text:span text:style-name="T23">ex_mem_</text:span><text:span text:style-name="T23">reg_rd=2</text:span></text:p>
          </draw:text-box>
        </draw:frame>
        <draw:frame draw:style-name="gr805" draw:text-style-name="P75" draw:layer="layout" svg:width="3.032cm" svg:height="0.569cm" svg:x="21.803cm" svg:y="7.231cm">
          <draw:text-box>
            <text:p><text:span text:style-name="T28">ex_mem_</text:span><text:span text:style-name="T28">reg_rs1=2</text:span></text:p>
          </draw:text-box>
        </draw:frame>
        <draw:frame draw:style-name="gr806" draw:text-style-name="P75" draw:layer="layout" svg:width="2.969cm" svg:height="0.569cm" svg:x="21.803cm" svg:y="7.532cm">
          <draw:text-box>
            <text:p><text:span text:style-name="T28">ex_mem_</text:span><text:span text:style-name="T28">reg_rs2=-</text:span></text:p>
          </draw:text-box>
        </draw:frame>
        <draw:frame draw:style-name="gr807" draw:text-style-name="P76" draw:layer="layout" svg:width="2.954cm" svg:height="0.569cm" svg:x="25.804cm" svg:y="6.901cm">
          <draw:text-box>
            <text:p><text:span text:style-name="T29">mem_wb</text:span><text:span text:style-name="T29">_reg_rd=</text:span><text:span text:style-name="T29">2</text:span></text:p>
          </draw:text-box>
        </draw:frame>
        <draw:frame draw:style-name="gr808" draw:text-style-name="P75" draw:layer="layout" svg:width="3.095cm" svg:height="0.569cm" svg:x="25.804cm" svg:y="7.231cm">
          <draw:text-box>
            <text:p><text:span text:style-name="T28">mem_wb</text:span><text:span text:style-name="T28">_reg_rs1=</text:span><text:span text:style-name="T28">2</text:span></text:p>
          </draw:text-box>
        </draw:frame>
        <draw:frame draw:style-name="gr805" draw:text-style-name="P75" draw:layer="layout" svg:width="3.032cm" svg:height="0.569cm" svg:x="25.804cm" svg:y="7.532cm">
          <draw:text-box>
            <text:p><text:span text:style-name="T28">mem_wb</text:span><text:span text:style-name="T28">_reg_rs2=</text:span><text:span text:style-name="T28">-</text:span></text:p>
          </draw:text-box>
        </draw:frame>
        <draw:frame draw:style-name="gr809" draw:text-style-name="P70" draw:layer="layout" svg:width="2.087cm" svg:height="0.569cm" svg:x="16.762cm" svg:y="5.5cm">
          <draw:text-box>
            <text:p><text:span text:style-name="T23">forward_a</text:span><text:span text:style-name="T23">=2</text:span></text:p>
          </draw:text-box>
        </draw:frame>
        <draw:line draw:style-name="gr810" draw:text-style-name="P4" draw:layer="layout" svg:x1="23.601cm" svg:y1="6.843cm" svg:x2="16cm" svg:y2="8.44cm">
          <text:p/>
        </draw:line>
        <draw:line draw:style-name="gr787" draw:text-style-name="P4" draw:layer="layout" svg:x1="18.138cm" svg:y1="6cm" svg:x2="18.738cm" svg:y2="8.5cm">
          <text:p/>
        </draw:line>
        <draw:frame draw:style-name="gr811" draw:text-style-name="P70" draw:layer="layout" svg:width="5.949cm" svg:height="0.569cm" svg:x="16.063cm" svg:y="5.201cm">
          <draw:text-box>
            <text:p><text:span text:style-name="T23">forward_a</text:span><text:span text:style-name="T23">_mux_out</text:span><text:span text:style-name="T23">_s = </text:span><text:span text:style-name="T23">alu_result</text:span><text:span text:style-name="T23">_mem_s</text:span></text:p>
          </draw:text-box>
        </draw:frame>
        <draw:frame draw:style-name="gr812" draw:text-style-name="P75" draw:layer="layout" svg:width="2.051cm" svg:height="0.569cm" svg:x="22.948cm" svg:y="5.3cm">
          <draw:text-box>
            <text:p><text:span text:style-name="T28">x2=0x100</text:span></text:p>
          </draw:text-box>
        </draw:frame>
        <draw:frame draw:style-name="gr813" draw:text-style-name="P75" draw:layer="layout" svg:width="2.291cm" svg:height="0.569cm" svg:x="12.2cm" svg:y="6.1cm">
          <draw:text-box>
            <text:p><text:span text:style-name="T28">imm_d=0</text:span><text:span text:style-name="T28">x100</text:span></text:p>
          </draw:text-box>
        </draw:frame>
        <draw:frame draw:style-name="gr812" draw:text-style-name="P75" draw:layer="layout" svg:width="2.051cm" svg:height="0.569cm" svg:x="12.301cm" svg:y="5.101cm">
          <draw:text-box>
            <text:p><text:span text:style-name="T28">reg_a=0</text:span></text:p>
          </draw:text-box>
        </draw:frame>
        <draw:frame draw:style-name="gr814" draw:text-style-name="P75" draw:layer="layout" svg:width="2.67cm" svg:height="0.569cm" svg:x="15.33cm" svg:y="6.031cm">
          <draw:text-box>
            <text:p><text:span text:style-name="T28">alu_result</text:span><text:span text:style-name="T28">=0x100</text:span></text:p>
          </draw:text-box>
        </draw:frame>
        <draw:frame draw:style-name="gr812" draw:text-style-name="P75" draw:layer="layout" svg:width="2.051cm" svg:height="0.569cm" svg:x="14.949cm" svg:y="8.301cm">
          <draw:text-box>
            <text:p><text:span text:style-name="T28">x2=0x???</text:span></text:p>
          </draw:text-box>
        </draw:frame>
        <draw:frame draw:style-name="gr812" draw:text-style-name="P75" draw:layer="layout" svg:width="2.051cm" svg:height="0.569cm" svg:x="16.2cm" svg:y="9.1cm">
          <draw:text-box>
            <text:p><text:span text:style-name="T28">imm_d=8</text:span></text:p>
          </draw:text-box>
        </draw:frame>
        <draw:frame draw:style-name="gr812" draw:text-style-name="P75" draw:layer="layout" svg:width="2.051cm" svg:height="0.569cm" svg:x="16.301cm" svg:y="8.101cm">
          <draw:text-box>
            <text:p><text:span text:style-name="T28">reg_a=??</text:span></text:p>
          </draw:text-box>
        </draw:frame>
        <draw:frame draw:style-name="gr815" draw:text-style-name="P75" draw:layer="layout" svg:width="2.986cm" svg:height="0.569cm" svg:x="19.031cm" svg:y="9.032cm">
          <draw:text-box>
            <text:p><text:span text:style-name="T28">alu_result</text:span><text:span text:style-name="T28">=0x10000</text:span></text:p>
          </draw:text-box>
        </draw:frame>
        <draw:frame draw:style-name="gr816" draw:text-style-name="P75" draw:layer="layout" svg:width="2.055cm" svg:height="0.569cm" svg:x="26.949cm" svg:y="8.301cm">
          <draw:text-box>
            <text:p><text:span text:style-name="T28">x2=0x100</text:span><text:span text:style-name="T28">00</text:span></text:p>
          </draw:text-box>
        </draw:frame>
        <draw:frame draw:style-name="gr796" draw:text-style-name="P62" draw:layer="layout" svg:width="3.855cm" svg:height="0.806cm" svg:x="1.01cm" svg:y="11.6cm">
          <draw:text-box>
            <text:p><text:span text:style-name="T20">ld </text:span><text:span text:style-name="T30">x3</text:span><text:span text:style-name="T20">, </text:span><text:span text:style-name="T20">0(</text:span><text:span text:style-name="T24">x2</text:span><text:span text:style-name="T20">)</text:span></text:p>
          </draw:text-box>
        </draw:frame>
        <draw:frame draw:style-name="gr798" draw:text-style-name="P75" draw:layer="layout" svg:width="2.479cm" svg:height="0.569cm" svg:x="17.801cm" svg:y="9.902cm">
          <draw:text-box>
            <text:p><text:span text:style-name="T28">if_id_reg_</text:span><text:span text:style-name="T28">rd=3</text:span></text:p>
          </draw:text-box>
        </draw:frame>
        <draw:frame draw:style-name="gr799" draw:text-style-name="P75" draw:layer="layout" svg:width="2.465cm" svg:height="0.569cm" svg:x="17.801cm" svg:y="10.232cm">
          <draw:text-box>
            <text:p><text:span text:style-name="T28">if_id_reg_</text:span><text:span text:style-name="T28">rs1=2</text:span></text:p>
          </draw:text-box>
        </draw:frame>
        <draw:frame draw:style-name="gr800" draw:text-style-name="P75" draw:layer="layout" svg:width="2.462cm" svg:height="0.569cm" svg:x="17.801cm" svg:y="10.533cm">
          <draw:text-box>
            <text:p><text:span text:style-name="T28">if_id_reg_</text:span><text:span text:style-name="T28">rs2=-</text:span></text:p>
          </draw:text-box>
        </draw:frame>
        <draw:frame draw:style-name="gr801" draw:text-style-name="P77" draw:layer="layout" svg:width="2.481cm" svg:height="0.569cm" svg:x="21.802cm" svg:y="9.902cm">
          <draw:text-box>
            <text:p><text:span text:style-name="T31">id_ex_reg</text:span><text:span text:style-name="T31">_rd=3</text:span></text:p>
          </draw:text-box>
        </draw:frame>
        <draw:frame draw:style-name="gr802" draw:text-style-name="P70" draw:layer="layout" svg:width="2.623cm" svg:height="0.569cm" svg:x="21.802cm" svg:y="10.232cm">
          <draw:text-box>
            <text:p><text:span text:style-name="T23">id_ex_reg</text:span><text:span text:style-name="T23">_rs1=2</text:span></text:p>
          </draw:text-box>
        </draw:frame>
        <draw:frame draw:style-name="gr803" draw:text-style-name="P75" draw:layer="layout" svg:width="2.56cm" svg:height="0.569cm" svg:x="21.802cm" svg:y="10.533cm">
          <draw:text-box>
            <text:p><text:span text:style-name="T28">id_ex_reg</text:span><text:span text:style-name="T28">_rs2=-</text:span></text:p>
          </draw:text-box>
        </draw:frame>
        <draw:frame draw:style-name="gr804" draw:text-style-name="P78" draw:layer="layout" svg:width="2.891cm" svg:height="0.569cm" svg:x="25.803cm" svg:y="9.902cm">
          <draw:text-box>
            <text:p><text:span text:style-name="T32">ex_mem_</text:span><text:span text:style-name="T32">reg_rd=3</text:span></text:p>
          </draw:text-box>
        </draw:frame>
        <draw:frame draw:style-name="gr805" draw:text-style-name="P75" draw:layer="layout" svg:width="3.032cm" svg:height="0.569cm" svg:x="25.803cm" svg:y="10.232cm">
          <draw:text-box>
            <text:p><text:span text:style-name="T28">ex_mem_</text:span><text:span text:style-name="T28">reg_rs1=2</text:span></text:p>
          </draw:text-box>
        </draw:frame>
        <draw:frame draw:style-name="gr806" draw:text-style-name="P75" draw:layer="layout" svg:width="2.969cm" svg:height="0.569cm" svg:x="25.803cm" svg:y="10.533cm">
          <draw:text-box>
            <text:p><text:span text:style-name="T28">ex_mem_</text:span><text:span text:style-name="T28">reg_rs2=-</text:span></text:p>
          </draw:text-box>
        </draw:frame>
        <draw:frame draw:style-name="gr807" draw:text-style-name="P77" draw:layer="layout" svg:width="2.954cm" svg:height="0.569cm" svg:x="29.804cm" svg:y="9.902cm">
          <draw:text-box>
            <text:p><text:span text:style-name="T31">mem_wb</text:span><text:span text:style-name="T31">_reg_rd=</text:span><text:span text:style-name="T31">3</text:span></text:p>
          </draw:text-box>
        </draw:frame>
        <draw:frame draw:style-name="gr808" draw:text-style-name="P75" draw:layer="layout" svg:width="3.095cm" svg:height="0.569cm" svg:x="29.804cm" svg:y="10.232cm">
          <draw:text-box>
            <text:p><text:span text:style-name="T28">mem_wb</text:span><text:span text:style-name="T28">_reg_rs1=</text:span><text:span text:style-name="T28">2</text:span></text:p>
          </draw:text-box>
        </draw:frame>
        <draw:frame draw:style-name="gr805" draw:text-style-name="P75" draw:layer="layout" svg:width="3.032cm" svg:height="0.569cm" svg:x="29.804cm" svg:y="10.533cm">
          <draw:text-box>
            <text:p><text:span text:style-name="T28">mem_wb</text:span><text:span text:style-name="T28">_reg_rs2=</text:span><text:span text:style-name="T28">-</text:span></text:p>
          </draw:text-box>
        </draw:frame>
        <draw:frame draw:style-name="gr812" draw:text-style-name="P75" draw:layer="layout" svg:width="2.051cm" svg:height="0.569cm" svg:x="18.95cm" svg:y="11.302cm">
          <draw:text-box>
            <text:p><text:span text:style-name="T28">x2=0x???</text:span></text:p>
          </draw:text-box>
        </draw:frame>
        <draw:line draw:style-name="gr810" draw:text-style-name="P4" draw:layer="layout" svg:x1="27.627cm" svg:y1="9.783cm" svg:x2="20.026cm" svg:y2="11.38cm">
          <text:p/>
        </draw:line>
        <draw:frame draw:style-name="gr812" draw:text-style-name="P75" draw:layer="layout" svg:width="2.051cm" svg:height="0.569cm" svg:x="20.201cm" svg:y="12.101cm">
          <draw:text-box>
            <text:p><text:span text:style-name="T28">imm_d=0</text:span></text:p>
          </draw:text-box>
        </draw:frame>
        <draw:frame draw:style-name="gr812" draw:text-style-name="P75" draw:layer="layout" svg:width="2.051cm" svg:height="0.569cm" svg:x="20.302cm" svg:y="11.102cm">
          <draw:text-box>
            <text:p><text:span text:style-name="T28">reg_a=??</text:span></text:p>
          </draw:text-box>
        </draw:frame>
        <draw:line draw:style-name="gr787" draw:text-style-name="P4" draw:layer="layout" svg:x1="22.176cm" svg:y1="9cm" svg:x2="22.776cm" svg:y2="11.5cm">
          <text:p/>
        </draw:line>
        <draw:frame draw:style-name="gr809" draw:text-style-name="P70" draw:layer="layout" svg:width="2.087cm" svg:height="0.569cm" svg:x="20.763cm" svg:y="8.501cm">
          <draw:text-box>
            <text:p><text:span text:style-name="T23">forward_a</text:span><text:span text:style-name="T23">=2</text:span></text:p>
          </draw:text-box>
        </draw:frame>
        <draw:frame draw:style-name="gr811" draw:text-style-name="P70" draw:layer="layout" svg:width="5.949cm" svg:height="0.569cm" svg:x="20.063cm" svg:y="8.202cm">
          <draw:text-box>
            <text:p><text:span text:style-name="T23">forward_a</text:span><text:span text:style-name="T23">_mux_out</text:span><text:span text:style-name="T23">_s = </text:span><text:span text:style-name="T23">alu_result</text:span><text:span text:style-name="T23">_mem_s</text:span></text:p>
          </draw:text-box>
        </draw:frame>
        <draw:frame draw:style-name="gr815" draw:text-style-name="P75" draw:layer="layout" svg:width="2.986cm" svg:height="0.569cm" svg:x="23.032cm" svg:y="12.033cm">
          <draw:text-box>
            <text:p><text:span text:style-name="T28">alu_result</text:span><text:span text:style-name="T28">=0x10000</text:span></text:p>
          </draw:text-box>
        </draw:frame>
        <draw:frame draw:style-name="gr817" draw:text-style-name="P75" draw:layer="layout" svg:width="1.07cm" svg:height="0.569cm" svg:x="26.131cm" svg:y="11.6cm">
          <draw:text-box>
            <text:p><text:span text:style-name="T28">addr</text:span></text:p>
          </draw:text-box>
        </draw:frame>
        <draw:frame draw:style-name="gr818" draw:text-style-name="P75" draw:layer="layout" svg:width="2.308cm" svg:height="0.569cm" svg:x="26.795cm" svg:y="11cm">
          <draw:text-box>
            <text:p><text:span text:style-name="T28">M[0x1000</text:span><text:span text:style-name="T28">0]=1</text:span></text:p>
          </draw:text-box>
        </draw:frame>
        <draw:frame draw:style-name="gr819" draw:text-style-name="P75" draw:layer="layout" svg:width="1.574cm" svg:height="0.569cm" svg:x="27.227cm" svg:y="11.231cm">
          <draw:text-box>
            <text:p><text:span text:style-name="T28">GPIO.ID</text:span></text:p>
          </draw:text-box>
        </draw:frame>
        <draw:frame draw:style-name="gr816" draw:text-style-name="P75" draw:layer="layout" svg:width="2.055cm" svg:height="0.569cm" svg:x="30.999cm" svg:y="11.331cm">
          <draw:text-box>
            <text:p><text:span text:style-name="T28">x2=0x100</text:span><text:span text:style-name="T28">00</text:span></text:p>
          </draw:text-box>
        </draw:frame>
        <draw:frame draw:style-name="gr812" draw:text-style-name="P75" draw:layer="layout" svg:width="2.051cm" svg:height="0.569cm" svg:x="31cm" svg:y="12.032cm">
          <draw:text-box>
            <text:p><text:span text:style-name="T28">x3=0x1</text:span></text:p>
          </draw:text-box>
        </draw:frame>
        <draw:frame draw:style-name="gr796" draw:text-style-name="P79" draw:layer="layout" svg:width="3.855cm" svg:height="0.806cm" svg:x="1.011cm" svg:y="14.6cm">
          <draw:text-box>
            <text:p><text:span text:style-name="T33">sd </text:span><text:span text:style-name="T34">x3</text:span><text:span text:style-name="T33">, </text:span><text:span text:style-name="T33">4(</text:span><text:span text:style-name="T35">x2</text:span><text:span text:style-name="T33">)</text:span></text:p>
          </draw:text-box>
        </draw:frame>
        <draw:frame draw:style-name="gr798" draw:text-style-name="P75" draw:layer="layout" svg:width="2.479cm" svg:height="0.569cm" svg:x="21.8cm" svg:y="12.901cm">
          <draw:text-box>
            <text:p><text:span text:style-name="T28">if_id_reg_</text:span><text:span text:style-name="T28">rd=-</text:span></text:p>
          </draw:text-box>
        </draw:frame>
        <draw:frame draw:style-name="gr799" draw:text-style-name="P75" draw:layer="layout" svg:width="2.465cm" svg:height="0.569cm" svg:x="21.8cm" svg:y="13.231cm">
          <draw:text-box>
            <text:p><text:span text:style-name="T28">if_id_reg_</text:span><text:span text:style-name="T28">rs1=2</text:span></text:p>
          </draw:text-box>
        </draw:frame>
        <draw:frame draw:style-name="gr799" draw:text-style-name="P77" draw:layer="layout" svg:width="2.465cm" svg:height="0.569cm" svg:x="21.8cm" svg:y="13.532cm">
          <draw:text-box>
            <text:p><text:span text:style-name="T31">if_id_reg_</text:span><text:span text:style-name="T31">rs2=3</text:span></text:p>
          </draw:text-box>
        </draw:frame>
        <draw:frame draw:style-name="gr798" draw:text-style-name="P75" draw:layer="layout" svg:width="2.479cm" svg:height="0.569cm" svg:x="25.801cm" svg:y="12.901cm">
          <draw:text-box>
            <text:p><text:span text:style-name="T28">id_ex_reg</text:span><text:span text:style-name="T28">_rd=-</text:span></text:p>
          </draw:text-box>
        </draw:frame>
        <draw:frame draw:style-name="gr802" draw:text-style-name="P76" draw:layer="layout" svg:width="2.623cm" svg:height="0.569cm" svg:x="25.801cm" svg:y="13.231cm">
          <draw:text-box>
            <text:p><text:span text:style-name="T29">id_ex_reg</text:span><text:span text:style-name="T29">_rs1=2</text:span></text:p>
          </draw:text-box>
        </draw:frame>
        <draw:frame draw:style-name="gr802" draw:text-style-name="P75" draw:layer="layout" svg:width="2.623cm" svg:height="0.569cm" svg:x="25.801cm" svg:y="13.532cm">
          <draw:text-box>
            <text:p><text:span text:style-name="T28">id_ex_reg</text:span><text:span text:style-name="T28">_rs2=3</text:span></text:p>
          </draw:text-box>
        </draw:frame>
        <draw:frame draw:style-name="gr820" draw:text-style-name="P80" draw:layer="layout" svg:width="2.827cm" svg:height="0.569cm" svg:x="29.802cm" svg:y="12.901cm">
          <draw:text-box>
            <text:p><text:span text:style-name="T36">ex_mem_</text:span><text:span text:style-name="T36">reg_rd=-</text:span></text:p>
          </draw:text-box>
        </draw:frame>
        <draw:frame draw:style-name="gr805" draw:text-style-name="P75" draw:layer="layout" svg:width="3.032cm" svg:height="0.569cm" svg:x="29.802cm" svg:y="13.231cm">
          <draw:text-box>
            <text:p><text:span text:style-name="T28">ex_mem_</text:span><text:span text:style-name="T28">reg_rs1=2</text:span></text:p>
          </draw:text-box>
        </draw:frame>
        <draw:frame draw:style-name="gr805" draw:text-style-name="P75" draw:layer="layout" svg:width="3.032cm" svg:height="0.569cm" svg:x="29.802cm" svg:y="13.532cm">
          <draw:text-box>
            <text:p><text:span text:style-name="T28">ex_mem_</text:span><text:span text:style-name="T28">reg_rs2=3</text:span></text:p>
          </draw:text-box>
        </draw:frame>
        <draw:frame draw:style-name="gr821" draw:text-style-name="P75" draw:layer="layout" svg:width="2.89cm" svg:height="0.569cm" svg:x="33.803cm" svg:y="12.901cm">
          <draw:text-box>
            <text:p><text:span text:style-name="T28">mem_wb</text:span><text:span text:style-name="T28">_reg_rd=-</text:span></text:p>
          </draw:text-box>
        </draw:frame>
        <draw:frame draw:style-name="gr808" draw:text-style-name="P75" draw:layer="layout" svg:width="3.095cm" svg:height="0.569cm" svg:x="33.803cm" svg:y="13.231cm">
          <draw:text-box>
            <text:p><text:span text:style-name="T28">mem_wb</text:span><text:span text:style-name="T28">_reg_rs1=</text:span><text:span text:style-name="T28">2</text:span></text:p>
          </draw:text-box>
        </draw:frame>
        <draw:frame draw:style-name="gr808" draw:text-style-name="P75" draw:layer="layout" svg:width="3.095cm" svg:height="0.569cm" svg:x="33.803cm" svg:y="13.532cm">
          <draw:text-box>
            <text:p><text:span text:style-name="T28">mem_wb</text:span><text:span text:style-name="T28">_reg_rs2=</text:span><text:span text:style-name="T28">3</text:span></text:p>
          </draw:text-box>
        </draw:frame>
        <draw:frame draw:style-name="gr812" draw:text-style-name="P75" draw:layer="layout" svg:width="2.051cm" svg:height="0.569cm" svg:x="22.949cm" svg:y="14.301cm">
          <draw:text-box>
            <text:p><text:span text:style-name="T28">x2=0x100</text:span></text:p>
          </draw:text-box>
        </draw:frame>
        <draw:line draw:style-name="gr822" draw:text-style-name="P4" draw:layer="layout" svg:x1="27.627cm" svg:y1="9.783cm" svg:x2="23.999cm" svg:y2="14.4cm">
          <text:p/>
        </draw:line>
        <draw:frame draw:style-name="gr812" draw:text-style-name="P75" draw:layer="layout" svg:width="2.051cm" svg:height="0.569cm" svg:x="23.001cm" svg:y="15.033cm">
          <draw:text-box>
            <text:p><text:span text:style-name="T28">x3=0x??</text:span></text:p>
          </draw:text-box>
        </draw:frame>
        <draw:line draw:style-name="gr823" draw:text-style-name="P4" draw:layer="layout" svg:x1="31.35cm" svg:y1="12.403cm" svg:x2="24.3cm" svg:y2="15.403cm">
          <text:p/>
        </draw:line>
        <draw:frame draw:style-name="gr809" draw:text-style-name="P76" draw:layer="layout" svg:width="2.087cm" svg:height="0.569cm" svg:x="25.015cm" svg:y="8.6cm">
          <draw:text-box>
            <text:p><text:span text:style-name="T29">forward_a</text:span><text:span text:style-name="T29">=1</text:span></text:p>
          </draw:text-box>
        </draw:frame>
        <draw:line draw:style-name="gr824" draw:text-style-name="P4" draw:layer="layout" svg:x1="26.2cm" svg:y1="9cm" svg:x2="26.7cm" svg:y2="14.5cm">
          <text:p/>
        </draw:line>
        <draw:frame draw:style-name="gr825" draw:text-style-name="P76" draw:layer="layout" svg:width="5.98cm" svg:height="0.569cm" svg:x="24cm" svg:y="8.331cm">
          <draw:text-box>
            <text:p><text:span text:style-name="T29">forward_a</text:span><text:span text:style-name="T29">_mux_out</text:span><text:span text:style-name="T29">_s = </text:span><text:span text:style-name="T29">result_wri</text:span><text:span text:style-name="T29">teback_s</text:span></text:p>
          </draw:text-box>
        </draw:frame>
        <draw:frame draw:style-name="gr812" draw:text-style-name="P75" draw:layer="layout" svg:width="2.051cm" svg:height="0.569cm" svg:x="24.202cm" svg:y="15.402cm">
          <draw:text-box>
            <text:p><text:span text:style-name="T28">imm_d=4</text:span></text:p>
          </draw:text-box>
        </draw:frame>
        <draw:frame draw:style-name="gr826" draw:text-style-name="P75" draw:layer="layout" svg:width="2.166cm" svg:height="0.569cm" svg:x="24.349cm" svg:y="14.1cm">
          <draw:text-box>
            <text:p><text:span text:style-name="T28">reg_a=0x</text:span><text:span text:style-name="T28">100</text:span></text:p>
          </draw:text-box>
        </draw:frame>
        <draw:frame draw:style-name="gr812" draw:text-style-name="P75" draw:layer="layout" svg:width="2.051cm" svg:height="0.569cm" svg:x="18.951cm" svg:y="12.303cm">
          <draw:text-box>
            <text:p><text:span text:style-name="T28">x3=0x???</text:span></text:p>
          </draw:text-box>
        </draw:frame>
        <draw:frame draw:style-name="gr812" draw:text-style-name="P75" draw:layer="layout" svg:width="2.051cm" svg:height="0.569cm" svg:x="24.349cm" svg:y="15.101cm">
          <draw:text-box>
            <text:p><text:span text:style-name="T28">reg_b=0x</text:span><text:span text:style-name="T28">??</text:span></text:p>
          </draw:text-box>
        </draw:frame>
        <draw:frame draw:style-name="gr827" draw:text-style-name="P77" draw:layer="layout" svg:width="1.054cm" svg:height="0.569cm" svg:x="22.1cm" svg:y="14.031cm">
          <draw:text-box>
            <text:p><text:span text:style-name="T31">Stall</text:span></text:p>
          </draw:text-box>
        </draw:frame>
        <draw:frame draw:style-name="gr828" draw:text-style-name="P75" draw:layer="layout" svg:width="5.893cm" svg:height="0.569cm" svg:x="14.909cm" svg:y="16.431cm">
          <draw:text-box>
            <text:p><text:span text:style-name="T28">Forward </text:span><text:span text:style-name="T28">(grün) </text:span><text:span text:style-name="T28">und Stall </text:span><text:span text:style-name="T28">(gelb) </text:span><text:span text:style-name="T28">stören </text:span><text:span text:style-name="T28">sich.</text:span></text:p>
          </draw:text-box>
        </draw:frame>
        <draw:frame draw:style-name="gr829" draw:text-style-name="P75" draw:layer="layout" svg:width="2.983cm" svg:height="0.569cm" svg:x="30.999cm" svg:y="18.031cm">
          <draw:text-box>
            <text:p><text:span text:style-name="T28">alu_result</text:span><text:span text:style-name="T28">=0x104</text:span></text:p>
          </draw:text-box>
        </draw:frame>
        <draw:frame draw:style-name="gr817" draw:text-style-name="P75" draw:layer="layout" svg:width="1.07cm" svg:height="0.569cm" svg:x="30.099cm" svg:y="14.531cm">
          <draw:text-box>
            <text:p><text:span text:style-name="T28">addr</text:span></text:p>
          </draw:text-box>
        </draw:frame>
        <draw:frame draw:style-name="gr830" draw:text-style-name="P75" draw:layer="layout" svg:width="2.765cm" svg:height="0.569cm" svg:x="30.796cm" svg:y="14cm">
          <draw:text-box>
            <text:p><text:span text:style-name="T28">0x??</text:span><text:span text:style-name="T28">=M[0x100</text:span><text:span text:style-name="T28">04]</text:span></text:p>
          </draw:text-box>
        </draw:frame>
        <draw:frame draw:style-name="gr831" draw:text-style-name="P75" draw:layer="layout" svg:width="1.211cm" svg:height="0.569cm" svg:x="31.228cm" svg:y="14.231cm">
          <draw:text-box>
            <text:p><text:span text:style-name="T28">GPIO</text:span></text:p>
          </draw:text-box>
        </draw:frame>
        <draw:path draw:style-name="gr832"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796" draw:text-style-name="P62" draw:layer="layout" svg:width="3.855cm" svg:height="0.806cm" svg:x="4.012cm" svg:y="17.6cm">
          <draw:text-box>
            <text:p><text:span text:style-name="T20">sd </text:span><text:span text:style-name="T30">x3</text:span><text:span text:style-name="T20">, </text:span><text:span text:style-name="T20">4(</text:span><text:span text:style-name="T24">x2</text:span><text:span text:style-name="T20">)</text:span></text:p>
          </draw:text-box>
        </draw:frame>
        <draw:frame draw:style-name="gr796" draw:text-style-name="P62" draw:layer="layout" svg:width="3.855cm" svg:height="0.806cm" svg:x="4.013cm" svg:y="14.6cm">
          <draw:text-box>
            <text:p><text:span text:style-name="T20">nop</text:span></text:p>
          </draw:text-box>
        </draw:frame>
        <draw:custom-shape draw:style-name="gr833"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3"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4" draw:text-style-name="P81"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12" draw:text-style-name="P75" draw:layer="layout" svg:width="2.051cm" svg:height="0.569cm" svg:x="26.95cm" svg:y="17.302cm">
          <draw:text-box>
            <text:p><text:span text:style-name="T28">x2=0x100</text:span></text:p>
          </draw:text-box>
        </draw:frame>
        <draw:frame draw:style-name="gr812" draw:text-style-name="P75" draw:layer="layout" svg:width="2.051cm" svg:height="0.569cm" svg:x="27.002cm" svg:y="18.034cm">
          <draw:text-box>
            <text:p><text:span text:style-name="T28">x3=0x??</text:span></text:p>
          </draw:text-box>
        </draw:frame>
        <draw:frame draw:style-name="gr798" draw:text-style-name="P75" draw:layer="layout" svg:width="2.479cm" svg:height="0.569cm" svg:x="25.8cm" svg:y="15.901cm">
          <draw:text-box>
            <text:p><text:span text:style-name="T28">if_id_reg_</text:span><text:span text:style-name="T28">rd=-</text:span></text:p>
          </draw:text-box>
        </draw:frame>
        <draw:frame draw:style-name="gr799" draw:text-style-name="P75" draw:layer="layout" svg:width="2.465cm" svg:height="0.569cm" svg:x="25.8cm" svg:y="16.231cm">
          <draw:text-box>
            <text:p><text:span text:style-name="T28">if_id_reg_</text:span><text:span text:style-name="T28">rs1=2</text:span></text:p>
          </draw:text-box>
        </draw:frame>
        <draw:frame draw:style-name="gr799" draw:text-style-name="P80" draw:layer="layout" svg:width="2.465cm" svg:height="0.569cm" svg:x="25.8cm" svg:y="16.532cm">
          <draw:text-box>
            <text:p><text:span text:style-name="T36">if_id_reg_</text:span><text:span text:style-name="T36">rs2=3</text:span></text:p>
          </draw:text-box>
        </draw:frame>
        <draw:frame draw:style-name="gr798" draw:text-style-name="P75" draw:layer="layout" svg:width="2.479cm" svg:height="0.569cm" svg:x="29.801cm" svg:y="15.901cm">
          <draw:text-box>
            <text:p><text:span text:style-name="T28">id_ex_reg</text:span><text:span text:style-name="T28">_rd=-</text:span></text:p>
          </draw:text-box>
        </draw:frame>
        <draw:frame draw:style-name="gr802" draw:text-style-name="P80" draw:layer="layout" svg:width="2.623cm" svg:height="0.569cm" svg:x="29.801cm" svg:y="16.231cm">
          <draw:text-box>
            <text:p><text:span text:style-name="T36">id_ex_reg</text:span><text:span text:style-name="T36">_rs1=2</text:span></text:p>
          </draw:text-box>
        </draw:frame>
        <draw:frame draw:style-name="gr802" draw:text-style-name="P77" draw:layer="layout" svg:width="2.623cm" svg:height="0.569cm" svg:x="29.801cm" svg:y="16.532cm">
          <draw:text-box>
            <text:p><text:span text:style-name="T31">id_ex_reg</text:span><text:span text:style-name="T31">_rs2=3</text:span></text:p>
          </draw:text-box>
        </draw:frame>
        <draw:frame draw:style-name="gr820" draw:text-style-name="P80" draw:layer="layout" svg:width="2.827cm" svg:height="0.569cm" svg:x="33.802cm" svg:y="15.901cm">
          <draw:text-box>
            <text:p><text:span text:style-name="T36">ex_mem_</text:span><text:span text:style-name="T36">reg_rd=-</text:span></text:p>
          </draw:text-box>
        </draw:frame>
        <draw:frame draw:style-name="gr805" draw:text-style-name="P75" draw:layer="layout" svg:width="3.032cm" svg:height="0.569cm" svg:x="33.802cm" svg:y="16.231cm">
          <draw:text-box>
            <text:p><text:span text:style-name="T28">ex_mem_</text:span><text:span text:style-name="T28">reg_rs1=2</text:span></text:p>
          </draw:text-box>
        </draw:frame>
        <draw:frame draw:style-name="gr805" draw:text-style-name="P75" draw:layer="layout" svg:width="3.032cm" svg:height="0.569cm" svg:x="33.802cm" svg:y="16.532cm">
          <draw:text-box>
            <text:p><text:span text:style-name="T28">ex_mem_</text:span><text:span text:style-name="T28">reg_rs2=3</text:span></text:p>
          </draw:text-box>
        </draw:frame>
        <draw:frame draw:style-name="gr821" draw:text-style-name="P75" draw:layer="layout" svg:width="2.89cm" svg:height="0.569cm" svg:x="37.803cm" svg:y="15.901cm">
          <draw:text-box>
            <text:p><text:span text:style-name="T28">mem_wb</text:span><text:span text:style-name="T28">_reg_rd=-</text:span></text:p>
          </draw:text-box>
        </draw:frame>
        <draw:frame draw:style-name="gr808" draw:text-style-name="P75" draw:layer="layout" svg:width="3.095cm" svg:height="0.569cm" svg:x="37.803cm" svg:y="16.231cm">
          <draw:text-box>
            <text:p><text:span text:style-name="T28">mem_wb</text:span><text:span text:style-name="T28">_reg_rs1=</text:span><text:span text:style-name="T28">2</text:span></text:p>
          </draw:text-box>
        </draw:frame>
        <draw:frame draw:style-name="gr808" draw:text-style-name="P75" draw:layer="layout" svg:width="3.095cm" svg:height="0.569cm" svg:x="37.803cm" svg:y="16.532cm">
          <draw:text-box>
            <text:p><text:span text:style-name="T28">mem_wb</text:span><text:span text:style-name="T28">_reg_rs2=</text:span><text:span text:style-name="T28">3</text:span></text:p>
          </draw:text-box>
        </draw:frame>
        <draw:frame draw:style-name="gr826" draw:text-style-name="P75" draw:layer="layout" svg:width="2.166cm" svg:height="0.569cm" svg:x="28.349cm" svg:y="17.101cm">
          <draw:text-box>
            <text:p><text:span text:style-name="T28">reg_a=0x</text:span><text:span text:style-name="T28">100</text:span></text:p>
          </draw:text-box>
        </draw:frame>
        <draw:frame draw:style-name="gr812" draw:text-style-name="P75" draw:layer="layout" svg:width="2.051cm" svg:height="0.569cm" svg:x="28.203cm" svg:y="18.403cm">
          <draw:text-box>
            <text:p><text:span text:style-name="T28">imm_d=4</text:span></text:p>
          </draw:text-box>
        </draw:frame>
        <draw:frame draw:style-name="gr812" draw:text-style-name="P75" draw:layer="layout" svg:width="2.051cm" svg:height="0.569cm" svg:x="28.35cm" svg:y="18.102cm">
          <draw:text-box>
            <text:p><text:span text:style-name="T28">reg_b=0x</text:span><text:span text:style-name="T28">??</text:span></text:p>
          </draw:text-box>
        </draw:frame>
        <draw:frame draw:style-name="gr815" draw:text-style-name="P75" draw:layer="layout" svg:width="2.986cm" svg:height="0.569cm" svg:x="26.999cm" svg:y="15.031cm">
          <draw:text-box>
            <text:p><text:span text:style-name="T28">alu_result</text:span><text:span text:style-name="T28">=0x10004</text:span></text:p>
          </draw:text-box>
        </draw:frame>
        <draw:frame draw:style-name="gr817" draw:text-style-name="P75" draw:layer="layout" svg:width="1.07cm" svg:height="0.569cm" svg:x="34.131cm" svg:y="17.5cm">
          <draw:text-box>
            <text:p><text:span text:style-name="T28">addr</text:span></text:p>
          </draw:text-box>
        </draw:frame>
        <draw:frame draw:style-name="gr835" draw:text-style-name="P75" draw:layer="layout" svg:width="2.763cm" svg:height="0.569cm" svg:x="34.797cm" svg:y="17cm">
          <draw:text-box>
            <text:p><text:span text:style-name="T28">0x??</text:span><text:span text:style-name="T28">=M[0x104</text:span><text:span text:style-name="T28">]</text:span></text:p>
          </draw:text-box>
        </draw:frame>
        <draw:frame draw:style-name="gr831" draw:text-style-name="P75" draw:layer="layout" svg:width="1.211cm" svg:height="0.569cm" svg:x="35.229cm" svg:y="17.231cm">
          <draw:text-box>
            <text:p><text:span text:style-name="T28">GPIO</text:span></text:p>
          </draw:text-box>
        </draw:frame>
        <draw:frame draw:style-name="gr825" draw:text-style-name="P77" draw:layer="layout" svg:width="5.98cm" svg:height="0.569cm" svg:x="30.32cm" svg:y="8.831cm">
          <draw:text-box>
            <text:p><text:span text:style-name="T31">forward_b</text:span><text:span text:style-name="T31">_mux_out</text:span><text:span text:style-name="T31">_s = </text:span><text:span text:style-name="T31">result_wri</text:span><text:span text:style-name="T31">teback_s</text:span></text:p>
          </draw:text-box>
        </draw:frame>
        <draw:frame draw:style-name="gr809" draw:text-style-name="P77" draw:layer="layout" svg:width="2.087cm" svg:height="0.569cm" svg:x="31.2cm" svg:y="9.231cm">
          <draw:text-box>
            <text:p><text:span text:style-name="T31">forward_b</text:span><text:span text:style-name="T31">=1</text:span></text:p>
          </draw:text-box>
        </draw:frame>
        <draw:line draw:style-name="gr836" draw:text-style-name="P4" draw:layer="layout" svg:x1="30.2cm" svg:y1="12cm" svg:x2="30.5cm" svg:y2="18.5cm">
          <text:p/>
        </draw:line>
        <draw:path draw:style-name="gr832"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809" draw:text-style-name="P70" draw:layer="layout" svg:width="2.087cm" svg:height="0.569cm" svg:x="18.015cm" svg:y="20.4cm">
          <draw:text-box>
            <text:p><text:span text:style-name="T23">forward_a</text:span><text:span text:style-name="T23">=2</text:span></text:p>
          </draw:text-box>
        </draw:frame>
        <draw:frame draw:style-name="gr809" draw:text-style-name="P70" draw:layer="layout" svg:width="2.087cm" svg:height="0.569cm" svg:x="22.016cm" svg:y="20.401cm">
          <draw:text-box>
            <text:p><text:span text:style-name="T23">forward_a</text:span><text:span text:style-name="T23">=2</text:span></text:p>
          </draw:text-box>
        </draw:frame>
        <draw:frame draw:style-name="gr809" draw:text-style-name="P76" draw:layer="layout" svg:width="2.087cm" svg:height="0.569cm" svg:x="26.015cm" svg:y="20.431cm">
          <draw:text-box>
            <text:p><text:span text:style-name="T29">forward_a</text:span><text:span text:style-name="T29">=1</text:span></text:p>
          </draw:text-box>
        </draw:frame>
        <draw:frame draw:style-name="gr809" draw:text-style-name="P77" draw:layer="layout" svg:width="2.087cm" svg:height="0.569cm" svg:x="30.015cm" svg:y="21.431cm">
          <draw:text-box>
            <text:p><text:span text:style-name="T31">forward_b</text:span><text:span text:style-name="T31">=1</text:span></text:p>
          </draw:text-box>
        </draw:frame>
      </draw:page>
      <draw:page draw:name="page18" draw:style-name="dp1" draw:master-page-name="Standard">
        <draw:frame draw:style-name="gr759" draw:text-style-name="P34" draw:layer="layout" svg:width="4.807cm" svg:height="3.095cm" svg:x="1cm" svg:y="3.005cm">
          <draw:text-box>
            <text:p><text:span text:style-name="T9">Pro</text:span><text:span text:style-name="T9">gra</text:span><text:span text:style-name="T9">m</text:span></text:p>
            <text:p><text:span text:style-name="T9">exe</text:span><text:span text:style-name="T9">cuti</text:span><text:span text:style-name="T9">on</text:span></text:p>
            <text:p><text:span text:style-name="T9">orde</text:span><text:span text:style-name="T9">r</text:span></text:p>
            <text:p><text:span text:style-name="T9">(in </text:span><text:span text:style-name="T9">instr</text:span><text:span text:style-name="T9">ucti</text:span><text:span text:style-name="T9">ons)</text:span></text:p>
          </draw:text-box>
        </draw:frame>
        <draw:frame draw:style-name="gr760" draw:text-style-name="P62" draw:layer="layout" svg:width="3.601cm" svg:height="0.806cm" svg:x="1.008cm" svg:y="6.6cm">
          <draw:text-box>
            <text:p><text:span text:style-name="T20">ld </text:span><text:span text:style-name="T24">x2</text:span><text:span text:style-name="T20">, </text:span><text:span text:style-name="T20">20(x1</text:span><text:span text:style-name="T20">)</text:span></text:p>
          </draw:text-box>
        </draw:frame>
        <draw:frame draw:style-name="gr761" draw:text-style-name="P34" draw:layer="layout" svg:width="6.124cm" svg:height="0.962cm" svg:x="5.699cm" svg:y="4.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2" draw:text-style-name="P71" draw:layer="layout" svg:width="1.999cm" svg:height="2.999cm" svg:x="14.999cm" svg:y="5.5cm" svg:viewBox="0 0 2000 3000" draw:points="0,0 0,1100 400,1500 0,1900 0,3000 2000,2000 2000,1000">
            <text:p/>
          </draw:polygon>
          <draw:frame draw:style-name="gr763" draw:text-style-name="P62" draw:layer="layout" svg:width="1.466cm" svg:height="0.806cm" svg:x="15.399cm" svg:y="6.594cm">
            <draw:text-box>
              <text:p><text:span text:style-name="T20">ALU</text:span></text:p>
            </draw:text-box>
          </draw:frame>
        </draw:g>
        <draw:g draw:style-name="gr1">
          <draw:g draw:style-name="gr1">
            <draw:custom-shape draw:style-name="gr764" draw:text-style-name="P14" draw:layer="layout" svg:width="1cm" svg:height="2cm" svg:x="6.999cm" svg:y="6cm">
              <text:p/>
              <draw:enhanced-geometry svg:viewBox="0 0 21600 21600" draw:type="rectangle" draw:enhanced-path="M 0 0 L 21600 0 21600 21600 0 21600 0 0 Z N"/>
            </draw:custom-shape>
            <draw:custom-shape draw:style-name="gr76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6.597cm">
              <draw:text-box>
                <text:p><text:span text:style-name="T20">IM</text:span></text:p>
              </draw:text-box>
            </draw:frame>
          </draw:g>
        </draw:g>
        <draw:g draw:style-name="gr1">
          <draw:g draw:style-name="gr1">
            <draw:custom-shape draw:style-name="gr767" draw:text-style-name="P14" draw:layer="layout" svg:width="1cm" svg:height="2cm" svg:x="10.999cm" svg:y="6cm">
              <text:p/>
              <draw:enhanced-geometry svg:viewBox="0 0 21600 21600" draw:type="rectangle" draw:enhanced-path="M 0 0 L 21600 0 21600 21600 0 21600 0 0 Z N"/>
            </draw:custom-shape>
            <draw:custom-shape draw:style-name="gr76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6.597cm">
              <draw:text-box>
                <text:p><text:span text:style-name="T20">Reg</text:span></text:p>
              </draw:text-box>
            </draw:frame>
          </draw:g>
        </draw:g>
        <draw:g draw:style-name="gr1">
          <draw:g draw:style-name="gr1">
            <draw:custom-shape draw:style-name="gr76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2" draw:text-style-name="P71" draw:layer="layout" svg:width="1.999cm" svg:height="2.999cm" svg:x="18.999cm" svg:y="8.5cm" svg:viewBox="0 0 2000 3000" draw:points="0,0 0,1100 400,1500 0,1900 0,3000 2000,2000 2000,1000">
            <text:p/>
          </draw:polygon>
          <draw:frame draw:style-name="gr763" draw:text-style-name="P62" draw:layer="layout" svg:width="1.466cm" svg:height="0.806cm" svg:x="19.399cm" svg:y="9.594cm">
            <draw:text-box>
              <text:p><text:span text:style-name="T20">ALU</text:span></text:p>
            </draw:text-box>
          </draw:frame>
        </draw:g>
        <draw:g draw:style-name="gr1">
          <draw:g draw:style-name="gr1">
            <draw:custom-shape draw:style-name="gr764" draw:text-style-name="P14" draw:layer="layout" svg:width="1cm" svg:height="2cm" svg:x="10.999cm" svg:y="9cm">
              <text:p/>
              <draw:enhanced-geometry svg:viewBox="0 0 21600 21600" draw:type="rectangle" draw:enhanced-path="M 0 0 L 21600 0 21600 21600 0 21600 0 0 Z N"/>
            </draw:custom-shape>
            <draw:custom-shape draw:style-name="gr76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9.597cm">
              <draw:text-box>
                <text:p><text:span text:style-name="T20">IM</text:span></text:p>
              </draw:text-box>
            </draw:frame>
          </draw:g>
        </draw:g>
        <draw:g draw:style-name="gr1">
          <draw:g draw:style-name="gr1">
            <draw:custom-shape draw:style-name="gr767" draw:text-style-name="P14" draw:layer="layout" svg:width="1cm" svg:height="2cm" svg:x="14.999cm" svg:y="9cm">
              <text:p/>
              <draw:enhanced-geometry svg:viewBox="0 0 21600 21600" draw:type="rectangle" draw:enhanced-path="M 0 0 L 21600 0 21600 21600 0 21600 0 0 Z N"/>
            </draw:custom-shape>
            <draw:custom-shape draw:style-name="gr76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9.597cm">
              <draw:text-box>
                <text:p><text:span text:style-name="T20">REG</text:span></text:p>
              </draw:text-box>
            </draw:frame>
          </draw:g>
        </draw:g>
        <draw:g draw:style-name="gr1">
          <draw:g draw:style-name="gr1">
            <draw:custom-shape draw:style-name="gr76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37" draw:text-style-name="P62" draw:layer="layout" svg:width="3.585cm" svg:height="0.806cm" svg:x="1.009cm" svg:y="9.6cm">
          <draw:text-box>
            <text:p><text:span text:style-name="T20">and </text:span><text:span text:style-name="T20">x4, </text:span><text:span text:style-name="T24">x2</text:span><text:span text:style-name="T20">, </text:span><text:span text:style-name="T20">x5</text:span></text:p>
          </draw:text-box>
        </draw:frame>
        <draw:line draw:style-name="gr771" draw:text-style-name="P4" draw:layer="layout" svg:x1="9.999cm" svg:y1="5cm" svg:x2="9.999cm" svg:y2="21cm">
          <text:p/>
        </draw:line>
        <draw:line draw:style-name="gr771" draw:text-style-name="P4" draw:layer="layout" svg:x1="13.999cm" svg:y1="5cm" svg:x2="13.999cm" svg:y2="21cm">
          <text:p/>
        </draw:line>
        <draw:line draw:style-name="gr771" draw:text-style-name="P4" draw:layer="layout" svg:x1="17.999cm" svg:y1="5cm" svg:x2="17.999cm" svg:y2="21cm">
          <text:p/>
        </draw:line>
        <draw:line draw:style-name="gr771" draw:text-style-name="P4" draw:layer="layout" svg:x1="21.999cm" svg:y1="5cm" svg:x2="21.999cm" svg:y2="21cm">
          <text:p/>
        </draw:line>
        <draw:line draw:style-name="gr771" draw:text-style-name="P4" draw:layer="layout" svg:x1="25.999cm" svg:y1="5cm" svg:x2="25.999cm" svg:y2="21cm">
          <text:p/>
        </draw:line>
        <draw:line draw:style-name="gr771" draw:text-style-name="P4" draw:layer="layout" svg:x1="29.999cm" svg:y1="5cm" svg:x2="29.999cm" svg:y2="21cm">
          <text:p/>
        </draw:line>
        <draw:line draw:style-name="gr771" draw:text-style-name="P4" draw:layer="layout" svg:x1="33.999cm" svg:y1="5cm" svg:x2="33.999cm" svg:y2="21cm">
          <text:p/>
        </draw:line>
        <draw:frame draw:style-name="gr772" draw:text-style-name="P34" draw:layer="layout" svg:width="1.949cm" svg:height="0.962cm" svg:x="7.053cm" svg:y="5cm">
          <draw:text-box>
            <text:p><text:span text:style-name="T9">CC </text:span><text:span text:style-name="T9">1</text:span></text:p>
          </draw:text-box>
        </draw:frame>
        <draw:frame draw:style-name="gr772" draw:text-style-name="P34" draw:layer="layout" svg:width="1.949cm" svg:height="0.962cm" svg:x="11.053cm" svg:y="5cm">
          <draw:text-box>
            <text:p><text:span text:style-name="T9">CC </text:span><text:span text:style-name="T9">2</text:span></text:p>
          </draw:text-box>
        </draw:frame>
        <draw:frame draw:style-name="gr772" draw:text-style-name="P34" draw:layer="layout" svg:width="1.949cm" svg:height="0.962cm" svg:x="15.053cm" svg:y="5cm">
          <draw:text-box>
            <text:p><text:span text:style-name="T9">CC </text:span><text:span text:style-name="T9">3</text:span></text:p>
          </draw:text-box>
        </draw:frame>
        <draw:frame draw:style-name="gr772" draw:text-style-name="P34" draw:layer="layout" svg:width="1.949cm" svg:height="0.962cm" svg:x="23.053cm" svg:y="5cm">
          <draw:text-box>
            <text:p><text:span text:style-name="T9">CC </text:span><text:span text:style-name="T9">5</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31.053cm" svg:y="5cm">
          <draw:text-box>
            <text:p><text:span text:style-name="T9">CC </text:span><text:span text:style-name="T9">7</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3" draw:text-style-name="P62" draw:layer="layout" svg:width="3.575cm" svg:height="0.806cm" svg:x="1.01cm" svg:y="12.6cm">
          <draw:text-box>
            <text:p><text:span text:style-name="T20">or x8, </text:span><text:span text:style-name="T24">x2</text:span><text:span text:style-name="T20">, </text:span><text:span text:style-name="T20">x6</text:span></text:p>
          </draw:text-box>
        </draw:frame>
        <draw:frame draw:style-name="gr772" draw:text-style-name="P34" draw:layer="layout" svg:width="1.949cm" svg:height="0.962cm" svg:x="18.999cm" svg:y="5cm">
          <draw:text-box>
            <text:p><text:span text:style-name="T9">CC </text:span><text:span text:style-name="T9">4</text:span></text:p>
          </draw:text-box>
        </draw:frame>
        <draw:g draw:style-name="gr1">
          <draw:g draw:style-name="gr1">
            <draw:custom-shape draw:style-name="gr764" draw:text-style-name="P72"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4" draw:text-style-name="P72"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2" draw:text-style-name="P71" draw:layer="layout" svg:width="1.999cm" svg:height="2.999cm" svg:x="22.999cm" svg:y="11.5cm" svg:viewBox="0 0 2000 3000" draw:points="0,0 0,1100 400,1500 0,1900 0,3000 2000,2000 2000,1000">
            <text:p/>
          </draw:polygon>
          <draw:frame draw:style-name="gr763" draw:text-style-name="P62" draw:layer="layout" svg:width="1.466cm" svg:height="0.806cm" svg:x="23.399cm" svg:y="12.594cm">
            <draw:text-box>
              <text:p><text:span text:style-name="T20">ALU</text:span></text:p>
            </draw:text-box>
          </draw:frame>
        </draw:g>
        <draw:g draw:style-name="gr1">
          <draw:g draw:style-name="gr1">
            <draw:custom-shape draw:style-name="gr764" draw:text-style-name="P14" draw:layer="layout" svg:width="1cm" svg:height="2cm" svg:x="14.999cm" svg:y="12cm">
              <text:p/>
              <draw:enhanced-geometry svg:viewBox="0 0 21600 21600" draw:type="rectangle" draw:enhanced-path="M 0 0 L 21600 0 21600 21600 0 21600 0 0 Z N"/>
            </draw:custom-shape>
            <draw:custom-shape draw:style-name="gr76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2.597cm">
              <draw:text-box>
                <text:p><text:span text:style-name="T20">IM</text:span></text:p>
              </draw:text-box>
            </draw:frame>
          </draw:g>
        </draw:g>
        <draw:g draw:style-name="gr1">
          <draw:g draw:style-name="gr1">
            <draw:custom-shape draw:style-name="gr767" draw:text-style-name="P14" draw:layer="layout" svg:width="1cm" svg:height="2cm" svg:x="18.999cm" svg:y="12cm">
              <text:p/>
              <draw:enhanced-geometry svg:viewBox="0 0 21600 21600" draw:type="rectangle" draw:enhanced-path="M 0 0 L 21600 0 21600 21600 0 21600 0 0 Z N"/>
            </draw:custom-shape>
            <draw:custom-shape draw:style-name="gr76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2.597cm">
              <draw:text-box>
                <text:p><text:span text:style-name="T20">REG</text:span></text:p>
              </draw:text-box>
            </draw:frame>
          </draw:g>
        </draw:g>
        <draw:g draw:style-name="gr1">
          <draw:g draw:style-name="gr1">
            <draw:custom-shape draw:style-name="gr76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4" draw:text-style-name="P72"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38" draw:text-style-name="P34" draw:layer="layout" svg:width="7.456cm" svg:height="0.962cm" svg:x="8.899cm" svg:y="1cm">
          <draw:text-box>
            <text:p><text:span text:style-name="T9">R-</text:span><text:span text:style-name="T9">Typ</text:span><text:span text:style-name="T9">e </text:span><text:span text:style-name="T9">follo</text:span><text:span text:style-name="T9">wing </text:span><text:span text:style-name="T9">an </text:span><text:span text:style-name="T9">load</text:span></text:p>
          </draw:text-box>
        </draw:frame>
        <draw:line draw:style-name="gr771" draw:text-style-name="P4" draw:layer="layout" svg:x1="37.999cm" svg:y1="5cm" svg:x2="37.999cm" svg:y2="21cm">
          <text:p/>
        </draw:line>
        <draw:g draw:style-name="gr66">
          <draw:polygon draw:style-name="gr762" draw:text-style-name="P71" draw:layer="layout" svg:width="1.999cm" svg:height="2.999cm" svg:x="26.999cm" svg:y="14.5cm" svg:viewBox="0 0 2000 3000" draw:points="0,0 0,1100 400,1500 0,1900 0,3000 2000,2000 2000,1000">
            <text:p/>
          </draw:polygon>
          <draw:frame draw:style-name="gr763" draw:text-style-name="P62" draw:layer="layout" svg:width="1.466cm" svg:height="0.806cm" svg:x="27.399cm" svg:y="15.594cm">
            <draw:text-box>
              <text:p><text:span text:style-name="T20">ALU</text:span></text:p>
            </draw:text-box>
          </draw:frame>
        </draw:g>
        <draw:g draw:style-name="gr1">
          <draw:g draw:style-name="gr1">
            <draw:custom-shape draw:style-name="gr764" draw:text-style-name="P14" draw:layer="layout" svg:width="1cm" svg:height="2cm" svg:x="18.999cm" svg:y="15cm">
              <text:p/>
              <draw:enhanced-geometry svg:viewBox="0 0 21600 21600" draw:type="rectangle" draw:enhanced-path="M 0 0 L 21600 0 21600 21600 0 21600 0 0 Z N"/>
            </draw:custom-shape>
            <draw:custom-shape draw:style-name="gr76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5.597cm">
              <draw:text-box>
                <text:p><text:span text:style-name="T20">IM</text:span></text:p>
              </draw:text-box>
            </draw:frame>
          </draw:g>
        </draw:g>
        <draw:g draw:style-name="gr1">
          <draw:g draw:style-name="gr1">
            <draw:custom-shape draw:style-name="gr767" draw:text-style-name="P14" draw:layer="layout" svg:width="1cm" svg:height="2cm" svg:x="22.999cm" svg:y="15cm">
              <text:p/>
              <draw:enhanced-geometry svg:viewBox="0 0 21600 21600" draw:type="rectangle" draw:enhanced-path="M 0 0 L 21600 0 21600 21600 0 21600 0 0 Z N"/>
            </draw:custom-shape>
            <draw:custom-shape draw:style-name="gr76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5.597cm">
              <draw:text-box>
                <text:p><text:span text:style-name="T20">REG</text:span></text:p>
              </draw:text-box>
            </draw:frame>
          </draw:g>
        </draw:g>
        <draw:g draw:style-name="gr1">
          <draw:g draw:style-name="gr1">
            <draw:custom-shape draw:style-name="gr76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4" draw:text-style-name="P72"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2" draw:text-style-name="P71" draw:layer="layout" svg:width="1.999cm" svg:height="2.999cm" svg:x="30.999cm" svg:y="17.5cm" svg:viewBox="0 0 2000 3000" draw:points="0,0 0,1100 400,1500 0,1900 0,3000 2000,2000 2000,1000">
            <text:p/>
          </draw:polygon>
          <draw:frame draw:style-name="gr763" draw:text-style-name="P62" draw:layer="layout" svg:width="1.466cm" svg:height="0.806cm" svg:x="31.399cm" svg:y="18.594cm">
            <draw:text-box>
              <text:p><text:span text:style-name="T20">ALU</text:span></text:p>
            </draw:text-box>
          </draw:frame>
        </draw:g>
        <draw:g draw:style-name="gr1">
          <draw:g draw:style-name="gr1">
            <draw:custom-shape draw:style-name="gr764" draw:text-style-name="P14" draw:layer="layout" svg:width="1cm" svg:height="2cm" svg:x="22.999cm" svg:y="18cm">
              <text:p/>
              <draw:enhanced-geometry svg:viewBox="0 0 21600 21600" draw:type="rectangle" draw:enhanced-path="M 0 0 L 21600 0 21600 21600 0 21600 0 0 Z N"/>
            </draw:custom-shape>
            <draw:custom-shape draw:style-name="gr76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8.597cm">
              <draw:text-box>
                <text:p><text:span text:style-name="T20">IM</text:span></text:p>
              </draw:text-box>
            </draw:frame>
          </draw:g>
        </draw:g>
        <draw:g draw:style-name="gr1">
          <draw:g draw:style-name="gr1">
            <draw:custom-shape draw:style-name="gr767" draw:text-style-name="P14" draw:layer="layout" svg:width="1cm" svg:height="2cm" svg:x="26.999cm" svg:y="18cm">
              <text:p/>
              <draw:enhanced-geometry svg:viewBox="0 0 21600 21600" draw:type="rectangle" draw:enhanced-path="M 0 0 L 21600 0 21600 21600 0 21600 0 0 Z N"/>
            </draw:custom-shape>
            <draw:custom-shape draw:style-name="gr76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8.597cm">
              <draw:text-box>
                <text:p><text:span text:style-name="T20">REG</text:span></text:p>
              </draw:text-box>
            </draw:frame>
          </draw:g>
        </draw:g>
        <draw:g draw:style-name="gr1">
          <draw:g draw:style-name="gr1">
            <draw:custom-shape draw:style-name="gr76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4" draw:text-style-name="P72"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39" draw:text-style-name="P62" draw:layer="layout" svg:width="3.586cm" svg:height="0.806cm" svg:x="1.011cm" svg:y="15.6cm">
          <draw:text-box>
            <text:p><text:span text:style-name="T20">add </text:span><text:span text:style-name="T20">x9, </text:span><text:span text:style-name="T20">x4, </text:span><text:span text:style-name="T24">x2</text:span></text:p>
          </draw:text-box>
        </draw:frame>
        <draw:frame draw:style-name="gr773" draw:text-style-name="P62" draw:layer="layout" svg:width="3.575cm" svg:height="0.806cm" svg:x="1.012cm" svg:y="18.6cm">
          <draw:text-box>
            <text:p><text:span text:style-name="T20">sub </text:span><text:span text:style-name="T20">x1, </text:span><text:span text:style-name="T20">x6, </text:span><text:span text:style-name="T20">x7</text:span></text:p>
          </draw:text-box>
        </draw:frame>
        <draw:custom-shape draw:style-name="gr77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3cm" svg:y="7.1cm">
          <draw:text-box>
            <text:p><text:span text:style-name="T27">x2</text:span></text:p>
          </draw:text-box>
        </draw:frame>
        <draw:line draw:style-name="gr779" draw:text-style-name="P4" draw:layer="layout" svg:x1="22.2cm" svg:y1="7cm" svg:x2="18.4cm" svg:y2="9.5cm">
          <text:p/>
        </draw:line>
        <draw:line draw:style-name="gr782" draw:text-style-name="P4" draw:layer="layout" svg:x1="22.2cm" svg:y1="7cm" svg:x2="22.5cm" svg:y2="12.5cm">
          <text:p/>
        </draw:line>
        <draw:line draw:style-name="gr782" draw:text-style-name="P4" draw:layer="layout" svg:x1="23.567cm" svg:y1="8cm" svg:x2="24.2cm" svg:y2="15.597cm">
          <text:p/>
        </draw:line>
        <draw:frame draw:style-name="gr840" draw:text-style-name="P62" draw:layer="layout" svg:width="8.513cm" svg:height="0.806cm" svg:x="13.089cm" svg:y="1.9cm">
          <draw:text-box>
            <text:p><text:span text:style-name="T20">Geht </text:span><text:span text:style-name="T20">nicht </text:span><text:span text:style-name="T20">– </text:span><text:span text:style-name="T20">Zuku</text:span><text:span text:style-name="T20">nft </text:span><text:span text:style-name="T20">trotz </text:span><text:span text:style-name="T20">forwa</text:span><text:span text:style-name="T20">rding</text:span></text:p>
          </draw:text-box>
        </draw:frame>
        <draw:line draw:style-name="gr841" draw:text-style-name="P4" draw:layer="layout" svg:x1="18.9cm" svg:y1="2.5cm" svg:x2="20.1cm" svg:y2="8.4cm">
          <text:p/>
        </draw:line>
        <draw:frame draw:style-name="gr837" draw:text-style-name="P62" draw:layer="layout" svg:width="3.585cm" svg:height="0.806cm" svg:x="4.809cm" svg:y="12.6cm">
          <draw:text-box>
            <text:p><text:span text:style-name="T20">and </text:span><text:span text:style-name="T20">x4, </text:span><text:span text:style-name="T24">x2</text:span><text:span text:style-name="T20">, </text:span><text:span text:style-name="T20">x5</text:span></text:p>
          </draw:text-box>
        </draw:frame>
        <draw:frame draw:style-name="gr773" draw:text-style-name="P62" draw:layer="layout" svg:width="3.575cm" svg:height="0.806cm" svg:x="4.81cm" svg:y="15.6cm">
          <draw:text-box>
            <text:p><text:span text:style-name="T20">or x8, </text:span><text:span text:style-name="T24">x2</text:span><text:span text:style-name="T20">, </text:span><text:span text:style-name="T20">x6</text:span></text:p>
          </draw:text-box>
        </draw:frame>
        <draw:frame draw:style-name="gr839" draw:text-style-name="P62" draw:layer="layout" svg:width="3.586cm" svg:height="0.806cm" svg:x="4.811cm" svg:y="18.6cm">
          <draw:text-box>
            <text:p><text:span text:style-name="T20">add </text:span><text:span text:style-name="T20">x9, </text:span><text:span text:style-name="T20">x4, </text:span><text:span text:style-name="T24">x2</text:span></text:p>
          </draw:text-box>
        </draw:frame>
        <draw:frame draw:style-name="gr773" draw:text-style-name="P62" draw:layer="layout" svg:width="3.575cm" svg:height="0.806cm" svg:x="4.812cm" svg:y="21.6cm">
          <draw:text-box>
            <text:p><text:span text:style-name="T20">sub </text:span><text:span text:style-name="T20">x1, </text:span><text:span text:style-name="T20">x6, </text:span><text:span text:style-name="T20">x7</text:span></text:p>
          </draw:text-box>
        </draw:frame>
        <draw:frame draw:style-name="gr842" draw:text-style-name="P62" draw:layer="layout" svg:width="3.58cm" svg:height="0.806cm" svg:x="4.809cm" svg:y="9.6cm">
          <draw:text-box>
            <text:p><text:span text:style-name="T20">nop</text:span></text:p>
          </draw:text-box>
        </draw:frame>
        <draw:line draw:style-name="gr843" draw:text-style-name="P4" draw:layer="layout" svg:x1="22.2cm" svg:y1="7cm" svg:x2="22.8cm" svg:y2="12.5cm">
          <text:p/>
        </draw:line>
        <draw:line draw:style-name="gr843" draw:text-style-name="P4" draw:layer="layout" svg:x1="23.558cm" svg:y1="8cm" svg:x2="24.5cm" svg:y2="15.597cm">
          <text:p/>
        </draw:line>
        <draw:custom-shape draw:style-name="gr834" draw:text-style-name="P81"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44" draw:text-style-name="P62" draw:layer="layout" svg:width="5.828cm" svg:height="0.806cm" svg:x="24cm" svg:y="1.994cm">
          <draw:text-box>
            <text:p><text:span text:style-name="T20">and: </text:span><text:span text:style-name="T20">if_id_</text:span><text:span text:style-name="T20">reg_r</text:span><text:span text:style-name="T20">s1 = </text:span><text:span text:style-name="T20">x2</text:span></text:p>
          </draw:text-box>
        </draw:frame>
        <draw:frame draw:style-name="gr845" draw:text-style-name="P62" draw:layer="layout" svg:width="6.268cm" svg:height="0.806cm" svg:x="24.988cm" svg:y="3cm">
          <draw:text-box>
            <text:p><text:span text:style-name="T20">ld: </text:span><text:span text:style-name="T20">id_ex</text:span><text:span text:style-name="T20">_reg_</text:span><text:span text:style-name="T20">rd = </text:span><text:span text:style-name="T20">x2</text:span></text:p>
          </draw:text-box>
        </draw:frame>
        <draw:frame draw:style-name="gr846" draw:text-style-name="P62" draw:layer="layout" svg:width="5.929cm" svg:height="0.806cm" svg:x="23.988cm" svg:y="1cm">
          <draw:text-box>
            <text:p><text:span text:style-name="T20">ld: </text:span><text:span text:style-name="T20">id_ex</text:span><text:span text:style-name="T20">_me</text:span><text:span text:style-name="T20">mRd </text:span><text:span text:style-name="T20">= 1</text:span></text:p>
          </draw:text-box>
        </draw:frame>
        <draw:line draw:style-name="gr847" draw:text-style-name="P4" draw:layer="layout" svg:x1="25.1cm" svg:y1="2.6cm" svg:x2="13.999cm" svg:y2="9.3cm">
          <text:p/>
        </draw:line>
        <draw:line draw:style-name="gr848" draw:text-style-name="P4" draw:layer="layout" svg:x1="25.7cm" svg:y1="3.6cm" svg:x2="13.999cm" svg:y2="6.2cm">
          <text:p/>
        </draw:line>
        <draw:custom-shape draw:style-name="gr833"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3"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5" draw:text-style-name="P62" draw:layer="layout" svg:width="6.268cm" svg:height="0.806cm" svg:x="24.988cm" svg:y="4cm">
          <draw:text-box>
            <text:p><text:span text:style-name="T20">stall</text:span></text:p>
          </draw:text-box>
        </draw:frame>
        <draw:line draw:style-name="gr849" draw:text-style-name="P4" draw:layer="layout" svg:x1="25.2cm" svg:y1="4.7cm" svg:x2="13.999cm" svg:y2="9.9cm">
          <text:p/>
        </draw:line>
        <draw:line draw:style-name="gr849" draw:text-style-name="P4" draw:layer="layout" svg:x1="25.201cm" svg:y1="4.705cm" svg:x2="10.1cm" svg:y2="10cm">
          <text:p/>
        </draw:line>
      </draw:page>
      <draw:page draw:name="page19" draw:style-name="dp1" draw:master-page-name="Standard">
        <draw:frame draw:style-name="gr759" draw:text-style-name="P34" draw:layer="layout" svg:width="4.807cm" svg:height="3.095cm" svg:x="1cm" svg:y="3.005cm">
          <draw:text-box>
            <text:p><text:span text:style-name="T9">Pro</text:span><text:span text:style-name="T9">gra</text:span><text:span text:style-name="T9">m</text:span></text:p>
            <text:p><text:span text:style-name="T9">exe</text:span><text:span text:style-name="T9">cuti</text:span><text:span text:style-name="T9">on</text:span></text:p>
            <text:p><text:span text:style-name="T9">orde</text:span><text:span text:style-name="T9">r</text:span></text:p>
            <text:p><text:span text:style-name="T9">(in </text:span><text:span text:style-name="T9">instr</text:span><text:span text:style-name="T9">ucti</text:span><text:span text:style-name="T9">ons)</text:span></text:p>
          </draw:text-box>
        </draw:frame>
        <draw:frame draw:style-name="gr850" draw:text-style-name="P62" draw:layer="layout" svg:width="3.613cm" svg:height="0.806cm" svg:x="1.008cm" svg:y="6.6cm">
          <draw:text-box>
            <text:p><text:span text:style-name="T20">add </text:span><text:span text:style-name="T24">x2</text:span><text:span text:style-name="T20">, </text:span><text:span text:style-name="T20">x0, </text:span><text:span text:style-name="T20">16</text:span></text:p>
          </draw:text-box>
        </draw:frame>
        <draw:frame draw:style-name="gr761" draw:text-style-name="P34" draw:layer="layout" svg:width="6.124cm" svg:height="0.962cm" svg:x="5.699cm" svg:y="4.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2" draw:text-style-name="P71" draw:layer="layout" svg:width="1.999cm" svg:height="2.999cm" svg:x="14.999cm" svg:y="5.5cm" svg:viewBox="0 0 2000 3000" draw:points="0,0 0,1100 400,1500 0,1900 0,3000 2000,2000 2000,1000">
            <text:p/>
          </draw:polygon>
          <draw:frame draw:style-name="gr763" draw:text-style-name="P62" draw:layer="layout" svg:width="1.466cm" svg:height="0.806cm" svg:x="15.399cm" svg:y="6.594cm">
            <draw:text-box>
              <text:p><text:span text:style-name="T20">ALU</text:span></text:p>
            </draw:text-box>
          </draw:frame>
        </draw:g>
        <draw:g draw:style-name="gr1">
          <draw:g draw:style-name="gr1">
            <draw:custom-shape draw:style-name="gr764" draw:text-style-name="P14" draw:layer="layout" svg:width="1cm" svg:height="2cm" svg:x="6.999cm" svg:y="6cm">
              <text:p/>
              <draw:enhanced-geometry svg:viewBox="0 0 21600 21600" draw:type="rectangle" draw:enhanced-path="M 0 0 L 21600 0 21600 21600 0 21600 0 0 Z N"/>
            </draw:custom-shape>
            <draw:custom-shape draw:style-name="gr76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6.597cm">
              <draw:text-box>
                <text:p><text:span text:style-name="T20">IM</text:span></text:p>
              </draw:text-box>
            </draw:frame>
          </draw:g>
        </draw:g>
        <draw:g draw:style-name="gr1">
          <draw:g draw:style-name="gr1">
            <draw:custom-shape draw:style-name="gr767" draw:text-style-name="P14" draw:layer="layout" svg:width="1cm" svg:height="2cm" svg:x="10.999cm" svg:y="6cm">
              <text:p/>
              <draw:enhanced-geometry svg:viewBox="0 0 21600 21600" draw:type="rectangle" draw:enhanced-path="M 0 0 L 21600 0 21600 21600 0 21600 0 0 Z N"/>
            </draw:custom-shape>
            <draw:custom-shape draw:style-name="gr76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6.597cm">
              <draw:text-box>
                <text:p><text:span text:style-name="T20">Reg</text:span></text:p>
              </draw:text-box>
            </draw:frame>
          </draw:g>
        </draw:g>
        <draw:g draw:style-name="gr1">
          <draw:g draw:style-name="gr1">
            <draw:custom-shape draw:style-name="gr76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2" draw:text-style-name="P71" draw:layer="layout" svg:width="1.999cm" svg:height="2.999cm" svg:x="18.999cm" svg:y="8.5cm" svg:viewBox="0 0 2000 3000" draw:points="0,0 0,1100 400,1500 0,1900 0,3000 2000,2000 2000,1000">
            <text:p/>
          </draw:polygon>
          <draw:frame draw:style-name="gr763" draw:text-style-name="P62" draw:layer="layout" svg:width="1.466cm" svg:height="0.806cm" svg:x="19.399cm" svg:y="9.594cm">
            <draw:text-box>
              <text:p><text:span text:style-name="T20">ALU</text:span></text:p>
            </draw:text-box>
          </draw:frame>
        </draw:g>
        <draw:g draw:style-name="gr1">
          <draw:g draw:style-name="gr1">
            <draw:custom-shape draw:style-name="gr764" draw:text-style-name="P14" draw:layer="layout" svg:width="1cm" svg:height="2cm" svg:x="10.999cm" svg:y="9cm">
              <text:p/>
              <draw:enhanced-geometry svg:viewBox="0 0 21600 21600" draw:type="rectangle" draw:enhanced-path="M 0 0 L 21600 0 21600 21600 0 21600 0 0 Z N"/>
            </draw:custom-shape>
            <draw:custom-shape draw:style-name="gr76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9.597cm">
              <draw:text-box>
                <text:p><text:span text:style-name="T20">IM</text:span></text:p>
              </draw:text-box>
            </draw:frame>
          </draw:g>
        </draw:g>
        <draw:g draw:style-name="gr1">
          <draw:g draw:style-name="gr1">
            <draw:custom-shape draw:style-name="gr767" draw:text-style-name="P14" draw:layer="layout" svg:width="1cm" svg:height="2cm" svg:x="14.999cm" svg:y="9cm">
              <text:p/>
              <draw:enhanced-geometry svg:viewBox="0 0 21600 21600" draw:type="rectangle" draw:enhanced-path="M 0 0 L 21600 0 21600 21600 0 21600 0 0 Z N"/>
            </draw:custom-shape>
            <draw:custom-shape draw:style-name="gr76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9.597cm">
              <draw:text-box>
                <text:p><text:span text:style-name="T20">REG</text:span></text:p>
              </draw:text-box>
            </draw:frame>
          </draw:g>
        </draw:g>
        <draw:g draw:style-name="gr1">
          <draw:g draw:style-name="gr1">
            <draw:custom-shape draw:style-name="gr76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42" draw:text-style-name="P62" draw:layer="layout" svg:width="3.58cm" svg:height="0.806cm" svg:x="1.009cm" svg:y="9.6cm">
          <draw:text-box>
            <text:p><text:span text:style-name="T20">sd </text:span><text:span text:style-name="T20">x4, </text:span><text:span text:style-name="T20">4(</text:span><text:span text:style-name="T24">x2)</text:span></text:p>
          </draw:text-box>
        </draw:frame>
        <draw:line draw:style-name="gr771" draw:text-style-name="P4" draw:layer="layout" svg:x1="9.999cm" svg:y1="5cm" svg:x2="9.999cm" svg:y2="21cm">
          <text:p/>
        </draw:line>
        <draw:line draw:style-name="gr771" draw:text-style-name="P4" draw:layer="layout" svg:x1="13.999cm" svg:y1="5cm" svg:x2="13.999cm" svg:y2="21cm">
          <text:p/>
        </draw:line>
        <draw:line draw:style-name="gr771" draw:text-style-name="P4" draw:layer="layout" svg:x1="17.999cm" svg:y1="5cm" svg:x2="17.999cm" svg:y2="21cm">
          <text:p/>
        </draw:line>
        <draw:line draw:style-name="gr771" draw:text-style-name="P4" draw:layer="layout" svg:x1="21.999cm" svg:y1="5cm" svg:x2="21.999cm" svg:y2="21cm">
          <text:p/>
        </draw:line>
        <draw:line draw:style-name="gr771" draw:text-style-name="P4" draw:layer="layout" svg:x1="25.999cm" svg:y1="5cm" svg:x2="25.999cm" svg:y2="21cm">
          <text:p/>
        </draw:line>
        <draw:line draw:style-name="gr771" draw:text-style-name="P4" draw:layer="layout" svg:x1="29.999cm" svg:y1="5cm" svg:x2="29.999cm" svg:y2="21cm">
          <text:p/>
        </draw:line>
        <draw:line draw:style-name="gr771" draw:text-style-name="P4" draw:layer="layout" svg:x1="33.999cm" svg:y1="5cm" svg:x2="33.999cm" svg:y2="21cm">
          <text:p/>
        </draw:line>
        <draw:frame draw:style-name="gr772" draw:text-style-name="P34" draw:layer="layout" svg:width="1.949cm" svg:height="0.962cm" svg:x="7.053cm" svg:y="5cm">
          <draw:text-box>
            <text:p><text:span text:style-name="T9">CC </text:span><text:span text:style-name="T9">1</text:span></text:p>
          </draw:text-box>
        </draw:frame>
        <draw:frame draw:style-name="gr772" draw:text-style-name="P34" draw:layer="layout" svg:width="1.949cm" svg:height="0.962cm" svg:x="11.053cm" svg:y="5cm">
          <draw:text-box>
            <text:p><text:span text:style-name="T9">CC </text:span><text:span text:style-name="T9">2</text:span></text:p>
          </draw:text-box>
        </draw:frame>
        <draw:frame draw:style-name="gr772" draw:text-style-name="P34" draw:layer="layout" svg:width="1.949cm" svg:height="0.962cm" svg:x="15.053cm" svg:y="5cm">
          <draw:text-box>
            <text:p><text:span text:style-name="T9">CC </text:span><text:span text:style-name="T9">3</text:span></text:p>
          </draw:text-box>
        </draw:frame>
        <draw:frame draw:style-name="gr772" draw:text-style-name="P34" draw:layer="layout" svg:width="1.949cm" svg:height="0.962cm" svg:x="23.053cm" svg:y="5cm">
          <draw:text-box>
            <text:p><text:span text:style-name="T9">CC </text:span><text:span text:style-name="T9">5</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31.053cm" svg:y="5cm">
          <draw:text-box>
            <text:p><text:span text:style-name="T9">CC </text:span><text:span text:style-name="T9">7</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3" draw:text-style-name="P62" draw:layer="layout" svg:width="3.575cm" svg:height="0.806cm" svg:x="1.01cm" svg:y="12.6cm">
          <draw:text-box>
            <text:p><text:span text:style-name="T20">or x8, </text:span><text:span text:style-name="T24">x2</text:span><text:span text:style-name="T20">, </text:span><text:span text:style-name="T20">x6</text:span></text:p>
          </draw:text-box>
        </draw:frame>
        <draw:frame draw:style-name="gr772" draw:text-style-name="P34" draw:layer="layout" svg:width="1.949cm" svg:height="0.962cm" svg:x="18.999cm" svg:y="5cm">
          <draw:text-box>
            <text:p><text:span text:style-name="T9">CC </text:span><text:span text:style-name="T9">4</text:span></text:p>
          </draw:text-box>
        </draw:frame>
        <draw:g draw:style-name="gr1">
          <draw:g draw:style-name="gr1">
            <draw:custom-shape draw:style-name="gr764" draw:text-style-name="P72"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4" draw:text-style-name="P72"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2" draw:text-style-name="P71" draw:layer="layout" svg:width="1.999cm" svg:height="2.999cm" svg:x="22.999cm" svg:y="11.5cm" svg:viewBox="0 0 2000 3000" draw:points="0,0 0,1100 400,1500 0,1900 0,3000 2000,2000 2000,1000">
            <text:p/>
          </draw:polygon>
          <draw:frame draw:style-name="gr763" draw:text-style-name="P62" draw:layer="layout" svg:width="1.466cm" svg:height="0.806cm" svg:x="23.399cm" svg:y="12.594cm">
            <draw:text-box>
              <text:p><text:span text:style-name="T20">ALU</text:span></text:p>
            </draw:text-box>
          </draw:frame>
        </draw:g>
        <draw:g draw:style-name="gr1">
          <draw:g draw:style-name="gr1">
            <draw:custom-shape draw:style-name="gr764" draw:text-style-name="P14" draw:layer="layout" svg:width="1cm" svg:height="2cm" svg:x="14.999cm" svg:y="12cm">
              <text:p/>
              <draw:enhanced-geometry svg:viewBox="0 0 21600 21600" draw:type="rectangle" draw:enhanced-path="M 0 0 L 21600 0 21600 21600 0 21600 0 0 Z N"/>
            </draw:custom-shape>
            <draw:custom-shape draw:style-name="gr76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2.597cm">
              <draw:text-box>
                <text:p><text:span text:style-name="T20">IM</text:span></text:p>
              </draw:text-box>
            </draw:frame>
          </draw:g>
        </draw:g>
        <draw:g draw:style-name="gr1">
          <draw:g draw:style-name="gr1">
            <draw:custom-shape draw:style-name="gr767" draw:text-style-name="P14" draw:layer="layout" svg:width="1cm" svg:height="2cm" svg:x="18.999cm" svg:y="12cm">
              <text:p/>
              <draw:enhanced-geometry svg:viewBox="0 0 21600 21600" draw:type="rectangle" draw:enhanced-path="M 0 0 L 21600 0 21600 21600 0 21600 0 0 Z N"/>
            </draw:custom-shape>
            <draw:custom-shape draw:style-name="gr76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2.597cm">
              <draw:text-box>
                <text:p><text:span text:style-name="T20">REG</text:span></text:p>
              </draw:text-box>
            </draw:frame>
          </draw:g>
        </draw:g>
        <draw:g draw:style-name="gr1">
          <draw:g draw:style-name="gr1">
            <draw:custom-shape draw:style-name="gr76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4" draw:text-style-name="P72"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51" draw:text-style-name="P34" draw:layer="layout" svg:width="12.961cm" svg:height="0.962cm" svg:x="8.899cm" svg:y="1cm">
          <draw:text-box>
            <text:p><text:span text:style-name="T9">Stor</text:span><text:span text:style-name="T9">e </text:span><text:span text:style-name="T9">follo</text:span><text:span text:style-name="T9">wing </text:span><text:span text:style-name="T9">a R-</text:span><text:span text:style-name="T9">type </text:span><text:span text:style-name="T9">(pre</text:span><text:span text:style-name="T9">pari</text:span><text:span text:style-name="T9">ng </text:span><text:span text:style-name="T9">addr</text:span><text:span text:style-name="T9">ess)</text:span></text:p>
          </draw:text-box>
        </draw:frame>
        <draw:line draw:style-name="gr771" draw:text-style-name="P4" draw:layer="layout" svg:x1="37.999cm" svg:y1="5cm" svg:x2="37.999cm" svg:y2="21cm">
          <text:p/>
        </draw:line>
        <draw:g draw:style-name="gr66">
          <draw:polygon draw:style-name="gr762" draw:text-style-name="P71" draw:layer="layout" svg:width="1.999cm" svg:height="2.999cm" svg:x="26.999cm" svg:y="14.5cm" svg:viewBox="0 0 2000 3000" draw:points="0,0 0,1100 400,1500 0,1900 0,3000 2000,2000 2000,1000">
            <text:p/>
          </draw:polygon>
          <draw:frame draw:style-name="gr763" draw:text-style-name="P62" draw:layer="layout" svg:width="1.466cm" svg:height="0.806cm" svg:x="27.399cm" svg:y="15.594cm">
            <draw:text-box>
              <text:p><text:span text:style-name="T20">ALU</text:span></text:p>
            </draw:text-box>
          </draw:frame>
        </draw:g>
        <draw:g draw:style-name="gr1">
          <draw:g draw:style-name="gr1">
            <draw:custom-shape draw:style-name="gr764" draw:text-style-name="P14" draw:layer="layout" svg:width="1cm" svg:height="2cm" svg:x="18.999cm" svg:y="15cm">
              <text:p/>
              <draw:enhanced-geometry svg:viewBox="0 0 21600 21600" draw:type="rectangle" draw:enhanced-path="M 0 0 L 21600 0 21600 21600 0 21600 0 0 Z N"/>
            </draw:custom-shape>
            <draw:custom-shape draw:style-name="gr76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5.597cm">
              <draw:text-box>
                <text:p><text:span text:style-name="T20">IM</text:span></text:p>
              </draw:text-box>
            </draw:frame>
          </draw:g>
        </draw:g>
        <draw:g draw:style-name="gr1">
          <draw:g draw:style-name="gr1">
            <draw:custom-shape draw:style-name="gr767" draw:text-style-name="P14" draw:layer="layout" svg:width="1cm" svg:height="2cm" svg:x="22.999cm" svg:y="15cm">
              <text:p/>
              <draw:enhanced-geometry svg:viewBox="0 0 21600 21600" draw:type="rectangle" draw:enhanced-path="M 0 0 L 21600 0 21600 21600 0 21600 0 0 Z N"/>
            </draw:custom-shape>
            <draw:custom-shape draw:style-name="gr76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5.597cm">
              <draw:text-box>
                <text:p><text:span text:style-name="T20">REG</text:span></text:p>
              </draw:text-box>
            </draw:frame>
          </draw:g>
        </draw:g>
        <draw:g draw:style-name="gr1">
          <draw:g draw:style-name="gr1">
            <draw:custom-shape draw:style-name="gr76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4" draw:text-style-name="P72"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2" draw:text-style-name="P71" draw:layer="layout" svg:width="1.999cm" svg:height="2.999cm" svg:x="30.999cm" svg:y="17.5cm" svg:viewBox="0 0 2000 3000" draw:points="0,0 0,1100 400,1500 0,1900 0,3000 2000,2000 2000,1000">
            <text:p/>
          </draw:polygon>
          <draw:frame draw:style-name="gr763" draw:text-style-name="P62" draw:layer="layout" svg:width="1.466cm" svg:height="0.806cm" svg:x="31.399cm" svg:y="18.594cm">
            <draw:text-box>
              <text:p><text:span text:style-name="T20">ALU</text:span></text:p>
            </draw:text-box>
          </draw:frame>
        </draw:g>
        <draw:g draw:style-name="gr1">
          <draw:g draw:style-name="gr1">
            <draw:custom-shape draw:style-name="gr764" draw:text-style-name="P14" draw:layer="layout" svg:width="1cm" svg:height="2cm" svg:x="22.999cm" svg:y="18cm">
              <text:p/>
              <draw:enhanced-geometry svg:viewBox="0 0 21600 21600" draw:type="rectangle" draw:enhanced-path="M 0 0 L 21600 0 21600 21600 0 21600 0 0 Z N"/>
            </draw:custom-shape>
            <draw:custom-shape draw:style-name="gr76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8.597cm">
              <draw:text-box>
                <text:p><text:span text:style-name="T20">IM</text:span></text:p>
              </draw:text-box>
            </draw:frame>
          </draw:g>
        </draw:g>
        <draw:g draw:style-name="gr1">
          <draw:g draw:style-name="gr1">
            <draw:custom-shape draw:style-name="gr767" draw:text-style-name="P14" draw:layer="layout" svg:width="1cm" svg:height="2cm" svg:x="26.999cm" svg:y="18cm">
              <text:p/>
              <draw:enhanced-geometry svg:viewBox="0 0 21600 21600" draw:type="rectangle" draw:enhanced-path="M 0 0 L 21600 0 21600 21600 0 21600 0 0 Z N"/>
            </draw:custom-shape>
            <draw:custom-shape draw:style-name="gr76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8.597cm">
              <draw:text-box>
                <text:p><text:span text:style-name="T20">REG</text:span></text:p>
              </draw:text-box>
            </draw:frame>
          </draw:g>
        </draw:g>
        <draw:g draw:style-name="gr1">
          <draw:g draw:style-name="gr1">
            <draw:custom-shape draw:style-name="gr76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4" draw:text-style-name="P72"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39" draw:text-style-name="P62" draw:layer="layout" svg:width="3.586cm" svg:height="0.806cm" svg:x="1.011cm" svg:y="15.6cm">
          <draw:text-box>
            <text:p><text:span text:style-name="T20">add </text:span><text:span text:style-name="T20">x9, </text:span><text:span text:style-name="T20">x4, </text:span><text:span text:style-name="T24">x2</text:span></text:p>
          </draw:text-box>
        </draw:frame>
        <draw:frame draw:style-name="gr773" draw:text-style-name="P62" draw:layer="layout" svg:width="3.575cm" svg:height="0.806cm" svg:x="1.012cm" svg:y="18.6cm">
          <draw:text-box>
            <text:p><text:span text:style-name="T20">sub </text:span><text:span text:style-name="T20">x1, </text:span><text:span text:style-name="T20">x6, </text:span><text:span text:style-name="T20">x7</text:span></text:p>
          </draw:text-box>
        </draw:frame>
        <draw:custom-shape draw:style-name="gr77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3cm" svg:y="7.1cm">
          <draw:text-box>
            <text:p><text:span text:style-name="T27">x2</text:span></text:p>
          </draw:text-box>
        </draw:frame>
        <draw:line draw:style-name="gr779" draw:text-style-name="P4" draw:layer="layout" svg:x1="22.2cm" svg:y1="7cm" svg:x2="18.4cm" svg:y2="9.5cm">
          <text:p/>
        </draw:line>
        <draw:line draw:style-name="gr782" draw:text-style-name="P4" draw:layer="layout" svg:x1="22.2cm" svg:y1="7cm" svg:x2="22.5cm" svg:y2="12.5cm">
          <text:p/>
        </draw:line>
        <draw:line draw:style-name="gr782" draw:text-style-name="P4" draw:layer="layout" svg:x1="23.567cm" svg:y1="8cm" svg:x2="24.2cm" svg:y2="15.597cm">
          <text:p/>
        </draw:line>
        <draw:frame draw:style-name="gr840" draw:text-style-name="P62" draw:layer="layout" svg:width="8.513cm" svg:height="0.806cm" svg:x="13.089cm" svg:y="1.9cm">
          <draw:text-box>
            <text:p><text:span text:style-name="T20">Geht </text:span><text:span text:style-name="T20">nicht </text:span><text:span text:style-name="T20">– </text:span><text:span text:style-name="T20">Zuku</text:span><text:span text:style-name="T20">nft </text:span><text:span text:style-name="T20">trotz </text:span><text:span text:style-name="T20">forwa</text:span><text:span text:style-name="T20">rding</text:span></text:p>
          </draw:text-box>
        </draw:frame>
        <draw:line draw:style-name="gr841" draw:text-style-name="P4" draw:layer="layout" svg:x1="18.9cm" svg:y1="2.5cm" svg:x2="20.1cm" svg:y2="8.4cm">
          <text:p/>
        </draw:line>
        <draw:line draw:style-name="gr843" draw:text-style-name="P4" draw:layer="layout" svg:x1="22.2cm" svg:y1="7cm" svg:x2="22.8cm" svg:y2="12.5cm">
          <text:p/>
        </draw:line>
        <draw:line draw:style-name="gr843" draw:text-style-name="P4" draw:layer="layout" svg:x1="23.558cm" svg:y1="8cm" svg:x2="24.5cm" svg:y2="15.597cm">
          <text:p/>
        </draw:line>
        <draw:frame draw:style-name="gr844" draw:text-style-name="P62" draw:layer="layout" svg:width="5.828cm" svg:height="0.806cm" svg:x="24cm" svg:y="1.994cm">
          <draw:text-box>
            <text:p><text:span text:style-name="T20">add: </text:span><text:span text:style-name="T20">id_ex</text:span><text:span text:style-name="T20">_reg_</text:span><text:span text:style-name="T20">rd = </text:span><text:span text:style-name="T20">x2</text:span></text:p>
          </draw:text-box>
        </draw:frame>
        <draw:frame draw:style-name="gr845" draw:text-style-name="P62" draw:layer="layout" svg:width="6.268cm" svg:height="0.806cm" svg:x="24.988cm" svg:y="3cm">
          <draw:text-box>
            <text:p><text:span text:style-name="T20">sd: </text:span><text:span text:style-name="T20">if_id_</text:span><text:span text:style-name="T20">reg_r</text:span><text:span text:style-name="T20">s1 = </text:span><text:span text:style-name="T20">x2</text:span></text:p>
          </draw:text-box>
        </draw:frame>
        <draw:frame draw:style-name="gr846" draw:text-style-name="P62" draw:layer="layout" svg:width="5.929cm" svg:height="0.806cm" svg:x="23.988cm" svg:y="1cm">
          <draw:text-box>
            <text:p><text:span text:style-name="T20">sd: </text:span><text:span text:style-name="T20">if_id_</text:span><text:span text:style-name="T20">mem</text:span><text:span text:style-name="T20">Wr = </text:span><text:span text:style-name="T20">1</text:span></text:p>
          </draw:text-box>
        </draw:frame>
        <draw:frame draw:style-name="gr845" draw:text-style-name="P62" draw:layer="layout" svg:width="6.268cm" svg:height="0.806cm" svg:x="24.988cm" svg:y="4cm">
          <draw:text-box>
            <text:p><text:span text:style-name="T20">stall</text:span></text:p>
          </draw:text-box>
        </draw:frame>
        <draw:frame draw:style-name="gr852" draw:text-style-name="P62" draw:layer="layout" svg:width="0.777cm" svg:height="0.806cm" svg:x="18.222cm" svg:y="9.7cm">
          <draw:text-box>
            <text:p><text:span text:style-name="T20">4</text:span></text:p>
          </draw:text-box>
        </draw:frame>
        <draw:frame draw:style-name="gr778" draw:text-style-name="P74" draw:layer="layout" svg:width="1.173cm" svg:height="0.962cm" svg:x="15.731cm" svg:y="9cm">
          <draw:text-box>
            <text:p><text:span text:style-name="T27">x2</text:span></text:p>
          </draw:text-box>
        </draw:frame>
        <draw:frame draw:style-name="gr842" draw:text-style-name="P62" draw:layer="layout" svg:width="3.58cm" svg:height="0.806cm" svg:x="5.009cm" svg:y="12.6cm">
          <draw:text-box>
            <text:p><text:span text:style-name="T20">sd </text:span><text:span text:style-name="T20">x4, </text:span><text:span text:style-name="T20">4(</text:span><text:span text:style-name="T24">x2)</text:span></text:p>
          </draw:text-box>
        </draw:frame>
        <draw:frame draw:style-name="gr773" draw:text-style-name="P62" draw:layer="layout" svg:width="3.575cm" svg:height="0.806cm" svg:x="5.01cm" svg:y="15.6cm">
          <draw:text-box>
            <text:p><text:span text:style-name="T20">or x8, </text:span><text:span text:style-name="T24">x2</text:span><text:span text:style-name="T20">, </text:span><text:span text:style-name="T20">x6</text:span></text:p>
          </draw:text-box>
        </draw:frame>
        <draw:frame draw:style-name="gr839" draw:text-style-name="P62" draw:layer="layout" svg:width="3.586cm" svg:height="0.806cm" svg:x="5.011cm" svg:y="18.6cm">
          <draw:text-box>
            <text:p><text:span text:style-name="T20">add </text:span><text:span text:style-name="T20">x9, </text:span><text:span text:style-name="T20">x4, </text:span><text:span text:style-name="T24">x2</text:span></text:p>
          </draw:text-box>
        </draw:frame>
        <draw:frame draw:style-name="gr773" draw:text-style-name="P62" draw:layer="layout" svg:width="3.575cm" svg:height="0.806cm" svg:x="5.012cm" svg:y="21.6cm">
          <draw:text-box>
            <text:p><text:span text:style-name="T20">sub </text:span><text:span text:style-name="T20">x1, </text:span><text:span text:style-name="T20">x6, </text:span><text:span text:style-name="T20">x7</text:span></text:p>
          </draw:text-box>
        </draw:frame>
        <draw:frame draw:style-name="gr842" draw:text-style-name="P62" draw:layer="layout" svg:width="3.58cm" svg:height="0.806cm" svg:x="5.009cm" svg:y="9.6cm">
          <draw:text-box>
            <text:p><text:span text:style-name="T20">nop</text:span></text:p>
          </draw:text-box>
        </draw:frame>
        <draw:line draw:style-name="gr847" draw:text-style-name="P4" draw:layer="layout" svg:x1="25.101cm" svg:y1="2.6cm" svg:x2="13.999cm" svg:y2="6.241cm">
          <text:p/>
        </draw:line>
        <draw:line draw:style-name="gr848" draw:text-style-name="P4" draw:layer="layout" svg:x1="25.701cm" svg:y1="3.641cm" svg:x2="14.025cm" svg:y2="9.001cm">
          <text:p/>
        </draw:line>
        <draw:custom-shape draw:style-name="gr833"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3"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9" draw:text-style-name="P4" draw:layer="layout" svg:x1="25.227cm" svg:y1="4.713cm" svg:x2="10.126cm" svg:y2="10.008cm">
          <text:p/>
        </draw:line>
        <draw:line draw:style-name="gr849" draw:text-style-name="P4" draw:layer="layout" svg:x1="25.226cm" svg:y1="4.683cm" svg:x2="14.025cm" svg:y2="9.883cm">
          <text:p/>
        </draw:line>
        <draw:custom-shape draw:style-name="gr834" draw:text-style-name="P81"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0" draw:style-name="dp1" draw:master-page-name="Standard">
        <draw:custom-shape draw:style-name="gr833"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9" draw:text-style-name="P34" draw:layer="layout" svg:width="4.807cm" svg:height="3.095cm" svg:x="1cm" svg:y="3.005cm">
          <draw:text-box>
            <text:p><text:span text:style-name="T9">Pro</text:span><text:span text:style-name="T9">gra</text:span><text:span text:style-name="T9">m</text:span></text:p>
            <text:p><text:span text:style-name="T9">exe</text:span><text:span text:style-name="T9">cuti</text:span><text:span text:style-name="T9">on</text:span></text:p>
            <text:p><text:span text:style-name="T9">orde</text:span><text:span text:style-name="T9">r</text:span></text:p>
            <text:p><text:span text:style-name="T9">(in </text:span><text:span text:style-name="T9">instr</text:span><text:span text:style-name="T9">ucti</text:span><text:span text:style-name="T9">ons)</text:span></text:p>
          </draw:text-box>
        </draw:frame>
        <draw:frame draw:style-name="gr853" draw:text-style-name="P62" draw:layer="layout" svg:width="3.605cm" svg:height="0.806cm" svg:x="1.008cm" svg:y="6.6cm">
          <draw:text-box>
            <text:p><text:span text:style-name="T20">slli </text:span><text:span text:style-name="T24">x2</text:span><text:span text:style-name="T20">, </text:span><text:span text:style-name="T20">x2, 8</text:span></text:p>
          </draw:text-box>
        </draw:frame>
        <draw:frame draw:style-name="gr761" draw:text-style-name="P34" draw:layer="layout" svg:width="6.124cm" svg:height="0.962cm" svg:x="5.699cm" svg:y="4.038cm">
          <draw:text-box>
            <text:p><text:span text:style-name="T9">Tim</text:span><text:span text:style-name="T9">e 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2" draw:text-style-name="P71" draw:layer="layout" svg:width="1.999cm" svg:height="2.999cm" svg:x="14.999cm" svg:y="5.5cm" svg:viewBox="0 0 2000 3000" draw:points="0,0 0,1100 400,1500 0,1900 0,3000 2000,2000 2000,1000">
            <text:p/>
          </draw:polygon>
          <draw:frame draw:style-name="gr763" draw:text-style-name="P62" draw:layer="layout" svg:width="1.466cm" svg:height="0.806cm" svg:x="15.399cm" svg:y="6.594cm">
            <draw:text-box>
              <text:p><text:span text:style-name="T20">ALU</text:span></text:p>
            </draw:text-box>
          </draw:frame>
        </draw:g>
        <draw:g draw:style-name="gr1">
          <draw:g draw:style-name="gr1">
            <draw:custom-shape draw:style-name="gr764" draw:text-style-name="P14" draw:layer="layout" svg:width="1cm" svg:height="2cm" svg:x="6.999cm" svg:y="6cm">
              <text:p/>
              <draw:enhanced-geometry svg:viewBox="0 0 21600 21600" draw:type="rectangle" draw:enhanced-path="M 0 0 L 21600 0 21600 21600 0 21600 0 0 Z N"/>
            </draw:custom-shape>
            <draw:custom-shape draw:style-name="gr76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7.528cm" svg:y="6.597cm">
              <draw:text-box>
                <text:p><text:span text:style-name="T20">IM</text:span></text:p>
              </draw:text-box>
            </draw:frame>
          </draw:g>
        </draw:g>
        <draw:g draw:style-name="gr1">
          <draw:g draw:style-name="gr1">
            <draw:custom-shape draw:style-name="gr767" draw:text-style-name="P14" draw:layer="layout" svg:width="1cm" svg:height="2cm" svg:x="10.999cm" svg:y="6cm">
              <text:p/>
              <draw:enhanced-geometry svg:viewBox="0 0 21600 21600" draw:type="rectangle" draw:enhanced-path="M 0 0 L 21600 0 21600 21600 0 21600 0 0 Z N"/>
            </draw:custom-shape>
            <draw:custom-shape draw:style-name="gr76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68" draw:text-style-name="P62" draw:layer="layout" svg:width="1.411cm" svg:height="0.806cm" svg:x="11.528cm" svg:y="6.597cm">
              <draw:text-box>
                <text:p><text:span text:style-name="T20">Reg</text:span></text:p>
              </draw:text-box>
            </draw:frame>
          </draw:g>
        </draw:g>
        <draw:g draw:style-name="gr1">
          <draw:g draw:style-name="gr1">
            <draw:custom-shape draw:style-name="gr76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2" draw:text-style-name="P71" draw:layer="layout" svg:width="1.999cm" svg:height="2.999cm" svg:x="18.999cm" svg:y="8.5cm" svg:viewBox="0 0 2000 3000" draw:points="0,0 0,1100 400,1500 0,1900 0,3000 2000,2000 2000,1000">
            <text:p/>
          </draw:polygon>
          <draw:frame draw:style-name="gr763" draw:text-style-name="P62" draw:layer="layout" svg:width="1.466cm" svg:height="0.806cm" svg:x="19.399cm" svg:y="9.594cm">
            <draw:text-box>
              <text:p><text:span text:style-name="T20">ALU</text:span></text:p>
            </draw:text-box>
          </draw:frame>
        </draw:g>
        <draw:g draw:style-name="gr1">
          <draw:g draw:style-name="gr1">
            <draw:custom-shape draw:style-name="gr764" draw:text-style-name="P14" draw:layer="layout" svg:width="1cm" svg:height="2cm" svg:x="10.999cm" svg:y="9cm">
              <text:p/>
              <draw:enhanced-geometry svg:viewBox="0 0 21600 21600" draw:type="rectangle" draw:enhanced-path="M 0 0 L 21600 0 21600 21600 0 21600 0 0 Z N"/>
            </draw:custom-shape>
            <draw:custom-shape draw:style-name="gr76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1.528cm" svg:y="9.597cm">
              <draw:text-box>
                <text:p><text:span text:style-name="T20">IM</text:span></text:p>
              </draw:text-box>
            </draw:frame>
          </draw:g>
        </draw:g>
        <draw:g draw:style-name="gr1">
          <draw:g draw:style-name="gr1">
            <draw:custom-shape draw:style-name="gr767" draw:text-style-name="P14" draw:layer="layout" svg:width="1cm" svg:height="2cm" svg:x="14.999cm" svg:y="9cm">
              <text:p/>
              <draw:enhanced-geometry svg:viewBox="0 0 21600 21600" draw:type="rectangle" draw:enhanced-path="M 0 0 L 21600 0 21600 21600 0 21600 0 0 Z N"/>
            </draw:custom-shape>
            <draw:custom-shape draw:style-name="gr76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5.528cm" svg:y="9.597cm">
              <draw:text-box>
                <text:p><text:span text:style-name="T20">REG</text:span></text:p>
              </draw:text-box>
            </draw:frame>
          </draw:g>
        </draw:g>
        <draw:g draw:style-name="gr1">
          <draw:g draw:style-name="gr1">
            <draw:custom-shape draw:style-name="gr76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42" draw:text-style-name="P62" draw:layer="layout" svg:width="3.58cm" svg:height="0.806cm" svg:x="1.009cm" svg:y="9.6cm">
          <draw:text-box>
            <text:p><text:span text:style-name="T20">ld x3, </text:span><text:span text:style-name="T20">0(</text:span><text:span text:style-name="T24">x2)</text:span></text:p>
          </draw:text-box>
        </draw:frame>
        <draw:line draw:style-name="gr771" draw:text-style-name="P4" draw:layer="layout" svg:x1="9.999cm" svg:y1="5cm" svg:x2="9.999cm" svg:y2="21cm">
          <text:p/>
        </draw:line>
        <draw:line draw:style-name="gr771" draw:text-style-name="P4" draw:layer="layout" svg:x1="13.999cm" svg:y1="5cm" svg:x2="13.999cm" svg:y2="21cm">
          <text:p/>
        </draw:line>
        <draw:line draw:style-name="gr771" draw:text-style-name="P4" draw:layer="layout" svg:x1="17.999cm" svg:y1="5cm" svg:x2="17.999cm" svg:y2="21cm">
          <text:p/>
        </draw:line>
        <draw:line draw:style-name="gr771" draw:text-style-name="P4" draw:layer="layout" svg:x1="21.999cm" svg:y1="5cm" svg:x2="21.999cm" svg:y2="21cm">
          <text:p/>
        </draw:line>
        <draw:line draw:style-name="gr771" draw:text-style-name="P4" draw:layer="layout" svg:x1="25.999cm" svg:y1="5cm" svg:x2="25.999cm" svg:y2="21cm">
          <text:p/>
        </draw:line>
        <draw:line draw:style-name="gr771" draw:text-style-name="P4" draw:layer="layout" svg:x1="29.999cm" svg:y1="5cm" svg:x2="29.999cm" svg:y2="21cm">
          <text:p/>
        </draw:line>
        <draw:line draw:style-name="gr771" draw:text-style-name="P4" draw:layer="layout" svg:x1="33.999cm" svg:y1="5cm" svg:x2="33.999cm" svg:y2="21cm">
          <text:p/>
        </draw:line>
        <draw:frame draw:style-name="gr772" draw:text-style-name="P34" draw:layer="layout" svg:width="1.949cm" svg:height="0.962cm" svg:x="7.053cm" svg:y="5cm">
          <draw:text-box>
            <text:p><text:span text:style-name="T9">CC </text:span><text:span text:style-name="T9">1</text:span></text:p>
          </draw:text-box>
        </draw:frame>
        <draw:frame draw:style-name="gr772" draw:text-style-name="P34" draw:layer="layout" svg:width="1.949cm" svg:height="0.962cm" svg:x="11.053cm" svg:y="5cm">
          <draw:text-box>
            <text:p><text:span text:style-name="T9">CC </text:span><text:span text:style-name="T9">2</text:span></text:p>
          </draw:text-box>
        </draw:frame>
        <draw:frame draw:style-name="gr772" draw:text-style-name="P34" draw:layer="layout" svg:width="1.949cm" svg:height="0.962cm" svg:x="15.053cm" svg:y="5cm">
          <draw:text-box>
            <text:p><text:span text:style-name="T9">CC </text:span><text:span text:style-name="T9">3</text:span></text:p>
          </draw:text-box>
        </draw:frame>
        <draw:frame draw:style-name="gr772" draw:text-style-name="P34" draw:layer="layout" svg:width="1.949cm" svg:height="0.962cm" svg:x="23.053cm" svg:y="5cm">
          <draw:text-box>
            <text:p><text:span text:style-name="T9">CC </text:span><text:span text:style-name="T9">5</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31.053cm" svg:y="5cm">
          <draw:text-box>
            <text:p><text:span text:style-name="T9">CC </text:span><text:span text:style-name="T9">7</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2" draw:text-style-name="P34" draw:layer="layout" svg:width="1.949cm" svg:height="0.962cm" svg:x="27.053cm" svg:y="5cm">
          <draw:text-box>
            <text:p><text:span text:style-name="T9">CC </text:span><text:span text:style-name="T9">6</text:span></text:p>
          </draw:text-box>
        </draw:frame>
        <draw:frame draw:style-name="gr773" draw:text-style-name="P62" draw:layer="layout" svg:width="3.575cm" svg:height="0.806cm" svg:x="1.01cm" svg:y="12.6cm">
          <draw:text-box>
            <text:p><text:span text:style-name="T20">sd </text:span><text:span text:style-name="T20">x3, </text:span><text:span text:style-name="T20">4(</text:span><text:span text:style-name="T24">x2</text:span><text:span text:style-name="T20">)</text:span></text:p>
          </draw:text-box>
        </draw:frame>
        <draw:frame draw:style-name="gr772" draw:text-style-name="P34" draw:layer="layout" svg:width="1.949cm" svg:height="0.962cm" svg:x="18.999cm" svg:y="5cm">
          <draw:text-box>
            <text:p><text:span text:style-name="T9">CC </text:span><text:span text:style-name="T9">4</text:span></text:p>
          </draw:text-box>
        </draw:frame>
        <draw:g draw:style-name="gr1">
          <draw:g draw:style-name="gr1">
            <draw:custom-shape draw:style-name="gr764" draw:text-style-name="P72"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19.365cm" svg:y="6.599cm">
            <draw:text-box>
              <text:p><text:span text:style-name="T20">DM</text:span></text:p>
            </draw:text-box>
          </draw:frame>
        </draw:g>
        <draw:line draw:style-name="gr797" draw:text-style-name="P4" draw:layer="layout" svg:x1="18.499cm" svg:y1="7cm" svg:x2="18.499cm" svg:y2="8.2cm">
          <text:p/>
        </draw:line>
        <draw:line draw:style-name="gr797" draw:text-style-name="P4" draw:layer="layout" svg:x1="18.499cm" svg:y1="8.2cm" svg:x2="21.499cm" svg:y2="8.2cm">
          <text:p/>
        </draw:line>
        <draw:line draw:style-name="gr797" draw:text-style-name="P4" draw:layer="layout" svg:x1="21.499cm" svg:y1="8.2cm" svg:x2="21.999cm" svg:y2="7cm">
          <text:p/>
        </draw:line>
        <draw:g draw:style-name="gr1">
          <draw:g draw:style-name="gr1">
            <draw:custom-shape draw:style-name="gr764" draw:text-style-name="P72"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2" draw:text-style-name="P71" draw:layer="layout" svg:width="1.999cm" svg:height="2.999cm" svg:x="22.999cm" svg:y="11.5cm" svg:viewBox="0 0 2000 3000" draw:points="0,0 0,1100 400,1500 0,1900 0,3000 2000,2000 2000,1000">
            <text:p/>
          </draw:polygon>
          <draw:frame draw:style-name="gr763" draw:text-style-name="P62" draw:layer="layout" svg:width="1.466cm" svg:height="0.806cm" svg:x="23.399cm" svg:y="12.594cm">
            <draw:text-box>
              <text:p><text:span text:style-name="T20">ALU</text:span></text:p>
            </draw:text-box>
          </draw:frame>
        </draw:g>
        <draw:g draw:style-name="gr1">
          <draw:g draw:style-name="gr1">
            <draw:custom-shape draw:style-name="gr764" draw:text-style-name="P14" draw:layer="layout" svg:width="1cm" svg:height="2cm" svg:x="14.999cm" svg:y="12cm">
              <text:p/>
              <draw:enhanced-geometry svg:viewBox="0 0 21600 21600" draw:type="rectangle" draw:enhanced-path="M 0 0 L 21600 0 21600 21600 0 21600 0 0 Z N"/>
            </draw:custom-shape>
            <draw:custom-shape draw:style-name="gr76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5.528cm" svg:y="12.597cm">
              <draw:text-box>
                <text:p><text:span text:style-name="T20">IM</text:span></text:p>
              </draw:text-box>
            </draw:frame>
          </draw:g>
        </draw:g>
        <draw:g draw:style-name="gr1">
          <draw:g draw:style-name="gr1">
            <draw:custom-shape draw:style-name="gr767" draw:text-style-name="P14" draw:layer="layout" svg:width="1cm" svg:height="2cm" svg:x="18.999cm" svg:y="12cm">
              <text:p/>
              <draw:enhanced-geometry svg:viewBox="0 0 21600 21600" draw:type="rectangle" draw:enhanced-path="M 0 0 L 21600 0 21600 21600 0 21600 0 0 Z N"/>
            </draw:custom-shape>
            <draw:custom-shape draw:style-name="gr76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19.528cm" svg:y="12.597cm">
              <draw:text-box>
                <text:p><text:span text:style-name="T20">REG</text:span></text:p>
              </draw:text-box>
            </draw:frame>
          </draw:g>
        </draw:g>
        <draw:g draw:style-name="gr1">
          <draw:g draw:style-name="gr1">
            <draw:custom-shape draw:style-name="gr76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4" draw:text-style-name="P72"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51" draw:text-style-name="P34" draw:layer="layout" svg:width="12.961cm" svg:height="0.962cm" svg:x="8.899cm" svg:y="1cm">
          <draw:text-box>
            <text:p><text:span text:style-name="T9">slli </text:span><text:span text:style-name="T9">→ ld </text:span><text:span text:style-name="T9">→ </text:span><text:span text:style-name="T9">sd</text:span></text:p>
          </draw:text-box>
        </draw:frame>
        <draw:line draw:style-name="gr771" draw:text-style-name="P4" draw:layer="layout" svg:x1="37.999cm" svg:y1="5cm" svg:x2="37.999cm" svg:y2="21cm">
          <text:p/>
        </draw:line>
        <draw:g draw:style-name="gr66">
          <draw:polygon draw:style-name="gr762" draw:text-style-name="P71" draw:layer="layout" svg:width="1.999cm" svg:height="2.999cm" svg:x="26.999cm" svg:y="14.5cm" svg:viewBox="0 0 2000 3000" draw:points="0,0 0,1100 400,1500 0,1900 0,3000 2000,2000 2000,1000">
            <text:p/>
          </draw:polygon>
          <draw:frame draw:style-name="gr763" draw:text-style-name="P62" draw:layer="layout" svg:width="1.466cm" svg:height="0.806cm" svg:x="27.399cm" svg:y="15.594cm">
            <draw:text-box>
              <text:p><text:span text:style-name="T20">ALU</text:span></text:p>
            </draw:text-box>
          </draw:frame>
        </draw:g>
        <draw:g draw:style-name="gr1">
          <draw:g draw:style-name="gr1">
            <draw:custom-shape draw:style-name="gr764" draw:text-style-name="P14" draw:layer="layout" svg:width="1cm" svg:height="2cm" svg:x="18.999cm" svg:y="15cm">
              <text:p/>
              <draw:enhanced-geometry svg:viewBox="0 0 21600 21600" draw:type="rectangle" draw:enhanced-path="M 0 0 L 21600 0 21600 21600 0 21600 0 0 Z N"/>
            </draw:custom-shape>
            <draw:custom-shape draw:style-name="gr76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19.528cm" svg:y="15.597cm">
              <draw:text-box>
                <text:p><text:span text:style-name="T20">IM</text:span></text:p>
              </draw:text-box>
            </draw:frame>
          </draw:g>
        </draw:g>
        <draw:g draw:style-name="gr1">
          <draw:g draw:style-name="gr1">
            <draw:custom-shape draw:style-name="gr767" draw:text-style-name="P14" draw:layer="layout" svg:width="1cm" svg:height="2cm" svg:x="22.999cm" svg:y="15cm">
              <text:p/>
              <draw:enhanced-geometry svg:viewBox="0 0 21600 21600" draw:type="rectangle" draw:enhanced-path="M 0 0 L 21600 0 21600 21600 0 21600 0 0 Z N"/>
            </draw:custom-shape>
            <draw:custom-shape draw:style-name="gr76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3.528cm" svg:y="15.597cm">
              <draw:text-box>
                <text:p><text:span text:style-name="T20">REG</text:span></text:p>
              </draw:text-box>
            </draw:frame>
          </draw:g>
        </draw:g>
        <draw:g draw:style-name="gr1">
          <draw:g draw:style-name="gr1">
            <draw:custom-shape draw:style-name="gr76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4" draw:text-style-name="P72"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2" draw:text-style-name="P71" draw:layer="layout" svg:width="1.999cm" svg:height="2.999cm" svg:x="30.999cm" svg:y="17.5cm" svg:viewBox="0 0 2000 3000" draw:points="0,0 0,1100 400,1500 0,1900 0,3000 2000,2000 2000,1000">
            <text:p/>
          </draw:polygon>
          <draw:frame draw:style-name="gr763" draw:text-style-name="P62" draw:layer="layout" svg:width="1.466cm" svg:height="0.806cm" svg:x="31.399cm" svg:y="18.594cm">
            <draw:text-box>
              <text:p><text:span text:style-name="T20">ALU</text:span></text:p>
            </draw:text-box>
          </draw:frame>
        </draw:g>
        <draw:g draw:style-name="gr1">
          <draw:g draw:style-name="gr1">
            <draw:custom-shape draw:style-name="gr764" draw:text-style-name="P14" draw:layer="layout" svg:width="1cm" svg:height="2cm" svg:x="22.999cm" svg:y="18cm">
              <text:p/>
              <draw:enhanced-geometry svg:viewBox="0 0 21600 21600" draw:type="rectangle" draw:enhanced-path="M 0 0 L 21600 0 21600 21600 0 21600 0 0 Z N"/>
            </draw:custom-shape>
            <draw:custom-shape draw:style-name="gr76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6" draw:text-style-name="P62" draw:layer="layout" svg:width="1.052cm" svg:height="0.806cm" svg:x="23.528cm" svg:y="18.597cm">
              <draw:text-box>
                <text:p><text:span text:style-name="T20">IM</text:span></text:p>
              </draw:text-box>
            </draw:frame>
          </draw:g>
        </draw:g>
        <draw:g draw:style-name="gr1">
          <draw:g draw:style-name="gr1">
            <draw:custom-shape draw:style-name="gr767" draw:text-style-name="P14" draw:layer="layout" svg:width="1cm" svg:height="2cm" svg:x="26.999cm" svg:y="18cm">
              <text:p/>
              <draw:enhanced-geometry svg:viewBox="0 0 21600 21600" draw:type="rectangle" draw:enhanced-path="M 0 0 L 21600 0 21600 21600 0 21600 0 0 Z N"/>
            </draw:custom-shape>
            <draw:custom-shape draw:style-name="gr76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69" draw:text-style-name="P62" draw:layer="layout" svg:width="1.575cm" svg:height="0.806cm" svg:x="27.528cm" svg:y="18.597cm">
              <draw:text-box>
                <text:p><text:span text:style-name="T20">REG</text:span></text:p>
              </draw:text-box>
            </draw:frame>
          </draw:g>
        </draw:g>
        <draw:g draw:style-name="gr1">
          <draw:g draw:style-name="gr1">
            <draw:custom-shape draw:style-name="gr76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68" draw:text-style-name="P62"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4" draw:text-style-name="P72"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4" draw:text-style-name="P73"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5" draw:text-style-name="P62"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42" draw:text-style-name="P62" draw:layer="layout" svg:width="3.58cm" svg:height="0.806cm" svg:x="1.011cm" svg:y="15.6cm">
          <draw:text-box>
            <text:p><text:span text:style-name="T20">jal x0, </text:span><text:span text:style-name="T20">done</text:span></text:p>
          </draw:text-box>
        </draw:frame>
        <draw:frame draw:style-name="gr854" draw:text-style-name="P62" draw:layer="layout" svg:width="4.165cm" svg:height="0.806cm" svg:x="1.012cm" svg:y="18.6cm">
          <draw:text-box>
            <text:p><text:span text:style-name="T20">beq </text:span><text:span text:style-name="T20">x2, </text:span><text:span text:style-name="T20">x2, </text:span><text:span text:style-name="T20">done</text:span></text:p>
          </draw:text-box>
        </draw:frame>
        <draw:custom-shape draw:style-name="gr77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8" draw:text-style-name="P74" draw:layer="layout" svg:width="1.173cm" svg:height="0.962cm" svg:x="23.13cm" svg:y="7.1cm">
          <draw:text-box>
            <text:p><text:span text:style-name="T27">x2</text:span></text:p>
          </draw:text-box>
        </draw:frame>
        <draw:frame draw:style-name="gr855" draw:text-style-name="P62" draw:layer="layout" svg:width="1.412cm" svg:height="0.806cm" svg:x="19.587cm" svg:y="8.594cm">
          <draw:text-box>
            <text:p><text:span text:style-name="T20">stall</text:span></text:p>
          </draw:text-box>
        </draw:frame>
        <draw:frame draw:style-name="gr852" draw:text-style-name="P62" draw:layer="layout" svg:width="0.777cm" svg:height="0.806cm" svg:x="18.222cm" svg:y="9.9cm">
          <draw:text-box>
            <text:p><text:span text:style-name="T20">0</text:span></text:p>
          </draw:text-box>
        </draw:frame>
        <draw:frame draw:style-name="gr778" draw:text-style-name="P74" draw:layer="layout" svg:width="1.173cm" svg:height="0.962cm" svg:x="15.831cm" svg:y="9cm">
          <draw:text-box>
            <text:p><text:span text:style-name="T27">x2</text:span></text:p>
          </draw:text-box>
        </draw:frame>
        <draw:frame draw:style-name="gr778" draw:text-style-name="P74" draw:layer="layout" svg:width="1.173cm" svg:height="0.962cm" svg:x="19.932cm" svg:y="11.9cm">
          <draw:text-box>
            <text:p><text:span text:style-name="T27">x2</text:span></text:p>
          </draw:text-box>
        </draw:frame>
        <draw:frame draw:style-name="gr856" draw:text-style-name="P75" draw:layer="layout" svg:width="2.15cm" svg:height="0.569cm" svg:x="16.762cm" svg:y="6.531cm">
          <draw:text-box>
            <text:p><text:span text:style-name="T28">res=0x10</text:span><text:span text:style-name="T28">000</text:span></text:p>
          </draw:text-box>
        </draw:frame>
        <draw:frame draw:style-name="gr857" draw:text-style-name="P75" draw:layer="layout" svg:width="2.04cm" svg:height="0.569cm" svg:x="12.848cm" svg:y="6.031cm">
          <draw:text-box>
            <text:p><text:span text:style-name="T28">regA=0x1</text:span><text:span text:style-name="T28">00</text:span></text:p>
          </draw:text-box>
        </draw:frame>
        <draw:frame draw:style-name="gr858" draw:text-style-name="P75" draw:layer="layout" svg:width="1.361cm" svg:height="0.569cm" svg:x="12.849cm" svg:y="7.032cm">
          <draw:text-box>
            <text:p><text:span text:style-name="T28">imm=8</text:span></text:p>
          </draw:text-box>
        </draw:frame>
        <draw:frame draw:style-name="gr859" draw:text-style-name="P75" draw:layer="layout" svg:width="0.98cm" svg:height="0.569cm" svg:x="15.05cm" svg:y="7.233cm">
          <draw:text-box>
            <text:p><text:span text:style-name="T28">slli</text:span></text:p>
          </draw:text-box>
        </draw:frame>
        <draw:frame draw:style-name="gr816" draw:text-style-name="P75" draw:layer="layout" svg:width="2.055cm" svg:height="0.569cm" svg:x="22.9cm" svg:y="6.231cm">
          <draw:text-box>
            <text:p><text:span text:style-name="T28">x2=0x100</text:span><text:span text:style-name="T28">00</text:span></text:p>
          </draw:text-box>
        </draw:frame>
        <draw:frame draw:style-name="gr801" draw:text-style-name="P75" draw:layer="layout" svg:width="2.481cm" svg:height="0.569cm" svg:x="12.921cm" svg:y="5cm">
          <draw:text-box>
            <text:p><text:span text:style-name="T28">id_ex_reg</text:span><text:span text:style-name="T28">_rd=2</text:span></text:p>
          </draw:text-box>
        </draw:frame>
        <draw:frame draw:style-name="gr804" draw:text-style-name="P75" draw:layer="layout" svg:width="2.891cm" svg:height="0.569cm" svg:x="16.522cm" svg:y="5.001cm">
          <draw:text-box>
            <text:p><text:span text:style-name="T28">ex_mem_</text:span><text:span text:style-name="T28">reg_rd=2</text:span></text:p>
          </draw:text-box>
        </draw:frame>
        <draw:frame draw:style-name="gr807" draw:text-style-name="P75" draw:layer="layout" svg:width="2.954cm" svg:height="0.569cm" svg:x="20.422cm" svg:y="5.002cm">
          <draw:text-box>
            <text:p><text:span text:style-name="T28">mem_wb</text:span><text:span text:style-name="T28">_reg_rd=</text:span><text:span text:style-name="T28">2</text:span></text:p>
          </draw:text-box>
        </draw:frame>
        <draw:frame draw:style-name="gr799" draw:text-style-name="P75" draw:layer="layout" svg:width="2.465cm" svg:height="0.569cm" svg:x="12.822cm" svg:y="9.001cm">
          <draw:text-box>
            <text:p><text:span text:style-name="T28">if_id_reg_</text:span><text:span text:style-name="T28">rs1=2</text:span></text:p>
          </draw:text-box>
        </draw:frame>
        <draw:frame draw:style-name="gr802" draw:text-style-name="P75" draw:layer="layout" svg:width="2.623cm" svg:height="0.569cm" svg:x="16.822cm" svg:y="9.002cm">
          <draw:text-box>
            <text:p><text:span text:style-name="T28">id_ex_reg</text:span><text:span text:style-name="T28">_rs1=2</text:span></text:p>
          </draw:text-box>
        </draw:frame>
        <draw:frame draw:style-name="gr805" draw:text-style-name="P75" draw:layer="layout" svg:width="3.032cm" svg:height="0.569cm" svg:x="20.523cm" svg:y="9.003cm">
          <draw:text-box>
            <text:p><text:span text:style-name="T28">ex_mem_</text:span><text:span text:style-name="T28">reg_rs1=2</text:span></text:p>
          </draw:text-box>
        </draw:frame>
        <draw:frame draw:style-name="gr856" draw:text-style-name="P75" draw:layer="layout" svg:width="2.15cm" svg:height="0.569cm" svg:x="20.863cm" svg:y="6.532cm">
          <draw:text-box>
            <text:p><text:span text:style-name="T28">res=0x10</text:span><text:span text:style-name="T28">000</text:span></text:p>
          </draw:text-box>
        </draw:frame>
        <draw:frame draw:style-name="gr860" draw:text-style-name="P75" draw:layer="layout" svg:width="1.74cm" svg:height="0.569cm" svg:x="14.999cm" svg:y="10.1cm">
          <draw:text-box>
            <text:p><text:span text:style-name="T28">x2=0x100</text:span></text:p>
          </draw:text-box>
        </draw:frame>
        <draw:frame draw:style-name="gr860" draw:text-style-name="P75" draw:layer="layout" svg:width="1.74cm" svg:height="0.569cm" svg:x="19.199cm" svg:y="13.201cm">
          <draw:text-box>
            <text:p><text:span text:style-name="T28">x2=0x100</text:span></text:p>
          </draw:text-box>
        </draw:frame>
        <draw:frame draw:style-name="gr799" draw:text-style-name="P75" draw:layer="layout" svg:width="2.465cm" svg:height="0.569cm" svg:x="16.822cm" svg:y="12.002cm">
          <draw:text-box>
            <text:p><text:span text:style-name="T28">if_id_reg_</text:span><text:span text:style-name="T28">rs1=2</text:span></text:p>
          </draw:text-box>
        </draw:frame>
        <draw:frame draw:style-name="gr802" draw:text-style-name="P75" draw:layer="layout" svg:width="2.623cm" svg:height="0.569cm" svg:x="20.822cm" svg:y="12.003cm">
          <draw:text-box>
            <text:p><text:span text:style-name="T28">id_ex_reg</text:span><text:span text:style-name="T28">_rs1=2</text:span></text:p>
          </draw:text-box>
        </draw:frame>
        <draw:frame draw:style-name="gr805" draw:text-style-name="P75" draw:layer="layout" svg:width="3.032cm" svg:height="0.569cm" svg:x="24.522cm" svg:y="12.004cm">
          <draw:text-box>
            <text:p><text:span text:style-name="T28">ex_mem_</text:span><text:span text:style-name="T28">reg_rs1=2</text:span></text:p>
          </draw:text-box>
        </draw:frame>
        <draw:frame draw:style-name="gr808" draw:text-style-name="P75" draw:layer="layout" svg:width="3.095cm" svg:height="0.569cm" svg:x="24.824cm" svg:y="9.004cm">
          <draw:text-box>
            <text:p><text:span text:style-name="T28">mem_wb</text:span><text:span text:style-name="T28">_reg_rs1=</text:span><text:span text:style-name="T28">2</text:span></text:p>
          </draw:text-box>
        </draw:frame>
        <draw:frame draw:style-name="gr808" draw:text-style-name="P75" draw:layer="layout" svg:width="3.095cm" svg:height="0.569cm" svg:x="28.823cm" svg:y="12.005cm">
          <draw:text-box>
            <text:p><text:span text:style-name="T28">mem_wb</text:span><text:span text:style-name="T28">_reg_rs1=</text:span><text:span text:style-name="T28">2</text:span></text:p>
          </draw:text-box>
        </draw:frame>
        <draw:frame draw:style-name="gr852" draw:text-style-name="P62" draw:layer="layout" svg:width="0.777cm" svg:height="0.806cm" svg:x="22.323cm" svg:y="12.9cm">
          <draw:text-box>
            <text:p><text:span text:style-name="T20">4</text:span></text:p>
          </draw:text-box>
        </draw:frame>
        <draw:frame draw:style-name="gr856" draw:text-style-name="P75" draw:layer="layout" svg:width="2.15cm" svg:height="0.569cm" svg:x="20.863cm" svg:y="9.532cm">
          <draw:text-box>
            <text:p><text:span text:style-name="T28">res=0x10</text:span><text:span text:style-name="T28">000</text:span></text:p>
          </draw:text-box>
        </draw:frame>
        <draw:frame draw:style-name="gr861" draw:text-style-name="P75" draw:layer="layout" svg:width="1.992cm" svg:height="0.569cm" svg:x="22.864cm" svg:y="10.033cm">
          <draw:text-box>
            <text:p><text:span text:style-name="T28">0x100-</text:span><text:span text:style-name="T28">&gt;0x5</text:span></text:p>
          </draw:text-box>
        </draw:frame>
        <draw:frame draw:style-name="gr862" draw:text-style-name="P75" draw:layer="layout" svg:width="1.425cm" svg:height="0.569cm" svg:x="26.999cm" svg:y="10.101cm">
          <draw:text-box>
            <text:p><text:span text:style-name="T28">x3=0x1</text:span></text:p>
          </draw:text-box>
        </draw:frame>
        <draw:frame draw:style-name="gr863" draw:text-style-name="P75" draw:layer="layout" svg:width="2.323cm" svg:height="0.569cm" svg:x="12.822cm" svg:y="10.102cm">
          <draw:text-box>
            <text:p><text:span text:style-name="T28">if_id_reg_</text:span><text:span text:style-name="T28">rd=3</text:span></text:p>
          </draw:text-box>
        </draw:frame>
        <draw:frame draw:style-name="gr801" draw:text-style-name="P75" draw:layer="layout" svg:width="2.481cm" svg:height="0.569cm" svg:x="16.823cm" svg:y="10.703cm">
          <draw:text-box>
            <text:p><text:span text:style-name="T28">id_ex_reg</text:span><text:span text:style-name="T28">_rd=3</text:span></text:p>
          </draw:text-box>
        </draw:frame>
        <draw:frame draw:style-name="gr804" draw:text-style-name="P75" draw:layer="layout" svg:width="2.891cm" svg:height="0.569cm" svg:x="20.124cm" svg:y="10.704cm">
          <draw:text-box>
            <text:p><text:span text:style-name="T28">ex_mem_</text:span><text:span text:style-name="T28">reg_rd=3</text:span></text:p>
          </draw:text-box>
        </draw:frame>
        <draw:frame draw:style-name="gr807" draw:text-style-name="P75" draw:layer="layout" svg:width="2.954cm" svg:height="0.569cm" svg:x="24.825cm" svg:y="10.405cm">
          <draw:text-box>
            <text:p><text:span text:style-name="T28">mem_wb</text:span><text:span text:style-name="T28">_reg_rd=</text:span><text:span text:style-name="T28">3</text:span></text:p>
          </draw:text-box>
        </draw:frame>
        <draw:frame draw:style-name="gr856" draw:text-style-name="P75" draw:layer="layout" svg:width="2.15cm" svg:height="0.569cm" svg:x="24.864cm" svg:y="12.533cm">
          <draw:text-box>
            <text:p><text:span text:style-name="T28">res=0x10</text:span><text:span text:style-name="T28">004</text:span></text:p>
          </draw:text-box>
        </draw:frame>
        <draw:frame draw:style-name="gr861" draw:text-style-name="P75" draw:layer="layout" svg:width="1.992cm" svg:height="0.569cm" svg:x="26.808cm" svg:y="13.2cm">
          <draw:text-box>
            <text:p><text:span text:style-name="T28">0x104-</text:span><text:span text:style-name="T28">&gt;0x6</text:span></text:p>
          </draw:text-box>
        </draw:frame>
        <draw:frame draw:style-name="gr799" draw:text-style-name="P75" draw:layer="layout" svg:width="2.465cm" svg:height="0.569cm" svg:x="16.822cm" svg:y="13.403cm">
          <draw:text-box>
            <text:p><text:span text:style-name="T28">if_id_reg_</text:span><text:span text:style-name="T28">rs2=3</text:span></text:p>
          </draw:text-box>
        </draw:frame>
        <draw:frame draw:style-name="gr862" draw:text-style-name="P75" draw:layer="layout" svg:width="1.425cm" svg:height="0.569cm" svg:x="19.199cm" svg:y="13.502cm">
          <draw:text-box>
            <text:p><text:span text:style-name="T28">x3=0x6</text:span></text:p>
          </draw:text-box>
        </draw:frame>
        <draw:frame draw:style-name="gr864" draw:text-style-name="P75" draw:layer="layout" svg:width="3.237cm" svg:height="0.569cm" svg:x="16.522cm" svg:y="4.102cm">
          <draw:text-box>
            <text:p><text:span text:style-name="T28">ex_mem_</text:span><text:span text:style-name="T28">reg_wr_s</text:span><text:span text:style-name="T28">=1</text:span></text:p>
          </draw:text-box>
        </draw:frame>
        <draw:custom-shape draw:style-name="gr865"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5"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5"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6" draw:text-style-name="P62" draw:layer="layout" svg:width="3.324cm" svg:height="0.806cm" svg:x="16.647cm" svg:y="3.3cm">
          <draw:text-box>
            <text:p><text:span text:style-name="T20">forwa</text:span><text:span text:style-name="T20">rdA=</text:span><text:span text:style-name="T20">10</text:span></text:p>
          </draw:text-box>
        </draw:frame>
        <draw:line draw:style-name="gr867" draw:text-style-name="P4" draw:layer="layout" svg:x1="18.1cm" svg:y1="7cm" svg:x2="18.6cm" svg:y2="9.2cm">
          <text:p/>
        </draw:line>
        <draw:frame draw:style-name="gr857" draw:text-style-name="P75" draw:layer="layout" svg:width="2.04cm" svg:height="0.569cm" svg:x="16.822cm" svg:y="9.331cm">
          <draw:text-box>
            <text:p><text:span text:style-name="T28">regA=0x1</text:span><text:span text:style-name="T28">00</text:span></text:p>
          </draw:text-box>
        </draw:frame>
        <draw:frame draw:style-name="gr857" draw:text-style-name="P75" draw:layer="layout" svg:width="2.04cm" svg:height="0.569cm" svg:x="20.761cm" svg:y="12.331cm">
          <draw:text-box>
            <text:p><text:span text:style-name="T28">regA=0x1</text:span><text:span text:style-name="T28">00</text:span></text:p>
          </draw:text-box>
        </draw:frame>
        <draw:custom-shape draw:style-name="gr865"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5"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6" draw:text-style-name="P62" draw:layer="layout" svg:width="3.324cm" svg:height="0.806cm" svg:x="20.348cm" svg:y="3.3cm">
          <draw:text-box>
            <text:p><text:span text:style-name="T20">forwa</text:span><text:span text:style-name="T20">rdA=</text:span><text:span text:style-name="T20">01</text:span></text:p>
          </draw:text-box>
        </draw:frame>
        <draw:frame draw:style-name="gr868" draw:text-style-name="P75" draw:layer="layout" svg:width="3.3cm" svg:height="0.569cm" svg:x="20.323cm" svg:y="4.103cm">
          <draw:text-box>
            <text:p><text:span text:style-name="T28">mem_wb</text:span><text:span text:style-name="T28">_reg_wr_</text:span><text:span text:style-name="T28">s=1</text:span></text:p>
          </draw:text-box>
        </draw:frame>
        <draw:custom-shape draw:style-name="gr865"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7" draw:text-style-name="P4" draw:layer="layout" svg:x1="22.14cm" svg:y1="7cm" svg:x2="22.7cm" svg:y2="12.1cm">
          <text:p/>
        </draw:line>
        <draw:frame draw:style-name="gr818" draw:text-style-name="P75" draw:layer="layout" svg:width="2.308cm" svg:height="0.569cm" svg:x="22.864cm" svg:y="10.334cm">
          <draw:text-box>
            <text:p><text:span text:style-name="T28">0x10000-</text:span><text:span text:style-name="T28">&gt;0x1</text:span></text:p>
          </draw:text-box>
        </draw:frame>
        <draw:custom-shape draw:style-name="gr869"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9"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0" draw:text-style-name="P75" draw:layer="layout" svg:width="3.474cm" svg:height="0.569cm" svg:x="18.326cm" svg:y="8.231cm">
          <draw:text-box>
            <text:p><text:span text:style-name="T28">dmem_rd</text:span><text:span text:style-name="T28">_execute</text:span><text:span text:style-name="T28">_s=1</text:span></text:p>
          </draw:text-box>
        </draw:frame>
        <draw:custom-shape draw:style-name="gr869"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3"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4" draw:text-style-name="P81"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4" draw:text-style-name="P81"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73" draw:text-style-name="P62" draw:layer="layout" svg:width="3.575cm" svg:height="0.806cm" svg:x="5.01cm" svg:y="15.6cm">
          <draw:text-box>
            <text:p><text:span text:style-name="T20">sd </text:span><text:span text:style-name="T20">x3, </text:span><text:span text:style-name="T20">4(</text:span><text:span text:style-name="T24">x2</text:span><text:span text:style-name="T20">)</text:span></text:p>
          </draw:text-box>
        </draw:frame>
        <draw:frame draw:style-name="gr842" draw:text-style-name="P62" draw:layer="layout" svg:width="3.58cm" svg:height="0.806cm" svg:x="5.011cm" svg:y="18.6cm">
          <draw:text-box>
            <text:p><text:span text:style-name="T20">jal x0, </text:span><text:span text:style-name="T20">done</text:span></text:p>
          </draw:text-box>
        </draw:frame>
        <draw:frame draw:style-name="gr773" draw:text-style-name="P62" draw:layer="layout" svg:width="3.575cm" svg:height="0.806cm" svg:x="5.011cm" svg:y="12.6cm">
          <draw:text-box>
            <text:p><text:span text:style-name="T20">nop</text:span></text:p>
          </draw:text-box>
        </draw:frame>
        <draw:frame draw:style-name="gr799" draw:text-style-name="P75" draw:layer="layout" svg:width="2.465cm" svg:height="0.569cm" svg:x="20.822cm" svg:y="14.903cm">
          <draw:text-box>
            <text:p><text:span text:style-name="T28">if_id_reg_</text:span><text:span text:style-name="T28">rs1=2</text:span></text:p>
          </draw:text-box>
        </draw:frame>
        <draw:frame draw:style-name="gr799" draw:text-style-name="P75" draw:layer="layout" svg:width="2.465cm" svg:height="0.569cm" svg:x="20.822cm" svg:y="16.404cm">
          <draw:text-box>
            <text:p><text:span text:style-name="T28">if_id_reg_</text:span><text:span text:style-name="T28">rs2=3</text:span></text:p>
          </draw:text-box>
        </draw:frame>
        <draw:frame draw:style-name="gr816" draw:text-style-name="P70" draw:layer="layout" svg:width="2.055cm" svg:height="0.569cm" svg:x="22.901cm" svg:y="15.232cm">
          <draw:text-box>
            <text:p><text:span text:style-name="T23">x2=0x100</text:span><text:span text:style-name="T23">00</text:span></text:p>
          </draw:text-box>
        </draw:frame>
        <draw:frame draw:style-name="gr862" draw:text-style-name="P75" draw:layer="layout" svg:width="1.425cm" svg:height="0.569cm" svg:x="23.2cm" svg:y="16.203cm">
          <draw:text-box>
            <text:p><text:span text:style-name="T28">x3=0x6</text:span></text:p>
          </draw:text-box>
        </draw:frame>
        <draw:frame draw:style-name="gr871" draw:text-style-name="P75" draw:layer="layout" svg:width="2.355cm" svg:height="0.569cm" svg:x="24.762cm" svg:y="15.332cm">
          <draw:text-box>
            <text:p><text:span text:style-name="T28">regA=0x1</text:span><text:span text:style-name="T28">0000</text:span></text:p>
          </draw:text-box>
        </draw:frame>
        <draw:frame draw:style-name="gr802" draw:text-style-name="P75" draw:layer="layout" svg:width="2.623cm" svg:height="0.569cm" svg:x="24.823cm" svg:y="14.904cm">
          <draw:text-box>
            <text:p><text:span text:style-name="T28">id_ex_reg</text:span><text:span text:style-name="T28">_rs1=2</text:span></text:p>
          </draw:text-box>
        </draw:frame>
        <draw:frame draw:style-name="gr852" draw:text-style-name="P62" draw:layer="layout" svg:width="0.777cm" svg:height="0.806cm" svg:x="26.124cm" svg:y="15.9cm">
          <draw:text-box>
            <text:p><text:span text:style-name="T20">4</text:span></text:p>
          </draw:text-box>
        </draw:frame>
        <draw:frame draw:style-name="gr805" draw:text-style-name="P75" draw:layer="layout" svg:width="3.032cm" svg:height="0.569cm" svg:x="28.223cm" svg:y="14.805cm">
          <draw:text-box>
            <text:p><text:span text:style-name="T28">ex_mem_</text:span><text:span text:style-name="T28">reg_rs1=2</text:span></text:p>
          </draw:text-box>
        </draw:frame>
        <draw:frame draw:style-name="gr856" draw:text-style-name="P75" draw:layer="layout" svg:width="2.15cm" svg:height="0.569cm" svg:x="28.765cm" svg:y="15.534cm">
          <draw:text-box>
            <text:p><text:span text:style-name="T28">res=0x10</text:span><text:span text:style-name="T28">004</text:span></text:p>
          </draw:text-box>
        </draw:frame>
        <draw:frame draw:style-name="gr818" draw:text-style-name="P75" draw:layer="layout" svg:width="2.308cm" svg:height="0.569cm" svg:x="30.808cm" svg:y="16.201cm">
          <draw:text-box>
            <text:p><text:span text:style-name="T28">0x10004-</text:span><text:span text:style-name="T28">&gt;0x6</text:span></text:p>
          </draw:text-box>
        </draw:frame>
      </draw:page>
      <draw:page draw:name="page21" draw:style-name="dp1" draw:master-page-name="Default">
        <draw:custom-shape draw:style-name="gr872"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text:span><text:span text:style-name="T2">ata(31:</text:span><text:span text:style-name="T2">0)</text:span></text:p>
            </draw:text-box>
          </draw:frame>
          <draw:frame draw:style-name="gr55" draw:text-style-name="P9" draw:layer="layout" svg:width="3.313cm" svg:height="0.725cm" svg:x="20.987cm" svg:y="11.975cm">
            <draw:text-box>
              <text:p><text:span text:style-name="T2">loadAd</text:span><text:span text:style-name="T2">dr(63:</text:span><text:span text:style-name="T2">0)</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text:span><text:span text:style-name="T2">ddr(63</text:span><text:span text:style-name="T2">:0)</text:span></text:p>
            </draw:text-box>
          </draw:frame>
          <draw:frame draw:style-name="gr57" draw:text-style-name="P9" draw:layer="layout" svg:width="3.36cm" svg:height="0.725cm" svg:x="22.64cm" svg:y="15cm">
            <draw:text-box>
              <text:p><text:span text:style-name="T2">readD</text:span><text:span text:style-name="T2">ata(31:</text:span><text:span text:style-name="T2">0)</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text:span><text:span text:style-name="T2">1:0)</text:span></text:p>
          </draw:text-box>
        </draw:frame>
        <draw:g draw:style-name="gr1">
          <draw:custom-shape draw:style-name="gr873"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874" draw:text-style-name="P82" draw:layer="layout" svg:width="1.025cm" svg:height="0.806cm" svg:x="35.75cm" svg:y="5.994cm">
            <draw:text-box>
              <text:p><text:span text:style-name="T37">se</text:span></text:p>
            </draw:text-box>
          </draw:frame>
          <draw:frame draw:style-name="gr875" draw:text-style-name="P82" draw:layer="layout" svg:width="0.888cm" svg:height="0.806cm" svg:x="35.75cm" svg:y="4.994cm">
            <draw:text-box>
              <text:p><text:span text:style-name="T37">di</text:span></text:p>
            </draw:text-box>
          </draw:frame>
          <draw:frame draw:style-name="gr876" draw:text-style-name="P82" draw:layer="layout" svg:width="0.75cm" svg:height="0.806cm" svg:x="35.75cm" svg:y="5.5cm">
            <draw:text-box>
              <text:p><text:span text:style-name="T37">ti</text:span></text:p>
            </draw:text-box>
          </draw:frame>
          <draw:frame draw:style-name="gr877" draw:text-style-name="P82" draw:layer="layout" svg:width="1.053cm" svg:height="0.806cm" svg:x="36.2cm" svg:y="5cm">
            <draw:text-box>
              <text:p><text:span text:style-name="T37">do</text:span></text:p>
            </draw:text-box>
          </draw:frame>
        </draw:g>
        <draw:g draw:style-name="gr1">
          <draw:custom-shape draw:style-name="gr873"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874" draw:text-style-name="P82" draw:layer="layout" svg:width="1.025cm" svg:height="0.806cm" svg:x="35.751cm" svg:y="8.995cm">
            <draw:text-box>
              <text:p><text:span text:style-name="T37">se</text:span></text:p>
            </draw:text-box>
          </draw:frame>
          <draw:frame draw:style-name="gr875" draw:text-style-name="P82" draw:layer="layout" svg:width="0.888cm" svg:height="0.806cm" svg:x="35.751cm" svg:y="7.995cm">
            <draw:text-box>
              <text:p><text:span text:style-name="T37">di</text:span></text:p>
            </draw:text-box>
          </draw:frame>
          <draw:frame draw:style-name="gr876" draw:text-style-name="P82" draw:layer="layout" svg:width="0.75cm" svg:height="0.806cm" svg:x="35.751cm" svg:y="8.501cm">
            <draw:text-box>
              <text:p><text:span text:style-name="T37">ti</text:span></text:p>
            </draw:text-box>
          </draw:frame>
          <draw:frame draw:style-name="gr877" draw:text-style-name="P82" draw:layer="layout" svg:width="1.053cm" svg:height="0.806cm" svg:x="36.201cm" svg:y="8.001cm">
            <draw:text-box>
              <text:p><text:span text:style-name="T37">do</text:span></text:p>
            </draw:text-box>
          </draw:frame>
        </draw:g>
        <draw:line draw:style-name="gr38" draw:text-style-name="P4" draw:layer="layout" svg:x1="35cm" svg:y1="5.4cm" svg:x2="36cm" svg:y2="5.4cm">
          <text:p/>
        </draw:line>
        <draw:frame draw:style-name="gr878" draw:text-style-name="P82" draw:layer="layout" svg:width="0.777cm" svg:height="0.806cm" svg:x="34.2cm" svg:y="4.994cm">
          <draw:text-box>
            <text:p><text:span text:style-name="T37">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878" draw:text-style-name="P82" draw:layer="layout" svg:width="0.777cm" svg:height="0.806cm" svg:x="34.201cm" svg:y="7.994cm">
          <draw:text-box>
            <text:p><text:span text:style-name="T37">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879" draw:text-style-name="P82" draw:layer="layout" svg:width="2.199cm" svg:height="0.806cm" svg:x="36.701cm" svg:y="3.894cm">
          <draw:text-box>
            <text:p><text:span text:style-name="T37">To </text:span><text:span text:style-name="T37">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873"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874" draw:text-style-name="P82" draw:layer="layout" svg:width="1.025cm" svg:height="0.806cm" svg:x="35.751cm" svg:y="11.994cm">
            <draw:text-box>
              <text:p><text:span text:style-name="T37">se</text:span></text:p>
            </draw:text-box>
          </draw:frame>
          <draw:frame draw:style-name="gr875" draw:text-style-name="P82" draw:layer="layout" svg:width="0.888cm" svg:height="0.806cm" svg:x="35.751cm" svg:y="10.994cm">
            <draw:text-box>
              <text:p><text:span text:style-name="T37">di</text:span></text:p>
            </draw:text-box>
          </draw:frame>
          <draw:frame draw:style-name="gr876" draw:text-style-name="P82" draw:layer="layout" svg:width="0.75cm" svg:height="0.806cm" svg:x="35.751cm" svg:y="11.5cm">
            <draw:text-box>
              <text:p><text:span text:style-name="T37">ti</text:span></text:p>
            </draw:text-box>
          </draw:frame>
          <draw:frame draw:style-name="gr877" draw:text-style-name="P82" draw:layer="layout" svg:width="1.053cm" svg:height="0.806cm" svg:x="36.201cm" svg:y="11cm">
            <draw:text-box>
              <text:p><text:span text:style-name="T37">do</text:span></text:p>
            </draw:text-box>
          </draw:frame>
        </draw:g>
        <draw:g draw:style-name="gr1">
          <draw:custom-shape draw:style-name="gr873"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874" draw:text-style-name="P82" draw:layer="layout" svg:width="1.025cm" svg:height="0.806cm" svg:x="35.752cm" svg:y="14.995cm">
            <draw:text-box>
              <text:p><text:span text:style-name="T37">se</text:span></text:p>
            </draw:text-box>
          </draw:frame>
          <draw:frame draw:style-name="gr875" draw:text-style-name="P82" draw:layer="layout" svg:width="0.888cm" svg:height="0.806cm" svg:x="35.752cm" svg:y="13.995cm">
            <draw:text-box>
              <text:p><text:span text:style-name="T37">di</text:span></text:p>
            </draw:text-box>
          </draw:frame>
          <draw:frame draw:style-name="gr876" draw:text-style-name="P82" draw:layer="layout" svg:width="0.75cm" svg:height="0.806cm" svg:x="35.752cm" svg:y="14.501cm">
            <draw:text-box>
              <text:p><text:span text:style-name="T37">ti</text:span></text:p>
            </draw:text-box>
          </draw:frame>
          <draw:frame draw:style-name="gr877" draw:text-style-name="P82" draw:layer="layout" svg:width="1.053cm" svg:height="0.806cm" svg:x="36.202cm" svg:y="14.001cm">
            <draw:text-box>
              <text:p><text:span text:style-name="T37">do</text:span></text:p>
            </draw:text-box>
          </draw:frame>
        </draw:g>
        <draw:line draw:style-name="gr38" draw:text-style-name="P4" draw:layer="layout" svg:x1="35.001cm" svg:y1="11.4cm" svg:x2="36.001cm" svg:y2="11.4cm">
          <text:p/>
        </draw:line>
        <draw:frame draw:style-name="gr878" draw:text-style-name="P82" draw:layer="layout" svg:width="0.777cm" svg:height="0.806cm" svg:x="34.201cm" svg:y="10.994cm">
          <draw:text-box>
            <text:p><text:span text:style-name="T37">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878" draw:text-style-name="P82" draw:layer="layout" svg:width="0.777cm" svg:height="0.806cm" svg:x="34.202cm" svg:y="13.994cm">
          <draw:text-box>
            <text:p><text:span text:style-name="T37">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873"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874" draw:text-style-name="P82" draw:layer="layout" svg:width="1.025cm" svg:height="0.806cm" svg:x="35.75cm" svg:y="18.994cm">
            <draw:text-box>
              <text:p><text:span text:style-name="T37">se</text:span></text:p>
            </draw:text-box>
          </draw:frame>
          <draw:frame draw:style-name="gr875" draw:text-style-name="P82" draw:layer="layout" svg:width="0.888cm" svg:height="0.806cm" svg:x="35.75cm" svg:y="17.994cm">
            <draw:text-box>
              <text:p><text:span text:style-name="T37">di</text:span></text:p>
            </draw:text-box>
          </draw:frame>
          <draw:frame draw:style-name="gr876" draw:text-style-name="P82" draw:layer="layout" svg:width="0.75cm" svg:height="0.806cm" svg:x="35.75cm" svg:y="18.5cm">
            <draw:text-box>
              <text:p><text:span text:style-name="T37">ti</text:span></text:p>
            </draw:text-box>
          </draw:frame>
          <draw:frame draw:style-name="gr877" draw:text-style-name="P82" draw:layer="layout" svg:width="1.053cm" svg:height="0.806cm" svg:x="36.2cm" svg:y="18cm">
            <draw:text-box>
              <text:p><text:span text:style-name="T37">do</text:span></text:p>
            </draw:text-box>
          </draw:frame>
        </draw:g>
        <draw:g draw:style-name="gr1">
          <draw:custom-shape draw:style-name="gr873"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874" draw:text-style-name="P82" draw:layer="layout" svg:width="1.025cm" svg:height="0.806cm" svg:x="35.751cm" svg:y="21.995cm">
            <draw:text-box>
              <text:p><text:span text:style-name="T37">se</text:span></text:p>
            </draw:text-box>
          </draw:frame>
          <draw:frame draw:style-name="gr875" draw:text-style-name="P82" draw:layer="layout" svg:width="0.888cm" svg:height="0.806cm" svg:x="35.751cm" svg:y="20.995cm">
            <draw:text-box>
              <text:p><text:span text:style-name="T37">di</text:span></text:p>
            </draw:text-box>
          </draw:frame>
          <draw:frame draw:style-name="gr876" draw:text-style-name="P82" draw:layer="layout" svg:width="0.75cm" svg:height="0.806cm" svg:x="35.751cm" svg:y="21.501cm">
            <draw:text-box>
              <text:p><text:span text:style-name="T37">ti</text:span></text:p>
            </draw:text-box>
          </draw:frame>
          <draw:frame draw:style-name="gr877" draw:text-style-name="P82" draw:layer="layout" svg:width="1.053cm" svg:height="0.806cm" svg:x="36.201cm" svg:y="21.001cm">
            <draw:text-box>
              <text:p><text:span text:style-name="T37">do</text:span></text:p>
            </draw:text-box>
          </draw:frame>
        </draw:g>
        <draw:line draw:style-name="gr38" draw:text-style-name="P4" draw:layer="layout" svg:x1="35cm" svg:y1="18.4cm" svg:x2="36cm" svg:y2="18.4cm">
          <text:p/>
        </draw:line>
        <draw:frame draw:style-name="gr878" draw:text-style-name="P82" draw:layer="layout" svg:width="0.777cm" svg:height="0.806cm" svg:x="34.2cm" svg:y="17.994cm">
          <draw:text-box>
            <text:p><text:span text:style-name="T37">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878" draw:text-style-name="P82" draw:layer="layout" svg:width="0.777cm" svg:height="0.806cm" svg:x="34.201cm" svg:y="20.994cm">
          <draw:text-box>
            <text:p><text:span text:style-name="T37">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880" draw:text-style-name="P82" draw:layer="layout" svg:width="2.584cm" svg:height="0.806cm" svg:x="34.801cm" svg:y="23.3cm">
          <draw:text-box>
            <text:p><text:span text:style-name="T37">From </text:span><text:span text:style-name="T37">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881"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2" draw:text-style-name="P82" draw:layer="layout" svg:width="2.842cm" svg:height="0.806cm" svg:x="33.002cm" svg:y="3.894cm">
          <draw:text-box>
            <text:p><text:span text:style-name="T37">Test </text:span><text:span text:style-name="T37">select</text:span></text:p>
          </draw:text-box>
        </draw:frame>
        <draw:frame draw:style-name="gr883" draw:text-style-name="P4" draw:layer="layout" svg:width="0.978cm" svg:height="3.353cm" svg:x="20.2cm" svg:y="12cm">
          <draw:image xlink:href="Pictures/10000001000000ED0000032CB50FA5DB.png" xlink:type="simple" xlink:show="embed" xlink:actuate="onLoad" draw:mime-type="image/png">
            <text:p/>
          </draw:image>
        </draw:frame>
        <draw:frame draw:style-name="gr884" draw:text-style-name="P82" draw:layer="layout" svg:width="3.283cm" svg:height="0.806cm" svg:x="13.017cm" svg:y="11cm">
          <draw:text-box>
            <text:p><text:span text:style-name="T37">scan</text:span><text:span text:style-name="T37">_shift</text:span><text:span text:style-name="T37">_o</text:span></text:p>
          </draw:text-box>
        </draw:frame>
        <draw:frame draw:style-name="gr885" draw:text-style-name="P82" draw:layer="layout" svg:width="3.503cm" svg:height="0.806cm" svg:x="13cm" svg:y="10cm">
          <draw:text-box>
            <text:p><text:span text:style-name="T37">scan</text:span><text:span text:style-name="T37">_cloc</text:span><text:span text:style-name="T37">k_o</text:span></text:p>
          </draw:text-box>
        </draw:frame>
        <draw:frame draw:style-name="gr886" draw:text-style-name="P82" draw:layer="layout" svg:width="3.476cm" svg:height="0.806cm" svg:x="13cm" svg:y="9cm">
          <draw:text-box>
            <text:p><text:span text:style-name="T37">scan</text:span><text:span text:style-name="T37">_rese</text:span><text:span text:style-name="T37">t_o</text:span></text:p>
          </draw:text-box>
        </draw:frame>
        <draw:frame draw:style-name="gr885" draw:text-style-name="P82" draw:layer="layout" svg:width="3.503cm" svg:height="0.806cm" svg:x="13cm" svg:y="12.994cm">
          <draw:text-box>
            <text:p><text:span text:style-name="T37">scan</text:span><text:span text:style-name="T37">_tdi_</text:span><text:span text:style-name="T37">o(2)</text:span></text:p>
          </draw:text-box>
        </draw:frame>
        <draw:frame draw:style-name="gr885" draw:text-style-name="P82" draw:layer="layout" svg:width="3.503cm" svg:height="0.806cm" svg:x="13cm" svg:y="12cm">
          <draw:text-box>
            <text:p><text:span text:style-name="T37">scan</text:span><text:span text:style-name="T37">_tdo_</text:span><text:span text:style-name="T37">i(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887"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2" draw:style-name="dp1" draw:master-page-name="Default">
        <draw:custom-shape draw:style-name="gr888" draw:text-style-name="P83"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88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888" draw:text-style-name="P83"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88" draw:text-style-name="P83"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88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890" draw:text-style-name="P84"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890" draw:text-style-name="P84" draw:layer="layout" svg:width="3cm" svg:height="3cm" svg:x="14cm" svg:y="16cm">
          <text:p text:style-name="P1">EBU</text:p>
          <draw:enhanced-geometry svg:viewBox="0 0 21600 21600" draw:type="rectangle" draw:enhanced-path="M 0 0 L 21600 0 21600 21600 0 21600 0 0 Z N"/>
        </draw:custom-shape>
        <draw:custom-shape draw:style-name="gr890" draw:text-style-name="P84" draw:layer="layout" svg:width="3cm" svg:height="3cm" svg:x="19cm" svg:y="10cm">
          <text:p text:style-name="P1">GPIO</text:p>
          <draw:enhanced-geometry svg:viewBox="0 0 21600 21600" draw:type="rectangle" draw:enhanced-path="M 0 0 L 21600 0 21600 21600 0 21600 0 0 Z N"/>
        </draw:custom-shape>
        <draw:custom-shape draw:style-name="gr891" draw:text-style-name="P4" draw:layer="layout" svg:width="15cm" svg:height="11cm" svg:x="8cm" svg:y="9cm">
          <text:p/>
          <draw:enhanced-geometry svg:viewBox="0 0 21600 21600" draw:type="rectangle" draw:enhanced-path="M 0 0 L 21600 0 21600 21600 0 21600 0 0 Z N"/>
        </draw:custom-shape>
        <draw:frame draw:style-name="gr892" draw:text-style-name="P3" draw:layer="layout" svg:width="3.972cm" svg:height="0.962cm" svg:x="8cm" svg:y="19cm">
          <draw:text-box>
            <text:p>RWU-RV64I</text:p>
          </draw:text-box>
        </draw:frame>
        <draw:custom-shape draw:style-name="gr88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88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89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5" draw:text-style-name="P3" draw:layer="layout" svg:width="2.078cm" svg:height="0.962cm" svg:x="6.016cm" svg:y="10.043cm">
          <draw:text-box>
            <text:p>JTAG</text:p>
          </draw:text-box>
        </draw:frame>
        <draw:custom-shape draw:style-name="gr89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6" draw:text-style-name="P3" draw:layer="layout" svg:width="2.09cm" svg:height="0.962cm" svg:x="22.91cm" svg:y="10cm">
          <draw:text-box>
            <text:p>GPIO</text:p>
          </draw:text-box>
        </draw:frame>
        <draw:custom-shape draw:style-name="gr89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7" draw:text-style-name="P3" draw:layer="layout" svg:width="2.867cm" svg:height="0.962cm" svg:x="16cm" svg:y="20cm">
          <draw:text-box>
            <text:p>Ext. Bus</text:p>
          </draw:text-box>
        </draw:frame>
        <draw:custom-shape draw:style-name="gr898" draw:text-style-name="P1" draw:layer="layout" svg:width="9cm" svg:height="0.3cm" svg:x="11cm" svg:y="20.8cm">
          <text:p/>
          <draw:enhanced-geometry svg:viewBox="0 0 21600 21600" draw:type="rectangle" draw:enhanced-path="M 0 0 L 21600 0 21600 21600 0 21600 0 0 Z N"/>
        </draw:custom-shape>
        <draw:custom-shape draw:style-name="gr89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3" draw:style-name="dp1" draw:master-page-name="Default">
        <draw:custom-shape draw:style-name="gr888" draw:text-style-name="P83"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88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888" draw:text-style-name="P83"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88" draw:text-style-name="P83"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88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890" draw:text-style-name="P84"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890" draw:text-style-name="P84" draw:layer="layout" svg:width="3cm" svg:height="3cm" svg:x="14cm" svg:y="16cm">
          <text:p text:style-name="P1">EBU</text:p>
          <draw:enhanced-geometry svg:viewBox="0 0 21600 21600" draw:type="rectangle" draw:enhanced-path="M 0 0 L 21600 0 21600 21600 0 21600 0 0 Z N"/>
        </draw:custom-shape>
        <draw:custom-shape draw:style-name="gr890" draw:text-style-name="P84" draw:layer="layout" svg:width="3cm" svg:height="3cm" svg:x="19cm" svg:y="10cm">
          <text:p text:style-name="P1">GPIO</text:p>
          <draw:enhanced-geometry svg:viewBox="0 0 21600 21600" draw:type="rectangle" draw:enhanced-path="M 0 0 L 21600 0 21600 21600 0 21600 0 0 Z N"/>
        </draw:custom-shape>
        <draw:custom-shape draw:style-name="gr891" draw:text-style-name="P4" draw:layer="layout" svg:width="15cm" svg:height="11cm" svg:x="8cm" svg:y="9cm">
          <text:p/>
          <draw:enhanced-geometry svg:viewBox="0 0 21600 21600" draw:type="rectangle" draw:enhanced-path="M 0 0 L 21600 0 21600 21600 0 21600 0 0 Z N"/>
        </draw:custom-shape>
        <draw:frame draw:style-name="gr892" draw:text-style-name="P3" draw:layer="layout" svg:width="3.972cm" svg:height="0.962cm" svg:x="8cm" svg:y="19cm">
          <draw:text-box>
            <text:p>RWU-RV64I</text:p>
          </draw:text-box>
        </draw:frame>
        <draw:custom-shape draw:style-name="gr88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88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89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5" draw:text-style-name="P3" draw:layer="layout" svg:width="2.078cm" svg:height="0.962cm" svg:x="6.016cm" svg:y="10.043cm">
          <draw:text-box>
            <text:p>JTAG</text:p>
          </draw:text-box>
        </draw:frame>
        <draw:custom-shape draw:style-name="gr89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6" draw:text-style-name="P3" draw:layer="layout" svg:width="2.09cm" svg:height="0.962cm" svg:x="22.91cm" svg:y="10cm">
          <draw:text-box>
            <text:p>GPIO</text:p>
          </draw:text-box>
        </draw:frame>
        <draw:custom-shape draw:style-name="gr89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7" draw:text-style-name="P3" draw:layer="layout" svg:width="2.867cm" svg:height="0.962cm" svg:x="16cm" svg:y="20cm">
          <draw:text-box>
            <text:p>Ext. Bus</text:p>
          </draw:text-box>
        </draw:frame>
        <draw:custom-shape draw:style-name="gr898" draw:text-style-name="P1" draw:layer="layout" svg:width="9cm" svg:height="0.3cm" svg:x="11cm" svg:y="20.8cm">
          <text:p/>
          <draw:enhanced-geometry svg:viewBox="0 0 21600 21600" draw:type="rectangle" draw:enhanced-path="M 0 0 L 21600 0 21600 21600 0 21600 0 0 Z N"/>
        </draw:custom-shape>
        <draw:custom-shape draw:style-name="gr89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0" draw:text-style-name="P84" draw:layer="layout" svg:width="3cm" svg:height="3cm" svg:x="11.9cm" svg:y="6.5cm">
          <text:p text:style-name="P1">CGU</text:p>
          <draw:enhanced-geometry svg:viewBox="0 0 21600 21600" draw:type="rectangle" draw:enhanced-path="M 0 0 L 21600 0 21600 21600 0 21600 0 0 Z N"/>
        </draw:custom-shape>
        <draw:custom-shape draw:style-name="gr890" draw:text-style-name="P84" draw:layer="layout" svg:width="3cm" svg:height="3cm" svg:x="15.5cm" svg:y="6.5cm">
          <text:p text:style-name="P1">SCU</text:p>
          <draw:enhanced-geometry svg:viewBox="0 0 21600 21600" draw:type="rectangle" draw:enhanced-path="M 0 0 L 21600 0 21600 21600 0 21600 0 0 Z N"/>
        </draw:custom-shape>
      </draw:page>
      <draw:page draw:name="page24" draw:style-name="dp1" draw:master-page-name="Default">
        <draw:custom-shape draw:style-name="gr888" draw:text-style-name="P83"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900"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888" draw:text-style-name="P83"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88" draw:text-style-name="P83"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901"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890" draw:text-style-name="P84"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902" draw:text-style-name="P84" draw:layer="layout" svg:width="2cm" svg:height="3cm" svg:x="13cm" svg:y="16cm">
          <text:p text:style-name="P1">EBU</text:p>
          <draw:enhanced-geometry svg:viewBox="0 0 21600 21600" draw:type="rectangle" draw:enhanced-path="M 0 0 L 21600 0 21600 21600 0 21600 0 0 Z N"/>
        </draw:custom-shape>
        <draw:custom-shape draw:style-name="gr890" draw:text-style-name="P84" draw:layer="layout" svg:width="3cm" svg:height="3cm" svg:x="27cm" svg:y="10cm">
          <text:p text:style-name="P1">GPIO</text:p>
          <draw:enhanced-geometry svg:viewBox="0 0 21600 21600" draw:type="rectangle" draw:enhanced-path="M 0 0 L 21600 0 21600 21600 0 21600 0 0 Z N"/>
        </draw:custom-shape>
        <draw:custom-shape draw:style-name="gr903" draw:text-style-name="P4" draw:layer="layout" svg:width="26cm" svg:height="11cm" svg:x="5cm" svg:y="9cm">
          <text:p/>
          <draw:enhanced-geometry svg:viewBox="0 0 21600 21600" draw:type="rectangle" draw:enhanced-path="M 0 0 L 21600 0 21600 21600 0 21600 0 0 Z N"/>
        </draw:custom-shape>
        <draw:frame draw:style-name="gr892" draw:text-style-name="P3" draw:layer="layout" svg:width="3.972cm" svg:height="0.962cm" svg:x="8cm" svg:y="19cm">
          <draw:text-box>
            <text:p>RWU-RV64I</text:p>
          </draw:text-box>
        </draw:frame>
        <draw:custom-shape draw:style-name="gr904"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905" draw:text-style-name="P12" draw:layer="layout" svg:width="3cm" svg:height="2cm" svg:x="16cm" svg:y="21cm">
          <text:p text:style-name="P1">SRAM</text:p>
          <draw:enhanced-geometry svg:viewBox="0 0 21600 21600" draw:type="rectangle" draw:enhanced-path="M 0 0 L 21600 0 21600 21600 0 21600 0 0 Z N"/>
        </draw:custom-shape>
        <draw:custom-shape draw:style-name="gr89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5" draw:text-style-name="P3" draw:layer="layout" svg:width="2.078cm" svg:height="0.962cm" svg:x="3.016cm" svg:y="10.043cm">
          <draw:text-box>
            <text:p>JTAG</text:p>
          </draw:text-box>
        </draw:frame>
        <draw:custom-shape draw:style-name="gr893"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4"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6" draw:text-style-name="P3" draw:layer="layout" svg:width="2.09cm" svg:height="0.962cm" svg:x="30.91cm" svg:y="10cm">
          <draw:text-box>
            <text:p>GPIO</text:p>
          </draw:text-box>
        </draw:frame>
        <draw:custom-shape draw:style-name="gr893"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9"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0" draw:text-style-name="P84" draw:layer="layout" svg:width="3cm" svg:height="3cm" svg:x="22cm" svg:y="10cm">
          <text:p text:style-name="P1">ICU</text:p>
          <draw:enhanced-geometry svg:viewBox="0 0 21600 21600" draw:type="rectangle" draw:enhanced-path="M 0 0 L 21600 0 21600 21600 0 21600 0 0 Z N"/>
        </draw:custom-shape>
        <draw:custom-shape draw:style-name="gr890" draw:text-style-name="P84" draw:layer="layout" svg:width="3cm" svg:height="3cm" svg:x="27cm" svg:y="16cm">
          <text:p text:style-name="P1">SCU</text:p>
          <draw:enhanced-geometry svg:viewBox="0 0 21600 21600" draw:type="rectangle" draw:enhanced-path="M 0 0 L 21600 0 21600 21600 0 21600 0 0 Z N"/>
        </draw:custom-shape>
        <draw:frame draw:style-name="gr906" draw:text-style-name="P3" draw:layer="layout" svg:width="2.019cm" svg:height="0.962cm" svg:x="14.082cm" svg:y="20cm">
          <draw:text-box>
            <text:p>QSPI</text:p>
          </draw:text-box>
        </draw:frame>
        <draw:custom-shape draw:style-name="gr902" draw:text-style-name="P84" draw:layer="layout" svg:width="2cm" svg:height="3cm" svg:x="16cm" svg:y="16.001cm">
          <text:p text:style-name="P1">EBU</text:p>
          <draw:enhanced-geometry svg:viewBox="0 0 21600 21600" draw:type="rectangle" draw:enhanced-path="M 0 0 L 21600 0 21600 21600 0 21600 0 0 Z N"/>
        </draw:custom-shape>
        <draw:custom-shape draw:style-name="gr893" draw:text-style-name="P1" draw:layer="layout" svg:width="0.6cm" svg:height="1cm" svg:x="16.703cm" svg:y="15.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9" draw:text-style-name="P1" draw:layer="layout" svg:width="0.6cm" svg:height="2cm" svg:x="16.705cm" svg:y="19.0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907" draw:text-style-name="P3" draw:layer="layout" svg:width="1.8cm" svg:height="0.962cm" svg:x="17.182cm" svg:y="20cm">
          <draw:text-box>
            <text:p>???</text:p>
          </draw:text-box>
        </draw:frame>
        <draw:custom-shape draw:style-name="gr890" draw:text-style-name="P84" draw:layer="layout" svg:width="3cm" svg:height="3cm" svg:x="23cm" svg:y="16cm">
          <text:p text:style-name="P1">CGU</text:p>
          <draw:enhanced-geometry svg:viewBox="0 0 21600 21600" draw:type="rectangle" draw:enhanced-path="M 0 0 L 21600 0 21600 21600 0 21600 0 0 Z N"/>
        </draw:custom-shape>
        <draw:custom-shape draw:style-name="gr888" draw:text-style-name="P83"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888" draw:text-style-name="P83"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893"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3"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5" draw:style-name="dp1" draw:master-page-name="Default">
        <draw:frame draw:style-name="gr883"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26" draw:style-name="dp1" draw:master-page-name="Default">
        <draw:g draw:style-name="gr1">
          <draw:custom-shape draw:style-name="gr908" draw:text-style-name="P84" draw:layer="layout" svg:width="6cm" svg:height="6cm" svg:x="11.006cm" svg:y="11cm">
            <text:p text:style-name="P1">GPIO</text:p>
            <draw:enhanced-geometry svg:viewBox="0 0 21600 21600" draw:type="rectangle" draw:enhanced-path="M 0 0 L 21600 0 21600 21600 0 21600 0 0 Z N"/>
          </draw:custom-shape>
          <draw:frame draw:style-name="gr909" draw:text-style-name="P3" draw:layer="layout" svg:width="1.914cm" svg:height="0.962cm" svg:x="11.006cm" svg:y="11.038cm">
            <draw:text-box>
              <text:p>adr_i</text:p>
            </draw:text-box>
          </draw:frame>
          <draw:frame draw:style-name="gr910"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911"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912" draw:text-style-name="P3" draw:layer="layout" svg:width="1.843cm" svg:height="0.962cm" svg:x="11.006cm" svg:y="16.038cm">
            <draw:text-box>
              <text:p>stb_i</text:p>
            </draw:text-box>
          </draw:frame>
          <draw:frame draw:style-name="gr913"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909" draw:text-style-name="P3" draw:layer="layout" svg:width="1.914cm" svg:height="0.962cm" draw:transform="rotate (1.5707963267949) translate (13.1cm 12.614cm)">
            <draw:text-box>
              <text:p>clk_i</text:p>
            </draw:text-box>
          </draw:frame>
          <draw:frame draw:style-name="gr914" draw:text-style-name="P3" draw:layer="layout" svg:width="1.7cm" svg:height="0.962cm" draw:transform="rotate (1.5707963267949) translate (13.9cm 12.514cm)">
            <draw:text-box>
              <text:p>rst_i</text:p>
            </draw:text-box>
          </draw:frame>
          <draw:frame draw:style-name="gr909" draw:text-style-name="P3" draw:layer="layout" svg:width="1.914cm" svg:height="0.962cm" draw:transform="rotate (1.5707963267949) translate (12.8cm 17.214cm)">
            <draw:text-box>
              <text:p>irq_o</text:p>
            </draw:text-box>
          </draw:frame>
          <draw:frame draw:style-name="gr915" draw:text-style-name="P3" draw:layer="layout" svg:width="2.547cm" svg:height="0.962cm" draw:transform="rotate (1.5707963267949) translate (13.4cm 17.214cm)">
            <draw:text-box>
              <text:p>gpio_io</text:p>
            </draw:text-box>
          </draw:frame>
          <draw:frame draw:style-name="gr909" draw:text-style-name="P3" draw:layer="layout" svg:width="1.914cm" svg:height="0.962cm" draw:transform="rotate (1.5707963267949) translate (14cm 17.215cm)">
            <draw:text-box>
              <text:p>cs_o</text:p>
            </draw:text-box>
          </draw:frame>
        </draw:g>
        <draw:g draw:style-name="gr1">
          <draw:custom-shape draw:style-name="gr908" draw:text-style-name="P84" draw:layer="layout" svg:width="6cm" svg:height="6cm" svg:x="11.006cm" svg:y="18cm">
            <text:p text:style-name="P1">QSPI</text:p>
            <draw:enhanced-geometry svg:viewBox="0 0 21600 21600" draw:type="rectangle" draw:enhanced-path="M 0 0 L 21600 0 21600 21600 0 21600 0 0 Z N"/>
          </draw:custom-shape>
          <draw:frame draw:style-name="gr909" draw:text-style-name="P3" draw:layer="layout" svg:width="1.914cm" svg:height="0.962cm" svg:x="11.006cm" svg:y="18.038cm">
            <draw:text-box>
              <text:p>adr_i</text:p>
            </draw:text-box>
          </draw:frame>
          <draw:frame draw:style-name="gr910"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911"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912" draw:text-style-name="P3" draw:layer="layout" svg:width="1.843cm" svg:height="0.962cm" svg:x="11.006cm" svg:y="23.038cm">
            <draw:text-box>
              <text:p>stb_i</text:p>
            </draw:text-box>
          </draw:frame>
          <draw:frame draw:style-name="gr913"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908" draw:text-style-name="P84" draw:layer="layout" svg:width="6cm" svg:height="6cm" svg:x="11.006cm" svg:y="25cm">
            <text:p text:style-name="P1">CGU</text:p>
            <draw:enhanced-geometry svg:viewBox="0 0 21600 21600" draw:type="rectangle" draw:enhanced-path="M 0 0 L 21600 0 21600 21600 0 21600 0 0 Z N"/>
          </draw:custom-shape>
          <draw:frame draw:style-name="gr909" draw:text-style-name="P3" draw:layer="layout" svg:width="1.914cm" svg:height="0.962cm" svg:x="11.006cm" svg:y="25.038cm">
            <draw:text-box>
              <text:p>adr_i</text:p>
            </draw:text-box>
          </draw:frame>
          <draw:frame draw:style-name="gr910"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911"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912" draw:text-style-name="P3" draw:layer="layout" svg:width="1.843cm" svg:height="0.962cm" svg:x="11.006cm" svg:y="30.038cm">
            <draw:text-box>
              <text:p>stb_i</text:p>
            </draw:text-box>
          </draw:frame>
          <draw:frame draw:style-name="gr913"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909" draw:text-style-name="P3" draw:layer="layout" svg:width="1.914cm" svg:height="0.962cm" draw:transform="rotate (1.5707963267949) translate (13.1cm 26.615cm)">
            <draw:text-box>
              <text:p>clk_i</text:p>
            </draw:text-box>
          </draw:frame>
          <draw:frame draw:style-name="gr914" draw:text-style-name="P3" draw:layer="layout" svg:width="1.7cm" svg:height="0.962cm" draw:transform="rotate (1.5707963267949) translate (13.9cm 26.515cm)">
            <draw:text-box>
              <text:p>rst_i</text:p>
            </draw:text-box>
          </draw:frame>
          <draw:frame draw:style-name="gr916" draw:text-style-name="P3" draw:layer="layout" svg:width="3.711cm" svg:height="0.962cm" draw:transform="rotate (1.5707963267949) translate (12.8cm 31.215cm)">
            <draw:text-box>
              <text:p>clk_bus1_o</text:p>
            </draw:text-box>
          </draw:frame>
          <draw:frame draw:style-name="gr916" draw:text-style-name="P3" draw:layer="layout" svg:width="3.711cm" svg:height="0.962cm" draw:transform="rotate (1.5707963267949) translate (13.4cm 31.216cm)">
            <draw:text-box>
              <text:p>clk_bus2_o</text:p>
            </draw:text-box>
          </draw:frame>
          <draw:frame draw:style-name="gr917" draw:text-style-name="P3" draw:layer="layout" svg:width="3.499cm" svg:height="0.962cm" draw:transform="rotate (1.5707963267949) translate (14cm 31.216cm)">
            <draw:text-box>
              <text:p>clk_qspi_o</text:p>
            </draw:text-box>
          </draw:frame>
          <draw:frame draw:style-name="gr918" draw:text-style-name="P3" draw:layer="layout" svg:width="3.571cm" svg:height="0.962cm" draw:transform="rotate (1.5707963267949) translate (14.6cm 31.217cm)">
            <draw:text-box>
              <text:p>clk_core_o</text:p>
            </draw:text-box>
          </draw:frame>
        </draw:g>
        <draw:custom-shape draw:style-name="gr919"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919"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919"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920"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920"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9.5cm" svg:y1="13.5cm" svg:x2="11cm" svg:y2="13.5cm">
          <text:p/>
        </draw:line>
        <draw:line draw:style-name="gr920" draw:text-style-name="P4" draw:layer="layout" svg:x1="9cm" svg:y1="14.5cm" svg:x2="11cm" svg:y2="14.5cm">
          <text:p/>
        </draw:line>
        <draw:line draw:style-name="gr920" draw:text-style-name="P4" draw:layer="layout" svg:x1="8.5cm" svg:y1="15.496cm" svg:x2="11cm" svg:y2="15.52cm">
          <text:p/>
        </draw:line>
        <draw:line draw:style-name="gr920"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1" draw:text-style-name="P4" draw:layer="layout" svg:x1="5.5cm" svg:y1="16cm" svg:x2="6cm" svg:y2="16cm">
          <text:p/>
        </draw:line>
        <draw:line draw:style-name="gr921" draw:text-style-name="P4" draw:layer="layout" svg:x1="3.5cm" svg:y1="17cm" svg:x2="6cm" svg:y2="17cm">
          <text:p/>
        </draw:line>
        <draw:line draw:style-name="gr921"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922"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909"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919" draw:text-style-name="P28" draw:layer="layout" svg:width="2cm" svg:height="2cm" svg:x="6cm" svg:y="22.5cm">
          <text:p text:style-name="P1">AND</text:p>
          <draw:enhanced-geometry svg:viewBox="0 0 21600 21600" draw:type="rectangle" draw:enhanced-path="M 0 0 L 21600 0 21600 21600 0 21600 0 0 Z N"/>
        </draw:custom-shape>
        <draw:line draw:style-name="gr921" draw:text-style-name="P4" draw:layer="layout" svg:x1="5.5cm" svg:y1="23cm" svg:x2="6cm" svg:y2="23cm">
          <text:p/>
        </draw:line>
        <draw:line draw:style-name="gr921"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9" draw:text-style-name="P28" draw:layer="layout" svg:width="2cm" svg:height="2cm" svg:x="6cm" svg:y="29.5cm">
          <text:p text:style-name="P1">AND</text:p>
          <draw:enhanced-geometry svg:viewBox="0 0 21600 21600" draw:type="rectangle" draw:enhanced-path="M 0 0 L 21600 0 21600 21600 0 21600 0 0 Z N"/>
        </draw:custom-shape>
        <draw:line draw:style-name="gr921" draw:text-style-name="P4" draw:layer="layout" svg:x1="5.5cm" svg:y1="30cm" svg:x2="6cm" svg:y2="30cm">
          <text:p/>
        </draw:line>
        <draw:line draw:style-name="gr921" draw:text-style-name="P4" draw:layer="layout" svg:x1="5cm" svg:y1="30.5cm" svg:x2="6cm" svg:y2="30.5cm">
          <text:p/>
        </draw:line>
        <draw:line draw:style-name="gr920" draw:text-style-name="P4" draw:layer="layout" svg:x1="8cm" svg:y1="23.5cm" svg:x2="11cm" svg:y2="23.5cm">
          <text:p/>
        </draw:line>
        <draw:line draw:style-name="gr920" draw:text-style-name="P4" draw:layer="layout" svg:x1="8cm" svg:y1="30.5cm" svg:x2="11cm" svg:y2="30.5cm">
          <text:p/>
        </draw:line>
        <draw:line draw:style-name="gr920"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9.5cm" svg:y1="20.508cm" svg:x2="11cm" svg:y2="20.508cm">
          <text:p/>
        </draw:line>
        <draw:line draw:style-name="gr920" draw:text-style-name="P4" draw:layer="layout" svg:x1="9cm" svg:y1="21.508cm" svg:x2="11cm" svg:y2="21.508cm">
          <text:p/>
        </draw:line>
        <draw:line draw:style-name="gr920"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10.5cm" svg:y1="25.516cm" svg:x2="11.006cm" svg:y2="25.516cm">
          <text:p/>
        </draw:line>
        <draw:line draw:style-name="gr920" draw:text-style-name="P4" draw:layer="layout" svg:x1="10cm" svg:y1="26.54cm" svg:x2="11.006cm" svg:y2="26.54cm">
          <text:p/>
        </draw:line>
        <draw:line draw:style-name="gr920" draw:text-style-name="P4" draw:layer="layout" svg:x1="9.5cm" svg:y1="27.516cm" svg:x2="11cm" svg:y2="27.516cm">
          <text:p/>
        </draw:line>
        <draw:line draw:style-name="gr920" draw:text-style-name="P4" draw:layer="layout" svg:x1="9cm" svg:y1="28.516cm" svg:x2="11cm" svg:y2="28.516cm">
          <text:p/>
        </draw:line>
        <draw:line draw:style-name="gr920" draw:text-style-name="P4" draw:layer="layout" svg:x1="8.5cm" svg:y1="29.512cm" svg:x2="11cm" svg:y2="29.536cm">
          <text:p/>
        </draw:line>
        <draw:line draw:style-name="gr921" draw:text-style-name="P4" draw:layer="layout" svg:x1="4cm" svg:y1="24cm" svg:x2="6cm" svg:y2="24cm">
          <text:p/>
        </draw:line>
        <draw:line draw:style-name="gr921" draw:text-style-name="P4" draw:layer="layout" svg:x1="4.5cm" svg:y1="31cm" svg:x2="6cm" svg:y2="31cm">
          <text:p/>
        </draw:line>
        <draw:line draw:style-name="gr923" draw:text-style-name="P4" draw:layer="layout" svg:x1="16.996cm" svg:y1="4.5cm" svg:x2="22cm" svg:y2="4.5cm">
          <text:p/>
        </draw:line>
        <draw:line draw:style-name="gr923" draw:text-style-name="P4" draw:layer="layout" svg:x1="19cm" svg:y1="5cm" svg:x2="22cm" svg:y2="5cm">
          <text:p/>
        </draw:line>
        <draw:line draw:style-name="gr923" draw:text-style-name="P4" draw:layer="layout" svg:x1="20cm" svg:y1="5.5cm" svg:x2="22cm" svg:y2="5.5cm">
          <text:p/>
        </draw:line>
        <draw:line draw:style-name="gr923" draw:text-style-name="P4" draw:layer="layout" svg:x1="16.996cm" svg:y1="12.5cm" svg:x2="22cm" svg:y2="12.5cm">
          <text:p/>
        </draw:line>
        <draw:line draw:style-name="gr923" draw:text-style-name="P4" draw:layer="layout" svg:x1="18cm" svg:y1="12cm" svg:x2="22cm" svg:y2="12cm">
          <text:p/>
        </draw:line>
        <draw:line draw:style-name="gr923"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3cm" svg:x2="36cm" svg:y2="4.3cm">
          <text:p/>
        </draw:line>
        <draw:line draw:style-name="gr38" draw:text-style-name="P4" draw:layer="layout" svg:x1="35cm" svg:y1="4.7cm" svg:x2="36.5cm" svg:y2="4.7cm">
          <text:p/>
        </draw:line>
        <draw:line draw:style-name="gr38" draw:text-style-name="P4" draw:layer="layout" svg:x1="35cm" svg:y1="5.1cm" svg:x2="37cm" svg:y2="5.1cm">
          <text:p/>
        </draw:line>
        <draw:line draw:style-name="gr38" draw:text-style-name="P4" draw:layer="layout" svg:x1="35cm" svg:y1="5.5cm" svg:x2="37.5cm" svg:y2="5.5cm">
          <text:p/>
        </draw:line>
        <draw:line draw:style-name="gr38" draw:text-style-name="P4" draw:layer="layout" svg:x1="35cm" svg:y1="5.9cm" svg:x2="38cm" svg:y2="5.9cm">
          <text:p/>
        </draw:line>
        <draw:line draw:style-name="gr38" draw:text-style-name="P4" draw:layer="layout" svg:x1="35cm" svg:y1="6.3cm" svg:x2="35.5cm" svg:y2="6.3cm">
          <text:p/>
        </draw:line>
        <draw:line draw:style-name="gr38" draw:text-style-name="P4" draw:layer="layout" svg:x1="36cm" svg:y1="3.5cm" svg:x2="36cm" svg:y2="4.3cm">
          <text:p/>
        </draw:line>
        <draw:line draw:style-name="gr38" draw:text-style-name="P4" draw:layer="layout" svg:x1="36.5cm" svg:y1="3cm" svg:x2="36.5cm" svg:y2="4.7cm">
          <text:p/>
        </draw:line>
        <draw:line draw:style-name="gr38" draw:text-style-name="P4" draw:layer="layout" svg:x1="37cm" svg:y1="2.5cm" svg:x2="37cm" svg:y2="5.1cm">
          <text:p/>
        </draw:line>
        <draw:line draw:style-name="gr38" draw:text-style-name="P4" draw:layer="layout" svg:x1="37.5cm" svg:y1="2cm" svg:x2="37.5cm" svg:y2="5.5cm">
          <text:p/>
        </draw:line>
        <draw:line draw:style-name="gr38" draw:text-style-name="P4" draw:layer="layout" svg:x1="38cm" svg:y1="1.5cm" svg:x2="38cm" svg:y2="5.9cm">
          <text:p/>
        </draw:line>
        <draw:line draw:style-name="gr38" draw:text-style-name="P4" draw:layer="layout" svg:x1="38.5cm" svg:y1="1cm" svg:x2="38.5cm" svg:y2="8cm">
          <text:p/>
        </draw:line>
        <draw:line draw:style-name="gr924"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919"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925" draw:text-style-name="P28" draw:layer="layout" svg:width="3cm" svg:height="2cm" svg:x="36cm" svg:y="8.5cm">
          <text:p text:style-name="P1">Arbiter</text:p>
          <draw:enhanced-geometry svg:viewBox="0 0 21600 21600" draw:type="rectangle" draw:enhanced-path="M 0 0 L 21600 0 21600 21600 0 21600 0 0 Z N"/>
        </draw:custom-shape>
        <draw:line draw:style-name="gr926" draw:text-style-name="P4" draw:layer="layout" svg:x1="35.5cm" svg:y1="9.5cm" svg:x2="36cm" svg:y2="9.5cm">
          <text:p/>
        </draw:line>
        <draw:line draw:style-name="gr38" draw:text-style-name="P4" draw:layer="layout" svg:x1="35.5cm" svg:y1="6.3cm" svg:x2="35.5cm" svg:y2="9.5cm">
          <text:p/>
        </draw:line>
        <draw:frame draw:style-name="gr927" draw:text-style-name="P3" draw:layer="layout" svg:width="2.161cm" svg:height="0.962cm" svg:x="36.8cm" svg:y="8.538cm">
          <draw:text-box>
            <text:p>cyc_o</text:p>
          </draw:text-box>
        </draw:frame>
        <draw:frame draw:style-name="gr928" draw:text-style-name="P3" draw:layer="layout" svg:width="2.444cm" svg:height="0.962cm" svg:x="36.801cm" svg:y="9.538cm">
          <draw:text-box>
            <text:p>gnt0_o</text:p>
          </draw:text-box>
        </draw:frame>
        <draw:line draw:style-name="gr38" draw:text-style-name="P4" draw:layer="layout" svg:x1="39cm" svg:y1="9cm" svg:x2="39.5cm" svg:y2="9cm">
          <text:p/>
        </draw:line>
        <draw:line draw:style-name="gr38" draw:text-style-name="P4" draw:layer="layout" svg:x1="39.5cm" svg:y1="8cm" svg:x2="39.5cm" svg:y2="9cm">
          <text:p/>
        </draw:line>
        <draw:line draw:style-name="gr38" draw:text-style-name="P4" draw:layer="layout" svg:x1="38.5cm" svg:y1="8cm" svg:x2="39.5cm" svg:y2="8cm">
          <text:p/>
        </draw:line>
        <draw:line draw:style-name="gr929"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0cm" svg:x2="39.5cm" svg:y2="10cm">
          <text:p/>
        </draw:line>
        <draw:line draw:style-name="gr38" draw:text-style-name="P4" draw:layer="layout" svg:x1="39.5cm" svg:y1="10cm" svg:x2="39.5cm" svg:y2="11.5cm">
          <text:p/>
        </draw:line>
        <draw:line draw:style-name="gr38" draw:text-style-name="P4" draw:layer="layout" svg:x1="26cm" svg:y1="11.5cm" svg:x2="39.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930" draw:text-style-name="P3" draw:layer="layout" svg:width="1.488cm" svg:height="0.962cm" svg:x="22cm" svg:y="6.7cm">
          <draw:text-box>
            <text:p>cs0</text:p>
          </draw:text-box>
        </draw:frame>
        <draw:frame draw:style-name="gr930" draw:text-style-name="P3" draw:layer="layout" svg:width="1.488cm" svg:height="0.962cm" svg:x="22.2cm" svg:y="7.1cm">
          <draw:text-box>
            <text:p>cs1</text:p>
          </draw:text-box>
        </draw:frame>
        <draw:frame draw:style-name="gr930" draw:text-style-name="P3" draw:layer="layout" svg:width="1.488cm" svg:height="0.962cm" svg:x="22.4cm" svg:y="7.5cm">
          <draw:text-box>
            <text:p>cs2</text:p>
          </draw:text-box>
        </draw:frame>
        <draw:frame draw:style-name="gr930" draw:text-style-name="P3" draw:layer="layout" svg:width="1.488cm" svg:height="0.962cm" svg:x="22.6cm" svg:y="7.9cm">
          <draw:text-box>
            <text:p>cs3</text:p>
          </draw:text-box>
        </draw:frame>
        <draw:g draw:style-name="gr1">
          <draw:custom-shape draw:style-name="gr908" draw:text-style-name="P84" draw:layer="layout" svg:width="6cm" svg:height="6cm" svg:x="11.007cm" svg:y="4.001cm">
            <text:p text:style-name="P1">D-Mem</text:p>
            <draw:enhanced-geometry svg:viewBox="0 0 21600 21600" draw:type="rectangle" draw:enhanced-path="M 0 0 L 21600 0 21600 21600 0 21600 0 0 Z N"/>
          </draw:custom-shape>
          <draw:frame draw:style-name="gr909" draw:text-style-name="P3" draw:layer="layout" svg:width="1.914cm" svg:height="0.962cm" svg:x="11.007cm" svg:y="4.039cm">
            <draw:text-box>
              <text:p>adr_i</text:p>
            </draw:text-box>
          </draw:frame>
          <draw:frame draw:style-name="gr910"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911"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912" draw:text-style-name="P3" draw:layer="layout" svg:width="1.843cm" svg:height="0.962cm" svg:x="11.007cm" svg:y="9.039cm">
            <draw:text-box>
              <text:p>stb_i</text:p>
            </draw:text-box>
          </draw:frame>
          <draw:frame draw:style-name="gr913"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909" draw:text-style-name="P3" draw:layer="layout" svg:width="1.914cm" svg:height="0.962cm" draw:transform="rotate (1.5707963267949) translate (13.101cm 5.615cm)">
            <draw:text-box>
              <text:p>clk_i</text:p>
            </draw:text-box>
          </draw:frame>
          <draw:frame draw:style-name="gr914" draw:text-style-name="P3" draw:layer="layout" svg:width="1.7cm" svg:height="0.962cm" draw:transform="rotate (1.5707963267949) translate (13.901cm 5.515cm)">
            <draw:text-box>
              <text:p>rst_i</text:p>
            </draw:text-box>
          </draw:frame>
        </draw:g>
        <draw:frame draw:style-name="gr931" draw:text-style-name="P85" draw:layer="layout" svg:width="2.267cm" svg:height="0.839cm" svg:x="21.9cm" svg:y="5.1cm">
          <draw:text-box>
            <text:p><text:span text:style-name="T38">one </text:span><text:span text:style-name="T38">hot</text:span></text:p>
          </draw:text-box>
        </draw:frame>
        <draw:line draw:style-name="gr923" draw:text-style-name="P4" draw:layer="layout" svg:x1="20.5cm" svg:y1="6cm" svg:x2="22cm" svg:y2="6cm">
          <text:p/>
        </draw:line>
        <draw:line draw:style-name="gr923"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920"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0" draw:text-style-name="P4" draw:layer="layout" svg:x1="9.5cm" svg:y1="6.508cm" svg:x2="11cm" svg:y2="6.508cm">
          <text:p/>
        </draw:line>
        <draw:line draw:style-name="gr920" draw:text-style-name="P4" draw:layer="layout" svg:x1="9cm" svg:y1="7.508cm" svg:x2="11cm" svg:y2="7.508cm">
          <text:p/>
        </draw:line>
        <draw:line draw:style-name="gr920"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9" draw:text-style-name="P28" draw:layer="layout" svg:width="2cm" svg:height="2cm" svg:x="6cm" svg:y="8.5cm">
          <text:p text:style-name="P1">AND</text:p>
          <draw:enhanced-geometry svg:viewBox="0 0 21600 21600" draw:type="rectangle" draw:enhanced-path="M 0 0 L 21600 0 21600 21600 0 21600 0 0 Z N"/>
        </draw:custom-shape>
        <draw:line draw:style-name="gr920" draw:text-style-name="P4" draw:layer="layout" svg:x1="8cm" svg:y1="9.5cm" svg:x2="11cm" svg:y2="9.5cm">
          <text:p/>
        </draw:line>
        <draw:line draw:style-name="gr921" draw:text-style-name="P4" draw:layer="layout" svg:x1="5.5cm" svg:y1="9cm" svg:x2="6cm" svg:y2="9cm">
          <text:p/>
        </draw:line>
        <draw:line draw:style-name="gr921" draw:text-style-name="P4" draw:layer="layout" svg:x1="3cm" svg:y1="10cm" svg:x2="6cm" svg:y2="10cm">
          <text:p/>
        </draw:line>
        <draw:line draw:style-name="gr921"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919"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932"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933"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17.5cm" svg:x2="26.5cm" svg:y2="7.5cm">
          <text:p/>
        </draw:line>
        <draw:line draw:style-name="gr38" draw:text-style-name="P4" draw:layer="layout" svg:x1="36cm" svg:y1="9.5cm" svg:x2="38.961cm" svg:y2="9cm">
          <text:p/>
        </draw:line>
        <draw:line draw:style-name="gr38" draw:text-style-name="P4" draw:layer="layout" svg:x1="36cm" svg:y1="9.5cm" svg:x2="39cm" svg:y2="10cm">
          <text:p/>
        </draw:line>
        <draw:g draw:style-name="gr1">
          <draw:custom-shape draw:style-name="gr908" draw:text-style-name="P84" draw:layer="layout" svg:width="6cm" svg:height="6cm" svg:x="52cm" svg:y="4cm">
            <text:p text:style-name="P1">I-Mem</text:p>
            <draw:enhanced-geometry svg:viewBox="0 0 21600 21600" draw:type="rectangle" draw:enhanced-path="M 0 0 L 21600 0 21600 21600 0 21600 0 0 Z N"/>
          </draw:custom-shape>
          <draw:frame draw:style-name="gr909" draw:text-style-name="P3" draw:layer="layout" svg:width="1.914cm" svg:height="0.962cm" svg:x="52cm" svg:y="4.038cm">
            <draw:text-box>
              <text:p>adr_i</text:p>
            </draw:text-box>
          </draw:frame>
          <draw:frame draw:style-name="gr910"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913" draw:text-style-name="P3" draw:layer="layout" svg:width="2.091cm" svg:height="0.962cm" svg:x="55.9cm" svg:y="4cm">
            <draw:text-box>
              <text:p>dat_o</text:p>
            </draw:text-box>
          </draw:frame>
          <draw:frame draw:style-name="gr909" draw:text-style-name="P3" draw:layer="layout" svg:width="1.914cm" svg:height="0.962cm" draw:transform="rotate (1.5707963267949) translate (54.094cm 5.614cm)">
            <draw:text-box>
              <text:p>tck_i</text:p>
            </draw:text-box>
          </draw:frame>
          <draw:frame draw:style-name="gr932" draw:text-style-name="P3" draw:layer="layout" svg:width="1.772cm" svg:height="0.962cm" draw:transform="rotate (1.5707963267949) translate (54.894cm 5.514cm)">
            <draw:text-box>
              <text:p>clk_i</text:p>
            </draw:text-box>
          </draw:frame>
        </draw:g>
        <draw:custom-shape draw:style-name="gr919"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5cm" svg:y1="4cm" svg:x2="46cm" svg:y2="4cm">
          <text:p/>
        </draw:line>
        <draw:line draw:style-name="gr146" draw:text-style-name="P4" draw:layer="layout" svg:x1="45cm" svg:y1="5cm" svg:x2="46cm" svg:y2="5cm">
          <text:p/>
        </draw:line>
        <draw:frame draw:style-name="gr934"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935"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936" draw:text-style-name="P3" draw:layer="layout" svg:width="3.533cm" svg:height="0.962cm" svg:x="45.3cm" svg:y="5.638cm">
          <draw:text-box>
            <text:p>mux_sel_s</text:p>
          </draw:text-box>
        </draw:frame>
        <draw:g draw:style-name="gr1">
          <draw:custom-shape draw:style-name="gr937" draw:text-style-name="P14" draw:layer="layout" svg:width="1cm" svg:height="1cm" svg:x="44cm" svg:y="4.5cm">
            <text:p/>
            <draw:enhanced-geometry svg:viewBox="0 0 21600 21600" draw:type="rectangle" draw:enhanced-path="M 0 0 L 21600 0 21600 21600 0 21600 0 0 Z N"/>
          </draw:custom-shape>
          <draw:custom-shape draw:style-name="gr937" draw:text-style-name="P14" draw:layer="layout" svg:width="1cm" svg:height="1cm" svg:x="44cm" svg:y="5.5cm">
            <text:p/>
            <draw:enhanced-geometry svg:viewBox="0 0 21600 21600" draw:type="rectangle" draw:enhanced-path="M 0 0 L 21600 0 21600 21600 0 21600 0 0 Z N"/>
          </draw:custom-shape>
          <draw:custom-shape draw:style-name="gr937" draw:text-style-name="P14" draw:layer="layout" svg:width="1cm" svg:height="1cm" svg:x="44cm" svg:y="7.5cm">
            <text:p/>
            <draw:enhanced-geometry svg:viewBox="0 0 21600 21600" draw:type="rectangle" draw:enhanced-path="M 0 0 L 21600 0 21600 21600 0 21600 0 0 Z N"/>
          </draw:custom-shape>
          <draw:custom-shape draw:style-name="gr937"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frame draw:style-name="gr938"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919"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939"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940" draw:text-style-name="P3" draw:layer="layout" svg:width="4.545cm" svg:height="0.962cm" svg:x="47.7cm" svg:y="4.7cm">
          <draw:text-box>
            <text:p>iBusDataWr_s</text:p>
          </draw:text-box>
        </draw:frame>
        <draw:frame draw:style-name="gr941" draw:text-style-name="P3" draw:layer="layout" svg:width="3.52cm" svg:height="0.962cm" svg:x="47.9cm" svg:y="9.238cm">
          <draw:text-box>
            <text:p>iMemWr_s</text:p>
          </draw:text-box>
        </draw:frame>
        <draw:custom-shape draw:style-name="gr919"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942" draw:text-style-name="P3" draw:layer="layout" svg:width="3.254cm" svg:height="0.962cm" svg:x="48cm" svg:y="11.1cm">
          <draw:text-box>
            <text:p>im_upd_s</text:p>
          </draw:text-box>
        </draw:frame>
        <draw:g draw:style-name="gr1">
          <draw:custom-shape draw:style-name="gr943" draw:text-style-name="P84" draw:layer="layout" svg:width="10cm" svg:height="11cm" svg:x="50cm" svg:y="15cm">
            <text:p text:style-name="P1">JTAG</text:p>
            <draw:enhanced-geometry svg:viewBox="0 0 21600 21600" draw:type="rectangle" draw:enhanced-path="M 0 0 L 21600 0 21600 21600 0 21600 0 0 Z N"/>
          </draw:custom-shape>
          <draw:frame draw:style-name="gr918" draw:text-style-name="P3" draw:layer="layout" svg:width="3.571cm" svg:height="0.962cm" svg:x="50.134cm" svg:y="16.038cm">
            <draw:text-box>
              <text:p>sc01_tdo_i</text:p>
            </draw:text-box>
          </draw:frame>
          <draw:frame draw:style-name="gr944" draw:text-style-name="P3" draw:layer="layout" svg:width="3.148cm" svg:height="0.962cm" svg:x="56.787cm" svg:y="16cm">
            <draw:text-box>
              <text:p>tap_rst_o</text:p>
            </draw:text-box>
          </draw:frame>
          <draw:frame draw:style-name="gr945" draw:text-style-name="P3" draw:layer="layout" svg:width="1.806cm" svg:height="0.962cm" draw:transform="rotate (1.5707963267949) translate (53.682cm 16.906cm)">
            <draw:text-box>
              <text:p>tck_i</text:p>
            </draw:text-box>
          </draw:frame>
          <draw:frame draw:style-name="gr946" draw:text-style-name="P3" draw:layer="layout" svg:width="1.878cm" svg:height="0.962cm" draw:transform="rotate (1.5707963267949) translate (54.282cm 16.978cm)">
            <draw:text-box>
              <text:p>trst_i</text:p>
            </draw:text-box>
          </draw:frame>
          <draw:frame draw:style-name="gr947" draw:text-style-name="P3" draw:layer="layout" svg:width="2.018cm" svg:height="0.962cm" draw:transform="rotate (1.5707963267949) translate (54.882cm 17.118cm)">
            <draw:text-box>
              <text:p>tms_i</text:p>
            </draw:text-box>
          </draw:frame>
          <draw:frame draw:style-name="gr948" draw:text-style-name="P3" draw:layer="layout" svg:width="1.666cm" svg:height="0.962cm" draw:transform="rotate (1.5707963267949) translate (55.482cm 16.766cm)">
            <draw:text-box>
              <text:p>tdi_i</text:p>
            </draw:text-box>
          </draw:frame>
          <draw:frame draw:style-name="gr896" draw:text-style-name="P3" draw:layer="layout" svg:width="2.09cm" svg:height="0.962cm" draw:transform="rotate (1.5707963267949) translate (54.5cm 25.918cm)">
            <draw:text-box>
              <text:p>tdo_o</text:p>
            </draw:text-box>
          </draw:frame>
          <draw:frame draw:style-name="gr944" draw:text-style-name="P3" draw:layer="layout" svg:width="3.148cm" svg:height="0.962cm" svg:x="56.787cm" svg:y="16.6cm">
            <draw:text-box>
              <text:p>dr_cap_o</text:p>
            </draw:text-box>
          </draw:frame>
          <draw:frame draw:style-name="gr918" draw:text-style-name="P3" draw:layer="layout" svg:width="3.571cm" svg:height="0.962cm" svg:x="56.364cm" svg:y="17.2cm">
            <draw:text-box>
              <text:p>sc01_tdi_o</text:p>
            </draw:text-box>
          </draw:frame>
          <draw:frame draw:style-name="gr949" draw:text-style-name="P3" draw:layer="layout" svg:width="4.066cm" svg:height="0.962cm" svg:x="55.869cm" svg:y="17.8cm">
            <draw:text-box>
              <text:p>sc01_shift_o</text:p>
            </draw:text-box>
          </draw:frame>
          <draw:frame draw:style-name="gr950" draw:text-style-name="P3" draw:layer="layout" svg:width="4.346cm" svg:height="0.962cm" svg:x="55.589cm" svg:y="18.4cm">
            <draw:text-box>
              <text:p>sc01_clock_o</text:p>
            </draw:text-box>
          </draw:frame>
          <draw:frame draw:style-name="gr951" draw:text-style-name="P3" draw:layer="layout" svg:width="2.898cm" svg:height="0.962cm" svg:x="50.134cm" svg:y="16.638cm">
            <draw:text-box>
              <text:p>im_tdo_i</text:p>
            </draw:text-box>
          </draw:frame>
          <draw:frame draw:style-name="gr952" draw:text-style-name="P3" draw:layer="layout" svg:width="2.902cm" svg:height="0.962cm" svg:x="50.134cm" svg:y="17.238cm">
            <draw:text-box>
              <text:p>bs_tdo_i</text:p>
            </draw:text-box>
          </draw:frame>
          <draw:frame draw:style-name="gr951" draw:text-style-name="P3" draw:layer="layout" svg:width="2.898cm" svg:height="0.962cm" svg:x="57.037cm" svg:y="19cm">
            <draw:text-box>
              <text:p>im_tdi_o</text:p>
            </draw:text-box>
          </draw:frame>
          <draw:frame draw:style-name="gr953" draw:text-style-name="P3" draw:layer="layout" svg:width="3.393cm" svg:height="0.962cm" svg:x="56.542cm" svg:y="19.6cm">
            <draw:text-box>
              <text:p>im_shift_o</text:p>
            </draw:text-box>
          </draw:frame>
          <draw:frame draw:style-name="gr954" draw:text-style-name="P3" draw:layer="layout" svg:width="3.677cm" svg:height="0.962cm" svg:x="56.258cm" svg:y="20.2cm">
            <draw:text-box>
              <text:p>im_clock_o</text:p>
            </draw:text-box>
          </draw:frame>
          <draw:frame draw:style-name="gr955" draw:text-style-name="P3" draw:layer="layout" svg:width="3.288cm" svg:height="0.962cm" svg:x="56.647cm" svg:y="20.8cm">
            <draw:text-box>
              <text:p>im_upd_o</text:p>
            </draw:text-box>
          </draw:frame>
          <draw:frame draw:style-name="gr956" draw:text-style-name="P3" draw:layer="layout" svg:width="3.817cm" svg:height="0.962cm" svg:x="56.118cm" svg:y="21.4cm">
            <draw:text-box>
              <text:p>im_mode_o</text:p>
            </draw:text-box>
          </draw:frame>
          <draw:frame draw:style-name="gr952" draw:text-style-name="P3" draw:layer="layout" svg:width="2.902cm" svg:height="0.962cm" svg:x="57.033cm" svg:y="22cm">
            <draw:text-box>
              <text:p>bs_tdi_o</text:p>
            </draw:text-box>
          </draw:frame>
          <draw:frame draw:style-name="gr953" draw:text-style-name="P3" draw:layer="layout" svg:width="3.393cm" svg:height="0.962cm" svg:x="56.542cm" svg:y="22.6cm">
            <draw:text-box>
              <text:p>bs_shift_o</text:p>
            </draw:text-box>
          </draw:frame>
          <draw:frame draw:style-name="gr954" draw:text-style-name="P3" draw:layer="layout" svg:width="3.677cm" svg:height="0.962cm" svg:x="56.258cm" svg:y="23.2cm">
            <draw:text-box>
              <text:p>bs_clock_o</text:p>
            </draw:text-box>
          </draw:frame>
          <draw:frame draw:style-name="gr955" draw:text-style-name="P3" draw:layer="layout" svg:width="3.288cm" svg:height="0.962cm" svg:x="56.647cm" svg:y="23.8cm">
            <draw:text-box>
              <text:p>bs_upd_o</text:p>
            </draw:text-box>
          </draw:frame>
          <draw:frame draw:style-name="gr956"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g draw:style-name="gr1">
          <draw:g draw:style-name="gr1">
            <draw:custom-shape draw:style-name="gr957" draw:text-style-name="P49" draw:layer="layout" svg:width="4.5cm" svg:height="3cm" svg:x="30.5cm" svg:y="4cm">
              <text:p text:style-name="P48"><text:span text:style-name="T11">mBPIData</text:span></text:p>
              <draw:enhanced-geometry svg:viewBox="0 0 21600 21600" draw:mirror-horizontal="false" draw:mirror-vertical="false" draw:type="rectangle" draw:enhanced-path="M 0 0 L 21600 0 21600 21600 0 21600 0 0 Z N"/>
            </draw:custom-shape>
            <draw:frame draw:style-name="gr382" draw:text-style-name="P36" draw:layer="layout" svg:width="2.551cm" svg:height="0.569cm" svg:x="30.6cm" svg:y="5.208cm">
              <draw:text-box>
                <text:p><text:span text:style-name="T11">dat_from_</text:span><text:span text:style-name="T11">core_i</text:span></text:p>
              </draw:text-box>
            </draw:frame>
            <draw:frame draw:style-name="gr958" draw:text-style-name="P36" draw:layer="layout" svg:width="1.289cm" svg:height="0.569cm" svg:x="30.6cm" svg:y="4.8cm">
              <draw:text-box>
                <text:p><text:span text:style-name="T11">addr_i</text:span></text:p>
              </draw:text-box>
            </draw:frame>
            <draw:frame draw:style-name="gr393" draw:text-style-name="P36" draw:layer="layout" svg:width="2.314cm" svg:height="0.569cm" svg:x="30.586cm" svg:y="6cm">
              <draw:text-box>
                <text:p><text:span text:style-name="T11">dat_to_co</text:span><text:span text:style-name="T11">re_o</text:span></text:p>
              </draw:text-box>
            </draw:frame>
            <draw:frame draw:style-name="gr959" draw:text-style-name="P36" draw:layer="layout" svg:width="1.018cm" svg:height="0.569cm" svg:x="30.6cm" svg:y="5.616cm">
              <draw:text-box>
                <text:p><text:span text:style-name="T11">wr_i</text:span></text:p>
              </draw:text-box>
            </draw:frame>
            <draw:frame draw:style-name="gr960" draw:text-style-name="P36" draw:layer="layout" svg:width="2.297cm" svg:height="0.569cm" svg:x="32.603cm" svg:y="4cm">
              <draw:text-box>
                <text:p><text:span text:style-name="T11">wb_m_addr_o</text:span></text:p>
              </draw:text-box>
            </draw:frame>
            <draw:frame draw:style-name="gr476" draw:text-style-name="P36" draw:layer="layout" svg:width="2.03cm" svg:height="0.569cm" svg:x="30.6cm" svg:y="4.023cm">
              <draw:text-box>
                <text:p><text:span text:style-name="T11">wb_m_da</text:span><text:span text:style-name="T11">t_i</text:span></text:p>
              </draw:text-box>
            </draw:frame>
            <draw:frame draw:style-name="gr961" draw:text-style-name="P36" draw:layer="layout" svg:width="2.123cm" svg:height="0.569cm" svg:x="32.777cm" svg:y="4.4cm">
              <draw:text-box>
                <text:p><text:span text:style-name="T11">wb_m_dat_o</text:span></text:p>
              </draw:text-box>
            </draw:frame>
            <draw:frame draw:style-name="gr508" draw:text-style-name="P36" draw:layer="layout" svg:width="2.094cm" svg:height="0.569cm" svg:x="32.806cm" svg:y="5.2cm">
              <draw:text-box>
                <text:p><text:span text:style-name="T11">wb_m_we_o</text:span></text:p>
              </draw:text-box>
            </draw:frame>
            <draw:frame draw:style-name="gr508" draw:text-style-name="P36" draw:layer="layout" svg:width="2.094cm" svg:height="0.569cm" svg:x="32.806cm" svg:y="4.8cm">
              <draw:text-box>
                <text:p><text:span text:style-name="T11">wb_m_sel_o</text:span></text:p>
              </draw:text-box>
            </draw:frame>
            <draw:frame draw:style-name="gr962" draw:text-style-name="P36" draw:layer="layout" svg:width="2.106cm" svg:height="0.569cm" svg:x="32.794cm" svg:y="5.6cm">
              <draw:text-box>
                <text:p><text:span text:style-name="T11">wb_m_stb_o</text:span></text:p>
              </draw:text-box>
            </draw:frame>
            <draw:frame draw:style-name="gr963" draw:text-style-name="P36" draw:layer="layout" svg:width="2.077cm" svg:height="0.569cm" svg:x="30.6cm" svg:y="4.431cm">
              <draw:text-box>
                <text:p><text:span text:style-name="T11">wb_m_ac</text:span><text:span text:style-name="T11">k_i</text:span></text:p>
              </draw:text-box>
            </draw:frame>
            <draw:frame draw:style-name="gr964" draw:text-style-name="P36" draw:layer="layout" svg:width="2.157cm" svg:height="0.569cm" svg:x="32.743cm" svg:y="6cm">
              <draw:text-box>
                <text:p><text:span text:style-name="T11">wb_m_cyc_o</text:span></text:p>
              </draw:text-box>
            </draw:frame>
          </draw:g>
          <draw:g draw:style-name="gr1">
            <draw:custom-shape draw:style-name="gr957" draw:text-style-name="P49" draw:layer="layout" svg:width="4.5cm" svg:height="3cm" svg:x="30.5cm" svg:y="7.8cm">
              <text:p text:style-name="P48"><text:span text:style-name="T11">mBPIInstr</text:span></text:p>
              <draw:enhanced-geometry svg:viewBox="0 0 21600 21600" draw:mirror-horizontal="false" draw:mirror-vertical="false" draw:type="rectangle" draw:enhanced-path="M 0 0 L 21600 0 21600 21600 0 21600 0 0 Z N"/>
            </draw:custom-shape>
            <draw:frame draw:style-name="gr382" draw:text-style-name="P36" draw:layer="layout" svg:width="2.551cm" svg:height="0.569cm" svg:x="30.6cm" svg:y="9.008cm">
              <draw:text-box>
                <text:p><text:span text:style-name="T11">dat_from_</text:span><text:span text:style-name="T11">core_i</text:span></text:p>
              </draw:text-box>
            </draw:frame>
            <draw:frame draw:style-name="gr958" draw:text-style-name="P36" draw:layer="layout" svg:width="1.289cm" svg:height="0.569cm" svg:x="30.6cm" svg:y="8.6cm">
              <draw:text-box>
                <text:p><text:span text:style-name="T11">addr_i</text:span></text:p>
              </draw:text-box>
            </draw:frame>
            <draw:frame draw:style-name="gr393" draw:text-style-name="P36" draw:layer="layout" svg:width="2.314cm" svg:height="0.569cm" svg:x="30.586cm" svg:y="9.8cm">
              <draw:text-box>
                <text:p><text:span text:style-name="T11">dat_to_co</text:span><text:span text:style-name="T11">re_o</text:span></text:p>
              </draw:text-box>
            </draw:frame>
            <draw:frame draw:style-name="gr959" draw:text-style-name="P36" draw:layer="layout" svg:width="1.018cm" svg:height="0.569cm" svg:x="30.6cm" svg:y="9.416cm">
              <draw:text-box>
                <text:p><text:span text:style-name="T11">wr_i</text:span></text:p>
              </draw:text-box>
            </draw:frame>
            <draw:frame draw:style-name="gr960" draw:text-style-name="P36" draw:layer="layout" svg:width="2.297cm" svg:height="0.569cm" svg:x="32.603cm" svg:y="7.8cm">
              <draw:text-box>
                <text:p><text:span text:style-name="T11">wb_m_addr_o</text:span></text:p>
              </draw:text-box>
            </draw:frame>
            <draw:frame draw:style-name="gr476" draw:text-style-name="P36" draw:layer="layout" svg:width="2.03cm" svg:height="0.569cm" svg:x="30.6cm" svg:y="7.823cm">
              <draw:text-box>
                <text:p><text:span text:style-name="T11">wb_m_da</text:span><text:span text:style-name="T11">t_i</text:span></text:p>
              </draw:text-box>
            </draw:frame>
            <draw:frame draw:style-name="gr961" draw:text-style-name="P36" draw:layer="layout" svg:width="2.123cm" svg:height="0.569cm" svg:x="32.777cm" svg:y="8.2cm">
              <draw:text-box>
                <text:p><text:span text:style-name="T11">wb_m_dat_o</text:span></text:p>
              </draw:text-box>
            </draw:frame>
            <draw:frame draw:style-name="gr508" draw:text-style-name="P36" draw:layer="layout" svg:width="2.094cm" svg:height="0.569cm" svg:x="32.806cm" svg:y="9cm">
              <draw:text-box>
                <text:p><text:span text:style-name="T11">wb_m_we_o</text:span></text:p>
              </draw:text-box>
            </draw:frame>
            <draw:frame draw:style-name="gr508" draw:text-style-name="P36" draw:layer="layout" svg:width="2.094cm" svg:height="0.569cm" svg:x="32.806cm" svg:y="8.6cm">
              <draw:text-box>
                <text:p><text:span text:style-name="T11">wb_m_sel_o</text:span></text:p>
              </draw:text-box>
            </draw:frame>
            <draw:frame draw:style-name="gr962" draw:text-style-name="P36" draw:layer="layout" svg:width="2.106cm" svg:height="0.569cm" svg:x="32.794cm" svg:y="9.4cm">
              <draw:text-box>
                <text:p><text:span text:style-name="T11">wb_m_stb_o</text:span></text:p>
              </draw:text-box>
            </draw:frame>
            <draw:frame draw:style-name="gr963" draw:text-style-name="P36" draw:layer="layout" svg:width="2.077cm" svg:height="0.569cm" svg:x="30.6cm" svg:y="8.231cm">
              <draw:text-box>
                <text:p><text:span text:style-name="T11">wb_m_ac</text:span><text:span text:style-name="T11">k_i</text:span></text:p>
              </draw:text-box>
            </draw:frame>
            <draw:frame draw:style-name="gr964" draw:text-style-name="P36" draw:layer="layout" svg:width="2.157cm" svg:height="0.569cm" svg:x="32.743cm" svg:y="9.8cm">
              <draw:text-box>
                <text:p><text:span text:style-name="T11">wb_m_cyc_o</text:span></text:p>
              </draw:text-box>
            </draw:frame>
          </draw:g>
          <draw:polygon draw:style-name="gr965" draw:text-style-name="P86" draw:layer="layout" svg:width="5.999cm" svg:height="6.799cm" svg:x="29cm" svg:y="4cm" svg:viewBox="0 0 6000 6800" draw:points="1000,0 100,0 0,0 0,6800 1100,6800 1100,3800 6000,3800 6000,3000 1100,3000 1100,0">
            <text:p/>
          </draw:polygon>
          <draw:frame draw:style-name="gr966" draw:text-style-name="P36" draw:layer="layout" svg:width="1.806cm" svg:height="0.569cm" svg:x="31.5cm" svg:y="7.131cm">
            <draw:text-box>
              <text:p><text:span text:style-name="T11">CPU-</text:span><text:span text:style-name="T11">Core</text:span></text:p>
            </draw:text-box>
          </draw:frame>
          <draw:line draw:style-name="gr146" draw:text-style-name="P4" draw:layer="layout" svg:x1="30.1cm" svg:y1="5.1cm" svg:x2="30.5cm" svg:y2="5.1cm">
            <text:p/>
          </draw:line>
          <draw:line draw:style-name="gr146" draw:text-style-name="P4" draw:layer="layout" svg:x1="30.1cm" svg:y1="5.5cm" svg:x2="30.5cm" svg:y2="5.5cm">
            <text:p/>
          </draw:line>
          <draw:line draw:style-name="gr146" draw:text-style-name="P4" draw:layer="layout" svg:x1="30.1cm" svg:y1="5.9cm" svg:x2="30.5cm" svg:y2="5.9cm">
            <text:p/>
          </draw:line>
          <draw:line draw:style-name="gr146" draw:text-style-name="P4" draw:layer="layout" svg:x1="30.5cm" svg:y1="6.3cm" svg:x2="30.1cm" svg:y2="6.3cm">
            <text:p/>
          </draw:line>
          <draw:line draw:style-name="gr146" draw:text-style-name="P4" draw:layer="layout" svg:x1="30.1cm" svg:y1="8.9cm" svg:x2="30.5cm" svg:y2="8.9cm">
            <text:p/>
          </draw:line>
          <draw:line draw:style-name="gr146" draw:text-style-name="P4" draw:layer="layout" svg:x1="30.5cm" svg:y1="10.1cm" svg:x2="30.1cm" svg:y2="10.1cm">
            <text:p/>
          </draw:line>
          <draw:frame draw:style-name="gr967" draw:text-style-name="P36" draw:layer="layout" svg:width="1.035cm" svg:height="0.569cm" svg:x="29.1cm" svg:y="7.232cm">
            <draw:text-box>
              <text:p><text:span text:style-name="T11">irq_i</text:span></text:p>
            </draw:text-box>
          </draw:frame>
        </draw:g>
        <draw:line draw:style-name="gr968" draw:text-style-name="P4" draw:layer="layout" svg:x1="24cm" svg:y1="4.3cm" svg:x2="30.5cm" svg:y2="4.3cm">
          <text:p/>
        </draw:line>
        <draw:line draw:style-name="gr146" draw:text-style-name="P4" draw:layer="layout" svg:x1="27.7cm" svg:y1="4.7cm" svg:x2="30.5cm" svg:y2="4.7cm">
          <text:p/>
        </draw:line>
        <draw:line draw:style-name="gr38" draw:text-style-name="P4" draw:layer="layout" svg:x1="27.7cm" svg:y1="5cm" svg:x2="27.7cm" svg:y2="4.7cm">
          <text:p/>
        </draw:line>
        <draw:line draw:style-name="gr146" draw:text-style-name="P4" draw:layer="layout" svg:x1="25cm" svg:y1="5.5cm" svg:x2="26.5cm" svg:y2="5.5cm">
          <text:p/>
        </draw:line>
        <draw:line draw:style-name="gr146" draw:text-style-name="P4" draw:layer="layout" svg:x1="26.5cm" svg:y1="7.5cm" svg:x2="29cm" svg:y2="7.5cm">
          <text:p/>
        </draw:line>
        <draw:line draw:style-name="gr38" draw:text-style-name="P4" draw:layer="layout" svg:x1="35cm" svg:y1="8.1cm" svg:x2="42.5cm" svg:y2="8.1cm">
          <text:p/>
        </draw:line>
        <draw:line draw:style-name="gr38" draw:text-style-name="P4" draw:layer="layout" svg:x1="42.5cm" svg:y1="8.1cm" svg:x2="42.535cm" svg:y2="4cm">
          <text:p/>
        </draw:line>
        <draw:line draw:style-name="gr146" draw:text-style-name="P4" draw:layer="layout" svg:x1="28cm" svg:y1="8.1cm" svg:x2="30.5cm" svg:y2="8.1cm">
          <text:p/>
        </draw:line>
        <draw:line draw:style-name="gr38" draw:text-style-name="P4" draw:layer="layout" svg:x1="28cm" svg:y1="8.1cm" svg:x2="28cm" svg:y2="11.2cm">
          <text:p/>
        </draw:line>
        <draw:line draw:style-name="gr38" draw:text-style-name="P4" draw:layer="layout" svg:x1="28cm" svg:y1="11.2cm" svg:x2="42cm" svg:y2="11.2cm">
          <text:p/>
        </draw:line>
        <draw:line draw:style-name="gr38" draw:text-style-name="P4" draw:layer="layout" svg:x1="42cm" svg:y1="11.2cm" svg:x2="42cm" svg:y2="3cm">
          <text:p/>
        </draw:line>
      </draw:page>
      <draw:page draw:name="page27" draw:style-name="dp1" draw:master-page-name="Default">
        <draw:g draw:style-name="gr1">
          <draw:custom-shape draw:style-name="gr969" draw:text-style-name="P12" draw:layer="layout" svg:width="4cm" svg:height="4cm" svg:x="23cm" svg:y="4cm">
            <text:p text:style-name="P1">D-Mem</text:p>
            <draw:enhanced-geometry svg:viewBox="0 0 21600 21600" draw:type="rectangle" draw:enhanced-path="M 0 0 L 21600 0 21600 21600 0 21600 0 0 Z N"/>
          </draw:custom-shape>
          <draw:frame draw:style-name="gr970" draw:text-style-name="P9" draw:layer="layout" svg:width="0.878cm" svg:height="0.725cm" svg:x="24.522cm" svg:y="4cm">
            <draw:text-box>
              <text:p><text:span text:style-name="T2">re</text:span></text:p>
            </draw:text-box>
          </draw:frame>
          <draw:frame draw:style-name="gr971"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drw</text:span></text:p>
            </draw:text-box>
          </draw:frame>
          <draw:frame draw:style-name="gr972" draw:text-style-name="P9" draw:layer="layout" svg:width="1.49cm" svg:height="0.725cm" svg:x="23.01cm" svg:y="4.6cm">
            <draw:text-box>
              <text:p><text:span text:style-name="T2">addrr</text:span></text:p>
            </draw:text-box>
          </draw:frame>
          <draw:frame draw:style-name="gr344"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873"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875" draw:text-style-name="P82" draw:layer="layout" svg:width="0.888cm" svg:height="0.806cm" svg:x="9cm" svg:y="6.694cm">
            <draw:text-box>
              <text:p><text:span text:style-name="T37">di</text:span></text:p>
            </draw:text-box>
          </draw:frame>
          <draw:frame draw:style-name="gr877" draw:text-style-name="P82" draw:layer="layout" svg:width="1.053cm" svg:height="0.806cm" svg:x="9cm" svg:y="6cm">
            <draw:text-box>
              <text:p><text:span text:style-name="T37">do</text:span></text:p>
            </draw:text-box>
          </draw:frame>
        </draw:g>
        <draw:g draw:style-name="gr1">
          <draw:custom-shape draw:style-name="gr873"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875" draw:text-style-name="P82" draw:layer="layout" svg:width="0.888cm" svg:height="0.806cm" svg:x="9cm" svg:y="3.694cm">
            <draw:text-box>
              <text:p><text:span text:style-name="T37">di</text:span></text:p>
            </draw:text-box>
          </draw:frame>
          <draw:frame draw:style-name="gr877" draw:text-style-name="P82" draw:layer="layout" svg:width="1.053cm" svg:height="0.806cm" svg:x="9cm" svg:y="3cm">
            <draw:text-box>
              <text:p><text:span text:style-name="T37">do</text:span></text:p>
            </draw:text-box>
          </draw:frame>
        </draw:g>
        <draw:g draw:style-name="gr1">
          <draw:custom-shape draw:style-name="gr873"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875" draw:text-style-name="P82" draw:layer="layout" svg:width="0.888cm" svg:height="0.806cm" svg:x="9cm" svg:y="9.694cm">
            <draw:text-box>
              <text:p><text:span text:style-name="T37">di</text:span></text:p>
            </draw:text-box>
          </draw:frame>
          <draw:frame draw:style-name="gr877" draw:text-style-name="P82" draw:layer="layout" svg:width="1.053cm" svg:height="0.806cm" svg:x="9cm" svg:y="9cm">
            <draw:text-box>
              <text:p><text:span text:style-name="T37">do</text:span></text:p>
            </draw:text-box>
          </draw:frame>
        </draw:g>
        <draw:g draw:style-name="gr1">
          <draw:custom-shape draw:style-name="gr873"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875" draw:text-style-name="P82" draw:layer="layout" svg:width="0.888cm" svg:height="0.806cm" svg:x="9cm" svg:y="12.694cm">
            <draw:text-box>
              <text:p><text:span text:style-name="T37">di</text:span></text:p>
            </draw:text-box>
          </draw:frame>
          <draw:frame draw:style-name="gr877" draw:text-style-name="P82" draw:layer="layout" svg:width="1.053cm" svg:height="0.806cm" svg:x="9cm" svg:y="12cm">
            <draw:text-box>
              <text:p><text:span text:style-name="T37">do</text:span></text:p>
            </draw:text-box>
          </draw:frame>
        </draw:g>
        <draw:line draw:style-name="gr38" draw:text-style-name="P4" draw:layer="layout" svg:x1="7cm" svg:y1="4cm" svg:x2="9cm" svg:y2="4cm">
          <text:p/>
        </draw:line>
        <draw:frame draw:style-name="gr973" draw:text-style-name="P82" draw:layer="layout" svg:width="1.851cm" svg:height="0.806cm" svg:x="5cm" svg:y="3.5cm">
          <draw:text-box>
            <text:p><text:span text:style-name="T37">data_</text:span><text:span text:style-name="T37">i</text:span></text:p>
          </draw:text-box>
        </draw:frame>
        <draw:line draw:style-name="gr38" draw:text-style-name="P4" draw:layer="layout" svg:x1="7.001cm" svg:y1="7cm" svg:x2="9.001cm" svg:y2="7cm">
          <text:p/>
        </draw:line>
        <draw:frame draw:style-name="gr974" draw:text-style-name="P82" draw:layer="layout" svg:width="1.879cm" svg:height="0.806cm" svg:x="5.001cm" svg:y="6.5cm">
          <draw:text-box>
            <text:p><text:span text:style-name="T37">addr_</text:span><text:span text:style-name="T37">i</text:span></text:p>
          </draw:text-box>
        </draw:frame>
        <draw:line draw:style-name="gr38" draw:text-style-name="P4" draw:layer="layout" svg:x1="7.001cm" svg:y1="10cm" svg:x2="9.001cm" svg:y2="10cm">
          <text:p/>
        </draw:line>
        <draw:frame draw:style-name="gr975" draw:text-style-name="P82" draw:layer="layout" svg:width="2.016cm" svg:height="0.806cm" svg:x="5.001cm" svg:y="9.5cm">
          <draw:text-box>
            <text:p><text:span text:style-name="T37">wrEn</text:span><text:span text:style-name="T37">_i</text:span></text:p>
          </draw:text-box>
        </draw:frame>
        <draw:line draw:style-name="gr38" draw:text-style-name="P4" draw:layer="layout" svg:x1="7.001cm" svg:y1="13cm" svg:x2="9.001cm" svg:y2="13cm">
          <text:p/>
        </draw:line>
        <draw:frame draw:style-name="gr976" draw:text-style-name="P82" draw:layer="layout" svg:width="1.823cm" svg:height="0.806cm" svg:x="5.001cm" svg:y="12.5cm">
          <draw:text-box>
            <text:p><text:span text:style-name="T37">instr_</text:span><text:span text:style-name="T37">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977" draw:text-style-name="P82" draw:layer="layout" svg:width="2.347cm" svg:height="0.806cm" svg:x="10.001cm" svg:y="2.9cm">
          <draw:text-box>
            <text:p><text:span text:style-name="T37">data</text:span><text:span text:style-name="T37">w_s</text:span></text:p>
          </draw:text-box>
        </draw:frame>
        <draw:frame draw:style-name="gr975" draw:text-style-name="P82" draw:layer="layout" svg:width="2.016cm" svg:height="0.806cm" svg:x="10.002cm" svg:y="5.9cm">
          <draw:text-box>
            <text:p><text:span text:style-name="T37">addr_</text:span><text:span text:style-name="T37">s</text:span></text:p>
          </draw:text-box>
        </draw:frame>
        <draw:frame draw:style-name="gr978" draw:text-style-name="P82" draw:layer="layout" svg:width="1.658cm" svg:height="0.806cm" svg:x="10.002cm" svg:y="8.9cm">
          <draw:text-box>
            <text:p><text:span text:style-name="T37">we_s</text:span></text:p>
          </draw:text-box>
        </draw:frame>
        <draw:frame draw:style-name="gr979" draw:text-style-name="P82" draw:layer="layout" svg:width="1.961cm" svg:height="0.806cm" svg:x="10.002cm" svg:y="11.9cm">
          <draw:text-box>
            <text:p><text:span text:style-name="T37">instr_</text:span><text:span text:style-name="T37">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980"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971" draw:text-style-name="P9" draw:layer="layout" svg:width="1.043cm" svg:height="0.725cm" svg:x="16cm" svg:y="5.588cm">
            <draw:text-box>
              <text:p><text:span text:style-name="T2">we</text:span></text:p>
            </draw:text-box>
          </draw:frame>
          <draw:frame draw:style-name="gr981" draw:text-style-name="P9" draw:layer="layout" svg:width="1.891cm" svg:height="0.725cm" svg:x="16.001cm" svg:y="6.37cm">
            <draw:text-box>
              <text:p><text:span text:style-name="T2">opcod</text:span><text:span text:style-name="T2">e</text:span></text:p>
            </draw:text-box>
          </draw:frame>
          <draw:frame draw:style-name="gr344"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982" draw:text-style-name="P9" draw:layer="layout" svg:width="1.773cm" svg:height="0.725cm" svg:x="19.365cm" svg:y="6.571cm">
            <draw:text-box>
              <text:p><text:span text:style-name="T2">datawr</text:span></text:p>
            </draw:text-box>
          </draw:frame>
          <draw:frame draw:style-name="gr983" draw:text-style-name="P9" draw:layer="layout" svg:width="1.719cm" svg:height="0.725cm" svg:x="16.002cm" svg:y="6.971cm">
            <draw:text-box>
              <text:p><text:span text:style-name="T2">func3</text:span></text:p>
            </draw:text-box>
          </draw:frame>
        </draw:g>
        <draw:g draw:style-name="gr1">
          <draw:custom-shape draw:style-name="gr980"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984" draw:text-style-name="P9" draw:layer="layout" svg:width="0.948cm" svg:height="0.725cm" svg:x="32cm" svg:y="3.588cm">
            <draw:text-box>
              <text:p><text:span text:style-name="T2">re</text:span></text:p>
            </draw:text-box>
          </draw:frame>
          <draw:frame draw:style-name="gr981" draw:text-style-name="P9" draw:layer="layout" svg:width="1.891cm" svg:height="0.725cm" svg:x="32.001cm" svg:y="4.37cm">
            <draw:text-box>
              <text:p><text:span text:style-name="T2">opcod</text:span><text:span text:style-name="T2">e</text:span></text:p>
            </draw:text-box>
          </draw:frame>
          <draw:frame draw:style-name="gr324" draw:text-style-name="P9" draw:layer="layout" svg:width="1.867cm" svg:height="0.725cm" svg:x="32.002cm" svg:y="5.551cm">
            <draw:text-box>
              <text:p><text:span text:style-name="T2">dataR</text:span><text:span text:style-name="T2">d</text:span></text:p>
            </draw:text-box>
          </draw:frame>
          <draw:frame draw:style-name="gr48" draw:text-style-name="P9" draw:layer="layout" svg:width="1.349cm" svg:height="0.725cm" svg:x="32.002cm" svg:y="6.531cm">
            <draw:text-box>
              <text:p><text:span text:style-name="T2">addr</text:span></text:p>
            </draw:text-box>
          </draw:frame>
          <draw:frame draw:style-name="gr985" draw:text-style-name="P9" draw:layer="layout" svg:width="1.612cm" svg:height="0.725cm" svg:x="35.365cm" svg:y="4.571cm">
            <draw:text-box>
              <text:p><text:span text:style-name="T2">datao</text:span></text:p>
            </draw:text-box>
          </draw:frame>
          <draw:frame draw:style-name="gr983"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6" draw:text-style-name="P82" draw:layer="layout" svg:width="1.934cm" svg:height="0.806cm" svg:x="5.001cm" svg:y="0.5cm">
          <draw:text-box>
            <text:p><text:span text:style-name="T37">rdEn</text:span><text:span text:style-name="T37">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980"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971" draw:text-style-name="P9" draw:layer="layout" svg:width="1.043cm" svg:height="0.725cm" svg:x="10cm" svg:y="20.588cm">
            <draw:text-box>
              <text:p><text:span text:style-name="T2">we</text:span></text:p>
            </draw:text-box>
          </draw:frame>
          <draw:frame draw:style-name="gr981" draw:text-style-name="P9" draw:layer="layout" svg:width="1.891cm" svg:height="0.725cm" svg:x="10.001cm" svg:y="21.37cm">
            <draw:text-box>
              <text:p><text:span text:style-name="T2">opcod</text:span><text:span text:style-name="T2">e</text:span></text:p>
            </draw:text-box>
          </draw:frame>
          <draw:frame draw:style-name="gr344"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982" draw:text-style-name="P9" draw:layer="layout" svg:width="1.773cm" svg:height="0.725cm" svg:x="13.365cm" svg:y="21.571cm">
            <draw:text-box>
              <text:p><text:span text:style-name="T2">datawr</text:span></text:p>
            </draw:text-box>
          </draw:frame>
          <draw:frame draw:style-name="gr983" draw:text-style-name="P9" draw:layer="layout" svg:width="1.719cm" svg:height="0.725cm" svg:x="10.002cm" svg:y="21.971cm">
            <draw:text-box>
              <text:p><text:span text:style-name="T2">func3</text:span></text:p>
            </draw:text-box>
          </draw:frame>
        </draw:g>
        <draw:frame draw:style-name="gr973" draw:text-style-name="P82" draw:layer="layout" svg:width="1.851cm" svg:height="0.806cm" svg:x="5.001cm" svg:y="18.5cm">
          <draw:text-box>
            <text:p><text:span text:style-name="T37">data_</text:span><text:span text:style-name="T37">i</text:span></text:p>
          </draw:text-box>
        </draw:frame>
        <draw:frame draw:style-name="gr974" draw:text-style-name="P82" draw:layer="layout" svg:width="1.879cm" svg:height="0.806cm" svg:x="5.002cm" svg:y="21.5cm">
          <draw:text-box>
            <text:p><text:span text:style-name="T37">addr_</text:span><text:span text:style-name="T37">i</text:span></text:p>
          </draw:text-box>
        </draw:frame>
        <draw:frame draw:style-name="gr975" draw:text-style-name="P82" draw:layer="layout" svg:width="2.016cm" svg:height="0.806cm" svg:x="5.002cm" svg:y="24.5cm">
          <draw:text-box>
            <text:p><text:span text:style-name="T37">wrEn</text:span><text:span text:style-name="T37">_i</text:span></text:p>
          </draw:text-box>
        </draw:frame>
        <draw:frame draw:style-name="gr976" draw:text-style-name="P82" draw:layer="layout" svg:width="1.823cm" svg:height="0.806cm" svg:x="5.002cm" svg:y="27.5cm">
          <draw:text-box>
            <text:p><text:span text:style-name="T37">instr_</text:span><text:span text:style-name="T37">i</text:span></text:p>
          </draw:text-box>
        </draw:frame>
        <draw:frame draw:style-name="gr986" draw:text-style-name="P82" draw:layer="layout" svg:width="1.934cm" svg:height="0.806cm" svg:x="5.002cm" svg:y="15.5cm">
          <draw:text-box>
            <text:p><text:span text:style-name="T37">rdEn</text:span><text:span text:style-name="T37">_i</text:span></text:p>
          </draw:text-box>
        </draw:frame>
        <draw:g draw:style-name="gr1">
          <draw:custom-shape draw:style-name="gr873"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875" draw:text-style-name="P82" draw:layer="layout" svg:width="0.888cm" svg:height="0.806cm" svg:x="18cm" svg:y="20.695cm">
            <draw:text-box>
              <text:p><text:span text:style-name="T37">di</text:span></text:p>
            </draw:text-box>
          </draw:frame>
          <draw:frame draw:style-name="gr877" draw:text-style-name="P82" draw:layer="layout" svg:width="1.053cm" svg:height="0.806cm" svg:x="18cm" svg:y="20.001cm">
            <draw:text-box>
              <text:p><text:span text:style-name="T37">do</text:span></text:p>
            </draw:text-box>
          </draw:frame>
        </draw:g>
        <draw:g draw:style-name="gr1">
          <draw:custom-shape draw:style-name="gr873"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875" draw:text-style-name="P82" draw:layer="layout" svg:width="0.888cm" svg:height="0.806cm" svg:x="18cm" svg:y="17.695cm">
            <draw:text-box>
              <text:p><text:span text:style-name="T37">di</text:span></text:p>
            </draw:text-box>
          </draw:frame>
          <draw:frame draw:style-name="gr877" draw:text-style-name="P82" draw:layer="layout" svg:width="1.053cm" svg:height="0.806cm" svg:x="18cm" svg:y="17.001cm">
            <draw:text-box>
              <text:p><text:span text:style-name="T37">do</text:span></text:p>
            </draw:text-box>
          </draw:frame>
        </draw:g>
        <draw:g draw:style-name="gr1">
          <draw:custom-shape draw:style-name="gr873"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875" draw:text-style-name="P82" draw:layer="layout" svg:width="0.888cm" svg:height="0.806cm" svg:x="18cm" svg:y="23.695cm">
            <draw:text-box>
              <text:p><text:span text:style-name="T37">di</text:span></text:p>
            </draw:text-box>
          </draw:frame>
          <draw:frame draw:style-name="gr877" draw:text-style-name="P82" draw:layer="layout" svg:width="1.053cm" svg:height="0.806cm" svg:x="18cm" svg:y="23.001cm">
            <draw:text-box>
              <text:p><text:span text:style-name="T37">do</text:span></text:p>
            </draw:text-box>
          </draw:frame>
        </draw:g>
        <draw:g draw:style-name="gr1">
          <draw:custom-shape draw:style-name="gr873"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875" draw:text-style-name="P82" draw:layer="layout" svg:width="0.888cm" svg:height="0.806cm" svg:x="18cm" svg:y="26.695cm">
            <draw:text-box>
              <text:p><text:span text:style-name="T37">di</text:span></text:p>
            </draw:text-box>
          </draw:frame>
          <draw:frame draw:style-name="gr877" draw:text-style-name="P82" draw:layer="layout" svg:width="1.053cm" svg:height="0.806cm" svg:x="18cm" svg:y="26.001cm">
            <draw:text-box>
              <text:p><text:span text:style-name="T37">do</text:span></text:p>
            </draw:text-box>
          </draw:frame>
        </draw:g>
        <draw:frame draw:style-name="gr977" draw:text-style-name="P82" draw:layer="layout" svg:width="2.347cm" svg:height="0.806cm" svg:x="19.001cm" svg:y="16.901cm">
          <draw:text-box>
            <text:p><text:span text:style-name="T37">data</text:span><text:span text:style-name="T37">w_s</text:span></text:p>
          </draw:text-box>
        </draw:frame>
        <draw:frame draw:style-name="gr975" draw:text-style-name="P82" draw:layer="layout" svg:width="2.016cm" svg:height="0.806cm" svg:x="19.002cm" svg:y="19.901cm">
          <draw:text-box>
            <text:p><text:span text:style-name="T37">addr_</text:span><text:span text:style-name="T37">s</text:span></text:p>
          </draw:text-box>
        </draw:frame>
        <draw:frame draw:style-name="gr978" draw:text-style-name="P82" draw:layer="layout" svg:width="1.658cm" svg:height="0.806cm" svg:x="19.002cm" svg:y="22.901cm">
          <draw:text-box>
            <text:p><text:span text:style-name="T37">we_s</text:span></text:p>
          </draw:text-box>
        </draw:frame>
        <draw:frame draw:style-name="gr979" draw:text-style-name="P82" draw:layer="layout" svg:width="1.961cm" svg:height="0.806cm" svg:x="19.002cm" svg:y="25.901cm">
          <draw:text-box>
            <text:p><text:span text:style-name="T37">instr_</text:span><text:span text:style-name="T37">s</text:span></text:p>
          </draw:text-box>
        </draw:frame>
        <draw:g draw:style-name="gr1">
          <draw:custom-shape draw:style-name="gr969" draw:text-style-name="P12" draw:layer="layout" svg:width="4cm" svg:height="4cm" svg:x="23cm" svg:y="20cm">
            <text:p text:style-name="P1">D-Mem</text:p>
            <draw:enhanced-geometry svg:viewBox="0 0 21600 21600" draw:type="rectangle" draw:enhanced-path="M 0 0 L 21600 0 21600 21600 0 21600 0 0 Z N"/>
          </draw:custom-shape>
          <draw:frame draw:style-name="gr970" draw:text-style-name="P9" draw:layer="layout" svg:width="0.878cm" svg:height="0.725cm" svg:x="24.522cm" svg:y="20cm">
            <draw:text-box>
              <text:p><text:span text:style-name="T2">re</text:span></text:p>
            </draw:text-box>
          </draw:frame>
          <draw:frame draw:style-name="gr971"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drw</text:span></text:p>
            </draw:text-box>
          </draw:frame>
          <draw:frame draw:style-name="gr972" draw:text-style-name="P9" draw:layer="layout" svg:width="1.49cm" svg:height="0.725cm" svg:x="23.01cm" svg:y="20.6cm">
            <draw:text-box>
              <text:p><text:span text:style-name="T2">addrr</text:span></text:p>
            </draw:text-box>
          </draw:frame>
          <draw:frame draw:style-name="gr344"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980"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984" draw:text-style-name="P9" draw:layer="layout" svg:width="0.948cm" svg:height="0.725cm" svg:x="32cm" svg:y="20.588cm">
            <draw:text-box>
              <text:p><text:span text:style-name="T2">re</text:span></text:p>
            </draw:text-box>
          </draw:frame>
          <draw:frame draw:style-name="gr981" draw:text-style-name="P9" draw:layer="layout" svg:width="1.891cm" svg:height="0.725cm" svg:x="32.001cm" svg:y="21.37cm">
            <draw:text-box>
              <text:p><text:span text:style-name="T2">opcod</text:span><text:span text:style-name="T2">e</text:span></text:p>
            </draw:text-box>
          </draw:frame>
          <draw:frame draw:style-name="gr324" draw:text-style-name="P9" draw:layer="layout" svg:width="1.867cm" svg:height="0.725cm" svg:x="32.002cm" svg:y="22.551cm">
            <draw:text-box>
              <text:p><text:span text:style-name="T2">dataR</text:span><text:span text:style-name="T2">d</text:span></text:p>
            </draw:text-box>
          </draw:frame>
          <draw:frame draw:style-name="gr48" draw:text-style-name="P9" draw:layer="layout" svg:width="1.349cm" svg:height="0.725cm" svg:x="32.002cm" svg:y="23.531cm">
            <draw:text-box>
              <text:p><text:span text:style-name="T2">addr</text:span></text:p>
            </draw:text-box>
          </draw:frame>
          <draw:frame draw:style-name="gr985" draw:text-style-name="P9" draw:layer="layout" svg:width="1.612cm" svg:height="0.725cm" svg:x="35.365cm" svg:y="21.571cm">
            <draw:text-box>
              <text:p><text:span text:style-name="T2">datao</text:span></text:p>
            </draw:text-box>
          </draw:frame>
          <draw:frame draw:style-name="gr983" draw:text-style-name="P9" draw:layer="layout" svg:width="1.719cm" svg:height="0.725cm" svg:x="32.002cm" svg:y="21.871cm">
            <draw:text-box>
              <text:p><text:span text:style-name="T2">func3</text:span></text:p>
            </draw:text-box>
          </draw:frame>
        </draw:g>
      </draw:page>
      <draw:page draw:name="page28" draw:style-name="dp1" draw:master-page-name="Default">
        <draw:frame draw:style-name="gr987"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932" draw:text-style-name="P3" draw:layer="layout" svg:width="1.772cm" svg:height="0.962cm" svg:x="2.028cm" svg:y="3.038cm">
          <draw:text-box>
            <text:p>clk_i</text:p>
          </draw:text-box>
        </draw:frame>
        <draw:frame draw:style-name="gr948" draw:text-style-name="P3" draw:layer="layout" svg:width="1.666cm" svg:height="0.962cm" svg:x="2.028cm" svg:y="5.038cm">
          <draw:text-box>
            <text:p>wr_i</text:p>
          </draw:text-box>
        </draw:frame>
        <draw:frame draw:style-name="gr988" draw:text-style-name="P3" draw:layer="layout" svg:width="2.267cm" svg:height="0.962cm" svg:x="2.029cm" svg:y="7.038cm">
          <draw:text-box>
            <text:p>addr_i</text:p>
          </draw:text-box>
        </draw:frame>
        <draw:frame draw:style-name="gr989" draw:text-style-name="P3" draw:layer="layout" svg:width="2.232cm" svg:height="0.962cm" svg:x="2.029cm" svg:y="9.038cm">
          <draw:text-box>
            <text:p>data_i</text:p>
          </draw:text-box>
        </draw:frame>
        <draw:frame draw:style-name="gr990" draw:text-style-name="P3" draw:layer="layout" svg:width="1.913cm" svg:height="0.962cm" svg:x="2.029cm" svg:y="11.038cm">
          <draw:text-box>
            <text:p>mem</text:p>
          </draw:text-box>
        </draw:frame>
        <draw:frame draw:style-name="gr928"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991"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991"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873"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875" draw:text-style-name="P82" draw:layer="layout" svg:width="0.888cm" svg:height="0.806cm" svg:x="8cm" svg:y="18.694cm">
            <draw:text-box>
              <text:p><text:span text:style-name="T37">di</text:span></text:p>
            </draw:text-box>
          </draw:frame>
          <draw:frame draw:style-name="gr877" draw:text-style-name="P82" draw:layer="layout" svg:width="1.053cm" svg:height="0.806cm" svg:x="8cm" svg:y="18cm">
            <draw:text-box>
              <text:p><text:span text:style-name="T37">do</text:span></text:p>
            </draw:text-box>
          </draw:frame>
        </draw:g>
        <draw:line draw:style-name="gr38" draw:text-style-name="P4" draw:layer="layout" svg:x1="7cm" svg:y1="19cm" svg:x2="8cm" svg:y2="19cm">
          <text:p/>
        </draw:line>
        <draw:frame draw:style-name="gr989"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992" draw:text-style-name="P12" draw:layer="layout" svg:width="3cm" svg:height="3cm" svg:x="10cm" svg:y="17cm">
          <text:p text:style-name="P1">mem</text:p>
          <draw:enhanced-geometry svg:viewBox="0 0 21600 21600" draw:type="rectangle" draw:enhanced-path="M 0 0 L 21600 0 21600 21600 0 21600 0 0 Z N"/>
        </draw:custom-shape>
        <draw:frame draw:style-name="gr875" draw:text-style-name="P82" draw:layer="layout" svg:width="0.888cm" svg:height="0.806cm" svg:x="10cm" svg:y="18.1cm">
          <draw:text-box>
            <text:p><text:span text:style-name="T37">di</text:span></text:p>
          </draw:text-box>
        </draw:frame>
        <draw:frame draw:style-name="gr993" draw:text-style-name="P82" draw:layer="layout" svg:width="1.218cm" svg:height="0.806cm" svg:x="10cm" svg:y="17cm">
          <draw:text-box>
            <text:p><text:span text:style-name="T37">adr</text:span></text:p>
          </draw:text-box>
        </draw:frame>
        <draw:frame draw:style-name="gr988"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877" draw:text-style-name="P82" draw:layer="layout" svg:width="1.053cm" svg:height="0.806cm" svg:x="12cm" svg:y="19cm">
          <draw:text-box>
            <text:p><text:span text:style-name="T37">do</text:span></text:p>
          </draw:text-box>
        </draw:frame>
        <draw:g draw:style-name="gr1">
          <draw:custom-shape draw:style-name="gr873"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875" draw:text-style-name="P82" draw:layer="layout" svg:width="0.888cm" svg:height="0.806cm" svg:x="14cm" svg:y="18.694cm">
            <draw:text-box>
              <text:p><text:span text:style-name="T37">di</text:span></text:p>
            </draw:text-box>
          </draw:frame>
          <draw:frame draw:style-name="gr877" draw:text-style-name="P82" draw:layer="layout" svg:width="1.053cm" svg:height="0.806cm" svg:x="14cm" svg:y="18cm">
            <draw:text-box>
              <text:p><text:span text:style-name="T37">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928" draw:text-style-name="P3" draw:layer="layout" svg:width="2.444cm" svg:height="0.962cm" svg:x="16cm" svg:y="18cm">
          <draw:text-box>
            <text:p>data_o</text:p>
          </draw:text-box>
        </draw:frame>
      </draw:page>
      <draw:page draw:name="page29" draw:style-name="dp1" draw:master-page-name="Default">
        <draw:frame draw:style-name="gr994" draw:text-style-name="P3" draw:layer="layout" svg:width="5.37cm" svg:height="0.962cm" svg:x="2cm" svg:y="2.1cm">
          <draw:text-box>
            <text:p>GPIO-Peripheral:</text:p>
          </draw:text-box>
        </draw:frame>
        <draw:g draw:style-name="gr1">
          <draw:custom-shape draw:style-name="gr873"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875" draw:text-style-name="P82" draw:layer="layout" svg:width="0.888cm" svg:height="0.806cm" svg:x="10.997cm" svg:y="9.3cm">
            <draw:text-box>
              <text:p><text:span text:style-name="T37">di</text:span></text:p>
            </draw:text-box>
          </draw:frame>
          <draw:frame draw:style-name="gr877" draw:text-style-name="P82" draw:layer="layout" svg:width="1.053cm" svg:height="0.806cm" svg:x="10.947cm" svg:y="9.906cm">
            <draw:text-box>
              <text:p><text:span text:style-name="T37">do</text:span></text:p>
            </draw:text-box>
          </draw:frame>
        </draw:g>
        <draw:custom-shape draw:style-name="gr995"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96" draw:text-style-name="P3" draw:layer="layout" svg:width="2.83cm" svg:height="0.962cm" svg:x="2cm" svg:y="12.038cm">
          <draw:text-box>
            <text:p>WB-Bus</text:p>
          </draw:text-box>
        </draw:frame>
        <draw:custom-shape draw:style-name="gr997" draw:text-style-name="P88" draw:layer="layout" svg:width="1cm" svg:height="1.5cm" svg:x="9cm" svg:y="9cm">
          <text:p text:style-name="P87"><text:span text:style-name="T37">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873"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875" draw:text-style-name="P82" draw:layer="layout" svg:width="0.888cm" svg:height="0.806cm" svg:x="10.997cm" svg:y="5cm">
            <draw:text-box>
              <text:p><text:span text:style-name="T37">di</text:span></text:p>
            </draw:text-box>
          </draw:frame>
          <draw:frame draw:style-name="gr877" draw:text-style-name="P82" draw:layer="layout" svg:width="1.053cm" svg:height="0.806cm" svg:x="10.947cm" svg:y="5.606cm">
            <draw:text-box>
              <text:p><text:span text:style-name="T37">do</text:span></text:p>
            </draw:text-box>
          </draw:frame>
        </draw:g>
        <draw:frame draw:style-name="gr998" draw:text-style-name="P3" draw:layer="layout" svg:width="4.028cm" svg:height="0.962cm" svg:x="10cm" svg:y="4cm">
          <draw:text-box>
            <text:p>direction-reg</text:p>
          </draw:text-box>
        </draw:frame>
        <draw:frame draw:style-name="gr999"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937"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000"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368"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368"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1001"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873"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875" draw:text-style-name="P82" draw:layer="layout" svg:width="0.888cm" svg:height="0.806cm" svg:x="10.05cm" svg:y="15.994cm">
            <draw:text-box>
              <text:p><text:span text:style-name="T37">di</text:span></text:p>
            </draw:text-box>
          </draw:frame>
          <draw:frame draw:style-name="gr877" draw:text-style-name="P82" draw:layer="layout" svg:width="1.053cm" svg:height="0.806cm" svg:x="10cm" svg:y="16.6cm">
            <draw:text-box>
              <text:p><text:span text:style-name="T37">do</text:span></text:p>
            </draw:text-box>
          </draw:frame>
        </draw:g>
        <draw:g draw:style-name="gr1">
          <draw:custom-shape draw:style-name="gr873"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875" draw:text-style-name="P82" draw:layer="layout" svg:width="0.888cm" svg:height="0.806cm" svg:x="12.05cm" svg:y="16cm">
            <draw:text-box>
              <text:p><text:span text:style-name="T37">di</text:span></text:p>
            </draw:text-box>
          </draw:frame>
          <draw:frame draw:style-name="gr877" draw:text-style-name="P82" draw:layer="layout" svg:width="1.053cm" svg:height="0.806cm" svg:x="12cm" svg:y="16.606cm">
            <draw:text-box>
              <text:p><text:span text:style-name="T37">do</text:span></text:p>
            </draw:text-box>
          </draw:frame>
        </draw:g>
        <draw:custom-shape draw:style-name="gr280" draw:text-style-name="P88" draw:layer="layout" svg:width="1cm" svg:height="1cm" svg:x="14cm" svg:y="15.5cm">
          <text:p text:style-name="P87"><text:span text:style-name="T37">XOR</text:span></text:p>
          <draw:enhanced-geometry svg:viewBox="0 0 21600 21600" draw:type="rectangle" draw:enhanced-path="M 0 0 L 21600 0 21600 21600 0 21600 0 0 Z N"/>
        </draw:custom-shape>
        <draw:custom-shape draw:style-name="gr368"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368"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000"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5-05T20:12:22.446535716</dc:date>
    <meta:editing-duration>P37DT10H51M51S</meta:editing-duration>
    <meta:editing-cycles>792</meta:editing-cycles>
    <meta:generator>LibreOffice/24.2.7.2$Linux_X86_64 LibreOffice_project/420$Build-2</meta:generator>
    <meta:print-date>2025-06-25T11:06:16.095434000</meta:print-date>
    <meta:printed-by>PDF files</meta:printed-by>
    <meta:document-statistic meta:object-count="6512"/>
  </office:meta>
</office:document-meta>
</file>