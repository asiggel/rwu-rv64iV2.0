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64A00000441F1F82341.png" manifest:media-type="image/png"/>
  <manifest:file-entry manifest:full-path="Pictures/10000001000000ED0000032CB50FA5DB.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face style:name="Arial2" svg:font-family="Arial" style:font-adornments="Standard" style:font-family-generic="swis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Gothic" svg:font-family="'MS Gothic'"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graphic-properties style:writing-mode="lr-tb" loext:decorative="false"/>
    </style:style>
    <style:style style:name="gr2" style:family="graphic" style:parent-style-name="standard">
      <style:graphic-properties svg:stroke-color="#000000" draw:fill-color="#ffff00" draw:textarea-horizontal-align="left" draw:textarea-vertical-align="bottom" draw:auto-grow-height="false" fo:min-height="4.75cm" fo:min-width="7.5cm" style:writing-mode="lr-tb" loext:decorative="false"/>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3.002cm" loext:decorative="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3.603cm" loext:decorative="fals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3.214cm" loext:decorative="fals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1.237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2.507cm" loext:decorative="false"/>
      <style:paragraph-properties style:writing-mode="lr-tb"/>
    </style:style>
    <style:style style:name="gr8" style:family="graphic" style:parent-style-name="standard">
      <style:graphic-properties svg:stroke-color="#000000" draw:fill-color="#ffff00" draw:textarea-horizontal-align="left" draw:textarea-vertical-align="bottom" draw:auto-grow-height="false" fo:min-height="6.75cm" fo:min-width="8.5cm" style:writing-mode="lr-tb"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3.567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1.423cm" fo:min-width="0cm" loext:decorative="false"/>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3.461cm"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3.92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2.013cm" loext:decorative="false"/>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4.237cm" loext:decorative="false"/>
      <style:paragraph-properties style:writing-mode="lr-tb"/>
    </style:style>
    <style:style style:name="gr15" style:family="graphic" style:parent-style-name="standard">
      <style:graphic-properties svg:stroke-color="#000000" draw:fill-color="#ffff00" draw:textarea-horizontal-align="left" draw:textarea-vertical-align="bottom" draw:auto-grow-height="false" fo:min-height="5.75cm" fo:min-width="7.5cm" style:writing-mode="lr-tb" loext:decorative="false"/>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2.932cm" loext:decorative="false"/>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0.99cm" loext:decorative="false"/>
      <style:paragraph-properties style:writing-mode="lr-tb"/>
    </style:style>
    <style:style style:name="gr18" style:family="graphic" style:parent-style-name="standard">
      <style:graphic-properties svg:stroke-color="#000000" draw:fill-color="#ffff00" draw:textarea-horizontal-align="left" draw:textarea-vertical-align="bottom" draw:auto-grow-height="false" fo:min-height="13.75cm" fo:min-width="7.5cm" style:writing-mode="lr-tb" loext:decorative="false"/>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2.86cm" loext:decorative="false"/>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3.814cm" loext:decorative="false"/>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2.331cm" loext:decorative="false"/>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false" fo:min-height="0.712cm" fo:min-width="0cm" loext:decorative="false"/>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draw:fit-to-size="false" style:shrink-to-fit="true" fo:min-height="0.712cm" fo:min-width="3.708cm" loext:decorative="false"/>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2.225cm" loext:decorative="false"/>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2.212cm" loext:decorative="false"/>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2.684cm" loext:decorative="false"/>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1.696cm" loext:decorative="false"/>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1.802cm"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2.508cm" loext:decorative="false"/>
      <style:paragraph-properties style:writing-mode="lr-tb"/>
    </style:style>
    <style:style style:name="gr30" style:family="graphic" style:parent-style-name="standard">
      <style:graphic-properties svg:stroke-color="#000000" draw:fill-color="#ffff00" draw:textarea-horizontal-align="left" draw:textarea-vertical-align="bottom" draw:auto-grow-height="false" fo:min-height="4.75cm" fo:min-width="9.5cm" style:writing-mode="lr-tb"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2.685cm"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4.202cm" loext:decorative="false"/>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2.473cm" loext:decorative="false"/>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4.203cm" loext:decorative="false"/>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1.449cm" loext:decorative="false"/>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712cm" fo:min-width="4.026cm"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3.991cm" loext:decorative="false"/>
      <style:paragraph-properties style:writing-mode="lr-tb"/>
    </style:style>
    <style:style style:name="gr38" style:family="graphic" style:parent-style-name="objectwithoutfill">
      <style:graphic-properties draw:fill="none" draw:textarea-vertical-align="middle" loext:decorative="false"/>
    </style:style>
    <style:style style:name="gr39" style:family="graphic" style:parent-style-name="objectwithoutfill">
      <style:graphic-properties draw:marker-end="Arrow_20_short" draw:fill="none" draw:textarea-vertical-align="middle" loext:decorative="false"/>
    </style:style>
    <style:style style:name="gr40" style:family="graphic" style:parent-style-name="standard">
      <style:graphic-properties svg:stroke-color="#000000" draw:fill-color="#000000" draw:textarea-horizontal-align="justify" draw:textarea-vertical-align="middle" draw:auto-grow-height="false" fo:min-height="0cm" fo:min-width="0cm" style:protect="size" loext:decorative="false"/>
    </style:style>
    <style:style style:name="gr41" style:family="graphic" style:parent-style-name="standard">
      <style:graphic-properties draw:stroke="none" svg:stroke-color="#000000" draw:fill="none" draw:fill-color="#ffffff" draw:textarea-horizontal-align="left" draw:auto-grow-height="true" draw:auto-grow-width="true" fo:min-height="2.845cm" fo:min-width="9.918cm" loext:decorative="false"/>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20.62cm" fo:min-width="69.607cm" loext:decorative="false"/>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5.249cm" loext:decorative="false"/>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4.449cm" loext:decorative="false"/>
      <style:paragraph-properties style:writing-mode="lr-tb"/>
    </style:style>
    <style:style style:name="gr45" style:family="graphic" style:parent-style-name="standard">
      <style:graphic-properties svg:stroke-color="#000000" draw:textarea-horizontal-align="left" draw:textarea-vertical-align="bottom" draw:auto-grow-height="false" fo:min-height="4.75cm" fo:min-width="1.511cm" style:writing-mode="lr-tb" loext:decorative="false"/>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684cm" loext:decorative="false"/>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96cm" loext:decorative="false"/>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49cm" loext:decorative="false"/>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07cm" loext:decorative="false"/>
      <style:paragraph-properties style:writing-mode="lr-tb"/>
    </style:style>
    <style:style style:name="gr50" style:family="graphic" style:parent-style-name="objectwithoutfill">
      <style:graphic-properties draw:marker-end="Arrowheads_20_11" draw:marker-end-width="0.3cm" draw:fill="none" draw:textarea-vertical-align="middle" loext:decorative="false"/>
    </style:style>
    <style:style style:name="gr51" style:family="graphic" style:parent-style-name="objectwithoutfill">
      <style:graphic-properties draw:marker-end="Arrowheads_20_12" draw:marker-end-width="0.3cm" draw:fill="none" draw:textarea-vertical-align="middle" loext:decorative="false"/>
    </style:style>
    <style:style style:name="gr52" style:family="graphic" style:parent-style-name="standard">
      <style:graphic-properties svg:stroke-color="#000000" draw:textarea-horizontal-align="left" draw:textarea-vertical-align="bottom" draw:auto-grow-height="false" fo:min-height="4.75cm" fo:min-width="1.5cm" style:writing-mode="lr-tb" loext:decorative="false"/>
      <style:paragraph-properties style:writing-mode="lr-tb"/>
    </style:style>
    <style:style style:name="gr53" style:family="graphic" style:parent-style-name="objectwithoutfill">
      <style:graphic-properties draw:marker-end="Arrowheads_20_13" draw:marker-end-width="0.3cm" draw:fill="none" draw:textarea-vertical-align="middle" loext:decorative="false"/>
    </style:style>
    <style:style style:name="gr54" style:family="graphic" style:parent-style-name="standard">
      <style:graphic-properties svg:stroke-color="#000000" draw:fill-color="#ffff00" draw:textarea-horizontal-align="left" draw:textarea-vertical-align="bottom" draw:auto-grow-height="false" fo:min-height="5.75cm" fo:min-width="4.5cm" style:writing-mode="lr-tb" loext:decorative="false"/>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813cm" loext:decorative="false"/>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967cm" loext:decorative="false"/>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86cm" loext:decorative="false"/>
      <style:paragraph-properties style:writing-mode="lr-tb"/>
    </style:style>
    <style:style style:name="gr58" style:family="graphic" style:parent-style-name="standard">
      <style:graphic-properties svg:stroke-color="#000000" draw:textarea-vertical-align="middle" loext:decorative="false"/>
    </style:style>
    <style:style style:name="gr59" style:family="graphic" style:parent-style-name="standard">
      <style:graphic-properties svg:stroke-color="#000000" draw:textarea-horizontal-align="left" draw:textarea-vertical-align="bottom" draw:auto-grow-height="false" fo:min-height="1.75cm" fo:min-width="0.5cm" style:writing-mode="lr-tb" loext:decorative="false"/>
      <style:paragraph-properties style:writing-mode="lr-tb"/>
    </style:style>
    <style:style style:name="gr60" style:family="graphic" style:parent-style-name="objectwithoutfill">
      <style:graphic-properties draw:fill="none" draw:textarea-horizontal-align="left" draw:textarea-vertical-align="bottom" loext:decorative="false"/>
    </style:style>
    <style:style style:name="gr6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59cm" loext:decorative="false"/>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95cm" loext:decorative="false"/>
      <style:paragraph-properties style:writing-mode="lr-tb"/>
    </style:style>
    <style:style style:name="gr63" style:family="graphic" style:parent-style-name="objectwithoutfill">
      <style:graphic-properties draw:marker-end="Arrowheads_20_14" draw:marker-end-width="0.3cm" draw:fill="none" draw:textarea-vertical-align="middle" loext:decorative="false"/>
    </style:style>
    <style:style style:name="gr64" style:family="graphic" style:parent-style-name="objectwithoutfill">
      <style:graphic-properties draw:marker-end="Arrowheads_20_15" draw:marker-end-width="0.3cm" draw:fill="none" draw:textarea-vertical-align="middle" loext:decorative="false"/>
    </style:style>
    <style:style style:name="gr65" style:family="graphic" style:parent-style-name="standard">
      <style:graphic-properties svg:stroke-color="#000000" draw:fill-color="#ffff00" draw:textarea-horizontal-align="left" draw:textarea-vertical-align="bottom" draw:auto-grow-height="false" fo:min-height="5.75cm" fo:min-width="8.5cm" style:writing-mode="lr-tb" loext:decorative="false"/>
      <style:paragraph-properties style:writing-mode="lr-tb"/>
    </style:style>
    <style:style style:name="gr66" style:family="graphic">
      <style:graphic-properties loext:decorative="false"/>
    </style:style>
    <style:style style:name="gr6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4.604cm" loext:decorative="false"/>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4.498cm" loext:decorative="false"/>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72cm" loext:decorative="false"/>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555cm" loext:decorative="false"/>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544cm" loext:decorative="false"/>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911cm" loext:decorative="false"/>
      <style:paragraph-properties style:writing-mode="lr-tb"/>
    </style:style>
    <style:style style:name="gr73" style:family="graphic" style:parent-style-name="objectwithoutfill">
      <style:graphic-properties draw:marker-end="Arrowheads_20_16" draw:marker-end-width="0.3cm" draw:fill="none" draw:textarea-vertical-align="middle" loext:decorative="false"/>
    </style:style>
    <style:style style:name="gr74" style:family="graphic" style:parent-style-name="standard">
      <style:graphic-properties svg:stroke-color="#000000" draw:fill-color="#ffff00" draw:textarea-horizontal-align="left" draw:textarea-vertical-align="bottom" draw:auto-grow-height="false" fo:min-height="2.75cm" fo:min-width="3.5cm" style:writing-mode="lr-tb" loext:decorative="false"/>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416cm" loext:decorative="false"/>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907cm" loext:decorative="false"/>
      <style:paragraph-properties style:writing-mode="lr-tb"/>
    </style:style>
    <style:style style:name="gr77" style:family="graphic" style:parent-style-name="objectwithoutfill">
      <style:graphic-properties draw:marker-end="Arrowheads_20_17" draw:marker-end-width="0.3cm" draw:fill="none" draw:textarea-vertical-align="middle" loext:decorative="false"/>
    </style:style>
    <style:style style:name="gr78" style:family="graphic" style:parent-style-name="objectwithoutfill">
      <style:graphic-properties draw:marker-end="Arrowheads_20_18" draw:marker-end-width="0.3cm" draw:fill="none" draw:textarea-vertical-align="middle" loext:decorative="false"/>
    </style:style>
    <style:style style:name="gr79" style:family="graphic" style:parent-style-name="objectwithoutfill">
      <style:graphic-properties draw:marker-end="Arrowheads_20_19" draw:marker-end-width="0.3cm" draw:fill="none" draw:textarea-vertical-align="middle" loext:decorative="false"/>
    </style:style>
    <style:style style:name="gr80" style:family="graphic" style:parent-style-name="objectwithoutfill">
      <style:graphic-properties draw:marker-end="Arrowheads_20_20" draw:marker-end-width="0.3cm" draw:fill="none" draw:textarea-vertical-align="middle" loext:decorative="false"/>
    </style:style>
    <style:style style:name="gr81" style:family="graphic" style:parent-style-name="standard">
      <style:graphic-properties svg:stroke-color="#000000" draw:fill-color="#ffff00" draw:textarea-horizontal-align="left" draw:textarea-vertical-align="bottom" draw:auto-grow-height="false" fo:min-height="9.75cm" fo:min-width="5.5cm" style:writing-mode="lr-tb" loext:decorative="false"/>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0.475cm" fo:min-width="2.271cm" loext:decorative="false"/>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0.475cm" fo:min-width="1.915cm" loext:decorative="false"/>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0.475cm" fo:min-width="1.518cm" loext:decorative="false"/>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0.475cm" fo:min-width="0.828cm" loext:decorative="false"/>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0.475cm" fo:min-width="2.546cm" loext:decorative="false"/>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0.475cm" fo:min-width="1.712cm" loext:decorative="false"/>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0.475cm" fo:min-width="1.721cm" loext:decorative="false"/>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0.475cm" fo:min-width="1.225cm" loext:decorative="false"/>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true" fo:min-height="0.475cm" fo:min-width="1.488cm" loext:decorative="false"/>
      <style:paragraph-properties style:writing-mode="lr-tb"/>
    </style:style>
    <style:style style:name="gr91" style:family="graphic" style:parent-style-name="standard">
      <style:graphic-properties draw:stroke="none" svg:stroke-color="#000000" draw:fill="none" draw:fill-color="#ffffff" draw:textarea-horizontal-align="left" draw:auto-grow-height="true" draw:auto-grow-width="true" fo:min-height="0.475cm" fo:min-width="1.149cm" loext:decorative="false"/>
      <style:paragraph-properties style:writing-mode="lr-tb"/>
    </style:style>
    <style:style style:name="gr92" style:family="graphic" style:parent-style-name="standard">
      <style:graphic-properties draw:stroke="none" svg:stroke-color="#000000" draw:fill="none" draw:fill-color="#ffffff" draw:textarea-horizontal-align="left" draw:auto-grow-height="true" draw:auto-grow-width="true" fo:min-height="0.475cm" fo:min-width="0.921cm" loext:decorative="false"/>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true" fo:min-height="0.475cm" fo:min-width="2.307cm" loext:decorative="false"/>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true" fo:min-height="0.475cm" fo:min-width="2.055cm" loext:decorative="false"/>
      <style:paragraph-properties style:writing-mode="lr-tb"/>
    </style:style>
    <style:style style:name="gr95" style:family="graphic" style:parent-style-name="objectwithoutfill">
      <style:graphic-properties draw:marker-end="Arrowheads_20_22" draw:marker-end-width="0.3cm" draw:fill="none" draw:textarea-vertical-align="middle" loext:decorative="false"/>
    </style:style>
    <style:style style:name="gr9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521cm" loext:decorative="false"/>
      <style:paragraph-properties style:writing-mode="lr-tb"/>
    </style:style>
    <style:style style:name="gr97" style:family="graphic" style:parent-style-name="objectwithoutfill">
      <style:graphic-properties draw:marker-end="Arrowheads_20_23" draw:marker-end-width="0.3cm" draw:fill="none" draw:textarea-vertical-align="middle" loext:decorative="false"/>
    </style:style>
    <style:style style:name="gr9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307cm" loext:decorative="false"/>
      <style:paragraph-properties style:writing-mode="lr-tb"/>
    </style:style>
    <style:style style:name="gr99" style:family="graphic" style:parent-style-name="objectwithoutfill">
      <style:graphic-properties draw:marker-end="Arrowheads_20_24" draw:marker-end-width="0.3cm" draw:fill="none" draw:textarea-vertical-align="middle" loext:decorative="false"/>
    </style:style>
    <style:style style:name="gr10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488cm" loext:decorative="false"/>
      <style:paragraph-properties style:writing-mode="lr-tb"/>
    </style:style>
    <style:style style:name="gr10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665cm" loext:decorative="false"/>
      <style:paragraph-properties style:writing-mode="lr-tb"/>
    </style:style>
    <style:style style:name="gr10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009cm" loext:decorative="false"/>
      <style:paragraph-properties style:writing-mode="lr-tb"/>
    </style:style>
    <style:style style:name="gr103" style:family="graphic" style:parent-style-name="standard">
      <style:graphic-properties svg:stroke-color="#000000" draw:fill-color="#ffff00" draw:textarea-horizontal-align="left" draw:textarea-vertical-align="bottom" draw:auto-grow-height="false" fo:min-height="5.75cm" fo:min-width="2.5cm" style:writing-mode="lr-tb" loext:decorative="false"/>
      <style:paragraph-properties style:writing-mode="lr-tb"/>
    </style:style>
    <style:style style:name="gr10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06cm" loext:decorative="false"/>
      <style:paragraph-properties style:writing-mode="lr-tb"/>
    </style:style>
    <style:style style:name="gr10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83cm" loext:decorative="false"/>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28cm" loext:decorative="false"/>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72cm" loext:decorative="false"/>
      <style:paragraph-properties style:writing-mode="lr-tb"/>
    </style:style>
    <style:style style:name="gr108" style:family="graphic" style:parent-style-name="standard">
      <style:graphic-properties svg:stroke-color="#000000" draw:fill-color="#ffff00" draw:textarea-horizontal-align="left" draw:textarea-vertical-align="bottom" draw:auto-grow-height="false" fo:min-height="4.75cm" fo:min-width="2.6cm" style:writing-mode="lr-tb" loext:decorative="false"/>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99cm" loext:decorative="false"/>
      <style:paragraph-properties style:writing-mode="lr-tb"/>
    </style:style>
    <style:style style:name="gr11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02cm" loext:decorative="false"/>
      <style:paragraph-properties style:writing-mode="lr-tb"/>
    </style:style>
    <style:style style:name="gr11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53cm" loext:decorative="false"/>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925cm" loext:decorative="false"/>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069cm" loext:decorative="false"/>
      <style:paragraph-properties style:writing-mode="lr-tb"/>
    </style:style>
    <style:style style:name="gr114" style:family="graphic" style:parent-style-name="objectwithoutfill">
      <style:graphic-properties draw:marker-end="Arrowheads_20_26" draw:marker-end-width="0.3cm" draw:fill="none" draw:textarea-vertical-align="middle" loext:decorative="false"/>
    </style:style>
    <style:style style:name="gr115" style:family="graphic" style:parent-style-name="objectwithoutfill">
      <style:graphic-properties draw:marker-end="Arrowheads_20_27" draw:marker-end-width="0.3cm" draw:fill="none" draw:textarea-vertical-align="middle" loext:decorative="false"/>
    </style:style>
    <style:style style:name="gr116" style:family="graphic" style:parent-style-name="objectwithoutfill">
      <style:graphic-properties draw:marker-end="Arrowheads_20_28" draw:marker-end-width="0.3cm" draw:fill="none" draw:textarea-vertical-align="middle" loext:decorative="false"/>
    </style:style>
    <style:style style:name="gr11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21cm" loext:decorative="false"/>
      <style:paragraph-properties style:writing-mode="lr-tb"/>
    </style:style>
    <style:style style:name="gr11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12cm" loext:decorative="false"/>
      <style:paragraph-properties style:writing-mode="lr-tb"/>
    </style:style>
    <style:style style:name="gr119" style:family="graphic" style:parent-style-name="objectwithoutfill">
      <style:graphic-properties draw:marker-end="Arrowheads_20_29" draw:marker-end-width="0.3cm" draw:fill="none" draw:textarea-vertical-align="middle" loext:decorative="false"/>
    </style:style>
    <style:style style:name="gr120" style:family="graphic" style:parent-style-name="objectwithoutfill">
      <style:graphic-properties draw:marker-end="Arrowheads_20_30" draw:marker-end-width="0.3cm" draw:fill="none" draw:textarea-vertical-align="middle" loext:decorative="false"/>
    </style:style>
    <style:style style:name="gr12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99cm" loext:decorative="false"/>
      <style:paragraph-properties style:writing-mode="lr-tb"/>
    </style:style>
    <style:style style:name="gr12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055cm" loext:decorative="false"/>
      <style:paragraph-properties style:writing-mode="lr-tb"/>
    </style:style>
    <style:style style:name="gr123" style:family="graphic" style:parent-style-name="objectwithoutfill">
      <style:graphic-properties draw:marker-end="Arrowheads_20_31" draw:marker-end-width="0.3cm" draw:fill="none" draw:textarea-vertical-align="middle" loext:decorative="false"/>
    </style:style>
    <style:style style:name="gr124" style:family="graphic" style:parent-style-name="objectwithoutfill">
      <style:graphic-properties draw:marker-end="Arrowheads_20_32" draw:marker-end-width="0.3cm" draw:fill="none" draw:textarea-vertical-align="middle" loext:decorative="false"/>
    </style:style>
    <style:style style:name="gr125" style:family="graphic" style:parent-style-name="objectwithoutfill">
      <style:graphic-properties draw:marker-end="Arrowheads_20_33" draw:marker-end-width="0.3cm" draw:fill="none" draw:textarea-vertical-align="middle" loext:decorative="false"/>
    </style:style>
    <style:style style:name="gr12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148cm" loext:decorative="false"/>
      <style:paragraph-properties style:writing-mode="lr-tb"/>
    </style:style>
    <style:style style:name="gr127" style:family="graphic" style:parent-style-name="objectwithoutfill">
      <style:graphic-properties draw:marker-end="Arrowheads_20_34" draw:marker-end-width="0.3cm" draw:fill="none" draw:textarea-vertical-align="middle" loext:decorative="false"/>
    </style:style>
    <style:style style:name="gr12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711cm" loext:decorative="false"/>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513cm" loext:decorative="false"/>
      <style:paragraph-properties style:writing-mode="lr-tb"/>
    </style:style>
    <style:style style:name="gr130" style:family="graphic" style:parent-style-name="objectwithoutfill">
      <style:graphic-properties draw:marker-end="Arrowheads_20_35" draw:marker-end-width="0.3cm" draw:fill="none" draw:textarea-vertical-align="middle" loext:decorative="false"/>
    </style:style>
    <style:style style:name="gr131" style:family="graphic" style:parent-style-name="standard">
      <style:graphic-properties svg:stroke-color="#000000" draw:textarea-horizontal-align="justify" draw:textarea-vertical-align="middle" draw:auto-grow-height="false" fo:min-height="1.75cm" fo:min-width="1.5cm" style:writing-mode="lr-tb" loext:decorative="false"/>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true" fo:min-height="0.475cm" fo:min-width="0.239cm" loext:decorative="false"/>
      <style:paragraph-properties style:writing-mode="lr-tb"/>
    </style:style>
    <style:style style:name="gr13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065cm" loext:decorative="false"/>
      <style:paragraph-properties style:writing-mode="lr-tb"/>
    </style:style>
    <style:style style:name="gr134" style:family="graphic" style:parent-style-name="objectwithoutfill">
      <style:graphic-properties draw:marker-end="Arrowheads_20_36" draw:marker-end-width="0.3cm" draw:fill="none" draw:textarea-vertical-align="middle" loext:decorative="false"/>
    </style:style>
    <style:style style:name="gr135" style:family="graphic" style:parent-style-name="objectwithoutfill">
      <style:graphic-properties draw:marker-end="Arrowheads_20_37" draw:marker-end-width="0.3cm" draw:fill="none" draw:textarea-vertical-align="middle" loext:decorative="false"/>
    </style:style>
    <style:style style:name="gr136" style:family="graphic" style:parent-style-name="objectwithoutfill">
      <style:graphic-properties draw:marker-end="Arrowheads_20_38" draw:marker-end-width="0.3cm" draw:fill="none" draw:textarea-vertical-align="middle" loext:decorative="false"/>
    </style:style>
    <style:style style:name="gr137" style:family="graphic" style:parent-style-name="standard">
      <style:graphic-properties draw:stroke="none" svg:stroke-color="#000000" draw:fill="none" draw:fill-color="#ffffff" draw:textarea-horizontal-align="left" draw:auto-grow-height="true" draw:auto-grow-width="true" fo:min-height="0.712cm" fo:min-width="5.261cm" loext:decorative="false"/>
      <style:paragraph-properties style:writing-mode="lr-tb"/>
    </style:style>
    <style:style style:name="gr138" style:family="graphic" style:parent-style-name="standard">
      <style:graphic-properties draw:stroke="none" svg:stroke-color="#000000" draw:fill="none" draw:fill-color="#ffffff" draw:textarea-horizontal-align="left" draw:auto-grow-height="true" draw:auto-grow-width="true" fo:min-height="0.712cm" fo:min-width="5.049cm" loext:decorative="false"/>
      <style:paragraph-properties style:writing-mode="lr-tb"/>
    </style:style>
    <style:style style:name="gr139" style:family="graphic" style:parent-style-name="objectwithoutfill">
      <style:graphic-properties svg:stroke-color="#ff4000" draw:marker-end="Arrowheads_20_39" draw:marker-end-width="0.3cm" draw:fill="none" draw:textarea-vertical-align="middle" loext:decorative="false"/>
    </style:style>
    <style:style style:name="gr140" style:family="graphic" style:parent-style-name="objectwithoutfill">
      <style:graphic-properties svg:stroke-color="#ff4000" draw:marker-end="Arrowheads_20_40" draw:marker-end-width="0.3cm" draw:fill="none" draw:textarea-vertical-align="middle" loext:decorative="false"/>
    </style:style>
    <style:style style:name="gr141" style:family="graphic" style:parent-style-name="objectwithoutfill">
      <style:graphic-properties svg:stroke-color="#ff4000" draw:marker-end="Arrowheads_20_41" draw:marker-end-width="0.3cm" draw:fill="none" draw:textarea-vertical-align="middle" loext:decorative="false"/>
    </style:style>
    <style:style style:name="gr142" style:family="graphic" style:parent-style-name="objectwithoutfill">
      <style:graphic-properties draw:marker-end="Linienspitzen_20_11" draw:marker-end-width="0.3cm" draw:fill="none" draw:textarea-vertical-align="middle" loext:decorative="false"/>
    </style:style>
    <style:style style:name="gr14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79cm" loext:decorative="false"/>
      <style:paragraph-properties style:writing-mode="lr-tb"/>
    </style:style>
    <style:style style:name="gr144" style:family="graphic" style:parent-style-name="objectwithoutfill">
      <style:graphic-properties draw:marker-end="Linienspitzen_20_12" draw:marker-end-width="0.3cm" draw:fill="none" draw:textarea-vertical-align="middle" loext:decorative="false"/>
    </style:style>
    <style:style style:name="gr14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507cm" loext:decorative="false"/>
      <style:paragraph-properties style:writing-mode="lr-tb"/>
    </style:style>
    <style:style style:name="gr146" style:family="graphic" style:parent-style-name="objectwithoutfill">
      <style:graphic-properties draw:marker-end="Arrow" draw:marker-end-width="0.3cm" draw:fill="none" draw:textarea-vertical-align="middle" loext:decorative="false"/>
    </style:style>
    <style:style style:name="gr147" style:family="graphic" style:parent-style-name="standard">
      <style:graphic-properties draw:stroke="none" svg:stroke-color="#000000" draw:fill="none" draw:fill-color="#ffffff" draw:textarea-horizontal-align="left" draw:auto-grow-height="true" draw:auto-grow-width="true" fo:min-height="0.712cm" fo:min-width="1.131cm" loext:decorative="false"/>
      <style:paragraph-properties style:writing-mode="lr-tb"/>
    </style:style>
    <style:style style:name="gr148" style:family="graphic" style:parent-style-name="standard">
      <style:graphic-properties svg:stroke-color="#000000" draw:fill-color="#81d41a" draw:textarea-horizontal-align="justify" draw:textarea-vertical-align="middle" draw:auto-grow-height="false" fo:min-height="0.75cm" fo:min-width="1.5cm" style:writing-mode="lr-tb" loext:decorative="false"/>
      <style:paragraph-properties style:writing-mode="lr-tb"/>
    </style:style>
    <style:style style:name="gr149" style:family="graphic" style:parent-style-name="standard">
      <style:graphic-properties draw:stroke="none" svg:stroke-color="#000000" draw:fill="none" draw:fill-color="#ffffff" draw:textarea-horizontal-align="left" draw:auto-grow-height="true" draw:auto-grow-width="true" fo:min-height="9.007cm" fo:min-width="12.067cm" loext:decorative="false"/>
      <style:paragraph-properties style:writing-mode="lr-tb"/>
    </style:style>
    <style:style style:name="gr15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423cm" loext:decorative="false"/>
      <style:paragraph-properties style:writing-mode="lr-tb"/>
    </style:style>
    <style:style style:name="gr15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42cm" loext:decorative="false"/>
      <style:paragraph-properties style:writing-mode="lr-tb"/>
    </style:style>
    <style:style style:name="gr15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661cm" loext:decorative="false"/>
      <style:paragraph-properties style:writing-mode="lr-tb"/>
    </style:style>
    <style:style style:name="gr153" style:family="graphic" style:parent-style-name="standard">
      <style:graphic-properties draw:stroke="none" svg:stroke-color="#000000" draw:fill="none" draw:fill-color="#ffffff" draw:textarea-horizontal-align="left" draw:auto-grow-height="true" draw:auto-grow-width="true" fo:min-height="0.712cm" fo:min-width="2.61cm" loext:decorative="false"/>
      <style:paragraph-properties style:writing-mode="lr-tb"/>
    </style:style>
    <style:style style:name="gr154" style:family="graphic" style:parent-style-name="standard">
      <style:graphic-properties svg:stroke-color="#000000" draw:fill-color="#ffffff" draw:textarea-horizontal-align="justify" draw:textarea-vertical-align="middle" draw:auto-grow-height="false" fo:min-height="1.75cm" fo:min-width="0.5cm" loext:decorative="false"/>
    </style:style>
    <style:style style:name="gr155" style:family="graphic" style:parent-style-name="standard">
      <style:graphic-properties svg:stroke-color="#000000" draw:fill-color="#ffffff" draw:textarea-vertical-align="middle" loext:decorative="false"/>
    </style:style>
    <style:style style:name="gr15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072cm" loext:decorative="false"/>
      <style:paragraph-properties style:writing-mode="lr-tb"/>
    </style:style>
    <style:style style:name="gr15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058cm" loext:decorative="false"/>
      <style:paragraph-properties style:writing-mode="lr-tb"/>
    </style:style>
    <style:style style:name="gr15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15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6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6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6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606cm" loext:decorative="false"/>
      <style:paragraph-properties style:writing-mode="lr-tb"/>
    </style:style>
    <style:style style:name="gr163" style:family="graphic" style:parent-style-name="standard">
      <style:graphic-properties svg:stroke-color="#000000" draw:fill-color="#ff0000" draw:textarea-horizontal-align="justify" draw:textarea-vertical-align="middle" draw:auto-grow-height="false" fo:min-height="0.15cm" fo:min-width="0cm" loext:decorative="false"/>
    </style:style>
    <style:style style:name="gr164" style:family="graphic" style:parent-style-name="objectwithoutfill">
      <style:graphic-properties draw:fill="none" draw:fill-color="#ff0000" draw:textarea-vertical-align="middle" loext:decorative="false"/>
    </style:style>
    <style:style style:name="gr165" style:family="graphic" style:parent-style-name="standard">
      <style:graphic-properties svg:stroke-color="#000000" draw:fill-color="#ffffff" draw:textarea-horizontal-align="justify" draw:textarea-vertical-align="middle" draw:auto-grow-height="false" fo:min-height="0.15cm" fo:min-width="0cm" loext:decorative="false"/>
    </style:style>
    <style:style style:name="gr16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765cm" loext:decorative="false"/>
      <style:paragraph-properties style:writing-mode="lr-tb"/>
    </style:style>
    <style:style style:name="gr16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16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6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7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7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461cm" loext:decorative="false"/>
      <style:paragraph-properties style:writing-mode="lr-tb"/>
    </style:style>
    <style:style style:name="gr17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835cm" loext:decorative="false"/>
      <style:paragraph-properties style:writing-mode="lr-tb"/>
    </style:style>
    <style:style style:name="gr17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198cm" loext:decorative="false"/>
      <style:paragraph-properties style:writing-mode="lr-tb"/>
    </style:style>
    <style:style style:name="gr17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495cm" loext:decorative="false"/>
      <style:paragraph-properties style:writing-mode="lr-tb"/>
    </style:style>
    <style:style style:name="gr17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435cm" loext:decorative="false"/>
      <style:paragraph-properties style:writing-mode="lr-tb"/>
    </style:style>
    <style:style style:name="gr17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88cm" loext:decorative="false"/>
      <style:paragraph-properties style:writing-mode="lr-tb"/>
    </style:style>
    <style:style style:name="gr17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17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7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8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8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18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8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8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8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991cm" loext:decorative="false"/>
      <style:paragraph-properties style:writing-mode="lr-tb"/>
    </style:style>
    <style:style style:name="gr186" style:family="graphic" style:parent-style-name="standard">
      <style:graphic-properties svg:stroke-color="#000000" draw:fill="none" draw:fill-color="#729fcf" loext:fill-use-slide-background="false" draw:textarea-horizontal-align="justify" draw:textarea-vertical-align="middle" draw:auto-grow-height="false" fo:min-height="0.528cm" fo:min-width="2.111cm" loext:decorative="false"/>
    </style:style>
    <style:style style:name="gr18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037cm" loext:decorative="false"/>
      <style:paragraph-properties style:writing-mode="lr-tb"/>
    </style:style>
    <style:style style:name="gr18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235cm" loext:decorative="false"/>
      <style:paragraph-properties style:writing-mode="lr-tb"/>
    </style:style>
    <style:style style:name="gr18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19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9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9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9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19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9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9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97" style:family="graphic" style:parent-style-name="standard">
      <style:graphic-properties svg:stroke-color="#000000" draw:fill-color="#ffffff" draw:textarea-horizontal-align="justify" draw:textarea-vertical-align="middle" draw:auto-grow-height="false" fo:min-height="0.35cm" fo:min-width="0.1cm" loext:decorative="false"/>
    </style:style>
    <style:style style:name="gr19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928cm" loext:decorative="false"/>
      <style:paragraph-properties style:writing-mode="lr-tb"/>
    </style:style>
    <style:style style:name="gr19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728cm" loext:decorative="false"/>
      <style:paragraph-properties style:writing-mode="lr-tb"/>
    </style:style>
    <style:style style:name="gr20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284cm" loext:decorative="false"/>
      <style:paragraph-properties style:writing-mode="lr-tb"/>
    </style:style>
    <style:style style:name="gr20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377cm" loext:decorative="false"/>
      <style:paragraph-properties style:writing-mode="lr-tb"/>
    </style:style>
    <style:style style:name="gr20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598cm" loext:decorative="false"/>
      <style:paragraph-properties style:writing-mode="lr-tb"/>
    </style:style>
    <style:style style:name="gr20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0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0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0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0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99cm" loext:decorative="false"/>
      <style:paragraph-properties style:writing-mode="lr-tb"/>
    </style:style>
    <style:style style:name="gr20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542cm" loext:decorative="false"/>
      <style:paragraph-properties style:writing-mode="lr-tb"/>
    </style:style>
    <style:style style:name="gr20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975cm" loext:decorative="false"/>
      <style:paragraph-properties style:writing-mode="lr-tb"/>
    </style:style>
    <style:style style:name="gr21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4cm" loext:decorative="false"/>
      <style:paragraph-properties style:writing-mode="lr-tb"/>
    </style:style>
    <style:style style:name="gr21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617cm" loext:decorative="false"/>
      <style:paragraph-properties style:writing-mode="lr-tb"/>
    </style:style>
    <style:style style:name="gr21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4.036cm" loext:decorative="false"/>
      <style:paragraph-properties style:writing-mode="lr-tb"/>
    </style:style>
    <style:style style:name="gr21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5.34cm" loext:decorative="false"/>
      <style:paragraph-properties style:writing-mode="lr-tb"/>
    </style:style>
    <style:style style:name="gr21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7.614cm" loext:decorative="false"/>
      <style:paragraph-properties style:writing-mode="lr-tb"/>
    </style:style>
    <style:style style:name="gr21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8.033cm" loext:decorative="false"/>
      <style:paragraph-properties style:writing-mode="lr-tb"/>
    </style:style>
    <style:style style:name="gr216" style:family="graphic" style:parent-style-name="standard">
      <style:graphic-properties draw:stroke="none" svg:stroke-color="#000000" draw:fill="none" draw:fill-color="#ffffff" draw:textarea-horizontal-align="left" draw:auto-grow-height="true" draw:auto-grow-width="true" draw:fit-to-size="false" style:shrink-to-fit="true" fo:min-height="8.059cm" fo:min-width="15.721cm" loext:decorative="false"/>
      <style:paragraph-properties style:writing-mode="lr-tb"/>
    </style:style>
    <style:style style:name="gr217" style:family="graphic" style:parent-style-name="standard">
      <style:graphic-properties draw:stroke="none" svg:stroke-color="#000000" draw:fill="none" draw:fill-color="#ffffff" draw:textarea-horizontal-align="left" draw:auto-grow-height="true" draw:auto-grow-width="true" fo:min-height="0.712cm" fo:min-width="2.826cm" loext:decorative="false"/>
      <style:paragraph-properties style:writing-mode="lr-tb"/>
    </style:style>
    <style:style style:name="gr21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449cm" loext:decorative="false"/>
      <style:paragraph-properties style:writing-mode="lr-tb"/>
    </style:style>
    <style:style style:name="gr21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586cm" loext:decorative="false"/>
      <style:paragraph-properties style:writing-mode="lr-tb"/>
    </style:style>
    <style:style style:name="gr22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084cm" loext:decorative="false"/>
      <style:paragraph-properties style:writing-mode="lr-tb"/>
    </style:style>
    <style:style style:name="gr22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165cm" loext:decorative="false"/>
      <style:paragraph-properties style:writing-mode="lr-tb"/>
    </style:style>
    <style:style style:name="gr22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425cm" loext:decorative="false"/>
      <style:paragraph-properties style:writing-mode="lr-tb"/>
    </style:style>
    <style:style style:name="gr22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2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2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2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2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06cm" loext:decorative="false"/>
      <style:paragraph-properties style:writing-mode="lr-tb"/>
    </style:style>
    <style:style style:name="gr22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707cm" loext:decorative="false"/>
      <style:paragraph-properties style:writing-mode="lr-tb"/>
    </style:style>
    <style:style style:name="gr229" style:family="graphic" style:parent-style-name="standard">
      <style:graphic-properties svg:stroke-color="#000000" draw:fill-color="#ffffff" draw:textarea-horizontal-align="left" draw:textarea-vertical-align="bottom" draw:auto-grow-height="false" fo:min-height="5.75cm" fo:min-width="1.5cm" style:writing-mode="lr-tb" loext:decorative="false"/>
      <style:paragraph-properties style:writing-mode="lr-tb"/>
    </style:style>
    <style:style style:name="gr230" style:family="graphic" style:parent-style-name="objectwithoutfill">
      <style:graphic-properties draw:fill="none" draw:fill-color="#ffffff" draw:textarea-horizontal-align="left" draw:textarea-vertical-align="bottom" loext:decorative="false"/>
    </style:style>
    <style:style style:name="gr23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08cm" loext:decorative="false"/>
      <style:paragraph-properties style:writing-mode="lr-tb"/>
    </style:style>
    <style:style style:name="gr23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202cm" loext:decorative="false"/>
      <style:paragraph-properties style:writing-mode="lr-tb"/>
    </style:style>
    <style:style style:name="gr23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3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3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3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3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847cm" loext:decorative="false"/>
      <style:paragraph-properties style:writing-mode="lr-tb"/>
    </style:style>
    <style:style style:name="gr23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594cm" loext:decorative="false"/>
      <style:paragraph-properties style:writing-mode="lr-tb"/>
    </style:style>
    <style:style style:name="gr23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838cm" loext:decorative="false"/>
      <style:paragraph-properties style:writing-mode="lr-tb"/>
    </style:style>
    <style:style style:name="gr240" style:family="graphic" style:parent-style-name="standard">
      <style:graphic-properties svg:stroke-color="#000000" draw:fill-color="#ffffff" draw:textarea-horizontal-align="justify" draw:textarea-vertical-align="middle" draw:auto-grow-height="false" fo:min-height="0.75cm" fo:min-width="1.5cm" loext:decorative="false"/>
    </style:style>
    <style:style style:name="gr24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23cm" loext:decorative="false"/>
      <style:paragraph-properties style:writing-mode="lr-tb"/>
    </style:style>
    <style:style style:name="gr24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856cm" loext:decorative="false"/>
      <style:paragraph-properties style:writing-mode="lr-tb"/>
    </style:style>
    <style:style style:name="gr24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093cm" loext:decorative="false"/>
      <style:paragraph-properties style:writing-mode="lr-tb"/>
    </style:style>
    <style:style style:name="gr24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93cm" loext:decorative="false"/>
      <style:paragraph-properties style:writing-mode="lr-tb"/>
    </style:style>
    <style:style style:name="gr24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95cm" loext:decorative="false"/>
      <style:paragraph-properties style:writing-mode="lr-tb"/>
    </style:style>
    <style:style style:name="gr24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63cm" loext:decorative="false"/>
      <style:paragraph-properties style:writing-mode="lr-tb"/>
    </style:style>
    <style:style style:name="gr24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47cm" loext:decorative="false"/>
      <style:paragraph-properties style:writing-mode="lr-tb"/>
    </style:style>
    <style:style style:name="gr24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86cm" loext:decorative="false"/>
      <style:paragraph-properties style:writing-mode="lr-tb"/>
    </style:style>
    <style:style style:name="gr24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305cm" loext:decorative="false"/>
      <style:paragraph-properties style:writing-mode="lr-tb"/>
    </style:style>
    <style:style style:name="gr25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61cm" loext:decorative="false"/>
      <style:paragraph-properties style:writing-mode="lr-tb"/>
    </style:style>
    <style:style style:name="gr25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186cm" loext:decorative="false"/>
      <style:paragraph-properties style:writing-mode="lr-tb"/>
    </style:style>
    <style:style style:name="gr25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281cm" loext:decorative="false"/>
      <style:paragraph-properties style:writing-mode="lr-tb"/>
    </style:style>
    <style:style style:name="gr25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307cm" loext:decorative="false"/>
      <style:paragraph-properties style:writing-mode="lr-tb"/>
    </style:style>
    <style:style style:name="gr25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116cm" loext:decorative="false"/>
      <style:paragraph-properties style:writing-mode="lr-tb"/>
    </style:style>
    <style:style style:name="gr25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54cm" loext:decorative="false"/>
      <style:paragraph-properties style:writing-mode="lr-tb"/>
    </style:style>
    <style:style style:name="gr25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157cm" loext:decorative="false"/>
      <style:paragraph-properties style:writing-mode="lr-tb"/>
    </style:style>
    <style:style style:name="gr25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5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5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6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6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484cm" loext:decorative="false"/>
      <style:paragraph-properties style:writing-mode="lr-tb"/>
    </style:style>
    <style:style style:name="gr26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505cm" loext:decorative="false"/>
      <style:paragraph-properties style:writing-mode="lr-tb"/>
    </style:style>
    <style:style style:name="gr26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33cm" loext:decorative="false"/>
      <style:paragraph-properties style:writing-mode="lr-tb"/>
    </style:style>
    <style:style style:name="gr264" style:family="graphic" style:parent-style-name="standard">
      <style:graphic-properties svg:stroke-color="#000000" draw:fill-color="#ffffff" draw:textarea-horizontal-align="justify" draw:textarea-vertical-align="middle" draw:auto-grow-height="false" fo:min-height="5.75cm" fo:min-width="1.5cm" loext:decorative="false"/>
    </style:style>
    <style:style style:name="gr26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86cm" loext:decorative="false"/>
      <style:paragraph-properties style:writing-mode="lr-tb"/>
    </style:style>
    <style:style style:name="gr26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65cm" loext:decorative="false"/>
      <style:paragraph-properties style:writing-mode="lr-tb"/>
    </style:style>
    <style:style style:name="gr26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74cm" loext:decorative="false"/>
      <style:paragraph-properties style:writing-mode="lr-tb"/>
    </style:style>
    <style:style style:name="gr26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6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7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7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80" style:family="graphic" style:parent-style-name="standard">
      <style:graphic-properties svg:stroke-color="#000000" draw:fill-color="#ffffff" draw:textarea-horizontal-align="justify" draw:textarea-vertical-align="middle" draw:auto-grow-height="false" fo:min-height="0.75cm" fo:min-width="0.5cm" style:writing-mode="lr-tb" loext:decorative="false"/>
      <style:paragraph-properties style:writing-mode="lr-tb"/>
    </style:style>
    <style:style style:name="gr28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233cm" loext:decorative="false"/>
      <style:paragraph-properties style:writing-mode="lr-tb"/>
    </style:style>
    <style:style style:name="gr28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412cm" loext:decorative="false"/>
      <style:paragraph-properties style:writing-mode="lr-tb"/>
    </style:style>
    <style:style style:name="gr283" style:family="graphic" style:parent-style-name="standard">
      <style:graphic-properties svg:stroke-color="#000000" draw:fill="none" draw:fill-color="#729fcf" loext:fill-use-slide-background="false" draw:textarea-horizontal-align="justify" draw:textarea-vertical-align="middle" draw:auto-grow-height="false" fo:min-height="0.528cm" fo:min-width="1.904cm" loext:decorative="false"/>
    </style:style>
    <style:style style:name="gr284" style:family="graphic" style:parent-style-name="standard">
      <style:graphic-properties svg:stroke-color="#000000" draw:fill="solid" draw:fill-color="#ffffff" loext:fill-use-slide-background="false" draw:textarea-horizontal-align="justify" draw:textarea-vertical-align="middle" draw:auto-grow-height="false" fo:min-height="0.528cm" fo:min-width="1.904cm" loext:decorative="false"/>
    </style:style>
    <style:style style:name="gr285" style:family="graphic" style:parent-style-name="standard">
      <style:graphic-properties draw:stroke="none" svg:stroke-color="#000000" draw:fill="none" draw:fill-color="#ffffff" draw:textarea-horizontal-align="left" draw:auto-grow-height="true" draw:auto-grow-width="true" draw:fit-to-size="false" style:shrink-to-fit="true" fo:min-height="1.423cm" fo:min-width="4.917cm" loext:decorative="false"/>
      <style:paragraph-properties style:writing-mode="lr-tb"/>
    </style:style>
    <style:style style:name="gr28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119cm" loext:decorative="false"/>
      <style:paragraph-properties style:writing-mode="lr-tb"/>
    </style:style>
    <style:style style:name="gr287" style:family="graphic" style:parent-style-name="standard">
      <style:graphic-properties svg:stroke-color="#000000" draw:fill-color="#dddddd" draw:textarea-horizontal-align="justify" draw:textarea-vertical-align="middle" draw:auto-grow-height="false" fo:min-height="6.85cm" fo:min-width="9.7cm" loext:decorative="false"/>
    </style:style>
    <style:style style:name="gr28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126cm" loext:decorative="false"/>
      <style:paragraph-properties style:writing-mode="lr-tb"/>
    </style:style>
    <style:style style:name="gr289" style:family="graphic" style:parent-style-name="objectwithoutfill">
      <style:graphic-properties draw:stroke="dash" draw:stroke-dash="Dot" draw:fill="none" draw:textarea-vertical-align="middle" loext:decorative="false"/>
    </style:style>
    <style:style style:name="gr29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9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9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9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9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563cm" loext:decorative="false"/>
      <style:paragraph-properties style:writing-mode="lr-tb"/>
    </style:style>
    <style:style style:name="gr295" style:family="graphic" style:parent-style-name="standard">
      <style:graphic-properties svg:stroke-color="#000000" draw:fill="solid" draw:fill-color="#ffff00" draw:textarea-horizontal-align="justify" draw:textarea-vertical-align="middle" draw:auto-grow-height="false" fo:min-height="2.75cm" fo:min-width="3.5cm" style:writing-mode="lr-tb" loext:decorative="false"/>
      <style:paragraph-properties style:writing-mode="lr-tb"/>
    </style:style>
    <style:style style:name="gr296" style:family="graphic" style:parent-style-name="standard">
      <style:graphic-properties svg:stroke-color="#000000" draw:textarea-horizontal-align="justify" draw:textarea-vertical-align="middle" draw:auto-grow-height="false" fo:min-height="2.75cm" fo:min-width="6.5cm" style:writing-mode="lr-tb" loext:decorative="false"/>
      <style:paragraph-properties style:writing-mode="lr-tb"/>
    </style:style>
    <style:style style:name="gr297" style:family="graphic" style:parent-style-name="standard">
      <style:graphic-properties svg:stroke-color="#000000" draw:textarea-horizontal-align="justify" draw:textarea-vertical-align="middle" draw:auto-grow-height="false" fo:min-height="2.75cm" fo:min-width="3.5cm" style:writing-mode="lr-tb" loext:decorative="false"/>
      <style:paragraph-properties style:writing-mode="lr-tb"/>
    </style:style>
    <style:style style:name="gr298" style:family="graphic" style:parent-style-name="standard">
      <style:graphic-properties svg:stroke-color="#000000" draw:fill="solid" draw:fill-color="#ffff00" draw:textarea-vertical-align="middle" draw:auto-grow-height="false" fo:min-height="2.75cm" fo:min-width="3.5cm" style:writing-mode="lr-tb" loext:decorative="false"/>
      <style:paragraph-properties style:writing-mode="lr-tb"/>
    </style:style>
    <style:style style:name="gr299" style:family="graphic" style:parent-style-name="standard">
      <style:graphic-properties svg:stroke-color="#000000" draw:textarea-vertical-align="middle" draw:auto-grow-height="false" fo:min-height="2.75cm" fo:min-width="3.5cm" style:writing-mode="lr-tb" loext:decorative="false"/>
      <style:paragraph-properties style:writing-mode="lr-tb"/>
    </style:style>
    <style:style style:name="gr300" style:family="graphic" style:parent-style-name="objectwithoutfill">
      <style:graphic-properties svg:stroke-width="0.2cm" draw:marker-start-width="0.5cm" draw:marker-end-width="0.5cm" draw:fill="none" draw:textarea-vertical-align="middle" fo:padding-top="0.225cm" fo:padding-bottom="0.225cm" fo:padding-left="0.35cm" fo:padding-right="0.35cm" loext:decorative="false"/>
    </style:style>
    <style:style style:name="gr301" style:family="graphic" style:parent-style-name="standard">
      <style:graphic-properties draw:stroke="none" svg:stroke-color="#000000" draw:fill="none" draw:fill-color="#ffffff" draw:textarea-horizontal-align="left" draw:auto-grow-height="true" draw:auto-grow-width="true" fo:min-height="0.712cm" fo:min-width="1.766cm" loext:decorative="false"/>
      <style:paragraph-properties style:writing-mode="lr-tb"/>
    </style:style>
    <style:style style:name="gr302" style:family="graphic" style:parent-style-name="standard">
      <style:graphic-properties svg:stroke-width="0.2cm" svg:stroke-color="#000000" draw:marker-start="Arrow" draw:marker-start-width="0.6cm" draw:marker-end="Arrow" draw:marker-end-width="0.6cm" draw:textarea-vertical-align="middle" fo:padding-top="0.225cm" fo:padding-bottom="0.225cm" fo:padding-left="0.35cm" fo:padding-right="0.35cm" loext:decorative="false"/>
    </style:style>
    <style:style style:name="gr303" style:family="graphic" style:parent-style-name="standard">
      <style:graphic-properties draw:stroke="none" svg:stroke-color="#000000" draw:fill="none" draw:fill-color="#ffffff" draw:textarea-horizontal-align="left" draw:auto-grow-height="true" draw:auto-grow-width="true" fo:min-height="0.712cm" fo:min-width="1.484cm" loext:decorative="false"/>
      <style:paragraph-properties style:writing-mode="lr-tb"/>
    </style:style>
    <style:style style:name="gr304" style:family="graphic" style:parent-style-name="standard">
      <style:graphic-properties svg:stroke-width="0.2cm" svg:stroke-color="#000000" draw:marker-start="" draw:marker-start-width="0.6cm" draw:marker-end="Arrow" draw:marker-end-width="0.6cm" draw:textarea-vertical-align="middle" fo:padding-top="0.225cm" fo:padding-bottom="0.225cm" fo:padding-left="0.35cm" fo:padding-right="0.35cm" loext:decorative="false"/>
    </style:style>
    <style:style style:name="gr305" style:family="graphic" style:parent-style-name="standard">
      <style:graphic-properties svg:stroke-width="0.2cm" svg:stroke-color="#000000" draw:marker-start="Arrow" draw:marker-start-width="0.6cm" draw:marker-end="" draw:marker-end-width="0.6cm" draw:textarea-vertical-align="middle" fo:padding-top="0.225cm" fo:padding-bottom="0.225cm" fo:padding-left="0.35cm" fo:padding-right="0.35cm" loext:decorative="false"/>
    </style:style>
    <style:style style:name="gr306" style:family="graphic" style:parent-style-name="standard">
      <style:graphic-properties svg:stroke-color="#000000" draw:fill="none" loext:fill-use-slide-background="false" draw:textarea-horizontal-align="justify" draw:textarea-vertical-align="middle" draw:auto-grow-height="false" fo:min-height="10.75cm" fo:min-width="31.5cm" loext:decorative="false"/>
    </style:style>
    <style:style style:name="gr307" style:family="graphic" style:parent-style-name="standard">
      <style:graphic-properties svg:stroke-color="#000000" draw:fill="none" loext:fill-use-slide-background="false" draw:textarea-horizontal-align="justify" draw:textarea-vertical-align="middle" draw:auto-grow-height="false" fo:min-height="13.75cm" fo:min-width="31.5cm" loext:decorative="false"/>
    </style:style>
    <style:style style:name="gr308" style:family="graphic" style:parent-style-name="standard">
      <style:graphic-properties svg:stroke-color="#000000" draw:marker-start="Arrow" draw:marker-start-width="0.3cm" draw:marker-end="Arrow" draw:marker-end-width="0.3cm" draw:textarea-vertical-align="middle" loext:decorative="false"/>
    </style:style>
    <style:style style:name="gr309" style:family="graphic" style:parent-style-name="standard">
      <style:graphic-properties draw:stroke="none" svg:stroke-color="#000000" draw:fill="none" draw:fill-color="#ffffff" draw:textarea-horizontal-align="left" draw:auto-grow-height="true" draw:auto-grow-width="true" fo:min-height="0.712cm" fo:min-width="4.951cm" loext:decorative="false"/>
      <style:paragraph-properties style:writing-mode="lr-tb"/>
    </style:style>
    <style:style style:name="gr310" style:family="graphic" style:parent-style-name="standard">
      <style:graphic-properties svg:stroke-color="#000000" draw:fill="solid" draw:fill-color="#ffff00" draw:textarea-horizontal-align="justify" draw:textarea-vertical-align="middle" draw:auto-grow-height="false" fo:min-height="1.75cm" fo:min-width="2.5cm" style:writing-mode="lr-tb" loext:decorative="false"/>
      <style:paragraph-properties style:writing-mode="lr-tb"/>
    </style:style>
    <style:style style:name="gr311" style:family="graphic" style:parent-style-name="standard">
      <style:graphic-properties svg:stroke-color="#000000" draw:fill="solid" draw:fill-color="#ffff00" draw:textarea-vertical-align="middle" draw:auto-grow-height="false" fo:min-height="1.25cm" fo:min-width="3.5cm" style:writing-mode="lr-tb" loext:decorative="false"/>
      <style:paragraph-properties style:writing-mode="lr-tb"/>
    </style:style>
    <style:style style:name="gr312" style:family="graphic" style:parent-style-name="standard">
      <style:graphic-properties svg:stroke-color="#000000" draw:fill-color="#ffff00" draw:textarea-horizontal-align="left" draw:textarea-vertical-align="bottom" draw:auto-grow-height="false" fo:min-height="3.75cm" fo:min-width="2.6cm" style:writing-mode="lr-tb" loext:decorative="false"/>
      <style:paragraph-properties style:writing-mode="lr-tb"/>
    </style:style>
    <style:style style:name="gr31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2cm" loext:decorative="false"/>
      <style:paragraph-properties style:writing-mode="lr-tb"/>
    </style:style>
    <style:style style:name="gr314" style:family="graphic" style:parent-style-name="standard">
      <style:graphic-properties svg:stroke-color="#000000" draw:fill-color="#ffff00" draw:textarea-horizontal-align="left" draw:textarea-vertical-align="bottom" draw:auto-grow-height="false" fo:min-height="4.75cm" fo:min-width="3.514cm" style:writing-mode="lr-tb" loext:decorative="false"/>
      <style:paragraph-properties style:writing-mode="lr-tb"/>
    </style:style>
    <style:style style:name="gr315" style:family="graphic" style:parent-style-name="standard">
      <style:graphic-properties draw:stroke="none" svg:stroke-color="#000000" draw:fill="none" draw:fill-color="#ffffff" draw:textarea-horizontal-align="left" draw:auto-grow-height="true" draw:auto-grow-width="true" fo:min-height="0.475cm" fo:min-width="0.966cm" loext:decorative="false"/>
      <style:paragraph-properties style:writing-mode="lr-tb"/>
    </style:style>
    <style:style style:name="gr316" style:family="graphic" style:parent-style-name="standard">
      <style:graphic-properties draw:stroke="none" svg:stroke-color="#000000" draw:fill="none" draw:fill-color="#ffffff" draw:textarea-horizontal-align="left" draw:auto-grow-height="true" draw:auto-grow-width="true" fo:min-height="0.475cm" fo:min-width="1.038cm" loext:decorative="false"/>
      <style:paragraph-properties style:writing-mode="lr-tb"/>
    </style:style>
    <style:style style:name="gr317" style:family="graphic" style:parent-style-name="standard">
      <style:graphic-properties draw:stroke="none" svg:stroke-color="#000000" draw:fill="none" draw:fill-color="#ffffff" draw:textarea-horizontal-align="left" draw:auto-grow-height="true" draw:auto-grow-width="true" fo:min-height="0.475cm" fo:min-width="1.061cm" loext:decorative="false"/>
      <style:paragraph-properties style:writing-mode="lr-tb"/>
    </style:style>
    <style:style style:name="gr318" style:family="graphic" style:parent-style-name="standard">
      <style:graphic-properties draw:stroke="none" svg:stroke-color="#000000" draw:fill="none" draw:fill-color="#ffffff" draw:textarea-horizontal-align="left" draw:auto-grow-height="true" draw:auto-grow-width="true" fo:min-height="0.475cm" fo:min-width="1.32cm" loext:decorative="false"/>
      <style:paragraph-properties style:writing-mode="lr-tb"/>
    </style:style>
    <style:style style:name="gr319" style:family="graphic" style:parent-style-name="standard">
      <style:graphic-properties draw:stroke="none" svg:stroke-color="#000000" draw:fill="none" draw:fill-color="#ffffff" draw:textarea-horizontal-align="left" draw:auto-grow-height="true" draw:auto-grow-width="true" fo:min-height="0.475cm" fo:min-width="0.92cm" loext:decorative="false"/>
      <style:paragraph-properties style:writing-mode="lr-tb"/>
    </style:style>
    <style:style style:name="gr320" style:family="graphic" style:parent-style-name="standard">
      <style:graphic-properties draw:stroke="none" svg:stroke-color="#000000" draw:fill="none" draw:fill-color="#ffffff" draw:textarea-horizontal-align="left" draw:auto-grow-height="true" draw:auto-grow-width="true" fo:min-height="0.475cm" fo:min-width="0.896cm" loext:decorative="false"/>
      <style:paragraph-properties style:writing-mode="lr-tb"/>
    </style:style>
    <style:style style:name="gr32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96cm" loext:decorative="false"/>
      <style:paragraph-properties style:writing-mode="lr-tb"/>
    </style:style>
    <style:style style:name="gr32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26cm" loext:decorative="false"/>
      <style:paragraph-properties style:writing-mode="lr-tb"/>
    </style:style>
    <style:style style:name="gr32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2cm" loext:decorative="false"/>
      <style:paragraph-properties style:writing-mode="lr-tb"/>
    </style:style>
    <style:style style:name="gr32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67cm" loext:decorative="false"/>
      <style:paragraph-properties style:writing-mode="lr-tb"/>
    </style:style>
    <style:style style:name="gr32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55cm" loext:decorative="false"/>
      <style:paragraph-properties style:writing-mode="lr-tb"/>
    </style:style>
    <style:style style:name="gr32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97cm" loext:decorative="false"/>
      <style:paragraph-properties style:writing-mode="lr-tb"/>
    </style:style>
    <style:style style:name="gr327" style:family="graphic" style:parent-style-name="objectwithoutfill">
      <style:graphic-properties draw:marker-end="Linienspitzen_20_50" draw:marker-end-width="0.3cm" draw:fill="none" draw:textarea-vertical-align="middle" loext:decorative="false"/>
    </style:style>
    <style:style style:name="gr328" style:family="graphic" style:parent-style-name="objectwithoutfill">
      <style:graphic-properties draw:marker-end="Linienspitzen_20_51" draw:marker-end-width="0.3cm" draw:fill="none" draw:textarea-vertical-align="middle" loext:decorative="false"/>
    </style:style>
    <style:style style:name="gr329" style:family="graphic" style:parent-style-name="objectwithoutfill">
      <style:graphic-properties draw:marker-end="Linienspitzen_20_52" draw:marker-end-width="0.3cm" draw:fill="none" draw:textarea-vertical-align="middle" loext:decorative="false"/>
    </style:style>
    <style:style style:name="gr330" style:family="graphic" style:parent-style-name="objectwithoutfill">
      <style:graphic-properties draw:marker-end="Linienspitzen_20_53" draw:marker-end-width="0.3cm" draw:fill="none" draw:textarea-vertical-align="middle" loext:decorative="false"/>
    </style:style>
    <style:style style:name="gr331" style:family="graphic" style:parent-style-name="objectwithoutfill">
      <style:graphic-properties draw:marker-end="Linienspitzen_20_54" draw:marker-end-width="0.3cm" draw:fill="none" draw:textarea-vertical-align="middle" loext:decorative="false"/>
    </style:style>
    <style:style style:name="gr332" style:family="graphic" style:parent-style-name="objectwithoutfill">
      <style:graphic-properties draw:marker-end="Linienspitzen_20_55" draw:marker-end-width="0.3cm" draw:fill="none" draw:textarea-vertical-align="middle" loext:decorative="false"/>
    </style:style>
    <style:style style:name="gr333" style:family="graphic" style:parent-style-name="objectwithoutfill">
      <style:graphic-properties draw:marker-end="Linienspitzen_20_56" draw:marker-end-width="0.3cm" draw:fill="none" draw:textarea-vertical-align="middle" loext:decorative="false"/>
    </style:style>
    <style:style style:name="gr334" style:family="graphic" style:parent-style-name="objectwithoutfill">
      <style:graphic-properties draw:marker-end="Linienspitzen_20_57" draw:marker-end-width="0.3cm" draw:fill="none" draw:textarea-vertical-align="middle" loext:decorative="false"/>
    </style:style>
    <style:style style:name="gr335" style:family="graphic" style:parent-style-name="objectwithoutfill">
      <style:graphic-properties draw:marker-end="Linienspitzen_20_58" draw:marker-end-width="0.3cm" draw:fill="none" draw:textarea-vertical-align="middle" loext:decorative="false"/>
    </style:style>
    <style:style style:name="gr336" style:family="graphic" style:parent-style-name="objectwithoutfill">
      <style:graphic-properties draw:marker-end="Linienspitzen_20_59" draw:marker-end-width="0.3cm" draw:fill="none" draw:textarea-vertical-align="middle" loext:decorative="false"/>
    </style:style>
    <style:style style:name="gr337" style:family="graphic" style:parent-style-name="objectwithoutfill">
      <style:graphic-properties draw:marker-end="Linienspitzen_20_60" draw:marker-end-width="0.3cm" draw:fill="none" draw:textarea-vertical-align="middle" loext:decorative="false"/>
    </style:style>
    <style:style style:name="gr338" style:family="graphic" style:parent-style-name="objectwithoutfill">
      <style:graphic-properties draw:marker-end="Linienspitzen_20_61" draw:marker-end-width="0.3cm" draw:fill="none" draw:textarea-vertical-align="middle" loext:decorative="false"/>
    </style:style>
    <style:style style:name="gr339" style:family="graphic" style:parent-style-name="standard">
      <style:graphic-properties svg:stroke-color="#000000" draw:fill-color="#ffff00" draw:textarea-horizontal-align="justify" draw:textarea-vertical-align="middle" draw:auto-grow-height="false" fo:min-height="1.75cm" fo:min-width="32.5cm" style:writing-mode="lr-tb" loext:decorative="false"/>
      <style:paragraph-properties style:writing-mode="lr-tb"/>
    </style:style>
    <style:style style:name="gr34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296cm" loext:decorative="false"/>
      <style:paragraph-properties style:writing-mode="lr-tb"/>
    </style:style>
    <style:style style:name="gr34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944cm" loext:decorative="false"/>
      <style:paragraph-properties style:writing-mode="lr-tb"/>
    </style:style>
    <style:style style:name="gr34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92cm" loext:decorative="false"/>
      <style:paragraph-properties style:writing-mode="lr-tb"/>
    </style:style>
    <style:style style:name="gr34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73cm" loext:decorative="false"/>
      <style:paragraph-properties style:writing-mode="lr-tb"/>
    </style:style>
    <style:style style:name="gr34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32cm" loext:decorative="false"/>
      <style:paragraph-properties style:writing-mode="lr-tb"/>
    </style:style>
    <style:style style:name="gr34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966cm" loext:decorative="false"/>
      <style:paragraph-properties style:writing-mode="lr-tb"/>
    </style:style>
    <style:style style:name="gr346" style:family="graphic" style:parent-style-name="objectwithoutfill">
      <style:graphic-properties draw:marker-end="Linienspitzen_20_62" draw:marker-end-width="0.3cm" draw:fill="none" draw:textarea-vertical-align="middle" loext:decorative="false"/>
    </style:style>
    <style:style style:name="gr347" style:family="graphic" style:parent-style-name="objectwithoutfill">
      <style:graphic-properties draw:marker-end="Linienspitzen_20_63" draw:marker-end-width="0.3cm" draw:fill="none" draw:textarea-vertical-align="middle" loext:decorative="false"/>
    </style:style>
    <style:style style:name="gr348" style:family="graphic" style:parent-style-name="objectwithoutfill">
      <style:graphic-properties draw:marker-end="Linienspitzen_20_64" draw:marker-end-width="0.3cm" draw:fill="none" draw:textarea-vertical-align="middle" loext:decorative="false"/>
    </style:style>
    <style:style style:name="gr349" style:family="graphic" style:parent-style-name="objectwithoutfill">
      <style:graphic-properties draw:marker-end="Linienspitzen_20_65" draw:marker-end-width="0.3cm" draw:fill="none" draw:textarea-vertical-align="middle" loext:decorative="false"/>
    </style:style>
    <style:style style:name="gr35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861cm" loext:decorative="false"/>
      <style:paragraph-properties style:writing-mode="lr-tb"/>
    </style:style>
    <style:style style:name="gr35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394cm" loext:decorative="false"/>
      <style:paragraph-properties style:writing-mode="lr-tb"/>
    </style:style>
    <style:style style:name="gr35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402cm" loext:decorative="false"/>
      <style:paragraph-properties style:writing-mode="lr-tb"/>
    </style:style>
    <style:style style:name="gr35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43cm" loext:decorative="false"/>
      <style:paragraph-properties style:writing-mode="lr-tb"/>
    </style:style>
    <style:style style:name="gr354" style:family="graphic" style:parent-style-name="standard">
      <style:graphic-properties draw:stroke="none" svg:stroke-color="#000000" draw:fill="none" draw:fill-color="#ffffff" draw:textarea-horizontal-align="left" draw:auto-grow-height="true" draw:auto-grow-width="true" draw:fit-to-size="false" style:shrink-to-fit="true" fo:min-height="0.55cm" fo:min-width="1.437cm" loext:decorative="false"/>
      <style:paragraph-properties style:writing-mode="lr-tb"/>
    </style:style>
    <style:style style:name="gr35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414cm" loext:decorative="false"/>
      <style:paragraph-properties style:writing-mode="lr-tb"/>
    </style:style>
    <style:style style:name="gr356" style:family="graphic" style:parent-style-name="objectwithoutfill">
      <style:graphic-properties draw:marker-end="Linienspitzen_20_66" draw:marker-end-width="0.3cm" draw:fill="none" draw:textarea-vertical-align="middle" loext:decorative="false"/>
    </style:style>
    <style:style style:name="gr357" style:family="graphic" style:parent-style-name="objectwithoutfill">
      <style:graphic-properties draw:marker-end="Linienspitzen_20_67" draw:marker-end-width="0.3cm" draw:fill="none" draw:textarea-vertical-align="middle" loext:decorative="false"/>
    </style:style>
    <style:style style:name="gr358" style:family="graphic" style:parent-style-name="objectwithoutfill">
      <style:graphic-properties draw:marker-end="Linienspitzen_20_68" draw:marker-end-width="0.3cm" draw:fill="none" draw:textarea-vertical-align="middle" loext:decorative="false"/>
    </style:style>
    <style:style style:name="gr359" style:family="graphic" style:parent-style-name="objectwithoutfill">
      <style:graphic-properties draw:marker-end="Linienspitzen_20_69" draw:marker-end-width="0.3cm" draw:fill="none" draw:textarea-vertical-align="middle" loext:decorative="false"/>
    </style:style>
    <style:style style:name="gr360" style:family="graphic" style:parent-style-name="objectwithoutfill">
      <style:graphic-properties draw:marker-end="Linienspitzen_20_70" draw:marker-end-width="0.3cm" draw:fill="none" draw:textarea-vertical-align="middle" loext:decorative="false"/>
    </style:style>
    <style:style style:name="gr361" style:family="graphic" style:parent-style-name="objectwithoutfill">
      <style:graphic-properties draw:marker-end="Linienspitzen_20_71" draw:marker-end-width="0.3cm" draw:fill="none" draw:textarea-vertical-align="middle" loext:decorative="false"/>
    </style:style>
    <style:style style:name="gr362" style:family="graphic" style:parent-style-name="objectwithoutfill">
      <style:graphic-properties draw:marker-end="Linienspitzen_20_72" draw:marker-end-width="0.3cm" draw:fill="none" draw:textarea-vertical-align="middle" loext:decorative="false"/>
    </style:style>
    <style:style style:name="gr363" style:family="graphic" style:parent-style-name="objectwithoutfill">
      <style:graphic-properties draw:marker-end="Linienspitzen_20_73" draw:marker-end-width="0.3cm" draw:fill="none" draw:textarea-vertical-align="middle" loext:decorative="false"/>
    </style:style>
    <style:style style:name="gr364" style:family="graphic" style:parent-style-name="standard">
      <style:graphic-properties svg:stroke-color="#000000" draw:fill-color="#ffffff" draw:textarea-horizontal-align="justify" draw:textarea-vertical-align="middle" draw:auto-grow-height="false" fo:min-height="0cm" fo:min-width="0cm" style:protect="size" loext:decorative="false"/>
    </style:style>
    <style:style style:name="gr365" style:family="graphic" style:parent-style-name="objectwithoutfill">
      <style:graphic-properties draw:marker-end="Linienspitzen_20_74" draw:marker-end-width="0.3cm" draw:fill="none" draw:textarea-vertical-align="middle" loext:decorative="false"/>
    </style:style>
    <style:style style:name="gr366" style:family="graphic" style:parent-style-name="objectwithoutfill">
      <style:graphic-properties svg:stroke-color="#ff0000" draw:marker-end="Linienspitzen_20_75" draw:marker-end-width="0.3cm" draw:fill="none" draw:textarea-vertical-align="middle" loext:decorative="false"/>
    </style:style>
    <style:style style:name="gr367" style:family="graphic" style:parent-style-name="objectwithoutfill">
      <style:graphic-properties svg:stroke-color="#ff0000" draw:marker-end="Linienspitzen_20_76" draw:marker-end-width="0.3cm" draw:fill="none" draw:textarea-vertical-align="middle" loext:decorative="false"/>
    </style:style>
    <style:style style:name="gr368" style:family="graphic" style:parent-style-name="standard">
      <style:graphic-properties svg:stroke-color="#000000" draw:fill-color="#ffff00" draw:textarea-horizontal-align="left" draw:textarea-vertical-align="bottom" draw:auto-grow-height="false" fo:min-height="1.25cm" fo:min-width="1.5cm" style:writing-mode="lr-tb" loext:decorative="false"/>
      <style:paragraph-properties style:writing-mode="lr-tb"/>
    </style:style>
    <style:style style:name="gr36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396cm" loext:decorative="false"/>
      <style:paragraph-properties style:writing-mode="lr-tb"/>
    </style:style>
    <style:style style:name="gr37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82cm" loext:decorative="false"/>
      <style:paragraph-properties style:writing-mode="lr-tb"/>
    </style:style>
    <style:style style:name="gr37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205cm" loext:decorative="false"/>
      <style:paragraph-properties style:writing-mode="lr-tb"/>
    </style:style>
    <style:style style:name="gr372" style:family="graphic" style:parent-style-name="standard">
      <style:graphic-properties svg:stroke-color="#000000" draw:fill-color="#ffff00" draw:textarea-horizontal-align="left" draw:textarea-vertical-align="bottom" draw:auto-grow-height="false" fo:min-height="3.25cm" fo:min-width="2.5cm" style:writing-mode="lr-tb" loext:decorative="false"/>
      <style:paragraph-properties style:writing-mode="lr-tb"/>
    </style:style>
    <style:style style:name="gr37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259cm" loext:decorative="false"/>
      <style:paragraph-properties style:writing-mode="lr-tb"/>
    </style:style>
    <style:style style:name="gr37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07cm" loext:decorative="false"/>
      <style:paragraph-properties style:writing-mode="lr-tb"/>
    </style:style>
    <style:style style:name="gr37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17cm" loext:decorative="false"/>
      <style:paragraph-properties style:writing-mode="lr-tb"/>
    </style:style>
    <style:style style:name="gr376" style:family="graphic" style:parent-style-name="standard">
      <style:graphic-properties svg:stroke-color="#000000" draw:fill-color="#ffff00" draw:textarea-horizontal-align="left" draw:textarea-vertical-align="bottom" draw:auto-grow-height="false" fo:min-height="4.75cm" fo:min-width="5.5cm" style:writing-mode="lr-tb" loext:decorative="false"/>
      <style:paragraph-properties style:writing-mode="lr-tb"/>
    </style:style>
    <style:style style:name="gr37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64cm" loext:decorative="false"/>
      <style:paragraph-properties style:writing-mode="lr-tb"/>
    </style:style>
    <style:style style:name="gr37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877cm" loext:decorative="false"/>
      <style:paragraph-properties style:writing-mode="lr-tb"/>
    </style:style>
    <style:style style:name="gr37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54cm" loext:decorative="false"/>
      <style:paragraph-properties style:writing-mode="lr-tb"/>
    </style:style>
    <style:style style:name="gr38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76cm" loext:decorative="false"/>
      <style:paragraph-properties style:writing-mode="lr-tb"/>
    </style:style>
    <style:style style:name="gr38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04cm" loext:decorative="false"/>
      <style:paragraph-properties style:writing-mode="lr-tb"/>
    </style:style>
    <style:style style:name="gr382" style:family="graphic" style:parent-style-name="standard">
      <style:graphic-properties svg:stroke-color="#000000" draw:fill-color="#ffff00" draw:textarea-horizontal-align="left" draw:textarea-vertical-align="bottom" draw:auto-grow-height="false" fo:min-height="2.25cm" fo:min-width="1.5cm" style:writing-mode="lr-tb" loext:decorative="false"/>
      <style:paragraph-properties style:writing-mode="lr-tb"/>
    </style:style>
    <style:style style:name="gr38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7cm" loext:decorative="false"/>
      <style:paragraph-properties style:writing-mode="lr-tb"/>
    </style:style>
    <style:style style:name="gr38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577cm" loext:decorative="false"/>
      <style:paragraph-properties style:writing-mode="lr-tb"/>
    </style:style>
    <style:style style:name="gr38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42cm" loext:decorative="false"/>
      <style:paragraph-properties style:writing-mode="lr-tb"/>
    </style:style>
    <style:style style:name="gr386"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387" style:family="graphic" style:parent-style-name="standard">
      <style:graphic-properties svg:stroke-color="#000000" draw:fill-color="#dddddd" draw:textarea-horizontal-align="justify" draw:textarea-vertical-align="middle" draw:auto-grow-height="false" fo:min-height="0.25cm" fo:min-width="4.5cm" style:writing-mode="lr-tb" loext:decorative="false"/>
      <style:paragraph-properties style:writing-mode="lr-tb"/>
    </style:style>
    <style:style style:name="gr388" style:family="graphic" style:parent-style-name="standard">
      <style:graphic-properties svg:stroke-color="#000000" draw:fill-color="#dddddd" draw:textarea-horizontal-align="justify" draw:textarea-vertical-align="middle" draw:auto-grow-height="false" fo:min-height="0.25cm" fo:min-width="0.5cm" style:writing-mode="lr-tb" loext:decorative="false"/>
      <style:paragraph-properties style:writing-mode="lr-tb"/>
    </style:style>
    <style:style style:name="gr389" style:family="graphic" style:parent-style-name="standard">
      <style:graphic-properties draw:stroke="none" draw:fill="none" fo:min-height="0.32cm" loext:decorative="false"/>
      <style:paragraph-properties style:writing-mode="lr-tb"/>
    </style:style>
    <style:style style:name="gr390"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391"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392"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393" style:family="graphic" style:parent-style-name="standard" style:list-style-name="L1">
      <style:graphic-properties svg:stroke-color="#000000" draw:fill-color="#ffff00" draw:textarea-horizontal-align="justify" draw:textarea-vertical-align="middle" draw:auto-grow-height="false" fo:min-height="0.25cm" fo:min-width="1.5cm" style:writing-mode="lr-tb" loext:decorative="false"/>
      <style:paragraph-properties style:writing-mode="lr-tb"/>
    </style:style>
    <style:style style:name="gr394" style:family="graphic" style:parent-style-name="standard">
      <style:graphic-properties svg:stroke-color="#000000" draw:fill-color="#ffff00" draw:textarea-horizontal-align="justify" draw:textarea-vertical-align="middle" draw:auto-grow-height="false" fo:min-height="0.25cm" fo:min-width="4.5cm" style:writing-mode="lr-tb" loext:decorative="false"/>
      <style:paragraph-properties style:writing-mode="lr-tb"/>
    </style:style>
    <style:style style:name="gr395" style:family="graphic" style:parent-style-name="standard">
      <style:graphic-properties svg:stroke-color="#000000" draw:fill-color="#ffff00" draw:textarea-horizontal-align="justify" draw:textarea-vertical-align="middle" draw:auto-grow-height="false" fo:min-height="0.25cm" fo:min-width="0.5cm" style:writing-mode="lr-tb" loext:decorative="false"/>
      <style:paragraph-properties style:writing-mode="lr-tb"/>
    </style:style>
    <style:style style:name="gr396"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397"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398"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399"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00"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01"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02" style:family="graphic" style:parent-style-name="standard">
      <style:graphic-properties svg:stroke-color="#000000" draw:fill-color="#ffffff" draw:textarea-horizontal-align="justify" draw:textarea-vertical-align="middle" draw:auto-grow-height="false" fo:min-height="0.458cm" fo:min-width="0.208cm" style:writing-mode="lr-tb" loext:decorative="false"/>
      <style:paragraph-properties style:writing-mode="lr-tb"/>
    </style:style>
    <style:style style:name="gr40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40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0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0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0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40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0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1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1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1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13" style:family="graphic" style:parent-style-name="objectwithoutfill">
      <style:graphic-properties draw:marker-start="Circle" draw:marker-end="Arrow" draw:marker-end-width="0.3cm" draw:fill="none" draw:textarea-vertical-align="middle" loext:decorative="false"/>
    </style:style>
    <style:style style:name="gr414" style:family="graphic" style:parent-style-name="objectwithoutfill">
      <style:graphic-properties draw:marker-start="Circle" draw:fill="none" draw:textarea-vertical-align="middle" loext:decorative="false"/>
    </style:style>
    <style:style style:name="gr415" style:family="graphic" style:parent-style-name="standard">
      <style:graphic-properties svg:stroke-color="#000000" draw:fill-color="#ffffff" draw:textarea-horizontal-align="justify" draw:textarea-vertical-align="middle" draw:auto-grow-height="false" fo:min-height="0.75cm" fo:min-width="1.5cm" style:writing-mode="lr-tb" loext:decorative="false"/>
      <style:paragraph-properties style:writing-mode="lr-tb"/>
    </style:style>
    <style:style style:name="gr416"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17"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18"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19"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20" style:family="graphic" style:parent-style-name="standard" style:list-style-name="L1">
      <style:graphic-properties svg:stroke-color="#000000" draw:fill-color="#ffff00" draw:textarea-horizontal-align="justify" draw:textarea-vertical-align="middle" draw:auto-grow-height="false" fo:min-height="0.25cm" fo:min-width="1.5cm" style:writing-mode="lr-tb" loext:decorative="false"/>
      <style:paragraph-properties style:writing-mode="lr-tb"/>
    </style:style>
    <style:style style:name="gr421"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22"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23"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24"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25"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26"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2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42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2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3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31"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32"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33"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34"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35" style:family="graphic" style:parent-style-name="standard" style:list-style-name="L1">
      <style:graphic-properties svg:stroke-color="#000000" draw:fill-color="#ffff00" draw:textarea-horizontal-align="justify" draw:textarea-vertical-align="middle" draw:auto-grow-height="false" fo:min-height="0.25cm" fo:min-width="1.5cm" style:writing-mode="lr-tb" loext:decorative="false"/>
      <style:paragraph-properties style:writing-mode="lr-tb"/>
    </style:style>
    <style:style style:name="gr436"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37"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38"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39"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40"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41"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4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44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4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4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46"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47"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48"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49"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50" style:family="graphic" style:parent-style-name="standard" style:list-style-name="L1">
      <style:graphic-properties svg:stroke-color="#000000" draw:fill-color="#ffff00" draw:textarea-horizontal-align="justify" draw:textarea-vertical-align="middle" draw:auto-grow-height="false" fo:min-height="0.25cm" fo:min-width="1.5cm" style:writing-mode="lr-tb" loext:decorative="false"/>
      <style:paragraph-properties style:writing-mode="lr-tb"/>
    </style:style>
    <style:style style:name="gr451"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52"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53"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54"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55"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56"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5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45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5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6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61" style:family="graphic" style:parent-style-name="Standard_5f_1">
      <style:graphic-properties svg:stroke-color="#000000" draw:fill-color="#000000" draw:textarea-horizontal-align="justify" draw:textarea-vertical-align="middle" draw:auto-grow-height="false" fo:min-height="0cm" fo:min-width="0cm" style:protect="size" loext:decorative="false"/>
    </style:style>
    <style:style style:name="gr462" style:family="graphic" style:parent-style-name="standard">
      <style:graphic-properties draw:stroke="none" svg:stroke-color="#000000" draw:fill="none" draw:fill-color="#ffffff" draw:textarea-horizontal-align="left" draw:auto-grow-height="true" draw:auto-grow-width="true" fo:min-height="0.319cm" fo:min-width="0.159cm" loext:decorative="false"/>
      <style:paragraph-properties style:writing-mode="lr-tb"/>
    </style:style>
    <style:style style:name="gr463" style:family="graphic" style:parent-style-name="standard">
      <style:graphic-properties draw:stroke="none" svg:stroke-color="#000000" draw:fill="none" draw:fill-color="#ffffff" draw:textarea-horizontal-align="left" draw:auto-grow-height="true" draw:auto-grow-width="true" fo:min-height="0.319cm" fo:min-width="0.963cm" loext:decorative="false"/>
      <style:paragraph-properties style:writing-mode="lr-tb"/>
    </style:style>
    <style:style style:name="gr464" style:family="graphic" style:parent-style-name="standard">
      <style:graphic-properties draw:stroke="none" svg:stroke-color="#000000" draw:fill="none" draw:fill-color="#ffffff" draw:textarea-horizontal-align="left" draw:auto-grow-height="true" draw:auto-grow-width="true" fo:min-height="0.319cm" fo:min-width="0.802cm" loext:decorative="false"/>
      <style:paragraph-properties style:writing-mode="lr-tb"/>
    </style:style>
    <style:style style:name="gr465" style:family="graphic" style:parent-style-name="standard">
      <style:graphic-properties svg:stroke-color="#000000" draw:fill-color="#ffffff" draw:textarea-horizontal-align="justify" draw:textarea-vertical-align="middle" draw:auto-grow-height="false" fo:min-height="0.25cm" fo:min-width="2.5cm" style:writing-mode="lr-tb" loext:decorative="false"/>
      <style:paragraph-properties style:writing-mode="lr-tb"/>
    </style:style>
    <style:style style:name="gr466"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18.75cm" fo:min-width="39.5cm" loext:decorative="false"/>
    </style:style>
    <style:style style:name="gr467" style:family="graphic" style:parent-style-name="standard">
      <style:graphic-properties draw:stroke="none" svg:stroke-color="#000000" draw:fill="none" draw:fill-color="#ffffff" draw:textarea-horizontal-align="left" draw:auto-grow-height="true" draw:auto-grow-width="true" fo:min-height="0.319cm" fo:min-width="1.026cm" loext:decorative="false"/>
      <style:paragraph-properties style:writing-mode="lr-tb"/>
    </style:style>
    <style:style style:name="gr468"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69"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70"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71"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72" style:family="graphic" style:parent-style-name="standard" style:list-style-name="L1">
      <style:graphic-properties svg:stroke-color="#000000" draw:fill-color="#ffff00" draw:textarea-horizontal-align="justify" draw:textarea-vertical-align="middle" draw:auto-grow-height="false" fo:min-height="0.25cm" fo:min-width="1.5cm" style:writing-mode="lr-tb" loext:decorative="false"/>
      <style:paragraph-properties style:writing-mode="lr-tb"/>
    </style:style>
    <style:style style:name="gr473"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74"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75"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76"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77"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78"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7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48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8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8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8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48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8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8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8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8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89"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90"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91"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92"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93" style:family="graphic" style:parent-style-name="standard" style:list-style-name="L1">
      <style:graphic-properties svg:stroke-color="#000000" draw:fill-color="#ffff00" draw:textarea-horizontal-align="justify" draw:textarea-vertical-align="middle" draw:auto-grow-height="false" fo:min-height="0.25cm" fo:min-width="1.5cm" style:writing-mode="lr-tb" loext:decorative="false"/>
      <style:paragraph-properties style:writing-mode="lr-tb"/>
    </style:style>
    <style:style style:name="gr494"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95"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96"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97"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98"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99"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0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50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0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0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04"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05"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06"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07"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08" style:family="graphic" style:parent-style-name="standard" style:list-style-name="L1">
      <style:graphic-properties svg:stroke-color="#000000" draw:fill-color="#ffff00" draw:textarea-horizontal-align="justify" draw:textarea-vertical-align="middle" draw:auto-grow-height="false" fo:min-height="0.25cm" fo:min-width="1.5cm" style:writing-mode="lr-tb" loext:decorative="false"/>
      <style:paragraph-properties style:writing-mode="lr-tb"/>
    </style:style>
    <style:style style:name="gr509"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10"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11"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12"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13"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14"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1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51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1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1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19"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20"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21"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22"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23" style:family="graphic" style:parent-style-name="standard" style:list-style-name="L1">
      <style:graphic-properties svg:stroke-color="#000000" draw:fill-color="#ffff00" draw:textarea-horizontal-align="justify" draw:textarea-vertical-align="middle" draw:auto-grow-height="false" fo:min-height="0.25cm" fo:min-width="1.5cm" style:writing-mode="lr-tb" loext:decorative="false"/>
      <style:paragraph-properties style:writing-mode="lr-tb"/>
    </style:style>
    <style:style style:name="gr524"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25"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26"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27"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28"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29"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3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53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3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3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34" style:family="graphic" style:parent-style-name="standard">
      <style:graphic-properties svg:stroke-color="#000000" draw:fill-color="#ffff00" draw:textarea-horizontal-align="justify" draw:textarea-vertical-align="middle" draw:auto-grow-height="false" fo:min-height="0.75cm" fo:min-width="3cm" style:writing-mode="lr-tb" loext:decorative="false"/>
      <style:paragraph-properties style:writing-mode="lr-tb"/>
    </style:style>
    <style:style style:name="gr53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53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3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3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3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4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065cm" loext:decorative="false"/>
      <style:paragraph-properties style:writing-mode="lr-tb"/>
    </style:style>
    <style:style style:name="gr54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46cm" loext:decorative="false"/>
      <style:paragraph-properties style:writing-mode="lr-tb"/>
    </style:style>
    <style:style style:name="gr54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543cm" loext:decorative="false"/>
      <style:paragraph-properties style:writing-mode="lr-tb"/>
    </style:style>
    <style:style style:name="gr54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5cm" loext:decorative="false"/>
      <style:paragraph-properties style:writing-mode="lr-tb"/>
    </style:style>
    <style:style style:name="gr544" style:family="graphic" style:parent-style-name="Standard_5f_1">
      <style:graphic-properties svg:stroke-color="#000000" draw:fill="solid" draw:fill-color="#ff0000" draw:textarea-horizontal-align="justify" draw:textarea-vertical-align="middle" draw:auto-grow-height="false" fo:min-height="0cm" fo:min-width="0cm" style:protect="size" loext:decorative="false"/>
    </style:style>
    <style:style style:name="gr54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386cm" loext:decorative="false"/>
      <style:paragraph-properties style:writing-mode="lr-tb"/>
    </style:style>
    <style:style style:name="gr54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51cm" loext:decorative="false"/>
      <style:paragraph-properties style:writing-mode="lr-tb"/>
    </style:style>
    <style:style style:name="gr547" style:family="graphic" style:parent-style-name="objectwithoutfill">
      <style:graphic-properties draw:fill="none" draw:fill-color="#ffffff" draw:textarea-vertical-align="middle" loext:decorative="false"/>
    </style:style>
    <style:style style:name="gr548"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1.75cm" fo:min-width="7.5cm" loext:decorative="false"/>
    </style:style>
    <style:style style:name="gr549" style:family="graphic" style:parent-style-name="standard">
      <style:graphic-properties draw:stroke="none" svg:stroke-color="#000000" draw:fill="none" draw:fill-color="#ffffff" draw:textarea-horizontal-align="left" draw:auto-grow-height="true" draw:auto-grow-width="true" fo:min-height="0.319cm" fo:min-width="1.357cm" loext:decorative="false"/>
      <style:paragraph-properties style:writing-mode="lr-tb"/>
    </style:style>
    <style:style style:name="gr550" style:family="graphic" style:parent-style-name="standard">
      <style:graphic-properties svg:stroke-color="#000000" draw:fill-color="#ffffff" draw:textarea-horizontal-align="center" draw:textarea-vertical-align="middle" draw:auto-grow-height="false" fo:min-height="0.75cm" fo:min-width="0cm" style:writing-mode="lr-tb" loext:decorative="false"/>
      <style:paragraph-properties style:writing-mode="lr-tb"/>
    </style:style>
    <style:style style:name="gr551"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1.75cm" fo:min-width="3.5cm" loext:decorative="false"/>
    </style:style>
    <style:style style:name="gr552" style:family="graphic" style:parent-style-name="standard">
      <style:graphic-properties draw:stroke="none" svg:stroke-color="#000000" draw:fill="none" draw:fill-color="#ffffff" draw:textarea-horizontal-align="left" draw:auto-grow-height="true" draw:auto-grow-width="true" fo:min-height="0.319cm" fo:min-width="1.276cm" loext:decorative="false"/>
      <style:paragraph-properties style:writing-mode="lr-tb"/>
    </style:style>
    <style:style style:name="gr55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455cm" loext:decorative="false"/>
      <style:paragraph-properties style:writing-mode="lr-tb"/>
    </style:style>
    <style:style style:name="gr554" style:family="graphic" style:parent-style-name="standard">
      <style:graphic-properties svg:stroke-color="#000000" draw:fill-color="#00a933" draw:textarea-horizontal-align="center" draw:textarea-vertical-align="middle" draw:auto-grow-height="false" fo:min-height="0.75cm" fo:min-width="0cm" style:writing-mode="lr-tb" loext:decorative="false"/>
      <style:paragraph-properties style:writing-mode="lr-tb"/>
    </style:style>
    <style:style style:name="gr55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159cm" loext:decorative="false"/>
      <style:paragraph-properties style:writing-mode="lr-tb"/>
    </style:style>
    <style:style style:name="gr55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114cm" loext:decorative="false"/>
      <style:paragraph-properties style:writing-mode="lr-tb"/>
    </style:style>
    <style:style style:name="gr55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814cm" loext:decorative="false"/>
      <style:paragraph-properties style:writing-mode="lr-tb"/>
    </style:style>
    <style:style style:name="gr55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2cm" loext:decorative="false"/>
      <style:paragraph-properties style:writing-mode="lr-tb"/>
    </style:style>
    <style:style style:name="gr55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35cm" loext:decorative="false"/>
      <style:paragraph-properties style:writing-mode="lr-tb"/>
    </style:style>
    <style:style style:name="gr56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88cm" loext:decorative="false"/>
      <style:paragraph-properties style:writing-mode="lr-tb"/>
    </style:style>
    <style:style style:name="gr56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04cm" loext:decorative="false"/>
      <style:paragraph-properties style:writing-mode="lr-tb"/>
    </style:style>
    <style:style style:name="gr56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4cm" loext:decorative="false"/>
      <style:paragraph-properties style:writing-mode="lr-tb"/>
    </style:style>
    <style:style style:name="gr56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596cm" loext:decorative="false"/>
      <style:paragraph-properties style:writing-mode="lr-tb"/>
    </style:style>
    <style:style style:name="gr56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629cm" loext:decorative="false"/>
      <style:paragraph-properties style:writing-mode="lr-tb"/>
    </style:style>
    <style:style style:name="gr565" style:family="graphic" style:parent-style-name="standard">
      <style:graphic-properties draw:stroke="none" svg:stroke-color="#000000" draw:fill="none" draw:fill-color="#ffffff" draw:textarea-horizontal-align="left" draw:auto-grow-height="true" draw:auto-grow-width="true" fo:min-height="0.319cm" fo:min-width="1.594cm" loext:decorative="false"/>
      <style:paragraph-properties style:writing-mode="lr-tb"/>
    </style:style>
    <style:style style:name="gr566"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6.25cm" fo:min-width="11.5cm" loext:decorative="false"/>
    </style:style>
    <style:style style:name="gr56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23cm" loext:decorative="false"/>
      <style:paragraph-properties style:writing-mode="lr-tb"/>
    </style:style>
    <style:style style:name="gr56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56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7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7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7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7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91cm" loext:decorative="false"/>
      <style:paragraph-properties style:writing-mode="lr-tb"/>
    </style:style>
    <style:style style:name="gr57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656cm" loext:decorative="false"/>
      <style:paragraph-properties style:writing-mode="lr-tb"/>
    </style:style>
    <style:style style:name="gr57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813cm" loext:decorative="false"/>
      <style:paragraph-properties style:writing-mode="lr-tb"/>
    </style:style>
    <style:style style:name="gr57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18cm" loext:decorative="false"/>
      <style:paragraph-properties style:writing-mode="lr-tb"/>
    </style:style>
    <style:style style:name="gr57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57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7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8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8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8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4.265cm" loext:decorative="false"/>
      <style:paragraph-properties style:writing-mode="lr-tb"/>
    </style:style>
    <style:style style:name="gr58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4.011cm" loext:decorative="false"/>
      <style:paragraph-properties style:writing-mode="lr-tb"/>
    </style:style>
    <style:style style:name="gr58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4.172cm" loext:decorative="false"/>
      <style:paragraph-properties style:writing-mode="lr-tb"/>
    </style:style>
    <style:style style:name="gr585" style:family="graphic" style:parent-style-name="standard">
      <style:graphic-properties draw:stroke="none" svg:stroke-color="#000000" draw:fill="none" draw:fill-color="#ffffff" draw:textarea-horizontal-align="left" draw:auto-grow-height="true" draw:auto-grow-width="true" fo:min-height="0.319cm" fo:min-width="1.822cm" loext:decorative="false"/>
      <style:paragraph-properties style:writing-mode="lr-tb"/>
    </style:style>
    <style:style style:name="gr586"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3.75cm" fo:min-width="9.5cm" loext:decorative="false"/>
    </style:style>
    <style:style style:name="gr587" style:family="graphic" style:parent-style-name="standard" style:list-style-name="L1">
      <style:graphic-properties draw:stroke="solid" draw:stroke-dash="Dashed_20__28_var_29__20_2"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fo:padding-top="0.125cm" fo:padding-bottom="0.125cm" fo:padding-left="0.25cm" fo:padding-right="0.25cm" fo:wrap-option="wrap" draw:shadow="hidden" draw:shadow-offset-x="0.05cm" draw:shadow-offset-y="0.05cm" draw:shadow-color="#3465a4" loext:decorative="false"/>
    </style:style>
    <style:style style:name="gr588" style:family="graphic" style:parent-style-name="standard" style:list-style-name="L1">
      <style:graphic-properties draw:stroke="solid" draw:stroke-dash="Dashed_20__28_var_29__20_2"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fo:padding-top="0.125cm" fo:padding-bottom="0.125cm" fo:padding-left="0.25cm" fo:padding-right="0.25cm" fo:wrap-option="wrap" draw:shadow="hidden" draw:shadow-offset-x="0.05cm" draw:shadow-offset-y="0.05cm" draw:shadow-color="#3465a4" loext:decorative="false"/>
    </style:style>
    <style:style style:name="gr589" style:family="graphic" style:parent-style-name="standard">
      <style:graphic-properties draw:stroke="none" svg:stroke-color="#000000" draw:fill="none" draw:fill-color="#ffffff" draw:textarea-horizontal-align="left" draw:auto-grow-height="true" draw:auto-grow-width="true" fo:min-height="0.319cm" fo:min-width="1.623cm" loext:decorative="false"/>
      <style:paragraph-properties style:writing-mode="lr-tb"/>
    </style:style>
    <style:style style:name="gr590" style:family="graphic" style:parent-style-name="standard" style:list-style-name="L1">
      <style:graphic-properties draw:stroke="solid" draw:stroke-dash="Dashed_20__28_var_29__20_2"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draw:textarea-vertical-align="middle" fo:padding-top="0.125cm" fo:padding-bottom="0.125cm" fo:padding-left="0.25cm" fo:padding-right="0.25cm" fo:wrap-option="wrap" draw:shadow="hidden" draw:shadow-offset-x="0.05cm" draw:shadow-offset-y="0.05cm" draw:shadow-color="#3465a4" loext:decorative="false"/>
    </style:style>
    <style:style style:name="gr591" style:family="graphic" style:parent-style-name="standard" style:list-style-name="L1">
      <style:graphic-properties draw:stroke="solid" draw:stroke-dash="Dashed_20__28_var_29__20_2"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draw:textarea-vertical-align="middle" fo:padding-top="0.125cm" fo:padding-bottom="0.125cm" fo:padding-left="0.25cm" fo:padding-right="0.25cm" fo:wrap-option="wrap" draw:shadow="hidden" draw:shadow-offset-x="0.05cm" draw:shadow-offset-y="0.05cm" draw:shadow-color="#3465a4" loext:decorative="false"/>
    </style:style>
    <style:style style:name="gr592" style:family="graphic" style:parent-style-name="standard">
      <style:graphic-properties draw:stroke="none" svg:stroke-color="#000000" draw:fill="none" draw:fill-color="#ffffff" draw:textarea-horizontal-align="left" draw:auto-grow-height="true" draw:auto-grow-width="true" fo:min-height="0.319cm" fo:min-width="1.293cm" loext:decorative="false"/>
      <style:paragraph-properties style:writing-mode="lr-tb"/>
    </style:style>
    <style:style style:name="gr593" style:family="graphic" style:parent-style-name="standard" style:list-style-name="L1">
      <style:graphic-properties draw:stroke="solid" draw:stroke-dash="Dashed_20__28_var_29__20_2"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draw:textarea-vertical-align="middle" fo:padding-top="0.125cm" fo:padding-bottom="0.125cm" fo:padding-left="0.25cm" fo:padding-right="0.25cm" fo:wrap-option="wrap" draw:shadow="hidden" draw:shadow-offset-x="0.05cm" draw:shadow-offset-y="0.05cm" draw:shadow-color="#3465a4" loext:decorative="false"/>
    </style:style>
    <style:style style:name="gr594" style:family="graphic" style:parent-style-name="standard">
      <style:graphic-properties draw:stroke="none" svg:stroke-color="#000000" draw:fill="none" draw:fill-color="#ffffff" draw:textarea-horizontal-align="left" draw:auto-grow-height="true" draw:auto-grow-width="false" fo:min-height="0.319cm" fo:min-width="1.653cm" loext:decorative="false"/>
      <style:paragraph-properties style:writing-mode="lr-tb"/>
    </style:style>
    <style:style style:name="gr595" style:family="graphic" style:parent-style-name="standard">
      <style:graphic-properties draw:stroke="none" svg:stroke-color="#000000" draw:fill="none" draw:fill-color="#ffffff" draw:textarea-horizontal-align="left" draw:auto-grow-height="true" draw:auto-grow-width="false" fo:min-height="0.319cm" fo:min-width="0cm" loext:decorative="false"/>
      <style:paragraph-properties style:writing-mode="lr-tb"/>
    </style:style>
    <style:style style:name="gr596" style:family="graphic" style:parent-style-name="standard">
      <style:graphic-properties draw:stroke="none" draw:fill="none" fo:min-height="1.273cm" loext:decorative="false"/>
      <style:paragraph-properties style:writing-mode="lr-tb"/>
    </style:style>
    <style:style style:name="gr597" style:family="graphic" style:parent-style-name="standard">
      <style:graphic-properties draw:stroke="none" svg:stroke-color="#000000" draw:fill="none" draw:fill-color="#ffffff" draw:textarea-horizontal-align="left" draw:auto-grow-height="true" draw:auto-grow-width="true" fo:min-height="0.319cm" fo:min-width="2.995cm" loext:decorative="false"/>
      <style:paragraph-properties style:writing-mode="lr-tb"/>
    </style:style>
    <style:style style:name="gr598"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5.75cm" fo:min-width="14.5cm" loext:decorative="false"/>
    </style:style>
    <style:style style:name="gr59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60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0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0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0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60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0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0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0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60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0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1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1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831cm" loext:decorative="false"/>
      <style:paragraph-properties style:writing-mode="lr-tb"/>
    </style:style>
    <style:style style:name="gr61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61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1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1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1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47cm" loext:decorative="false"/>
      <style:paragraph-properties style:writing-mode="lr-tb"/>
    </style:style>
    <style:style style:name="gr61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01cm" loext:decorative="false"/>
      <style:paragraph-properties style:writing-mode="lr-tb"/>
    </style:style>
    <style:style style:name="gr618"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3.25cm" fo:min-width="13.5cm" loext:decorative="false"/>
    </style:style>
    <style:style style:name="gr619" style:family="graphic" style:parent-style-name="standard">
      <style:graphic-properties draw:stroke="none" svg:stroke-color="#000000" draw:fill="none" draw:fill-color="#ffffff" draw:textarea-horizontal-align="left" draw:auto-grow-height="true" draw:auto-grow-width="true" fo:min-height="0.319cm" fo:min-width="1.704cm" loext:decorative="false"/>
      <style:paragraph-properties style:writing-mode="lr-tb"/>
    </style:style>
    <style:style style:name="gr620" style:family="graphic" style:parent-style-name="standard">
      <style:graphic-properties draw:stroke="none" svg:stroke-color="#000000" draw:fill="none" draw:fill-color="#ffffff" draw:textarea-horizontal-align="left" draw:auto-grow-height="true" draw:auto-grow-width="true" fo:min-height="0.319cm" fo:min-width="0.679cm" loext:decorative="false"/>
      <style:paragraph-properties style:writing-mode="lr-tb"/>
    </style:style>
    <style:style style:name="gr621" style:family="graphic" style:parent-style-name="standard">
      <style:graphic-properties draw:stroke="none" svg:stroke-color="#000000" draw:fill="none" draw:fill-color="#ffffff" draw:textarea-horizontal-align="left" draw:auto-grow-height="true" draw:auto-grow-width="true" fo:min-height="0.319cm" fo:min-width="1.039cm" loext:decorative="false"/>
      <style:paragraph-properties style:writing-mode="lr-tb"/>
    </style:style>
    <style:style style:name="gr62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62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2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2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2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2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8cm" loext:decorative="false"/>
      <style:paragraph-properties style:writing-mode="lr-tb"/>
    </style:style>
    <style:style style:name="gr62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144cm" loext:decorative="false"/>
      <style:paragraph-properties style:writing-mode="lr-tb"/>
    </style:style>
    <style:style style:name="gr629"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2.75cm" fo:min-width="6cm" loext:decorative="false"/>
    </style:style>
    <style:style style:name="gr630" style:family="graphic" style:parent-style-name="standard">
      <style:graphic-properties svg:stroke-color="#000000" draw:fill-color="#ffff00" draw:textarea-horizontal-align="left" draw:textarea-vertical-align="bottom" draw:auto-grow-height="false" fo:min-height="0.75cm" fo:min-width="2.5cm" style:writing-mode="lr-tb" loext:decorative="false"/>
      <style:paragraph-properties style:writing-mode="lr-tb"/>
    </style:style>
    <style:style style:name="gr63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103cm" loext:decorative="false"/>
      <style:paragraph-properties style:writing-mode="lr-tb"/>
    </style:style>
    <style:style style:name="gr63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946cm" loext:decorative="false"/>
      <style:paragraph-properties style:writing-mode="lr-tb"/>
    </style:style>
    <style:style style:name="gr63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403cm" loext:decorative="false"/>
      <style:paragraph-properties style:writing-mode="lr-tb"/>
    </style:style>
    <style:style style:name="gr63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247cm" loext:decorative="false"/>
      <style:paragraph-properties style:writing-mode="lr-tb"/>
    </style:style>
    <style:style style:name="gr635" style:family="graphic" style:parent-style-name="standard">
      <style:graphic-properties draw:stroke="none" svg:stroke-color="#000000" draw:fill="none" draw:fill-color="#ffffff" draw:textarea-horizontal-align="left" draw:auto-grow-height="true" draw:auto-grow-width="true" fo:min-height="0.319cm" fo:min-width="1.183cm" loext:decorative="false"/>
      <style:paragraph-properties style:writing-mode="lr-tb"/>
    </style:style>
    <style:style style:name="gr636"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2.75cm" fo:min-width="5cm" loext:decorative="false"/>
    </style:style>
    <style:style style:name="gr637" style:family="graphic" style:parent-style-name="standard">
      <style:graphic-properties svg:stroke-color="#000000" draw:fill-color="#ffff00" draw:textarea-horizontal-align="left" draw:textarea-vertical-align="bottom" draw:auto-grow-height="false" fo:min-height="3.75cm" fo:min-width="4.5cm" style:writing-mode="lr-tb" loext:decorative="false"/>
      <style:paragraph-properties style:writing-mode="lr-tb"/>
    </style:style>
    <style:style style:name="gr63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53cm" loext:decorative="false"/>
      <style:paragraph-properties style:writing-mode="lr-tb"/>
    </style:style>
    <style:style style:name="gr63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929cm" loext:decorative="false"/>
      <style:paragraph-properties style:writing-mode="lr-tb"/>
    </style:style>
    <style:style style:name="gr64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899cm" loext:decorative="false"/>
      <style:paragraph-properties style:writing-mode="lr-tb"/>
    </style:style>
    <style:style style:name="gr64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cm" loext:decorative="false"/>
      <style:paragraph-properties style:writing-mode="lr-tb"/>
    </style:style>
    <style:style style:name="gr64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645cm" loext:decorative="false"/>
      <style:paragraph-properties style:writing-mode="lr-tb"/>
    </style:style>
    <style:style style:name="gr64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01cm" loext:decorative="false"/>
      <style:paragraph-properties style:writing-mode="lr-tb"/>
    </style:style>
    <style:style style:name="gr64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836cm" loext:decorative="false"/>
      <style:paragraph-properties style:writing-mode="lr-tb"/>
    </style:style>
    <style:style style:name="gr645" style:family="graphic" style:parent-style-name="standard">
      <style:graphic-properties draw:stroke="none" svg:stroke-color="#000000" draw:fill="none" draw:fill-color="#ffffff" draw:textarea-horizontal-align="left" draw:auto-grow-height="true" draw:auto-grow-width="true" fo:min-height="0.319cm" fo:min-width="2.25cm" loext:decorative="false"/>
      <style:paragraph-properties style:writing-mode="lr-tb"/>
    </style:style>
    <style:style style:name="gr646"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4.75cm" fo:min-width="10.5cm" loext:decorative="false"/>
    </style:style>
    <style:style style:name="gr64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34cm" loext:decorative="false"/>
      <style:paragraph-properties style:writing-mode="lr-tb"/>
    </style:style>
    <style:style style:name="gr64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4.68cm" loext:decorative="false"/>
      <style:paragraph-properties style:writing-mode="lr-tb"/>
    </style:style>
    <style:style style:name="gr64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27cm" loext:decorative="false"/>
      <style:paragraph-properties style:writing-mode="lr-tb"/>
    </style:style>
    <style:style style:name="gr650" style:family="graphic" style:parent-style-name="standard">
      <style:graphic-properties draw:stroke="none" svg:stroke-color="#000000" draw:fill="none" draw:fill-color="#ffffff" draw:textarea-horizontal-align="left" draw:auto-grow-height="true" draw:auto-grow-width="true" fo:min-height="0.319cm" fo:min-width="2.076cm" loext:decorative="false"/>
      <style:paragraph-properties style:writing-mode="lr-tb"/>
    </style:style>
    <style:style style:name="gr651"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3.75cm" fo:min-width="8.5cm" loext:decorative="false"/>
    </style:style>
    <style:style style:name="gr65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99cm" loext:decorative="false"/>
      <style:paragraph-properties style:writing-mode="lr-tb"/>
    </style:style>
    <style:style style:name="gr65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753cm" loext:decorative="false"/>
      <style:paragraph-properties style:writing-mode="lr-tb"/>
    </style:style>
    <style:style style:name="gr654"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4.75cm" fo:min-width="12cm" loext:decorative="false"/>
    </style:style>
    <style:style style:name="gr65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293cm" loext:decorative="false"/>
      <style:paragraph-properties style:writing-mode="lr-tb"/>
    </style:style>
    <style:style style:name="gr656"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3.75cm" fo:min-width="14.5cm" loext:decorative="false"/>
    </style:style>
    <style:style style:name="gr657" style:family="graphic" style:parent-style-name="standard">
      <style:graphic-properties draw:stroke="none" draw:fill="none" fo:min-height="0.637cm" loext:decorative="false"/>
      <style:paragraph-properties style:writing-mode="lr-tb"/>
    </style:style>
    <style:style style:name="gr658" style:family="graphic" style:parent-style-name="standard">
      <style:graphic-properties draw:stroke="none" svg:stroke-color="#000000" draw:fill="none" draw:fill-color="#ffffff" draw:textarea-horizontal-align="left" draw:auto-grow-height="true" draw:auto-grow-width="true" draw:fit-to-size="false" style:shrink-to-fit="true" fo:min-height="0.637cm" fo:min-width="3.634cm" loext:decorative="false"/>
      <style:paragraph-properties style:writing-mode="lr-tb"/>
    </style:style>
    <style:style style:name="gr659" style:family="graphic" style:parent-style-name="standard">
      <style:graphic-properties draw:stroke="none" svg:stroke-color="#000000" draw:fill="none" draw:fill-color="#ffffff" draw:textarea-horizontal-align="left" draw:auto-grow-height="true" draw:auto-grow-width="true" draw:fit-to-size="false" style:shrink-to-fit="true" fo:min-height="1.905cm" fo:min-width="7.622cm" loext:decorative="false"/>
      <style:paragraph-properties style:writing-mode="lr-tb"/>
    </style:style>
    <style:style style:name="gr66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827cm" loext:decorative="false"/>
      <style:paragraph-properties style:writing-mode="lr-tb"/>
    </style:style>
    <style:style style:name="gr661"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6.75cm" fo:min-width="21.5cm" loext:decorative="false"/>
    </style:style>
    <style:style style:name="gr662" style:family="graphic" style:parent-style-name="standard">
      <style:graphic-properties draw:stroke="none" svg:stroke-color="#000000" draw:fill="none" draw:fill-color="#ffffff" draw:textarea-horizontal-align="left" draw:auto-grow-height="true" draw:auto-grow-width="false" fo:min-height="0.319cm" fo:min-width="2.563cm" loext:decorative="false"/>
      <style:paragraph-properties style:writing-mode="lr-tb"/>
    </style:style>
    <style:style style:name="gr663" style:family="graphic" style:parent-style-name="standard">
      <style:graphic-properties draw:stroke="none" svg:stroke-color="#000000" draw:fill="none" draw:fill-color="#ffffff" draw:textarea-horizontal-align="left" draw:auto-grow-height="true" draw:auto-grow-width="true" draw:fit-to-size="false" style:shrink-to-fit="true" fo:min-height="1.905cm" fo:min-width="8.304cm" loext:decorative="false"/>
      <style:paragraph-properties style:writing-mode="lr-tb"/>
    </style:style>
    <style:style style:name="gr664" style:family="graphic" style:parent-style-name="standard">
      <style:graphic-properties draw:stroke="none" svg:stroke-color="#000000" draw:fill="none" draw:fill-color="#ffffff" draw:textarea-horizontal-align="left" draw:auto-grow-height="true" draw:auto-grow-width="true" draw:fit-to-size="false" style:shrink-to-fit="true" fo:min-height="0.477cm" fo:min-width="3.622cm" loext:decorative="false"/>
      <style:paragraph-properties style:writing-mode="lr-tb"/>
    </style:style>
    <style:style style:name="gr665" style:family="graphic" style:parent-style-name="standard">
      <style:graphic-properties draw:stroke="none" svg:stroke-color="#000000" draw:fill="none" draw:fill-color="#ffffff" draw:textarea-horizontal-align="left" draw:auto-grow-height="true" draw:auto-grow-width="true" draw:fit-to-size="false" style:shrink-to-fit="true" fo:min-height="0.637cm" fo:min-width="1.831cm" loext:decorative="false"/>
      <style:paragraph-properties style:writing-mode="lr-tb"/>
    </style:style>
    <style:style style:name="gr666" style:family="graphic" style:parent-style-name="standard">
      <style:graphic-properties draw:stroke="none" svg:stroke-color="#000000" draw:fill="none" draw:fill-color="#ffffff" draw:textarea-horizontal-align="left" draw:auto-grow-height="true" draw:auto-grow-width="true" draw:fit-to-size="false" style:shrink-to-fit="true" fo:min-height="0.477cm" fo:min-width="3.74cm" loext:decorative="false"/>
      <style:paragraph-properties style:writing-mode="lr-tb"/>
    </style:style>
    <style:style style:name="gr667"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5.75cm" fo:min-width="18.5cm" loext:decorative="false"/>
    </style:style>
    <style:style style:name="gr668" style:family="graphic" style:parent-style-name="standard">
      <style:graphic-properties draw:stroke="none" svg:stroke-color="#000000" draw:fill="none" draw:fill-color="#ffffff" draw:textarea-horizontal-align="left" draw:auto-grow-height="true" draw:auto-grow-width="true" draw:fit-to-size="false" style:shrink-to-fit="true" fo:min-height="0.637cm" fo:min-width="2.301cm" loext:decorative="false"/>
      <style:paragraph-properties style:writing-mode="lr-tb"/>
    </style:style>
    <style:style style:name="gr66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692cm" loext:decorative="false"/>
      <style:paragraph-properties style:writing-mode="lr-tb"/>
    </style:style>
    <style:style style:name="gr67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594cm" loext:decorative="false"/>
      <style:paragraph-properties style:writing-mode="lr-tb"/>
    </style:style>
    <style:style style:name="gr671"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3.75cm" fo:min-width="13.5cm" loext:decorative="false"/>
    </style:style>
    <style:style style:name="gr672" style:family="graphic" style:parent-style-name="standard">
      <style:graphic-properties draw:stroke="none" svg:stroke-color="#000000" draw:fill="none" draw:fill-color="#ffffff" draw:textarea-horizontal-align="left" draw:auto-grow-height="true" draw:auto-grow-width="true" draw:fit-to-size="false" style:shrink-to-fit="true" fo:min-height="1.905cm" fo:min-width="7.267cm" loext:decorative="false"/>
      <style:paragraph-properties style:writing-mode="lr-tb"/>
    </style:style>
    <style:style style:name="gr673"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5.75cm" fo:min-width="13.5cm" loext:decorative="false"/>
    </style:style>
    <style:style style:name="gr67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684cm" loext:decorative="false"/>
      <style:paragraph-properties style:writing-mode="lr-tb"/>
    </style:style>
    <style:style style:name="gr67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45cm" loext:decorative="false"/>
      <style:paragraph-properties style:writing-mode="lr-tb"/>
    </style:style>
    <style:style style:name="gr67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446cm" loext:decorative="false"/>
      <style:paragraph-properties style:writing-mode="lr-tb"/>
    </style:style>
    <style:style style:name="gr67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95cm" loext:decorative="false"/>
      <style:paragraph-properties style:writing-mode="lr-tb"/>
    </style:style>
    <style:style style:name="gr678" style:family="graphic" style:parent-style-name="standard">
      <style:graphic-properties svg:stroke-color="#000000" draw:fill-color="#ffff00" draw:textarea-horizontal-align="left" draw:textarea-vertical-align="bottom" draw:auto-grow-height="false" fo:min-height="2.75cm" fo:min-width="2.5cm" style:writing-mode="lr-tb" loext:decorative="false"/>
      <style:paragraph-properties style:writing-mode="lr-tb"/>
    </style:style>
    <style:style style:name="gr67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993cm" loext:decorative="false"/>
      <style:paragraph-properties style:writing-mode="lr-tb"/>
    </style:style>
    <style:style style:name="gr68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086cm" loext:decorative="false"/>
      <style:paragraph-properties style:writing-mode="lr-tb"/>
    </style:style>
    <style:style style:name="gr68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756cm" loext:decorative="false"/>
      <style:paragraph-properties style:writing-mode="lr-tb"/>
    </style:style>
    <style:style style:name="gr68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93cm" loext:decorative="false"/>
      <style:paragraph-properties style:writing-mode="lr-tb"/>
    </style:style>
    <style:style style:name="gr683" style:family="graphic" style:parent-style-name="standard">
      <style:graphic-properties draw:stroke="none" svg:stroke-color="#000000" draw:fill="none" draw:fill-color="#ffffff" draw:textarea-horizontal-align="left" draw:auto-grow-height="true" draw:auto-grow-width="true" fo:min-height="0.319cm" fo:min-width="1.797cm" loext:decorative="false"/>
      <style:paragraph-properties style:writing-mode="lr-tb"/>
    </style:style>
    <style:style style:name="gr684"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4.25cm" fo:min-width="7cm" loext:decorative="false"/>
    </style:style>
    <style:style style:name="gr68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315cm" loext:decorative="false"/>
      <style:paragraph-properties style:writing-mode="lr-tb"/>
    </style:style>
    <style:style style:name="gr68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334cm" loext:decorative="false"/>
      <style:paragraph-properties style:writing-mode="lr-tb"/>
    </style:style>
    <style:style style:name="gr687"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7.75cm" fo:min-width="8.5cm" loext:decorative="false"/>
    </style:style>
    <style:style style:name="gr688" style:family="graphic" style:parent-style-name="standard">
      <style:graphic-properties svg:stroke-color="#000000" draw:textarea-horizontal-align="justify" draw:textarea-vertical-align="middle" draw:auto-grow-height="false" fo:min-height="0.75cm" fo:min-width="0.5cm" style:writing-mode="lr-tb" loext:decorative="false"/>
      <style:paragraph-properties style:writing-mode="lr-tb"/>
    </style:style>
    <style:style style:name="gr689"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1.75cm" fo:min-width="2.5cm" loext:decorative="false"/>
    </style:style>
    <style:style style:name="gr690" style:family="graphic" style:parent-style-name="standard">
      <style:graphic-properties draw:stroke="none" svg:stroke-color="#000000" draw:fill="none" draw:fill-color="#ffffff" draw:textarea-horizontal-align="left" draw:auto-grow-height="true" draw:auto-grow-width="true" fo:min-height="0.319cm" fo:min-width="0.891cm" loext:decorative="false"/>
      <style:paragraph-properties style:writing-mode="lr-tb"/>
    </style:style>
    <style:style style:name="gr691" style:family="graphic" style:parent-style-name="standard">
      <style:graphic-properties svg:stroke-color="#000000" draw:fill-color="#ffff00" draw:textarea-horizontal-align="left" draw:textarea-vertical-align="bottom" draw:auto-grow-height="false" fo:min-height="2.75cm" fo:min-width="4.007cm" style:writing-mode="lr-tb" loext:decorative="false"/>
      <style:paragraph-properties style:writing-mode="lr-tb"/>
    </style:style>
    <style:style style:name="gr69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076cm" loext:decorative="false"/>
      <style:paragraph-properties style:writing-mode="lr-tb"/>
    </style:style>
    <style:style style:name="gr69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008cm" loext:decorative="false"/>
      <style:paragraph-properties style:writing-mode="lr-tb"/>
    </style:style>
    <style:style style:name="gr69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815cm" loext:decorative="false"/>
      <style:paragraph-properties style:writing-mode="lr-tb"/>
    </style:style>
    <style:style style:name="gr69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365cm" loext:decorative="false"/>
      <style:paragraph-properties style:writing-mode="lr-tb"/>
    </style:style>
    <style:style style:name="gr69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323cm" loext:decorative="false"/>
      <style:paragraph-properties style:writing-mode="lr-tb"/>
    </style:style>
    <style:style style:name="gr69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145cm" loext:decorative="false"/>
      <style:paragraph-properties style:writing-mode="lr-tb"/>
    </style:style>
    <style:style style:name="gr69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03cm" loext:decorative="false"/>
      <style:paragraph-properties style:writing-mode="lr-tb"/>
    </style:style>
    <style:style style:name="gr699" style:family="graphic" style:parent-style-name="standard">
      <style:graphic-properties draw:stroke="none" svg:stroke-color="#000000" draw:fill="none" draw:fill-color="#ffffff" draw:textarea-horizontal-align="left" draw:auto-grow-height="true" draw:auto-grow-width="true" fo:min-height="0.319cm" fo:min-width="1.022cm" loext:decorative="false"/>
      <style:paragraph-properties style:writing-mode="lr-tb"/>
    </style:style>
    <style:style style:name="gr70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866cm" loext:decorative="false"/>
      <style:paragraph-properties style:writing-mode="lr-tb"/>
    </style:style>
    <style:style style:name="gr701" style:family="graphic" style:parent-style-name="standard">
      <style:graphic-properties draw:stroke="none" svg:stroke-color="#000000" draw:fill="none" draw:fill-color="#ffffff" draw:textarea-horizontal-align="left" draw:auto-grow-height="true" draw:auto-grow-width="true" fo:min-height="0.319cm" fo:min-width="0.997cm" loext:decorative="false"/>
      <style:paragraph-properties style:writing-mode="lr-tb"/>
    </style:style>
    <style:style style:name="gr702" style:family="graphic" style:parent-style-name="standard">
      <style:graphic-properties draw:stroke="none" svg:stroke-color="#000000" draw:fill="none" draw:fill-color="#ffffff" draw:textarea-horizontal-align="left" draw:auto-grow-height="true" draw:auto-grow-width="true" fo:min-height="0.319cm" fo:min-width="1.01cm" loext:decorative="false"/>
      <style:paragraph-properties style:writing-mode="lr-tb"/>
    </style:style>
    <style:style style:name="gr703" style:family="graphic" style:parent-style-name="standard">
      <style:graphic-properties svg:stroke-color="#000000" draw:fill-color="#ffff00" draw:textarea-horizontal-align="left" draw:textarea-vertical-align="bottom" draw:auto-grow-height="false" fo:min-height="1.781cm" fo:min-width="2.5cm" style:writing-mode="lr-tb" loext:decorative="false"/>
      <style:paragraph-properties style:writing-mode="lr-tb"/>
    </style:style>
    <style:style style:name="gr70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87cm" loext:decorative="false"/>
      <style:paragraph-properties style:writing-mode="lr-tb"/>
    </style:style>
    <style:style style:name="gr70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183cm" loext:decorative="false"/>
      <style:paragraph-properties style:writing-mode="lr-tb"/>
    </style:style>
    <style:style style:name="gr706" style:family="graphic" style:parent-style-name="standard">
      <style:graphic-properties draw:stroke="none" svg:stroke-color="#000000" draw:fill="none" draw:fill-color="#ffffff" draw:textarea-horizontal-align="left" draw:auto-grow-height="true" draw:auto-grow-width="true" fo:min-height="0.319cm" fo:min-width="1.374cm" loext:decorative="false"/>
      <style:paragraph-properties style:writing-mode="lr-tb"/>
    </style:style>
    <style:style style:name="gr707" style:family="graphic" style:parent-style-name="standard">
      <style:graphic-properties draw:stroke="none" svg:stroke-color="#000000" draw:fill="none" draw:fill-color="#ffffff" draw:textarea-horizontal-align="left" draw:auto-grow-height="true" draw:auto-grow-width="true" fo:min-height="0.319cm" fo:min-width="1.733cm" loext:decorative="false"/>
      <style:paragraph-properties style:writing-mode="lr-tb"/>
    </style:style>
    <style:style style:name="gr708" style:family="graphic" style:parent-style-name="standard">
      <style:graphic-properties svg:stroke-color="#000000" draw:fill-color="#ffff00" draw:textarea-horizontal-align="left" draw:textarea-vertical-align="bottom" draw:auto-grow-height="false" fo:min-height="4.75cm" fo:min-width="3.5cm" style:writing-mode="lr-tb" loext:decorative="false"/>
      <style:paragraph-properties style:writing-mode="lr-tb"/>
    </style:style>
    <style:style style:name="gr709" style:family="graphic" style:parent-style-name="standard">
      <style:graphic-properties draw:stroke="none" svg:stroke-color="#000000" draw:fill="none" draw:fill-color="#ffffff" draw:textarea-horizontal-align="left" draw:auto-grow-height="true" draw:auto-grow-width="true" fo:min-height="0.319cm" fo:min-width="0.929cm" loext:decorative="false"/>
      <style:paragraph-properties style:writing-mode="lr-tb"/>
    </style:style>
    <style:style style:name="gr710" style:family="graphic" style:parent-style-name="standard">
      <style:graphic-properties draw:stroke="none" svg:stroke-color="#000000" draw:fill="none" draw:fill-color="#ffffff" draw:textarea-horizontal-align="left" draw:auto-grow-height="true" draw:auto-grow-width="true" fo:min-height="0.319cm" fo:min-width="0.692cm" loext:decorative="false"/>
      <style:paragraph-properties style:writing-mode="lr-tb"/>
    </style:style>
    <style:style style:name="gr711" style:family="graphic" style:parent-style-name="standard">
      <style:graphic-properties draw:stroke="none" svg:stroke-color="#000000" draw:fill="none" draw:fill-color="#ffffff" draw:textarea-horizontal-align="left" draw:auto-grow-height="true" draw:auto-grow-width="true" fo:min-height="0.319cm" fo:min-width="0.554cm" loext:decorative="false"/>
      <style:paragraph-properties style:writing-mode="lr-tb"/>
    </style:style>
    <style:style style:name="gr712" style:family="graphic" style:parent-style-name="standard">
      <style:graphic-properties draw:stroke="none" svg:stroke-color="#000000" draw:fill="none" draw:fill-color="#ffffff" draw:textarea-horizontal-align="left" draw:auto-grow-height="true" draw:auto-grow-width="true" fo:min-height="0.319cm" fo:min-width="1.12cm" loext:decorative="false"/>
      <style:paragraph-properties style:writing-mode="lr-tb"/>
    </style:style>
    <style:style style:name="gr713" style:family="graphic" style:parent-style-name="standard">
      <style:graphic-properties draw:stroke="none" svg:stroke-color="#000000" draw:fill="none" draw:fill-color="#ffffff" draw:textarea-horizontal-align="left" draw:auto-grow-height="true" draw:auto-grow-width="true" fo:min-height="0.319cm" fo:min-width="1.145cm" loext:decorative="false"/>
      <style:paragraph-properties style:writing-mode="lr-tb"/>
    </style:style>
    <style:style style:name="gr714" style:family="graphic" style:parent-style-name="standard">
      <style:graphic-properties draw:stroke="none" svg:stroke-color="#000000" draw:fill="none" draw:fill-color="#ffffff" draw:textarea-horizontal-align="left" draw:auto-grow-height="true" draw:auto-grow-width="true" fo:min-height="0.319cm" fo:min-width="1.149cm" loext:decorative="false"/>
      <style:paragraph-properties style:writing-mode="lr-tb"/>
    </style:style>
    <style:style style:name="gr715" style:family="graphic" style:parent-style-name="standard">
      <style:graphic-properties draw:stroke="none" svg:stroke-color="#000000" draw:fill="none" draw:fill-color="#ffffff" draw:textarea-horizontal-align="left" draw:auto-grow-height="true" draw:auto-grow-width="true" fo:min-height="0.319cm" fo:min-width="0.993cm" loext:decorative="false"/>
      <style:paragraph-properties style:writing-mode="lr-tb"/>
    </style:style>
    <style:style style:name="gr716" style:family="graphic" style:parent-style-name="standard">
      <style:graphic-properties draw:stroke="none" svg:stroke-color="#000000" draw:fill="none" draw:fill-color="#ffffff" draw:textarea-horizontal-align="left" draw:auto-grow-height="true" draw:auto-grow-width="true" fo:min-height="0.319cm" fo:min-width="0.768cm" loext:decorative="false"/>
      <style:paragraph-properties style:writing-mode="lr-tb"/>
    </style:style>
    <style:style style:name="gr717" style:family="graphic" style:parent-style-name="standard">
      <style:graphic-properties draw:stroke="none" svg:stroke-color="#000000" draw:fill="none" draw:fill-color="#ffffff" draw:textarea-horizontal-align="left" draw:auto-grow-height="true" draw:auto-grow-width="true" fo:min-height="0.319cm" fo:min-width="0.617cm" loext:decorative="false"/>
      <style:paragraph-properties style:writing-mode="lr-tb"/>
    </style:style>
    <style:style style:name="gr718" style:family="graphic" style:parent-style-name="standard">
      <style:graphic-properties draw:stroke="none" svg:stroke-color="#000000" draw:fill="none" draw:fill-color="#ffffff" draw:textarea-horizontal-align="left" draw:auto-grow-height="true" draw:auto-grow-width="true" fo:min-height="0.319cm" fo:min-width="0.946cm" loext:decorative="false"/>
      <style:paragraph-properties style:writing-mode="lr-tb"/>
    </style:style>
    <style:style style:name="gr719" style:family="graphic" style:parent-style-name="standard">
      <style:graphic-properties draw:stroke="none" svg:stroke-color="#000000" draw:fill="none" draw:fill-color="#ffffff" draw:textarea-horizontal-align="left" draw:auto-grow-height="true" draw:auto-grow-width="true" fo:min-height="0.319cm" fo:min-width="2.208cm" loext:decorative="false"/>
      <style:paragraph-properties style:writing-mode="lr-tb"/>
    </style:style>
    <style:style style:name="gr72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56cm" loext:decorative="false"/>
      <style:paragraph-properties style:writing-mode="lr-tb"/>
    </style:style>
    <style:style style:name="gr72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912cm" loext:decorative="false"/>
      <style:paragraph-properties style:writing-mode="lr-tb"/>
    </style:style>
    <style:style style:name="gr72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508cm" loext:decorative="false"/>
      <style:paragraph-properties style:writing-mode="lr-tb"/>
    </style:style>
    <style:style style:name="gr723"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5.75cm" fo:min-width="8.5cm" loext:decorative="false"/>
    </style:style>
    <style:style style:name="gr72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276cm" loext:decorative="false"/>
      <style:paragraph-properties style:writing-mode="lr-tb"/>
    </style:style>
    <style:style style:name="gr725"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2.25cm" fo:min-width="4cm" loext:decorative="false"/>
    </style:style>
    <style:style style:name="gr72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496cm" loext:decorative="false"/>
      <style:paragraph-properties style:writing-mode="lr-tb"/>
    </style:style>
    <style:style style:name="gr727"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1.75cm" fo:min-width="6.5cm" loext:decorative="false"/>
    </style:style>
    <style:style style:name="gr728" style:family="graphic" style:parent-style-name="standard">
      <style:graphic-properties draw:stroke="none" svg:stroke-color="#000000" draw:fill="none" draw:fill-color="#ffffff" draw:textarea-horizontal-align="left" draw:auto-grow-height="true" draw:auto-grow-width="true" fo:min-height="0.319cm" fo:min-width="1.543cm" loext:decorative="false"/>
      <style:paragraph-properties style:writing-mode="lr-tb"/>
    </style:style>
    <style:style style:name="gr729" style:family="graphic" style:parent-style-name="standard">
      <style:graphic-properties svg:stroke-color="#000000" draw:fill-color="#00a933" draw:textarea-horizontal-align="justify" draw:textarea-vertical-align="middle" draw:auto-grow-height="false" fo:min-height="0cm" fo:min-width="1.25cm" loext:decorative="false"/>
    </style:style>
    <style:style style:name="gr730" style:family="graphic" style:parent-style-name="standard">
      <style:graphic-properties draw:stroke="none" svg:stroke-color="#000000" draw:fill="none" draw:fill-color="#ffffff" draw:textarea-horizontal-align="left" draw:auto-grow-height="true" draw:auto-grow-width="true" fo:min-height="0.319cm" fo:min-width="3.16cm" loext:decorative="false"/>
      <style:paragraph-properties style:writing-mode="lr-tb"/>
    </style:style>
    <style:style style:name="gr731" style:family="graphic" style:parent-style-name="standard">
      <style:graphic-properties draw:stroke="none" svg:stroke-color="#000000" draw:fill="none" draw:fill-color="#ffffff" draw:textarea-horizontal-align="left" draw:auto-grow-height="true" draw:auto-grow-width="true" fo:min-height="0.319cm" fo:min-width="2.047cm" loext:decorative="false"/>
      <style:paragraph-properties style:writing-mode="lr-tb"/>
    </style:style>
    <style:style style:name="gr732" style:family="graphic" style:parent-style-name="standard">
      <style:graphic-properties draw:stroke="none" svg:stroke-color="#000000" draw:fill="none" draw:fill-color="#ffffff" draw:textarea-horizontal-align="left" draw:auto-grow-height="true" draw:auto-grow-width="true" fo:min-height="0.319cm" fo:min-width="1.75cm" loext:decorative="false"/>
      <style:paragraph-properties style:writing-mode="lr-tb"/>
    </style:style>
    <style:style style:name="gr733" style:family="graphic" style:parent-style-name="standard">
      <style:graphic-properties draw:stroke="none" svg:stroke-color="#000000" draw:fill="none" draw:fill-color="#ffffff" draw:textarea-horizontal-align="left" draw:auto-grow-height="true" draw:auto-grow-width="true" fo:min-height="0.319cm" fo:min-width="2.411cm" loext:decorative="false"/>
      <style:paragraph-properties style:writing-mode="lr-tb"/>
    </style:style>
    <style:style style:name="gr734" style:family="graphic" style:parent-style-name="standard">
      <style:graphic-properties draw:stroke="none" svg:stroke-color="#000000" draw:fill="none" draw:fill-color="#ffffff" draw:textarea-horizontal-align="left" draw:auto-grow-height="true" draw:auto-grow-width="true" fo:min-height="0.319cm" fo:min-width="2.064cm" loext:decorative="false"/>
      <style:paragraph-properties style:writing-mode="lr-tb"/>
    </style:style>
    <style:style style:name="gr735" style:family="graphic" style:parent-style-name="standard">
      <style:graphic-properties draw:stroke="none" svg:stroke-color="#000000" draw:fill="none" draw:fill-color="#ffffff" draw:textarea-horizontal-align="left" draw:auto-grow-height="true" draw:auto-grow-width="true" fo:min-height="0.319cm" fo:min-width="1.869cm" loext:decorative="false"/>
      <style:paragraph-properties style:writing-mode="lr-tb"/>
    </style:style>
    <style:style style:name="gr736" style:family="graphic" style:parent-style-name="standard">
      <style:graphic-properties draw:stroke="none" svg:stroke-color="#000000" draw:fill="none" draw:fill-color="#ffffff" draw:textarea-horizontal-align="left" draw:auto-grow-height="true" draw:auto-grow-width="true" fo:min-height="0.319cm" fo:min-width="1.755cm" loext:decorative="false"/>
      <style:paragraph-properties style:writing-mode="lr-tb"/>
    </style:style>
    <style:style style:name="gr737" style:family="graphic" style:parent-style-name="standard">
      <style:graphic-properties draw:stroke="none" svg:stroke-color="#000000" draw:fill="none" draw:fill-color="#ffffff" draw:textarea-horizontal-align="left" draw:auto-grow-height="true" draw:auto-grow-width="true" fo:min-height="0.319cm" fo:min-width="3.257cm" loext:decorative="false"/>
      <style:paragraph-properties style:writing-mode="lr-tb"/>
    </style:style>
    <style:style style:name="gr738" style:family="graphic" style:parent-style-name="standard">
      <style:graphic-properties draw:stroke="none" svg:stroke-color="#000000" draw:fill="none" draw:fill-color="#ffffff" draw:textarea-horizontal-align="left" draw:auto-grow-height="true" draw:auto-grow-width="true" fo:min-height="0.319cm" fo:min-width="1.848cm" loext:decorative="false"/>
      <style:paragraph-properties style:writing-mode="lr-tb"/>
    </style:style>
    <style:style style:name="gr739" style:family="graphic" style:parent-style-name="standard">
      <style:graphic-properties draw:stroke="none" svg:stroke-color="#000000" draw:fill="none" draw:fill-color="#ffffff" draw:textarea-horizontal-align="left" draw:auto-grow-height="true" draw:auto-grow-width="true" fo:min-height="0.319cm" fo:min-width="3.939cm" loext:decorative="false"/>
      <style:paragraph-properties style:writing-mode="lr-tb"/>
    </style:style>
    <style:style style:name="gr740" style:family="graphic" style:parent-style-name="standard">
      <style:graphic-properties draw:stroke="none" svg:stroke-color="#000000" draw:fill="none" draw:fill-color="#ffffff" draw:textarea-horizontal-align="left" draw:auto-grow-height="true" draw:auto-grow-width="true" fo:min-height="0.319cm" fo:min-width="3.702cm" loext:decorative="false"/>
      <style:paragraph-properties style:writing-mode="lr-tb"/>
    </style:style>
    <style:style style:name="gr741" style:family="graphic" style:parent-style-name="standard">
      <style:graphic-properties draw:stroke="none" svg:stroke-color="#000000" draw:fill="none" draw:fill-color="#ffffff" draw:textarea-horizontal-align="left" draw:auto-grow-height="true" draw:auto-grow-width="true" fo:min-height="0.637cm" fo:min-width="2.965cm" loext:decorative="false"/>
      <style:paragraph-properties style:writing-mode="lr-tb"/>
    </style:style>
    <style:style style:name="gr742" style:family="graphic" style:parent-style-name="standard">
      <style:graphic-properties draw:stroke="none" svg:stroke-color="#000000" draw:fill="none" draw:fill-color="#ffffff" draw:textarea-horizontal-align="left" draw:auto-grow-height="true" draw:auto-grow-width="true" fo:min-height="0.319cm" fo:min-width="1.717cm" loext:decorative="false"/>
      <style:paragraph-properties style:writing-mode="lr-tb"/>
    </style:style>
    <style:style style:name="gr743" style:family="graphic" style:parent-style-name="standard">
      <style:graphic-properties draw:stroke="none" svg:stroke-color="#000000" draw:fill="none" draw:fill-color="#ffffff" draw:textarea-horizontal-align="left" draw:auto-grow-height="true" draw:auto-grow-width="true" fo:min-height="0.319cm" fo:min-width="4.951cm" loext:decorative="false"/>
      <style:paragraph-properties style:writing-mode="lr-tb"/>
    </style:style>
    <style:style style:name="gr744" style:family="graphic" style:parent-style-name="standard">
      <style:graphic-properties draw:stroke="none" svg:stroke-color="#000000" draw:fill="none" draw:fill-color="#ffffff" draw:textarea-horizontal-align="left" draw:auto-grow-height="true" draw:auto-grow-width="true" fo:min-height="0.319cm" fo:min-width="2.804cm" loext:decorative="false"/>
      <style:paragraph-properties style:writing-mode="lr-tb"/>
    </style:style>
    <style:style style:name="gr745" style:family="graphic" style:parent-style-name="standard">
      <style:graphic-properties draw:stroke="none" svg:stroke-color="#000000" draw:fill="none" draw:fill-color="#ffffff" draw:textarea-horizontal-align="left" draw:auto-grow-height="true" draw:auto-grow-width="true" fo:min-height="0.319cm" fo:min-width="1.924cm" loext:decorative="false"/>
      <style:paragraph-properties style:writing-mode="lr-tb"/>
    </style:style>
    <style:style style:name="gr746" style:family="graphic" style:parent-style-name="standard">
      <style:graphic-properties draw:stroke="none" svg:stroke-color="#000000" draw:fill="none" draw:fill-color="#ffffff" draw:textarea-horizontal-align="left" draw:auto-grow-height="true" draw:auto-grow-width="true" fo:min-height="0.715cm" fo:min-width="4.13cm" loext:decorative="false"/>
      <style:paragraph-properties style:writing-mode="lr-tb"/>
    </style:style>
    <style:style style:name="gr747" style:family="graphic" style:parent-style-name="standard">
      <style:graphic-properties draw:stroke="none" svg:stroke-color="#000000" draw:fill="none" draw:fill-color="#ffffff" draw:textarea-horizontal-align="left" draw:auto-grow-height="true" draw:auto-grow-width="true" fo:min-height="0.715cm" fo:min-width="3.892cm" loext:decorative="false"/>
      <style:paragraph-properties style:writing-mode="lr-tb"/>
    </style:style>
    <style:style style:name="gr74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467cm" loext:decorative="false"/>
      <style:paragraph-properties style:writing-mode="lr-tb"/>
    </style:style>
    <style:style style:name="gr749" style:family="graphic" style:parent-style-name="standard">
      <style:graphic-properties draw:stroke="dash" draw:stroke-dash="Dot" svg:stroke-color="#000000" draw:fill="none" loext:fill-use-slide-background="false" draw:textarea-horizontal-align="justify" draw:textarea-vertical-align="middle" draw:auto-grow-height="false" fo:min-height="3.45cm" fo:min-width="1.8cm" loext:decorative="false"/>
    </style:style>
    <style:style style:name="gr750" style:family="graphic" style:parent-style-name="standard">
      <style:graphic-properties draw:stroke="none" svg:stroke-color="#000000" draw:fill="none" draw:fill-color="#ffffff" draw:textarea-horizontal-align="left" draw:auto-grow-height="true" draw:auto-grow-width="true" fo:min-height="0.637cm" fo:min-width="1.467cm" loext:decorative="false"/>
      <style:paragraph-properties style:writing-mode="lr-tb"/>
    </style:style>
    <style:style style:name="gr75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2cm" loext:decorative="false"/>
      <style:paragraph-properties style:writing-mode="lr-tb"/>
    </style:style>
    <style:style style:name="gr752" style:family="graphic" style:parent-style-name="standard">
      <style:graphic-properties draw:stroke="dash" draw:stroke-dash="Dot" svg:stroke-color="#000000" draw:fill="none" loext:fill-use-slide-background="false" draw:textarea-horizontal-align="justify" draw:textarea-vertical-align="middle" draw:auto-grow-height="false" fo:min-height="3.45cm" fo:min-width="3.5cm" loext:decorative="false"/>
    </style:style>
    <style:style style:name="gr75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376cm" loext:decorative="false"/>
      <style:paragraph-properties style:writing-mode="lr-tb"/>
    </style:style>
    <style:style style:name="gr75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7cm" loext:decorative="false"/>
      <style:paragraph-properties style:writing-mode="lr-tb"/>
    </style:style>
    <style:style style:name="gr75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34cm" loext:decorative="false"/>
      <style:paragraph-properties style:writing-mode="lr-tb"/>
    </style:style>
    <style:style style:name="gr75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22cm" loext:decorative="false"/>
      <style:paragraph-properties style:writing-mode="lr-tb"/>
    </style:style>
    <style:style style:name="gr75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cm" loext:decorative="false"/>
      <style:paragraph-properties style:writing-mode="lr-tb"/>
    </style:style>
    <style:style style:name="gr758"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5.75cm" fo:min-width="16.501cm" loext:decorative="false"/>
    </style:style>
    <style:style style:name="gr759"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6.75cm" fo:min-width="18.502cm" loext:decorative="false"/>
    </style:style>
    <style:style style:name="gr760" style:family="graphic" style:parent-style-name="standard">
      <style:graphic-properties draw:stroke="none" svg:stroke-color="#000000" draw:fill="none" draw:fill-color="#ffffff" draw:textarea-horizontal-align="left" draw:auto-grow-height="true" draw:auto-grow-width="false" fo:min-height="0.25cm" fo:min-width="2.563cm" loext:decorative="false"/>
      <style:paragraph-properties style:writing-mode="lr-tb"/>
    </style:style>
    <style:style style:name="gr761" style:family="graphic" style:parent-style-name="standard">
      <style:graphic-properties draw:stroke="none" svg:stroke-color="#000000" draw:fill="none" draw:fill-color="#ffffff" draw:textarea-horizontal-align="left" draw:auto-grow-height="true" draw:auto-grow-width="true" draw:fit-to-size="false" style:shrink-to-fit="true" fo:min-height="0.637cm" fo:min-width="4.6cm" loext:decorative="false"/>
      <style:paragraph-properties style:writing-mode="lr-tb"/>
    </style:style>
    <style:style style:name="gr762" style:family="graphic" style:parent-style-name="standard">
      <style:graphic-properties svg:stroke-color="#000000" draw:fill-color="#ffff00" draw:textarea-horizontal-align="left" draw:textarea-vertical-align="bottom" draw:auto-grow-height="false" fo:min-height="2.75cm" fo:min-width="1.507cm" style:writing-mode="lr-tb" loext:decorative="false"/>
      <style:paragraph-properties style:writing-mode="lr-tb"/>
    </style:style>
    <style:style style:name="gr763" style:family="graphic" style:parent-style-name="standard">
      <style:graphic-properties svg:stroke-color="#000000" draw:fill-color="#ffff00" draw:textarea-horizontal-align="left" draw:textarea-vertical-align="bottom" draw:auto-grow-height="false" fo:min-height="1.75cm" fo:min-width="1.507cm" style:writing-mode="lr-tb" loext:decorative="false"/>
      <style:paragraph-properties style:writing-mode="lr-tb"/>
    </style:style>
    <style:style style:name="gr764"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2.6cm" loext:decorative="false"/>
      <style:paragraph-properties style:writing-mode="lr-tb"/>
    </style:style>
    <style:style style:name="gr765" style:family="graphic" style:parent-style-name="standard">
      <style:graphic-properties svg:stroke-color="#000000" draw:fill-color="#ffff00" draw:textarea-horizontal-align="left" draw:textarea-vertical-align="bottom" draw:auto-grow-height="false" fo:min-height="3.25cm" fo:min-width="1.507cm" style:writing-mode="lr-tb" loext:decorative="false"/>
      <style:paragraph-properties style:writing-mode="lr-tb"/>
    </style:style>
    <style:style style:name="gr766"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2.6cm" loext:decorative="false"/>
      <style:paragraph-properties style:writing-mode="lr-tb"/>
    </style:style>
    <style:style style:name="gr767"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1.7cm" loext:decorative="false"/>
      <style:paragraph-properties style:writing-mode="lr-tb"/>
    </style:style>
    <style:style style:name="gr768"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15cm" fo:min-width="2.821cm" loext:decorative="false"/>
      <style:paragraph-properties style:writing-mode="lr-tb"/>
    </style:style>
    <style:style style:name="gr769"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2.099cm" loext:decorative="false"/>
      <style:paragraph-properties style:writing-mode="lr-tb"/>
    </style:style>
    <style:style style:name="gr770" style:family="graphic" style:parent-style-name="standard">
      <style:graphic-properties svg:stroke-color="#000000" draw:fill-color="#ffff00" draw:textarea-horizontal-align="left" draw:textarea-vertical-align="bottom" draw:auto-grow-height="false" fo:min-height="2.25cm" fo:min-width="1.507cm" style:writing-mode="lr-tb" loext:decorative="false"/>
      <style:paragraph-properties style:writing-mode="lr-tb"/>
    </style:style>
    <style:style style:name="gr771"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1.192cm" loext:decorative="false"/>
      <style:paragraph-properties style:writing-mode="lr-tb"/>
    </style:style>
    <style:style style:name="gr772"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2.6cm" loext:decorative="false"/>
      <style:paragraph-properties style:writing-mode="lr-tb"/>
    </style:style>
    <style:style style:name="gr773"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2.6cm" loext:decorative="false"/>
      <style:paragraph-properties style:writing-mode="lr-tb"/>
    </style:style>
    <style:style style:name="gr774"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3.65cm" fo:min-width="8cm" loext:decorative="false"/>
    </style:style>
    <style:style style:name="gr775" style:family="graphic" style:parent-style-name="standard">
      <style:graphic-properties draw:stroke="none" svg:stroke-color="#000000" draw:fill="none" draw:fill-color="#ffffff" draw:textarea-horizontal-align="left" draw:auto-grow-height="true" draw:auto-grow-width="false" fo:min-height="0.119cm" fo:min-width="2.563cm" loext:decorative="false"/>
      <style:paragraph-properties style:writing-mode="lr-tb"/>
    </style:style>
    <style:style style:name="gr77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5cm" loext:decorative="false"/>
      <style:paragraph-properties style:writing-mode="lr-tb"/>
    </style:style>
    <style:style style:name="gr777"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2.6cm" loext:decorative="false"/>
      <style:paragraph-properties style:writing-mode="lr-tb"/>
    </style:style>
    <style:style style:name="gr778"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2.6cm" loext:decorative="false"/>
      <style:paragraph-properties style:writing-mode="lr-tb"/>
    </style:style>
    <style:style style:name="gr779"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1.7cm" loext:decorative="false"/>
      <style:paragraph-properties style:writing-mode="lr-tb"/>
    </style:style>
    <style:style style:name="gr780"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15cm" fo:min-width="2.821cm" loext:decorative="false"/>
      <style:paragraph-properties style:writing-mode="lr-tb"/>
    </style:style>
    <style:style style:name="gr781"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2.099cm" loext:decorative="false"/>
      <style:paragraph-properties style:writing-mode="lr-tb"/>
    </style:style>
    <style:style style:name="gr782"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1.192cm" loext:decorative="false"/>
      <style:paragraph-properties style:writing-mode="lr-tb"/>
    </style:style>
    <style:style style:name="gr783"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2.6cm" loext:decorative="false"/>
      <style:paragraph-properties style:writing-mode="lr-tb"/>
    </style:style>
    <style:style style:name="gr784"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2.6cm" loext:decorative="false"/>
      <style:paragraph-properties style:writing-mode="lr-tb"/>
    </style:style>
    <style:style style:name="gr785" style:family="graphic" style:parent-style-name="standard">
      <style:graphic-properties svg:stroke-color="#000000" draw:fill-color="#dddddd" draw:textarea-horizontal-align="left" draw:textarea-vertical-align="bottom" draw:auto-grow-height="false" fo:min-height="4.75cm" fo:min-width="1.5cm" style:writing-mode="lr-tb" loext:decorative="false"/>
      <style:paragraph-properties style:writing-mode="lr-tb"/>
    </style:style>
    <style:style style:name="gr786" style:family="graphic" style:parent-style-name="objectwithoutfill">
      <style:graphic-properties draw:fill="none" draw:fill-color="#dddddd" draw:textarea-horizontal-align="left" draw:textarea-vertical-align="bottom" loext:decorative="false"/>
    </style:style>
    <style:style style:name="gr78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4cm" loext:decorative="false"/>
      <style:paragraph-properties style:writing-mode="lr-tb"/>
    </style:style>
    <style:style style:name="gr788" style:family="graphic" style:parent-style-name="standard">
      <style:graphic-properties svg:stroke-color="#000000" draw:fill-color="#ffff00" draw:textarea-horizontal-align="left" draw:textarea-vertical-align="bottom" draw:auto-grow-height="false" fo:min-height="2.75cm" fo:min-width="1.5cm" style:writing-mode="lr-tb" loext:decorative="false"/>
      <style:paragraph-properties style:writing-mode="lr-tb"/>
    </style:style>
    <style:style style:name="gr789" style:family="graphic" style:parent-style-name="standard">
      <style:graphic-properties svg:stroke-color="#000000" draw:fill-color="#dddddd" draw:textarea-horizontal-align="left" draw:textarea-vertical-align="bottom" draw:auto-grow-height="false" fo:min-height="6.75cm" fo:min-width="1.5cm" style:writing-mode="lr-tb" loext:decorative="false"/>
      <style:paragraph-properties style:writing-mode="lr-tb"/>
    </style:style>
    <style:style style:name="gr790" style:family="graphic" style:parent-style-name="standard">
      <style:graphic-properties svg:stroke-color="#000000" draw:fill-color="#dddddd" draw:textarea-horizontal-align="left" draw:textarea-vertical-align="bottom" draw:auto-grow-height="false" fo:min-height="7.75cm" fo:min-width="1.5cm" style:writing-mode="lr-tb" loext:decorative="false"/>
      <style:paragraph-properties style:writing-mode="lr-tb"/>
    </style:style>
    <style:style style:name="gr79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213cm" loext:decorative="false"/>
      <style:paragraph-properties style:writing-mode="lr-tb"/>
    </style:style>
    <style:style style:name="gr79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09cm" loext:decorative="false"/>
      <style:paragraph-properties style:writing-mode="lr-tb"/>
    </style:style>
    <style:style style:name="gr79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69cm" loext:decorative="false"/>
      <style:paragraph-properties style:writing-mode="lr-tb"/>
    </style:style>
    <style:style style:name="gr79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203cm" loext:decorative="false"/>
      <style:paragraph-properties style:writing-mode="lr-tb"/>
    </style:style>
    <style:style style:name="gr79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313cm" loext:decorative="false"/>
      <style:paragraph-properties style:writing-mode="lr-tb"/>
    </style:style>
    <style:style style:name="gr79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44cm" loext:decorative="false"/>
      <style:paragraph-properties style:writing-mode="lr-tb"/>
    </style:style>
    <style:style style:name="gr79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99cm" loext:decorative="false"/>
      <style:paragraph-properties style:writing-mode="lr-tb"/>
    </style:style>
    <style:style style:name="gr79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367cm" loext:decorative="false"/>
      <style:paragraph-properties style:writing-mode="lr-tb"/>
    </style:style>
    <style:style style:name="gr799" style:family="graphic" style:parent-style-name="standard">
      <style:graphic-properties svg:stroke-color="#000000" draw:fill-color="#dddddd" draw:textarea-horizontal-align="left" draw:textarea-vertical-align="bottom" draw:auto-grow-height="false" fo:min-height="3.75cm" fo:min-width="1.5cm" style:writing-mode="lr-tb" loext:decorative="false"/>
      <style:paragraph-properties style:writing-mode="lr-tb"/>
    </style:style>
    <style:style style:name="gr800" style:family="graphic" style:parent-style-name="standard">
      <style:graphic-properties svg:stroke-color="#000000" draw:fill-color="#ffff00" draw:textarea-horizontal-align="left" draw:textarea-vertical-align="bottom" draw:auto-grow-height="false" fo:min-height="3.75cm" fo:min-width="1.5cm" style:writing-mode="lr-tb" loext:decorative="false"/>
      <style:paragraph-properties style:writing-mode="lr-tb"/>
    </style:style>
    <style:style style:name="gr801"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1.147cm" loext:decorative="false"/>
      <style:paragraph-properties style:writing-mode="lr-tb"/>
    </style:style>
    <style:style style:name="gr802"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0.947cm" loext:decorative="false"/>
      <style:paragraph-properties style:writing-mode="lr-tb"/>
    </style:style>
    <style:style style:name="gr803"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0.947cm" loext:decorative="false"/>
      <style:paragraph-properties style:writing-mode="lr-tb"/>
    </style:style>
    <style:style style:name="gr80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048cm" loext:decorative="false"/>
      <style:paragraph-properties style:writing-mode="lr-tb"/>
    </style:style>
    <style:style style:name="gr805" style:family="graphic" style:parent-style-name="standard">
      <style:graphic-properties svg:stroke-color="#000000" draw:fill-color="#ffff00" draw:textarea-horizontal-align="left" draw:textarea-vertical-align="bottom" draw:auto-grow-height="false" fo:min-height="1.75cm" fo:min-width="1.5cm" style:writing-mode="lr-tb" loext:decorative="false"/>
      <style:paragraph-properties style:writing-mode="lr-tb"/>
    </style:style>
    <style:style style:name="gr806"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1.147cm" loext:decorative="false"/>
      <style:paragraph-properties style:writing-mode="lr-tb"/>
    </style:style>
    <style:style style:name="gr807"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1.846cm" loext:decorative="false"/>
      <style:paragraph-properties style:writing-mode="lr-tb"/>
    </style:style>
    <style:style style:name="gr808"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1.046cm" loext:decorative="false"/>
      <style:paragraph-properties style:writing-mode="lr-tb"/>
    </style:style>
    <style:style style:name="gr80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388cm" loext:decorative="false"/>
      <style:paragraph-properties style:writing-mode="lr-tb"/>
    </style:style>
    <style:style style:name="gr810"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0.545cm" loext:decorative="false"/>
      <style:paragraph-properties style:writing-mode="lr-tb"/>
    </style:style>
    <style:style style:name="gr811"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0.545cm" loext:decorative="false"/>
      <style:paragraph-properties style:writing-mode="lr-tb"/>
    </style:style>
    <style:style style:name="gr812"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0.545cm" loext:decorative="false"/>
      <style:paragraph-properties style:writing-mode="lr-tb"/>
    </style:style>
    <style:style style:name="gr813"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0.545cm" loext:decorative="false"/>
      <style:paragraph-properties style:writing-mode="lr-tb"/>
    </style:style>
    <style:style style:name="gr81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328cm" loext:decorative="false"/>
      <style:paragraph-properties style:writing-mode="lr-tb"/>
    </style:style>
    <style:style style:name="gr815"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0.545cm" loext:decorative="false"/>
      <style:paragraph-properties style:writing-mode="lr-tb"/>
    </style:style>
    <style:style style:name="gr816"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0.545cm" loext:decorative="false"/>
      <style:paragraph-properties style:writing-mode="lr-tb"/>
    </style:style>
    <style:style style:name="gr817"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0.545cm" loext:decorative="false"/>
      <style:paragraph-properties style:writing-mode="lr-tb"/>
    </style:style>
    <style:style style:name="gr818" style:family="graphic" style:parent-style-name="standard">
      <style:graphic-properties draw:stroke="none" svg:stroke-color="#000000" draw:fill="none" draw:fill-color="#ffffff" draw:textarea-horizontal-align="left" draw:auto-grow-height="true" draw:auto-grow-width="true" draw:fit-to-size="false" style:shrink-to-fit="true" fo:min-height="0.009cm" fo:min-width="4.925cm" loext:decorative="false"/>
      <style:paragraph-properties style:writing-mode="lr-tb"/>
    </style:style>
    <style:style style:name="gr819" style:family="graphic" style:parent-style-name="standard">
      <style:graphic-properties svg:stroke-color="#000000" draw:fill-color="#ffff00" draw:textarea-horizontal-align="left" draw:textarea-vertical-align="bottom" draw:auto-grow-height="false" fo:min-height="3.25cm" fo:min-width="1.5cm" style:writing-mode="lr-tb" loext:decorative="false"/>
      <style:paragraph-properties style:writing-mode="lr-tb"/>
    </style:style>
    <style:style style:name="gr820"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0.545cm" loext:decorative="false"/>
      <style:paragraph-properties style:writing-mode="lr-tb"/>
    </style:style>
    <style:style style:name="gr821"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0.545cm" loext:decorative="false"/>
      <style:paragraph-properties style:writing-mode="lr-tb"/>
    </style:style>
    <style:style style:name="gr82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179cm" loext:decorative="false"/>
      <style:paragraph-properties style:writing-mode="lr-tb"/>
    </style:style>
    <style:style style:name="gr823"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0.545cm" loext:decorative="false"/>
      <style:paragraph-properties style:writing-mode="lr-tb"/>
    </style:style>
    <style:style style:name="gr824"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0.545cm" loext:decorative="false"/>
      <style:paragraph-properties style:writing-mode="lr-tb"/>
    </style:style>
    <style:style style:name="gr825"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0.545cm" loext:decorative="false"/>
      <style:paragraph-properties style:writing-mode="lr-tb"/>
    </style:style>
    <style:style style:name="gr82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977cm" loext:decorative="false"/>
      <style:paragraph-properties style:writing-mode="lr-tb"/>
    </style:style>
    <style:style style:name="gr827"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0.545cm" loext:decorative="false"/>
      <style:paragraph-properties style:writing-mode="lr-tb"/>
    </style:style>
    <style:style style:name="gr828"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0.545cm" loext:decorative="false"/>
      <style:paragraph-properties style:writing-mode="lr-tb"/>
    </style:style>
    <style:style style:name="gr82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485cm" loext:decorative="false"/>
      <style:paragraph-properties style:writing-mode="lr-tb"/>
    </style:style>
    <style:style style:name="gr83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232cm" loext:decorative="false"/>
      <style:paragraph-properties style:writing-mode="lr-tb"/>
    </style:style>
    <style:style style:name="gr831"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0.545cm" loext:decorative="false"/>
      <style:paragraph-properties style:writing-mode="lr-tb"/>
    </style:style>
    <style:style style:name="gr832"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0.545cm" loext:decorative="false"/>
      <style:paragraph-properties style:writing-mode="lr-tb"/>
    </style:style>
    <style:style style:name="gr83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027cm" loext:decorative="false"/>
      <style:paragraph-properties style:writing-mode="lr-tb"/>
    </style:style>
    <style:style style:name="gr83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85cm" loext:decorative="false"/>
      <style:paragraph-properties style:writing-mode="lr-tb"/>
    </style:style>
    <style:style style:name="gr835"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0.545cm" loext:decorative="false"/>
      <style:paragraph-properties style:writing-mode="lr-tb"/>
    </style:style>
    <style:style style:name="gr836"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0.545cm" loext:decorative="false"/>
      <style:paragraph-properties style:writing-mode="lr-tb"/>
    </style:style>
    <style:style style:name="gr837"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0.545cm" loext:decorative="false"/>
      <style:paragraph-properties style:writing-mode="lr-tb"/>
    </style:style>
    <style:style style:name="gr838"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0.545cm" loext:decorative="false"/>
      <style:paragraph-properties style:writing-mode="lr-tb"/>
    </style:style>
    <style:style style:name="gr839"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0.545cm" loext:decorative="false"/>
      <style:paragraph-properties style:writing-mode="lr-tb"/>
    </style:style>
    <style:style style:name="gr840"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0.545cm" loext:decorative="false"/>
      <style:paragraph-properties style:writing-mode="lr-tb"/>
    </style:style>
    <style:style style:name="gr84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84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84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84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84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84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84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84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84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850"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0.545cm" loext:decorative="false"/>
      <style:paragraph-properties style:writing-mode="lr-tb"/>
    </style:style>
    <style:style style:name="gr851"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0.545cm" loext:decorative="false"/>
      <style:paragraph-properties style:writing-mode="lr-tb"/>
    </style:style>
    <style:style style:name="gr852"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0.545cm" loext:decorative="false"/>
      <style:paragraph-properties style:writing-mode="lr-tb"/>
    </style:style>
    <style:style style:name="gr853"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0.545cm" loext:decorative="false"/>
      <style:paragraph-properties style:writing-mode="lr-tb"/>
    </style:style>
    <style:style style:name="gr85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85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85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85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858"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0.545cm" loext:decorative="false"/>
      <style:paragraph-properties style:writing-mode="lr-tb"/>
    </style:style>
    <style:style style:name="gr859"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0.545cm" loext:decorative="false"/>
      <style:paragraph-properties style:writing-mode="lr-tb"/>
    </style:style>
    <style:style style:name="gr860"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0.545cm" loext:decorative="false"/>
      <style:paragraph-properties style:writing-mode="lr-tb"/>
    </style:style>
    <style:style style:name="gr86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86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86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86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86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86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86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86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86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87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87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87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87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87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875"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0.545cm" loext:decorative="false"/>
      <style:paragraph-properties style:writing-mode="lr-tb"/>
    </style:style>
    <style:style style:name="gr876"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0.545cm" loext:decorative="false"/>
      <style:paragraph-properties style:writing-mode="lr-tb"/>
    </style:style>
    <style:style style:name="gr877"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0.545cm" loext:decorative="false"/>
      <style:paragraph-properties style:writing-mode="lr-tb"/>
    </style:style>
    <style:style style:name="gr878"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0.545cm" loext:decorative="false"/>
      <style:paragraph-properties style:writing-mode="lr-tb"/>
    </style:style>
    <style:style style:name="gr879"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0.545cm" loext:decorative="false"/>
      <style:paragraph-properties style:writing-mode="lr-tb"/>
    </style:style>
    <style:style style:name="gr880"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0.545cm" loext:decorative="false"/>
      <style:paragraph-properties style:writing-mode="lr-tb"/>
    </style:style>
    <style:style style:name="gr881"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0.545cm" loext:decorative="false"/>
      <style:paragraph-properties style:writing-mode="lr-tb"/>
    </style:style>
    <style:style style:name="gr88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88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88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88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88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887"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0.545cm" loext:decorative="false"/>
      <style:paragraph-properties style:writing-mode="lr-tb"/>
    </style:style>
    <style:style style:name="gr888"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0.545cm" loext:decorative="false"/>
      <style:paragraph-properties style:writing-mode="lr-tb"/>
    </style:style>
    <style:style style:name="gr889"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0.545cm" loext:decorative="false"/>
      <style:paragraph-properties style:writing-mode="lr-tb"/>
    </style:style>
    <style:style style:name="gr890"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0.545cm" loext:decorative="false"/>
      <style:paragraph-properties style:writing-mode="lr-tb"/>
    </style:style>
    <style:style style:name="gr891"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0.545cm" loext:decorative="false"/>
      <style:paragraph-properties style:writing-mode="lr-tb"/>
    </style:style>
    <style:style style:name="gr892"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0.545cm" loext:decorative="false"/>
      <style:paragraph-properties style:writing-mode="lr-tb"/>
    </style:style>
    <style:style style:name="gr89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89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89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89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897"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0.545cm" loext:decorative="false"/>
      <style:paragraph-properties style:writing-mode="lr-tb"/>
    </style:style>
    <style:style style:name="gr898"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0.545cm" loext:decorative="false"/>
      <style:paragraph-properties style:writing-mode="lr-tb"/>
    </style:style>
    <style:style style:name="gr899"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0.545cm" loext:decorative="false"/>
      <style:paragraph-properties style:writing-mode="lr-tb"/>
    </style:style>
    <style:style style:name="gr90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90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0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0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04"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1.6cm" loext:decorative="false"/>
      <style:paragraph-properties style:writing-mode="lr-tb"/>
    </style:style>
    <style:style style:name="gr905"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0.545cm" loext:decorative="false"/>
      <style:paragraph-properties style:writing-mode="lr-tb"/>
    </style:style>
    <style:style style:name="gr906"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0.545cm" loext:decorative="false"/>
      <style:paragraph-properties style:writing-mode="lr-tb"/>
    </style:style>
    <style:style style:name="gr90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90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0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1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1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1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91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1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1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1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91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1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1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20"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3.75cm" fo:min-width="6.5cm" loext:decorative="false"/>
    </style:style>
    <style:style style:name="gr921"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2.75cm" fo:min-width="6.6cm" loext:decorative="false"/>
    </style:style>
    <style:style style:name="gr92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92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2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2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2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2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92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2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3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3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3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93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3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3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3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3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93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3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4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4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4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94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4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4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4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4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643cm" loext:decorative="false"/>
      <style:paragraph-properties style:writing-mode="lr-tb"/>
    </style:style>
    <style:style style:name="gr94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94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5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5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5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5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95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5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5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5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95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5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6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6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96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6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6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6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96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6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6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6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97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7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7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7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7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97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7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7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7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431cm" loext:decorative="false"/>
      <style:paragraph-properties style:writing-mode="lr-tb"/>
    </style:style>
    <style:style style:name="gr979" style:family="graphic" style:parent-style-name="standard">
      <style:graphic-properties svg:stroke-color="#000000" draw:fill-color="#ffff00" draw:textarea-horizontal-align="justify" draw:textarea-vertical-align="middle" draw:auto-grow-height="false" fo:min-height="3.25cm" fo:min-width="1.5cm" loext:decorative="false"/>
      <style:paragraph-properties style:writing-mode="lr-tb"/>
    </style:style>
    <style:style style:name="gr980" style:family="graphic" style:parent-style-name="standard">
      <style:graphic-properties svg:stroke-color="#000000" draw:fill-color="#ffff00" draw:textarea-horizontal-align="justify" draw:textarea-vertical-align="middle" draw:auto-grow-height="false" fo:min-height="0.75cm" fo:min-width="1.5cm" loext:decorative="false"/>
      <style:paragraph-properties style:writing-mode="lr-tb"/>
    </style:style>
    <style:style style:name="gr981"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1.7cm" loext:decorative="false"/>
      <style:paragraph-properties style:writing-mode="lr-tb"/>
    </style:style>
    <style:style style:name="gr982"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1.599cm" loext:decorative="false"/>
      <style:paragraph-properties style:writing-mode="lr-tb"/>
    </style:style>
    <style:style style:name="gr983" style:family="graphic" style:parent-style-name="standard">
      <style:graphic-properties svg:stroke-color="#000000" draw:fill-color="#ffff00" draw:textarea-horizontal-align="justify" draw:textarea-vertical-align="middle" draw:auto-grow-height="false" fo:min-height="1.752cm" fo:min-width="1.5cm" loext:decorative="false"/>
      <style:paragraph-properties style:writing-mode="lr-tb"/>
    </style:style>
    <style:style style:name="gr984"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1.7cm" loext:decorative="false"/>
      <style:paragraph-properties style:writing-mode="lr-tb"/>
    </style:style>
    <style:style style:name="gr985"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319cm" fo:min-width="1.599cm" loext:decorative="false"/>
      <style:paragraph-properties style:writing-mode="lr-tb"/>
    </style:style>
    <style:style style:name="gr98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03cm" loext:decorative="false"/>
      <style:paragraph-properties style:writing-mode="lr-tb"/>
    </style:style>
    <style:style style:name="gr98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98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8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9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9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99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9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9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9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99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9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9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9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100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00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00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00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cm" loext:decorative="false"/>
      <style:paragraph-properties style:writing-mode="lr-tb"/>
    </style:style>
    <style:style style:name="gr1004"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248cm" fo:min-width="2.648cm" loext:decorative="false"/>
      <style:paragraph-properties style:writing-mode="lr-tb"/>
    </style:style>
    <style:style style:name="gr1005" style:family="graphic" style:parent-style-name="standard" style:list-style-name="L1">
      <style:graphic-properties draw:stroke="none" svg:stroke-color="#000000" draw:fill="none" draw:fill-color="#ffffff" draw:textarea-horizontal-align="left" draw:auto-grow-height="true" draw:auto-grow-width="true" draw:fit-to-size="false" style:shrink-to-fit="true" fo:min-height="0.21cm" fo:min-width="2.098cm" loext:decorative="false"/>
      <style:paragraph-properties style:writing-mode="lr-tb"/>
    </style:style>
    <style:style style:name="gr1006" style:family="graphic" style:parent-style-name="objectwithoutfill">
      <style:graphic-properties svg:stroke-width="0cm" draw:marker-start-width="0.2cm" draw:marker-end="Arrowheads_20_5" draw:marker-end-width="0.3cm" draw:fill="none" draw:textarea-horizontal-align="center" draw:textarea-vertical-align="middle" fo:padding-top="0.125cm" fo:padding-bottom="0.125cm" fo:padding-left="0.25cm" fo:padding-right="0.25cm" loext:decorative="false"/>
    </style:style>
    <style:style style:name="gr1007" style:family="graphic" style:parent-style-name="objectwithoutfill">
      <style:graphic-properties svg:stroke-color="#ed1c24" draw:marker-end="Arrowheads_20_1" draw:marker-end-width="0.3cm" draw:fill="none" draw:textarea-horizontal-align="center" draw:textarea-vertical-align="middle" loext:decorative="false"/>
    </style:style>
    <style:style style:name="gr1008" style:family="graphic" style:parent-style-name="objectwithoutfill">
      <style:graphic-properties svg:stroke-width="0cm" svg:stroke-color="#0066b3" draw:marker-start-width="0.2cm" draw:marker-end="Arrowheads_20_5" draw:marker-end-width="0.3cm" draw:fill="none" draw:textarea-horizontal-align="center" draw:textarea-vertical-align="middle" fo:padding-top="0.125cm" fo:padding-bottom="0.125cm" fo:padding-left="0.25cm" fo:padding-right="0.25cm" loext:decorative="false"/>
    </style:style>
    <style:style style:name="gr1009" style:family="graphic" style:parent-style-name="objectwithoutfill">
      <style:graphic-properties svg:stroke-color="#000000" draw:fill="none" draw:textarea-vertical-align="middle" loext:decorative="false"/>
    </style:style>
    <style:style style:name="gr1010" style:family="graphic" style:parent-style-name="objectwithoutfill">
      <style:graphic-properties svg:stroke-width="0cm" svg:stroke-color="#000000" draw:marker-start-width="0.2cm" draw:marker-end="" draw:marker-end-width="0.3cm" draw:fill="none" draw:textarea-horizontal-align="center" draw:textarea-vertical-align="middle" fo:padding-top="0.125cm" fo:padding-bottom="0.125cm" fo:padding-left="0.25cm" fo:padding-right="0.25cm" loext:decorative="false"/>
    </style:style>
    <style:style style:name="gr1011" style:family="graphic" style:parent-style-name="objectwithoutfill">
      <style:graphic-properties svg:stroke-width="0cm" svg:stroke-color="#000000" draw:marker-start-width="0.2cm" draw:marker-end="Arrowheads_20_5" draw:marker-end-width="0cm" draw:fill="none" draw:textarea-horizontal-align="center" draw:textarea-vertical-align="middle" fo:padding-top="0.125cm" fo:padding-bottom="0.125cm" fo:padding-left="0.25cm" fo:padding-right="0.25cm" loext:decorative="false"/>
    </style:style>
    <style:style style:name="gr1012" style:family="graphic" style:parent-style-name="objectwithoutfill">
      <style:graphic-properties svg:stroke-width="0cm" svg:stroke-color="#000000" draw:marker-start-width="0.2cm" draw:marker-end-width="0cm" draw:fill="none" draw:textarea-vertical-align="middle" fo:padding-top="0.125cm" fo:padding-bottom="0.125cm" fo:padding-left="0.25cm" fo:padding-right="0.25cm" loext:decorative="false"/>
    </style:style>
    <style:style style:name="gr1013" style:family="graphic" style:parent-style-name="Standard_5f_1">
      <style:graphic-properties draw:stroke="none" svg:stroke-color="#000000" draw:fill="none" draw:fill-color="#ffffff" draw:textarea-horizontal-align="left" draw:auto-grow-height="true" draw:auto-grow-width="true" fo:min-height="0.712cm" fo:min-width="0.355cm" loext:decorative="false"/>
      <style:paragraph-properties style:writing-mode="lr-tb"/>
    </style:style>
    <style:style style:name="gr1014" style:family="graphic" style:parent-style-name="objectwithoutfill">
      <style:graphic-properties svg:stroke-color="#0066b3" draw:fill="none" draw:textarea-vertical-align="middle" loext:decorative="false"/>
    </style:style>
    <style:style style:name="gr1015" style:family="graphic" style:parent-style-name="Standard_5f_1">
      <style:graphic-properties svg:stroke-color="#0066b3" draw:fill-color="#0066b3" draw:textarea-horizontal-align="justify" draw:textarea-vertical-align="middle" draw:auto-grow-height="false" fo:min-height="0cm" fo:min-width="0cm" style:protect="size" loext:decorative="false"/>
    </style:style>
    <style:style style:name="gr1016" style:family="graphic" style:parent-style-name="objectwithoutfill">
      <style:graphic-properties svg:stroke-width="0cm" svg:stroke-color="#0066b3" draw:marker-start-width="0.2cm" draw:marker-end="" draw:marker-end-width="0.3cm" draw:fill="none" draw:textarea-horizontal-align="center" draw:textarea-vertical-align="middle" fo:padding-top="0.125cm" fo:padding-bottom="0.125cm" fo:padding-left="0.25cm" fo:padding-right="0.25cm" loext:decorative="false"/>
    </style:style>
    <style:style style:name="gr1017" style:family="graphic" style:parent-style-name="Standard_5f_1">
      <style:graphic-properties svg:stroke-color="#000000" draw:fill="none" draw:textarea-vertical-align="middle" draw:auto-grow-height="false" fo:min-height="0.888cm" fo:min-width="0cm" loext:decorative="false"/>
    </style:style>
    <style:style style:name="gr1018" style:family="graphic" style:parent-style-name="Standard_5f_1">
      <style:graphic-properties draw:stroke="none" svg:stroke-color="#000000" draw:fill="none" draw:fill-color="#ffffff" draw:textarea-horizontal-align="left" draw:auto-grow-height="true" draw:auto-grow-width="true" fo:min-height="0.475cm" fo:min-width="1.56cm" loext:decorative="false"/>
      <style:paragraph-properties style:writing-mode="lr-tb"/>
    </style:style>
    <style:style style:name="gr1019" style:family="graphic" style:parent-style-name="Standard_5f_1">
      <style:graphic-properties draw:stroke="none" svg:stroke-color="#000000" draw:fill="none" draw:fill-color="#ffffff" draw:textarea-horizontal-align="left" draw:auto-grow-height="true" draw:auto-grow-width="true" fo:min-height="0.475cm" fo:min-width="0.92cm" loext:decorative="false"/>
      <style:paragraph-properties style:writing-mode="lr-tb"/>
    </style:style>
    <style:style style:name="gr1020" style:family="graphic" style:parent-style-name="Standard_5f_1">
      <style:graphic-properties draw:stroke="dash" draw:stroke-dash="Long_20_Dot" svg:stroke-color="#000000" draw:fill="none" draw:textarea-horizontal-align="justify" draw:textarea-vertical-align="middle" draw:auto-grow-height="false" fo:min-height="0.882cm" fo:min-width="0.208cm" style:writing-mode="lr-tb" loext:decorative="false"/>
      <style:paragraph-properties style:writing-mode="lr-tb"/>
    </style:style>
    <style:style style:name="gr1021" style:family="graphic" style:parent-style-name="Standard_5f_1">
      <style:graphic-properties draw:stroke="none" svg:stroke-color="#000000" draw:fill="none" draw:fill-color="#ffffff" draw:textarea-horizontal-align="left" draw:auto-grow-height="true" draw:auto-grow-width="true" fo:min-height="0.475cm" fo:min-width="3.287cm" loext:decorative="false"/>
      <style:paragraph-properties style:writing-mode="lr-tb"/>
    </style:style>
    <style:style style:name="gr1022" style:family="graphic" style:parent-style-name="Standard_5f_1">
      <style:graphic-properties draw:stroke="none" svg:stroke-color="#000000" draw:fill="none" draw:fill-color="#ffffff" draw:textarea-horizontal-align="left" draw:auto-grow-height="true" draw:auto-grow-width="true" fo:min-height="0.475cm" fo:min-width="8.045cm" loext:decorative="false"/>
      <style:paragraph-properties style:writing-mode="lr-tb"/>
    </style:style>
    <style:style style:name="gr1023" style:family="graphic" style:parent-style-name="objectwithoutfill">
      <style:graphic-properties svg:stroke-color="#000000" draw:fill="none" draw:fill-color="#ffffff" draw:textarea-vertical-align="middle" loext:decorative="false"/>
    </style:style>
    <style:style style:name="gr1024" style:family="graphic" style:parent-style-name="Standard_5f_1">
      <style:graphic-properties draw:stroke="none" svg:stroke-color="#000000" draw:fill="none" draw:fill-color="#ffffff" draw:textarea-horizontal-align="left" draw:auto-grow-height="true" draw:auto-grow-width="true" fo:min-height="0.475cm" fo:min-width="0.476cm" loext:decorative="false"/>
      <style:paragraph-properties style:writing-mode="lr-tb"/>
    </style:style>
    <style:style style:name="gr1025" style:family="graphic" style:parent-style-name="Standard_5f_1">
      <style:graphic-properties svg:stroke-color="#729fcf" draw:fill="solid" draw:fill-color="#ffffff" draw:textarea-horizontal-align="justify" draw:textarea-vertical-align="middle" draw:auto-grow-height="false" fo:min-height="12.75cm" fo:min-width="0cm" loext:decorative="false"/>
    </style:style>
    <style:style style:name="gr1026" style:family="graphic" style:parent-style-name="Standard_5f_1">
      <style:graphic-properties draw:stroke="none" svg:stroke-color="#000000" draw:fill="none" draw:fill-color="#ffffff" draw:textarea-horizontal-align="left" draw:auto-grow-height="true" draw:auto-grow-width="true" fo:min-height="0.556cm" fo:min-width="1.297cm" loext:decorative="false"/>
      <style:paragraph-properties style:writing-mode="lr-tb"/>
    </style:style>
    <style:style style:name="gr1027" style:family="graphic" style:parent-style-name="Standard_5f_1">
      <style:graphic-properties draw:stroke="none" svg:stroke-color="#000000" draw:fill="none" draw:fill-color="#ffffff" draw:textarea-horizontal-align="left" draw:auto-grow-height="true" draw:auto-grow-width="true" fo:min-height="0.556cm" fo:min-width="1.077cm" loext:decorative="false"/>
      <style:paragraph-properties style:writing-mode="lr-tb"/>
    </style:style>
    <style:style style:name="gr1028" style:family="graphic" style:parent-style-name="Standard_5f_1">
      <style:graphic-properties draw:stroke="none" svg:stroke-color="#000000" draw:fill="none" draw:fill-color="#ffffff" draw:textarea-horizontal-align="left" draw:auto-grow-height="true" draw:auto-grow-width="true" fo:min-height="0.556cm" fo:min-width="1.956cm" loext:decorative="false"/>
      <style:paragraph-properties style:writing-mode="lr-tb"/>
    </style:style>
    <style:style style:name="gr1029" style:family="graphic" style:parent-style-name="Standard_5f_1">
      <style:graphic-properties draw:stroke="none" svg:stroke-color="#000000" draw:fill="none" draw:fill-color="#ffffff" draw:textarea-horizontal-align="left" draw:auto-grow-height="true" draw:auto-grow-width="true" fo:min-height="0.556cm" fo:min-width="2.093cm" loext:decorative="false"/>
      <style:paragraph-properties style:writing-mode="lr-tb"/>
    </style:style>
    <style:style style:name="gr1030" style:family="graphic" style:parent-style-name="objectwithoutfill">
      <style:graphic-properties svg:stroke-width="0cm" draw:marker-start-width="0.2cm" draw:marker-end="Arrow_20_short" draw:marker-end-width="0.3cm" draw:fill="none" draw:textarea-horizontal-align="center" draw:textarea-vertical-align="middle" fo:padding-top="0.125cm" fo:padding-bottom="0.125cm" fo:padding-left="0.25cm" fo:padding-right="0.25cm" loext:decorative="false"/>
    </style:style>
    <style:style style:name="gr1031" style:family="graphic" style:parent-style-name="objectwithoutfill">
      <style:graphic-properties svg:stroke-width="0cm" svg:stroke-color="#000000" draw:marker-start-width="0.35cm" draw:marker-end-width="0.35cm" draw:fill="none" draw:textarea-vertical-align="middle" fo:padding-top="0.125cm" fo:padding-bottom="0.125cm" fo:padding-left="0.25cm" fo:padding-right="0.25cm" loext:decorative="false"/>
    </style:style>
    <style:style style:name="gr1032" style:family="graphic" style:parent-style-name="objectwithoutfill">
      <style:graphic-properties svg:stroke-width="0cm" svg:stroke-color="#0066b3" draw:marker-start-width="0.35cm" draw:marker-end="Arrow_20_short" draw:marker-end-width="0.3cm" draw:fill="none" draw:textarea-horizontal-align="center" draw:textarea-vertical-align="middle" fo:padding-top="0.125cm" fo:padding-bottom="0.125cm" fo:padding-left="0.25cm" fo:padding-right="0.25cm" loext:decorative="false"/>
    </style:style>
    <style:style style:name="gr1033" style:family="graphic" style:parent-style-name="objectwithoutfill">
      <style:graphic-properties svg:stroke-width="0cm" svg:stroke-color="#0066b3" draw:marker-start-width="0.2cm" draw:marker-end-width="0cm" draw:fill="none" draw:textarea-vertical-align="middle" fo:padding-top="0.125cm" fo:padding-bottom="0.125cm" fo:padding-left="0.25cm" fo:padding-right="0.25cm" loext:decorative="false"/>
    </style:style>
    <style:style style:name="gr1034" style:family="graphic" style:parent-style-name="Standard_5f_1">
      <style:graphic-properties draw:stroke="none" svg:stroke-color="#000000" draw:fill="none" draw:fill-color="#ffffff" draw:textarea-horizontal-align="left" draw:auto-grow-height="true" draw:auto-grow-width="true" fo:min-height="0.475cm" fo:min-width="1.225cm" loext:decorative="false"/>
      <style:paragraph-properties style:writing-mode="lr-tb"/>
    </style:style>
    <style:style style:name="gr1035" style:family="graphic" style:parent-style-name="Standard_5f_1">
      <style:graphic-properties svg:stroke-color="#ed1c24" draw:fill-color="#ffffff" draw:textarea-horizontal-align="justify" draw:textarea-vertical-align="middle" draw:auto-grow-height="false" fo:min-height="1.75cm" fo:min-width="0.5cm" style:writing-mode="lr-tb" loext:decorative="false"/>
      <style:paragraph-properties style:writing-mode="lr-tb"/>
    </style:style>
    <style:style style:name="gr1036" style:family="graphic" style:parent-style-name="objectwithoutfill">
      <style:graphic-properties svg:stroke-color="#ed1c24" draw:fill="none" draw:textarea-vertical-align="middle" loext:decorative="false"/>
    </style:style>
    <style:style style:name="gr1037" style:family="graphic" style:parent-style-name="Standard_5f_1">
      <style:graphic-properties draw:stroke="none" svg:stroke-color="#000000" draw:fill="none" draw:fill-color="#ffffff" draw:textarea-horizontal-align="left" draw:auto-grow-height="true" draw:auto-grow-width="true" fo:min-height="0.475cm" fo:min-width="1.743cm" loext:decorative="false"/>
      <style:paragraph-properties style:writing-mode="lr-tb"/>
    </style:style>
    <style:style style:name="gr1038" style:family="graphic" style:parent-style-name="objectwithoutfill">
      <style:graphic-properties svg:stroke-color="#ed1c24" draw:fill="none" draw:fill-color="#ffffff" draw:textarea-vertical-align="middle" loext:decorative="false"/>
    </style:style>
    <style:style style:name="gr1039" style:family="graphic" style:parent-style-name="Standard_5f_1">
      <style:graphic-properties svg:stroke-color="#ed1c24" draw:fill-color="#ffffff" draw:textarea-horizontal-align="justify" draw:textarea-vertical-align="middle" draw:auto-grow-height="false" fo:min-height="3.25cm" fo:min-width="0.5cm" style:writing-mode="lr-tb" loext:decorative="false"/>
      <style:paragraph-properties style:writing-mode="lr-tb"/>
    </style:style>
    <style:style style:name="gr1040" style:family="graphic" style:parent-style-name="Standard_5f_1">
      <style:graphic-properties svg:stroke-color="#ed1c24" draw:fill-color="#ffffff" draw:textarea-horizontal-align="justify" draw:textarea-vertical-align="middle" draw:auto-grow-height="false" fo:min-height="3.75cm" fo:min-width="0.5cm" style:writing-mode="lr-tb" loext:decorative="false"/>
      <style:paragraph-properties style:writing-mode="lr-tb"/>
    </style:style>
    <style:style style:name="gr1041" style:family="graphic" style:parent-style-name="objectwithoutfill">
      <style:graphic-properties svg:stroke-width="0cm" svg:stroke-color="#ed1c24" draw:marker-start-width="0.2cm" draw:marker-end="Arrowheads_20_5" draw:marker-end-width="0.3cm" draw:fill="none" draw:textarea-horizontal-align="center" draw:textarea-vertical-align="middle" fo:padding-top="0.125cm" fo:padding-bottom="0.125cm" fo:padding-left="0.25cm" fo:padding-right="0.25cm" loext:decorative="false"/>
    </style:style>
    <style:style style:name="gr1042" style:family="graphic" style:parent-style-name="Standard_5f_1">
      <style:graphic-properties draw:stroke="none" svg:stroke-color="#000000" draw:fill="none" draw:fill-color="#ffffff" draw:textarea-horizontal-align="left" draw:auto-grow-height="true" draw:auto-grow-width="false" fo:min-height="0.475cm" fo:min-width="0cm" loext:decorative="false"/>
      <style:paragraph-properties style:writing-mode="lr-tb"/>
    </style:style>
    <style:style style:name="gr1043" style:family="graphic" style:parent-style-name="standard">
      <style:graphic-properties svg:stroke-color="#000000" draw:fill-color="#ffff00" draw:textarea-horizontal-align="left" draw:textarea-vertical-align="bottom" draw:auto-grow-height="false" fo:min-height="2.75cm" fo:min-width="2cm" style:writing-mode="lr-tb" loext:decorative="false"/>
      <style:paragraph-properties style:writing-mode="lr-tb"/>
    </style:style>
    <style:style style:name="gr104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878cm" loext:decorative="false"/>
      <style:paragraph-properties style:writing-mode="lr-tb"/>
    </style:style>
    <style:style style:name="gr104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648cm" loext:decorative="false"/>
      <style:paragraph-properties style:writing-mode="lr-tb"/>
    </style:style>
    <style:style style:name="gr104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1cm" loext:decorative="false"/>
      <style:paragraph-properties style:writing-mode="lr-tb"/>
    </style:style>
    <style:style style:name="gr1047" style:family="graphic" style:parent-style-name="standard">
      <style:graphic-properties svg:stroke-color="#000000" draw:textarea-horizontal-align="center" draw:textarea-vertical-align="middle" draw:auto-grow-height="false" fo:min-height="0.75cm" fo:min-width="0cm" style:writing-mode="lr-tb" loext:decorative="false"/>
      <style:paragraph-properties style:writing-mode="lr-tb"/>
    </style:style>
    <style:style style:name="gr1048" style:family="graphic" style:parent-style-name="standard">
      <style:graphic-properties svg:stroke-color="#000000" draw:fill-color="#ffff00" draw:textarea-horizontal-align="left" draw:textarea-vertical-align="bottom" draw:auto-grow-height="false" fo:min-height="2.25cm" fo:min-width="3.006cm" style:writing-mode="lr-tb" loext:decorative="false"/>
      <style:paragraph-properties style:writing-mode="lr-tb"/>
    </style:style>
    <style:style style:name="gr104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05cm" loext:decorative="false"/>
      <style:paragraph-properties style:writing-mode="lr-tb"/>
    </style:style>
    <style:style style:name="gr1050" style:family="graphic" style:parent-style-name="standard">
      <style:graphic-properties svg:stroke-color="#000000" draw:fill-color="#ffff00" draw:textarea-horizontal-align="left" draw:textarea-vertical-align="bottom" draw:auto-grow-height="false" fo:min-height="1.75cm" fo:min-width="1cm" style:writing-mode="lr-tb" loext:decorative="false"/>
      <style:paragraph-properties style:writing-mode="lr-tb"/>
    </style:style>
    <style:style style:name="gr105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79cm" loext:decorative="false"/>
      <style:paragraph-properties style:writing-mode="lr-tb"/>
    </style:style>
    <style:style style:name="gr105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54cm" loext:decorative="false"/>
      <style:paragraph-properties style:writing-mode="lr-tb"/>
    </style:style>
    <style:style style:name="gr105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184cm" loext:decorative="false"/>
      <style:paragraph-properties style:writing-mode="lr-tb"/>
    </style:style>
    <style:style style:name="gr1054" style:family="graphic" style:parent-style-name="standard">
      <style:graphic-properties svg:stroke-color="#000000" draw:fill-color="#ffff00" draw:textarea-horizontal-align="left" draw:textarea-vertical-align="bottom" draw:auto-grow-height="false" fo:min-height="0.75cm" fo:min-width="2.107cm" style:writing-mode="lr-tb" loext:decorative="false"/>
      <style:paragraph-properties style:writing-mode="lr-tb"/>
    </style:style>
    <style:style style:name="gr105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279cm" loext:decorative="false"/>
      <style:paragraph-properties style:writing-mode="lr-tb"/>
    </style:style>
    <style:style style:name="gr105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948cm" loext:decorative="false"/>
      <style:paragraph-properties style:writing-mode="lr-tb"/>
    </style:style>
    <style:style style:name="gr105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278cm" loext:decorative="false"/>
      <style:paragraph-properties style:writing-mode="lr-tb"/>
    </style:style>
    <style:style style:name="gr105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802cm" loext:decorative="false"/>
      <style:paragraph-properties style:writing-mode="lr-tb"/>
    </style:style>
    <style:style style:name="gr105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78cm" loext:decorative="false"/>
      <style:paragraph-properties style:writing-mode="lr-tb"/>
    </style:style>
    <style:style style:name="gr106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626cm" loext:decorative="false"/>
      <style:paragraph-properties style:writing-mode="lr-tb"/>
    </style:style>
    <style:style style:name="gr106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343cm" loext:decorative="false"/>
      <style:paragraph-properties style:writing-mode="lr-tb"/>
    </style:style>
    <style:style style:name="gr106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601cm" loext:decorative="false"/>
      <style:paragraph-properties style:writing-mode="lr-tb"/>
    </style:style>
    <style:style style:name="gr106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38cm" loext:decorative="false"/>
      <style:paragraph-properties style:writing-mode="lr-tb"/>
    </style:style>
    <style:style style:name="gr106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7cm" loext:decorative="false"/>
      <style:paragraph-properties style:writing-mode="lr-tb"/>
    </style:style>
    <style:style style:name="gr106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617cm" loext:decorative="false"/>
      <style:paragraph-properties style:writing-mode="lr-tb"/>
    </style:style>
    <style:style style:name="gr106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712cm" loext:decorative="false"/>
      <style:paragraph-properties style:writing-mode="lr-tb"/>
    </style:style>
    <style:style style:name="gr1067" style:family="graphic" style:parent-style-name="standard">
      <style:graphic-properties draw:stroke="none" draw:fill="none" fo:min-height="0.476cm" loext:decorative="false"/>
      <style:paragraph-properties style:writing-mode="lr-tb"/>
    </style:style>
    <style:style style:name="gr1068" style:family="graphic" style:parent-style-name="Standard_5f_1">
      <style:graphic-properties draw:stroke="none" svg:stroke-color="#000000" draw:fill="none" draw:fill-color="#ffffff" draw:textarea-horizontal-align="left" draw:auto-grow-height="true" draw:auto-grow-width="true" fo:min-height="0.475cm" fo:min-width="3.085cm" loext:decorative="false"/>
      <style:paragraph-properties style:writing-mode="lr-tb"/>
    </style:style>
    <style:style style:name="gr1069" style:family="graphic" style:parent-style-name="standard">
      <style:graphic-properties svg:stroke-color="#000000" draw:fill-color="#ffff00" draw:textarea-horizontal-align="left" draw:textarea-vertical-align="bottom" draw:auto-grow-height="false" fo:min-height="3.277cm" fo:min-width="3.5cm" style:writing-mode="lr-tb" loext:decorative="false"/>
      <style:paragraph-properties style:writing-mode="lr-tb"/>
    </style:style>
    <style:style style:name="gr1070" style:family="graphic" style:parent-style-name="standard">
      <style:graphic-properties draw:stroke="none" svg:stroke-color="#000000" draw:fill="none" draw:fill-color="#ffffff" draw:textarea-horizontal-align="left" draw:auto-grow-height="true" draw:auto-grow-width="true" fo:min-height="0.319cm" fo:min-width="1.516cm" loext:decorative="false"/>
      <style:paragraph-properties style:writing-mode="lr-tb"/>
    </style:style>
    <style:style style:name="gr1071" style:family="graphic" style:parent-style-name="standard">
      <style:graphic-properties draw:stroke="none" svg:stroke-color="#000000" draw:fill="none" draw:fill-color="#ffffff" draw:textarea-horizontal-align="left" draw:auto-grow-height="true" draw:auto-grow-width="true" fo:min-height="0.319cm" fo:min-width="1.279cm" loext:decorative="false"/>
      <style:paragraph-properties style:writing-mode="lr-tb"/>
    </style:style>
    <style:style style:name="gr1072" style:family="graphic" style:parent-style-name="standard">
      <style:graphic-properties draw:stroke="none" svg:stroke-color="#000000" draw:fill="none" draw:fill-color="#ffffff" draw:textarea-horizontal-align="left" draw:auto-grow-height="true" draw:auto-grow-width="true" fo:min-height="0.319cm" fo:min-width="1.011cm" loext:decorative="false"/>
      <style:paragraph-properties style:writing-mode="lr-tb"/>
    </style:style>
    <style:style style:name="gr1073" style:family="graphic" style:parent-style-name="standard">
      <style:graphic-properties draw:stroke="none" svg:stroke-color="#000000" draw:fill="none" draw:fill-color="#ffffff" draw:textarea-horizontal-align="left" draw:auto-grow-height="true" draw:auto-grow-width="true" fo:min-height="0.319cm" fo:min-width="1.147cm" loext:decorative="false"/>
      <style:paragraph-properties style:writing-mode="lr-tb"/>
    </style:style>
    <style:style style:name="gr1074" style:family="graphic" style:parent-style-name="standard">
      <style:graphic-properties draw:stroke="none" svg:stroke-color="#000000" draw:fill="none" draw:fill-color="#ffffff" draw:textarea-horizontal-align="left" draw:auto-grow-height="true" draw:auto-grow-width="true" fo:min-height="0.319cm" fo:min-width="1.153cm" loext:decorative="false"/>
      <style:paragraph-properties style:writing-mode="lr-tb"/>
    </style:style>
    <style:style style:name="gr1075" style:family="graphic" style:parent-style-name="standard">
      <style:graphic-properties draw:stroke="none" svg:stroke-color="#000000" draw:fill="none" draw:fill-color="#ffffff" draw:textarea-horizontal-align="left" draw:auto-grow-height="true" draw:auto-grow-width="true" fo:min-height="0.319cm" fo:min-width="0.821cm" loext:decorative="false"/>
      <style:paragraph-properties style:writing-mode="lr-tb"/>
    </style:style>
    <style:style style:name="gr1076" style:family="graphic" style:parent-style-name="standard">
      <style:graphic-properties draw:stroke="none" svg:stroke-color="#000000" draw:fill="none" draw:fill-color="#ffffff" draw:textarea-horizontal-align="left" draw:auto-grow-height="true" draw:auto-grow-width="true" fo:min-height="0.319cm" fo:min-width="0.995cm" loext:decorative="false"/>
      <style:paragraph-properties style:writing-mode="lr-tb"/>
    </style:style>
    <style:style style:name="gr1077" style:family="graphic" style:parent-style-name="standard">
      <style:graphic-properties draw:stroke="none" svg:stroke-color="#000000" draw:fill="none" draw:fill-color="#ffffff" draw:textarea-horizontal-align="left" draw:auto-grow-height="true" draw:auto-grow-width="true" fo:min-height="0.319cm" fo:min-width="0.769cm" loext:decorative="false"/>
      <style:paragraph-properties style:writing-mode="lr-tb"/>
    </style:style>
    <style:style style:name="gr1078" style:family="graphic" style:parent-style-name="standard">
      <style:graphic-properties draw:stroke="none" svg:stroke-color="#000000" draw:fill="none" draw:fill-color="#ffffff" draw:textarea-horizontal-align="left" draw:auto-grow-height="true" draw:auto-grow-width="true" fo:min-height="0.319cm" fo:min-width="1.546cm" loext:decorative="false"/>
      <style:paragraph-properties style:writing-mode="lr-tb"/>
    </style:style>
    <style:style style:name="gr1079" style:family="graphic" style:parent-style-name="standard">
      <style:graphic-properties draw:stroke="none" svg:stroke-color="#000000" draw:fill="none" draw:fill-color="#ffffff" draw:textarea-horizontal-align="left" draw:auto-grow-height="true" draw:auto-grow-width="true" fo:min-height="0.319cm" fo:min-width="1.169cm" loext:decorative="false"/>
      <style:paragraph-properties style:writing-mode="lr-tb"/>
    </style:style>
    <style:style style:name="gr1080" style:family="graphic" style:parent-style-name="standard">
      <style:graphic-properties draw:stroke="none" svg:stroke-color="#000000" draw:fill="none" draw:fill-color="#ffffff" draw:textarea-horizontal-align="left" draw:auto-grow-height="true" draw:auto-grow-width="true" fo:min-height="0.319cm" fo:min-width="0.916cm" loext:decorative="false"/>
      <style:paragraph-properties style:writing-mode="lr-tb"/>
    </style:style>
    <style:style style:name="gr1081" style:family="graphic" style:parent-style-name="standard">
      <style:graphic-properties draw:stroke="none" svg:stroke-color="#000000" draw:fill="none" draw:fill-color="#ffffff" draw:textarea-horizontal-align="left" draw:auto-grow-height="true" draw:auto-grow-width="true" fo:min-height="1.897cm" fo:min-width="10.073cm" loext:decorative="false"/>
      <style:paragraph-properties style:writing-mode="lr-tb"/>
    </style:style>
    <style:style style:name="gr1082" style:family="graphic" style:parent-style-name="Standard_5f_1">
      <style:graphic-properties draw:stroke="none" svg:stroke-color="#000000" draw:fill="none" draw:fill-color="#ffffff" draw:textarea-horizontal-align="left" draw:auto-grow-height="true" draw:auto-grow-width="true" fo:min-height="0.475cm" fo:min-width="1.367cm" loext:decorative="false"/>
      <style:paragraph-properties style:writing-mode="lr-tb"/>
    </style:style>
    <style:style style:name="gr108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944cm" loext:decorative="false"/>
      <style:paragraph-properties style:writing-mode="lr-tb"/>
    </style:style>
    <style:style style:name="gr1084" style:family="graphic" style:parent-style-name="standard">
      <style:graphic-properties draw:stroke="none" svg:stroke-color="#000000" draw:fill="none" draw:fill-color="#ffffff" draw:textarea-horizontal-align="left" draw:auto-grow-height="true" draw:auto-grow-width="true" fo:min-height="1.423cm" fo:min-width="2.802cm" loext:decorative="false"/>
      <style:paragraph-properties style:writing-mode="lr-tb"/>
    </style:style>
    <style:style style:name="gr1085" style:family="graphic" style:parent-style-name="objectwithoutfill">
      <style:graphic-properties svg:stroke-color="#ff0000" draw:marker-end="Linienspitzen_20_21" draw:marker-end-width="0.3cm" draw:fill="none" draw:textarea-vertical-align="middle" loext:decorative="false"/>
    </style:style>
    <style:style style:name="gr1086" style:family="graphic" style:parent-style-name="objectwithoutfill">
      <style:graphic-properties svg:stroke-color="#ff0000" draw:fill="none" draw:textarea-vertical-align="middle" loext:decorative="false"/>
    </style:style>
    <style:style style:name="gr1087" style:family="graphic" style:parent-style-name="standard">
      <style:graphic-properties draw:stroke="none" svg:stroke-color="#000000" draw:fill="none" draw:fill-color="#ffffff" draw:textarea-horizontal-align="left" draw:auto-grow-height="true" draw:auto-grow-width="true" fo:min-height="1.897cm" fo:min-width="2.8cm" loext:decorative="false"/>
      <style:paragraph-properties style:writing-mode="lr-tb"/>
    </style:style>
    <style:style style:name="gr1088" style:family="graphic" style:parent-style-name="objectwithoutfill">
      <style:graphic-properties svg:stroke-color="#ff0000" draw:marker-end="Linienspitzen_20_22" draw:marker-end-width="0.3cm" draw:fill="none" draw:textarea-vertical-align="middle" loext:decorative="false"/>
    </style:style>
    <style:style style:name="gr1089" style:family="graphic" style:parent-style-name="objectwithoutfill">
      <style:graphic-properties svg:stroke-color="#ff0000" draw:marker-end="Linienspitzen_20_23" draw:marker-end-width="0.3cm" draw:fill="none" draw:textarea-vertical-align="middle" loext:decorative="false"/>
    </style:style>
    <style:style style:name="gr1090" style:family="graphic" style:parent-style-name="objectwithoutfill">
      <style:graphic-properties svg:stroke-color="#ff0000" draw:marker-end="Linienspitzen_20_24" draw:marker-end-width="0.3cm" draw:fill="none" draw:textarea-vertical-align="middle" loext:decorative="false"/>
    </style:style>
    <style:style style:name="gr1091" style:family="graphic" style:parent-style-name="standard">
      <style:graphic-properties svg:stroke-color="#000000" draw:fill-color="#ffff00" draw:textarea-horizontal-align="justify" draw:textarea-vertical-align="middle" draw:auto-grow-height="false" fo:min-height="0.75cm" fo:min-width="0.5cm" style:writing-mode="lr-tb" loext:decorative="false"/>
      <style:paragraph-properties style:writing-mode="lr-tb"/>
    </style:style>
    <style:style style:name="gr1092" style:family="graphic" style:parent-style-name="Standard_5f_1">
      <style:graphic-properties draw:stroke="none" svg:stroke-color="#000000" draw:fill="none" draw:fill-color="#ffffff" draw:textarea-horizontal-align="left" draw:auto-grow-height="true" draw:auto-grow-width="true" fo:min-height="0.475cm" fo:min-width="1.084cm" loext:decorative="false"/>
      <style:paragraph-properties style:writing-mode="lr-tb"/>
    </style:style>
    <style:style style:name="gr1093" style:family="graphic" style:parent-style-name="objectwithoutfill">
      <style:graphic-properties draw:marker-end="Linienspitzen_20_26" draw:marker-end-width="0.3cm" draw:fill="none" draw:textarea-vertical-align="middle" loext:decorative="false"/>
    </style:style>
    <style:style style:name="gr109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06cm" loext:decorative="false"/>
      <style:paragraph-properties style:writing-mode="lr-tb"/>
    </style:style>
    <style:style style:name="gr1095" style:family="graphic" style:parent-style-name="objectwithoutfill">
      <style:graphic-properties draw:marker-end="Linienspitzen_20_27" draw:marker-end-width="0.3cm" draw:fill="none" draw:textarea-vertical-align="middle" loext:decorative="false"/>
    </style:style>
    <style:style style:name="gr109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83cm" loext:decorative="false"/>
      <style:paragraph-properties style:writing-mode="lr-tb"/>
    </style:style>
    <style:style style:name="gr109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161cm" loext:decorative="false"/>
      <style:paragraph-properties style:writing-mode="lr-tb"/>
    </style:style>
    <style:style style:name="gr1098" style:family="graphic" style:parent-style-name="Standard_5f_1">
      <style:graphic-properties svg:stroke-color="#ff0000" draw:fill-color="#ff0000" draw:textarea-horizontal-align="justify" draw:textarea-vertical-align="middle" draw:auto-grow-height="false" fo:min-height="0cm" fo:min-width="0cm" style:protect="size" loext:decorative="false"/>
    </style:style>
    <style:style style:name="gr1099" style:family="graphic" style:parent-style-name="standard">
      <style:graphic-properties svg:stroke-color="#000000" draw:fill-color="#ffff00" draw:textarea-horizontal-align="justify" draw:textarea-vertical-align="middle" draw:auto-grow-height="false" fo:min-height="1.75cm" fo:min-width="1.5cm" style:writing-mode="lr-tb" loext:decorative="false"/>
      <style:paragraph-properties style:writing-mode="lr-tb"/>
    </style:style>
    <style:style style:name="gr110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755cm" loext:decorative="false"/>
      <style:paragraph-properties style:writing-mode="lr-tb"/>
    </style:style>
    <style:style style:name="gr1101" style:family="graphic" style:parent-style-name="Standard_5f_1">
      <style:graphic-properties draw:stroke="none" svg:stroke-color="#000000" draw:fill="none" draw:fill-color="#ffffff" draw:textarea-horizontal-align="left" draw:auto-grow-height="true" draw:auto-grow-width="true" fo:min-height="0.475cm" fo:min-width="0.237cm" loext:decorative="false"/>
      <style:paragraph-properties style:writing-mode="lr-tb"/>
    </style:style>
    <style:style style:name="gr1102" style:family="graphic" style:parent-style-name="objectwithoutfill">
      <style:graphic-properties draw:marker-end="Linienspitzen_20_28" draw:marker-end-width="0.3cm" draw:fill="none" draw:textarea-vertical-align="middle" loext:decorative="false"/>
    </style:style>
    <style:style style:name="gr1103" style:family="graphic" style:parent-style-name="objectwithoutfill">
      <style:graphic-properties draw:marker-end="Linienspitzen_20_29" draw:marker-end-width="0.3cm" draw:fill="none" draw:textarea-vertical-align="middle" loext:decorative="false"/>
    </style:style>
    <style:style style:name="gr1104" style:family="graphic" style:parent-style-name="objectwithoutfill">
      <style:graphic-properties svg:stroke-width="0.1cm" svg:stroke-color="#ff0000" draw:marker-start-width="0.35cm" draw:marker-end-width="0.35cm" draw:fill="none" draw:textarea-vertical-align="middle" fo:padding-top="0.175cm" fo:padding-bottom="0.175cm" fo:padding-left="0.3cm" fo:padding-right="0.3cm" loext:decorative="false"/>
    </style:style>
    <style:style style:name="gr1105" style:family="graphic" style:parent-style-name="Standard_5f_1">
      <style:graphic-properties draw:stroke="none" svg:stroke-color="#000000" draw:fill="none" draw:fill-color="#ffffff" draw:textarea-horizontal-align="left" draw:auto-grow-height="true" draw:auto-grow-width="true" fo:min-height="0.556cm" fo:min-width="9.693cm" loext:decorative="false"/>
      <style:paragraph-properties style:writing-mode="lr-tb"/>
    </style:style>
    <style:style style:name="gr1106" style:family="graphic" style:parent-style-name="objectwithoutfill">
      <style:graphic-properties draw:marker-end="Linienspitzen_20_47" draw:marker-end-width="0.3cm" draw:fill="none" draw:textarea-vertical-align="middle" loext:decorative="false"/>
    </style:style>
    <style:style style:name="gr1107" style:family="graphic" style:parent-style-name="objectwithoutfill">
      <style:graphic-properties draw:stroke="dash" draw:stroke-dash="Long_20_Dot" svg:stroke-width="0.1cm" svg:stroke-color="#ff0000" draw:marker-start-width="0.35cm" draw:marker-end-width="0.35cm" draw:fill="none" draw:textarea-vertical-align="middle" fo:padding-top="0.175cm" fo:padding-bottom="0.175cm" fo:padding-left="0.3cm" fo:padding-right="0.3cm" loext:decorative="false"/>
    </style:style>
    <style:style style:name="gr1108" style:family="graphic" style:parent-style-name="Standard_5f_1">
      <style:graphic-properties draw:stroke="none" svg:stroke-color="#000000" draw:fill="none" draw:fill-color="#ffffff" draw:textarea-horizontal-align="left" draw:auto-grow-height="true" draw:auto-grow-width="true" fo:min-height="1.111cm" fo:min-width="2.397cm" loext:decorative="false"/>
      <style:paragraph-properties style:writing-mode="lr-tb"/>
    </style:style>
    <style:style style:name="gr1109" style:family="graphic" style:parent-style-name="objectwithoutfill">
      <style:graphic-properties draw:marker-end="Linienspitzen_20_48" draw:marker-end-width="0.3cm" draw:fill="none" draw:textarea-vertical-align="middle" loext:decorative="false"/>
    </style:style>
    <style:style style:name="gr1110" style:family="graphic" style:parent-style-name="Standard_5f_1">
      <style:graphic-properties draw:stroke="none" svg:stroke-color="#000000" draw:fill="none" draw:fill-color="#ffffff" draw:textarea-horizontal-align="left" draw:auto-grow-height="true" draw:auto-grow-width="true" fo:min-height="0.556cm" fo:min-width="10.49cm" loext:decorative="false"/>
      <style:paragraph-properties style:writing-mode="lr-tb"/>
    </style:style>
    <style:style style:name="gr1111" style:family="graphic" style:parent-style-name="objectwithoutfill">
      <style:graphic-properties draw:marker-end="Linienspitzen_20_49" draw:marker-end-width="0.3cm" draw:fill="none" draw:textarea-vertical-align="middle" loext:decorative="false"/>
    </style:style>
    <style:style style:name="gr1112" style:family="graphic" style:parent-style-name="standard">
      <style:graphic-properties draw:textarea-horizontal-align="justify" draw:textarea-vertical-align="middle" draw:auto-grow-height="false" fo:min-height="0.6cm" fo:min-width="0cm" loext:decorative="false"/>
    </style:style>
    <style:style style:name="gr1113" style:family="graphic" style:parent-style-name="Standard_5f_1">
      <style:graphic-properties draw:stroke="none" svg:stroke-color="#000000" draw:fill="none" draw:fill-color="#ffffff" draw:textarea-horizontal-align="left" draw:auto-grow-height="true" draw:auto-grow-width="true" fo:min-height="0.475cm" fo:min-width="3.508cm" loext:decorative="false"/>
      <style:paragraph-properties style:writing-mode="lr-tb"/>
    </style:style>
    <style:style style:name="gr1114" style:family="graphic" style:parent-style-name="Standard_5f_1">
      <style:graphic-properties draw:stroke="none" svg:stroke-color="#000000" draw:fill="none" draw:fill-color="#ffffff" draw:textarea-horizontal-align="left" draw:auto-grow-height="true" draw:auto-grow-width="true" fo:min-height="0.475cm" fo:min-width="5.343cm" loext:decorative="false"/>
      <style:paragraph-properties style:writing-mode="lr-tb"/>
    </style:style>
    <style:style style:name="gr1115" style:family="graphic" style:parent-style-name="Standard_5f_1">
      <style:graphic-properties draw:stroke="none" svg:stroke-color="#000000" draw:fill="none" draw:fill-color="#ffffff" draw:textarea-horizontal-align="left" draw:auto-grow-height="true" draw:auto-grow-width="true" fo:min-height="0.475cm" fo:min-width="3.5cm" loext:decorative="false"/>
      <style:paragraph-properties style:writing-mode="lr-tb"/>
    </style:style>
    <style:style style:name="gr1116" style:family="graphic" style:parent-style-name="Standard_5f_1">
      <style:graphic-properties draw:stroke="none" svg:stroke-color="#000000" draw:fill="none" draw:fill-color="#ffffff" draw:textarea-horizontal-align="left" draw:auto-grow-height="true" draw:auto-grow-width="true" fo:min-height="0.475cm" fo:min-width="5.5cm" loext:decorative="false"/>
      <style:paragraph-properties style:writing-mode="lr-tb"/>
    </style:style>
    <style:style style:name="gr1117" style:family="graphic" style:parent-style-name="Standard_5f_1">
      <style:graphic-properties draw:stroke="none" svg:stroke-color="#000000" draw:fill="none" draw:fill-color="#ffffff" draw:textarea-horizontal-align="left" draw:auto-grow-height="true" draw:auto-grow-width="true" fo:min-height="0.475cm" fo:min-width="4.308cm" loext:decorative="false"/>
      <style:paragraph-properties style:writing-mode="lr-tb"/>
    </style:style>
    <style:style style:name="gr111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345cm" loext:decorative="false"/>
      <style:paragraph-properties style:writing-mode="lr-tb"/>
    </style:style>
    <style:style style:name="gr111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492cm" loext:decorative="false"/>
      <style:paragraph-properties style:writing-mode="lr-tb"/>
    </style:style>
    <style:style style:name="gr1120" style:family="graphic" style:parent-style-name="standard">
      <style:graphic-properties svg:stroke-color="#000000" draw:fill-color="#00a933" draw:textarea-vertical-align="middle" loext:decorative="false"/>
    </style:style>
    <style:style style:name="gr1121" style:family="graphic" style:parent-style-name="objectwithoutfill">
      <style:graphic-properties draw:marker-end="Arrow_20_short" draw:marker-end-width="0.3cm" draw:fill="none" draw:textarea-vertical-align="middle" loext:decorative="false"/>
    </style:style>
    <style:style style:name="gr112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683cm" loext:decorative="false"/>
      <style:paragraph-properties style:writing-mode="lr-tb"/>
    </style:style>
    <style:style style:name="gr112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19cm" loext:decorative="false"/>
      <style:paragraph-properties style:writing-mode="lr-tb"/>
    </style:style>
    <style:style style:name="gr112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547cm" loext:decorative="false"/>
      <style:paragraph-properties style:writing-mode="lr-tb"/>
    </style:style>
    <style:style style:name="gr112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04cm" loext:decorative="false"/>
      <style:paragraph-properties style:writing-mode="lr-tb"/>
    </style:style>
    <style:style style:name="gr112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41cm" loext:decorative="false"/>
      <style:paragraph-properties style:writing-mode="lr-tb"/>
    </style:style>
    <style:style style:name="gr112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997cm" loext:decorative="false"/>
      <style:paragraph-properties style:writing-mode="lr-tb"/>
    </style:style>
    <style:style style:name="gr112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288cm" loext:decorative="false"/>
      <style:paragraph-properties style:writing-mode="lr-tb"/>
    </style:style>
    <style:style style:name="gr112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35cm" loext:decorative="false"/>
      <style:paragraph-properties style:writing-mode="lr-tb"/>
    </style:style>
    <style:style style:name="gr113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013cm" loext:decorative="false"/>
      <style:paragraph-properties style:writing-mode="lr-tb"/>
    </style:style>
    <style:style style:name="gr113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57cm" loext:decorative="false"/>
      <style:paragraph-properties style:writing-mode="lr-tb"/>
    </style:style>
    <style:style style:name="gr113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178cm" loext:decorative="false"/>
      <style:paragraph-properties style:writing-mode="lr-tb"/>
    </style:style>
    <style:style style:name="gr113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88cm" loext:decorative="false"/>
      <style:paragraph-properties style:writing-mode="lr-tb"/>
    </style:style>
    <style:style style:name="gr1134" style:family="graphic" style:parent-style-name="standard">
      <style:graphic-properties draw:stroke="none" svg:stroke-color="#000000" draw:fill="none" draw:fill-color="#ffffff" draw:textarea-horizontal-align="left" draw:auto-grow-height="true" draw:auto-grow-width="true" fo:min-height="0.712cm" fo:min-width="14.59cm" loext:decorative="false"/>
      <style:paragraph-properties style:writing-mode="lr-tb"/>
    </style:style>
    <style:style style:name="gr1135" style:family="graphic" style:parent-style-name="Standard_5f_1">
      <style:graphic-properties svg:stroke-color="#729fcf" draw:fill="solid" draw:fill-color="#ffffff" draw:textarea-horizontal-align="justify" draw:textarea-vertical-align="middle" draw:auto-grow-height="false" fo:min-height="13.747cm" fo:min-width="0cm" loext:decorative="false"/>
    </style:style>
    <style:style style:name="gr1136" style:family="graphic" style:parent-style-name="objectwithoutfill">
      <style:graphic-properties svg:stroke-width="0cm" svg:stroke-color="#000000" draw:marker-start-width="0.35cm" draw:marker-end="Arrow_20_short" draw:marker-end-width="0.3cm" draw:fill="none" draw:textarea-horizontal-align="center" draw:textarea-vertical-align="middle" fo:padding-top="0.125cm" fo:padding-bottom="0.125cm" fo:padding-left="0.25cm" fo:padding-right="0.25cm" loext:decorative="false"/>
    </style:style>
    <style:style style:name="gr1137" style:family="graphic" style:parent-style-name="Standard_5f_1">
      <style:graphic-properties draw:stroke="none" svg:stroke-color="#000000" draw:fill="none" draw:fill-color="#ffffff" draw:textarea-horizontal-align="left" draw:auto-grow-height="true" draw:auto-grow-width="true" fo:min-height="0.319cm" fo:min-width="0.727cm" loext:decorative="false"/>
      <style:paragraph-properties style:writing-mode="lr-tb"/>
    </style:style>
    <style:style style:name="gr113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99cm" loext:decorative="false"/>
      <style:paragraph-properties style:writing-mode="lr-tb"/>
    </style:style>
    <style:style style:name="gr113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67cm" loext:decorative="false"/>
      <style:paragraph-properties style:writing-mode="lr-tb"/>
    </style:style>
    <style:style style:name="gr114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43cm" loext:decorative="false"/>
      <style:paragraph-properties style:writing-mode="lr-tb"/>
    </style:style>
    <style:style style:name="gr114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272cm" loext:decorative="false"/>
      <style:paragraph-properties style:writing-mode="lr-tb"/>
    </style:style>
    <style:style style:name="gr114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51cm" loext:decorative="false"/>
      <style:paragraph-properties style:writing-mode="lr-tb"/>
    </style:style>
    <style:style style:name="gr114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58cm" loext:decorative="false"/>
      <style:paragraph-properties style:writing-mode="lr-tb"/>
    </style:style>
    <style:style style:name="gr114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565cm" loext:decorative="false"/>
      <style:paragraph-properties style:writing-mode="lr-tb"/>
    </style:style>
    <style:style style:name="gr114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47cm" loext:decorative="false"/>
      <style:paragraph-properties style:writing-mode="lr-tb"/>
    </style:style>
    <style:style style:name="gr1146" style:family="graphic" style:parent-style-name="Standard_5f_1">
      <style:graphic-properties svg:stroke-color="#729fcf" draw:fill="solid" draw:fill-color="#ffffff" draw:textarea-horizontal-align="justify" draw:textarea-vertical-align="middle" draw:auto-grow-height="false" fo:min-height="0.75cm" fo:min-width="0cm" loext:decorative="false"/>
    </style:style>
    <style:style style:name="gr114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723cm" loext:decorative="false"/>
      <style:paragraph-properties style:writing-mode="lr-tb"/>
    </style:style>
    <style:style style:name="gr114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902cm" loext:decorative="false"/>
      <style:paragraph-properties style:writing-mode="lr-tb"/>
    </style:style>
    <style:style style:name="gr114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3cm" loext:decorative="false"/>
      <style:paragraph-properties style:writing-mode="lr-tb"/>
    </style:style>
    <style:style style:name="gr115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524cm" loext:decorative="false"/>
      <style:paragraph-properties style:writing-mode="lr-tb"/>
    </style:style>
    <style:style style:name="gr1151" style:family="graphic" style:parent-style-name="Standard_5f_1">
      <style:graphic-properties svg:stroke-color="#ed1c24" draw:fill-color="#ffffff" draw:textarea-horizontal-align="justify" draw:textarea-vertical-align="middle" draw:auto-grow-height="false" fo:min-height="0.75cm" fo:min-width="0.5cm" style:writing-mode="lr-tb" loext:decorative="false"/>
      <style:paragraph-properties style:writing-mode="lr-tb"/>
    </style:style>
    <style:style style:name="gr115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521cm" loext:decorative="false"/>
      <style:paragraph-properties style:writing-mode="lr-tb"/>
    </style:style>
    <style:style style:name="gr115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25cm" loext:decorative="false"/>
      <style:paragraph-properties style:writing-mode="lr-tb"/>
    </style:style>
    <style:style style:name="gr115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698cm" loext:decorative="false"/>
      <style:paragraph-properties style:writing-mode="lr-tb"/>
    </style:style>
    <style:style style:name="gr115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694cm" loext:decorative="false"/>
      <style:paragraph-properties style:writing-mode="lr-tb"/>
    </style:style>
    <style:style style:name="gr115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36cm" loext:decorative="false"/>
      <style:paragraph-properties style:writing-mode="lr-tb"/>
    </style:style>
    <style:style style:name="gr115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2cm" loext:decorative="false"/>
      <style:paragraph-properties style:writing-mode="lr-tb"/>
    </style:style>
    <style:style style:name="gr115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89cm" loext:decorative="false"/>
      <style:paragraph-properties style:writing-mode="lr-tb"/>
    </style:style>
    <style:style style:name="gr115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68cm" loext:decorative="false"/>
      <style:paragraph-properties style:writing-mode="lr-tb"/>
    </style:style>
    <style:style style:name="gr1160" style:family="graphic" style:parent-style-name="Standard_5f_1">
      <style:graphic-properties draw:stroke="none" svg:stroke-color="#000000" draw:fill="none" draw:fill-color="#ffffff" draw:textarea-horizontal-align="left" draw:auto-grow-height="true" draw:auto-grow-width="true" fo:min-height="0.319cm" fo:min-width="0.885cm" loext:decorative="false"/>
      <style:paragraph-properties style:writing-mode="lr-tb"/>
    </style:style>
    <style:style style:name="gr116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808cm" loext:decorative="false"/>
      <style:paragraph-properties style:writing-mode="lr-tb"/>
    </style:style>
    <style:style style:name="gr116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16cm" loext:decorative="false"/>
      <style:paragraph-properties style:writing-mode="lr-tb"/>
    </style:style>
    <style:style style:name="gr116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509cm" loext:decorative="false"/>
      <style:paragraph-properties style:writing-mode="lr-tb"/>
    </style:style>
    <style:style style:name="gr116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428cm" loext:decorative="false"/>
      <style:paragraph-properties style:writing-mode="lr-tb"/>
    </style:style>
    <style:style style:name="gr1165" style:family="graphic" style:parent-style-name="objectwithoutfill">
      <style:graphic-properties svg:stroke-color="#ff0000" draw:marker-end="Linienspitzen_20_27" draw:marker-end-width="0.3cm" draw:fill="none" draw:textarea-vertical-align="middle" loext:decorative="false"/>
    </style:style>
    <style:style style:name="gr116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4.692cm" loext:decorative="false"/>
      <style:paragraph-properties style:writing-mode="lr-tb"/>
    </style:style>
    <style:style style:name="gr116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887cm" loext:decorative="false"/>
      <style:paragraph-properties style:writing-mode="lr-tb"/>
    </style:style>
    <style:style style:name="gr116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5.62cm" loext:decorative="false"/>
      <style:paragraph-properties style:writing-mode="lr-tb"/>
    </style:style>
    <style:style style:name="gr116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08cm" loext:decorative="false"/>
      <style:paragraph-properties style:writing-mode="lr-tb"/>
    </style:style>
    <style:style style:name="gr117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209cm" loext:decorative="false"/>
      <style:paragraph-properties style:writing-mode="lr-tb"/>
    </style:style>
    <style:style style:name="gr1171" style:family="graphic" style:parent-style-name="Standard_5f_2">
      <style:graphic-properties draw:stroke="none" svg:stroke-color="#000000" draw:fill="none" draw:fill-color="#ffffff" draw:textarea-horizontal-align="left" draw:auto-grow-height="true" draw:auto-grow-width="true" fo:min-height="2.845cm" fo:min-width="4.307cm" loext:decorative="false"/>
      <style:paragraph-properties style:writing-mode="lr-tb"/>
    </style:style>
    <style:style style:name="gr1172" style:family="graphic" style:parent-style-name="Standard_5f_2">
      <style:graphic-properties draw:stroke="none" svg:stroke-color="#000000" draw:fill="none" draw:fill-color="#ffffff" draw:textarea-horizontal-align="left" draw:auto-grow-height="true" draw:auto-grow-width="true" fo:min-height="0.556cm" fo:min-width="3.101cm" loext:decorative="false"/>
      <style:paragraph-properties style:writing-mode="lr-tb"/>
    </style:style>
    <style:style style:name="gr1173" style:family="graphic" style:parent-style-name="Standard_5f_2">
      <style:graphic-properties draw:stroke="none" svg:stroke-color="#000000" draw:fill="none" draw:fill-color="#ffffff" draw:textarea-horizontal-align="left" draw:auto-grow-height="true" draw:auto-grow-width="true" fo:min-height="0.712cm" fo:min-width="5.624cm" loext:decorative="false"/>
      <style:paragraph-properties style:writing-mode="lr-tb"/>
    </style:style>
    <style:style style:name="gr1174" style:family="graphic" style:parent-style-name="Standard_5f_2">
      <style:graphic-properties svg:stroke-color="#000000" draw:fill-color="#729fcf" draw:textarea-vertical-align="middle" loext:decorative="false"/>
    </style:style>
    <style:style style:name="gr1175" style:family="graphic" style:parent-style-name="Standard_5f_2">
      <style:graphic-properties draw:stroke="none" svg:stroke-color="#000000" draw:fill="none" draw:fill-color="#ffffff" draw:textarea-horizontal-align="left" draw:auto-grow-height="true" draw:auto-grow-width="true" fo:min-height="0.556cm" fo:min-width="0.966cm" loext:decorative="false"/>
      <style:paragraph-properties style:writing-mode="lr-tb"/>
    </style:style>
    <style:style style:name="gr1176" style:family="graphic" style:parent-style-name="Standard_5f_2">
      <style:graphic-properties svg:stroke-color="#000000" draw:fill-color="#ffffff" draw:textarea-horizontal-align="justify" draw:textarea-vertical-align="middle" draw:auto-grow-height="false" fo:min-height="1.75cm" fo:min-width="0.5cm" loext:decorative="false"/>
    </style:style>
    <style:style style:name="gr1177" style:family="graphic" style:parent-style-name="Standard_5f_2">
      <style:graphic-properties svg:stroke-color="#000000" draw:textarea-horizontal-align="justify" draw:textarea-vertical-align="middle" draw:auto-grow-height="false" fo:min-height="1.75cm" fo:min-width="0.5cm" loext:decorative="false"/>
    </style:style>
    <style:style style:name="gr1178" style:family="graphic" style:parent-style-name="Standard_5f_2">
      <style:graphic-properties draw:stroke="none" svg:stroke-color="#000000" draw:fill="none" draw:fill-color="#ffffff" draw:textarea-horizontal-align="left" draw:auto-grow-height="true" draw:auto-grow-width="true" fo:min-height="0.556cm" fo:min-width="0.552cm" loext:decorative="false"/>
      <style:paragraph-properties style:writing-mode="lr-tb"/>
    </style:style>
    <style:style style:name="gr1179" style:family="graphic" style:parent-style-name="Standard_5f_2">
      <style:graphic-properties draw:stroke="dash" draw:stroke-dash="Dashed_20__28_var_29_" svg:stroke-color="#000000" draw:fill-color="#ffffff" draw:textarea-horizontal-align="justify" draw:textarea-vertical-align="middle" draw:auto-grow-height="false" fo:min-height="1.75cm" fo:min-width="0.5cm" loext:decorative="false"/>
    </style:style>
    <style:style style:name="gr1180" style:family="graphic" style:parent-style-name="Standard_5f_2">
      <style:graphic-properties draw:stroke="none" svg:stroke-color="#000000" draw:fill="none" draw:fill-color="#ffffff" draw:textarea-horizontal-align="left" draw:auto-grow-height="true" draw:auto-grow-width="true" fo:min-height="0.556cm" fo:min-width="0.911cm" loext:decorative="false"/>
      <style:paragraph-properties style:writing-mode="lr-tb"/>
    </style:style>
    <style:style style:name="gr1181" style:family="graphic" style:parent-style-name="Standard_5f_2">
      <style:graphic-properties draw:stroke="none" svg:stroke-color="#000000" draw:fill="none" draw:fill-color="#ffffff" draw:textarea-horizontal-align="left" draw:auto-grow-height="true" draw:auto-grow-width="true" fo:min-height="0.556cm" fo:min-width="1.075cm" loext:decorative="false"/>
      <style:paragraph-properties style:writing-mode="lr-tb"/>
    </style:style>
    <style:style style:name="gr1182" style:family="graphic" style:parent-style-name="Standard_5f_2">
      <style:graphic-properties draw:stroke="none" svg:stroke-color="#000000" draw:fill="none" draw:fill-color="#ffffff" draw:textarea-horizontal-align="left" draw:auto-grow-height="true" draw:auto-grow-width="true" fo:min-height="0.556cm" fo:min-width="3.361cm" loext:decorative="false"/>
      <style:paragraph-properties style:writing-mode="lr-tb"/>
    </style:style>
    <style:style style:name="gr1183" style:family="graphic" style:parent-style-name="objectwithoutfill">
      <style:graphic-properties draw:stroke="dash" draw:stroke-dash="Dashed_20__28_var_29_" svg:stroke-color="#000000" draw:fill="none" draw:textarea-vertical-align="middle" loext:decorative="false"/>
    </style:style>
    <style:style style:name="gr1184" style:family="graphic" style:parent-style-name="Standard_5f_2">
      <style:graphic-properties draw:stroke="none" svg:stroke-color="#000000" draw:fill="none" draw:fill-color="#ffffff" draw:textarea-horizontal-align="left" draw:auto-grow-height="true" draw:auto-grow-width="true" fo:min-height="0.712cm" fo:min-width="1.449cm" loext:decorative="false"/>
      <style:paragraph-properties style:writing-mode="lr-tb"/>
    </style:style>
    <style:style style:name="gr1185" style:family="graphic" style:parent-style-name="Standard_5f_2">
      <style:graphic-properties draw:stroke="none" svg:stroke-color="#000000" draw:fill="none" draw:fill-color="#ffffff" draw:textarea-horizontal-align="left" draw:auto-grow-height="true" draw:auto-grow-width="true" fo:min-height="0.556cm" fo:min-width="3.075cm" loext:decorative="false"/>
      <style:paragraph-properties style:writing-mode="lr-tb"/>
    </style:style>
    <style:style style:name="gr1186" style:family="graphic" style:parent-style-name="Standard_5f_2">
      <style:graphic-properties svg:stroke-color="#000000" draw:fill-color="#729fcf" draw:textarea-horizontal-align="justify" draw:textarea-vertical-align="middle" draw:auto-grow-height="false" fo:min-height="1.75cm" fo:min-width="0.5cm" loext:decorative="false"/>
    </style:style>
    <style:style style:name="gr1187" style:family="graphic" style:parent-style-name="Standard_5f_2">
      <style:graphic-properties draw:stroke="none" svg:stroke-color="#000000" draw:fill="none" draw:fill-color="#ffffff" draw:textarea-horizontal-align="left" draw:auto-grow-height="true" draw:auto-grow-width="true" fo:min-height="0.556cm" fo:min-width="0.772cm" loext:decorative="false"/>
      <style:paragraph-properties style:writing-mode="lr-tb"/>
    </style:style>
    <style:style style:name="gr1188" style:family="graphic" style:parent-style-name="Standard_5f_2">
      <style:graphic-properties draw:stroke="none" svg:stroke-color="#000000" draw:fill="none" draw:fill-color="#ffffff" draw:textarea-horizontal-align="left" draw:auto-grow-height="true" draw:auto-grow-width="true" fo:min-height="0.556cm" fo:min-width="3.416cm" loext:decorative="false"/>
      <style:paragraph-properties style:writing-mode="lr-tb"/>
    </style:style>
    <style:style style:name="gr1189" style:family="graphic" style:parent-style-name="standard">
      <style:graphic-properties svg:stroke-color="#0066b3" draw:fill="none" loext:fill-use-slide-background="false" draw:textarea-horizontal-align="justify" draw:textarea-vertical-align="middle" draw:auto-grow-height="false" fo:min-height="1.59cm" fo:min-width="1.34cm" loext:decorative="false"/>
    </style:style>
    <style:style style:name="gr1190" style:family="graphic" style:parent-style-name="standard">
      <style:graphic-properties draw:stroke="none" svg:stroke-color="#000000" draw:fill="none" draw:fill-color="#ffffff" draw:textarea-horizontal-align="left" draw:auto-grow-height="true" draw:auto-grow-width="true" fo:min-height="0.712cm" fo:min-width="0.673cm" loext:decorative="false"/>
      <style:paragraph-properties style:writing-mode="lr-tb"/>
    </style:style>
    <style:style style:name="gr1191" style:family="graphic" style:parent-style-name="objectwithoutfill">
      <style:graphic-properties draw:stroke="dash" draw:stroke-dash="Long_20_Dot" svg:stroke-color="#ff0000" draw:marker-end="Linienspitzen_20_30" draw:marker-end-width="0.3cm" draw:fill="none" draw:textarea-vertical-align="middle" loext:decorative="false"/>
    </style:style>
    <style:style style:name="gr1192" style:family="graphic" style:parent-style-name="objectwithoutfill">
      <style:graphic-properties draw:stroke="dash" draw:stroke-dash="Long_20_Dot" svg:stroke-color="#ff0000" draw:marker-end="Linienspitzen_20_31" draw:marker-end-width="0.3cm" draw:fill="none" draw:textarea-vertical-align="middle" loext:decorative="false"/>
    </style:style>
    <style:style style:name="gr1193" style:family="graphic" style:parent-style-name="objectwithoutfill">
      <style:graphic-properties draw:stroke="dash" draw:stroke-dash="Long_20_Dot" svg:stroke-color="#0066b3" draw:marker-end="Linienspitzen_20_32" draw:marker-end-width="0.3cm" draw:fill="none" draw:textarea-vertical-align="middle" loext:decorative="false"/>
    </style:style>
    <style:style style:name="gr1194" style:family="graphic" style:parent-style-name="objectwithoutfill">
      <style:graphic-properties draw:stroke="dash" draw:stroke-dash="Long_20_Dot" svg:stroke-color="#0066b3" draw:marker-end="Linienspitzen_20_33" draw:marker-end-width="0.3cm" draw:fill="none" draw:textarea-vertical-align="middle" loext:decorative="false"/>
    </style:style>
    <style:style style:name="gr1195" style:family="graphic" style:parent-style-name="Standard_5f_2">
      <style:graphic-properties draw:stroke="none" svg:stroke-color="#000000" draw:fill="none" draw:fill-color="#ffffff" draw:textarea-horizontal-align="left" draw:auto-grow-height="true" draw:auto-grow-width="true" fo:min-height="0.556cm" fo:min-width="5.33cm" loext:decorative="false"/>
      <style:paragraph-properties style:writing-mode="lr-tb"/>
    </style:style>
    <style:style style:name="gr1196" style:family="graphic" style:parent-style-name="Standard_5f_2">
      <style:graphic-properties draw:stroke="none" svg:stroke-color="#000000" draw:fill="none" draw:fill-color="#ffffff" draw:textarea-horizontal-align="left" draw:auto-grow-height="true" draw:auto-grow-width="true" fo:min-height="0.556cm" fo:min-width="5.77cm" loext:decorative="false"/>
      <style:paragraph-properties style:writing-mode="lr-tb"/>
    </style:style>
    <style:style style:name="gr1197" style:family="graphic" style:parent-style-name="objectwithoutfill">
      <style:graphic-properties draw:marker-end="Linienspitzen_20_34" draw:marker-end-width="0.3cm" draw:fill="none" draw:textarea-vertical-align="middle" loext:decorative="false"/>
    </style:style>
    <style:style style:name="gr1198" style:family="graphic" style:parent-style-name="objectwithoutfill">
      <style:graphic-properties draw:marker-end="Linienspitzen_20_35" draw:marker-end-width="0.3cm" draw:fill="none" draw:textarea-vertical-align="middle" loext:decorative="false"/>
    </style:style>
    <style:style style:name="gr1199" style:family="graphic" style:parent-style-name="objectwithoutfill">
      <style:graphic-properties svg:stroke-color="#ff0000" draw:marker-end="Linienspitzen_20_36" draw:marker-end-width="0.3cm" draw:fill="none" draw:textarea-vertical-align="middle" loext:decorative="false"/>
    </style:style>
    <style:style style:name="gr1200" style:family="graphic" style:parent-style-name="Standard_5f_2">
      <style:graphic-properties draw:stroke="none" svg:stroke-color="#000000" draw:fill="none" draw:fill-color="#ffffff" draw:textarea-horizontal-align="left" draw:auto-grow-height="true" draw:auto-grow-width="true" fo:min-height="0.556cm" fo:min-width="4.944cm" loext:decorative="false"/>
      <style:paragraph-properties style:writing-mode="lr-tb"/>
    </style:style>
    <style:style style:name="gr1201" style:family="graphic" style:parent-style-name="Standard_5f_2">
      <style:graphic-properties draw:stroke="none" svg:stroke-color="#000000" draw:fill="none" draw:fill-color="#ffffff" draw:textarea-horizontal-align="left" draw:auto-grow-height="true" draw:auto-grow-width="true" fo:min-height="0.556cm" fo:min-width="5.88cm" loext:decorative="false"/>
      <style:paragraph-properties style:writing-mode="lr-tb"/>
    </style:style>
    <style:style style:name="gr1202" style:family="graphic" style:parent-style-name="objectwithoutfill">
      <style:graphic-properties draw:marker-end="Linienspitzen_20_37" draw:marker-end-width="0.3cm" draw:fill="none" draw:textarea-vertical-align="middle" loext:decorative="false"/>
    </style:style>
    <style:style style:name="gr1203" style:family="graphic" style:parent-style-name="objectwithoutfill">
      <style:graphic-properties draw:marker-end="Linienspitzen_20_38" draw:marker-end-width="0.3cm" draw:fill="none" draw:textarea-vertical-align="middle" loext:decorative="false"/>
    </style:style>
    <style:style style:name="gr1204" style:family="graphic" style:parent-style-name="objectwithoutfill">
      <style:graphic-properties svg:stroke-color="#ff0000" draw:marker-end="Linienspitzen_20_39" draw:marker-end-width="0.3cm" draw:fill="none" draw:textarea-vertical-align="middle" loext:decorative="false"/>
    </style:style>
    <style:style style:name="gr1205" style:family="graphic" style:parent-style-name="Standard_5f_2">
      <style:graphic-properties draw:stroke="none" svg:stroke-color="#000000" draw:fill="none" draw:fill-color="#ffffff" draw:textarea-horizontal-align="left" draw:auto-grow-height="true" draw:auto-grow-width="true" fo:min-height="0.556cm" fo:min-width="5.43cm" loext:decorative="false"/>
      <style:paragraph-properties style:writing-mode="lr-tb"/>
    </style:style>
    <style:style style:name="gr1206" style:family="graphic" style:parent-style-name="Standard_5f_2">
      <style:graphic-properties draw:stroke="none" svg:stroke-color="#000000" draw:fill="none" draw:fill-color="#ffffff" draw:textarea-horizontal-align="left" draw:auto-grow-height="true" draw:auto-grow-width="true" fo:min-height="0.556cm" fo:min-width="5.54cm" loext:decorative="false"/>
      <style:paragraph-properties style:writing-mode="lr-tb"/>
    </style:style>
    <style:style style:name="gr1207" style:family="graphic" style:parent-style-name="Standard_5f_2">
      <style:graphic-properties draw:stroke="none" svg:stroke-color="#000000" draw:fill="none" draw:fill-color="#ffffff" draw:textarea-horizontal-align="left" draw:auto-grow-height="true" draw:auto-grow-width="true" fo:min-height="0.556cm" fo:min-width="4.022cm" loext:decorative="false"/>
      <style:paragraph-properties style:writing-mode="lr-tb"/>
    </style:style>
    <style:style style:name="gr1208" style:family="graphic" style:parent-style-name="Standard_5f_2">
      <style:graphic-properties draw:stroke="none" svg:stroke-color="#000000" draw:fill="none" draw:fill-color="#ffffff" draw:textarea-horizontal-align="left" draw:auto-grow-height="true" draw:auto-grow-width="true" fo:min-height="0.556cm" fo:min-width="3.355cm" loext:decorative="false"/>
      <style:paragraph-properties style:writing-mode="lr-tb"/>
    </style:style>
    <style:style style:name="gr1209" style:family="graphic" style:parent-style-name="objectwithoutfill">
      <style:graphic-properties svg:stroke-color="#00a933" draw:fill="none" draw:textarea-vertical-align="middle" loext:decorative="false"/>
    </style:style>
    <style:style style:name="gr1210" style:family="graphic" style:parent-style-name="Standard_5f_2">
      <style:graphic-properties draw:stroke="none" svg:stroke-color="#000000" draw:fill="none" draw:fill-color="#ffffff" draw:textarea-horizontal-align="left" draw:auto-grow-height="true" draw:auto-grow-width="true" fo:min-height="0.319cm" fo:min-width="1.979cm" loext:decorative="false"/>
      <style:paragraph-properties style:writing-mode="lr-tb"/>
    </style:style>
    <style:style style:name="gr1211" style:family="graphic" style:parent-style-name="Standard_5f_2">
      <style:graphic-properties draw:stroke="none" svg:stroke-color="#000000" draw:fill="none" draw:fill-color="#ffffff" draw:textarea-horizontal-align="left" draw:auto-grow-height="true" draw:auto-grow-width="true" fo:min-height="0.319cm" fo:min-width="1.965cm" loext:decorative="false"/>
      <style:paragraph-properties style:writing-mode="lr-tb"/>
    </style:style>
    <style:style style:name="gr1212" style:family="graphic" style:parent-style-name="Standard_5f_2">
      <style:graphic-properties draw:stroke="none" svg:stroke-color="#000000" draw:fill="none" draw:fill-color="#ffffff" draw:textarea-horizontal-align="left" draw:auto-grow-height="true" draw:auto-grow-width="true" fo:min-height="0.319cm" fo:min-width="1.962cm" loext:decorative="false"/>
      <style:paragraph-properties style:writing-mode="lr-tb"/>
    </style:style>
    <style:style style:name="gr1213" style:family="graphic" style:parent-style-name="Standard_5f_2">
      <style:graphic-properties draw:stroke="none" svg:stroke-color="#000000" draw:fill="none" draw:fill-color="#ffffff" draw:textarea-horizontal-align="left" draw:auto-grow-height="true" draw:auto-grow-width="true" fo:min-height="0.319cm" fo:min-width="1.981cm" loext:decorative="false"/>
      <style:paragraph-properties style:writing-mode="lr-tb"/>
    </style:style>
    <style:style style:name="gr1214" style:family="graphic" style:parent-style-name="Standard_5f_2">
      <style:graphic-properties draw:stroke="none" svg:stroke-color="#000000" draw:fill="none" draw:fill-color="#ffffff" draw:textarea-horizontal-align="left" draw:auto-grow-height="true" draw:auto-grow-width="true" fo:min-height="0.319cm" fo:min-width="2.123cm" loext:decorative="false"/>
      <style:paragraph-properties style:writing-mode="lr-tb"/>
    </style:style>
    <style:style style:name="gr1215" style:family="graphic" style:parent-style-name="Standard_5f_2">
      <style:graphic-properties draw:stroke="none" svg:stroke-color="#000000" draw:fill="none" draw:fill-color="#ffffff" draw:textarea-horizontal-align="left" draw:auto-grow-height="true" draw:auto-grow-width="true" fo:min-height="0.319cm" fo:min-width="2.06cm" loext:decorative="false"/>
      <style:paragraph-properties style:writing-mode="lr-tb"/>
    </style:style>
    <style:style style:name="gr1216" style:family="graphic" style:parent-style-name="Standard_5f_2">
      <style:graphic-properties draw:stroke="none" svg:stroke-color="#000000" draw:fill="none" draw:fill-color="#ffffff" draw:textarea-horizontal-align="left" draw:auto-grow-height="true" draw:auto-grow-width="true" fo:min-height="0.319cm" fo:min-width="2.391cm" loext:decorative="false"/>
      <style:paragraph-properties style:writing-mode="lr-tb"/>
    </style:style>
    <style:style style:name="gr1217" style:family="graphic" style:parent-style-name="Standard_5f_2">
      <style:graphic-properties draw:stroke="none" svg:stroke-color="#000000" draw:fill="none" draw:fill-color="#ffffff" draw:textarea-horizontal-align="left" draw:auto-grow-height="true" draw:auto-grow-width="true" fo:min-height="0.319cm" fo:min-width="2.532cm" loext:decorative="false"/>
      <style:paragraph-properties style:writing-mode="lr-tb"/>
    </style:style>
    <style:style style:name="gr1218" style:family="graphic" style:parent-style-name="Standard_5f_2">
      <style:graphic-properties draw:stroke="none" svg:stroke-color="#000000" draw:fill="none" draw:fill-color="#ffffff" draw:textarea-horizontal-align="left" draw:auto-grow-height="true" draw:auto-grow-width="true" fo:min-height="0.319cm" fo:min-width="2.469cm" loext:decorative="false"/>
      <style:paragraph-properties style:writing-mode="lr-tb"/>
    </style:style>
    <style:style style:name="gr1219" style:family="graphic" style:parent-style-name="Standard_5f_2">
      <style:graphic-properties draw:stroke="none" svg:stroke-color="#000000" draw:fill="none" draw:fill-color="#ffffff" draw:textarea-horizontal-align="left" draw:auto-grow-height="true" draw:auto-grow-width="true" fo:min-height="0.319cm" fo:min-width="2.454cm" loext:decorative="false"/>
      <style:paragraph-properties style:writing-mode="lr-tb"/>
    </style:style>
    <style:style style:name="gr1220" style:family="graphic" style:parent-style-name="Standard_5f_2">
      <style:graphic-properties draw:stroke="none" svg:stroke-color="#000000" draw:fill="none" draw:fill-color="#ffffff" draw:textarea-horizontal-align="left" draw:auto-grow-height="true" draw:auto-grow-width="true" fo:min-height="0.319cm" fo:min-width="2.595cm" loext:decorative="false"/>
      <style:paragraph-properties style:writing-mode="lr-tb"/>
    </style:style>
    <style:style style:name="gr1221" style:family="graphic" style:parent-style-name="Standard_5f_2">
      <style:graphic-properties draw:stroke="none" svg:stroke-color="#000000" draw:fill="none" draw:fill-color="#ffffff" draw:textarea-horizontal-align="left" draw:auto-grow-height="true" draw:auto-grow-width="true" fo:min-height="0.319cm" fo:min-width="1.587cm" loext:decorative="false"/>
      <style:paragraph-properties style:writing-mode="lr-tb"/>
    </style:style>
    <style:style style:name="gr1222" style:family="graphic" style:parent-style-name="objectwithoutfill">
      <style:graphic-properties draw:stroke="dash" draw:stroke-dash="Long_20_Dot" svg:stroke-width="0.1cm" svg:stroke-color="#ff0000" draw:marker-start-width="0.35cm" draw:marker-end="Linienspitzen_20_30" draw:marker-end-width="0.45cm" draw:fill="none" draw:textarea-vertical-align="middle" fo:padding-top="0.175cm" fo:padding-bottom="0.175cm" fo:padding-left="0.3cm" fo:padding-right="0.3cm" loext:decorative="false"/>
    </style:style>
    <style:style style:name="gr1223" style:family="graphic" style:parent-style-name="Standard_5f_2">
      <style:graphic-properties draw:stroke="none" svg:stroke-color="#000000" draw:fill="none" draw:fill-color="#ffffff" draw:textarea-horizontal-align="left" draw:auto-grow-height="true" draw:auto-grow-width="true" fo:min-height="0.319cm" fo:min-width="5.449cm" loext:decorative="false"/>
      <style:paragraph-properties style:writing-mode="lr-tb"/>
    </style:style>
    <style:style style:name="gr1224" style:family="graphic" style:parent-style-name="Standard_5f_2">
      <style:graphic-properties draw:stroke="none" svg:stroke-color="#000000" draw:fill="none" draw:fill-color="#ffffff" draw:textarea-horizontal-align="left" draw:auto-grow-height="true" draw:auto-grow-width="true" fo:min-height="0.319cm" fo:min-width="1.551cm" loext:decorative="false"/>
      <style:paragraph-properties style:writing-mode="lr-tb"/>
    </style:style>
    <style:style style:name="gr1225" style:family="graphic" style:parent-style-name="Standard_5f_2">
      <style:graphic-properties draw:stroke="none" svg:stroke-color="#000000" draw:fill="none" draw:fill-color="#ffffff" draw:textarea-horizontal-align="left" draw:auto-grow-height="true" draw:auto-grow-width="true" fo:min-height="0.319cm" fo:min-width="1.791cm" loext:decorative="false"/>
      <style:paragraph-properties style:writing-mode="lr-tb"/>
    </style:style>
    <style:style style:name="gr1226" style:family="graphic" style:parent-style-name="Standard_5f_2">
      <style:graphic-properties draw:stroke="none" svg:stroke-color="#000000" draw:fill="none" draw:fill-color="#ffffff" draw:textarea-horizontal-align="left" draw:auto-grow-height="true" draw:auto-grow-width="true" fo:min-height="0.319cm" fo:min-width="2.17cm" loext:decorative="false"/>
      <style:paragraph-properties style:writing-mode="lr-tb"/>
    </style:style>
    <style:style style:name="gr1227" style:family="graphic" style:parent-style-name="Standard_5f_2">
      <style:graphic-properties draw:stroke="none" svg:stroke-color="#000000" draw:fill="none" draw:fill-color="#ffffff" draw:textarea-horizontal-align="left" draw:auto-grow-height="true" draw:auto-grow-width="true" fo:min-height="0.319cm" fo:min-width="2.486cm" loext:decorative="false"/>
      <style:paragraph-properties style:writing-mode="lr-tb"/>
    </style:style>
    <style:style style:name="gr1228" style:family="graphic" style:parent-style-name="Standard_5f_2">
      <style:graphic-properties draw:stroke="none" svg:stroke-color="#000000" draw:fill="none" draw:fill-color="#ffffff" draw:textarea-horizontal-align="left" draw:auto-grow-height="true" draw:auto-grow-width="true" fo:min-height="0.319cm" fo:min-width="1.555cm" loext:decorative="false"/>
      <style:paragraph-properties style:writing-mode="lr-tb"/>
    </style:style>
    <style:style style:name="gr1229" style:family="graphic" style:parent-style-name="Standard_5f_2">
      <style:graphic-properties draw:stroke="none" svg:stroke-color="#000000" draw:fill="none" draw:fill-color="#ffffff" draw:textarea-horizontal-align="left" draw:auto-grow-height="true" draw:auto-grow-width="true" fo:min-height="0.319cm" fo:min-width="0.57cm" loext:decorative="false"/>
      <style:paragraph-properties style:writing-mode="lr-tb"/>
    </style:style>
    <style:style style:name="gr1230" style:family="graphic" style:parent-style-name="Standard_5f_2">
      <style:graphic-properties draw:stroke="none" svg:stroke-color="#000000" draw:fill="none" draw:fill-color="#ffffff" draw:textarea-horizontal-align="left" draw:auto-grow-height="true" draw:auto-grow-width="true" fo:min-height="0.319cm" fo:min-width="1.808cm" loext:decorative="false"/>
      <style:paragraph-properties style:writing-mode="lr-tb"/>
    </style:style>
    <style:style style:name="gr1231" style:family="graphic" style:parent-style-name="Standard_5f_2">
      <style:graphic-properties draw:stroke="none" svg:stroke-color="#000000" draw:fill="none" draw:fill-color="#ffffff" draw:textarea-horizontal-align="left" draw:auto-grow-height="true" draw:auto-grow-width="true" fo:min-height="0.319cm" fo:min-width="1.074cm" loext:decorative="false"/>
      <style:paragraph-properties style:writing-mode="lr-tb"/>
    </style:style>
    <style:style style:name="gr1232" style:family="graphic" style:parent-style-name="Standard_5f_2">
      <style:graphic-properties draw:stroke="none" svg:stroke-color="#000000" draw:fill="none" draw:fill-color="#ffffff" draw:textarea-horizontal-align="left" draw:auto-grow-height="true" draw:auto-grow-width="true" fo:min-height="0.319cm" fo:min-width="2.327cm" loext:decorative="false"/>
      <style:paragraph-properties style:writing-mode="lr-tb"/>
    </style:style>
    <style:style style:name="gr1233" style:family="graphic" style:parent-style-name="Standard_5f_2">
      <style:graphic-properties draw:stroke="none" svg:stroke-color="#000000" draw:fill="none" draw:fill-color="#ffffff" draw:textarea-horizontal-align="left" draw:auto-grow-height="true" draw:auto-grow-width="true" fo:min-height="0.319cm" fo:min-width="2.39cm" loext:decorative="false"/>
      <style:paragraph-properties style:writing-mode="lr-tb"/>
    </style:style>
    <style:style style:name="gr1234" style:family="graphic" style:parent-style-name="objectwithoutfill">
      <style:graphic-properties draw:stroke="dash" draw:stroke-dash="Long_20_Dot" svg:stroke-width="0.1cm" svg:stroke-color="#00a933" draw:marker-start-width="0.35cm" draw:marker-end="Linienspitzen_20_30" draw:marker-end-width="0.45cm" draw:fill="none" draw:textarea-vertical-align="middle" fo:padding-top="0.175cm" fo:padding-bottom="0.175cm" fo:padding-left="0.3cm" fo:padding-right="0.3cm" loext:decorative="false"/>
    </style:style>
    <style:style style:name="gr1235" style:family="graphic" style:parent-style-name="objectwithoutfill">
      <style:graphic-properties draw:stroke="dash" draw:stroke-dash="Long_20_Dot" svg:stroke-width="0.1cm" svg:stroke-color="#ffbf00" draw:marker-start-width="0.35cm" draw:marker-end="Linienspitzen_20_30" draw:marker-end-width="0.45cm" draw:fill="none" draw:textarea-vertical-align="middle" fo:padding-top="0.175cm" fo:padding-bottom="0.175cm" fo:padding-left="0.3cm" fo:padding-right="0.3cm" loext:decorative="false"/>
    </style:style>
    <style:style style:name="gr1236" style:family="graphic" style:parent-style-name="objectwithoutfill">
      <style:graphic-properties svg:stroke-color="#00a933" draw:marker-end="Linienspitzen_20_45" draw:marker-end-width="0.3cm" draw:fill="none" draw:textarea-vertical-align="middle" loext:decorative="false"/>
    </style:style>
    <style:style style:name="gr1237" style:family="graphic" style:parent-style-name="Standard_5f_2">
      <style:graphic-properties draw:stroke="none" svg:stroke-color="#000000" draw:fill="none" draw:fill-color="#ffffff" draw:textarea-horizontal-align="left" draw:auto-grow-height="true" draw:auto-grow-width="true" fo:min-height="0.319cm" fo:min-width="5.48cm" loext:decorative="false"/>
      <style:paragraph-properties style:writing-mode="lr-tb"/>
    </style:style>
    <style:style style:name="gr1238" style:family="graphic" style:parent-style-name="Standard_5f_2">
      <style:graphic-properties draw:stroke="none" svg:stroke-color="#000000" draw:fill="none" draw:fill-color="#ffffff" draw:textarea-horizontal-align="left" draw:auto-grow-height="true" draw:auto-grow-width="true" fo:min-height="0.319cm" fo:min-width="1.666cm" loext:decorative="false"/>
      <style:paragraph-properties style:writing-mode="lr-tb"/>
    </style:style>
    <style:style style:name="gr1239" style:family="graphic" style:parent-style-name="Standard_5f_2">
      <style:graphic-properties draw:stroke="none" svg:stroke-color="#000000" draw:fill="none" draw:fill-color="#ffffff" draw:textarea-horizontal-align="left" draw:auto-grow-height="true" draw:auto-grow-width="true" fo:min-height="0.319cm" fo:min-width="0.554cm" loext:decorative="false"/>
      <style:paragraph-properties style:writing-mode="lr-tb"/>
    </style:style>
    <style:style style:name="gr1240" style:family="graphic" style:parent-style-name="Standard_5f_2">
      <style:graphic-properties draw:stroke="none" svg:stroke-color="#000000" draw:fill="none" draw:fill-color="#ffffff" draw:textarea-horizontal-align="left" draw:auto-grow-height="true" draw:auto-grow-width="true" fo:min-height="0.319cm" fo:min-width="5.393cm" loext:decorative="false"/>
      <style:paragraph-properties style:writing-mode="lr-tb"/>
    </style:style>
    <style:style style:name="gr1241" style:family="graphic" style:parent-style-name="Standard_5f_2">
      <style:graphic-properties draw:stroke="none" svg:stroke-color="#000000" draw:fill="none" draw:fill-color="#ffffff" draw:textarea-horizontal-align="left" draw:auto-grow-height="true" draw:auto-grow-width="true" fo:min-height="0.319cm" fo:min-width="2.483cm" loext:decorative="false"/>
      <style:paragraph-properties style:writing-mode="lr-tb"/>
    </style:style>
    <style:style style:name="gr1242" style:family="graphic" style:parent-style-name="Standard_5f_2">
      <style:graphic-properties draw:stroke="none" svg:stroke-color="#000000" draw:fill="none" draw:fill-color="#ffffff" draw:textarea-horizontal-align="left" draw:auto-grow-height="true" draw:auto-grow-width="true" fo:min-height="0.319cm" fo:min-width="2.265cm" loext:decorative="false"/>
      <style:paragraph-properties style:writing-mode="lr-tb"/>
    </style:style>
    <style:style style:name="gr1243" style:family="graphic" style:parent-style-name="Standard_5f_2">
      <style:graphic-properties draw:stroke="none" svg:stroke-color="#000000" draw:fill="none" draw:fill-color="#ffffff" draw:textarea-horizontal-align="left" draw:auto-grow-height="true" draw:auto-grow-width="true" fo:min-height="0.319cm" fo:min-width="0.711cm" loext:decorative="false"/>
      <style:paragraph-properties style:writing-mode="lr-tb"/>
    </style:style>
    <style:style style:name="gr1244" style:family="graphic" style:parent-style-name="objectwithoutfill">
      <style:graphic-properties svg:stroke-color="#ffbf00" draw:marker-end="Arrow_20_short" draw:fill="none" draw:textarea-vertical-align="middle" loext:decorative="false"/>
    </style:style>
    <style:style style:name="gr1245" style:family="graphic" style:parent-style-name="standard">
      <style:graphic-properties svg:stroke-color="#000000" draw:fill-color="#ff0000" draw:textarea-horizontal-align="justify" draw:textarea-vertical-align="middle" draw:auto-grow-height="false" fo:min-height="1.164cm" fo:min-width="0cm" loext:decorative="false"/>
    </style:style>
    <style:style style:name="gr1246" style:family="graphic" style:parent-style-name="standard">
      <style:graphic-properties draw:fill="solid" draw:fill-color="#729fcf" draw:opacity="30%" draw:textarea-horizontal-align="justify" draw:textarea-vertical-align="middle" draw:auto-grow-height="false" fo:min-height="1.307cm" fo:min-width="1.526cm" fo:wrap-option="wrap" draw:shadow-opacity="30%" loext:decorative="false"/>
    </style:style>
    <style:style style:name="gr1247" style:family="graphic" style:parent-style-name="Standard_5f_2">
      <style:graphic-properties draw:stroke="none" svg:stroke-color="#000000" draw:fill="none" draw:fill-color="#ffffff" draw:textarea-horizontal-align="left" draw:auto-grow-height="true" draw:auto-grow-width="true" fo:min-height="0.319cm" fo:min-width="2.263cm" loext:decorative="false"/>
      <style:paragraph-properties style:writing-mode="lr-tb"/>
    </style:style>
    <style:style style:name="gr1248" style:family="graphic" style:parent-style-name="objectwithoutfill">
      <style:graphic-properties svg:stroke-color="#ffbf00" draw:marker-end="Linienspitzen_20_46" draw:marker-end-width="0.3cm" draw:fill="none" draw:textarea-vertical-align="middle" loext:decorative="false"/>
    </style:style>
    <style:style style:name="gr1249" style:family="graphic" style:parent-style-name="Standard_5f_2">
      <style:graphic-properties draw:stroke="none" svg:stroke-color="#000000" draw:fill="none" draw:fill-color="#ffffff" draw:textarea-horizontal-align="left" draw:auto-grow-height="true" draw:auto-grow-width="true" fo:min-height="0.556cm" fo:min-width="3.085cm" loext:decorative="false"/>
      <style:paragraph-properties style:writing-mode="lr-tb"/>
    </style:style>
    <style:style style:name="gr1250" style:family="graphic" style:parent-style-name="standard">
      <style:graphic-properties draw:stroke="none" svg:stroke-color="#000000" draw:fill="none" draw:fill-color="#ffffff" draw:textarea-horizontal-align="left" draw:auto-grow-height="true" draw:auto-grow-width="true" fo:min-height="0.712cm" fo:min-width="6.956cm" loext:decorative="false"/>
      <style:paragraph-properties style:writing-mode="lr-tb"/>
    </style:style>
    <style:style style:name="gr1251" style:family="graphic" style:parent-style-name="Standard_5f_2">
      <style:graphic-properties draw:stroke="none" svg:stroke-color="#000000" draw:fill="none" draw:fill-color="#ffffff" draw:textarea-horizontal-align="left" draw:auto-grow-height="true" draw:auto-grow-width="true" fo:min-height="0.556cm" fo:min-width="3.086cm" loext:decorative="false"/>
      <style:paragraph-properties style:writing-mode="lr-tb"/>
    </style:style>
    <style:style style:name="gr1252" style:family="graphic" style:parent-style-name="Standard_5f_2">
      <style:graphic-properties draw:stroke="none" svg:stroke-color="#000000" draw:fill="none" draw:fill-color="#ffffff" draw:textarea-horizontal-align="left" draw:auto-grow-height="true" draw:auto-grow-width="true" fo:min-height="0.556cm" fo:min-width="8.013cm" loext:decorative="false"/>
      <style:paragraph-properties style:writing-mode="lr-tb"/>
    </style:style>
    <style:style style:name="gr1253" style:family="graphic" style:parent-style-name="objectwithoutfill">
      <style:graphic-properties draw:marker-end="Linienspitzen_20_40" draw:marker-end-width="0.3cm" draw:fill="none" draw:textarea-vertical-align="middle" loext:decorative="false"/>
    </style:style>
    <style:style style:name="gr1254" style:family="graphic" style:parent-style-name="Standard_5f_2">
      <style:graphic-properties draw:stroke="none" svg:stroke-color="#000000" draw:fill="none" draw:fill-color="#ffffff" draw:textarea-horizontal-align="left" draw:auto-grow-height="true" draw:auto-grow-width="true" fo:min-height="0.556cm" fo:min-width="3.08cm" loext:decorative="false"/>
      <style:paragraph-properties style:writing-mode="lr-tb"/>
    </style:style>
    <style:style style:name="gr1255" style:family="graphic" style:parent-style-name="objectwithoutfill">
      <style:graphic-properties svg:stroke-width="0.1cm" svg:stroke-color="#ff0000" draw:marker-start-width="0.35cm" draw:marker-end="Linienspitzen_20_36" draw:marker-end-width="0.45cm" draw:fill="none" draw:textarea-vertical-align="middle" fo:padding-top="0.175cm" fo:padding-bottom="0.175cm" fo:padding-left="0.3cm" fo:padding-right="0.3cm" loext:decorative="false"/>
    </style:style>
    <style:style style:name="gr1256" style:family="graphic" style:parent-style-name="Standard_5f_2">
      <style:graphic-properties draw:stroke="none" svg:stroke-color="#000000" draw:fill="none" draw:fill-color="#ffffff" draw:textarea-horizontal-align="left" draw:auto-grow-height="true" draw:auto-grow-width="true" fo:min-height="0.556cm" fo:min-width="5.328cm" loext:decorative="false"/>
      <style:paragraph-properties style:writing-mode="lr-tb"/>
    </style:style>
    <style:style style:name="gr1257" style:family="graphic" style:parent-style-name="Standard_5f_2">
      <style:graphic-properties draw:stroke="none" svg:stroke-color="#000000" draw:fill="none" draw:fill-color="#ffffff" draw:textarea-horizontal-align="left" draw:auto-grow-height="true" draw:auto-grow-width="true" fo:min-height="0.556cm" fo:min-width="5.768cm" loext:decorative="false"/>
      <style:paragraph-properties style:writing-mode="lr-tb"/>
    </style:style>
    <style:style style:name="gr1258" style:family="graphic" style:parent-style-name="Standard_5f_2">
      <style:graphic-properties draw:stroke="none" svg:stroke-color="#000000" draw:fill="none" draw:fill-color="#ffffff" draw:textarea-horizontal-align="left" draw:auto-grow-height="true" draw:auto-grow-width="true" fo:min-height="0.556cm" fo:min-width="5.429cm" loext:decorative="false"/>
      <style:paragraph-properties style:writing-mode="lr-tb"/>
    </style:style>
    <style:style style:name="gr1259" style:family="graphic" style:parent-style-name="objectwithoutfill">
      <style:graphic-properties draw:marker-end="Linienspitzen_20_41" draw:marker-end-width="0.3cm" draw:fill="none" draw:textarea-vertical-align="middle" loext:decorative="false"/>
    </style:style>
    <style:style style:name="gr1260" style:family="graphic" style:parent-style-name="objectwithoutfill">
      <style:graphic-properties draw:marker-end="Linienspitzen_20_42" draw:marker-end-width="0.3cm" draw:fill="none" draw:textarea-vertical-align="middle" loext:decorative="false"/>
    </style:style>
    <style:style style:name="gr1261" style:family="graphic" style:parent-style-name="objectwithoutfill">
      <style:graphic-properties svg:stroke-width="0.1cm" svg:stroke-color="#ff0000" draw:marker-start-width="0.35cm" draw:marker-end="Linienspitzen_20_43" draw:marker-end-width="0.45cm" draw:fill="none" draw:textarea-vertical-align="middle" fo:padding-top="0.175cm" fo:padding-bottom="0.175cm" fo:padding-left="0.3cm" fo:padding-right="0.3cm" loext:decorative="false"/>
    </style:style>
    <style:style style:name="gr1262" style:family="graphic" style:parent-style-name="Standard_5f_2">
      <style:graphic-properties draw:stroke="none" svg:stroke-color="#000000" draw:fill="none" draw:fill-color="#ffffff" draw:textarea-horizontal-align="left" draw:auto-grow-height="true" draw:auto-grow-width="true" fo:min-height="0.556cm" fo:min-width="3.113cm" loext:decorative="false"/>
      <style:paragraph-properties style:writing-mode="lr-tb"/>
    </style:style>
    <style:style style:name="gr1263" style:family="graphic" style:parent-style-name="standard">
      <style:graphic-properties draw:stroke="none" svg:stroke-color="#000000" draw:fill="none" draw:fill-color="#ffffff" draw:textarea-horizontal-align="left" draw:auto-grow-height="true" draw:auto-grow-width="true" fo:min-height="0.712cm" fo:min-width="12.461cm" loext:decorative="false"/>
      <style:paragraph-properties style:writing-mode="lr-tb"/>
    </style:style>
    <style:style style:name="gr1264" style:family="graphic" style:parent-style-name="Standard_5f_2">
      <style:graphic-properties draw:stroke="none" svg:stroke-color="#000000" draw:fill="none" draw:fill-color="#ffffff" draw:textarea-horizontal-align="left" draw:auto-grow-height="true" draw:auto-grow-width="true" fo:min-height="0.556cm" fo:min-width="0.277cm" loext:decorative="false"/>
      <style:paragraph-properties style:writing-mode="lr-tb"/>
    </style:style>
    <style:style style:name="gr1265" style:family="graphic" style:parent-style-name="Standard_5f_2">
      <style:graphic-properties draw:stroke="none" svg:stroke-color="#000000" draw:fill="none" draw:fill-color="#ffffff" draw:textarea-horizontal-align="left" draw:auto-grow-height="true" draw:auto-grow-width="true" fo:min-height="0.556cm" fo:min-width="3.105cm" loext:decorative="false"/>
      <style:paragraph-properties style:writing-mode="lr-tb"/>
    </style:style>
    <style:style style:name="gr1266" style:family="graphic" style:parent-style-name="Standard_5f_2">
      <style:graphic-properties draw:stroke="none" svg:stroke-color="#000000" draw:fill="none" draw:fill-color="#ffffff" draw:textarea-horizontal-align="left" draw:auto-grow-height="true" draw:auto-grow-width="true" fo:min-height="0.556cm" fo:min-width="3.665cm" loext:decorative="false"/>
      <style:paragraph-properties style:writing-mode="lr-tb"/>
    </style:style>
    <style:style style:name="gr1267" style:family="graphic" style:parent-style-name="Standard_5f_2">
      <style:graphic-properties draw:stroke="none" svg:stroke-color="#000000" draw:fill="none" draw:fill-color="#ffffff" draw:textarea-horizontal-align="left" draw:auto-grow-height="true" draw:auto-grow-width="true" fo:min-height="0.556cm" fo:min-width="0.912cm" loext:decorative="false"/>
      <style:paragraph-properties style:writing-mode="lr-tb"/>
    </style:style>
    <style:style style:name="gr1268" style:family="graphic" style:parent-style-name="Standard_5f_2">
      <style:graphic-properties draw:stroke="none" svg:stroke-color="#000000" draw:fill="none" draw:fill-color="#ffffff" draw:textarea-horizontal-align="left" draw:auto-grow-height="true" draw:auto-grow-width="true" fo:min-height="0.319cm" fo:min-width="1.65cm" loext:decorative="false"/>
      <style:paragraph-properties style:writing-mode="lr-tb"/>
    </style:style>
    <style:style style:name="gr1269" style:family="graphic" style:parent-style-name="Standard_5f_2">
      <style:graphic-properties draw:stroke="none" svg:stroke-color="#000000" draw:fill="none" draw:fill-color="#ffffff" draw:textarea-horizontal-align="left" draw:auto-grow-height="true" draw:auto-grow-width="true" fo:min-height="0.319cm" fo:min-width="1.54cm" loext:decorative="false"/>
      <style:paragraph-properties style:writing-mode="lr-tb"/>
    </style:style>
    <style:style style:name="gr1270" style:family="graphic" style:parent-style-name="Standard_5f_2">
      <style:graphic-properties draw:stroke="none" svg:stroke-color="#000000" draw:fill="none" draw:fill-color="#ffffff" draw:textarea-horizontal-align="left" draw:auto-grow-height="true" draw:auto-grow-width="true" fo:min-height="0.319cm" fo:min-width="0.861cm" loext:decorative="false"/>
      <style:paragraph-properties style:writing-mode="lr-tb"/>
    </style:style>
    <style:style style:name="gr1271" style:family="graphic" style:parent-style-name="Standard_5f_2">
      <style:graphic-properties draw:stroke="none" svg:stroke-color="#000000" draw:fill="none" draw:fill-color="#ffffff" draw:textarea-horizontal-align="left" draw:auto-grow-height="true" draw:auto-grow-width="true" fo:min-height="0.319cm" fo:min-width="0.48cm" loext:decorative="false"/>
      <style:paragraph-properties style:writing-mode="lr-tb"/>
    </style:style>
    <style:style style:name="gr1272" style:family="graphic" style:parent-style-name="Standard_5f_2">
      <style:graphic-properties draw:stroke="none" svg:stroke-color="#000000" draw:fill="none" draw:fill-color="#ffffff" draw:textarea-horizontal-align="left" draw:auto-grow-height="true" draw:auto-grow-width="true" fo:min-height="0.319cm" fo:min-width="1.24cm" loext:decorative="false"/>
      <style:paragraph-properties style:writing-mode="lr-tb"/>
    </style:style>
    <style:style style:name="gr1273" style:family="graphic" style:parent-style-name="Standard_5f_2">
      <style:graphic-properties draw:stroke="none" svg:stroke-color="#000000" draw:fill="none" draw:fill-color="#ffffff" draw:textarea-horizontal-align="left" draw:auto-grow-height="true" draw:auto-grow-width="true" fo:min-height="0.319cm" fo:min-width="1.492cm" loext:decorative="false"/>
      <style:paragraph-properties style:writing-mode="lr-tb"/>
    </style:style>
    <style:style style:name="gr1274" style:family="graphic" style:parent-style-name="Standard_5f_2">
      <style:graphic-properties draw:stroke="none" svg:stroke-color="#000000" draw:fill="none" draw:fill-color="#ffffff" draw:textarea-horizontal-align="left" draw:auto-grow-height="true" draw:auto-grow-width="true" fo:min-height="0.319cm" fo:min-width="0.925cm" loext:decorative="false"/>
      <style:paragraph-properties style:writing-mode="lr-tb"/>
    </style:style>
    <style:style style:name="gr1275" style:family="graphic" style:parent-style-name="Standard_5f_2">
      <style:graphic-properties draw:stroke="none" svg:stroke-color="#000000" draw:fill="none" draw:fill-color="#ffffff" draw:textarea-horizontal-align="left" draw:auto-grow-height="true" draw:auto-grow-width="true" fo:min-height="0.319cm" fo:min-width="1.823cm" loext:decorative="false"/>
      <style:paragraph-properties style:writing-mode="lr-tb"/>
    </style:style>
    <style:style style:name="gr1276" style:family="graphic" style:parent-style-name="Standard_5f_2">
      <style:graphic-properties draw:stroke="none" svg:stroke-color="#000000" draw:fill="none" draw:fill-color="#ffffff" draw:textarea-horizontal-align="left" draw:auto-grow-height="true" draw:auto-grow-width="true" fo:min-height="0.319cm" fo:min-width="2.737cm" loext:decorative="false"/>
      <style:paragraph-properties style:writing-mode="lr-tb"/>
    </style:style>
    <style:style style:name="gr1277" style:family="graphic" style:parent-style-name="standard">
      <style:graphic-properties svg:stroke-color="#ff4000" draw:fill="none" loext:fill-use-slide-background="false" draw:textarea-horizontal-align="justify" draw:textarea-vertical-align="middle" draw:auto-grow-height="false" fo:min-height="0.388cm" fo:min-width="1.692cm" loext:decorative="false"/>
    </style:style>
    <style:style style:name="gr1278" style:family="graphic" style:parent-style-name="Standard_5f_2">
      <style:graphic-properties draw:stroke="none" svg:stroke-color="#000000" draw:fill="none" draw:fill-color="#ffffff" draw:textarea-horizontal-align="left" draw:auto-grow-height="true" draw:auto-grow-width="true" fo:min-height="0.556cm" fo:min-width="2.824cm" loext:decorative="false"/>
      <style:paragraph-properties style:writing-mode="lr-tb"/>
    </style:style>
    <style:style style:name="gr1279" style:family="graphic" style:parent-style-name="objectwithoutfill">
      <style:graphic-properties svg:stroke-color="#ff4000" draw:marker-end="Linienspitzen_20_44" draw:marker-end-width="0.3cm" draw:fill="none" draw:textarea-vertical-align="middle" loext:decorative="false"/>
    </style:style>
    <style:style style:name="gr1280" style:family="graphic" style:parent-style-name="Standard_5f_2">
      <style:graphic-properties draw:stroke="none" svg:stroke-color="#000000" draw:fill="none" draw:fill-color="#ffffff" draw:textarea-horizontal-align="left" draw:auto-grow-height="true" draw:auto-grow-width="true" fo:min-height="0.319cm" fo:min-width="2.8cm" loext:decorative="false"/>
      <style:paragraph-properties style:writing-mode="lr-tb"/>
    </style:style>
    <style:style style:name="gr1281" style:family="graphic" style:parent-style-name="standard">
      <style:graphic-properties svg:stroke-color="#00a933" draw:fill="none" loext:fill-use-slide-background="false" draw:textarea-horizontal-align="justify" draw:textarea-vertical-align="middle" draw:auto-grow-height="false" fo:min-height="0.388cm" fo:min-width="1.692cm" loext:decorative="false"/>
    </style:style>
    <style:style style:name="gr1282" style:family="graphic" style:parent-style-name="Standard_5f_2">
      <style:graphic-properties draw:stroke="none" svg:stroke-color="#000000" draw:fill="none" draw:fill-color="#ffffff" draw:textarea-horizontal-align="left" draw:auto-grow-height="true" draw:auto-grow-width="true" fo:min-height="0.319cm" fo:min-width="2.974cm" loext:decorative="false"/>
      <style:paragraph-properties style:writing-mode="lr-tb"/>
    </style:style>
    <style:style style:name="gr1283" style:family="graphic" style:parent-style-name="Standard_5f_2">
      <style:graphic-properties draw:stroke="none" svg:stroke-color="#000000" draw:fill="none" draw:fill-color="#ffffff" draw:textarea-horizontal-align="left" draw:auto-grow-height="true" draw:auto-grow-width="true" fo:min-height="0.319cm" fo:min-width="1.855cm" loext:decorative="false"/>
      <style:paragraph-properties style:writing-mode="lr-tb"/>
    </style:style>
    <style:style style:name="gr1284" style:family="graphic" style:parent-style-name="standard">
      <style:graphic-properties svg:stroke-color="#000000" draw:textarea-horizontal-align="left" draw:textarea-vertical-align="bottom" draw:auto-grow-height="false" fo:min-height="5.75cm" fo:min-width="1.511cm" style:writing-mode="lr-tb" loext:decorative="false"/>
      <style:paragraph-properties style:writing-mode="lr-tb"/>
    </style:style>
    <style:style style:name="gr1285" style:family="graphic" style:parent-style-name="standard">
      <style:graphic-properties svg:stroke-color="#000000" draw:textarea-horizontal-align="justify" draw:textarea-vertical-align="middle" draw:auto-grow-height="false" fo:min-height="1.75cm" fo:min-width="0.5cm" loext:decorative="false"/>
    </style:style>
    <style:style style:name="gr1286" style:family="graphic" style:parent-style-name="standard">
      <style:graphic-properties draw:stroke="none" svg:stroke-color="#000000" draw:fill="none" draw:fill-color="#ffffff" draw:textarea-horizontal-align="left" draw:auto-grow-height="true" draw:auto-grow-width="true" fo:min-height="0.556cm" fo:min-width="0.525cm" loext:decorative="false"/>
      <style:paragraph-properties style:writing-mode="lr-tb"/>
    </style:style>
    <style:style style:name="gr1287" style:family="graphic" style:parent-style-name="standard">
      <style:graphic-properties draw:stroke="none" svg:stroke-color="#000000" draw:fill="none" draw:fill-color="#ffffff" draw:textarea-horizontal-align="left" draw:auto-grow-height="true" draw:auto-grow-width="true" fo:min-height="0.556cm" fo:min-width="0.388cm" loext:decorative="false"/>
      <style:paragraph-properties style:writing-mode="lr-tb"/>
    </style:style>
    <style:style style:name="gr1288" style:family="graphic" style:parent-style-name="standard">
      <style:graphic-properties draw:stroke="none" svg:stroke-color="#000000" draw:fill="none" draw:fill-color="#ffffff" draw:textarea-horizontal-align="left" draw:auto-grow-height="true" draw:auto-grow-width="true" fo:min-height="0.556cm" fo:min-width="0.25cm" loext:decorative="false"/>
      <style:paragraph-properties style:writing-mode="lr-tb"/>
    </style:style>
    <style:style style:name="gr1289" style:family="graphic" style:parent-style-name="standard">
      <style:graphic-properties draw:stroke="none" svg:stroke-color="#000000" draw:fill="none" draw:fill-color="#ffffff" draw:textarea-horizontal-align="left" draw:auto-grow-height="true" draw:auto-grow-width="true" fo:min-height="0.556cm" fo:min-width="0.553cm" loext:decorative="false"/>
      <style:paragraph-properties style:writing-mode="lr-tb"/>
    </style:style>
    <style:style style:name="gr1290" style:family="graphic" style:parent-style-name="standard">
      <style:graphic-properties draw:stroke="none" svg:stroke-color="#000000" draw:fill="none" draw:fill-color="#ffffff" draw:textarea-horizontal-align="left" draw:auto-grow-height="true" draw:auto-grow-width="true" fo:min-height="0.556cm" fo:min-width="0.277cm" loext:decorative="false"/>
      <style:paragraph-properties style:writing-mode="lr-tb"/>
    </style:style>
    <style:style style:name="gr1291" style:family="graphic" style:parent-style-name="standard">
      <style:graphic-properties draw:stroke="none" svg:stroke-color="#000000" draw:fill="none" draw:fill-color="#ffffff" draw:textarea-horizontal-align="left" draw:auto-grow-height="true" draw:auto-grow-width="true" fo:min-height="0.556cm" fo:min-width="1.699cm" loext:decorative="false"/>
      <style:paragraph-properties style:writing-mode="lr-tb"/>
    </style:style>
    <style:style style:name="gr1292" style:family="graphic" style:parent-style-name="standard">
      <style:graphic-properties draw:stroke="none" svg:stroke-color="#000000" draw:fill="none" draw:fill-color="#ffffff" draw:textarea-horizontal-align="left" draw:auto-grow-height="true" draw:auto-grow-width="true" fo:min-height="0.556cm" fo:min-width="2.084cm" loext:decorative="false"/>
      <style:paragraph-properties style:writing-mode="lr-tb"/>
    </style:style>
    <style:style style:name="gr1293" style:family="graphic" style:parent-style-name="objectwithoutfill">
      <style:graphic-properties draw:stroke="dash" draw:stroke-dash="Dot" svg:stroke-width="0.1cm" draw:marker-start-width="0.35cm" draw:marker-end-width="0.35cm" draw:fill="none" draw:textarea-vertical-align="middle" fo:padding-top="0.175cm" fo:padding-bottom="0.175cm" fo:padding-left="0.3cm" fo:padding-right="0.3cm" loext:decorative="false"/>
    </style:style>
    <style:style style:name="gr1294" style:family="graphic" style:parent-style-name="standard">
      <style:graphic-properties draw:stroke="none" svg:stroke-color="#000000" draw:fill="none" draw:fill-color="#ffffff" draw:textarea-horizontal-align="left" draw:auto-grow-height="true" draw:auto-grow-width="true" fo:min-height="0.556cm" fo:min-width="2.342cm" loext:decorative="false"/>
      <style:paragraph-properties style:writing-mode="lr-tb"/>
    </style:style>
    <style:style style:name="gr129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296" style:family="graphic" style:parent-style-name="standard">
      <style:graphic-properties draw:stroke="none" svg:stroke-color="#000000" draw:fill="none" draw:fill-color="#ffffff" draw:textarea-horizontal-align="left" draw:auto-grow-height="true" draw:auto-grow-width="true" fo:min-height="0.556cm" fo:min-width="2.783cm" loext:decorative="false"/>
      <style:paragraph-properties style:writing-mode="lr-tb"/>
    </style:style>
    <style:style style:name="gr1297" style:family="graphic" style:parent-style-name="standard">
      <style:graphic-properties draw:stroke="none" svg:stroke-color="#000000" draw:fill="none" draw:fill-color="#ffffff" draw:textarea-horizontal-align="left" draw:auto-grow-height="true" draw:auto-grow-width="true" fo:min-height="0.556cm" fo:min-width="3.003cm" loext:decorative="false"/>
      <style:paragraph-properties style:writing-mode="lr-tb"/>
    </style:style>
    <style:style style:name="gr1298" style:family="graphic" style:parent-style-name="standard">
      <style:graphic-properties draw:stroke="none" svg:stroke-color="#000000" draw:fill="none" draw:fill-color="#ffffff" draw:textarea-horizontal-align="left" draw:auto-grow-height="true" draw:auto-grow-width="true" fo:min-height="0.556cm" fo:min-width="2.976cm" loext:decorative="false"/>
      <style:paragraph-properties style:writing-mode="lr-tb"/>
    </style:style>
    <style:style style:name="gr1299" style:family="graphic" style:parent-style-name="objectwithoutfill">
      <style:graphic-properties draw:marker-start="Arrowheads_20_42" draw:marker-start-width="0.3cm" draw:marker-end="" draw:marker-end-width="0.3cm" draw:fill="none" draw:textarea-vertical-align="middle" loext:decorative="false"/>
    </style:style>
    <style:style style:name="gr1300" style:family="graphic" style:parent-style-name="standard">
      <style:graphic-properties svg:stroke-color="#000000" draw:fill="solid" draw:fill-color="#ffff00" draw:textarea-horizontal-align="justify" draw:textarea-vertical-align="middle" draw:auto-grow-height="false" fo:min-height="2.75cm" fo:min-width="2.5cm" style:writing-mode="lr-tb" loext:decorative="false"/>
      <style:paragraph-properties style:writing-mode="lr-tb"/>
    </style:style>
    <style:style style:name="gr1301" style:family="graphic" style:parent-style-name="standard">
      <style:graphic-properties svg:stroke-color="#000000" draw:textarea-horizontal-align="justify" draw:textarea-vertical-align="middle" draw:auto-grow-height="false" fo:min-height="0.75cm" fo:min-width="5.5cm" style:writing-mode="lr-tb" loext:decorative="false"/>
      <style:paragraph-properties style:writing-mode="lr-tb"/>
    </style:style>
    <style:style style:name="gr1302" style:family="graphic" style:parent-style-name="standard">
      <style:graphic-properties svg:stroke-color="#000000" draw:fill="solid" draw:fill-color="#00a933" draw:textarea-horizontal-align="justify" draw:textarea-vertical-align="middle" draw:auto-grow-height="false" fo:min-height="2.75cm" fo:min-width="2.5cm" style:writing-mode="lr-tb" loext:decorative="false"/>
      <style:paragraph-properties style:writing-mode="lr-tb"/>
    </style:style>
    <style:style style:name="gr1303" style:family="graphic" style:parent-style-name="standard">
      <style:graphic-properties svg:stroke-color="#000000" draw:fill="none" loext:fill-use-slide-background="false" draw:textarea-horizontal-align="justify" draw:textarea-vertical-align="middle" draw:auto-grow-height="false" fo:min-height="10.75cm" fo:min-width="14.5cm" loext:decorative="false"/>
    </style:style>
    <style:style style:name="gr1304" style:family="graphic" style:parent-style-name="standard">
      <style:graphic-properties draw:stroke="none" svg:stroke-color="#000000" draw:fill="none" draw:fill-color="#ffffff" draw:textarea-horizontal-align="left" draw:auto-grow-height="true" draw:auto-grow-width="true" fo:min-height="0.712cm" fo:min-width="3.472cm" loext:decorative="false"/>
      <style:paragraph-properties style:writing-mode="lr-tb"/>
    </style:style>
    <style:style style:name="gr1305" style:family="graphic" style:parent-style-name="standard">
      <style:graphic-properties svg:stroke-color="#000000" draw:textarea-horizontal-align="justify" draw:textarea-vertical-align="middle" draw:auto-grow-height="false" fo:min-height="0.552cm" fo:min-width="0cm" loext:decorative="false"/>
    </style:style>
    <style:style style:name="gr1306" style:family="graphic" style:parent-style-name="standard">
      <style:graphic-properties svg:stroke-color="#000000" draw:textarea-horizontal-align="justify" draw:textarea-vertical-align="middle" draw:auto-grow-height="false" fo:min-height="0.05cm" fo:min-width="1.102cm" style:writing-mode="lr-tb" loext:decorative="false"/>
      <style:paragraph-properties style:writing-mode="lr-tb"/>
    </style:style>
    <style:style style:name="gr1307" style:family="graphic" style:parent-style-name="standard">
      <style:graphic-properties draw:stroke="none" svg:stroke-color="#000000" draw:fill="none" draw:fill-color="#ffffff" draw:textarea-horizontal-align="left" draw:auto-grow-height="true" draw:auto-grow-width="true" fo:min-height="0.712cm" fo:min-width="1.578cm" loext:decorative="false"/>
      <style:paragraph-properties style:writing-mode="lr-tb"/>
    </style:style>
    <style:style style:name="gr1308" style:family="graphic" style:parent-style-name="standard">
      <style:graphic-properties draw:stroke="none" svg:stroke-color="#000000" draw:fill="none" draw:fill-color="#ffffff" draw:textarea-horizontal-align="left" draw:auto-grow-height="true" draw:auto-grow-width="true" fo:min-height="0.712cm" fo:min-width="1.59cm" loext:decorative="false"/>
      <style:paragraph-properties style:writing-mode="lr-tb"/>
    </style:style>
    <style:style style:name="gr1309" style:family="graphic" style:parent-style-name="standard">
      <style:graphic-properties draw:stroke="none" svg:stroke-color="#000000" draw:fill="none" draw:fill-color="#ffffff" draw:textarea-horizontal-align="left" draw:auto-grow-height="true" draw:auto-grow-width="true" fo:min-height="0.712cm" fo:min-width="2.367cm" loext:decorative="false"/>
      <style:paragraph-properties style:writing-mode="lr-tb"/>
    </style:style>
    <style:style style:name="gr1310" style:family="graphic" style:parent-style-name="standard">
      <style:graphic-properties svg:stroke-color="#000000" draw:textarea-horizontal-align="justify" draw:textarea-vertical-align="middle" draw:auto-grow-height="false" fo:min-height="0.05cm" fo:min-width="8.5cm" loext:decorative="false"/>
    </style:style>
    <style:style style:name="gr1311" style:family="graphic" style:parent-style-name="standard">
      <style:graphic-properties svg:stroke-color="#000000" draw:textarea-horizontal-align="justify" draw:textarea-vertical-align="middle" draw:auto-grow-height="false" fo:min-height="1.352cm" fo:min-width="0cm" loext:decorative="false"/>
    </style:style>
    <style:style style:name="gr1312" style:family="graphic" style:parent-style-name="standard">
      <style:graphic-properties svg:stroke-color="#000000" draw:textarea-horizontal-align="justify" draw:textarea-vertical-align="middle" draw:auto-grow-height="false" fo:min-height="0.75cm" fo:min-width="13.5cm" style:writing-mode="lr-tb" loext:decorative="false"/>
      <style:paragraph-properties style:writing-mode="lr-tb"/>
    </style:style>
    <style:style style:name="gr1313" style:family="graphic" style:parent-style-name="standard">
      <style:graphic-properties svg:stroke-color="#000000" draw:textarea-horizontal-align="justify" draw:textarea-vertical-align="middle" draw:auto-grow-height="false" fo:min-height="0.75cm" fo:min-width="8.5cm" style:writing-mode="lr-tb" loext:decorative="false"/>
      <style:paragraph-properties style:writing-mode="lr-tb"/>
    </style:style>
    <style:style style:name="gr1314" style:family="graphic" style:parent-style-name="standard">
      <style:graphic-properties svg:stroke-color="#000000" draw:fill="solid" draw:fill-color="#00a933" draw:textarea-horizontal-align="justify" draw:textarea-vertical-align="middle" draw:auto-grow-height="false" fo:min-height="2.75cm" fo:min-width="1.5cm" style:writing-mode="lr-tb" loext:decorative="false"/>
      <style:paragraph-properties style:writing-mode="lr-tb"/>
    </style:style>
    <style:style style:name="gr1315" style:family="graphic" style:parent-style-name="standard">
      <style:graphic-properties svg:stroke-color="#000000" draw:fill="none" loext:fill-use-slide-background="false" draw:textarea-horizontal-align="justify" draw:textarea-vertical-align="middle" draw:auto-grow-height="false" fo:min-height="10.75cm" fo:min-width="25.5cm" loext:decorative="false"/>
    </style:style>
    <style:style style:name="gr1316" style:family="graphic" style:parent-style-name="standard">
      <style:graphic-properties draw:stroke="none" svg:stroke-color="#000000" draw:fill="none" draw:fill-color="#ffffff" draw:textarea-horizontal-align="left" draw:auto-grow-height="true" draw:auto-grow-width="true" fo:min-height="0.712cm" fo:min-width="8.977cm" loext:decorative="false"/>
      <style:paragraph-properties style:writing-mode="lr-tb"/>
    </style:style>
    <style:style style:name="gr1317" style:family="graphic" style:parent-style-name="standard">
      <style:graphic-properties svg:stroke-color="#000000" draw:textarea-horizontal-align="justify" draw:textarea-vertical-align="middle" draw:auto-grow-height="false" fo:min-height="1.75cm" fo:min-width="3.5cm" style:writing-mode="lr-tb" loext:decorative="false"/>
      <style:paragraph-properties style:writing-mode="lr-tb"/>
    </style:style>
    <style:style style:name="gr1318" style:family="graphic" style:parent-style-name="standard">
      <style:graphic-properties svg:stroke-color="#000000" draw:fill="solid" draw:fill-color="#ff0000" draw:textarea-horizontal-align="justify" draw:textarea-vertical-align="middle" draw:auto-grow-height="false" fo:min-height="2.75cm" fo:min-width="2.5cm" style:writing-mode="lr-tb" loext:decorative="false"/>
      <style:paragraph-properties style:writing-mode="lr-tb"/>
    </style:style>
    <style:style style:name="gr1319" style:family="graphic" style:parent-style-name="standard">
      <style:graphic-properties draw:stroke="none" svg:stroke-color="#000000" draw:fill="none" draw:fill-color="#ffffff" draw:textarea-horizontal-align="left" draw:auto-grow-height="true" draw:auto-grow-width="true" fo:min-height="0.712cm" fo:min-width="1.519cm" loext:decorative="false"/>
      <style:paragraph-properties style:writing-mode="lr-tb"/>
    </style:style>
    <style:style style:name="gr1320" style:family="graphic" style:parent-style-name="standard">
      <style:graphic-properties draw:stroke="none" svg:stroke-color="#000000" draw:fill="none" draw:fill-color="#ffffff" draw:textarea-horizontal-align="left" draw:auto-grow-height="true" draw:auto-grow-width="true" fo:min-height="0.712cm" fo:min-width="7.139cm" loext:decorative="false"/>
      <style:paragraph-properties style:writing-mode="lr-tb"/>
    </style:style>
    <style:style style:name="gr1321" style:family="graphic" style:parent-style-name="standard" style:list-style-name="L1">
      <style:graphic-properties svg:stroke-color="#111111" draw:textarea-horizontal-align="justify" draw:textarea-vertical-align="middle" draw:auto-grow-height="false" fo:min-height="0.75cm" fo:min-width="2.5cm" style:writing-mode="lr-tb" loext:decorative="false"/>
      <style:paragraph-properties style:writing-mode="lr-tb"/>
    </style:style>
    <style:style style:name="gr1322" style:family="graphic" style:parent-style-name="standard" style:list-style-name="L1">
      <style:graphic-properties svg:stroke-color="#111111" draw:textarea-horizontal-align="justify" draw:textarea-vertical-align="middle" draw:auto-grow-height="false" fo:min-height="0.75cm" fo:min-width="2.5cm" style:writing-mode="lr-tb" loext:decorative="false"/>
      <style:paragraph-properties style:writing-mode="lr-tb"/>
    </style:style>
    <style:style style:name="gr1323" style:family="graphic" style:parent-style-name="standard" style:list-style-name="L1">
      <style:graphic-properties svg:stroke-color="#111111" draw:textarea-horizontal-align="justify" draw:textarea-vertical-align="middle" draw:auto-grow-height="false" fo:min-height="1.75cm" fo:min-width="5.1cm" style:writing-mode="lr-tb" loext:decorative="false"/>
      <style:paragraph-properties style:writing-mode="lr-tb"/>
    </style:style>
    <style:style style:name="gr1324" style:family="graphic" style:parent-style-name="standard">
      <style:graphic-properties svg:stroke-color="#000000" draw:textarea-horizontal-align="justify" draw:textarea-vertical-align="middle" draw:auto-grow-height="false" fo:min-height="0.952cm" fo:min-width="0cm" loext:decorative="false"/>
    </style:style>
    <style:style style:name="gr1325" style:family="graphic" style:parent-style-name="standard">
      <style:graphic-properties svg:stroke-color="#000000" draw:fill="solid" draw:fill-color="#00a933" draw:textarea-horizontal-align="justify" draw:textarea-vertical-align="middle" draw:auto-grow-height="false" fo:min-height="5.75cm" fo:min-width="5.5cm" style:writing-mode="lr-tb" loext:decorative="false"/>
      <style:paragraph-properties style:writing-mode="lr-tb"/>
    </style:style>
    <style:style style:name="gr1326" style:family="graphic" style:parent-style-name="standard">
      <style:graphic-properties draw:stroke="none" svg:stroke-color="#000000" draw:fill="none" draw:fill-color="#ffffff" draw:textarea-horizontal-align="left" draw:auto-grow-height="true" draw:auto-grow-width="true" fo:min-height="0.712cm" fo:min-width="1.414cm" loext:decorative="false"/>
      <style:paragraph-properties style:writing-mode="lr-tb"/>
    </style:style>
    <style:style style:name="gr1327" style:family="graphic" style:parent-style-name="standard">
      <style:graphic-properties draw:stroke="none" svg:stroke-color="#000000" draw:fill="none" draw:fill-color="#ffffff" draw:textarea-horizontal-align="left" draw:auto-grow-height="true" draw:auto-grow-width="true" fo:min-height="0.712cm" fo:min-width="1.379cm" loext:decorative="false"/>
      <style:paragraph-properties style:writing-mode="lr-tb"/>
    </style:style>
    <style:style style:name="gr1328" style:family="graphic" style:parent-style-name="standard">
      <style:graphic-properties draw:stroke="none" svg:stroke-color="#000000" draw:fill="none" draw:fill-color="#ffffff" draw:textarea-horizontal-align="left" draw:auto-grow-height="true" draw:auto-grow-width="true" fo:min-height="0.712cm" fo:min-width="1.308cm" loext:decorative="false"/>
      <style:paragraph-properties style:writing-mode="lr-tb"/>
    </style:style>
    <style:style style:name="gr1329" style:family="graphic" style:parent-style-name="standard">
      <style:graphic-properties draw:stroke="none" svg:stroke-color="#000000" draw:fill="none" draw:fill-color="#ffffff" draw:textarea-horizontal-align="left" draw:auto-grow-height="true" draw:auto-grow-width="true" fo:min-height="0.712cm" fo:min-width="1.343cm" loext:decorative="false"/>
      <style:paragraph-properties style:writing-mode="lr-tb"/>
    </style:style>
    <style:style style:name="gr1330" style:family="graphic" style:parent-style-name="standard">
      <style:graphic-properties draw:stroke="none" svg:stroke-color="#000000" draw:fill="none" draw:fill-color="#ffffff" draw:textarea-horizontal-align="left" draw:auto-grow-height="true" draw:auto-grow-width="true" fo:min-height="0.712cm" fo:min-width="1.591cm" loext:decorative="false"/>
      <style:paragraph-properties style:writing-mode="lr-tb"/>
    </style:style>
    <style:style style:name="gr1331" style:family="graphic" style:parent-style-name="standard">
      <style:graphic-properties draw:stroke="none" svg:stroke-color="#000000" draw:fill="none" draw:fill-color="#ffffff" draw:textarea-horizontal-align="left" draw:auto-grow-height="true" draw:auto-grow-width="true" fo:min-height="0.712cm" fo:min-width="1.2cm" loext:decorative="false"/>
      <style:paragraph-properties style:writing-mode="lr-tb"/>
    </style:style>
    <style:style style:name="gr1332" style:family="graphic" style:parent-style-name="standard">
      <style:graphic-properties draw:stroke="none" svg:stroke-color="#000000" draw:fill="none" draw:fill-color="#ffffff" draw:textarea-horizontal-align="left" draw:auto-grow-height="true" draw:auto-grow-width="true" fo:min-height="0.712cm" fo:min-width="2.047cm" loext:decorative="false"/>
      <style:paragraph-properties style:writing-mode="lr-tb"/>
    </style:style>
    <style:style style:name="gr1333" style:family="graphic" style:parent-style-name="standard">
      <style:graphic-properties draw:stroke="none" svg:stroke-color="#000000" draw:fill="none" draw:fill-color="#ffffff" draw:textarea-horizontal-align="left" draw:auto-grow-height="true" draw:auto-grow-width="true" fo:min-height="0.712cm" fo:min-width="3.211cm" loext:decorative="false"/>
      <style:paragraph-properties style:writing-mode="lr-tb"/>
    </style:style>
    <style:style style:name="gr1334" style:family="graphic" style:parent-style-name="standard">
      <style:graphic-properties draw:stroke="none" svg:stroke-color="#000000" draw:fill="none" draw:fill-color="#ffffff" draw:textarea-horizontal-align="left" draw:auto-grow-height="true" draw:auto-grow-width="true" fo:min-height="0.712cm" fo:min-width="2.999cm" loext:decorative="false"/>
      <style:paragraph-properties style:writing-mode="lr-tb"/>
    </style:style>
    <style:style style:name="gr1335" style:family="graphic" style:parent-style-name="standard">
      <style:graphic-properties draw:stroke="none" svg:stroke-color="#000000" draw:fill="none" draw:fill-color="#ffffff" draw:textarea-horizontal-align="left" draw:auto-grow-height="true" draw:auto-grow-width="true" fo:min-height="0.712cm" fo:min-width="3.071cm" loext:decorative="false"/>
      <style:paragraph-properties style:writing-mode="lr-tb"/>
    </style:style>
    <style:style style:name="gr1336" style:family="graphic" style:parent-style-name="standard">
      <style:graphic-properties svg:stroke-color="#000000" draw:fill-color="#ffffff" draw:textarea-horizontal-align="justify" draw:textarea-vertical-align="middle" draw:auto-grow-height="false" fo:min-height="1.75cm" fo:min-width="1.5cm" style:writing-mode="lr-tb" loext:decorative="false"/>
      <style:paragraph-properties style:writing-mode="lr-tb"/>
    </style:style>
    <style:style style:name="gr1337" style:family="graphic" style:parent-style-name="objectwithoutfill">
      <style:graphic-properties draw:marker-end="Linienspitzen_20_13" draw:marker-end-width="0.3cm" draw:fill="none" draw:textarea-vertical-align="middle" loext:decorative="false"/>
    </style:style>
    <style:style style:name="gr1338" style:family="graphic" style:parent-style-name="objectwithoutfill">
      <style:graphic-properties draw:marker-end="Linienspitzen_20_14" draw:marker-end-width="0.3cm" draw:fill="none" draw:textarea-vertical-align="middle" loext:decorative="false"/>
    </style:style>
    <style:style style:name="gr1339" style:family="graphic" style:parent-style-name="standard">
      <style:graphic-properties svg:stroke-color="#000000" draw:fill-color="#ffffff" draw:textarea-horizontal-align="justify" draw:textarea-vertical-align="middle" draw:auto-grow-height="false" fo:min-height="3.75cm" fo:min-width="5.5cm" style:writing-mode="lr-tb" loext:decorative="false"/>
      <style:paragraph-properties style:writing-mode="lr-tb"/>
    </style:style>
    <style:style style:name="gr1340" style:family="graphic" style:parent-style-name="objectwithoutfill">
      <style:graphic-properties draw:marker-end="Linienspitzen_20_15" draw:marker-end-width="0.3cm" draw:fill="none" draw:textarea-vertical-align="middle" loext:decorative="false"/>
    </style:style>
    <style:style style:name="gr1341" style:family="graphic" style:parent-style-name="objectwithoutfill">
      <style:graphic-properties draw:marker-end="Linienspitzen_20_18" draw:marker-end-width="0.3cm" draw:fill="none" draw:textarea-vertical-align="middle" loext:decorative="false"/>
    </style:style>
    <style:style style:name="gr1342" style:family="graphic" style:parent-style-name="standard">
      <style:graphic-properties svg:stroke-color="#000000" draw:fill-color="#ffffff" draw:textarea-horizontal-align="justify" draw:textarea-vertical-align="middle" draw:auto-grow-height="false" fo:min-height="1.75cm" fo:min-width="2.5cm" style:writing-mode="lr-tb" loext:decorative="false"/>
      <style:paragraph-properties style:writing-mode="lr-tb"/>
    </style:style>
    <style:style style:name="gr1343" style:family="graphic" style:parent-style-name="objectwithoutfill">
      <style:graphic-properties draw:marker-end="Linienspitzen_20_19" draw:marker-end-width="0.3cm" draw:fill="none" draw:textarea-vertical-align="middle" loext:decorative="false"/>
    </style:style>
    <style:style style:name="gr1344" style:family="graphic" style:parent-style-name="standard">
      <style:graphic-properties draw:stroke="none" svg:stroke-color="#000000" draw:fill="none" draw:fill-color="#ffffff" draw:textarea-horizontal-align="left" draw:auto-grow-height="true" draw:auto-grow-width="true" fo:min-height="0.712cm" fo:min-width="1.661cm" loext:decorative="false"/>
      <style:paragraph-properties style:writing-mode="lr-tb"/>
    </style:style>
    <style:style style:name="gr1345" style:family="graphic" style:parent-style-name="standard">
      <style:graphic-properties draw:stroke="none" svg:stroke-color="#000000" draw:fill="none" draw:fill-color="#ffffff" draw:textarea-horizontal-align="left" draw:auto-grow-height="true" draw:auto-grow-width="true" fo:min-height="0.712cm" fo:min-width="1.944cm" loext:decorative="false"/>
      <style:paragraph-properties style:writing-mode="lr-tb"/>
    </style:style>
    <style:style style:name="gr1346" style:family="graphic" style:parent-style-name="objectwithoutfill">
      <style:graphic-properties draw:marker-end="Linienspitzen_20_20" draw:marker-end-width="0.3cm" draw:fill="none" draw:textarea-vertical-align="middle" loext:decorative="false"/>
    </style:style>
    <style:style style:name="gr1347" style:family="graphic" style:parent-style-name="standard">
      <style:graphic-properties draw:stroke="none" svg:stroke-color="#000000" draw:fill="none" draw:fill-color="#ffffff" draw:textarea-horizontal-align="left" draw:auto-grow-height="true" draw:auto-grow-width="true" fo:min-height="0.712cm" fo:min-width="0.988cm" loext:decorative="false"/>
      <style:paragraph-properties style:writing-mode="lr-tb"/>
    </style:style>
    <style:style style:name="gr1348" style:family="graphic" style:parent-style-name="standard">
      <style:graphic-properties draw:stroke="none" svg:stroke-color="#000000" draw:fill="none" draw:fill-color="#ffffff" draw:textarea-horizontal-align="left" draw:auto-grow-height="true" draw:auto-grow-width="true" fo:min-height="0.589cm" fo:min-width="1.767cm" loext:decorative="false"/>
      <style:paragraph-properties style:writing-mode="lr-tb"/>
    </style:style>
    <style:style style:name="gr1349" style:family="graphic" style:parent-style-name="standard">
      <style:graphic-properties draw:stroke="none" svg:stroke-color="#000000" draw:fill="none" draw:fill-color="#ffffff" draw:textarea-horizontal-align="left" draw:auto-grow-height="true" draw:auto-grow-width="true" fo:min-height="0.712cm" fo:min-width="1.272cm" loext:decorative="false"/>
      <style:paragraph-properties style:writing-mode="lr-tb"/>
    </style:style>
    <style:style style:name="gr1350" style:family="graphic" style:parent-style-name="standard">
      <style:graphic-properties draw:stroke="none" svg:stroke-color="#000000" draw:fill="none" draw:fill-color="#ffffff" draw:textarea-horizontal-align="left" draw:auto-grow-height="true" draw:auto-grow-width="true" fo:min-height="0.712cm" fo:min-width="2.614cm" loext:decorative="false"/>
      <style:paragraph-properties style:writing-mode="lr-tb"/>
    </style:style>
    <style:style style:name="gr1351" style:family="graphic" style:parent-style-name="standard">
      <style:graphic-properties draw:stroke="none" svg:stroke-color="#000000" draw:fill="none" draw:fill-color="#ffffff" draw:textarea-horizontal-align="left" draw:auto-grow-height="true" draw:auto-grow-width="true" fo:min-height="0.712cm" fo:min-width="3.249cm" loext:decorative="false"/>
      <style:paragraph-properties style:writing-mode="lr-tb"/>
    </style:style>
    <style:style style:name="gr1352" style:family="graphic" style:parent-style-name="standard">
      <style:graphic-properties draw:stroke="none" svg:stroke-color="#000000" draw:fill="none" draw:fill-color="#ffffff" draw:textarea-horizontal-align="left" draw:auto-grow-height="true" draw:auto-grow-width="true" fo:min-height="0.712cm" fo:min-width="3.6cm" loext:decorative="false"/>
      <style:paragraph-properties style:writing-mode="lr-tb"/>
    </style:style>
    <style:style style:name="gr1353" style:family="graphic" style:parent-style-name="standard">
      <style:graphic-properties draw:stroke="none" svg:stroke-color="#000000" draw:fill="none" draw:fill-color="#ffffff" draw:textarea-horizontal-align="left" draw:auto-grow-height="true" draw:auto-grow-width="true" fo:min-height="0.712cm" fo:min-width="3.033cm" loext:decorative="false"/>
      <style:paragraph-properties style:writing-mode="lr-tb"/>
    </style:style>
    <style:style style:name="gr1354" style:family="graphic" style:parent-style-name="standard">
      <style:graphic-properties svg:stroke-color="#000000" draw:fill-color="#ffffff" draw:textarea-horizontal-align="justify" draw:textarea-vertical-align="middle" draw:auto-grow-height="false" fo:min-height="0.75cm" fo:min-width="0.5cm" loext:decorative="false"/>
    </style:style>
    <style:style style:name="gr1355" style:family="graphic" style:parent-style-name="standard">
      <style:graphic-properties draw:stroke="none" svg:stroke-color="#000000" draw:fill="none" draw:fill-color="#ffffff" draw:textarea-horizontal-align="left" draw:auto-grow-height="true" draw:auto-grow-width="true" fo:min-height="0.712cm" fo:min-width="2.965cm" loext:decorative="false"/>
      <style:paragraph-properties style:writing-mode="lr-tb"/>
    </style:style>
    <style:style style:name="gr1356" style:family="graphic" style:parent-style-name="standard">
      <style:graphic-properties draw:stroke="none" svg:stroke-color="#000000" draw:fill="none" draw:fill-color="#ffffff" draw:textarea-horizontal-align="left" draw:auto-grow-height="true" draw:auto-grow-width="true" fo:min-height="0.712cm" fo:min-width="3.952cm" loext:decorative="false"/>
      <style:paragraph-properties style:writing-mode="lr-tb"/>
    </style:style>
    <style:style style:name="gr1357" style:family="graphic" style:parent-style-name="standard">
      <style:graphic-properties draw:stroke="none" svg:stroke-color="#000000" draw:fill="none" draw:fill-color="#ffffff" draw:textarea-horizontal-align="left" draw:auto-grow-height="true" draw:auto-grow-width="true" fo:min-height="0.712cm" fo:min-width="4.045cm" loext:decorative="false"/>
      <style:paragraph-properties style:writing-mode="lr-tb"/>
    </style:style>
    <style:style style:name="gr1358" style:family="graphic" style:parent-style-name="standard">
      <style:graphic-properties draw:stroke="none" svg:stroke-color="#000000" draw:fill="none" draw:fill-color="#ffffff" draw:textarea-horizontal-align="left" draw:auto-grow-height="true" draw:auto-grow-width="true" fo:min-height="0.712cm" fo:min-width="3.02cm" loext:decorative="false"/>
      <style:paragraph-properties style:writing-mode="lr-tb"/>
    </style:style>
    <style:style style:name="gr1359" style:family="graphic" style:parent-style-name="standard">
      <style:graphic-properties draw:stroke="none" svg:stroke-color="#000000" draw:fill="none" draw:fill-color="#ffffff" draw:textarea-horizontal-align="left" draw:auto-grow-height="true" draw:auto-grow-width="true" fo:min-height="0.712cm" fo:min-width="2.754cm" loext:decorative="false"/>
      <style:paragraph-properties style:writing-mode="lr-tb"/>
    </style:style>
    <style:style style:name="gr1360" style:family="graphic" style:parent-style-name="standard">
      <style:graphic-properties svg:stroke-color="#000000" draw:fill="solid" draw:fill-color="#00a933" draw:textarea-horizontal-align="justify" draw:textarea-vertical-align="middle" draw:auto-grow-height="false" fo:min-height="10.75cm" fo:min-width="9.5cm" style:writing-mode="lr-tb" loext:decorative="false"/>
      <style:paragraph-properties style:writing-mode="lr-tb"/>
    </style:style>
    <style:style style:name="gr1361" style:family="graphic" style:parent-style-name="standard">
      <style:graphic-properties draw:stroke="none" svg:stroke-color="#000000" draw:fill="none" draw:fill-color="#ffffff" draw:textarea-horizontal-align="left" draw:auto-grow-height="true" draw:auto-grow-width="true" fo:min-height="0.712cm" fo:min-width="2.648cm" loext:decorative="false"/>
      <style:paragraph-properties style:writing-mode="lr-tb"/>
    </style:style>
    <style:style style:name="gr1362" style:family="graphic" style:parent-style-name="standard">
      <style:graphic-properties draw:stroke="none" svg:stroke-color="#000000" draw:fill="none" draw:fill-color="#ffffff" draw:textarea-horizontal-align="left" draw:auto-grow-height="true" draw:auto-grow-width="true" fo:min-height="0.712cm" fo:min-width="1.306cm" loext:decorative="false"/>
      <style:paragraph-properties style:writing-mode="lr-tb"/>
    </style:style>
    <style:style style:name="gr1363" style:family="graphic" style:parent-style-name="standard">
      <style:graphic-properties draw:stroke="none" svg:stroke-color="#000000" draw:fill="none" draw:fill-color="#ffffff" draw:textarea-horizontal-align="left" draw:auto-grow-height="true" draw:auto-grow-width="true" fo:min-height="0.712cm" fo:min-width="1.378cm" loext:decorative="false"/>
      <style:paragraph-properties style:writing-mode="lr-tb"/>
    </style:style>
    <style:style style:name="gr1364" style:family="graphic" style:parent-style-name="standard">
      <style:graphic-properties draw:stroke="none" svg:stroke-color="#000000" draw:fill="none" draw:fill-color="#ffffff" draw:textarea-horizontal-align="left" draw:auto-grow-height="true" draw:auto-grow-width="true" fo:min-height="0.712cm" fo:min-width="1.518cm" loext:decorative="false"/>
      <style:paragraph-properties style:writing-mode="lr-tb"/>
    </style:style>
    <style:style style:name="gr1365" style:family="graphic" style:parent-style-name="standard">
      <style:graphic-properties draw:stroke="none" svg:stroke-color="#000000" draw:fill="none" draw:fill-color="#ffffff" draw:textarea-horizontal-align="left" draw:auto-grow-height="true" draw:auto-grow-width="true" fo:min-height="0.712cm" fo:min-width="1.166cm" loext:decorative="false"/>
      <style:paragraph-properties style:writing-mode="lr-tb"/>
    </style:style>
    <style:style style:name="gr1366" style:family="graphic" style:parent-style-name="standard">
      <style:graphic-properties draw:stroke="none" svg:stroke-color="#000000" draw:fill="none" draw:fill-color="#ffffff" draw:textarea-horizontal-align="left" draw:auto-grow-height="true" draw:auto-grow-width="true" fo:min-height="0.712cm" fo:min-width="3.566cm" loext:decorative="false"/>
      <style:paragraph-properties style:writing-mode="lr-tb"/>
    </style:style>
    <style:style style:name="gr1367" style:family="graphic" style:parent-style-name="standard">
      <style:graphic-properties draw:stroke="none" svg:stroke-color="#000000" draw:fill="none" draw:fill-color="#ffffff" draw:textarea-horizontal-align="left" draw:auto-grow-height="true" draw:auto-grow-width="true" fo:min-height="0.712cm" fo:min-width="3.846cm" loext:decorative="false"/>
      <style:paragraph-properties style:writing-mode="lr-tb"/>
    </style:style>
    <style:style style:name="gr1368" style:family="graphic" style:parent-style-name="standard">
      <style:graphic-properties draw:stroke="none" svg:stroke-color="#000000" draw:fill="none" draw:fill-color="#ffffff" draw:textarea-horizontal-align="left" draw:auto-grow-height="true" draw:auto-grow-width="true" fo:min-height="0.712cm" fo:min-width="2.398cm" loext:decorative="false"/>
      <style:paragraph-properties style:writing-mode="lr-tb"/>
    </style:style>
    <style:style style:name="gr1369" style:family="graphic" style:parent-style-name="standard">
      <style:graphic-properties draw:stroke="none" svg:stroke-color="#000000" draw:fill="none" draw:fill-color="#ffffff" draw:textarea-horizontal-align="left" draw:auto-grow-height="true" draw:auto-grow-width="true" fo:min-height="0.712cm" fo:min-width="2.402cm" loext:decorative="false"/>
      <style:paragraph-properties style:writing-mode="lr-tb"/>
    </style:style>
    <style:style style:name="gr1370" style:family="graphic" style:parent-style-name="standard">
      <style:graphic-properties draw:stroke="none" svg:stroke-color="#000000" draw:fill="none" draw:fill-color="#ffffff" draw:textarea-horizontal-align="left" draw:auto-grow-height="true" draw:auto-grow-width="true" fo:min-height="0.712cm" fo:min-width="2.893cm" loext:decorative="false"/>
      <style:paragraph-properties style:writing-mode="lr-tb"/>
    </style:style>
    <style:style style:name="gr1371" style:family="graphic" style:parent-style-name="standard">
      <style:graphic-properties draw:stroke="none" svg:stroke-color="#000000" draw:fill="none" draw:fill-color="#ffffff" draw:textarea-horizontal-align="left" draw:auto-grow-height="true" draw:auto-grow-width="true" fo:min-height="0.712cm" fo:min-width="3.177cm" loext:decorative="false"/>
      <style:paragraph-properties style:writing-mode="lr-tb"/>
    </style:style>
    <style:style style:name="gr1372" style:family="graphic" style:parent-style-name="standard">
      <style:graphic-properties draw:stroke="none" svg:stroke-color="#000000" draw:fill="none" draw:fill-color="#ffffff" draw:textarea-horizontal-align="left" draw:auto-grow-height="true" draw:auto-grow-width="true" fo:min-height="0.712cm" fo:min-width="2.788cm" loext:decorative="false"/>
      <style:paragraph-properties style:writing-mode="lr-tb"/>
    </style:style>
    <style:style style:name="gr1373" style:family="graphic" style:parent-style-name="standard">
      <style:graphic-properties draw:stroke="none" svg:stroke-color="#000000" draw:fill="none" draw:fill-color="#ffffff" draw:textarea-horizontal-align="left" draw:auto-grow-height="true" draw:auto-grow-width="true" fo:min-height="0.712cm" fo:min-width="3.317cm" loext:decorative="false"/>
      <style:paragraph-properties style:writing-mode="lr-tb"/>
    </style:style>
    <style:style style:name="gr1374" style:family="graphic" style:parent-style-name="standard">
      <style:graphic-properties svg:stroke-color="#000000" draw:fill-color="#ffff00" draw:textarea-horizontal-align="left" draw:textarea-vertical-align="bottom" draw:auto-grow-height="false" fo:min-height="2.75cm" fo:min-width="4cm" style:writing-mode="lr-tb" loext:decorative="false"/>
      <style:paragraph-properties style:writing-mode="lr-tb"/>
    </style:style>
    <style:style style:name="gr137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789cm" loext:decorative="false"/>
      <style:paragraph-properties style:writing-mode="lr-tb"/>
    </style:style>
    <style:style style:name="gr137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18cm" loext:decorative="false"/>
      <style:paragraph-properties style:writing-mode="lr-tb"/>
    </style:style>
    <style:style style:name="gr137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97cm" loext:decorative="false"/>
      <style:paragraph-properties style:writing-mode="lr-tb"/>
    </style:style>
    <style:style style:name="gr137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23cm" loext:decorative="false"/>
      <style:paragraph-properties style:writing-mode="lr-tb"/>
    </style:style>
    <style:style style:name="gr137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06cm" loext:decorative="false"/>
      <style:paragraph-properties style:writing-mode="lr-tb"/>
    </style:style>
    <style:style style:name="gr138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57cm" loext:decorative="false"/>
      <style:paragraph-properties style:writing-mode="lr-tb"/>
    </style:style>
    <style:style style:name="gr1381" style:family="graphic" style:parent-style-name="standard">
      <style:graphic-properties svg:stroke-color="#000000" draw:fill-color="#ffff00" draw:textarea-vertical-align="middle" loext:decorative="false"/>
    </style:style>
    <style:style style:name="gr138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306cm" loext:decorative="false"/>
      <style:paragraph-properties style:writing-mode="lr-tb"/>
    </style:style>
    <style:style style:name="gr1383" style:family="graphic" style:parent-style-name="objectwithoutfill">
      <style:graphic-properties draw:marker-end="Linienspitzen_20_16" draw:marker-end-width="0.3cm" draw:fill="none" draw:textarea-vertical-align="middle" loext:decorative="false"/>
    </style:style>
    <style:style style:name="gr1384" style:family="graphic" style:parent-style-name="standard">
      <style:graphic-properties svg:stroke-color="#000000" draw:textarea-horizontal-align="left" draw:textarea-vertical-align="bottom" draw:auto-grow-height="false" fo:min-height="3.75cm" fo:min-width="3.5cm" style:writing-mode="lr-tb" loext:decorative="false"/>
      <style:paragraph-properties style:writing-mode="lr-tb"/>
    </style:style>
    <style:style style:name="gr138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378cm" loext:decorative="false"/>
      <style:paragraph-properties style:writing-mode="lr-tb"/>
    </style:style>
    <style:style style:name="gr138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543cm" loext:decorative="false"/>
      <style:paragraph-properties style:writing-mode="lr-tb"/>
    </style:style>
    <style:style style:name="gr138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99cm" loext:decorative="false"/>
      <style:paragraph-properties style:writing-mode="lr-tb"/>
    </style:style>
    <style:style style:name="gr1388" style:family="graphic" style:parent-style-name="standard">
      <style:graphic-properties draw:stroke="none" svg:stroke-color="#000000" draw:fill="none" draw:fill-color="#ffffff" draw:textarea-horizontal-align="left" draw:auto-grow-height="true" draw:auto-grow-width="true" fo:min-height="0.556cm" fo:min-width="1.351cm" loext:decorative="false"/>
      <style:paragraph-properties style:writing-mode="lr-tb"/>
    </style:style>
    <style:style style:name="gr1389" style:family="graphic" style:parent-style-name="standard">
      <style:graphic-properties draw:stroke="none" svg:stroke-color="#000000" draw:fill="none" draw:fill-color="#ffffff" draw:textarea-horizontal-align="left" draw:auto-grow-height="true" draw:auto-grow-width="true" fo:min-height="0.556cm" fo:min-width="1.379cm" loext:decorative="false"/>
      <style:paragraph-properties style:writing-mode="lr-tb"/>
    </style:style>
    <style:style style:name="gr1390" style:family="graphic" style:parent-style-name="standard">
      <style:graphic-properties draw:stroke="none" svg:stroke-color="#000000" draw:fill="none" draw:fill-color="#ffffff" draw:textarea-horizontal-align="left" draw:auto-grow-height="true" draw:auto-grow-width="true" fo:min-height="0.556cm" fo:min-width="1.516cm" loext:decorative="false"/>
      <style:paragraph-properties style:writing-mode="lr-tb"/>
    </style:style>
    <style:style style:name="gr1391" style:family="graphic" style:parent-style-name="standard">
      <style:graphic-properties draw:stroke="none" svg:stroke-color="#000000" draw:fill="none" draw:fill-color="#ffffff" draw:textarea-horizontal-align="left" draw:auto-grow-height="true" draw:auto-grow-width="true" fo:min-height="0.556cm" fo:min-width="1.323cm" loext:decorative="false"/>
      <style:paragraph-properties style:writing-mode="lr-tb"/>
    </style:style>
    <style:style style:name="gr1392" style:family="graphic" style:parent-style-name="standard">
      <style:graphic-properties draw:stroke="none" svg:stroke-color="#000000" draw:fill="none" draw:fill-color="#ffffff" draw:textarea-horizontal-align="left" draw:auto-grow-height="true" draw:auto-grow-width="true" fo:min-height="0.556cm" fo:min-width="1.847cm" loext:decorative="false"/>
      <style:paragraph-properties style:writing-mode="lr-tb"/>
    </style:style>
    <style:style style:name="gr1393" style:family="graphic" style:parent-style-name="standard">
      <style:graphic-properties draw:stroke="none" svg:stroke-color="#000000" draw:fill="none" draw:fill-color="#ffffff" draw:textarea-horizontal-align="left" draw:auto-grow-height="true" draw:auto-grow-width="true" fo:min-height="0.556cm" fo:min-width="1.158cm" loext:decorative="false"/>
      <style:paragraph-properties style:writing-mode="lr-tb"/>
    </style:style>
    <style:style style:name="gr1394" style:family="graphic" style:parent-style-name="standard">
      <style:graphic-properties draw:stroke="none" svg:stroke-color="#000000" draw:fill="none" draw:fill-color="#ffffff" draw:textarea-horizontal-align="left" draw:auto-grow-height="true" draw:auto-grow-width="true" fo:min-height="0.556cm" fo:min-width="1.461cm" loext:decorative="false"/>
      <style:paragraph-properties style:writing-mode="lr-tb"/>
    </style:style>
    <style:style style:name="gr1395" style:family="graphic" style:parent-style-name="standard">
      <style:graphic-properties svg:stroke-color="#000000" draw:textarea-horizontal-align="left" draw:textarea-vertical-align="bottom" draw:auto-grow-height="false" fo:min-height="4.75cm" fo:min-width="4.5cm" style:writing-mode="lr-tb" loext:decorative="false"/>
      <style:paragraph-properties style:writing-mode="lr-tb"/>
    </style:style>
    <style:style style:name="gr139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91cm" loext:decorative="false"/>
      <style:paragraph-properties style:writing-mode="lr-tb"/>
    </style:style>
    <style:style style:name="gr139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73cm" loext:decorative="false"/>
      <style:paragraph-properties style:writing-mode="lr-tb"/>
    </style:style>
    <style:style style:name="gr139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19cm" loext:decorative="false"/>
      <style:paragraph-properties style:writing-mode="lr-tb"/>
    </style:style>
    <style:style style:name="gr139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448cm" loext:decorative="false"/>
      <style:paragraph-properties style:writing-mode="lr-tb"/>
    </style:style>
    <style:style style:name="gr140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12cm" loext:decorative="false"/>
      <style:paragraph-properties style:writing-mode="lr-tb"/>
    </style:style>
    <style:style style:name="gr1401" style:family="graphic" style:parent-style-name="standard">
      <style:graphic-properties draw:stroke="none" svg:stroke-color="#000000" draw:fill="none" draw:fill-color="#ffffff" draw:textarea-horizontal-align="left" draw:auto-grow-height="true" draw:auto-grow-width="true" fo:min-height="0.556cm" fo:min-width="1.434cm" loext:decorative="false"/>
      <style:paragraph-properties style:writing-mode="lr-tb"/>
    </style:style>
    <style:style style:name="gr1402" style:family="graphic" style:parent-style-name="standard">
      <style:graphic-properties draw:stroke="none" svg:stroke-color="#000000" draw:fill="none" draw:fill-color="#ffffff" draw:textarea-horizontal-align="left" draw:auto-grow-height="true" draw:auto-grow-width="true" fo:min-height="0.712cm" fo:min-width="3.142cm" loext:decorative="false"/>
      <style:paragraph-properties style:writing-mode="lr-tb"/>
    </style:style>
    <style:style style:name="gr1403" style:family="graphic" style:parent-style-name="standard">
      <style:graphic-properties draw:stroke="none" svg:stroke-color="#000000" draw:fill="none" draw:fill-color="#ffffff" draw:textarea-horizontal-align="left" draw:auto-grow-height="true" draw:auto-grow-width="true" fo:min-height="0.712cm" fo:min-width="1.767cm" loext:decorative="false"/>
      <style:paragraph-properties style:writing-mode="lr-tb"/>
    </style:style>
    <style:style style:name="gr1404" style:family="graphic" style:parent-style-name="standard">
      <style:graphic-properties draw:stroke="none" svg:stroke-color="#000000" draw:fill="none" draw:fill-color="#ffffff" draw:textarea-horizontal-align="left" draw:auto-grow-height="true" draw:auto-grow-width="true" fo:min-height="0.712cm" fo:min-width="1.732cm" loext:decorative="false"/>
      <style:paragraph-properties style:writing-mode="lr-tb"/>
    </style:style>
    <style:style style:name="gr1405" style:family="graphic" style:parent-style-name="standard">
      <style:graphic-properties draw:stroke="none" svg:stroke-color="#000000" draw:fill="none" draw:fill-color="#ffffff" draw:textarea-horizontal-align="left" draw:auto-grow-height="true" draw:auto-grow-width="true" fo:min-height="0.712cm" fo:min-width="1.413cm" loext:decorative="false"/>
      <style:paragraph-properties style:writing-mode="lr-tb"/>
    </style:style>
    <style:style style:name="gr1406" style:family="graphic" style:parent-style-name="objectwithoutfill">
      <style:graphic-properties draw:stroke="dash" draw:stroke-dash="Long_20_Dot" draw:fill="none" draw:textarea-vertical-align="middle" loext:decorative="false"/>
    </style:style>
    <style:style style:name="gr1407" style:family="graphic" style:parent-style-name="standard">
      <style:graphic-properties svg:stroke-color="#000000" draw:textarea-horizontal-align="justify" draw:textarea-vertical-align="middle" draw:auto-grow-height="false" fo:min-height="2.75cm" fo:min-width="2.5cm" style:writing-mode="lr-tb" loext:decorative="false"/>
      <style:paragraph-properties style:writing-mode="lr-tb"/>
    </style:style>
    <style:style style:name="gr1408" style:family="graphic" style:parent-style-name="standard">
      <style:graphic-properties draw:stroke="none" svg:stroke-color="#000000" draw:fill="none" draw:fill-color="#ffffff" draw:textarea-horizontal-align="left" draw:auto-grow-height="true" draw:auto-grow-width="true" fo:min-height="0.556cm" fo:min-width="0.718cm" loext:decorative="false"/>
      <style:paragraph-properties style:writing-mode="lr-tb"/>
    </style:style>
    <style:style style:name="gr1409" style:family="graphic" style:parent-style-name="standard">
      <style:graphic-properties draw:stroke="none" svg:stroke-color="#000000" draw:fill="none" draw:fill-color="#ffffff" draw:textarea-horizontal-align="left" draw:auto-grow-height="true" draw:auto-grow-width="true" fo:min-height="0.712cm" fo:min-width="4.87cm" loext:decorative="false"/>
      <style:paragraph-properties style:writing-mode="lr-tb"/>
    </style:style>
    <style:style style:name="gr1410" style:family="graphic" style:parent-style-name="standard">
      <style:graphic-properties svg:stroke-color="#000000" draw:textarea-horizontal-align="justify" draw:textarea-vertical-align="middle" draw:auto-grow-height="false" fo:min-height="3.756cm" fo:min-width="0cm" loext:decorative="false"/>
    </style:style>
    <style:style style:name="gr1411" style:family="graphic" style:parent-style-name="standard">
      <style:graphic-properties draw:stroke="none" svg:stroke-color="#000000" draw:fill="none" draw:fill-color="#ffffff" draw:textarea-horizontal-align="left" draw:auto-grow-height="true" draw:auto-grow-width="true" fo:min-height="0.712cm" fo:min-width="2.33cm" loext:decorative="false"/>
      <style:paragraph-properties style:writing-mode="lr-tb"/>
    </style:style>
    <style:style style:name="gr1412" style:family="graphic" style:parent-style-name="standard">
      <style:graphic-properties svg:stroke-color="#000000" draw:fill-color="#ffffff" draw:textarea-horizontal-align="justify" draw:textarea-vertical-align="middle" draw:auto-grow-height="false" fo:min-height="1.25cm" fo:min-width="0.5cm" style:writing-mode="lr-tb" loext:decorative="false"/>
      <style:paragraph-properties style:writing-mode="lr-tb"/>
    </style:style>
    <style:style style:name="gr1413" style:family="graphic" style:parent-style-name="standard">
      <style:graphic-properties draw:stroke="none" svg:stroke-color="#000000" draw:fill="none" draw:fill-color="#ffffff" draw:textarea-horizontal-align="left" draw:auto-grow-height="true" draw:auto-grow-width="true" fo:min-height="0.712cm" fo:min-width="3.528cm" loext:decorative="false"/>
      <style:paragraph-properties style:writing-mode="lr-tb"/>
    </style:style>
    <style:style style:name="gr1414" style:family="graphic" style:parent-style-name="standard">
      <style:graphic-properties draw:stroke="none" svg:stroke-color="#000000" draw:fill="none" draw:fill-color="#ffffff" draw:textarea-horizontal-align="left" draw:auto-grow-height="true" draw:auto-grow-width="true" fo:min-height="0.712cm" fo:min-width="2.364cm" loext:decorative="false"/>
      <style:paragraph-properties style:writing-mode="lr-tb"/>
    </style:style>
    <style:style style:name="gr1415" style:family="graphic" style:parent-style-name="standard">
      <style:graphic-properties draw:stroke="none" svg:stroke-color="#000000" draw:fill="none" draw:fill-color="#ffffff" draw:textarea-horizontal-align="left" draw:auto-grow-height="true" draw:auto-grow-width="true" fo:min-height="0.712cm" fo:min-width="1.128cm" loext:decorative="false"/>
      <style:paragraph-properties style:writing-mode="lr-tb"/>
    </style:style>
    <style:style style:name="gr1416" style:family="graphic" style:parent-style-name="Standard_5f_1">
      <style:graphic-properties svg:stroke-color="#000000" draw:fill-color="#ffffff" draw:textarea-horizontal-align="justify" draw:textarea-vertical-align="middle" draw:auto-grow-height="false" fo:min-height="0cm" fo:min-width="0cm" style:protect="size" loext:decorative="false"/>
    </style:style>
    <style:style style:name="P1" style:family="paragraph">
      <style:paragraph-properties fo:text-align="center"/>
    </style:style>
    <style:style style:name="P2" style:family="paragraph">
      <loext:graphic-properties draw:fill-color="#ffff00"/>
      <style:paragraph-properties fo:text-align="center" style:writing-mode="lr-tb"/>
    </style:style>
    <style:style style:name="P3" style:family="paragraph">
      <loext:graphic-properties draw:fill="none" draw:fill-color="#ffffff"/>
    </style:style>
    <style:style style:name="P4" style:family="paragraph">
      <loext:graphic-properties draw:fill="none"/>
      <style:paragraph-properties fo:text-align="center"/>
    </style:style>
    <style:style style:name="P5" style:family="paragraph">
      <loext:graphic-properties draw:fill-color="#000000"/>
      <style:paragraph-properties fo:text-align="center"/>
    </style:style>
    <style:style style:name="P6" style:family="paragraph">
      <style:paragraph-properties fo:margin-left="0cm" fo:margin-right="0cm" fo:margin-top="0cm" fo:margin-bottom="0cm" fo:line-height="100%" fo:text-indent="0cm"/>
    </style:style>
    <style:style style:name="P7" style:family="paragraph">
      <style:paragraph-properties fo:text-align="center"/>
      <style:text-properties fo:font-size="12pt"/>
    </style:style>
    <style:style style:name="P8" style:family="paragraph">
      <style:paragraph-properties fo:text-align="center" style:writing-mode="lr-tb"/>
      <style:text-properties fo:font-size="12pt"/>
    </style:style>
    <style:style style:name="P9" style:family="paragraph">
      <loext:graphic-properties draw:fill="none" draw:fill-color="#ffffff"/>
      <style:text-properties fo:font-size="12pt"/>
    </style:style>
    <style:style style:name="P10" style:family="paragraph">
      <loext:graphic-properties draw:fill-color="#ffff00"/>
      <style:paragraph-properties fo:text-align="center" style:writing-mode="lr-tb"/>
      <style:text-properties fo:font-size="12pt"/>
    </style:style>
    <style:style style:name="P11" style:family="paragraph">
      <loext:graphic-properties draw:fill="none"/>
      <style:paragraph-properties fo:text-align="center"/>
      <style:text-properties fo:font-size="12pt"/>
    </style:style>
    <style:style style:name="P12" style:family="paragraph">
      <style:paragraph-properties fo:text-align="center" style:writing-mode="lr-tb"/>
    </style:style>
    <style:style style:name="P13" style:family="paragraph">
      <loext:graphic-properties draw:fill-color="#81d41a"/>
      <style:paragraph-properties fo:text-align="center" style:writing-mode="lr-tb"/>
      <style:text-properties fo:font-size="12pt"/>
    </style:style>
    <style:style style:name="P14" style:family="paragraph">
      <loext:graphic-properties draw:fill-color="#ffffff"/>
      <style:paragraph-properties fo:text-align="center"/>
    </style:style>
    <style:style style:name="P15" style:family="paragraph">
      <style:paragraph-properties fo:margin-left="0cm" fo:margin-right="0cm" fo:margin-top="0cm" fo:margin-bottom="0cm" fo:line-height="100%" fo:text-align="center" fo:text-indent="0cm"/>
    </style:style>
    <style:style style:name="P16"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17"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8" style:family="paragraph">
      <loext:graphic-properties draw:fill-color="#ff0000"/>
      <style:paragraph-properties fo:text-align="center"/>
    </style:style>
    <style:style style:name="P19" style:family="paragraph">
      <loext:graphic-properties draw:fill="none" draw:fill-color="#ff0000"/>
      <style:paragraph-properties fo:text-align="center"/>
    </style:style>
    <style:style style:name="P20" style:family="paragraph">
      <loext:graphic-properties draw:fill="none" draw:fill-color="#729fcf"/>
      <style:paragraph-properties fo:text-align="center"/>
    </style:style>
    <style:style style:name="P21"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2" style:family="paragraph">
      <loext:graphic-properties draw:fill="none" draw:fill-color="#ffffff"/>
      <style:text-properties fo:color="#ff0000" loext:opacity="100%" fo:font-size="12pt"/>
    </style:style>
    <style:style style:name="P23" style:family="paragraph">
      <loext:graphic-properties draw:fill-color="#ffffff"/>
      <style:paragraph-properties fo:text-align="center" style:writing-mode="lr-tb"/>
      <style:text-properties fo:font-size="12pt"/>
    </style:style>
    <style:style style:name="P24" style:family="paragraph">
      <loext:graphic-properties draw:fill="none" draw:fill-color="#ffffff"/>
      <style:paragraph-properties fo:text-align="center"/>
      <style:text-properties fo:font-size="12pt"/>
    </style:style>
    <style:style style:name="P25" style:family="paragraph">
      <loext:graphic-properties draw:fill="none" draw:fill-color="#ffffff"/>
      <style:text-properties fo:color="#2a6099" loext:opacity="100%" fo:font-size="12pt"/>
    </style:style>
    <style:style style:name="P26" style:family="paragraph">
      <loext:graphic-properties draw:fill="none"/>
      <style:paragraph-properties fo:text-align="center"/>
      <style:text-properties fo:color="#2a6099" loext:opacity="100%"/>
    </style:style>
    <style:style style:name="P27" style:family="paragraph">
      <loext:graphic-properties draw:fill-color="#ffffff"/>
      <style:paragraph-properties fo:text-align="center"/>
      <style:text-properties fo:color="#2a6099" loext:opacity="100%"/>
    </style:style>
    <style:style style:name="P28" style:family="paragraph">
      <loext:graphic-properties draw:fill-color="#ffffff"/>
      <style:paragraph-properties fo:text-align="center" style:writing-mode="lr-tb"/>
    </style:style>
    <style:style style:name="P29" style:family="paragraph">
      <loext:graphic-properties draw:fill="solid" draw:fill-color="#ffffff"/>
      <style:paragraph-properties fo:text-align="center"/>
    </style:style>
    <style:style style:name="P30" style:family="paragraph">
      <loext:graphic-properties draw:fill-color="#dddddd"/>
      <style:paragraph-properties fo:text-align="center"/>
    </style:style>
    <style:style style:name="P31" style:family="paragraph">
      <style:paragraph-properties fo:text-align="center"/>
      <style:text-properties fo:font-size="18pt"/>
    </style:style>
    <style:style style:name="P32" style:family="paragraph">
      <style:paragraph-properties fo:text-align="center" style:writing-mode="lr-tb"/>
      <style:text-properties fo:font-size="18pt"/>
    </style:style>
    <style:style style:name="P33" style:family="paragraph">
      <loext:graphic-properties draw:fill="solid" draw:fill-color="#ffff00"/>
      <style:paragraph-properties fo:text-align="center" style:writing-mode="lr-tb"/>
      <style:text-properties fo:font-size="18pt"/>
    </style:style>
    <style:style style:name="P34" style:family="paragraph">
      <loext:graphic-properties draw:fill="none" draw:fill-color="#ffffff"/>
      <style:text-properties fo:font-size="18pt"/>
    </style:style>
    <style:style style:name="P35" style:family="paragraph">
      <style:paragraph-properties fo:text-align="center"/>
      <style:text-properties fo:font-size="8pt"/>
    </style:style>
    <style:style style:name="P36" style:family="paragraph">
      <loext:graphic-properties draw:fill-color="#ffff00"/>
      <style:paragraph-properties fo:text-align="center" style:writing-mode="lr-tb"/>
      <style:text-properties fo:font-size="8pt"/>
    </style:style>
    <style:style style:name="P37" style:family="paragraph">
      <loext:graphic-properties draw:fill="none" draw:fill-color="#ffffff"/>
      <style:text-properties fo:font-size="8pt"/>
    </style:style>
    <style:style style:name="P38" style:family="paragraph">
      <loext:graphic-properties draw:fill-color="#dddddd"/>
      <style:paragraph-properties fo:margin-left="0cm" fo:margin-right="0cm" fo:margin-top="0cm" fo:margin-bottom="0cm" fo:line-height="100%" fo:text-align="center" fo:text-indent="0cm" style:writing-mode="lr-tb"/>
      <style:text-properties fo:font-size="8pt"/>
    </style:style>
    <style:style style:name="P39" style:family="paragraph">
      <loext:graphic-properties draw:fill-color="#dddddd"/>
      <style:paragraph-properties fo:text-align="center" style:writing-mode="lr-tb"/>
      <style:text-properties fo:font-size="8pt"/>
    </style:style>
    <style:style style:name="P40" style:family="paragraph">
      <loext:graphic-properties draw:fill="none"/>
    </style:style>
    <style:style style:name="P41" style:family="paragraph">
      <loext:graphic-properties draw:fill-color="#ffff00"/>
      <style:paragraph-properties fo:margin-left="0cm" fo:margin-right="0cm" fo:margin-top="0cm" fo:margin-bottom="0cm" fo:line-height="100%" fo:text-align="center" fo:text-indent="0cm" style:writing-mode="lr-tb"/>
      <style:text-properties fo:font-size="8pt"/>
    </style:style>
    <style:style style:name="P42" style:family="paragraph">
      <loext:graphic-properties draw:fill-color="#ffffff"/>
      <style:paragraph-properties fo:text-align="center" style:writing-mode="lr-tb"/>
      <style:text-properties fo:font-size="8pt"/>
    </style:style>
    <style:style style:name="P43" style:family="paragraph">
      <loext:graphic-properties draw:fill="none" draw:fill-color="#000000"/>
      <style:paragraph-properties fo:text-align="center"/>
    </style:style>
    <style:style style:name="P44" style:family="paragraph">
      <loext:graphic-properties draw:fill="none" draw:fill-color="#ffffff"/>
      <style:text-properties fo:color="#2a6099" loext:opacity="100%" fo:font-size="8pt" fo:font-style="italic" fo:font-weight="bold"/>
    </style:style>
    <style:style style:name="P45"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46" style:family="paragraph">
      <loext:graphic-properties draw:fill="solid" draw:fill-color="#ff0000"/>
      <style:paragraph-properties fo:text-align="center"/>
    </style:style>
    <style:style style:name="P47" style:family="paragraph">
      <loext:graphic-properties draw:fill="none" draw:fill-color="#ffffff"/>
      <style:paragraph-properties fo:text-align="center"/>
    </style:style>
    <style:style style:name="P48" style:family="paragraph">
      <loext:graphic-properties draw:fill-color="#ffffff"/>
      <style:paragraph-properties fo:text-align="start" style:writing-mode="lr-tb"/>
      <style:text-properties fo:font-size="8pt"/>
    </style:style>
    <style:style style:name="P49" style:family="paragraph">
      <style:paragraph-properties fo:text-align="start"/>
      <style:text-properties fo:font-size="8pt"/>
    </style:style>
    <style:style style:name="P50" style:family="paragraph">
      <loext:graphic-properties draw:fill-color="#00a933"/>
      <style:paragraph-properties fo:text-align="start" style:writing-mode="lr-tb"/>
      <style:text-properties fo:font-size="8pt"/>
    </style:style>
    <style:style style:name="P51" style:family="paragraph">
      <loext:graphic-properties draw:fill="none" draw:fill-color="#ffffff"/>
      <style:text-properties fo:color="#ff0000" loext:opacity="100%" fo:font-size="8pt"/>
    </style:style>
    <style:style style:name="P52"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3" style:family="paragraph">
      <loext:graphic-properties draw:fill="none"/>
      <style:text-properties fo:font-size="8pt"/>
    </style:style>
    <style:style style:name="P54" style:family="paragraph">
      <loext:graphic-properties draw:fill="none" draw:fill-color="#ffffff"/>
      <style:text-properties fo:color="#00a933" loext:opacity="100%" fo:font-size="8pt" fo:font-style="italic" fo:font-weight="bold"/>
    </style:style>
    <style:style style:name="P55" style:family="paragraph">
      <style:paragraph-properties fo:text-align="center"/>
      <style:text-properties fo:color="#2a6099" loext:opacity="100%" fo:font-size="8pt" fo:font-style="italic" fo:font-weight="bold"/>
    </style:style>
    <style:style style:name="P56" style:family="paragraph">
      <loext:graphic-properties draw:fill-color="#ffff00"/>
      <style:paragraph-properties fo:text-align="center" style:writing-mode="lr-tb"/>
      <style:text-properties fo:color="#2a6099" loext:opacity="100%" fo:font-size="8pt" fo:font-style="italic" fo:font-weight="bold"/>
    </style:style>
    <style:style style:name="P57" style:family="paragraph">
      <loext:graphic-properties draw:fill="none" draw:fill-color="#ffffff"/>
      <style:text-properties fo:color="#000000" loext:opacity="100%" fo:font-size="8pt"/>
    </style:style>
    <style:style style:name="P58" style:family="paragraph">
      <loext:graphic-properties draw:fill="none" draw:fill-color="#ffffff"/>
      <style:text-properties fo:font-size="6pt"/>
    </style:style>
    <style:style style:name="P59" style:family="paragraph">
      <style:paragraph-properties fo:text-align="center" style:writing-mode="lr-tb"/>
      <style:text-properties fo:font-size="8pt"/>
    </style:style>
    <style:style style:name="P60" style:family="paragraph">
      <loext:graphic-properties draw:fill-color="#00a933"/>
      <style:paragraph-properties fo:text-align="center"/>
    </style:style>
    <style:style style:name="P61" style:family="paragraph">
      <loext:graphic-properties draw:fill="none" draw:fill-color="#ffffff"/>
      <style:text-properties fo:color="#ff8000" loext:opacity="100%" fo:font-size="6pt" fo:font-style="italic"/>
    </style:style>
    <style:style style:name="P62" style:family="paragraph">
      <loext:graphic-properties draw:fill="none" draw:fill-color="#ffffff"/>
      <style:paragraph-properties fo:margin-left="0cm" fo:margin-right="0cm" fo:margin-top="0cm" fo:margin-bottom="0cm" fo:line-height="100%" fo:text-indent="0cm"/>
      <style:text-properties fo:font-size="8pt"/>
    </style:style>
    <style:style style:name="P63" style:family="paragraph">
      <style:text-properties fo:color="#00a933" loext:opacity="100%"/>
    </style:style>
    <style:style style:name="P64" style:family="paragraph">
      <loext:graphic-properties draw:fill="none" draw:fill-color="#ffffff"/>
      <style:text-properties fo:color="#00a933" loext:opacity="100%" fo:font-size="8pt"/>
    </style:style>
    <style:style style:name="P65" style:family="paragraph">
      <style:paragraph-properties fo:margin-left="0cm" fo:margin-right="0cm" fo:margin-top="0cm" fo:margin-bottom="0cm" fo:line-height="100%" fo:text-indent="0cm"/>
      <style:text-properties fo:color="#00a933" loext:opacity="100%"/>
    </style:style>
    <style:style style:name="P66" style:family="paragraph">
      <loext:graphic-properties draw:fill="none" draw:fill-color="#ffffff"/>
      <style:paragraph-properties fo:margin-left="0cm" fo:margin-right="0cm" fo:margin-top="0cm" fo:margin-bottom="0cm" fo:line-height="100%" fo:text-indent="0cm"/>
      <style:text-properties fo:color="#00a933" loext:opacity="100%" fo:font-size="8pt"/>
    </style:style>
    <style:style style:name="P67" style:family="paragraph">
      <style:text-properties fo:color="#ff0000" loext:opacity="100%"/>
    </style:style>
    <style:style style:name="P68" style:family="paragraph">
      <loext:graphic-properties draw:fill="none" draw:fill-color="#ffffff"/>
      <style:text-properties fo:color="#ff0000" loext:opacity="100%" fo:font-size="8pt"/>
    </style:style>
    <style:style style:name="P69" style:family="paragraph">
      <loext:graphic-properties draw:fill="none" draw:fill-color="#dddddd"/>
      <style:paragraph-properties fo:text-align="center"/>
      <style:text-properties fo:font-size="12pt"/>
    </style:style>
    <style:style style:name="P70" style:family="paragraph">
      <style:text-properties fo:color="#2a6099" loext:opacity="100%"/>
    </style:style>
    <style:style style:name="P71" style:family="paragraph">
      <loext:graphic-properties draw:fill="none" draw:fill-color="#ffffff"/>
      <style:text-properties fo:color="#2a6099" loext:opacity="100%" fo:font-size="8pt"/>
    </style:style>
    <style:style style:name="P72" style:family="paragraph">
      <style:paragraph-properties fo:margin-left="0cm" fo:margin-right="0cm" fo:margin-top="0cm" fo:margin-bottom="0cm" fo:line-height="100%" fo:text-indent="0cm"/>
      <style:text-properties fo:color="#000000" loext:opacity="100%"/>
    </style:style>
    <style:style style:name="P73" style:family="paragraph">
      <loext:graphic-properties draw:fill="none" draw:fill-color="#ffffff"/>
      <style:paragraph-properties fo:margin-left="0cm" fo:margin-right="0cm" fo:margin-top="0cm" fo:margin-bottom="0cm" fo:line-height="100%" fo:text-indent="0cm"/>
      <style:text-properties fo:color="#000000" loext:opacity="100%" fo:font-size="8pt"/>
    </style:style>
    <style:style style:name="P74" style:family="paragraph">
      <style:text-properties fo:color="#000000" loext:opacity="100%"/>
    </style:style>
    <style:style style:name="P75" style:family="paragraph">
      <loext:graphic-properties draw:fill="none" draw:fill-color="#ffffff"/>
      <style:text-properties fo:color="#000000" loext:opacity="100%" fo:font-size="8pt"/>
    </style:style>
    <style:style style:name="P76" style:family="paragraph">
      <loext:graphic-properties draw:fill-color="#ffff00"/>
      <style:paragraph-properties fo:text-align="center"/>
      <style:text-properties fo:font-size="8pt"/>
    </style:style>
    <style:style style:name="P77" style:family="paragraph">
      <loext:graphic-properties draw:fill-color="#0066b3"/>
      <style:paragraph-properties fo:text-align="center"/>
    </style:style>
    <style:style style:name="P78" style:family="paragraph">
      <loext:graphic-properties draw:fill="none" draw:fill-color="#ffffff"/>
      <style:text-properties fo:font-size="12pt" style:font-size-asian="18pt" style:font-size-complex="18pt"/>
    </style:style>
    <style:style style:name="P79" style:family="paragraph">
      <style:paragraph-properties fo:text-align="center" style:writing-mode="lr-tb"/>
      <style:text-properties fo:font-size="12pt" style:font-size-asian="18pt" style:font-size-complex="18pt"/>
    </style:style>
    <style:style style:name="P80" style:family="paragraph">
      <loext:graphic-properties draw:fill="none"/>
      <style:paragraph-properties fo:text-align="center" style:writing-mode="lr-tb"/>
      <style:text-properties fo:font-size="12pt" style:font-size-asian="18pt" style:font-size-complex="18pt"/>
    </style:style>
    <style:style style:name="P81" style:family="paragraph">
      <loext:graphic-properties draw:fill="none" draw:fill-color="#ffffff"/>
      <style:text-properties fo:font-size="14pt" style:font-size-asian="18pt" style:font-size-complex="18pt"/>
    </style:style>
    <style:style style:name="P82" style:family="paragraph">
      <loext:graphic-properties draw:fill="none" draw:fill-color="#ffffff"/>
      <style:text-properties fo:color="#ed1c24" loext:opacity="100%" fo:font-size="12pt" style:font-size-asian="18pt" style:font-size-complex="18pt"/>
    </style:style>
    <style:style style:name="P83" style:family="paragraph">
      <loext:graphic-properties draw:fill-color="#ffffff"/>
      <style:paragraph-properties fo:text-align="center" style:writing-mode="lr-tb"/>
      <style:text-properties fo:font-size="18pt"/>
    </style:style>
    <style:style style:name="P84" style:family="paragraph">
      <loext:graphic-properties draw:fill="none"/>
      <style:paragraph-properties fo:text-align="center"/>
      <style:text-properties fo:color="#ed1c24" loext:opacity="100%" fo:font-size="18pt" style:font-size-asian="18pt" style:font-size-complex="18pt"/>
    </style:style>
    <style:style style:name="P85" style:family="paragraph">
      <loext:graphic-properties draw:fill-color="#ffffff"/>
      <style:paragraph-properties fo:text-align="center" style:writing-mode="lr-tb"/>
      <style:text-properties fo:color="#ed1c24" loext:opacity="100%" fo:font-size="14pt" style:font-size-asian="18pt" style:font-size-complex="18pt"/>
    </style:style>
    <style:style style:name="P86" style:family="paragraph">
      <loext:graphic-properties draw:fill="none"/>
      <style:paragraph-properties fo:text-align="center"/>
      <style:text-properties fo:color="#000000" loext:opacity="100%"/>
    </style:style>
    <style:style style:name="P87" style:family="paragraph">
      <style:paragraph-properties fo:text-align="start" style:writing-mode="lr-tb"/>
      <style:text-properties fo:font-size="8pt"/>
    </style:style>
    <style:style style:name="P88" style:family="paragraph">
      <loext:graphic-properties draw:fill="none" draw:fill-color="#ffffff"/>
      <style:text-properties fo:color="#ff0000" loext:opacity="100%" fo:font-size="12pt" style:font-size-asian="18pt" style:font-size-complex="18pt"/>
    </style:style>
    <style:style style:name="P89" style:family="paragraph">
      <loext:graphic-properties draw:fill="none" draw:fill-color="#ffffff"/>
      <style:text-properties fo:color="#ff0000" loext:opacity="100%" fo:font-size="8pt" style:font-size-asian="18pt" style:font-size-complex="18pt"/>
    </style:style>
    <style:style style:name="P90" style:family="paragraph">
      <loext:graphic-properties draw:fill-color="#729fcf"/>
      <style:paragraph-properties fo:text-align="center"/>
    </style:style>
    <style:style style:name="P91" style:family="paragraph">
      <loext:graphic-properties draw:fill-color="#ffffff"/>
      <style:paragraph-properties fo:text-align="center"/>
      <style:text-properties fo:font-size="14pt" style:font-size-asian="18pt" style:font-size-complex="18pt"/>
    </style:style>
    <style:style style:name="P92" style:family="paragraph">
      <loext:graphic-properties draw:fill-color="#729fcf"/>
      <style:paragraph-properties fo:text-align="center"/>
      <style:text-properties fo:font-size="14pt" style:font-size-asian="18pt" style:font-size-complex="18pt"/>
    </style:style>
    <style:style style:name="P93" style:family="paragraph">
      <loext:graphic-properties draw:fill="none" draw:fill-color="#ffffff"/>
      <style:text-properties fo:color="#ff0000" loext:opacity="100%"/>
    </style:style>
    <style:style style:name="P94" style:family="paragraph">
      <loext:graphic-properties draw:fill="none" draw:fill-color="#ffffff"/>
      <style:text-properties fo:font-size="8pt" style:font-size-asian="18pt" style:font-size-complex="18pt"/>
    </style:style>
    <style:style style:name="P95" style:family="paragraph">
      <loext:graphic-properties draw:fill="none" draw:fill-color="#ffffff"/>
      <style:text-properties fo:color="#00a933" loext:opacity="100%" fo:font-size="8pt" style:font-size-asian="18pt" style:font-size-complex="18pt"/>
    </style:style>
    <style:style style:name="P96" style:family="paragraph">
      <loext:graphic-properties draw:fill="none" draw:fill-color="#ffffff"/>
      <style:text-properties fo:color="#ffbf00" loext:opacity="100%" fo:font-size="8pt" style:font-size-asian="18pt" style:font-size-complex="18pt"/>
    </style:style>
    <style:style style:name="P97" style:family="paragraph">
      <loext:graphic-properties draw:fill="none" draw:fill-color="#ffffff"/>
      <style:text-properties fo:color="#8d1d75" loext:opacity="100%" fo:font-size="8pt" style:font-size-asian="18pt" style:font-size-complex="18pt"/>
    </style:style>
    <style:style style:name="P98" style:family="paragraph">
      <loext:graphic-properties draw:fill="none" draw:fill-color="#ffffff"/>
      <style:text-properties style:text-line-through-style="solid" style:text-line-through-type="single" fo:font-size="14pt" style:font-size-asian="18pt" style:font-size-complex="18pt"/>
    </style:style>
    <style:style style:name="P99" style:family="paragraph">
      <loext:graphic-properties draw:fill="none" draw:fill-color="#ffffff"/>
      <style:text-properties fo:color="#000000" loext:opacity="100%" fo:font-size="8pt" style:font-size-asian="18pt" style:font-size-complex="18pt"/>
    </style:style>
    <style:style style:name="P100" style:family="paragraph">
      <loext:graphic-properties draw:fill="solid" draw:fill-color="#729fcf" draw:opacity="30%"/>
      <style:paragraph-properties fo:text-align="center"/>
    </style:style>
    <style:style style:name="P101" style:family="paragraph">
      <loext:graphic-properties draw:fill="none" draw:fill-color="#ffffff"/>
      <style:text-properties fo:font-size="14pt"/>
    </style:style>
    <style:style style:name="P102" style:family="paragraph">
      <loext:graphic-properties draw:fill="solid" draw:fill-color="#ffff00"/>
      <style:paragraph-properties fo:text-align="center" style:writing-mode="lr-tb"/>
    </style:style>
    <style:style style:name="P103" style:family="paragraph">
      <loext:graphic-properties draw:fill="solid" draw:fill-color="#00a933"/>
      <style:paragraph-properties fo:text-align="center" style:writing-mode="lr-tb"/>
    </style:style>
    <style:style style:name="P104" style:family="paragraph">
      <loext:graphic-properties draw:fill="solid" draw:fill-color="#ff0000"/>
      <style:paragraph-properties fo:text-align="center" style:writing-mode="lr-tb"/>
    </style:style>
    <style:style style:name="P105" style:family="paragraph">
      <style:paragraph-properties fo:margin-left="0cm" fo:margin-right="0cm" fo:margin-top="0cm" fo:margin-bottom="0cm" fo:line-height="100%" fo:text-align="center" fo:text-indent="0cm" style:writing-mode="lr-tb"/>
    </style:style>
    <style:style style:name="P106" style:family="paragraph">
      <loext:graphic-properties draw:fill="none" draw:fill-color="#ffffff"/>
      <style:text-properties fo:font-style="italic" style:font-style-asian="italic" style:font-style-complex="italic"/>
    </style:style>
    <style:style style:name="P107" style:family="paragraph">
      <loext:graphic-properties draw:fill-color="#ffff00"/>
      <style:paragraph-properties fo:text-align="center"/>
    </style:style>
    <style:style style:name="P108" style:family="paragraph">
      <style:paragraph-properties fo:text-align="center"/>
      <style:text-properties fo:font-size="14pt"/>
    </style:style>
    <style:style style:name="P109" style:family="paragraph">
      <loext:graphic-properties draw:fill-color="#ffffff"/>
      <style:paragraph-properties fo:text-align="center" style:writing-mode="lr-tb"/>
      <style:text-properties fo:font-size="14pt"/>
    </style:style>
    <style:style style:name="T1"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2" style:family="text">
      <style:text-properties fo:font-size="12pt"/>
    </style:style>
    <style:style style:name="T3"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Arial2"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T6" style:family="text">
      <style:text-properties fo:color="#ff0000" loext:opacity="100%" fo:font-size="12pt"/>
    </style:style>
    <style:style style:name="T7" style:family="text">
      <style:text-properties fo:color="#2a6099" loext:opacity="100%" fo:font-size="12pt"/>
    </style:style>
    <style:style style:name="T8" style:family="text">
      <style:text-properties fo:font-variant="normal" fo:text-transform="none" style:use-window-font-color="true" loext:opacity="0%" style:text-outline="false" style:text-line-through-style="none" style:text-line-through-type="none" style:font-name="Arial2" fo:font-size="10pt" fo:font-style="normal" fo:text-shadow="none" style:text-underline-style="none" fo:font-weight="normal" style:letter-kerning="true" style:font-name-asian="Arial2"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T9" style:family="text">
      <style:text-properties fo:font-size="18pt"/>
    </style:style>
    <style:style style:name="T10" style:family="text">
      <style:text-properties fo:font-size="8pt"/>
    </style:style>
    <style:style style:name="T11" style:family="text">
      <style:text-properties fo:font-variant="normal" fo:text-transform="none" style:use-window-font-color="true" loext:opacity="0%" style:text-outline="false" style:text-line-through-style="none" style:text-line-through-type="none" style:font-name="Arial1"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12" style:family="text">
      <style:text-properties fo:color="#2a6099" loext:opacity="100%" fo:font-size="8pt" fo:font-style="italic" fo:font-weight="bold"/>
    </style:style>
    <style:style style:name="T13" style:family="text">
      <style:text-properties fo:color="#ff0000" loext:opacity="100%" fo:font-size="8pt"/>
    </style:style>
    <style:style style:name="T14" style:family="text">
      <style:text-properties fo:color="#00a933" loext:opacity="100%" fo:font-size="8pt" fo:font-style="italic" fo:font-weight="bold"/>
    </style:style>
    <style:style style:name="T15" style:family="text">
      <style:text-properties fo:color="#000000" loext:opacity="100%" fo:font-size="8pt"/>
    </style:style>
    <style:style style:name="T16" style:family="text">
      <style:text-properties fo:font-size="6pt"/>
    </style:style>
    <style:style style:name="T17" style:family="text">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8" style:family="text">
      <style:text-properties fo:color="#ff8000" loext:opacity="100%" fo:font-size="6pt" fo:font-style="italic"/>
    </style:style>
    <style:style style:name="T19" style:family="text">
      <style:text-properties fo:color="#00a933" loext:opacity="100%" fo:font-size="8pt"/>
    </style:style>
    <style:style style:name="T20" style:family="text">
      <style:text-properties fo:color="#ff0000" loext:opacity="100%" fo:font-size="8pt"/>
    </style:style>
    <style:style style:name="T21" style:family="text">
      <style:text-properties fo:color="#2a6099" loext:opacity="100%" fo:font-size="8pt"/>
    </style:style>
    <style:style style:name="T22" style:family="text">
      <style:text-properties fo:color="#00a933" loext:opacity="100%" fo:font-size="8pt"/>
    </style:style>
    <style:style style:name="T23" style:family="text">
      <style:text-properties fo:color="#000000" loext:opacity="100%" fo:font-size="8pt"/>
    </style:style>
    <style:style style:name="T24" style:family="text">
      <style:text-properties fo:color="#2a6099" loext:opacity="100%" fo:font-size="8pt"/>
    </style:style>
    <style:style style:name="T25" style:family="text">
      <style:text-properties fo:color="#2a6099" loext:opacity="100%" fo:font-size="8pt"/>
    </style:style>
    <style:style style:name="T26" style:family="text">
      <style:text-properties fo:font-size="12pt" style:font-size-asian="18pt" style:font-size-complex="18pt"/>
    </style:style>
    <style:style style:name="T27" style:family="text">
      <style:text-properties fo:font-size="14pt" style:font-size-asian="18pt" style:font-size-complex="18pt"/>
    </style:style>
    <style:style style:name="T28" style:family="text">
      <style:text-properties fo:color="#ed1c24" loext:opacity="100%" fo:font-size="12pt" style:font-size-asian="18pt" style:font-size-complex="18pt"/>
    </style:style>
    <style:style style:name="T29" style:family="text">
      <style:text-properties fo:color="#ff0000" loext:opacity="100%" fo:font-size="12pt" style:font-size-asian="18pt" style:font-size-complex="18pt"/>
    </style:style>
    <style:style style:name="T30" style:family="text">
      <style:text-properties fo:color="#ff0000" loext:opacity="100%" fo:font-size="8pt" style:font-size-asian="18pt" style:font-size-complex="18pt"/>
    </style:style>
    <style:style style:name="T31" style:family="text">
      <style:text-properties fo:color="#ff0000" loext:opacity="100%" fo:font-size="14pt" style:font-size-asian="18pt" style:font-size-complex="18pt"/>
    </style:style>
    <style:style style:name="T32" style:family="text">
      <style:text-properties fo:font-variant="normal" fo:text-transform="none" style:text-outline="false" style:text-line-through-style="none" style:text-line-through-type="none" style:font-name="Liberation Sans" fo:font-size="14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4" style:family="text">
      <style:text-properties fo:color="#ff0000" loext:opacity="100%"/>
    </style:style>
    <style:style style:name="T35" style:family="text">
      <style:text-properties fo:font-size="8pt" style:font-size-asian="18pt" style:font-size-complex="18pt"/>
    </style:style>
    <style:style style:name="T36" style:family="text">
      <style:text-properties fo:color="#00a933" loext:opacity="100%" fo:font-size="8pt" style:font-size-asian="18pt" style:font-size-complex="18pt"/>
    </style:style>
    <style:style style:name="T37" style:family="text">
      <style:text-properties fo:color="#00a933" loext:opacity="100%" fo:font-size="14pt" style:font-size-asian="18pt" style:font-size-complex="18pt"/>
    </style:style>
    <style:style style:name="T38" style:family="text">
      <style:text-properties fo:color="#ffbf00" loext:opacity="100%" fo:font-size="8pt" style:font-size-asian="18pt" style:font-size-complex="18pt"/>
    </style:style>
    <style:style style:name="T39" style:family="text">
      <style:text-properties fo:color="#8d1d75" loext:opacity="100%" fo:font-size="8pt" style:font-size-asian="18pt" style:font-size-complex="18pt"/>
    </style:style>
    <style:style style:name="T40" style:family="text">
      <style:text-properties style:text-line-through-style="solid" style:text-line-through-type="single" fo:font-size="14pt" style:font-size-asian="18pt" style:font-size-complex="18pt"/>
    </style:style>
    <style:style style:name="T41" style:family="text">
      <style:text-properties fo:color="#00a933" loext:opacity="100%" style:text-line-through-style="solid" style:text-line-through-type="single" fo:font-size="14pt" style:font-size-asian="18pt" style:font-size-complex="18pt"/>
    </style:style>
    <style:style style:name="T42" style:family="text">
      <style:text-properties fo:color="#ff0000" loext:opacity="100%" style:text-line-through-style="solid" style:text-line-through-type="single" fo:font-size="14pt" style:font-size-asian="18pt" style:font-size-complex="18pt"/>
    </style:style>
    <style:style style:name="T43" style:family="text">
      <style:text-properties fo:color="#000000" loext:opacity="100%" fo:font-size="8pt" style:font-size-asian="18pt" style:font-size-complex="18pt"/>
    </style:style>
    <style:style style:name="T44" style:family="text">
      <style:text-properties fo:font-size="14pt"/>
    </style:style>
    <style:style style:name="T45" style:family="text">
      <style:text-properties fo:font-size="15pt" fo:font-style="italic" style:font-size-asian="15pt" style:font-style-asian="italic" style:font-size-complex="15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style-name="gr1">
          <draw:custom-shape draw:style-name="gr2" draw:text-style-name="P2" draw:layer="layout" svg:width="8cm" svg:height="5cm" svg:x="28.993cm" svg:y="10cm">
            <text:p text:style-name="P1">ALU</text:p>
            <draw:enhanced-geometry svg:viewBox="0 0 21600 21600" draw:type="rectangle" draw:enhanced-path="M 0 0 L 21600 0 21600 21600 0 21600 0 0 Z N"/>
          </draw:custom-shape>
          <draw:frame draw:style-name="gr3" draw:text-style-name="P3" draw:layer="layout" svg:width="3.502cm" svg:height="0.962cm" svg:x="28.993cm" svg:y="10cm">
            <draw:text-box>
              <text:p>aluOp(1:0)</text:p>
            </draw:text-box>
          </draw:frame>
          <draw:frame draw:style-name="gr4" draw:text-style-name="P3" draw:layer="layout" svg:width="4.103cm" svg:height="0.962cm" svg:x="28.993cm" svg:y="12cm">
            <draw:text-box>
              <text:p>data01(63:0)</text:p>
            </draw:text-box>
          </draw:frame>
          <draw:frame draw:style-name="gr4" draw:text-style-name="P3" draw:layer="layout" svg:width="4.103cm" svg:height="0.962cm" svg:x="28.993cm" svg:y="13cm">
            <draw:text-box>
              <text:p>data02(63:0)</text:p>
            </draw:text-box>
          </draw:frame>
          <draw:frame draw:style-name="gr5" draw:text-style-name="P3" draw:layer="layout" svg:width="3.714cm" svg:height="0.962cm" svg:x="33.293cm" svg:y="12cm">
            <draw:text-box>
              <text:p>result(63:0)</text:p>
            </draw:text-box>
          </draw:frame>
          <draw:frame draw:style-name="gr6" draw:text-style-name="P3" draw:layer="layout" svg:width="1.737cm" svg:height="0.962cm" svg:x="35.259cm" svg:y="13.038cm">
            <draw:text-box>
              <text:p>zero</text:p>
            </draw:text-box>
          </draw:frame>
          <draw:frame draw:style-name="gr7" draw:text-style-name="P3" draw:layer="layout" svg:width="3.007cm" svg:height="0.962cm" svg:x="28.993cm" svg:y="11cm">
            <draw:text-box>
              <text:p>instr(3:0)</text:p>
            </draw:text-box>
          </draw:frame>
        </draw:g>
        <draw:g draw:style-name="gr1">
          <draw:custom-shape draw:style-name="gr8" draw:text-style-name="P2" draw:layer="layout" svg:width="9cm" svg:height="7cm" svg:x="18cm" svg:y="12cm">
            <text:p text:style-name="P1">RegFile</text:p>
            <draw:enhanced-geometry svg:viewBox="0 0 21600 21600" draw:type="rectangle" draw:enhanced-path="M 0 0 L 21600 0 21600 21600 0 21600 0 0 Z N"/>
          </draw:custom-shape>
          <draw:frame draw:style-name="gr9" draw:text-style-name="P3" draw:layer="layout" svg:width="4.067cm" svg:height="0.962cm" svg:x="18cm" svg:y="14cm">
            <draw:text-box>
              <text:p>rAddr01(4:0)</text:p>
            </draw:text-box>
          </draw:frame>
          <draw:frame draw:style-name="gr9" draw:text-style-name="P3" draw:layer="layout" svg:width="4.067cm" svg:height="0.962cm" svg:x="18cm" svg:y="15cm">
            <draw:text-box>
              <text:p>rAddr02(4:0)</text:p>
            </draw:text-box>
          </draw:frame>
          <draw:frame draw:style-name="gr10" draw:text-style-name="P3" draw:layer="layout" svg:width="4.304cm" svg:height="1.673cm" svg:x="18cm" svg:y="16cm">
            <draw:text-box>
              <text:p>wAddr01(4:0)</text:p>
            </draw:text-box>
          </draw:frame>
          <draw:frame draw:style-name="gr11" draw:text-style-name="P3" draw:layer="layout" svg:width="3.961cm" svg:height="0.962cm" svg:x="18cm" svg:y="17cm">
            <draw:text-box>
              <text:p>wData(63:0)</text:p>
            </draw:text-box>
          </draw:frame>
          <draw:frame draw:style-name="gr12" draw:text-style-name="P3" draw:layer="layout" svg:width="4.42cm" svg:height="0.962cm" svg:x="22.6cm" svg:y="12cm">
            <draw:text-box>
              <text:p>rData01(63:0)</text:p>
            </draw:text-box>
          </draw:frame>
          <draw:frame draw:style-name="gr12" draw:text-style-name="P3" draw:layer="layout" svg:width="4.42cm" svg:height="0.962cm" svg:x="22.591cm" svg:y="13cm">
            <draw:text-box>
              <text:p>rData02(63:0)</text:p>
            </draw:text-box>
          </draw:frame>
          <draw:frame draw:style-name="gr6" draw:text-style-name="P3" draw:layer="layout" svg:width="1.737cm" svg:height="0.962cm" svg:x="18cm" svg:y="13cm">
            <draw:text-box>
              <text:p>wEn</text:p>
            </draw:text-box>
          </draw:frame>
          <draw:frame draw:style-name="gr13" draw:text-style-name="P3" draw:layer="layout" svg:width="2.513cm" svg:height="0.962cm" svg:x="18cm" svg:y="12cm">
            <draw:text-box>
              <text:p>selMux</text:p>
            </draw:text-box>
          </draw:frame>
          <draw:frame draw:style-name="gr14" draw:text-style-name="P3" draw:layer="layout" svg:width="4.737cm" svg:height="0.962cm" svg:x="22.292cm" svg:y="17cm">
            <draw:text-box>
              <text:p>rData02x(63:0)</text:p>
            </draw:text-box>
          </draw:frame>
        </draw:g>
        <draw:g draw:style-name="gr1">
          <draw:custom-shape draw:style-name="gr15" draw:text-style-name="P2" draw:layer="layout" svg:width="8cm" svg:height="6cm" svg:x="31cm" svg:y="20cm">
            <text:p text:style-name="P1">DataMem</text:p>
            <draw:enhanced-geometry svg:viewBox="0 0 21600 21600" draw:type="rectangle" draw:enhanced-path="M 0 0 L 21600 0 21600 21600 0 21600 0 0 Z N"/>
          </draw:custom-shape>
          <draw:frame draw:style-name="gr11" draw:text-style-name="P3" draw:layer="layout" svg:width="3.961cm" svg:height="0.962cm" svg:x="31cm" svg:y="24cm">
            <draw:text-box>
              <text:p>wData(63:0)</text:p>
            </draw:text-box>
          </draw:frame>
          <draw:frame draw:style-name="gr16" draw:text-style-name="P3" draw:layer="layout" svg:width="3.432cm" svg:height="0.962cm" svg:x="31cm" svg:y="23cm">
            <draw:text-box>
              <text:p>addr(63:0)</text:p>
            </draw:text-box>
          </draw:frame>
          <draw:frame draw:style-name="gr5" draw:text-style-name="P3" draw:layer="layout" svg:width="3.714cm" svg:height="0.962cm" svg:x="35.293cm" svg:y="23.038cm">
            <draw:text-box>
              <text:p>rData(63:0)</text:p>
            </draw:text-box>
          </draw:frame>
          <draw:frame draw:style-name="gr6" draw:text-style-name="P3" draw:layer="layout" svg:width="1.737cm" svg:height="0.962cm" svg:x="31cm" svg:y="21cm">
            <draw:text-box>
              <text:p>wEn</text:p>
            </draw:text-box>
          </draw:frame>
          <draw:frame draw:style-name="gr13" draw:text-style-name="P3" draw:layer="layout" svg:width="2.513cm" svg:height="0.962cm" svg:x="31cm" svg:y="20cm">
            <draw:text-box>
              <text:p>selMux</text:p>
            </draw:text-box>
          </draw:frame>
          <draw:frame draw:style-name="gr17" draw:text-style-name="P3" draw:layer="layout" svg:width="1.49cm" svg:height="0.962cm" svg:x="31cm" svg:y="22cm">
            <draw:text-box>
              <text:p>rEn</text:p>
            </draw:text-box>
          </draw:frame>
        </draw:g>
        <draw:g draw:style-name="gr1">
          <draw:custom-shape draw:style-name="gr18" draw:text-style-name="P2" draw:layer="layout" svg:width="8cm" svg:height="14cm" svg:x="7cm" svg:y="14cm">
            <text:p text:style-name="P1">InstrDec</text:p>
            <draw:enhanced-geometry svg:viewBox="0 0 21600 21600" draw:type="rectangle" draw:enhanced-path="M 0 0 L 21600 0 21600 21600 0 21600 0 0 Z N"/>
          </draw:custom-shape>
          <draw:frame draw:style-name="gr19" draw:text-style-name="P3" draw:layer="layout" svg:width="3.36cm" svg:height="0.962cm" svg:x="7cm" svg:y="14cm">
            <draw:text-box>
              <text:p>instr(31:0)</text:p>
            </draw:text-box>
          </draw:frame>
          <draw:frame draw:style-name="gr9" draw:text-style-name="P3" draw:layer="layout" svg:width="4.067cm" svg:height="0.962cm" svg:x="10.942cm" svg:y="14.038cm">
            <draw:text-box>
              <text:p>rAddr01(4:0)</text:p>
            </draw:text-box>
          </draw:frame>
          <draw:frame draw:style-name="gr9" draw:text-style-name="P3" draw:layer="layout" svg:width="4.067cm" svg:height="0.962cm" svg:x="10.942cm" svg:y="15cm">
            <draw:text-box>
              <text:p>rAddr02(4:0)</text:p>
            </draw:text-box>
          </draw:frame>
          <draw:frame draw:style-name="gr20" draw:text-style-name="P3" draw:layer="layout" svg:width="4.314cm" svg:height="0.962cm" svg:x="10.696cm" svg:y="16cm">
            <draw:text-box>
              <text:p>wAddr01(4:0)</text:p>
            </draw:text-box>
          </draw:frame>
          <draw:frame draw:style-name="gr19" draw:text-style-name="P3" draw:layer="layout" svg:width="3.36cm" svg:height="0.962cm" svg:x="11.645cm" svg:y="18cm">
            <draw:text-box>
              <text:p>instr(31:0)</text:p>
            </draw:text-box>
          </draw:frame>
          <draw:frame draw:style-name="gr19" draw:text-style-name="P3" draw:layer="layout" svg:width="3.36cm" svg:height="0.962cm" svg:x="11.645cm" svg:y="19.038cm">
            <draw:text-box>
              <text:p>imm(63:0)</text:p>
            </draw:text-box>
          </draw:frame>
          <draw:frame draw:style-name="gr21" draw:text-style-name="P3" draw:layer="layout" svg:width="2.831cm" svg:height="0.962cm" svg:x="7cm" svg:y="15cm">
            <draw:text-box>
              <text:p>pc(63:0)</text:p>
            </draw:text-box>
          </draw:frame>
          <draw:frame draw:style-name="gr22" draw:text-style-name="P3" draw:layer="layout" svg:width="4.704cm" svg:height="0.962cm" svg:x="6.996cm" svg:y="17cm">
            <draw:text-box>
              <text:p>nextAddr(63:0)</text:p>
            </draw:text-box>
          </draw:frame>
          <draw:frame draw:style-name="gr23" draw:text-style-name="P3" draw:layer="layout" svg:width="4.208cm" svg:height="0.962cm" svg:x="10.8cm" svg:y="20cm">
            <draw:text-box>
              <text:p>newPC(63:0)</text:p>
            </draw:text-box>
          </draw:frame>
          <draw:frame draw:style-name="gr24" draw:text-style-name="P3" draw:layer="layout" svg:width="2.725cm" svg:height="0.962cm" svg:x="12.28cm" svg:y="24cm">
            <draw:text-box>
              <text:p>memRd</text:p>
            </draw:text-box>
          </draw:frame>
          <draw:frame draw:style-name="gr25" draw:text-style-name="P3" draw:layer="layout" svg:width="2.712cm" svg:height="0.962cm" svg:x="12.3cm" svg:y="23cm">
            <draw:text-box>
              <text:p>memWr</text:p>
            </draw:text-box>
          </draw:frame>
          <draw:frame draw:style-name="gr26" draw:text-style-name="P3" draw:layer="layout" svg:width="3.184cm" svg:height="0.962cm" svg:x="11.8cm" svg:y="22.038cm">
            <draw:text-box>
              <text:p>mem2reg</text:p>
            </draw:text-box>
          </draw:frame>
          <draw:frame draw:style-name="gr27" draw:text-style-name="P3" draw:layer="layout" svg:width="2.196cm" svg:height="0.962cm" svg:x="12.8cm" svg:y="25.038cm">
            <draw:text-box>
              <text:p>aluOp</text:p>
            </draw:text-box>
          </draw:frame>
          <draw:frame draw:style-name="gr28" draw:text-style-name="P3" draw:layer="layout" svg:width="2.302cm" svg:height="0.962cm" svg:x="12.7cm" svg:y="26.038cm">
            <draw:text-box>
              <text:p>aluSrc</text:p>
            </draw:text-box>
          </draw:frame>
          <draw:frame draw:style-name="gr29" draw:text-style-name="P3" draw:layer="layout" svg:width="3.008cm" svg:height="0.962cm" svg:x="12cm" svg:y="27cm">
            <draw:text-box>
              <text:p>writeReg</text:p>
            </draw:text-box>
          </draw:frame>
          <draw:frame draw:style-name="gr6" draw:text-style-name="P3" draw:layer="layout" svg:width="1.737cm" svg:height="0.962cm" svg:x="7cm" svg:y="19cm">
            <draw:text-box>
              <text:p>zero</text:p>
            </draw:text-box>
          </draw:frame>
        </draw:g>
        <draw:g draw:style-name="gr1">
          <draw:custom-shape draw:style-name="gr30" draw:text-style-name="P2" draw:layer="layout" svg:width="10cm" svg:height="5cm" svg:x="7cm" svg:y="4cm">
            <text:p text:style-name="P1">InstrMem</text:p>
            <draw:enhanced-geometry svg:viewBox="0 0 21600 21600" draw:type="rectangle" draw:enhanced-path="M 0 0 L 21600 0 21600 21600 0 21600 0 0 Z N"/>
          </draw:custom-shape>
          <draw:frame draw:style-name="gr19" draw:text-style-name="P3" draw:layer="layout" svg:width="3.36cm" svg:height="0.962cm" svg:x="13.645cm" svg:y="7cm">
            <draw:text-box>
              <text:p>instr(31:0)</text:p>
            </draw:text-box>
          </draw:frame>
          <draw:frame draw:style-name="gr31" draw:text-style-name="P3" draw:layer="layout" svg:width="3.185cm" svg:height="0.962cm" svg:x="13.823cm" svg:y="6cm">
            <draw:text-box>
              <text:p>pco(63:0)</text:p>
            </draw:text-box>
          </draw:frame>
          <draw:frame draw:style-name="gr32" draw:text-style-name="P3" draw:layer="layout" svg:width="4.702cm" svg:height="0.962cm" svg:x="12.3cm" svg:y="5cm">
            <draw:text-box>
              <text:p>nextAddr(63:0)</text:p>
            </draw:text-box>
          </draw:frame>
          <draw:frame draw:style-name="gr33" draw:text-style-name="P3" draw:layer="layout" svg:width="2.973cm" svg:height="0.962cm" svg:x="7cm" svg:y="4cm">
            <draw:text-box>
              <text:p>pci(63:0)</text:p>
            </draw:text-box>
          </draw:frame>
          <draw:frame draw:style-name="gr34" draw:text-style-name="P3" draw:layer="layout" svg:width="4.703cm" svg:height="0.962cm" svg:x="7.011cm" svg:y="5cm">
            <draw:text-box>
              <text:p>loadData(31:0)</text:p>
            </draw:text-box>
          </draw:frame>
          <draw:frame draw:style-name="gr34" draw:text-style-name="P3" draw:layer="layout" svg:width="4.703cm" svg:height="0.962cm" svg:x="7.011cm" svg:y="6cm">
            <draw:text-box>
              <text:p>loadAddr(63:0)</text:p>
            </draw:text-box>
          </draw:frame>
          <draw:frame draw:style-name="gr35" draw:text-style-name="P3" draw:layer="layout" svg:width="1.949cm" svg:height="0.962cm" svg:x="7cm" svg:y="7cm">
            <draw:text-box>
              <text:p>wrEn</text:p>
            </draw:text-box>
          </draw:frame>
        </draw:g>
        <draw:frame draw:style-name="gr36" draw:text-style-name="P3" draw:layer="layout" svg:width="4.526cm" svg:height="0.962cm" svg:x="35.5cm" svg:y="5cm">
          <draw:text-box>
            <text:p>addrBus(63:0)</text:p>
          </draw:text-box>
        </draw:frame>
        <draw:frame draw:style-name="gr37" draw:text-style-name="P3" draw:layer="layout" svg:width="4.491cm" svg:height="0.962cm" svg:x="35.5cm" svg:y="6cm">
          <draw:text-box>
            <text:p>dataBus(63:0)</text:p>
          </draw:text-box>
        </draw:frame>
        <draw:frame draw:style-name="gr34" draw:text-style-name="P3" draw:layer="layout" svg:width="4.703cm" svg:height="0.962cm" svg:x="1.011cm" svg:y="5cm">
          <draw:text-box>
            <text:p>loadData(31:0)</text:p>
          </draw:text-box>
        </draw:frame>
        <draw:frame draw:style-name="gr34" draw:text-style-name="P3" draw:layer="layout" svg:width="4.703cm" svg:height="0.962cm" svg:x="1cm" svg:y="6cm">
          <draw:text-box>
            <text:p>loadAddr(63:0)</text:p>
          </draw:text-box>
        </draw:frame>
        <draw:frame draw:style-name="gr35" draw:text-style-name="P3" draw:layer="layout" svg:width="1.949cm" svg:height="0.962cm" svg:x="1cm" svg:y="7cm">
          <draw:text-box>
            <text:p>wrEn</text:p>
          </draw:text-box>
        </draw:frame>
        <draw:line draw:style-name="gr38" draw:text-style-name="P4" draw:layer="layout" svg:x1="17cm" svg:y1="7.5cm" svg:x2="17.5cm" svg:y2="7.5cm">
          <text:p/>
        </draw:line>
        <draw:line draw:style-name="gr38" draw:text-style-name="P4" draw:layer="layout" svg:x1="17.5cm" svg:y1="7.5cm" svg:x2="17.5cm" svg:y2="10cm">
          <text:p/>
        </draw:line>
        <draw:line draw:style-name="gr38" draw:text-style-name="P4" draw:layer="layout" svg:x1="17.5cm" svg:y1="10cm" svg:x2="6.5cm" svg:y2="10cm">
          <text:p/>
        </draw:line>
        <draw:line draw:style-name="gr38" draw:text-style-name="P4" draw:layer="layout" svg:x1="6.5cm" svg:y1="10cm" svg:x2="6.5cm" svg:y2="14.6cm">
          <text:p/>
        </draw:line>
        <draw:line draw:style-name="gr39" draw:text-style-name="P4" draw:layer="layout" svg:x1="6.5cm" svg:y1="14.6cm" svg:x2="7cm" svg:y2="14.6cm">
          <text:p/>
        </draw:line>
        <draw:line draw:style-name="gr38" draw:text-style-name="P4" draw:layer="layout" svg:x1="17cm" svg:y1="6.5cm" svg:x2="18cm" svg:y2="6.5cm">
          <text:p/>
        </draw:line>
        <draw:line draw:style-name="gr38" draw:text-style-name="P4" draw:layer="layout" svg:x1="18cm" svg:y1="6.5cm" svg:x2="18cm" svg:y2="10.5cm">
          <text:p/>
        </draw:line>
        <draw:line draw:style-name="gr38" draw:text-style-name="P4" draw:layer="layout" svg:x1="18cm" svg:y1="10.5cm" svg:x2="6cm" svg:y2="10.5cm">
          <text:p/>
        </draw:line>
        <draw:line draw:style-name="gr39" draw:text-style-name="P4" draw:layer="layout" svg:x1="6cm" svg:y1="15.5cm" svg:x2="7cm" svg:y2="15.5cm">
          <text:p/>
        </draw:line>
        <draw:line draw:style-name="gr38" draw:text-style-name="P4" draw:layer="layout" svg:x1="6cm" svg:y1="10.5cm" svg:x2="6cm" svg:y2="15.5cm">
          <text:p/>
        </draw:line>
        <draw:line draw:style-name="gr39" draw:text-style-name="P4" draw:layer="layout" svg:x1="5.6cm" svg:y1="5.5cm" svg:x2="7cm" svg:y2="5.5cm">
          <text:p/>
        </draw:line>
        <draw:line draw:style-name="gr39" draw:text-style-name="P4" draw:layer="layout" svg:x1="5.6cm" svg:y1="6.5cm" svg:x2="7cm" svg:y2="6.5cm">
          <text:p/>
        </draw:line>
        <draw:line draw:style-name="gr39" draw:text-style-name="P4" draw:layer="layout" svg:x1="5.6cm" svg:y1="7.5cm" svg:x2="7cm" svg:y2="7.5cm">
          <text:p/>
        </draw:line>
        <draw:line draw:style-name="gr38" draw:text-style-name="P4" draw:layer="layout" svg:x1="15cm" svg:y1="20.5cm" svg:x2="15.5cm" svg:y2="20.5cm">
          <text:p/>
        </draw:line>
        <draw:line draw:style-name="gr38" draw:text-style-name="P4" draw:layer="layout" svg:x1="15.5cm" svg:y1="20.5cm" svg:x2="15.5cm" svg:y2="11.5cm">
          <text:p/>
        </draw:line>
        <draw:line draw:style-name="gr38" draw:text-style-name="P4" draw:layer="layout" svg:x1="17cm" svg:y1="5.5cm" svg:x2="18.5cm" svg:y2="5.5cm">
          <text:p/>
        </draw:line>
        <draw:line draw:style-name="gr38" draw:text-style-name="P4" draw:layer="layout" svg:x1="18.5cm" svg:y1="5.5cm" svg:x2="18.5cm" svg:y2="11cm">
          <text:p/>
        </draw:line>
        <draw:line draw:style-name="gr38" draw:text-style-name="P4" draw:layer="layout" svg:x1="18.5cm" svg:y1="11cm" svg:x2="5.5cm" svg:y2="11cm">
          <text:p/>
        </draw:line>
        <draw:line draw:style-name="gr39" draw:text-style-name="P4" draw:layer="layout" svg:x1="5.5cm" svg:y1="17.5cm" svg:x2="7cm" svg:y2="17.5cm">
          <text:p/>
        </draw:line>
        <draw:line draw:style-name="gr38" draw:text-style-name="P4" draw:layer="layout" svg:x1="5.5cm" svg:y1="11cm" svg:x2="5.5cm" svg:y2="17.5cm">
          <text:p/>
        </draw:line>
        <draw:line draw:style-name="gr38" draw:text-style-name="P4" draw:layer="layout" svg:x1="19cm" svg:y1="11.5cm" svg:x2="15.5cm" svg:y2="11.5cm">
          <text:p/>
        </draw:line>
        <draw:line draw:style-name="gr39" draw:text-style-name="P4" draw:layer="layout" svg:x1="6.5cm" svg:y1="4.5cm" svg:x2="7cm" svg:y2="4.5cm">
          <text:p/>
        </draw:line>
        <draw:line draw:style-name="gr38" draw:text-style-name="P4" draw:layer="layout" svg:x1="6.5cm" svg:y1="3.5cm" svg:x2="6.5cm" svg:y2="4.5cm">
          <text:p/>
        </draw:line>
        <draw:line draw:style-name="gr38" draw:text-style-name="P4" draw:layer="layout" svg:x1="19cm" svg:y1="3.5cm" svg:x2="6.5cm" svg:y2="3.5cm">
          <text:p/>
        </draw:line>
        <draw:line draw:style-name="gr38" draw:text-style-name="P4" draw:layer="layout" svg:x1="19cm" svg:y1="11.5cm" svg:x2="19cm" svg:y2="3.5cm">
          <text:p/>
        </draw:line>
        <draw:line draw:style-name="gr39" draw:text-style-name="P4" draw:layer="layout" svg:x1="15cm" svg:y1="14.5cm" svg:x2="18cm" svg:y2="14.5cm">
          <text:p/>
        </draw:line>
        <draw:line draw:style-name="gr39" draw:text-style-name="P4" draw:layer="layout" svg:x1="15cm" svg:y1="15.5cm" svg:x2="18cm" svg:y2="15.5cm">
          <text:p/>
        </draw:line>
        <draw:line draw:style-name="gr39" draw:text-style-name="P4" draw:layer="layout" svg:x1="15cm" svg:y1="16.5cm" svg:x2="18cm" svg:y2="16.5cm">
          <text:p/>
        </draw:line>
        <draw:line draw:style-name="gr39" draw:text-style-name="P4" draw:layer="layout" svg:x1="17.5cm" svg:y1="17.5cm" svg:x2="18cm" svg:y2="17.5cm">
          <text:p/>
        </draw:line>
        <draw:line draw:style-name="gr39" draw:text-style-name="P4" draw:layer="layout" svg:x1="17cm" svg:y1="13.5cm" svg:x2="18cm" svg:y2="13.5cm">
          <text:p/>
        </draw:line>
        <draw:line draw:style-name="gr39" draw:text-style-name="P4" draw:layer="layout" svg:x1="16.5cm" svg:y1="12.5cm" svg:x2="18cm" svg:y2="12.5cm">
          <text:p/>
        </draw:line>
        <draw:line draw:style-name="gr38" draw:text-style-name="P4" draw:layer="layout" svg:x1="17.5cm" svg:y1="26.5cm" svg:x2="17.5cm" svg:y2="17.5cm">
          <text:p/>
        </draw:line>
        <draw:line draw:style-name="gr38" draw:text-style-name="P4" draw:layer="layout" svg:x1="17cm" svg:y1="27.5cm" svg:x2="17cm" svg:y2="13.5cm">
          <text:p/>
        </draw:line>
        <draw:line draw:style-name="gr38" draw:text-style-name="P4" draw:layer="layout" svg:x1="16.5cm" svg:y1="26.5cm" svg:x2="16.5cm" svg:y2="12.5cm">
          <text:p/>
        </draw:line>
        <draw:line draw:style-name="gr38" draw:text-style-name="P4" draw:layer="layout" svg:x1="15cm" svg:y1="27.5cm" svg:x2="17cm" svg:y2="27.5cm">
          <text:p/>
        </draw:line>
        <draw:line draw:style-name="gr38" draw:text-style-name="P4" draw:layer="layout" svg:x1="15cm" svg:y1="26.5cm" svg:x2="16.5cm" svg:y2="26.5cm">
          <text:p/>
        </draw:line>
        <draw:line draw:style-name="gr39" draw:text-style-name="P4" draw:layer="layout" svg:x1="27cm" svg:y1="12.5cm" svg:x2="29cm" svg:y2="12.5cm">
          <text:p/>
        </draw:line>
        <draw:line draw:style-name="gr39" draw:text-style-name="P4" draw:layer="layout" svg:x1="27cm" svg:y1="13.5cm" svg:x2="29cm" svg:y2="13.5cm">
          <text:p/>
        </draw:line>
        <draw:custom-shape draw:style-name="gr40" draw:text-style-name="P5" draw:layer="layout" svg:width="0.2cm" svg:height="0.2cm" svg:x="17.4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 draw:text-style-name="P4" draw:layer="layout" svg:x1="28.5cm" svg:y1="11.5cm" svg:x2="29cm" svg:y2="11.5cm">
          <text:p/>
        </draw:line>
        <draw:line draw:style-name="gr39" draw:text-style-name="P4" draw:layer="layout" svg:x1="28cm" svg:y1="10.5cm" svg:x2="29cm" svg:y2="10.5cm">
          <text:p/>
        </draw:line>
        <draw:line draw:style-name="gr38" draw:text-style-name="P4" draw:layer="layout" svg:x1="17.5cm" svg:y1="7.5cm" svg:x2="28.5cm" svg:y2="7.5cm">
          <text:p/>
        </draw:line>
        <draw:line draw:style-name="gr38" draw:text-style-name="P4" draw:layer="layout" svg:x1="28.5cm" svg:y1="7.5cm" svg:x2="28.5cm" svg:y2="11.5cm">
          <text:p/>
        </draw:line>
        <draw:line draw:style-name="gr38" draw:text-style-name="P4" draw:layer="layout" svg:x1="15cm" svg:y1="25.5cm" svg:x2="28cm" svg:y2="25.5cm">
          <text:p/>
        </draw:line>
        <draw:line draw:style-name="gr38" draw:text-style-name="P4" draw:layer="layout" svg:x1="28cm" svg:y1="25.5cm" svg:x2="28cm" svg:y2="10.5cm">
          <text:p/>
        </draw:line>
        <draw:line draw:style-name="gr38" draw:text-style-name="P4" draw:layer="layout" svg:x1="37cm" svg:y1="12.5cm" svg:x2="38cm" svg:y2="12.5cm">
          <text:p/>
        </draw:line>
        <draw:line draw:style-name="gr38" draw:text-style-name="P4" draw:layer="layout" svg:x1="37cm" svg:y1="13.5cm" svg:x2="40cm" svg:y2="13.5cm">
          <text:p/>
        </draw:line>
        <draw:line draw:style-name="gr38" draw:text-style-name="P4" draw:layer="layout" svg:x1="39cm" svg:y1="23.5cm" svg:x2="39.5cm" svg:y2="23.5cm">
          <text:p/>
        </draw:line>
        <draw:line draw:style-name="gr38" draw:text-style-name="P4" draw:layer="layout" svg:x1="39.5cm" svg:y1="23.5cm" svg:x2="39.5cm" svg:y2="26.5cm">
          <text:p/>
        </draw:line>
        <draw:line draw:style-name="gr38" draw:text-style-name="P4" draw:layer="layout" svg:x1="39.5cm" svg:y1="26.5cm" svg:x2="17.5cm" svg:y2="26.5cm">
          <text:p/>
        </draw:line>
        <draw:line draw:style-name="gr39" draw:text-style-name="P4" draw:layer="layout" svg:x1="6.5cm" svg:y1="19.5cm" svg:x2="7cm" svg:y2="19.5cm">
          <text:p/>
        </draw:line>
        <draw:line draw:style-name="gr38" draw:text-style-name="P4" draw:layer="layout" svg:x1="6.5cm" svg:y1="28.5cm" svg:x2="6.5cm" svg:y2="19.5cm">
          <text:p/>
        </draw:line>
        <draw:line draw:style-name="gr38" draw:text-style-name="P4" draw:layer="layout" svg:x1="40cm" svg:y1="28.5cm" svg:x2="6.5cm" svg:y2="28.5cm">
          <text:p/>
        </draw:line>
        <draw:line draw:style-name="gr38" draw:text-style-name="P4" draw:layer="layout" svg:x1="40cm" svg:y1="13.5cm" svg:x2="40cm" svg:y2="28.5cm">
          <text:p/>
        </draw:line>
        <draw:line draw:style-name="gr39" draw:text-style-name="P4" draw:layer="layout" svg:x1="30.5cm" svg:y1="23.5cm" svg:x2="31cm" svg:y2="23.5cm">
          <text:p/>
        </draw:line>
        <draw:line draw:style-name="gr38" draw:text-style-name="P4" draw:layer="layout" svg:x1="38cm" svg:y1="12.5cm" svg:x2="38cm" svg:y2="16cm">
          <text:p/>
        </draw:line>
        <draw:line draw:style-name="gr38" draw:text-style-name="P4" draw:layer="layout" svg:x1="38cm" svg:y1="16cm" svg:x2="30.5cm" svg:y2="16cm">
          <text:p/>
        </draw:line>
        <draw:line draw:style-name="gr38" draw:text-style-name="P4" draw:layer="layout" svg:x1="30.5cm" svg:y1="16cm" svg:x2="30.5cm" svg:y2="23.5cm">
          <text:p/>
        </draw:line>
        <draw:line draw:style-name="gr39" draw:text-style-name="P4" draw:layer="layout" svg:x1="30cm" svg:y1="24.5cm" svg:x2="31cm" svg:y2="24.5cm">
          <text:p/>
        </draw:line>
        <draw:line draw:style-name="gr38" draw:text-style-name="P4" draw:layer="layout" svg:x1="30cm" svg:y1="17.5cm" svg:x2="30cm" svg:y2="24.5cm">
          <text:p/>
        </draw:line>
        <draw:line draw:style-name="gr38" draw:text-style-name="P4" draw:layer="layout" svg:x1="27cm" svg:y1="17.5cm" svg:x2="30cm" svg:y2="17.5cm">
          <text:p/>
        </draw:line>
        <draw:line draw:style-name="gr39" draw:text-style-name="P4" draw:layer="layout" svg:x1="25cm" svg:y1="20.5cm" svg:x2="31cm" svg:y2="20.5cm">
          <text:p/>
        </draw:line>
        <draw:line draw:style-name="gr39" draw:text-style-name="P4" draw:layer="layout" svg:x1="25.5cm" svg:y1="21.5cm" svg:x2="31cm" svg:y2="21.5cm">
          <text:p/>
        </draw:line>
        <draw:line draw:style-name="gr39" draw:text-style-name="P4" draw:layer="layout" svg:x1="26cm" svg:y1="22.5cm" svg:x2="31cm" svg:y2="22.5cm">
          <text:p/>
        </draw:line>
        <draw:line draw:style-name="gr38" draw:text-style-name="P4" draw:layer="layout" svg:x1="15cm" svg:y1="22.5cm" svg:x2="25cm" svg:y2="22.5cm">
          <text:p/>
        </draw:line>
        <draw:line draw:style-name="gr38" draw:text-style-name="P4" draw:layer="layout" svg:x1="25cm" svg:y1="22.5cm" svg:x2="25cm" svg:y2="20.5cm">
          <text:p/>
        </draw:line>
        <draw:line draw:style-name="gr38" draw:text-style-name="P4" draw:layer="layout" svg:x1="25.5cm" svg:y1="23.5cm" svg:x2="25.5cm" svg:y2="21.5cm">
          <text:p/>
        </draw:line>
        <draw:line draw:style-name="gr38" draw:text-style-name="P4" draw:layer="layout" svg:x1="26cm" svg:y1="24.5cm" svg:x2="26cm" svg:y2="22.5cm">
          <text:p/>
        </draw:line>
        <draw:line draw:style-name="gr38" draw:text-style-name="P4" draw:layer="layout" svg:x1="15cm" svg:y1="23.5cm" svg:x2="25.5cm" svg:y2="23.5cm">
          <text:p/>
        </draw:line>
        <draw:line draw:style-name="gr38" draw:text-style-name="P4" draw:layer="layout" svg:x1="15cm" svg:y1="24.5cm" svg:x2="26cm" svg:y2="24.5cm">
          <text:p/>
        </draw:line>
        <draw:frame draw:style-name="gr41" draw:text-style-name="P3" draw:layer="layout" svg:width="10.418cm" svg:height="3.095cm" svg:x="22.2cm" svg:y="3.5cm">
          <draw:text-box>
            <text:p>Flags register? No Flags in RISC-V</text:p>
            <text:p>Data bus?</text:p>
            <text:p>Instruction bus?</text:p>
            <text:p>CSR registers and its instructions</text:p>
          </draw:text-box>
        </draw:frame>
        <draw:frame draw:style-name="gr42" draw:text-style-name="P3" draw:layer="layout" svg:width="70.107cm" svg:height="20.87cm" svg:x="-21.124cm" svg:y="-14.85cm">
          <draw:text-box>
            <text:p>sudo apt install gcc-riscv64-unknown-elf</text:p>
            <text:p>Or</text:p>
            <text:p>git clone <text:a xlink:href="https://github.com/riscv/riscv-gnu-toolchain" xlink:type="simple">https://github.com/riscv/riscv-gnu-toolchain</text:a></text:p>
            <text:p>sudo apt-get install autoconf automake autotools-dev curl python3 python3-pip libmpc-dev libmpfr-dev libgmp-dev gawk build-essential bison flex texinfo gperf libtool patchutils bc zlib1g-dev libexpat-dev ninja-build git cmake libglib2.0-dev libslirp-dev</text:p>
            <text:p>./configure --prefix=/opt/riscv</text:p>
            <text:p>make linux</text:p>
            <text:p/>
            <text:p>#include &lt;stdio.h&gt;</text:p>
            <text:p/>
            <text:p>int main() {</text:p>
            <text:p><text:s text:c="2"/>printf("hello world\n");</text:p>
            <text:p><text:s text:c="2"/>return 0;</text:p>
            <text:p>}</text:p>
            <text:p/>
            <text:p>riscv64-unknown-elf-gcc -S hello.c</text:p>
            <text:p>riscv64-unknown-elf-gcc -march=rv64i -mabi=lp64 -S main01.c</text:p>
            <text:p/>
            <text:p>riscv64-unknown-elf-gcc -c hello.s -o hello.o</text:p>
            <text:p>riscv64-unknown-elf-gcc hello.o -o hello</text:p>
            <text:p>/opt/riscv/bin/riscv64-unknown-linux-gnu-gcc main01.o -o main01</text:p>
            <text:p>/opt/riscv/bin/riscv64-unknown-linux-gnu-objcopy main01 -O ihex main01.hex</text:p>
            <text:p/>
            <text:p><text:span text:style-name="T1">/opt/</text:span><text:span text:style-name="T1">riscv/</text:span><text:span text:style-name="T1">bin/</text:span><text:span text:style-name="T1">riscv64-</text:span><text:span text:style-name="T1">unknow</text:span><text:span text:style-name="T1">n-linux-</text:span><text:span text:style-name="T1">gnu-as </text:span><text:span text:style-name="T1">-</text:span><text:span text:style-name="T1">march=</text:span><text:span text:style-name="T1">rv64i</text:span> -mlittle-endian -g -o asfirstasm01.o asfirstasm01.asm -al=asfirstasm01.lst</text:p>
            <text:p><text:span text:style-name="T1">/opt/</text:span><text:span text:style-name="T1">riscv/</text:span><text:span text:style-name="T1">bin/</text:span><text:span text:style-name="T1">riscv64-</text:span><text:span text:style-name="T1">unknow</text:span><text:span text:style-name="T1">n-linux-</text:span><text:span text:style-name="T1">gnu-ld -</text:span><text:span text:style-name="T1">b </text:span>elf64-littleriscv -o asfirstasm01 asfirstasm01.o</text:p>
            <text:p>/opt/riscv/bin/riscv64-unknown-linux-gnu-objcopy asfirstasm01 -O ihex asfirstasm01.hex</text:p>
            <text:p text:style-name="P6">/opt/riscv/bin/riscv64-unknown-linux-gnu-objcopy asfirstasm01 -O verilog --verilog-data-width 4 asfirstasm01.v</text:p>
            <text:p text:style-name="P6">elf64-bigriscv</text:p>
            <text:p/>
            <text:p>spike pk hello</text:p>
          </draw:text-box>
        </draw:frame>
      </draw:page>
      <draw:page draw:name="page2" draw:style-name="dp1" draw:master-page-name="Default">
        <draw:frame draw:style-name="gr43" draw:text-style-name="P3" draw:layer="layout" svg:width="5.749cm" svg:height="0.962cm" svg:x="32.3cm" svg:y="23cm">
          <draw:text-box>
            <text:p>dBusDataWr(63:0)</text:p>
          </draw:text-box>
        </draw:frame>
        <draw:frame draw:style-name="gr44" draw:text-style-name="P3" draw:layer="layout" svg:width="4.949cm" svg:height="0.962cm" svg:x="30.4cm" svg:y="9.3cm">
          <draw:text-box>
            <text:p>dBusAddr(63:0)</text:p>
          </draw:text-box>
        </draw:frame>
        <draw:custom-shape draw:style-name="gr40" draw:text-style-name="P5" draw:layer="layout" svg:width="0.2cm" svg:height="0.2cm" svg:x="14.9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8" draw:layer="layout" svg:width="2.011cm" svg:height="5cm" svg:x="3.989cm" svg:y="1cm">
          <text:p text:style-name="P7"><text:span text:style-name="T2">TAP</text:span></text:p>
          <draw:enhanced-geometry svg:viewBox="0 0 21600 21600" draw:type="rectangle" draw:enhanced-path="M 0 0 L 21600 0 21600 21600 0 21600 0 0 Z N"/>
        </draw:custom-shape>
        <draw:frame draw:style-name="gr46" draw:text-style-name="P9" draw:layer="layout" svg:width="1.184cm" svg:height="0.725cm" svg:x="0.996cm" svg:y="2cm">
          <draw:text-box>
            <text:p><text:span text:style-name="T2">TDI</text:span></text:p>
          </draw:text-box>
        </draw:frame>
        <draw:frame draw:style-name="gr47" draw:text-style-name="P9" draw:layer="layout" svg:width="1.396cm" svg:height="0.725cm" svg:x="0.996cm" svg:y="3.001cm">
          <draw:text-box>
            <text:p><text:span text:style-name="T2">TMS</text:span></text:p>
          </draw:text-box>
        </draw:frame>
        <draw:frame draw:style-name="gr48" draw:text-style-name="P9" draw:layer="layout" svg:width="1.349cm" svg:height="0.725cm" svg:x="0.997cm" svg:y="4.002cm">
          <draw:text-box>
            <text:p><text:span text:style-name="T2">TCK</text:span></text:p>
          </draw:text-box>
        </draw:frame>
        <draw:frame draw:style-name="gr47" draw:text-style-name="P9" draw:layer="layout" svg:width="1.396cm" svg:height="0.725cm" svg:x="0.998cm" svg:y="5.003cm">
          <draw:text-box>
            <text:p><text:span text:style-name="T2">TDO</text:span></text:p>
          </draw:text-box>
        </draw:frame>
        <draw:frame draw:style-name="gr49" draw:text-style-name="P9" draw:layer="layout" svg:width="1.607cm" svg:height="0.725cm" svg:x="0.996cm" svg:y="1.001cm">
          <draw:text-box>
            <text:p><text:span text:style-name="T2">TRST</text:span></text:p>
          </draw:text-box>
        </draw:frame>
        <draw:line draw:style-name="gr50" draw:text-style-name="P4" draw:layer="layout" svg:x1="2.4cm" svg:y1="1.5cm" svg:x2="3.989cm" svg:y2="1.5cm">
          <text:p/>
        </draw:line>
        <draw:line draw:style-name="gr50" draw:text-style-name="P4" draw:layer="layout" svg:x1="2.4cm" svg:y1="2.5cm" svg:x2="3.989cm" svg:y2="2.5cm">
          <text:p/>
        </draw:line>
        <draw:line draw:style-name="gr50" draw:text-style-name="P4" draw:layer="layout" svg:x1="2.4cm" svg:y1="3.5cm" svg:x2="3.989cm" svg:y2="3.5cm">
          <text:p/>
        </draw:line>
        <draw:line draw:style-name="gr50" draw:text-style-name="P4" draw:layer="layout" svg:x1="2.4cm" svg:y1="4.5cm" svg:x2="3.989cm" svg:y2="4.5cm">
          <text:p/>
        </draw:line>
        <draw:line draw:style-name="gr51" draw:text-style-name="P4" draw:layer="layout" svg:x1="3.989cm" svg:y1="5.5cm" svg:x2="2.393cm" svg:y2="5.5cm">
          <text:p/>
        </draw:line>
        <draw:custom-shape draw:style-name="gr52" draw:text-style-name="P8" draw:layer="layout" svg:width="2cm" svg:height="5cm" svg:x="7cm" svg:y="1cm">
          <text:p text:style-name="P7"><text:span text:style-name="T2">Reg.</text:span></text:p>
          <draw:enhanced-geometry svg:viewBox="0 0 21600 21600" draw:type="rectangle" draw:enhanced-path="M 0 0 L 21600 0 21600 21600 0 21600 0 0 Z N"/>
        </draw:custom-shape>
        <draw:line draw:style-name="gr53" draw:text-style-name="P4" draw:layer="layout" svg:x1="6cm" svg:y1="3.5cm" svg:x2="7cm" svg:y2="3.5cm">
          <text:p/>
        </draw:line>
        <draw:g draw:style-name="gr1">
          <draw:custom-shape draw:style-name="gr54" draw:text-style-name="P10" draw:layer="layout" svg:width="5cm" svg:height="6cm" svg:x="8cm" svg:y="12cm">
            <text:p text:style-name="P7"><text:span text:style-name="T2">IMe</text:span><text:span text:style-name="T2">m</text:span></text:p>
            <draw:enhanced-geometry svg:viewBox="0 0 21600 21600" draw:type="rectangle" draw:enhanced-path="M 0 0 L 21600 0 21600 21600 0 21600 0 0 Z N"/>
          </draw:custom-shape>
          <draw:frame draw:style-name="gr55" draw:text-style-name="P9" draw:layer="layout" svg:width="3.313cm" svg:height="0.725cm" svg:x="7.987cm" svg:y="13cm">
            <draw:text-box>
              <text:p><text:span text:style-name="T2">loadData(3</text:span><text:span text:style-name="T2">1:0)</text:span></text:p>
            </draw:text-box>
          </draw:frame>
          <draw:frame draw:style-name="gr55" draw:text-style-name="P9" draw:layer="layout" svg:width="3.313cm" svg:height="0.725cm" svg:x="7.987cm" svg:y="11.975cm">
            <draw:text-box>
              <text:p><text:span text:style-name="T2">loadAddr(6</text:span><text:span text:style-name="T2">3:0)</text:span></text:p>
            </draw:text-box>
          </draw:frame>
          <draw:frame draw:style-name="gr56" draw:text-style-name="P9" draw:layer="layout" svg:width="1.467cm" svg:height="0.725cm" svg:x="8cm" svg:y="13.975cm">
            <draw:text-box>
              <text:p><text:span text:style-name="T2">wrEn</text:span></text:p>
            </draw:text-box>
          </draw:frame>
          <draw:frame draw:style-name="gr57" draw:text-style-name="P9" draw:layer="layout" svg:width="3.36cm" svg:height="0.725cm" svg:x="8cm" svg:y="16cm">
            <draw:text-box>
              <text:p><text:span text:style-name="T2">readAddr(6</text:span><text:span text:style-name="T2">3:0)</text:span></text:p>
            </draw:text-box>
          </draw:frame>
          <draw:frame draw:style-name="gr57" draw:text-style-name="P9" draw:layer="layout" svg:width="3.36cm" svg:height="0.725cm" svg:x="9.64cm" svg:y="15cm">
            <draw:text-box>
              <text:p><text:span text:style-name="T2">readData(3</text:span><text:span text:style-name="T2">1:0)</text:span></text:p>
            </draw:text-box>
          </draw:frame>
        </draw:g>
        <draw:polygon draw:style-name="gr58" draw:text-style-name="P1" draw:layer="layout" svg:width="0.999cm" svg:height="1.999cm" svg:x="3cm" svg:y="15.5cm" svg:viewBox="0 0 1000 2000" draw:points="0,0 0,2000 1000,1700 1000,300">
          <text:p/>
        </draw:polygon>
        <draw:g draw:style-name="gr1">
          <draw:custom-shape draw:style-name="gr59" draw:text-style-name="P8" draw:layer="layout" svg:width="1cm" svg:height="2cm" svg:x="6cm" svg:y="15.5cm">
            <text:p text:style-name="P7"><text:span text:style-name="T2">PC</text:span></text:p>
            <draw:enhanced-geometry svg:viewBox="0 0 21600 21600" draw:type="rectangle" draw:enhanced-path="M 0 0 L 21600 0 21600 21600 0 21600 0 0 Z N"/>
          </draw:custom-shape>
          <draw:line draw:style-name="gr60" draw:text-style-name="P11" draw:layer="layout" svg:x1="6cm" svg:y1="17.4cm" svg:x2="6.3cm" svg:y2="17.3cm">
            <text:p/>
          </draw:line>
          <draw:line draw:style-name="gr60" draw:text-style-name="P11" draw:layer="layout" svg:x1="6cm" svg:y1="17.2cm" svg:x2="6.3cm" svg:y2="17.3cm">
            <text:p/>
          </draw:line>
        </draw:g>
        <draw:frame draw:style-name="gr61" draw:text-style-name="P9" draw:layer="layout" svg:width="1.09cm" svg:height="0.725cm" svg:x="7cm" svg:y="15.8cm">
          <draw:text-box>
            <text:p><text:span text:style-name="T2">PC</text:span></text:p>
          </draw:text-box>
        </draw:frame>
        <draw:frame draw:style-name="gr62" draw:text-style-name="P9" draw:layer="layout" svg:width="1.895cm" svg:height="0.725cm" draw:transform="rotate (1.5707963267949) translate (5.375cm 16.495cm)">
          <draw:text-box>
            <text:p><text:span text:style-name="T2">PCnext</text:span></text:p>
          </draw:text-box>
        </draw:frame>
        <draw:line draw:style-name="gr63" draw:text-style-name="P4" draw:layer="layout" svg:x1="4.005cm" svg:y1="16.5cm" svg:x2="6cm" svg:y2="16.5cm">
          <text:p/>
        </draw:line>
        <draw:line draw:style-name="gr63" draw:text-style-name="P4" draw:layer="layout" svg:x1="7.005cm" svg:y1="16.5cm" svg:x2="8cm" svg:y2="16.5cm">
          <text:p/>
        </draw:line>
        <draw:line draw:style-name="gr64" draw:text-style-name="P4" draw:layer="layout" svg:x1="7cm" svg:y1="12.5cm" svg:x2="7.987cm" svg:y2="12.5cm">
          <text:p/>
        </draw:line>
        <draw:line draw:style-name="gr64" draw:text-style-name="P4" draw:layer="layout" svg:x1="6cm" svg:y1="13.5cm" svg:x2="7.987cm" svg:y2="13.5cm">
          <text:p/>
        </draw:line>
        <draw:line draw:style-name="gr64" draw:text-style-name="P4" draw:layer="layout" svg:x1="5cm" svg:y1="14.5cm" svg:x2="7.987cm" svg:y2="14.5cm">
          <text:p/>
        </draw:line>
        <draw:g draw:style-name="gr1">
          <draw:custom-shape draw:style-name="gr65" draw:text-style-name="P10" draw:layer="layout" svg:width="9cm" svg:height="6cm" svg:x="17cm" svg:y="14cm">
            <text:p text:style-name="P7"><text:span text:style-name="T2">RegFile</text:span></text:p>
            <draw:enhanced-geometry svg:viewBox="0 0 21600 21600" draw:type="rectangle" draw:enhanced-path="M 0 0 L 21600 0 21600 21600 0 21600 0 0 Z N"/>
          </draw:custom-shape>
          <draw:g draw:style-name="gr66">
            <draw:line draw:style-name="gr60" draw:text-style-name="P11" draw:layer="layout" svg:x1="17cm" svg:y1="19.9cm" svg:x2="17.3cm" svg:y2="19.8cm">
              <text:p/>
            </draw:line>
            <draw:line draw:style-name="gr60" draw:text-style-name="P11" draw:layer="layout" svg:x1="17cm" svg:y1="19.7cm" svg:x2="17.3cm" svg:y2="19.8cm">
              <text:p/>
            </draw:line>
          </draw:g>
          <draw:frame draw:style-name="gr67" draw:text-style-name="P9" draw:layer="layout" svg:width="5.104cm" svg:height="0.725cm" svg:x="17cm" svg:y="15cm">
            <draw:text-box>
              <text:p><text:span text:style-name="T2">instr(19:15):</text:span><text:span text:style-name="T2">raddr01(4:0</text:span><text:span text:style-name="T2">)</text:span></text:p>
            </draw:text-box>
          </draw:frame>
          <draw:frame draw:style-name="gr67" draw:text-style-name="P9" draw:layer="layout" svg:width="5.104cm" svg:height="0.725cm" svg:x="16.996cm" svg:y="16cm">
            <draw:text-box>
              <text:p><text:span text:style-name="T2">instr(24:20):</text:span><text:span text:style-name="T2">raddr02(4:0</text:span><text:span text:style-name="T2">)</text:span></text:p>
            </draw:text-box>
          </draw:frame>
          <draw:frame draw:style-name="gr68" draw:text-style-name="P9" draw:layer="layout" svg:width="4.998cm" svg:height="0.725cm" svg:x="17.002cm" svg:y="17cm">
            <draw:text-box>
              <text:p><text:span text:style-name="T2">instr(11:7):w</text:span><text:span text:style-name="T2">addr01(4:0)</text:span></text:p>
            </draw:text-box>
          </draw:frame>
          <draw:frame draw:style-name="gr69" draw:text-style-name="P9" draw:layer="layout" svg:width="3.22cm" svg:height="0.725cm" svg:x="17cm" svg:y="18cm">
            <draw:text-box>
              <text:p><text:span text:style-name="T2">wdata01(63</text:span><text:span text:style-name="T2">:0)</text:span></text:p>
            </draw:text-box>
          </draw:frame>
          <draw:frame draw:style-name="gr70" draw:text-style-name="P9" draw:layer="layout" svg:width="3.055cm" svg:height="0.725cm" svg:x="22.945cm" svg:y="18cm">
            <draw:text-box>
              <text:p><text:span text:style-name="T2">rdata02(63:</text:span><text:span text:style-name="T2">0)</text:span></text:p>
            </draw:text-box>
          </draw:frame>
          <draw:frame draw:style-name="gr70" draw:text-style-name="P9" draw:layer="layout" svg:width="3.055cm" svg:height="0.725cm" svg:x="22.945cm" svg:y="15cm">
            <draw:text-box>
              <text:p><text:span text:style-name="T2">rdata01(63:</text:span><text:span text:style-name="T2">0)</text:span></text:p>
            </draw:text-box>
          </draw:frame>
          <draw:frame draw:style-name="gr71" draw:text-style-name="P9" draw:layer="layout" svg:width="1.044cm" svg:height="0.725cm" svg:x="19.4cm" svg:y="14cm">
            <draw:text-box>
              <text:p><text:span text:style-name="T2">we</text:span></text:p>
            </draw:text-box>
          </draw:frame>
        </draw:g>
        <draw:line draw:style-name="gr38" draw:text-style-name="P4" draw:layer="layout" svg:x1="13cm" svg:y1="15.5cm" svg:x2="16cm" svg:y2="15.5cm">
          <text:p/>
        </draw:line>
        <draw:frame draw:style-name="gr72" draw:text-style-name="P9" draw:layer="layout" svg:width="2.411cm" svg:height="0.725cm" svg:x="13cm" svg:y="14.804cm">
          <draw:text-box>
            <text:p><text:span text:style-name="T2">instr(31:0)</text:span></text:p>
          </draw:text-box>
        </draw:frame>
        <draw:line draw:style-name="gr38" draw:text-style-name="P4" draw:layer="layout" svg:x1="15cm" svg:y1="2.5cm" svg:x2="15cm" svg:y2="24.5cm">
          <text:p/>
        </draw:line>
        <draw:line draw:style-name="gr73" draw:text-style-name="P4" draw:layer="layout" svg:x1="15cm" svg:y1="16.5cm" svg:x2="17cm" svg:y2="16.5cm">
          <text:p/>
        </draw:line>
        <draw:line draw:style-name="gr73" draw:text-style-name="P4" draw:layer="layout" svg:x1="15cm" svg:y1="15.5cm" svg:x2="17cm" svg:y2="15.5cm">
          <text:p/>
        </draw:line>
        <draw:line draw:style-name="gr73" draw:text-style-name="P4" draw:layer="layout" svg:x1="15cm" svg:y1="17.5cm" svg:x2="17cm" svg:y2="17.5cm">
          <text:p/>
        </draw:line>
        <draw:custom-shape draw:style-name="gr40" draw:text-style-name="P5" draw:layer="layout" svg:width="0.2cm" svg:height="0.2cm" svg:x="14.901cm" svg:y="1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14.902cm" svg:y="17.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58" draw:text-style-name="P1" draw:layer="layout" svg:width="0.999cm" svg:height="1.999cm" svg:x="28cm" svg:y="18cm" svg:viewBox="0 0 1000 2000" draw:points="0,0 0,2000 1000,1700 1000,300">
          <text:p/>
        </draw:polygon>
        <draw:g draw:style-name="gr1">
          <draw:custom-shape draw:style-name="gr74" draw:text-style-name="P10" draw:layer="layout" svg:width="4cm" svg:height="3cm" svg:x="16.993cm" svg:y="23cm">
            <text:p text:style-name="P7"><text:span text:style-name="T2">extend</text:span></text:p>
            <draw:enhanced-geometry svg:viewBox="0 0 21600 21600" draw:type="rectangle" draw:enhanced-path="M 0 0 L 21600 0 21600 21600 0 21600 0 0 Z N"/>
          </draw:custom-shape>
          <draw:frame draw:style-name="gr72" draw:text-style-name="P9" draw:layer="layout" svg:width="2.411cm" svg:height="0.725cm" svg:x="16.982cm" svg:y="24.2cm">
            <draw:text-box>
              <text:p><text:span text:style-name="T2">instr(31:0)</text:span></text:p>
            </draw:text-box>
          </draw:frame>
          <draw:frame draw:style-name="gr75" draw:text-style-name="P9" draw:layer="layout" svg:width="1.916cm" svg:height="0.725cm" svg:x="18.083cm" svg:y="23.001cm">
            <draw:text-box>
              <text:p><text:span text:style-name="T2">sel(2:0)</text:span></text:p>
            </draw:text-box>
          </draw:frame>
          <draw:frame draw:style-name="gr76" draw:text-style-name="P9" draw:layer="layout" svg:width="2.407cm" svg:height="0.725cm" svg:x="18.593cm" svg:y="25cm">
            <draw:text-box>
              <text:p><text:span text:style-name="T2">imm(63:0)</text:span></text:p>
            </draw:text-box>
          </draw:frame>
        </draw:g>
        <draw:line draw:style-name="gr77" draw:text-style-name="P4" draw:layer="layout" svg:x1="15cm" svg:y1="24.5cm" svg:x2="16.982cm" svg:y2="24.5cm">
          <text:p/>
        </draw:line>
        <draw:line draw:style-name="gr78" draw:text-style-name="P4" draw:layer="layout" svg:x1="19cm" svg:y1="22cm" svg:x2="19cm" svg:y2="23.001cm">
          <text:p/>
        </draw:line>
        <draw:line draw:style-name="gr79" draw:text-style-name="P4" draw:layer="layout" svg:x1="16cm" svg:y1="18.5cm" svg:x2="17cm" svg:y2="18.5cm">
          <text:p/>
        </draw:line>
        <draw:line draw:style-name="gr80" draw:text-style-name="P4" draw:layer="layout" svg:x1="26cm" svg:y1="15.5cm" svg:x2="28cm" svg:y2="15.5cm">
          <text:p/>
        </draw:line>
        <draw:line draw:style-name="gr80" draw:text-style-name="P4" draw:layer="layout" svg:x1="26cm" svg:y1="18.5cm" svg:x2="28cm" svg:y2="18.5cm">
          <text:p/>
        </draw:line>
        <draw:g draw:style-name="gr1">
          <draw:custom-shape draw:style-name="gr81" draw:text-style-name="P10" draw:layer="layout" svg:width="6cm" svg:height="10cm" svg:x="17cm" svg:y="2cm">
            <text:p text:style-name="P7"><text:span text:style-name="T2">contro</text:span><text:span text:style-name="T2">llAll</text:span></text:p>
            <draw:enhanced-geometry svg:viewBox="0 0 21600 21600" draw:type="rectangle" draw:enhanced-path="M 0 0 L 21600 0 21600 21600 0 21600 0 0 Z N"/>
          </draw:custom-shape>
          <draw:frame draw:style-name="gr82" draw:text-style-name="P9" draw:layer="layout" svg:width="2.771cm" svg:height="0.725cm" svg:x="17cm" svg:y="2cm">
            <draw:text-box>
              <text:p><text:span text:style-name="T2">opcode(6:0)</text:span></text:p>
            </draw:text-box>
          </draw:frame>
          <draw:frame draw:style-name="gr83" draw:text-style-name="P9" draw:layer="layout" svg:width="2.415cm" svg:height="0.725cm" svg:x="17.001cm" svg:y="3.001cm">
            <draw:text-box>
              <text:p><text:span text:style-name="T2">func3(2:0)</text:span></text:p>
            </draw:text-box>
          </draw:frame>
          <draw:frame draw:style-name="gr84" draw:text-style-name="P9" draw:layer="layout" svg:width="2.018cm" svg:height="0.725cm" svg:x="17.001cm" svg:y="4.001cm">
            <draw:text-box>
              <text:p><text:span text:style-name="T2">func7b5</text:span></text:p>
            </draw:text-box>
          </draw:frame>
          <draw:frame draw:style-name="gr85" draw:text-style-name="P9" draw:layer="layout" svg:width="1.328cm" svg:height="0.725cm" svg:x="17.001cm" svg:y="5.001cm">
            <draw:text-box>
              <text:p><text:span text:style-name="T2">zero</text:span></text:p>
            </draw:text-box>
          </draw:frame>
          <draw:frame draw:style-name="gr86" draw:text-style-name="P9" draw:layer="layout" svg:width="3.046cm" svg:height="0.725cm" svg:x="19.966cm" svg:y="2cm">
            <draw:text-box>
              <text:p><text:span text:style-name="T2">resultSrc(1:</text:span><text:span text:style-name="T2">0)</text:span></text:p>
            </draw:text-box>
          </draw:frame>
          <draw:frame draw:style-name="gr87" draw:text-style-name="P9" draw:layer="layout" svg:width="2.212cm" svg:height="0.725cm" svg:x="20.8cm" svg:y="3cm">
            <draw:text-box>
              <text:p><text:span text:style-name="T2">dMemWr</text:span></text:p>
            </draw:text-box>
          </draw:frame>
          <draw:frame draw:style-name="gr88" draw:text-style-name="P9" draw:layer="layout" svg:width="2.221cm" svg:height="0.725cm" svg:x="20.791cm" svg:y="4.001cm">
            <draw:text-box>
              <text:p><text:span text:style-name="T2">dMemRd</text:span></text:p>
            </draw:text-box>
          </draw:frame>
          <draw:frame draw:style-name="gr89" draw:text-style-name="P9" draw:layer="layout" svg:width="1.725cm" svg:height="0.725cm" svg:x="21.287cm" svg:y="5.001cm">
            <draw:text-box>
              <text:p><text:span text:style-name="T2">PCSrc</text:span></text:p>
            </draw:text-box>
          </draw:frame>
          <draw:frame draw:style-name="gr90" draw:text-style-name="P9" draw:layer="layout" svg:width="1.988cm" svg:height="0.725cm" svg:x="21.024cm" svg:y="6.001cm">
            <draw:text-box>
              <text:p><text:span text:style-name="T2">aluSrcB</text:span></text:p>
            </draw:text-box>
          </draw:frame>
          <draw:frame draw:style-name="gr90" draw:text-style-name="P9" draw:layer="layout" svg:width="1.988cm" svg:height="0.725cm" svg:x="21.024cm" svg:y="7.002cm">
            <draw:text-box>
              <text:p><text:span text:style-name="T2">aluSrcA</text:span></text:p>
            </draw:text-box>
          </draw:frame>
          <draw:frame draw:style-name="gr91" draw:text-style-name="P9" draw:layer="layout" svg:width="1.649cm" svg:height="0.725cm" svg:x="21.363cm" svg:y="8.002cm">
            <draw:text-box>
              <text:p><text:span text:style-name="T2">regWr</text:span></text:p>
            </draw:text-box>
          </draw:frame>
          <draw:frame draw:style-name="gr92" draw:text-style-name="P9" draw:layer="layout" svg:width="1.421cm" svg:height="0.725cm" svg:x="21.591cm" svg:y="9.002cm">
            <draw:text-box>
              <text:p><text:span text:style-name="T2">jump</text:span></text:p>
            </draw:text-box>
          </draw:frame>
          <draw:frame draw:style-name="gr93" draw:text-style-name="P9" draw:layer="layout" svg:width="2.807cm" svg:height="0.725cm" svg:x="20.207cm" svg:y="10.002cm">
            <draw:text-box>
              <text:p><text:span text:style-name="T2">immSrc(2:0</text:span><text:span text:style-name="T2">)</text:span></text:p>
            </draw:text-box>
          </draw:frame>
          <draw:frame draw:style-name="gr94" draw:text-style-name="P9" draw:layer="layout" svg:width="2.555cm" svg:height="0.725cm" svg:x="20.457cm" svg:y="11.002cm">
            <draw:text-box>
              <text:p><text:span text:style-name="T2">aluSel(4:0)</text:span></text:p>
            </draw:text-box>
          </draw:frame>
        </draw:g>
        <draw:line draw:style-name="gr38" draw:text-style-name="P4" draw:layer="layout" svg:x1="8.5cm" svg:y1="6cm" svg:x2="8.5cm" svg:y2="8cm">
          <text:p/>
        </draw:line>
        <draw:line draw:style-name="gr38" draw:text-style-name="P4" draw:layer="layout" svg:x1="8cm" svg:y1="6cm" svg:x2="8cm" svg:y2="7.5cm">
          <text:p/>
        </draw:line>
        <draw:line draw:style-name="gr38" draw:text-style-name="P4" draw:layer="layout" svg:x1="7.5cm" svg:y1="6cm" svg:x2="7.5cm" svg:y2="7cm">
          <text:p/>
        </draw:line>
        <draw:line draw:style-name="gr38" draw:text-style-name="P4" draw:layer="layout" svg:x1="5cm" svg:y1="7cm" svg:x2="5cm" svg:y2="14.5cm">
          <text:p/>
        </draw:line>
        <draw:line draw:style-name="gr38" draw:text-style-name="P4" draw:layer="layout" svg:x1="6cm" svg:y1="7.5cm" svg:x2="6cm" svg:y2="13.5cm">
          <text:p/>
        </draw:line>
        <draw:line draw:style-name="gr38" draw:text-style-name="P4" draw:layer="layout" svg:x1="7cm" svg:y1="8cm" svg:x2="7cm" svg:y2="12.5cm">
          <text:p/>
        </draw:line>
        <draw:line draw:style-name="gr38" draw:text-style-name="P4" draw:layer="layout" svg:x1="7.5cm" svg:y1="7cm" svg:x2="5cm" svg:y2="7cm">
          <text:p/>
        </draw:line>
        <draw:line draw:style-name="gr38" draw:text-style-name="P4" draw:layer="layout" svg:x1="8cm" svg:y1="7.5cm" svg:x2="6cm" svg:y2="7.5cm">
          <text:p/>
        </draw:line>
        <draw:line draw:style-name="gr38" draw:text-style-name="P4" draw:layer="layout" svg:x1="8.5cm" svg:y1="8cm" svg:x2="7cm" svg:y2="8cm">
          <text:p/>
        </draw:line>
        <draw:line draw:style-name="gr95" draw:text-style-name="P4" draw:layer="layout" svg:x1="15cm" svg:y1="2.5cm" svg:x2="17cm" svg:y2="2.5cm">
          <text:p/>
        </draw:line>
        <draw:line draw:style-name="gr95" draw:text-style-name="P4" draw:layer="layout" svg:x1="15cm" svg:y1="3.5cm" svg:x2="17cm" svg:y2="3.5cm">
          <text:p/>
        </draw:line>
        <draw:line draw:style-name="gr95" draw:text-style-name="P4" draw:layer="layout" svg:x1="15cm" svg:y1="4.5cm" svg:x2="17cm" svg:y2="4.5cm">
          <text:p/>
        </draw:line>
        <draw:line draw:style-name="gr95" draw:text-style-name="P4" draw:layer="layout" svg:x1="16cm" svg:y1="5.5cm" svg:x2="17cm" svg:y2="5.5cm">
          <text:p/>
        </draw:line>
        <draw:custom-shape draw:style-name="gr40" draw:text-style-name="P5" draw:layer="layout" svg:width="0.2cm" svg:height="0.2cm" svg:x="14.901cm" svg:y="3.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14.902cm" svg:y="4.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58" draw:text-style-name="P1" draw:layer="layout" svg:width="0.999cm" svg:height="1.999cm" svg:x="28cm" svg:y="15cm" svg:viewBox="0 0 1000 2000" draw:points="0,0 0,2000 1000,1700 1000,300">
          <text:p/>
        </draw:polygon>
        <draw:frame draw:style-name="gr96" draw:text-style-name="P9" draw:layer="layout" svg:width="3.021cm" svg:height="0.725cm" svg:x="22.2cm" svg:y="24.775cm">
          <draw:text-box>
            <text:p><text:span text:style-name="T2">immExt(63:</text:span><text:span text:style-name="T2">0)</text:span></text:p>
          </draw:text-box>
        </draw:frame>
        <draw:line draw:style-name="gr97" draw:text-style-name="P4" draw:layer="layout" svg:x1="27cm" svg:y1="19.5cm" svg:x2="28cm" svg:y2="19.5cm">
          <text:p/>
        </draw:line>
        <draw:line draw:style-name="gr38" draw:text-style-name="P4" draw:layer="layout" svg:x1="27cm" svg:y1="25.5cm" svg:x2="27cm" svg:y2="19.5cm">
          <text:p/>
        </draw:line>
        <draw:line draw:style-name="gr38" draw:text-style-name="P4" draw:layer="layout" svg:x1="20.993cm" svg:y1="25.5cm" svg:x2="27cm" svg:y2="25.5cm">
          <text:p/>
        </draw:line>
        <draw:line draw:style-name="gr38" draw:text-style-name="P4" draw:layer="layout" svg:x1="26.5cm" svg:y1="10.5cm" svg:x2="26.5cm" svg:y2="22cm">
          <text:p/>
        </draw:line>
        <draw:line draw:style-name="gr38" draw:text-style-name="P4" draw:layer="layout" svg:x1="23.012cm" svg:y1="10.5cm" svg:x2="26.5cm" svg:y2="10.5cm">
          <text:p/>
        </draw:line>
        <draw:line draw:style-name="gr38" draw:text-style-name="P4" draw:layer="layout" svg:x1="26.5cm" svg:y1="22cm" svg:x2="19cm" svg:y2="22cm">
          <text:p/>
        </draw:line>
        <draw:frame draw:style-name="gr98" draw:text-style-name="P9" draw:layer="layout" svg:width="2.807cm" svg:height="0.725cm" svg:x="23.2cm" svg:y="9.9cm">
          <draw:text-box>
            <text:p><text:span text:style-name="T2">immSrc(2:0</text:span><text:span text:style-name="T2">)</text:span></text:p>
          </draw:text-box>
        </draw:frame>
        <draw:line draw:style-name="gr99" draw:text-style-name="P4" draw:layer="layout" svg:x1="28.5cm" svg:y1="7.5cm" svg:x2="28.5cm" svg:y2="15.2cm">
          <text:p/>
        </draw:line>
        <draw:line draw:style-name="gr38" draw:text-style-name="P4" draw:layer="layout" svg:x1="23.012cm" svg:y1="7.5cm" svg:x2="28.5cm" svg:y2="7.5cm">
          <text:p/>
        </draw:line>
        <draw:frame draw:style-name="gr100" draw:text-style-name="P9" draw:layer="layout" svg:width="1.988cm" svg:height="0.725cm" svg:x="23.201cm" svg:y="6.901cm">
          <draw:text-box>
            <text:p><text:span text:style-name="T2">aluSrcA</text:span></text:p>
          </draw:text-box>
        </draw:frame>
        <draw:line draw:style-name="gr38" draw:text-style-name="P4" draw:layer="layout" svg:x1="29cm" svg:y1="19cm" svg:x2="30cm" svg:y2="19cm">
          <text:p/>
        </draw:line>
        <draw:frame draw:style-name="gr48" draw:text-style-name="P9" draw:layer="layout" svg:width="1.349cm" svg:height="0.725cm" svg:x="28.912cm" svg:y="18.375cm">
          <draw:text-box>
            <text:p><text:span text:style-name="T2">srcB</text:span></text:p>
          </draw:text-box>
        </draw:frame>
        <draw:frame draw:style-name="gr101" draw:text-style-name="P9" draw:layer="layout" svg:width="3.165cm" svg:height="0.725cm" svg:x="30.2cm" svg:y="21.4cm">
          <draw:text-box>
            <text:p><text:span text:style-name="T2">writeDat(63:</text:span><text:span text:style-name="T2">0)</text:span></text:p>
          </draw:text-box>
        </draw:frame>
        <draw:custom-shape draw:style-name="gr40" draw:text-style-name="P5" draw:layer="layout" svg:width="0.2cm" svg:height="0.2cm" svg:x="27.403cm" svg:y="18.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7.5cm" svg:y1="18.5cm" svg:x2="27.5cm" svg:y2="22cm">
          <text:p/>
        </draw:line>
        <draw:line draw:style-name="gr38" draw:text-style-name="P4" draw:layer="layout" svg:x1="29.001cm" svg:y1="16.001cm" svg:x2="30.001cm" svg:y2="16.001cm">
          <text:p/>
        </draw:line>
        <draw:frame draw:style-name="gr48" draw:text-style-name="P9" draw:layer="layout" svg:width="1.349cm" svg:height="0.725cm" svg:x="28.913cm" svg:y="15.376cm">
          <draw:text-box>
            <text:p><text:span text:style-name="T2">srcA</text:span></text:p>
          </draw:text-box>
        </draw:frame>
        <draw:frame draw:style-name="gr102" draw:text-style-name="P9" draw:layer="layout" svg:width="2.509cm" svg:height="0.725cm" svg:x="25.791cm" svg:y="14.875cm">
          <draw:text-box>
            <text:p><text:span text:style-name="T2">regA(63:0)</text:span></text:p>
          </draw:text-box>
        </draw:frame>
        <draw:custom-shape draw:style-name="gr103" draw:text-style-name="P10" draw:layer="layout" svg:width="3cm" svg:height="6cm" svg:x="30cm" svg:y="14cm">
          <text:p text:style-name="P7"><text:span text:style-name="T2">alu</text:span></text:p>
          <draw:enhanced-geometry svg:viewBox="0 0 21600 21600" draw:type="rectangle" draw:enhanced-path="M 0 0 L 21600 0 21600 21600 0 21600 0 0 Z N"/>
        </draw:custom-shape>
        <draw:frame draw:style-name="gr104" draw:text-style-name="P9" draw:layer="layout" svg:width="1.806cm" svg:height="0.725cm" svg:x="30.001cm" svg:y="14.975cm">
          <draw:text-box>
            <text:p><text:span text:style-name="T2">data01</text:span></text:p>
          </draw:text-box>
        </draw:frame>
        <draw:frame draw:style-name="gr104" draw:text-style-name="P9" draw:layer="layout" svg:width="1.806cm" svg:height="0.725cm" svg:x="30cm" svg:y="18cm">
          <draw:text-box>
            <text:p><text:span text:style-name="T2">data02</text:span></text:p>
          </draw:text-box>
        </draw:frame>
        <draw:frame draw:style-name="gr105" draw:text-style-name="P9" draw:layer="layout" svg:width="1.683cm" svg:height="0.725cm" svg:x="31.017cm" svg:y="14cm">
          <draw:text-box>
            <text:p><text:span text:style-name="T2">aluSel</text:span></text:p>
          </draw:text-box>
        </draw:frame>
        <draw:frame draw:style-name="gr106" draw:text-style-name="P9" draw:layer="layout" svg:width="1.328cm" svg:height="0.725cm" svg:x="31.694cm" svg:y="16cm">
          <draw:text-box>
            <text:p><text:span text:style-name="T2">zero</text:span></text:p>
          </draw:text-box>
        </draw:frame>
        <draw:frame draw:style-name="gr107" draw:text-style-name="P9" draw:layer="layout" svg:width="2.272cm" svg:height="0.725cm" svg:x="30.728cm" svg:y="17cm">
          <draw:text-box>
            <text:p><text:span text:style-name="T2">aluResult</text:span></text:p>
          </draw:text-box>
        </draw:frame>
        <draw:line draw:style-name="gr38" draw:text-style-name="P4" draw:layer="layout" svg:x1="33.022cm" svg:y1="16.5cm" svg:x2="34cm" svg:y2="16.5cm">
          <text:p/>
        </draw:line>
        <draw:line draw:style-name="gr38" draw:text-style-name="P4" draw:layer="layout" svg:x1="16cm" svg:y1="13cm" svg:x2="16cm" svg:y2="5.5cm">
          <text:p/>
        </draw:line>
        <draw:line draw:style-name="gr38" draw:text-style-name="P4" draw:layer="layout" svg:x1="34cm" svg:y1="13cm" svg:x2="16cm" svg:y2="13cm">
          <text:p/>
        </draw:line>
        <draw:line draw:style-name="gr38" draw:text-style-name="P4" draw:layer="layout" svg:x1="34cm" svg:y1="16.5cm" svg:x2="34cm" svg:y2="13cm">
          <text:p/>
        </draw:line>
        <draw:frame draw:style-name="gr107" draw:text-style-name="P9" draw:layer="layout" svg:width="2.272cm" svg:height="0.725cm" svg:x="32.8cm" svg:y="16.9cm">
          <draw:text-box>
            <text:p><text:span text:style-name="T2">aluResult</text:span></text:p>
          </draw:text-box>
        </draw:frame>
        <draw:frame draw:style-name="gr106" draw:text-style-name="P9" draw:layer="layout" svg:width="1.328cm" svg:height="0.725cm" svg:x="32.8cm" svg:y="15.876cm">
          <draw:text-box>
            <text:p><text:span text:style-name="T2">zero</text:span></text:p>
          </draw:text-box>
        </draw:frame>
        <draw:g draw:style-name="gr1">
          <draw:custom-shape draw:style-name="gr108" draw:text-style-name="P10" draw:layer="layout" svg:width="3.1cm" svg:height="5cm" svg:x="35cm" svg:y="16cm">
            <text:p text:style-name="P7"><text:span text:style-name="T2">DMem</text:span></text:p>
            <draw:enhanced-geometry svg:viewBox="0 0 21600 21600" draw:type="rectangle" draw:enhanced-path="M 0 0 L 21600 0 21600 21600 0 21600 0 0 Z N"/>
          </draw:custom-shape>
          <draw:frame draw:style-name="gr56" draw:text-style-name="P9" draw:layer="layout" svg:width="1.467cm" svg:height="0.725cm" svg:x="36.433cm" svg:y="16cm">
            <draw:text-box>
              <text:p><text:span text:style-name="T2">wrEn</text:span></text:p>
            </draw:text-box>
          </draw:frame>
          <draw:g draw:style-name="gr66">
            <draw:line draw:style-name="gr60" draw:text-style-name="P11" draw:layer="layout" svg:x1="35cm" svg:y1="20.9cm" svg:x2="35.3cm" svg:y2="20.8cm">
              <text:p/>
            </draw:line>
            <draw:line draw:style-name="gr60" draw:text-style-name="P11" draw:layer="layout" svg:x1="35cm" svg:y1="20.7cm" svg:x2="35.3cm" svg:y2="20.8cm">
              <text:p/>
            </draw:line>
          </draw:g>
          <draw:frame draw:style-name="gr109" draw:text-style-name="P9" draw:layer="layout" svg:width="1.399cm" svg:height="0.725cm" svg:x="35.2cm" svg:y="16cm">
            <draw:text-box>
              <text:p><text:span text:style-name="T2">rdEn</text:span></text:p>
            </draw:text-box>
          </draw:frame>
          <draw:frame draw:style-name="gr110" draw:text-style-name="P9" draw:layer="layout" svg:width="1.302cm" svg:height="0.725cm" svg:x="35cm" svg:y="19cm">
            <draw:text-box>
              <text:p><text:span text:style-name="T2">instr</text:span></text:p>
            </draw:text-box>
          </draw:frame>
          <draw:frame draw:style-name="gr111" draw:text-style-name="P9" draw:layer="layout" svg:width="1.353cm" svg:height="0.725cm" svg:x="35cm" svg:y="17cm">
            <draw:text-box>
              <text:p><text:span text:style-name="T2">addr</text:span></text:p>
            </draw:text-box>
          </draw:frame>
          <draw:frame draw:style-name="gr112" draw:text-style-name="P9" draw:layer="layout" svg:width="1.425cm" svg:height="0.725cm" svg:x="35cm" svg:y="18cm">
            <draw:text-box>
              <text:p><text:span text:style-name="T2">datai</text:span></text:p>
            </draw:text-box>
          </draw:frame>
          <draw:frame draw:style-name="gr113" draw:text-style-name="P9" draw:layer="layout" svg:width="1.569cm" svg:height="0.725cm" svg:x="36.431cm" svg:y="17cm">
            <draw:text-box>
              <text:p><text:span text:style-name="T2">datao</text:span></text:p>
            </draw:text-box>
          </draw:frame>
        </draw:g>
        <draw:line draw:style-name="gr114" draw:text-style-name="P4" draw:layer="layout" svg:x1="33cm" svg:y1="17.5cm" svg:x2="35cm" svg:y2="17.5cm">
          <text:p/>
        </draw:line>
        <draw:line draw:style-name="gr115" draw:text-style-name="P4" draw:layer="layout" svg:x1="33.5cm" svg:y1="18.5cm" svg:x2="35cm" svg:y2="18.5cm">
          <text:p/>
        </draw:line>
        <draw:line draw:style-name="gr38" draw:text-style-name="P4" draw:layer="layout" svg:x1="33.5cm" svg:y1="22cm" svg:x2="33.5cm" svg:y2="18.5cm">
          <text:p/>
        </draw:line>
        <draw:line draw:style-name="gr38" draw:text-style-name="P4" draw:layer="layout" svg:x1="27.5cm" svg:y1="22cm" svg:x2="33.5cm" svg:y2="22cm">
          <text:p/>
        </draw:line>
        <draw:line draw:style-name="gr115" draw:text-style-name="P4" draw:layer="layout" svg:x1="34cm" svg:y1="19.5cm" svg:x2="35cm" svg:y2="19.5cm">
          <text:p/>
        </draw:line>
        <draw:line draw:style-name="gr38" draw:text-style-name="P4" draw:layer="layout" svg:x1="15cm" svg:y1="20.5cm" svg:x2="34cm" svg:y2="20.5cm">
          <text:p/>
        </draw:line>
        <draw:custom-shape draw:style-name="gr40" draw:text-style-name="P5" draw:layer="layout" svg:width="0.2cm" svg:height="0.2cm" svg:x="14.903cm" svg:y="20.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4cm" svg:y1="20.5cm" svg:x2="34cm" svg:y2="19.5cm">
          <text:p/>
        </draw:line>
        <draw:line draw:style-name="gr116" draw:text-style-name="P4" draw:layer="layout" svg:x1="36cm" svg:y1="4.5cm" svg:x2="36cm" svg:y2="16cm">
          <text:p/>
        </draw:line>
        <draw:line draw:style-name="gr116" draw:text-style-name="P4" draw:layer="layout" svg:x1="37cm" svg:y1="3.5cm" svg:x2="37cm" svg:y2="16cm">
          <text:p/>
        </draw:line>
        <draw:line draw:style-name="gr38" draw:text-style-name="P4" draw:layer="layout" svg:x1="23.012cm" svg:y1="3.5cm" svg:x2="37cm" svg:y2="3.5cm">
          <text:p/>
        </draw:line>
        <draw:line draw:style-name="gr38" draw:text-style-name="P4" draw:layer="layout" svg:x1="23.012cm" svg:y1="4.5cm" svg:x2="36cm" svg:y2="4.5cm">
          <text:p/>
        </draw:line>
        <draw:frame draw:style-name="gr117" draw:text-style-name="P9" draw:layer="layout" svg:width="2.221cm" svg:height="0.725cm" svg:x="32.8cm" svg:y="3.877cm">
          <draw:text-box>
            <text:p><text:span text:style-name="T2">dMemRd</text:span></text:p>
          </draw:text-box>
        </draw:frame>
        <draw:frame draw:style-name="gr118" draw:text-style-name="P9" draw:layer="layout" svg:width="2.212cm" svg:height="0.725cm" svg:x="32.801cm" svg:y="2.878cm">
          <draw:text-box>
            <text:p><text:span text:style-name="T2">dMemWr</text:span></text:p>
          </draw:text-box>
        </draw:frame>
        <draw:line draw:style-name="gr38" draw:text-style-name="P4" draw:layer="layout" svg:x1="23.012cm" svg:y1="6.501cm" svg:x2="29.5cm" svg:y2="6.5cm">
          <text:p/>
        </draw:line>
        <draw:frame draw:style-name="gr100" draw:text-style-name="P9" draw:layer="layout" svg:width="1.988cm" svg:height="0.725cm" svg:x="23.201cm" svg:y="5.902cm">
          <draw:text-box>
            <text:p><text:span text:style-name="T2">aluSrcB</text:span></text:p>
          </draw:text-box>
        </draw:frame>
        <draw:line draw:style-name="gr119" draw:text-style-name="P4" draw:layer="layout" svg:x1="28.5cm" svg:y1="17.5cm" svg:x2="28.5cm" svg:y2="18.2cm">
          <text:p/>
        </draw:line>
        <draw:line draw:style-name="gr38" draw:text-style-name="P4" draw:layer="layout" svg:x1="28.5cm" svg:y1="17.5cm" svg:x2="29.5cm" svg:y2="17.5cm">
          <text:p/>
        </draw:line>
        <draw:line draw:style-name="gr38" draw:text-style-name="P4" draw:layer="layout" svg:x1="29.5cm" svg:y1="6.5cm" svg:x2="29.5cm" svg:y2="17.5cm">
          <text:p/>
        </draw:line>
        <draw:line draw:style-name="gr120" draw:text-style-name="P4" draw:layer="layout" svg:x1="20cm" svg:y1="13.5cm" svg:x2="20cm" svg:y2="14cm">
          <text:p/>
        </draw:line>
        <draw:line draw:style-name="gr38" draw:text-style-name="P4" draw:layer="layout" svg:x1="23.012cm" svg:y1="8.5cm" svg:x2="26cm" svg:y2="8.5cm">
          <text:p/>
        </draw:line>
        <draw:frame draw:style-name="gr121" draw:text-style-name="P9" draw:layer="layout" svg:width="1.799cm" svg:height="0.725cm" svg:x="23.201cm" svg:y="7.902cm">
          <draw:text-box>
            <text:p><text:span text:style-name="T2">regWr</text:span></text:p>
          </draw:text-box>
        </draw:frame>
        <draw:line draw:style-name="gr38" draw:text-style-name="P4" draw:layer="layout" svg:x1="26cm" svg:y1="8.5cm" svg:x2="26cm" svg:y2="13.5cm">
          <text:p/>
        </draw:line>
        <draw:line draw:style-name="gr38" draw:text-style-name="P4" draw:layer="layout" svg:x1="26cm" svg:y1="13.5cm" svg:x2="20cm" svg:y2="13.5cm">
          <text:p/>
        </draw:line>
        <draw:line draw:style-name="gr38" draw:text-style-name="P4" draw:layer="layout" svg:x1="23cm" svg:y1="11.5cm" svg:x2="32cm" svg:y2="11.5cm">
          <text:p/>
        </draw:line>
        <draw:frame draw:style-name="gr122" draw:text-style-name="P9" draw:layer="layout" svg:width="2.555cm" svg:height="0.725cm" svg:x="23.201cm" svg:y="10.901cm">
          <draw:text-box>
            <text:p><text:span text:style-name="T2">aluSel(4:0)</text:span></text:p>
          </draw:text-box>
        </draw:frame>
        <draw:line draw:style-name="gr123" draw:text-style-name="P4" draw:layer="layout" svg:x1="32cm" svg:y1="11.5cm" svg:x2="32cm" svg:y2="14cm">
          <text:p/>
        </draw:line>
        <draw:polygon draw:style-name="gr58" draw:text-style-name="P1" draw:layer="layout" svg:width="0.999cm" svg:height="1.999cm" svg:x="39cm" svg:y="16.5cm" svg:viewBox="0 0 1000 2000" draw:points="0,0 0,2000 1000,1700 1000,300">
          <text:p/>
        </draw:polygon>
        <draw:line draw:style-name="gr124" draw:text-style-name="P4" draw:layer="layout" svg:x1="38.1cm" svg:y1="17.5cm" svg:x2="39cm" svg:y2="17.5cm">
          <text:p/>
        </draw:line>
        <draw:line draw:style-name="gr125" draw:text-style-name="P4" draw:layer="layout" svg:x1="38.5cm" svg:y1="17cm" svg:x2="39cm" svg:y2="17cm">
          <text:p/>
        </draw:line>
        <draw:line draw:style-name="gr38" draw:text-style-name="P4" draw:layer="layout" svg:x1="38.5cm" svg:y1="17cm" svg:x2="38.5cm" svg:y2="15cm">
          <text:p/>
        </draw:line>
        <draw:line draw:style-name="gr125" draw:text-style-name="P4" draw:layer="layout" svg:x1="38.5cm" svg:y1="18cm" svg:x2="39cm" svg:y2="18cm">
          <text:p/>
        </draw:line>
        <draw:line draw:style-name="gr38" draw:text-style-name="P4" draw:layer="layout" svg:x1="34.5cm" svg:y1="17.5cm" svg:x2="34.5cm" svg:y2="15cm">
          <text:p/>
        </draw:line>
        <draw:line draw:style-name="gr38" draw:text-style-name="P4" draw:layer="layout" svg:x1="34.5cm" svg:y1="15cm" svg:x2="38.5cm" svg:y2="15cm">
          <text:p/>
        </draw:line>
        <draw:custom-shape draw:style-name="gr40" draw:text-style-name="P5" draw:layer="layout" svg:width="0.2cm" svg:height="0.2cm" svg:x="34.4cm" svg:y="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6" draw:text-style-name="P9" draw:layer="layout" svg:width="2.648cm" svg:height="0.725cm" svg:x="28.852cm" svg:y="26.375cm">
          <draw:text-box>
            <text:p><text:span text:style-name="T2">result(63:0)</text:span></text:p>
          </draw:text-box>
        </draw:frame>
        <draw:line draw:style-name="gr38" draw:text-style-name="P4" draw:layer="layout" svg:x1="40.5cm" svg:y1="27cm" svg:x2="16cm" svg:y2="27cm">
          <text:p/>
        </draw:line>
        <draw:line draw:style-name="gr38" draw:text-style-name="P4" draw:layer="layout" svg:x1="40cm" svg:y1="17.5cm" svg:x2="40.5cm" svg:y2="17.5cm">
          <text:p/>
        </draw:line>
        <draw:line draw:style-name="gr38" draw:text-style-name="P4" draw:layer="layout" svg:x1="40.5cm" svg:y1="17.5cm" svg:x2="40.5cm" svg:y2="27cm">
          <text:p/>
        </draw:line>
        <draw:line draw:style-name="gr38" draw:text-style-name="P4" draw:layer="layout" svg:x1="16cm" svg:y1="27cm" svg:x2="16cm" svg:y2="18.5cm">
          <text:p/>
        </draw:line>
        <draw:line draw:style-name="gr127" draw:text-style-name="P4" draw:layer="layout" svg:x1="39.5cm" svg:y1="2.5cm" svg:x2="39.5cm" svg:y2="16.7cm">
          <text:p/>
        </draw:line>
        <draw:line draw:style-name="gr38" draw:text-style-name="P4" draw:layer="layout" svg:x1="23cm" svg:y1="2.5cm" svg:x2="39.5cm" svg:y2="2.5cm">
          <text:p/>
        </draw:line>
        <draw:frame draw:style-name="gr128" draw:text-style-name="P9" draw:layer="layout" svg:width="3.211cm" svg:height="0.725cm" svg:x="23.201cm" svg:y="1.903cm">
          <draw:text-box>
            <text:p><text:span text:style-name="T2">resultSrc(1:</text:span><text:span text:style-name="T2">0)</text:span></text:p>
          </draw:text-box>
        </draw:frame>
        <draw:frame draw:style-name="gr129" draw:text-style-name="P9" draw:layer="layout" svg:width="2.013cm" svg:height="0.725cm" svg:x="37.3cm" svg:y="13.375cm">
          <draw:text-box>
            <text:p><text:span text:style-name="T2">readDat</text:span></text:p>
          </draw:text-box>
        </draw:frame>
        <draw:line draw:style-name="gr130" draw:text-style-name="P4" draw:layer="layout" svg:x1="39cm" svg:y1="14cm" svg:x2="38.3cm" svg:y2="17.5cm">
          <text:p/>
        </draw:line>
        <draw:custom-shape draw:style-name="gr131" draw:text-style-name="P12" draw:layer="layout" svg:width="2cm" svg:height="2cm" svg:x="9cm" svg:y="21.5cm">
          <text:p text:style-name="P1">+</text:p>
          <draw:enhanced-geometry svg:viewBox="0 0 21600 21600" draw:type="rectangle" draw:enhanced-path="M 0 0 L 21600 0 21600 21600 0 21600 0 0 Z N"/>
        </draw:custom-shape>
        <draw:line draw:style-name="gr63" draw:text-style-name="P4" draw:layer="layout" svg:x1="7.5cm" svg:y1="22cm" svg:x2="9cm" svg:y2="22cm">
          <text:p/>
        </draw:line>
        <draw:line draw:style-name="gr63" draw:text-style-name="P4" draw:layer="layout" svg:x1="8.005cm" svg:y1="23cm" svg:x2="9cm" svg:y2="23cm">
          <text:p/>
        </draw:line>
        <draw:frame draw:style-name="gr132" draw:text-style-name="P9" draw:layer="layout" svg:width="0.739cm" svg:height="0.725cm" svg:x="7.261cm" svg:y="22.675cm">
          <draw:text-box>
            <text:p><text:span text:style-name="T2">4</text:span></text:p>
          </draw:text-box>
        </draw:frame>
        <draw:line draw:style-name="gr38" draw:text-style-name="P4" draw:layer="layout" svg:x1="7.5cm" svg:y1="16.5cm" svg:x2="7.5cm" svg:y2="22cm">
          <text:p/>
        </draw:line>
        <draw:custom-shape draw:style-name="gr40" draw:text-style-name="P5" draw:layer="layout" svg:width="0.2cm" svg:height="0.2cm" svg:x="7.4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1cm" svg:y1="22.5cm" svg:x2="38.5cm" svg:y2="22.5cm">
          <text:p/>
        </draw:line>
        <draw:line draw:style-name="gr38" draw:text-style-name="P4" draw:layer="layout" svg:x1="38.5cm" svg:y1="22.5cm" svg:x2="38.5cm" svg:y2="18cm">
          <text:p/>
        </draw:line>
        <draw:custom-shape draw:style-name="gr40" draw:text-style-name="P5" draw:layer="layout" svg:width="0.2cm" svg:height="0.2cm" svg:x="11.904cm" svg:y="22.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3" draw:text-style-name="P9" draw:layer="layout" svg:width="1.565cm" svg:height="0.725cm" svg:x="12.6cm" svg:y="21.9cm">
          <draw:text-box>
            <text:p><text:span text:style-name="T2">PCp4</text:span></text:p>
          </draw:text-box>
        </draw:frame>
        <draw:line draw:style-name="gr134" draw:text-style-name="P4" draw:layer="layout" svg:x1="1.5cm" svg:y1="16cm" svg:x2="3cm" svg:y2="16cm">
          <text:p/>
        </draw:line>
        <draw:line draw:style-name="gr38" draw:text-style-name="P4" draw:layer="layout" svg:x1="12cm" svg:y1="22.5cm" svg:x2="12cm" svg:y2="24cm">
          <text:p/>
        </draw:line>
        <draw:line draw:style-name="gr38" draw:text-style-name="P4" draw:layer="layout" svg:x1="12cm" svg:y1="24cm" svg:x2="1.5cm" svg:y2="24cm">
          <text:p/>
        </draw:line>
        <draw:line draw:style-name="gr38" draw:text-style-name="P4" draw:layer="layout" svg:x1="1.5cm" svg:y1="24cm" svg:x2="1.5cm" svg:y2="16cm">
          <text:p/>
        </draw:line>
        <draw:line draw:style-name="gr135" draw:text-style-name="P4" draw:layer="layout" svg:x1="3.5cm" svg:y1="9cm" svg:x2="3.5cm" svg:y2="15.7cm">
          <text:p/>
        </draw:line>
        <draw:line draw:style-name="gr38" draw:text-style-name="P4" draw:layer="layout" svg:x1="23.012cm" svg:y1="5.5cm" svg:x2="27cm" svg:y2="5.5cm">
          <text:p/>
        </draw:line>
        <draw:line draw:style-name="gr38" draw:text-style-name="P4" draw:layer="layout" svg:x1="27cm" svg:y1="5.5cm" svg:x2="27cm" svg:y2="1.5cm">
          <text:p/>
        </draw:line>
        <draw:line draw:style-name="gr38" draw:text-style-name="P4" draw:layer="layout" svg:x1="27cm" svg:y1="1.5cm" svg:x2="13cm" svg:y2="1.5cm">
          <text:p/>
        </draw:line>
        <draw:line draw:style-name="gr38" draw:text-style-name="P4" draw:layer="layout" svg:x1="13cm" svg:y1="1.5cm" svg:x2="13cm" svg:y2="9cm">
          <text:p/>
        </draw:line>
        <draw:line draw:style-name="gr38" draw:text-style-name="P4" draw:layer="layout" svg:x1="13cm" svg:y1="9cm" svg:x2="3.5cm" svg:y2="9cm">
          <text:p/>
        </draw:line>
        <draw:frame draw:style-name="gr121" draw:text-style-name="P9" draw:layer="layout" svg:width="1.799cm" svg:height="0.725cm" svg:x="23.201cm" svg:y="4.903cm">
          <draw:text-box>
            <text:p><text:span text:style-name="T2">PCSrc</text:span></text:p>
          </draw:text-box>
        </draw:frame>
        <draw:custom-shape draw:style-name="gr131" draw:text-style-name="P12" draw:layer="layout" svg:width="2cm" svg:height="2cm" svg:x="30cm" svg:y="24cm">
          <text:p text:style-name="P1">+</text:p>
          <draw:enhanced-geometry svg:viewBox="0 0 21600 21600" draw:type="rectangle" draw:enhanced-path="M 0 0 L 21600 0 21600 21600 0 21600 0 0 Z N"/>
        </draw:custom-shape>
        <draw:custom-shape draw:style-name="gr40" draw:text-style-name="P5" draw:layer="layout" svg:width="0.2cm" svg:height="0.2cm" svg:x="26.9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6" draw:text-style-name="P4" draw:layer="layout" svg:x1="27cm" svg:y1="25.5cm" svg:x2="30cm" svg:y2="25.5cm">
          <text:p/>
        </draw:line>
        <draw:line draw:style-name="gr38" draw:text-style-name="P4" draw:layer="layout" svg:x1="7.5cm" svg:y1="21cm" svg:x2="26.8cm" svg:y2="21cm">
          <text:p/>
        </draw:line>
        <draw:custom-shape draw:style-name="gr40" draw:text-style-name="P5" draw:layer="layout" svg:width="0.2cm" svg:height="0.2cm" svg:x="7.4cm" svg:y="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5cm" svg:y1="21cm" svg:x2="25cm" svg:y2="23.9cm">
          <text:p/>
        </draw:line>
        <draw:line draw:style-name="gr136" draw:text-style-name="P4" draw:layer="layout" svg:x1="29.5cm" svg:y1="24.5cm" svg:x2="30cm" svg:y2="24.5cm">
          <text:p/>
        </draw:line>
        <draw:line draw:style-name="gr38" draw:text-style-name="P4" draw:layer="layout" svg:x1="32cm" svg:y1="25cm" svg:x2="33cm" svg:y2="25cm">
          <text:p/>
        </draw:line>
        <draw:line draw:style-name="gr38" draw:text-style-name="P4" draw:layer="layout" svg:x1="33cm" svg:y1="25cm" svg:x2="33cm" svg:y2="28cm">
          <text:p/>
        </draw:line>
        <draw:line draw:style-name="gr38" draw:text-style-name="P4" draw:layer="layout" svg:x1="33cm" svg:y1="28cm" svg:x2="2cm" svg:y2="28cm">
          <text:p/>
        </draw:line>
        <draw:line draw:style-name="gr134" draw:text-style-name="P4" draw:layer="layout" svg:x1="2cm" svg:y1="17cm" svg:x2="3cm" svg:y2="17cm">
          <text:p/>
        </draw:line>
        <draw:line draw:style-name="gr38" draw:text-style-name="P4" draw:layer="layout" svg:x1="2cm" svg:y1="28cm" svg:x2="2cm" svg:y2="17cm">
          <text:p/>
        </draw:line>
        <draw:line draw:style-name="gr38" draw:text-style-name="P4" draw:layer="layout" svg:x1="26.8cm" svg:y1="21cm" svg:x2="26.8cm" svg:y2="16.5cm">
          <text:p/>
        </draw:line>
        <draw:line draw:style-name="gr97" draw:text-style-name="P4" draw:layer="layout" svg:x1="26.8cm" svg:y1="16.5cm" svg:x2="28cm" svg:y2="16.5cm">
          <text:p/>
        </draw:line>
        <draw:custom-shape draw:style-name="gr40" draw:text-style-name="P5" draw:layer="layout" svg:width="0.2cm" svg:height="0.2cm" svg:x="24.9cm" svg:y="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9" draw:layer="layout" svg:width="1.349cm" svg:height="0.725cm" svg:x="26.714cm" svg:y="15.877cm">
          <draw:text-box>
            <text:p><text:span text:style-name="T2">PC</text:span></text:p>
          </draw:text-box>
        </draw:frame>
        <draw:frame draw:style-name="gr137" draw:text-style-name="P3" draw:layer="layout" svg:width="5.761cm" svg:height="0.962cm" svg:x="34.7cm" svg:y="24.238cm">
          <draw:text-box>
            <text:p>dBusDataRd(63:0)</text:p>
          </draw:text-box>
        </draw:frame>
        <draw:frame draw:style-name="gr138" draw:text-style-name="P3" draw:layer="layout" svg:width="5.549cm" svg:height="0.962cm" svg:x="10.065cm" svg:y="19.1cm">
          <draw:text-box>
            <text:p>iBusDataRd(63:0)</text:p>
          </draw:text-box>
        </draw:frame>
        <draw:frame draw:style-name="gr14" draw:text-style-name="P3" draw:layer="layout" svg:width="4.737cm" svg:height="0.962cm" svg:x="5.9cm" svg:y="18.4cm">
          <draw:text-box>
            <text:p>iBusAddr(63:0)</text:p>
          </draw:text-box>
        </draw:frame>
        <draw:line draw:style-name="gr139" draw:text-style-name="P4" draw:layer="layout" svg:x1="34.1cm" svg:y1="10.262cm" svg:x2="34.1cm" svg:y2="17.1cm">
          <text:p/>
        </draw:line>
        <draw:line draw:style-name="gr140" draw:text-style-name="P4" draw:layer="layout" svg:x1="39cm" svg:y1="24cm" svg:x2="38.3cm" svg:y2="17.6cm">
          <text:p/>
        </draw:line>
        <draw:line draw:style-name="gr141" draw:text-style-name="P4" draw:layer="layout" svg:x1="35cm" svg:y1="23cm" svg:x2="34.2cm" svg:y2="18.6cm">
          <text:p/>
        </draw:line>
        <draw:frame draw:style-name="gr62" draw:text-style-name="P9" draw:layer="layout" svg:width="1.895cm" svg:height="0.725cm" svg:x="31.905cm" svg:y="24.375cm">
          <draw:text-box>
            <text:p><text:span text:style-name="T2">PCbr</text:span></text:p>
          </draw:text-box>
        </draw:frame>
        <draw:polygon draw:style-name="gr58" draw:text-style-name="P1" draw:layer="layout" svg:width="0.999cm" svg:height="1.999cm" svg:x="28.5cm" svg:y="23.4cm" svg:viewBox="0 0 1000 2000" draw:points="0,0 0,2000 1000,1700 1000,300">
          <text:p/>
        </draw:polygon>
        <draw:line draw:style-name="gr142" draw:text-style-name="P4" draw:layer="layout" svg:x1="25cm" svg:y1="23.9cm" svg:x2="28.5cm" svg:y2="23.9cm">
          <text:p/>
        </draw:line>
        <draw:line draw:style-name="gr97" draw:text-style-name="P4" draw:layer="layout" svg:x1="26.3cm" svg:y1="24.9cm" svg:x2="28.5cm" svg:y2="24.9cm">
          <text:p/>
        </draw:line>
        <draw:line draw:style-name="gr38" draw:text-style-name="P4" draw:layer="layout" svg:x1="26.3cm" svg:y1="15.5cm" svg:x2="26.3cm" svg:y2="24.9cm">
          <text:p/>
        </draw:line>
        <draw:custom-shape draw:style-name="gr40" draw:text-style-name="P5" draw:layer="layout" svg:width="0.2cm" svg:height="0.2cm" svg:x="26.2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3" draw:text-style-name="P9" draw:layer="layout" svg:width="1.679cm" svg:height="0.725cm" svg:x="26.921cm" svg:y="24.275cm">
          <draw:text-box>
            <text:p><text:span text:style-name="T2">for jalr</text:span></text:p>
          </draw:text-box>
        </draw:frame>
        <draw:line draw:style-name="gr144" draw:text-style-name="P4" draw:layer="layout" svg:x1="29cm" svg:y1="23cm" svg:x2="29cm" svg:y2="23.6cm">
          <text:p/>
        </draw:line>
        <draw:line draw:style-name="gr38" draw:text-style-name="P4" draw:layer="layout" svg:x1="29.3cm" svg:y1="9.5cm" svg:x2="29.3cm" svg:y2="23cm">
          <text:p/>
        </draw:line>
        <draw:line draw:style-name="gr38" draw:text-style-name="P4" draw:layer="layout" svg:x1="29.3cm" svg:y1="23cm" svg:x2="29cm" svg:y2="23cm">
          <text:p/>
        </draw:line>
        <draw:line draw:style-name="gr38" draw:text-style-name="P4" draw:layer="layout" svg:x1="23cm" svg:y1="9.5cm" svg:x2="29.3cm" svg:y2="9.5cm">
          <text:p/>
        </draw:line>
        <draw:frame draw:style-name="gr145" draw:text-style-name="P9" draw:layer="layout" svg:width="4.007cm" svg:height="0.725cm" svg:x="8.901cm" svg:y="11.005cm">
          <draw:text-box>
            <text:p><text:span text:style-name="T2">XILINX </text:span><text:span text:style-name="T2">RAM/ROM</text:span></text:p>
          </draw:text-box>
        </draw:frame>
        <draw:line draw:style-name="gr146" draw:text-style-name="P4" draw:layer="layout" svg:x1="11.1cm" svg:y1="5.6cm" svg:x2="17.2cm" svg:y2="7.4cm">
          <text:p/>
        </draw:line>
        <draw:frame draw:style-name="gr147" draw:text-style-name="P3" draw:layer="layout" svg:width="1.631cm" svg:height="0.962cm" svg:x="10.3cm" svg:y="4.838cm">
          <draw:text-box>
            <text:p>IRQ</text:p>
          </draw:text-box>
        </draw:frame>
        <draw:custom-shape draw:style-name="gr148" draw:text-style-name="P13" draw:layer="layout" svg:width="2cm" svg:height="1cm" svg:x="3cm" svg:y="25.5cm">
          <text:p text:style-name="P7"><text:span text:style-name="T2">mcause</text:span></text:p>
          <draw:enhanced-geometry svg:viewBox="0 0 21600 21600" draw:type="rectangle" draw:enhanced-path="M 0 0 L 21600 0 21600 21600 0 21600 0 0 Z N"/>
        </draw:custom-shape>
        <draw:custom-shape draw:style-name="gr148" draw:text-style-name="P13" draw:layer="layout" svg:width="2cm" svg:height="1cm" svg:x="3cm" svg:y="24.5cm">
          <text:p text:style-name="P7"><text:span text:style-name="T2">mepc</text:span></text:p>
          <draw:enhanced-geometry svg:viewBox="0 0 21600 21600" draw:type="rectangle" draw:enhanced-path="M 0 0 L 21600 0 21600 21600 0 21600 0 0 Z N"/>
        </draw:custom-shape>
        <draw:custom-shape draw:style-name="gr148" draw:text-style-name="P13" draw:layer="layout" svg:width="2cm" svg:height="1cm" svg:x="3cm" svg:y="26.5cm">
          <text:p text:style-name="P7"><text:span text:style-name="T2">mtv</text:span><text:span text:style-name="T2">ec</text:span></text:p>
          <draw:enhanced-geometry svg:viewBox="0 0 21600 21600" draw:type="rectangle" draw:enhanced-path="M 0 0 L 21600 0 21600 21600 0 21600 0 0 Z N"/>
        </draw:custom-shape>
        <draw:custom-shape draw:style-name="gr148" draw:text-style-name="P13" draw:layer="layout" svg:width="2cm" svg:height="1cm" svg:x="6cm" svg:y="25.5cm">
          <text:p text:style-name="P7"><text:span text:style-name="T2">mie</text:span></text:p>
          <draw:enhanced-geometry svg:viewBox="0 0 21600 21600" draw:type="rectangle" draw:enhanced-path="M 0 0 L 21600 0 21600 21600 0 21600 0 0 Z N"/>
        </draw:custom-shape>
        <draw:custom-shape draw:style-name="gr148" draw:text-style-name="P13" draw:layer="layout" svg:width="2cm" svg:height="1cm" svg:x="6cm" svg:y="24.5cm">
          <text:p text:style-name="P7"><text:span text:style-name="T2">mst</text:span><text:span text:style-name="T2">atus</text:span></text:p>
          <draw:enhanced-geometry svg:viewBox="0 0 21600 21600" draw:type="rectangle" draw:enhanced-path="M 0 0 L 21600 0 21600 21600 0 21600 0 0 Z N"/>
        </draw:custom-shape>
        <draw:custom-shape draw:style-name="gr148" draw:text-style-name="P13" draw:layer="layout" svg:width="2cm" svg:height="1cm" svg:x="6cm" svg:y="26.5cm">
          <text:p text:style-name="P7"><text:span text:style-name="T2">mip</text:span></text:p>
          <draw:enhanced-geometry svg:viewBox="0 0 21600 21600" draw:type="rectangle" draw:enhanced-path="M 0 0 L 21600 0 21600 21600 0 21600 0 0 Z N"/>
        </draw:custom-shape>
        <draw:frame draw:style-name="gr149" draw:text-style-name="P9" draw:layer="layout" svg:width="12.567cm" svg:height="9.257cm" svg:x="8.25cm" svg:y="24.691cm">
          <draw:text-box>
            <text:p><text:span text:style-name="T2">irq_taken = </text:span><text:span text:style-name="T2">mstatus.MI</text:span><text:span text:style-name="T2">E &amp;&amp; (| (mie </text:span><text:span text:style-name="T2">&amp; mip))</text:span></text:p>
            <text:p><text:span text:style-name="T2"/></text:p>
            <text:p><text:span text:style-name="T2">If irq_taken</text:span></text:p>
            <text:p><text:span text:style-name="T2"><text:s text:c="2"/></text:span><text:span text:style-name="T2">mepc = </text:span><text:span text:style-name="T2">Pcnext</text:span></text:p>
            <text:p><text:span text:style-name="T2"><text:s text:c="2"/></text:span><text:span text:style-name="T2">Mcause = </text:span><text:span text:style-name="T2">{1, irq_id </text:span><text:span text:style-name="T2">(11)}</text:span></text:p>
            <text:p><text:span text:style-name="T2"><text:s text:c="2"/></text:span><text:span text:style-name="T2">mstatus.MP</text:span><text:span text:style-name="T2">IE = </text:span><text:span text:style-name="T2">mstatus.MI</text:span><text:span text:style-name="T2">E</text:span></text:p>
            <text:p><text:span text:style-name="T2"><text:s text:c="2"/></text:span><text:span text:style-name="T2">mstatus.MI</text:span><text:span text:style-name="T2">E = 0</text:span></text:p>
            <text:p text:style-name="P6"><text:span text:style-name="T3"><text:s text:c="2"/></text:span><text:span text:style-name="T2">PC = </text:span><text:span text:style-name="T2">mtvec</text:span></text:p>
            <text:p><text:span text:style-name="T2"/></text:p>
            <text:p><text:span text:style-name="T2">If mret </text:span></text:p>
            <text:p><text:span text:style-name="T2"><text:s text:c="2"/></text:span><text:span text:style-name="T2">PC = </text:span><text:span text:style-name="T2">mepc</text:span></text:p>
            <text:p><text:span text:style-name="T2"><text:s text:c="2"/></text:span><text:span text:style-name="T2">mstatus.MI</text:span><text:span text:style-name="T2">E = </text:span><text:span text:style-name="T2">mstatus.MP</text:span><text:span text:style-name="T2">IE</text:span></text:p>
            <text:p><text:span text:style-name="T2"/></text:p>
            <text:p><text:span text:style-name="T2">Example:</text:span></text:p>
            <text:p><text:span text:style-name="T2">mip[7] = </text:span><text:span text:style-name="T2">gpio[0]</text:span></text:p>
            <text:p><text:span text:style-name="T2">mie[7] must </text:span><text:span text:style-name="T2">be 1</text:span></text:p>
            <text:p><text:span text:style-name="T2"/></text:p>
            <text:p><text:span text:style-name="T2">CLIC = 0 =&gt; </text:span><text:span text:style-name="T2">CLINT </text:span><text:span text:style-name="T2">mode, in </text:span><text:span text:style-name="T2">CLINT </text:span><text:span text:style-name="T2">mode, non-</text:span><text:span text:style-name="T2">vectored </text:span><text:span text:style-name="T2">chosen</text:span></text:p>
            <text:p><text:span text:style-name="T2"/></text:p>
          </draw:text-box>
        </draw:frame>
        <draw:polygon draw:style-name="gr58" draw:text-style-name="P1" draw:layer="layout" svg:width="0.499cm" svg:height="0.999cm" svg:x="4.5cm" svg:y="15.8cm" svg:viewBox="0 0 500 1000" draw:points="0,0 0,1000 500,850 500,150">
          <text:p/>
        </draw:polygon>
        <draw:frame draw:style-name="gr150" draw:text-style-name="P9" draw:layer="layout" svg:width="2.923cm" svg:height="0.725cm" draw:transform="rotate (1.5707963267949) translate (3.8cm 19.3cm)">
          <draw:text-box>
            <text:p><text:span text:style-name="T2">PCnext_mu</text:span><text:span text:style-name="T2">x</text:span></text:p>
          </draw:text-box>
        </draw:frame>
        <draw:frame draw:style-name="gr150" draw:text-style-name="P9" draw:layer="layout" svg:width="2.923cm" svg:height="0.725cm" draw:transform="rotate (1.5707963267949) translate (3.8cm 14.123cm)">
          <draw:text-box>
            <text:p><text:span text:style-name="T2">PCnext_irq</text:span></text:p>
          </draw:text-box>
        </draw:frame>
        <draw:line draw:style-name="gr38" draw:text-style-name="P4" draw:layer="layout" svg:x1="4.5cm" svg:y1="16cm" svg:x2="4.2cm" svg:y2="16cm">
          <text:p/>
        </draw:line>
        <draw:line draw:style-name="gr38" draw:text-style-name="P4" draw:layer="layout" svg:x1="4.2cm" svg:y1="16cm" svg:x2="4.2cm" svg:y2="14cm">
          <text:p/>
        </draw:line>
        <draw:line draw:style-name="gr146" draw:text-style-name="P4" draw:layer="layout" svg:x1="4.7cm" svg:y1="19cm" svg:x2="4.7cm" svg:y2="16.7cm">
          <text:p/>
        </draw:line>
        <draw:frame draw:style-name="gr151" draw:text-style-name="P9" draw:layer="layout" svg:width="2.242cm" svg:height="0.725cm" draw:transform="rotate (1.5707963267949) translate (4.3cm 21.1cm)">
          <draw:text-box>
            <text:p><text:span text:style-name="T2">irq_taken</text:span></text:p>
          </draw:text-box>
        </draw:frame>
        <draw:custom-shape draw:style-name="gr148" draw:text-style-name="P13" draw:layer="layout" svg:width="2cm" svg:height="1cm" draw:transform="rotate (1.5707963267949) translate (3.8cm 11.7cm)">
          <text:p text:style-name="P7"><text:span text:style-name="T2">mtvec</text:span></text:p>
          <draw:enhanced-geometry svg:viewBox="0 0 21600 21600" draw:type="rectangle" draw:enhanced-path="M 0 0 L 21600 0 21600 21600 0 21600 0 0 Z N"/>
        </draw:custom-shape>
        <draw:polygon draw:style-name="gr58" draw:text-style-name="P1" draw:layer="layout" svg:width="0.499cm" svg:height="0.999cm" svg:x="5.1cm" svg:y="16.3cm" svg:viewBox="0 0 500 1000" draw:points="0,0 0,1000 500,850 500,150">
          <text:p/>
        </draw:polygon>
        <draw:line draw:style-name="gr146" draw:text-style-name="P4" draw:layer="layout" svg:x1="5.3cm" svg:y1="19cm" svg:x2="5.3cm" svg:y2="17.2cm">
          <text:p/>
        </draw:line>
        <draw:frame draw:style-name="gr62" draw:text-style-name="P9" draw:layer="layout" svg:width="1.895cm" svg:height="0.725cm" draw:transform="rotate (1.5707963267949) translate (4.975cm 20.242cm)">
          <draw:text-box>
            <text:p><text:span text:style-name="T2">mret</text:span></text:p>
          </draw:text-box>
        </draw:frame>
        <draw:line draw:style-name="gr38" draw:text-style-name="P4" draw:layer="layout" svg:x1="5.1cm" svg:y1="17cm" svg:x2="5cm" svg:y2="17cm">
          <text:p/>
        </draw:line>
        <draw:line draw:style-name="gr38" draw:text-style-name="P4" draw:layer="layout" svg:x1="5cm" svg:y1="17cm" svg:x2="5cm" svg:y2="21.3cm">
          <text:p/>
        </draw:line>
        <draw:custom-shape draw:style-name="gr148" draw:text-style-name="P13" draw:layer="layout" svg:width="2cm" svg:height="1cm" svg:x="4cm" svg:y="21.3cm">
          <text:p text:style-name="P7"><text:span text:style-name="T2">mep</text:span><text:span text:style-name="T2">c</text:span></text:p>
          <draw:enhanced-geometry svg:viewBox="0 0 21600 21600" draw:type="rectangle" draw:enhanced-path="M 0 0 L 21600 0 21600 21600 0 21600 0 0 Z N"/>
        </draw:custom-shape>
        <draw:frame draw:style-name="gr152" draw:text-style-name="P9" draw:layer="layout" svg:width="3.161cm" svg:height="0.725cm" draw:transform="rotate (1.5707963267949) translate (4.8cm 16.4cm)">
          <draw:text-box>
            <text:p><text:span text:style-name="T2">PCnext_2m</text:span><text:span text:style-name="T2">ux</text:span></text:p>
          </draw:text-box>
        </draw:frame>
      </draw:page>
      <draw:page draw:name="page3" draw:style-name="dp1" draw:master-page-name="Default">
        <draw:frame draw:style-name="gr153" draw:text-style-name="P3" draw:layer="layout" svg:width="3.11cm" svg:height="0.962cm" svg:x="0.99cm" svg:y="1cm">
          <draw:text-box>
            <text:p>IRQ Path</text:p>
          </draw:text-box>
        </draw:frame>
        <draw:g draw:style-name="gr1">
          <draw:custom-shape draw:style-name="gr154" draw:text-style-name="P14" draw:layer="layout" svg:width="1cm" svg:height="2cm" svg:x="17cm" svg:y="1cm">
            <text:p/>
            <draw:enhanced-geometry svg:viewBox="0 0 21600 21600" draw:type="rectangle" draw:enhanced-path="M 0 0 L 21600 0 21600 21600 0 21600 0 0 Z N"/>
          </draw:custom-shape>
          <draw:polygon draw:style-name="gr155" draw:text-style-name="P14" draw:layer="layout" svg:width="0.199cm" svg:height="0.199cm" svg:x="17cm" svg:y="2.7cm" svg:viewBox="0 0 200 200" draw:points="0,200 200,100 0,0">
            <text:p/>
          </draw:polygon>
        </draw:g>
        <draw:frame draw:style-name="gr156" draw:text-style-name="P9" draw:layer="layout" svg:width="2.572cm" svg:height="0.725cm" svg:x="13.028cm" svg:y="1.3cm">
          <draw:text-box>
            <text:p><text:span text:style-name="T2">irq_ext_i[7]</text:span></text:p>
          </draw:text-box>
        </draw:frame>
        <draw:frame draw:style-name="gr157" draw:text-style-name="P9" draw:layer="layout" svg:width="3.558cm" svg:height="0.725cm" svg:x="18cm" svg:y="0.775cm">
          <draw:text-box>
            <text:p><text:span text:style-name="T2">irq_ext_syn</text:span><text:span text:style-name="T2">c1_s</text:span></text:p>
          </draw:text-box>
        </draw:frame>
        <draw:line draw:style-name="gr38" draw:text-style-name="P4" draw:layer="layout" svg:x1="16cm" svg:y1="1.5cm" svg:x2="17cm" svg:y2="1.5cm">
          <text:p/>
        </draw:line>
        <draw:line draw:style-name="gr38" draw:text-style-name="P4" draw:layer="layout" svg:x1="18cm" svg:y1="1.5cm" svg:x2="22cm" svg:y2="1.5cm">
          <text:p/>
        </draw:line>
        <draw:frame draw:style-name="gr152" draw:text-style-name="P9" draw:layer="layout" svg:width="3.161cm" svg:height="0.725cm" svg:x="10.998cm" svg:y="22.775cm">
          <draw:text-box>
            <text:p><text:span text:style-name="T2">irq_pending</text:span><text:span text:style-name="T2">_s</text:span></text:p>
          </draw:text-box>
        </draw:frame>
        <draw:g draw:style-name="gr66">
          <draw:glue-point draw:id="4" svg:x="5cm" svg:y="0cm"/>
          <draw:glue-point draw:id="5" svg:x="-5cm" svg:y="-2.5cm"/>
          <draw:glue-point draw:id="6" svg:x="-5.005cm" svg:y="2.5cm"/>
          <draw:rect draw:style-name="gr158" draw:text-style-name="P16" draw:layer="layout" svg:width="1cm" svg:height="1cm" svg:x="7.998cm" svg:y="22cm">
            <text:p text:style-name="P15"><text:span text:style-name="T4">&amp;</text:span></text:p>
          </draw:rect>
          <draw:line draw:style-name="gr159" draw:text-style-name="P17" draw:layer="layout" svg:x1="7.498cm" svg:y1="22.25cm" svg:x2="7.998cm" svg:y2="22.25cm">
            <text:p/>
          </draw:line>
          <draw:line draw:style-name="gr160" draw:text-style-name="P17" draw:layer="layout" svg:x1="7.498cm" svg:y1="22.75cm" svg:x2="7.998cm" svg:y2="22.75cm">
            <text:p/>
          </draw:line>
          <draw:line draw:style-name="gr161" draw:text-style-name="P17" draw:layer="layout" svg:x1="8.998cm" svg:y1="22.5cm" svg:x2="9.498cm" svg:y2="22.5cm">
            <text:p/>
          </draw:line>
        </draw:g>
        <draw:g draw:style-name="gr1">
          <draw:custom-shape draw:style-name="gr154" draw:text-style-name="P14" draw:layer="layout" svg:width="1cm" svg:height="2cm" svg:x="27cm" svg:y="1cm">
            <text:p/>
            <draw:enhanced-geometry svg:viewBox="0 0 21600 21600" draw:type="rectangle" draw:enhanced-path="M 0 0 L 21600 0 21600 21600 0 21600 0 0 Z N"/>
          </draw:custom-shape>
          <draw:polygon draw:style-name="gr155" draw:text-style-name="P14" draw:layer="layout" svg:width="0.199cm" svg:height="0.199cm" svg:x="27cm" svg:y="2.7cm" svg:viewBox="0 0 200 200" draw:points="0,200 200,100 0,0">
            <text:p/>
          </draw:polygon>
        </draw:g>
        <draw:frame draw:style-name="gr162" draw:text-style-name="P9" draw:layer="layout" svg:width="3.106cm" svg:height="0.725cm" svg:x="28cm" svg:y="0.8cm">
          <draw:text-box>
            <text:p><text:span text:style-name="T2">csr_mip_s[1</text:span><text:span text:style-name="T2">1]</text:span></text:p>
          </draw:text-box>
        </draw:frame>
        <draw:line draw:style-name="gr38" draw:text-style-name="P4" draw:layer="layout" svg:x1="28cm" svg:y1="1.5cm" svg:x2="31.5cm" svg:y2="1.5cm">
          <text:p/>
        </draw:line>
        <draw:g draw:style-name="gr1">
          <draw:custom-shape draw:style-name="gr163" draw:text-style-name="P18" draw:layer="layout" svg:width="0.4cm" svg:height="0.4cm" svg:x="15.8cm" svg:y="1.3cm">
            <text:p/>
            <draw:enhanced-geometry svg:viewBox="0 0 21600 21600" draw:type="rectangle" draw:enhanced-path="M 0 0 L 21600 0 21600 21600 0 21600 0 0 Z N"/>
          </draw:custom-shape>
          <draw:line draw:style-name="gr164" draw:text-style-name="P19" draw:layer="layout" svg:x1="15.8cm" svg:y1="1.3cm" svg:x2="16.2cm" svg:y2="1.7cm">
            <text:p/>
          </draw:line>
          <draw:line draw:style-name="gr164" draw:text-style-name="P19" draw:layer="layout" svg:x1="15.8cm" svg:y1="1.7cm" svg:x2="16.2cm" svg:y2="1.3cm">
            <text:p/>
          </draw:line>
        </draw:g>
        <draw:g draw:style-name="gr1">
          <draw:custom-shape draw:style-name="gr154" draw:text-style-name="P14" draw:layer="layout" svg:width="1cm" svg:height="2cm" svg:x="22cm" svg:y="1cm">
            <text:p/>
            <draw:enhanced-geometry svg:viewBox="0 0 21600 21600" draw:type="rectangle" draw:enhanced-path="M 0 0 L 21600 0 21600 21600 0 21600 0 0 Z N"/>
          </draw:custom-shape>
          <draw:polygon draw:style-name="gr155" draw:text-style-name="P14" draw:layer="layout" svg:width="0.199cm" svg:height="0.199cm" svg:x="22cm" svg:y="2.7cm" svg:viewBox="0 0 200 200" draw:points="0,200 200,100 0,0">
            <text:p/>
          </draw:polygon>
        </draw:g>
        <draw:line draw:style-name="gr38" draw:text-style-name="P4" draw:layer="layout" svg:x1="23cm" svg:y1="1.5cm" svg:x2="27cm" svg:y2="1.5cm">
          <text:p/>
        </draw:line>
        <draw:frame draw:style-name="gr157" draw:text-style-name="P9" draw:layer="layout" svg:width="3.558cm" svg:height="0.725cm" svg:x="23cm" svg:y="0.775cm">
          <draw:text-box>
            <text:p><text:span text:style-name="T2">irq_ext_syn</text:span><text:span text:style-name="T2">c2_s</text:span></text:p>
          </draw:text-box>
        </draw:frame>
        <draw:g draw:style-name="gr1">
          <draw:custom-shape draw:style-name="gr165" draw:text-style-name="P14" draw:layer="layout" svg:width="0.4cm" svg:height="0.4cm" svg:x="4.8cm" svg:y="2.8cm">
            <text:p/>
            <draw:enhanced-geometry svg:viewBox="0 0 21600 21600" draw:type="rectangle" draw:enhanced-path="M 0 0 L 21600 0 21600 21600 0 21600 0 0 Z N"/>
          </draw:custom-shape>
          <draw:line draw:style-name="gr38" draw:text-style-name="P4" draw:layer="layout" svg:x1="4.8cm" svg:y1="2.8cm" svg:x2="5.2cm" svg:y2="3.2cm">
            <text:p/>
          </draw:line>
          <draw:line draw:style-name="gr38" draw:text-style-name="P4" draw:layer="layout" svg:x1="4.8cm" svg:y1="3.2cm" svg:x2="5.2cm" svg:y2="2.8cm">
            <text:p/>
          </draw:line>
        </draw:g>
        <draw:frame draw:style-name="gr166" draw:text-style-name="P9" draw:layer="layout" svg:width="4.265cm" svg:height="0.725cm" svg:x="0.977cm" svg:y="2.776cm">
          <draw:text-box>
            <text:p><text:span text:style-name="T2">iBusDataRd</text:span><text:span text:style-name="T2">_s[31:0]</text:span></text:p>
          </draw:text-box>
        </draw:frame>
        <draw:frame draw:style-name="gr151" draw:text-style-name="P9" draw:layer="layout" svg:width="2.242cm" svg:height="0.725cm" svg:x="0.978cm" svg:y="17.277cm">
          <draw:text-box>
            <text:p><text:span text:style-name="T2">ir_s[31:0]</text:span></text:p>
          </draw:text-box>
        </draw:frame>
        <draw:g draw:style-name="gr1">
          <draw:custom-shape draw:style-name="gr165" draw:text-style-name="P14" draw:layer="layout" svg:width="0.4cm" svg:height="0.4cm" svg:x="4.8cm" svg:y="17.3cm">
            <text:p/>
            <draw:enhanced-geometry svg:viewBox="0 0 21600 21600" draw:type="rectangle" draw:enhanced-path="M 0 0 L 21600 0 21600 21600 0 21600 0 0 Z N"/>
          </draw:custom-shape>
          <draw:line draw:style-name="gr38" draw:text-style-name="P4" draw:layer="layout" svg:x1="4.8cm" svg:y1="17.3cm" svg:x2="5.2cm" svg:y2="17.7cm">
            <text:p/>
          </draw:line>
          <draw:line draw:style-name="gr38" draw:text-style-name="P4" draw:layer="layout" svg:x1="4.8cm" svg:y1="17.7cm" svg:x2="5.2cm" svg:y2="17.3cm">
            <text:p/>
          </draw:line>
        </draw:g>
        <draw:g draw:style-name="gr66">
          <draw:glue-point draw:id="4" svg:x="5cm" svg:y="0cm"/>
          <draw:glue-point draw:id="5" svg:x="-5cm" svg:y="-2.5cm"/>
          <draw:glue-point draw:id="6" svg:x="-5.005cm" svg:y="2.5cm"/>
          <draw:rect draw:style-name="gr167" draw:text-style-name="P16" draw:layer="layout" svg:width="1cm" svg:height="1cm" svg:x="9.998cm" svg:y="23cm">
            <text:p text:style-name="P15"><text:span text:style-name="T4">&amp;</text:span></text:p>
          </draw:rect>
          <draw:line draw:style-name="gr168" draw:text-style-name="P17" draw:layer="layout" svg:x1="9.498cm" svg:y1="23.25cm" svg:x2="9.998cm" svg:y2="23.25cm">
            <text:p/>
          </draw:line>
          <draw:line draw:style-name="gr169" draw:text-style-name="P17" draw:layer="layout" svg:x1="9.498cm" svg:y1="23.75cm" svg:x2="9.998cm" svg:y2="23.75cm">
            <text:p/>
          </draw:line>
          <draw:line draw:style-name="gr170" draw:text-style-name="P17" draw:layer="layout" svg:x1="10.998cm" svg:y1="23.5cm" svg:x2="11.498cm" svg:y2="23.5cm">
            <text:p/>
          </draw:line>
        </draw:g>
        <draw:line draw:style-name="gr38" draw:text-style-name="P4" draw:layer="layout" svg:x1="6cm" svg:y1="3cm" svg:x2="9cm" svg:y2="3cm">
          <text:p/>
        </draw:line>
        <draw:line draw:style-name="gr38" draw:text-style-name="P4" draw:layer="layout" svg:x1="6cm" svg:y1="17cm" svg:x2="10cm" svg:y2="17cm">
          <text:p/>
        </draw:line>
        <draw:frame draw:style-name="gr171" draw:text-style-name="P9" draw:layer="layout" svg:width="3.961cm" svg:height="0.725cm" svg:x="6cm" svg:y="2.275cm">
          <draw:text-box>
            <text:p><text:span text:style-name="T2">is_mret_fet</text:span><text:span text:style-name="T2">ched_s</text:span></text:p>
          </draw:text-box>
        </draw:frame>
        <draw:frame draw:style-name="gr172" draw:text-style-name="P9" draw:layer="layout" svg:width="2.335cm" svg:height="0.725cm" svg:x="6.001cm" svg:y="16.276cm">
          <draw:text-box>
            <text:p><text:span text:style-name="T2">is_mret_s</text:span></text:p>
          </draw:text-box>
        </draw:frame>
        <draw:line draw:style-name="gr38" draw:text-style-name="P4" draw:layer="layout" svg:x1="9.498cm" svg:y1="22.5cm" svg:x2="9.498cm" svg:y2="23.25cm">
          <text:p/>
        </draw:line>
        <draw:frame draw:style-name="gr162" draw:text-style-name="P9" draw:layer="layout" svg:width="3.106cm" svg:height="0.725cm" svg:x="4.398cm" svg:y="22.3cm">
          <draw:text-box>
            <text:p><text:span text:style-name="T2">csr_mie_s[1</text:span><text:span text:style-name="T2">1]</text:span></text:p>
          </draw:text-box>
        </draw:frame>
        <draw:frame draw:style-name="gr162" draw:text-style-name="P9" draw:layer="layout" svg:width="3.106cm" svg:height="0.725cm" svg:x="4.398cm" svg:y="21.275cm">
          <draw:text-box>
            <text:p><text:span text:style-name="T2">csr_mip_s[1</text:span><text:span text:style-name="T2">1]</text:span></text:p>
          </draw:text-box>
        </draw:frame>
        <draw:frame draw:style-name="gr173" draw:text-style-name="P9" draw:layer="layout" svg:width="3.698cm" svg:height="0.725cm" svg:x="3.9cm" svg:y="23.275cm">
          <draw:text-box>
            <text:p><text:span text:style-name="T2">csr_mstatus</text:span><text:span text:style-name="T2">_s[3]</text:span></text:p>
          </draw:text-box>
        </draw:frame>
        <draw:line draw:style-name="gr38" draw:text-style-name="P4" draw:layer="layout" svg:x1="4.998cm" svg:y1="22cm" svg:x2="7.498cm" svg:y2="22cm">
          <text:p/>
        </draw:line>
        <draw:line draw:style-name="gr38" draw:text-style-name="P4" draw:layer="layout" svg:x1="7.498cm" svg:y1="22.25cm" svg:x2="7.498cm" svg:y2="22cm">
          <text:p/>
        </draw:line>
        <draw:line draw:style-name="gr38" draw:text-style-name="P4" draw:layer="layout" svg:x1="7.498cm" svg:y1="22.75cm" svg:x2="7.498cm" svg:y2="23cm">
          <text:p/>
        </draw:line>
        <draw:line draw:style-name="gr38" draw:text-style-name="P4" draw:layer="layout" svg:x1="7.498cm" svg:y1="23cm" svg:x2="4.998cm" svg:y2="23cm">
          <text:p/>
        </draw:line>
        <draw:line draw:style-name="gr38" draw:text-style-name="P4" draw:layer="layout" svg:x1="9.498cm" svg:y1="23.75cm" svg:x2="9.498cm" svg:y2="24cm">
          <text:p/>
        </draw:line>
        <draw:line draw:style-name="gr38" draw:text-style-name="P4" draw:layer="layout" svg:x1="9.498cm" svg:y1="24cm" svg:x2="4.998cm" svg:y2="24cm">
          <text:p/>
        </draw:line>
        <draw:line draw:style-name="gr38" draw:text-style-name="P4" draw:layer="layout" svg:x1="6cm" svg:y1="18.001cm" svg:x2="7cm" svg:y2="18.001cm">
          <text:p/>
        </draw:line>
        <draw:frame draw:style-name="gr172" draw:text-style-name="P9" draw:layer="layout" svg:width="2.335cm" svg:height="0.725cm" svg:x="6.001cm" svg:y="17.277cm">
          <draw:text-box>
            <text:p><text:span text:style-name="T2">opcode_s</text:span></text:p>
          </draw:text-box>
        </draw:frame>
        <draw:line draw:style-name="gr146" draw:text-style-name="P4" draw:layer="layout" svg:x1="5cm" svg:y1="17.5cm" svg:x2="6cm" svg:y2="17cm">
          <text:p/>
        </draw:line>
        <draw:line draw:style-name="gr146" draw:text-style-name="P4" draw:layer="layout" svg:x1="5cm" svg:y1="17.5cm" svg:x2="6cm" svg:y2="18.001cm">
          <text:p/>
        </draw:line>
        <draw:line draw:style-name="gr146" draw:text-style-name="P4" draw:layer="layout" svg:x1="4.9cm" svg:y1="3cm" svg:x2="6cm" svg:y2="3cm">
          <text:p/>
        </draw:line>
        <draw:line draw:style-name="gr38" draw:text-style-name="P4" draw:layer="layout" svg:x1="6cm" svg:y1="19.002cm" svg:x2="11cm" svg:y2="19cm">
          <text:p/>
        </draw:line>
        <draw:frame draw:style-name="gr174" draw:text-style-name="P9" draw:layer="layout" svg:width="2.995cm" svg:height="0.725cm" svg:x="6.001cm" svg:y="18.278cm">
          <draw:text-box>
            <text:p><text:span text:style-name="T2">trap_illegal_</text:span><text:span text:style-name="T2">s</text:span></text:p>
          </draw:text-box>
        </draw:frame>
        <draw:line draw:style-name="gr146" draw:text-style-name="P4" draw:layer="layout" svg:x1="7cm" svg:y1="18.001cm" svg:x2="6.001cm" svg:y2="19.003cm">
          <text:p/>
        </draw:line>
        <draw:line draw:style-name="gr38" draw:text-style-name="P4" draw:layer="layout" svg:x1="6cm" svg:y1="20.003cm" svg:x2="12cm" svg:y2="20cm">
          <text:p/>
        </draw:line>
        <draw:frame draw:style-name="gr175" draw:text-style-name="P9" draw:layer="layout" svg:width="3.935cm" svg:height="0.725cm" svg:x="6.001cm" svg:y="19.279cm">
          <draw:text-box>
            <text:p><text:span text:style-name="T2">trap_misalig</text:span><text:span text:style-name="T2">ned_s</text:span></text:p>
          </draw:text-box>
        </draw:frame>
        <draw:line draw:style-name="gr146" draw:text-style-name="P4" draw:layer="layout" svg:x1="5cm" svg:y1="17.5cm" svg:x2="6.001cm" svg:y2="20.003cm">
          <text:p/>
        </draw:line>
        <draw:line draw:style-name="gr146" draw:text-style-name="P4" draw:layer="layout" svg:x1="7cm" svg:y1="18.001cm" svg:x2="6.001cm" svg:y2="20.003cm">
          <text:p/>
        </draw:line>
        <draw:g draw:style-name="gr1">
          <draw:custom-shape draw:style-name="gr165" draw:text-style-name="P14" draw:layer="layout" svg:width="0.4cm" svg:height="0.4cm" svg:x="4.8cm" svg:y="4.8cm">
            <text:p/>
            <draw:enhanced-geometry svg:viewBox="0 0 21600 21600" draw:type="rectangle" draw:enhanced-path="M 0 0 L 21600 0 21600 21600 0 21600 0 0 Z N"/>
          </draw:custom-shape>
          <draw:line draw:style-name="gr38" draw:text-style-name="P4" draw:layer="layout" svg:x1="4.8cm" svg:y1="4.8cm" svg:x2="5.2cm" svg:y2="5.2cm">
            <text:p/>
          </draw:line>
          <draw:line draw:style-name="gr38" draw:text-style-name="P4" draw:layer="layout" svg:x1="4.8cm" svg:y1="5.2cm" svg:x2="5.2cm" svg:y2="4.8cm">
            <text:p/>
          </draw:line>
        </draw:g>
        <draw:frame draw:style-name="gr176" draw:text-style-name="P9" draw:layer="layout" svg:width="2.288cm" svg:height="0.725cm" svg:x="0.978cm" svg:y="4.778cm">
          <draw:text-box>
            <text:p><text:span text:style-name="T2">ir_valid_s</text:span></text:p>
          </draw:text-box>
        </draw:frame>
        <draw:g draw:style-name="gr66">
          <draw:glue-point draw:id="4" svg:x="5cm" svg:y="0cm"/>
          <draw:glue-point draw:id="5" svg:x="-5cm" svg:y="-2.5cm"/>
          <draw:glue-point draw:id="6" svg:x="-5.005cm" svg:y="2.5cm"/>
          <draw:rect draw:style-name="gr177" draw:text-style-name="P16" draw:layer="layout" svg:width="1cm" svg:height="1cm" svg:x="12cm" svg:y="4cm">
            <text:p text:style-name="P15"><text:span text:style-name="T4">&amp;</text:span></text:p>
          </draw:rect>
          <draw:line draw:style-name="gr178" draw:text-style-name="P17" draw:layer="layout" svg:x1="11.5cm" svg:y1="4.25cm" svg:x2="12cm" svg:y2="4.25cm">
            <text:p/>
          </draw:line>
          <draw:line draw:style-name="gr179" draw:text-style-name="P17" draw:layer="layout" svg:x1="11.5cm" svg:y1="4.75cm" svg:x2="12cm" svg:y2="4.75cm">
            <text:p/>
          </draw:line>
          <draw:line draw:style-name="gr180" draw:text-style-name="P17" draw:layer="layout" svg:x1="13cm" svg:y1="4.5cm" svg:x2="13.5cm" svg:y2="4.5cm">
            <text:p/>
          </draw:line>
        </draw:g>
        <draw:g draw:style-name="gr66">
          <draw:glue-point draw:id="4" svg:x="5cm" svg:y="0cm"/>
          <draw:glue-point draw:id="5" svg:x="-5cm" svg:y="-2.5cm"/>
          <draw:glue-point draw:id="6" svg:x="-5.005cm" svg:y="2.5cm"/>
          <draw:rect draw:style-name="gr181" draw:text-style-name="P16" draw:layer="layout" svg:width="1cm" svg:height="1cm" svg:x="14cm" svg:y="5cm">
            <text:p text:style-name="P15"><text:span text:style-name="T4">&amp;</text:span></text:p>
          </draw:rect>
          <draw:line draw:style-name="gr182" draw:text-style-name="P17" draw:layer="layout" svg:x1="13.5cm" svg:y1="5.25cm" svg:x2="14cm" svg:y2="5.25cm">
            <text:p/>
          </draw:line>
          <draw:line draw:style-name="gr183" draw:text-style-name="P17" draw:layer="layout" svg:x1="13.5cm" svg:y1="5.75cm" svg:x2="14cm" svg:y2="5.75cm">
            <text:p/>
          </draw:line>
          <draw:line draw:style-name="gr184" draw:text-style-name="P17" draw:layer="layout" svg:x1="15cm" svg:y1="5.5cm" svg:x2="15.5cm" svg:y2="5.5cm">
            <text:p/>
          </draw:line>
        </draw:g>
        <draw:line draw:style-name="gr38" draw:text-style-name="P4" draw:layer="layout" svg:x1="13.5cm" svg:y1="4.5cm" svg:x2="13.5cm" svg:y2="5.25cm">
          <text:p/>
        </draw:line>
        <draw:line draw:style-name="gr38" draw:text-style-name="P4" draw:layer="layout" svg:x1="9cm" svg:y1="4cm" svg:x2="11.5cm" svg:y2="4cm">
          <text:p/>
        </draw:line>
        <draw:line draw:style-name="gr38" draw:text-style-name="P4" draw:layer="layout" svg:x1="11.5cm" svg:y1="4.25cm" svg:x2="11.5cm" svg:y2="4cm">
          <text:p/>
        </draw:line>
        <draw:line draw:style-name="gr38" draw:text-style-name="P4" draw:layer="layout" svg:x1="11.5cm" svg:y1="4.75cm" svg:x2="11.5cm" svg:y2="5cm">
          <text:p/>
        </draw:line>
        <draw:line draw:style-name="gr38" draw:text-style-name="P4" draw:layer="layout" svg:x1="11.5cm" svg:y1="5cm" svg:x2="5cm" svg:y2="5cm">
          <text:p/>
        </draw:line>
        <draw:line draw:style-name="gr38" draw:text-style-name="P4" draw:layer="layout" svg:x1="13.5cm" svg:y1="5.75cm" svg:x2="13.5cm" svg:y2="6cm">
          <text:p/>
        </draw:line>
        <draw:line draw:style-name="gr38" draw:text-style-name="P4" draw:layer="layout" svg:x1="13.5cm" svg:y1="6cm" svg:x2="13cm" svg:y2="6cm">
          <text:p/>
        </draw:line>
        <draw:frame draw:style-name="gr185" draw:text-style-name="P9" draw:layer="layout" svg:width="3.491cm" svg:height="0.725cm" svg:x="9.5cm" svg:y="5.775cm">
          <draw:text-box>
            <text:p><text:span text:style-name="T2">exec_phase</text:span><text:span text:style-name="T2">_s</text:span></text:p>
          </draw:text-box>
        </draw:frame>
        <draw:custom-shape draw:style-name="gr186" draw:text-style-name="P20" draw:layer="layout" svg:width="3.691cm" svg:height="1.1cm" svg:x="9.3cm" svg:y="5.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9cm" svg:y1="3cm" svg:x2="9cm" svg:y2="4cm">
          <text:p/>
        </draw:line>
        <draw:frame draw:style-name="gr187" draw:text-style-name="P9" draw:layer="layout" svg:width="3.537cm" svg:height="0.725cm" svg:x="18cm" svg:y="6.275cm">
          <draw:text-box>
            <text:p><text:span text:style-name="T2">mret_pendi</text:span><text:span text:style-name="T2">ng_s</text:span></text:p>
          </draw:text-box>
        </draw:frame>
        <draw:g draw:style-name="gr1">
          <draw:custom-shape draw:style-name="gr154" draw:text-style-name="P14" draw:layer="layout" svg:width="1cm" svg:height="2cm" svg:x="17cm" svg:y="6.5cm">
            <text:p/>
            <draw:enhanced-geometry svg:viewBox="0 0 21600 21600" draw:type="rectangle" draw:enhanced-path="M 0 0 L 21600 0 21600 21600 0 21600 0 0 Z N"/>
          </draw:custom-shape>
          <draw:polygon draw:style-name="gr155" draw:text-style-name="P14" draw:layer="layout" svg:width="0.199cm" svg:height="0.199cm" svg:x="17cm" svg:y="8.2cm" svg:viewBox="0 0 200 200" draw:points="0,200 200,100 0,0">
            <text:p/>
          </draw:polygon>
        </draw:g>
        <draw:polygon draw:style-name="gr155" draw:text-style-name="P14" draw:layer="layout" svg:width="0.299cm" svg:height="0.999cm" svg:x="16cm" svg:y="6.5cm" svg:viewBox="0 0 300 1000" draw:points="0,0 0,1000 300,800 300,300">
          <text:p/>
        </draw:polygon>
        <draw:line draw:style-name="gr38" draw:text-style-name="P4" draw:layer="layout" svg:x1="16.3cm" svg:y1="7cm" svg:x2="17cm" svg:y2="7cm">
          <text:p/>
        </draw:line>
        <draw:line draw:style-name="gr38" draw:text-style-name="P4" draw:layer="layout" svg:x1="15.4cm" svg:y1="6.8cm" svg:x2="16cm" svg:y2="6.8cm">
          <text:p/>
        </draw:line>
        <draw:line draw:style-name="gr38" draw:text-style-name="P4" draw:layer="layout" svg:x1="15.4cm" svg:y1="7.2cm" svg:x2="16cm" svg:y2="7.2cm">
          <text:p/>
        </draw:line>
        <draw:frame draw:style-name="gr188" draw:text-style-name="P9" draw:layer="layout" svg:width="0.735cm" svg:height="0.725cm" svg:x="14.8cm" svg:y="6.475cm">
          <draw:text-box>
            <text:p><text:span text:style-name="T2">1</text:span></text:p>
          </draw:text-box>
        </draw:frame>
        <draw:frame draw:style-name="gr188" draw:text-style-name="P9" draw:layer="layout" svg:width="0.735cm" svg:height="0.725cm" svg:x="14.801cm" svg:y="6.876cm">
          <draw:text-box>
            <text:p><text:span text:style-name="T2">0</text:span></text:p>
          </draw:text-box>
        </draw:frame>
        <draw:line draw:style-name="gr146" draw:text-style-name="P4" draw:layer="layout" svg:x1="15.5cm" svg:y1="5.5cm" svg:x2="15.5cm" svg:y2="6.8cm">
          <text:p/>
        </draw:line>
        <draw:line draw:style-name="gr146" draw:text-style-name="P4" draw:layer="layout" svg:x1="15.5cm" svg:y1="8.5cm" svg:x2="15.5cm" svg:y2="7.2cm">
          <text:p/>
        </draw:line>
        <draw:line draw:style-name="gr38" draw:text-style-name="P4" draw:layer="layout" svg:x1="18cm" svg:y1="7cm" svg:x2="22cm" svg:y2="7cm">
          <text:p/>
        </draw:line>
        <draw:frame draw:style-name="gr185" draw:text-style-name="P9" draw:layer="layout" svg:width="3.491cm" svg:height="0.725cm" svg:x="14cm" svg:y="8.776cm">
          <draw:text-box>
            <text:p><text:span text:style-name="T2">fetch0_pha</text:span><text:span text:style-name="T2">se_s</text:span></text:p>
          </draw:text-box>
        </draw:frame>
        <draw:custom-shape draw:style-name="gr186" draw:text-style-name="P20" draw:layer="layout" svg:width="3.691cm" svg:height="1.1cm" svg:x="13.8cm" svg:y="8.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1">
          <draw:custom-shape draw:style-name="gr154" draw:text-style-name="P14" draw:layer="layout" svg:width="1cm" svg:height="2cm" svg:x="20cm" svg:y="20.975cm">
            <text:p/>
            <draw:enhanced-geometry svg:viewBox="0 0 21600 21600" draw:type="rectangle" draw:enhanced-path="M 0 0 L 21600 0 21600 21600 0 21600 0 0 Z N"/>
          </draw:custom-shape>
          <draw:polygon draw:style-name="gr155" draw:text-style-name="P14" draw:layer="layout" svg:width="0.199cm" svg:height="0.199cm" svg:x="20cm" svg:y="22.675cm" svg:viewBox="0 0 200 200" draw:points="0,200 200,100 0,0">
            <text:p/>
          </draw:polygon>
        </draw:g>
        <draw:polygon draw:style-name="gr155" draw:text-style-name="P14" draw:layer="layout" svg:width="0.299cm" svg:height="0.999cm" svg:x="19cm" svg:y="20.975cm" svg:viewBox="0 0 300 1000" draw:points="0,0 0,1000 300,800 300,300">
          <text:p/>
        </draw:polygon>
        <draw:line draw:style-name="gr38" draw:text-style-name="P4" draw:layer="layout" svg:x1="19.3cm" svg:y1="21.475cm" svg:x2="20cm" svg:y2="21.475cm">
          <text:p/>
        </draw:line>
        <draw:line draw:style-name="gr38" draw:text-style-name="P4" draw:layer="layout" svg:x1="18.4cm" svg:y1="21.275cm" svg:x2="19cm" svg:y2="21.275cm">
          <text:p/>
        </draw:line>
        <draw:line draw:style-name="gr38" draw:text-style-name="P4" draw:layer="layout" svg:x1="18.4cm" svg:y1="21.675cm" svg:x2="19cm" svg:y2="21.675cm">
          <text:p/>
        </draw:line>
        <draw:frame draw:style-name="gr188" draw:text-style-name="P9" draw:layer="layout" svg:width="0.735cm" svg:height="0.725cm" svg:x="17.8cm" svg:y="20.95cm">
          <draw:text-box>
            <text:p><text:span text:style-name="T2">1</text:span></text:p>
          </draw:text-box>
        </draw:frame>
        <draw:frame draw:style-name="gr188" draw:text-style-name="P9" draw:layer="layout" svg:width="0.735cm" svg:height="0.725cm" svg:x="17.801cm" svg:y="21.351cm">
          <draw:text-box>
            <text:p><text:span text:style-name="T2">0</text:span></text:p>
          </draw:text-box>
        </draw:frame>
        <draw:line draw:style-name="gr146" draw:text-style-name="P4" draw:layer="layout" svg:x1="18.5cm" svg:y1="20.4cm" svg:x2="18.5cm" svg:y2="21.275cm">
          <text:p/>
        </draw:line>
        <draw:frame draw:style-name="gr162" draw:text-style-name="P9" draw:layer="layout" svg:width="3.106cm" svg:height="0.725cm" svg:x="21cm" svg:y="20.775cm">
          <draw:text-box>
            <text:p><text:span text:style-name="T2">trap_taken_</text:span><text:span text:style-name="T2">s</text:span></text:p>
          </draw:text-box>
        </draw:frame>
        <draw:line draw:style-name="gr146" draw:text-style-name="P4" draw:layer="layout" svg:x1="18.5cm" svg:y1="22.975cm" svg:x2="18.5cm" svg:y2="21.675cm">
          <text:p/>
        </draw:line>
        <draw:g draw:style-name="gr66">
          <draw:rect draw:style-name="gr189" draw:text-style-name="P16" draw:layer="layout" svg:width="1cm" svg:height="1cm" svg:x="15cm" svg:y="12cm">
            <text:p text:style-name="P15"><text:span text:style-name="T5">1</text:span></text:p>
          </draw:rect>
          <draw:line draw:style-name="gr190" draw:text-style-name="P17" draw:layer="layout" svg:x1="14.5cm" svg:y1="12.5cm" svg:x2="15cm" svg:y2="12.5cm">
            <text:p/>
          </draw:line>
          <draw:circle draw:style-name="gr191" draw:text-style-name="P21" draw:layer="layout" svg:width="0.125cm" svg:height="0.126cm" svg:x="16cm" svg:y="12.437cm">
            <text:p/>
          </draw:circle>
          <draw:line draw:style-name="gr192" draw:text-style-name="P21" draw:layer="layout" svg:x1="16.125cm" svg:y1="12.5cm" svg:x2="16.5cm" svg:y2="12.5cm">
            <text:p/>
          </draw:line>
        </draw:g>
        <draw:g draw:style-name="gr66">
          <draw:glue-point draw:id="4" svg:x="5cm" svg:y="0cm"/>
          <draw:glue-point draw:id="5" svg:x="-5cm" svg:y="-2.5cm"/>
          <draw:glue-point draw:id="6" svg:x="-5.005cm" svg:y="2.5cm"/>
          <draw:rect draw:style-name="gr193" draw:text-style-name="P16" draw:layer="layout" svg:width="1cm" svg:height="1cm" svg:x="17cm" svg:y="11cm">
            <text:p text:style-name="P15"><text:span text:style-name="T4">&amp;</text:span></text:p>
          </draw:rect>
          <draw:line draw:style-name="gr194" draw:text-style-name="P17" draw:layer="layout" svg:x1="16.5cm" svg:y1="11.25cm" svg:x2="17cm" svg:y2="11.25cm">
            <text:p/>
          </draw:line>
          <draw:line draw:style-name="gr195" draw:text-style-name="P17" draw:layer="layout" svg:x1="16.5cm" svg:y1="11.75cm" svg:x2="17cm" svg:y2="11.75cm">
            <text:p/>
          </draw:line>
          <draw:line draw:style-name="gr196" draw:text-style-name="P17" draw:layer="layout" svg:x1="18cm" svg:y1="11.5cm" svg:x2="18.5cm" svg:y2="11.5cm">
            <text:p/>
          </draw:line>
        </draw:g>
        <draw:frame draw:style-name="gr185" draw:text-style-name="P9" draw:layer="layout" svg:width="3.491cm" svg:height="0.725cm" svg:x="12.509cm" svg:y="10.675cm">
          <draw:text-box>
            <text:p><text:span text:style-name="T2">instr_commi</text:span><text:span text:style-name="T2">t_s</text:span></text:p>
          </draw:text-box>
        </draw:frame>
        <draw:custom-shape draw:style-name="gr186" draw:text-style-name="P20" draw:layer="layout" svg:width="3.691cm" svg:height="1.1cm" svg:x="12.309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6.5cm" svg:y1="12.5cm" svg:x2="16.5cm" svg:y2="11.75cm">
          <text:p/>
        </draw:line>
        <draw:line draw:style-name="gr38" draw:text-style-name="P4" draw:layer="layout" svg:x1="16.5cm" svg:y1="11.25cm" svg:x2="16.5cm" svg:y2="11cm">
          <text:p/>
        </draw:line>
        <draw:line draw:style-name="gr38" draw:text-style-name="P4" draw:layer="layout" svg:x1="16.5cm" svg:y1="11cm" svg:x2="16cm" svg:y2="11cm">
          <text:p/>
        </draw:line>
        <draw:line draw:style-name="gr146" draw:text-style-name="P4" draw:layer="layout" svg:x1="18.5cm" svg:y1="11.5cm" svg:x2="18.5cm" svg:y2="12cm">
          <text:p/>
        </draw:line>
        <draw:custom-shape draw:style-name="gr197" draw:text-style-name="P14" draw:layer="layout" svg:width="1.2cm" svg:height="1.2cm" svg:x="17.9cm" svg:y="12cm">
          <text:p/>
          <draw:enhanced-geometry svg:viewBox="0 0 21600 21600" draw:glue-points="10800 0 0 10800 10800 21600 21600 10800" draw:text-areas="5400 5400 16200 16200" draw:type="diamond" draw:enhanced-path="M 10800 0 L 21600 10800 10800 21600 0 10800 10800 0 Z N"/>
        </draw:custom-shape>
        <draw:frame draw:style-name="gr188" draw:text-style-name="P9" draw:layer="layout" svg:width="0.735cm" svg:height="0.725cm" svg:x="17.8cm" svg:y="12.2cm">
          <draw:text-box>
            <text:p><text:span text:style-name="T2">1</text:span></text:p>
          </draw:text-box>
        </draw:frame>
        <draw:frame draw:style-name="gr188" draw:text-style-name="P9" draw:layer="layout" svg:width="0.735cm" svg:height="0.725cm" svg:x="18.435cm" svg:y="12.2cm">
          <draw:text-box>
            <text:p><text:span text:style-name="T2">0</text:span></text:p>
          </draw:text-box>
        </draw:frame>
        <draw:line draw:style-name="gr146" draw:text-style-name="P4" draw:layer="layout" svg:x1="17.5cm" svg:y1="12.6cm" svg:x2="17.5cm" svg:y2="14cm">
          <text:p/>
        </draw:line>
        <draw:custom-shape draw:style-name="gr197" draw:text-style-name="P14" draw:layer="layout" svg:width="1.2cm" svg:height="1.2cm" svg:x="16.9cm" svg:y="14.001cm">
          <text:p/>
          <draw:enhanced-geometry svg:viewBox="0 0 21600 21600" draw:glue-points="10800 0 0 10800 10800 21600 21600 10800" draw:text-areas="5400 5400 16200 16200" draw:type="diamond" draw:enhanced-path="M 10800 0 L 21600 10800 10800 21600 0 10800 10800 0 Z N"/>
        </draw:custom-shape>
        <draw:frame draw:style-name="gr188" draw:text-style-name="P9" draw:layer="layout" svg:width="0.735cm" svg:height="0.725cm" svg:x="16.8cm" svg:y="14.201cm">
          <draw:text-box>
            <text:p><text:span text:style-name="T2">0</text:span></text:p>
          </draw:text-box>
        </draw:frame>
        <draw:frame draw:style-name="gr188" draw:text-style-name="P9" draw:layer="layout" svg:width="0.735cm" svg:height="0.725cm" svg:x="17.435cm" svg:y="14.201cm">
          <draw:text-box>
            <text:p><text:span text:style-name="T2">1</text:span></text:p>
          </draw:text-box>
        </draw:frame>
        <draw:line draw:style-name="gr38" draw:text-style-name="P4" draw:layer="layout" svg:x1="17.9cm" svg:y1="12.6cm" svg:x2="17.5cm" svg:y2="12.6cm">
          <text:p/>
        </draw:line>
        <draw:line draw:style-name="gr38" draw:text-style-name="P4" draw:layer="layout" svg:x1="11cm" svg:y1="14cm" svg:x2="17.5cm" svg:y2="14cm">
          <text:p/>
        </draw:line>
        <draw:line draw:style-name="gr38" draw:text-style-name="P4" draw:layer="layout" svg:x1="16.9cm" svg:y1="14.6cm" svg:x2="16.5cm" svg:y2="14.6cm">
          <text:p/>
        </draw:line>
        <draw:line draw:style-name="gr146" draw:text-style-name="P4" draw:layer="layout" svg:x1="16.5cm" svg:y1="14.6cm" svg:x2="16.5cm" svg:y2="16cm">
          <text:p/>
        </draw:line>
        <draw:line draw:style-name="gr38" draw:text-style-name="P4" draw:layer="layout" svg:x1="18.1cm" svg:y1="14.6cm" svg:x2="18.5cm" svg:y2="14.6cm">
          <text:p/>
        </draw:line>
        <draw:line draw:style-name="gr146" draw:text-style-name="P4" draw:layer="layout" svg:x1="18.5cm" svg:y1="14.6cm" svg:x2="18.5cm" svg:y2="16cm">
          <text:p/>
        </draw:line>
        <draw:custom-shape draw:style-name="gr197" draw:text-style-name="P14" draw:layer="layout" svg:width="1.2cm" svg:height="1.2cm" svg:x="15.9cm" svg:y="16.002cm">
          <text:p/>
          <draw:enhanced-geometry svg:viewBox="0 0 21600 21600" draw:glue-points="10800 0 0 10800 10800 21600 21600 10800" draw:text-areas="5400 5400 16200 16200" draw:type="diamond" draw:enhanced-path="M 10800 0 L 21600 10800 10800 21600 0 10800 10800 0 Z N"/>
        </draw:custom-shape>
        <draw:frame draw:style-name="gr188" draw:text-style-name="P9" draw:layer="layout" svg:width="0.735cm" svg:height="0.725cm" svg:x="15.8cm" svg:y="16.202cm">
          <draw:text-box>
            <text:p><text:span text:style-name="T2">0</text:span></text:p>
          </draw:text-box>
        </draw:frame>
        <draw:frame draw:style-name="gr188" draw:text-style-name="P9" draw:layer="layout" svg:width="0.735cm" svg:height="0.725cm" svg:x="16.435cm" svg:y="16.202cm">
          <draw:text-box>
            <text:p><text:span text:style-name="T2">1</text:span></text:p>
          </draw:text-box>
        </draw:frame>
        <draw:line draw:style-name="gr38" draw:text-style-name="P4" draw:layer="layout" svg:x1="12cm" svg:y1="16cm" svg:x2="16.501cm" svg:y2="16.001cm">
          <text:p/>
        </draw:line>
        <draw:line draw:style-name="gr38" draw:text-style-name="P4" draw:layer="layout" svg:x1="17.1cm" svg:y1="16.6cm" svg:x2="17.5cm" svg:y2="16.6cm">
          <text:p/>
        </draw:line>
        <draw:line draw:style-name="gr146" draw:text-style-name="P4" draw:layer="layout" svg:x1="17.5cm" svg:y1="16.6cm" svg:x2="17.5cm" svg:y2="18cm">
          <text:p/>
        </draw:line>
        <draw:line draw:style-name="gr38" draw:text-style-name="P4" draw:layer="layout" svg:x1="15.901cm" svg:y1="16.601cm" svg:x2="15.501cm" svg:y2="16.601cm">
          <text:p/>
        </draw:line>
        <draw:line draw:style-name="gr146" draw:text-style-name="P4" draw:layer="layout" svg:x1="15.501cm" svg:y1="16.601cm" svg:x2="15.501cm" svg:y2="18.001cm">
          <text:p/>
        </draw:line>
        <draw:frame draw:style-name="gr152" draw:text-style-name="P9" draw:layer="layout" svg:width="3.161cm" svg:height="0.725cm" svg:x="12.407cm" svg:y="17.277cm">
          <draw:text-box>
            <text:p><text:span text:style-name="T2">irq_pending</text:span><text:span text:style-name="T2">_s</text:span></text:p>
          </draw:text-box>
        </draw:frame>
        <draw:line draw:style-name="gr38" draw:text-style-name="P4" draw:layer="layout" svg:x1="14cm" svg:y1="18.002cm" svg:x2="15.502cm" svg:y2="18.002cm">
          <text:p/>
        </draw:line>
        <draw:custom-shape draw:style-name="gr197" draw:text-style-name="P14" draw:layer="layout" svg:width="1.2cm" svg:height="1.2cm" svg:x="14.9cm" svg:y="18.003cm">
          <text:p/>
          <draw:enhanced-geometry svg:viewBox="0 0 21600 21600" draw:glue-points="10800 0 0 10800 10800 21600 21600 10800" draw:text-areas="5400 5400 16200 16200" draw:type="diamond" draw:enhanced-path="M 10800 0 L 21600 10800 10800 21600 0 10800 10800 0 Z N"/>
        </draw:custom-shape>
        <draw:frame draw:style-name="gr188" draw:text-style-name="P9" draw:layer="layout" svg:width="0.735cm" svg:height="0.725cm" svg:x="14.8cm" svg:y="18.203cm">
          <draw:text-box>
            <text:p><text:span text:style-name="T2">0</text:span></text:p>
          </draw:text-box>
        </draw:frame>
        <draw:frame draw:style-name="gr188" draw:text-style-name="P9" draw:layer="layout" svg:width="0.735cm" svg:height="0.725cm" svg:x="15.435cm" svg:y="18.203cm">
          <draw:text-box>
            <text:p><text:span text:style-name="T2">1</text:span></text:p>
          </draw:text-box>
        </draw:frame>
        <draw:line draw:style-name="gr38" draw:text-style-name="P4" draw:layer="layout" svg:x1="16.1cm" svg:y1="18.6cm" svg:x2="16.5cm" svg:y2="18.6cm">
          <text:p/>
        </draw:line>
        <draw:line draw:style-name="gr146" draw:text-style-name="P4" draw:layer="layout" svg:x1="16.5cm" svg:y1="18.6cm" svg:x2="16.5cm" svg:y2="20cm">
          <text:p/>
        </draw:line>
        <draw:line draw:style-name="gr38" draw:text-style-name="P4" draw:layer="layout" svg:x1="14.926cm" svg:y1="18.6cm" svg:x2="14.526cm" svg:y2="18.6cm">
          <text:p/>
        </draw:line>
        <draw:line draw:style-name="gr146" draw:text-style-name="P4" draw:layer="layout" svg:x1="14.526cm" svg:y1="18.6cm" svg:x2="14.526cm" svg:y2="20cm">
          <text:p/>
        </draw:line>
        <draw:line draw:style-name="gr146" draw:text-style-name="P4" draw:layer="layout" svg:x1="18.5cm" svg:y1="16cm" svg:x2="18.5cm" svg:y2="20.4cm">
          <text:p/>
        </draw:line>
        <draw:line draw:style-name="gr146" draw:text-style-name="P4" draw:layer="layout" svg:x1="17.5cm" svg:y1="18cm" svg:x2="18.5cm" svg:y2="20.4cm">
          <text:p/>
        </draw:line>
        <draw:line draw:style-name="gr146" draw:text-style-name="P4" draw:layer="layout" svg:x1="16.5cm" svg:y1="20cm" svg:x2="18.5cm" svg:y2="20.4cm">
          <text:p/>
        </draw:line>
        <draw:line draw:style-name="gr38" draw:text-style-name="P4" draw:layer="layout" svg:x1="19.075cm" svg:y1="12.6cm" svg:x2="19.475cm" svg:y2="12.6cm">
          <text:p/>
        </draw:line>
        <draw:line draw:style-name="gr146" draw:text-style-name="P4" draw:layer="layout" svg:x1="19.475cm" svg:y1="12.6cm" svg:x2="19.475cm" svg:y2="14cm">
          <text:p/>
        </draw:line>
        <draw:line draw:style-name="gr38" draw:text-style-name="P4" draw:layer="layout" svg:x1="18cm" svg:y1="23cm" svg:x2="19cm" svg:y2="23cm">
          <text:p/>
        </draw:line>
        <draw:line draw:style-name="gr146" draw:text-style-name="P4" draw:layer="layout" svg:x1="14.526cm" svg:y1="20cm" svg:x2="18cm" svg:y2="23cm">
          <text:p/>
        </draw:line>
        <draw:line draw:style-name="gr146" draw:text-style-name="P4" draw:layer="layout" svg:x1="19.475cm" svg:y1="14cm" svg:x2="19cm" svg:y2="23cm">
          <text:p/>
        </draw:line>
        <draw:line draw:style-name="gr38" draw:text-style-name="P4" draw:layer="layout" svg:x1="10cm" svg:y1="12.5cm" svg:x2="14.5cm" svg:y2="12.5cm">
          <text:p/>
        </draw:line>
        <draw:line draw:style-name="gr38" draw:text-style-name="P4" draw:layer="layout" svg:x1="10cm" svg:y1="17cm" svg:x2="10cm" svg:y2="12.5cm">
          <text:p/>
        </draw:line>
        <draw:line draw:style-name="gr38" draw:text-style-name="P4" draw:layer="layout" svg:x1="11cm" svg:y1="19.002cm" svg:x2="11cm" svg:y2="14cm">
          <text:p/>
        </draw:line>
        <draw:line draw:style-name="gr38" draw:text-style-name="P4" draw:layer="layout" svg:x1="12cm" svg:y1="20cm" svg:x2="12cm" svg:y2="16cm">
          <text:p/>
        </draw:line>
        <draw:g draw:style-name="gr1">
          <draw:custom-shape draw:style-name="gr165" draw:text-style-name="P14" draw:layer="layout" svg:width="0.4cm" svg:height="0.4cm" svg:x="21.8cm" svg:y="6.8cm">
            <text:p/>
            <draw:enhanced-geometry svg:viewBox="0 0 21600 21600" draw:type="rectangle" draw:enhanced-path="M 0 0 L 21600 0 21600 21600 0 21600 0 0 Z N"/>
          </draw:custom-shape>
          <draw:line draw:style-name="gr38" draw:text-style-name="P4" draw:layer="layout" svg:x1="21.8cm" svg:y1="6.8cm" svg:x2="22.2cm" svg:y2="7.2cm">
            <text:p/>
          </draw:line>
          <draw:line draw:style-name="gr38" draw:text-style-name="P4" draw:layer="layout" svg:x1="21.8cm" svg:y1="7.2cm" svg:x2="22.2cm" svg:y2="6.8cm">
            <text:p/>
          </draw:line>
        </draw:g>
        <draw:g draw:style-name="gr1">
          <draw:custom-shape draw:style-name="gr165" draw:text-style-name="P14" draw:layer="layout" svg:width="0.4cm" svg:height="0.4cm" svg:x="23.8cm" svg:y="21.3cm">
            <text:p/>
            <draw:enhanced-geometry svg:viewBox="0 0 21600 21600" draw:type="rectangle" draw:enhanced-path="M 0 0 L 21600 0 21600 21600 0 21600 0 0 Z N"/>
          </draw:custom-shape>
          <draw:line draw:style-name="gr38" draw:text-style-name="P4" draw:layer="layout" svg:x1="23.8cm" svg:y1="21.3cm" svg:x2="24.2cm" svg:y2="21.7cm">
            <text:p/>
          </draw:line>
          <draw:line draw:style-name="gr38" draw:text-style-name="P4" draw:layer="layout" svg:x1="23.8cm" svg:y1="21.7cm" svg:x2="24.2cm" svg:y2="21.3cm">
            <text:p/>
          </draw:line>
        </draw:g>
        <draw:line draw:style-name="gr38" draw:text-style-name="P4" draw:layer="layout" svg:x1="24cm" svg:y1="21.5cm" svg:x2="21cm" svg:y2="21.5cm">
          <text:p/>
        </draw:line>
        <draw:line draw:style-name="gr38" draw:text-style-name="P4" draw:layer="layout" svg:x1="14cm" svg:y1="23.5cm" svg:x2="14cm" svg:y2="18.002cm">
          <text:p/>
        </draw:line>
        <draw:line draw:style-name="gr38" draw:text-style-name="P4" draw:layer="layout" svg:x1="14cm" svg:y1="23.5cm" svg:x2="11.498cm" svg:y2="23.5cm">
          <text:p/>
        </draw:line>
        <draw:g draw:style-name="gr1">
          <draw:custom-shape draw:style-name="gr154" draw:text-style-name="P14" draw:layer="layout" svg:width="1cm" svg:height="2cm" svg:x="38cm" svg:y="10cm">
            <text:p/>
            <draw:enhanced-geometry svg:viewBox="0 0 21600 21600" draw:type="rectangle" draw:enhanced-path="M 0 0 L 21600 0 21600 21600 0 21600 0 0 Z N"/>
          </draw:custom-shape>
          <draw:polygon draw:style-name="gr155" draw:text-style-name="P14" draw:layer="layout" svg:width="0.199cm" svg:height="0.199cm" svg:x="38cm" svg:y="11.7cm" svg:viewBox="0 0 200 200" draw:points="0,200 200,100 0,0">
            <text:p/>
          </draw:polygon>
        </draw:g>
        <draw:line draw:style-name="gr38" draw:text-style-name="P4" draw:layer="layout" svg:x1="37cm" svg:y1="10.5cm" svg:x2="38cm" svg:y2="10.5cm">
          <text:p/>
        </draw:line>
        <draw:line draw:style-name="gr38" draw:text-style-name="P4" draw:layer="layout" svg:x1="39cm" svg:y1="10.5cm" svg:x2="40cm" svg:y2="10.5cm">
          <text:p/>
        </draw:line>
        <draw:frame draw:style-name="gr198" draw:text-style-name="P9" draw:layer="layout" svg:width="2.428cm" svg:height="0.725cm" svg:x="39cm" svg:y="9.775cm">
          <draw:text-box>
            <text:p><text:span text:style-name="T2">csr_mie_s</text:span></text:p>
          </draw:text-box>
        </draw:frame>
        <draw:g draw:style-name="gr1">
          <draw:custom-shape draw:style-name="gr154" draw:text-style-name="P14" draw:layer="layout" svg:width="1cm" svg:height="2cm" svg:x="34cm" svg:y="16cm">
            <text:p/>
            <draw:enhanced-geometry svg:viewBox="0 0 21600 21600" draw:type="rectangle" draw:enhanced-path="M 0 0 L 21600 0 21600 21600 0 21600 0 0 Z N"/>
          </draw:custom-shape>
          <draw:polygon draw:style-name="gr155" draw:text-style-name="P14" draw:layer="layout" svg:width="0.199cm" svg:height="0.199cm" svg:x="34cm" svg:y="17.7cm" svg:viewBox="0 0 200 200" draw:points="0,200 200,100 0,0">
            <text:p/>
          </draw:polygon>
        </draw:g>
        <draw:line draw:style-name="gr38" draw:text-style-name="P4" draw:layer="layout" svg:x1="33.3cm" svg:y1="16.5cm" svg:x2="34cm" svg:y2="16.5cm">
          <text:p/>
        </draw:line>
        <draw:line draw:style-name="gr38" draw:text-style-name="P4" draw:layer="layout" svg:x1="35cm" svg:y1="16.5cm" svg:x2="36cm" svg:y2="16.5cm">
          <text:p/>
        </draw:line>
        <draw:frame draw:style-name="gr199" draw:text-style-name="P9" draw:layer="layout" svg:width="3.228cm" svg:height="0.725cm" svg:x="35cm" svg:y="15.775cm">
          <draw:text-box>
            <text:p><text:span text:style-name="T2">csr_mstatus</text:span><text:span text:style-name="T2">_s</text:span></text:p>
          </draw:text-box>
        </draw:frame>
        <draw:g draw:style-name="gr1">
          <draw:custom-shape draw:style-name="gr154" draw:text-style-name="P14" draw:layer="layout" svg:width="1cm" svg:height="2cm" svg:x="26cm" svg:y="26cm">
            <text:p/>
            <draw:enhanced-geometry svg:viewBox="0 0 21600 21600" draw:type="rectangle" draw:enhanced-path="M 0 0 L 21600 0 21600 21600 0 21600 0 0 Z N"/>
          </draw:custom-shape>
          <draw:polygon draw:style-name="gr155" draw:text-style-name="P14" draw:layer="layout" svg:width="0.199cm" svg:height="0.199cm" svg:x="26cm" svg:y="27.7cm" svg:viewBox="0 0 200 200" draw:points="0,200 200,100 0,0">
            <text:p/>
          </draw:polygon>
        </draw:g>
        <draw:polygon draw:style-name="gr155" draw:text-style-name="P14" draw:layer="layout" svg:width="0.299cm" svg:height="0.999cm" svg:x="25cm" svg:y="26cm" svg:viewBox="0 0 300 1000" draw:points="0,0 0,1000 300,800 300,300">
          <text:p/>
        </draw:polygon>
        <draw:line draw:style-name="gr38" draw:text-style-name="P4" draw:layer="layout" svg:x1="25.3cm" svg:y1="26.5cm" svg:x2="26cm" svg:y2="26.5cm">
          <text:p/>
        </draw:line>
        <draw:line draw:style-name="gr38" draw:text-style-name="P4" draw:layer="layout" svg:x1="24.4cm" svg:y1="26.3cm" svg:x2="25cm" svg:y2="26.3cm">
          <text:p/>
        </draw:line>
        <draw:line draw:style-name="gr38" draw:text-style-name="P4" draw:layer="layout" svg:x1="24.4cm" svg:y1="26.7cm" svg:x2="25cm" svg:y2="26.7cm">
          <text:p/>
        </draw:line>
        <draw:frame draw:style-name="gr188" draw:text-style-name="P9" draw:layer="layout" svg:width="0.735cm" svg:height="0.725cm" svg:x="23.8cm" svg:y="25.975cm">
          <draw:text-box>
            <text:p><text:span text:style-name="T2">1</text:span></text:p>
          </draw:text-box>
        </draw:frame>
        <draw:frame draw:style-name="gr188" draw:text-style-name="P9" draw:layer="layout" svg:width="0.735cm" svg:height="0.725cm" svg:x="23.801cm" svg:y="26.376cm">
          <draw:text-box>
            <text:p><text:span text:style-name="T2">0</text:span></text:p>
          </draw:text-box>
        </draw:frame>
        <draw:line draw:style-name="gr146" draw:text-style-name="P4" draw:layer="layout" svg:x1="24.5cm" svg:y1="25.5cm" svg:x2="24.5cm" svg:y2="26.325cm">
          <text:p/>
        </draw:line>
        <draw:line draw:style-name="gr146" draw:text-style-name="P4" draw:layer="layout" svg:x1="24.5cm" svg:y1="27.4cm" svg:x2="24.5cm" svg:y2="26.7cm">
          <text:p/>
        </draw:line>
        <draw:line draw:style-name="gr38" draw:text-style-name="P4" draw:layer="layout" svg:x1="27cm" svg:y1="26.5cm" svg:x2="28cm" svg:y2="26.5cm">
          <text:p/>
        </draw:line>
        <draw:frame draw:style-name="gr200" draw:text-style-name="P9" draw:layer="layout" svg:width="2.784cm" svg:height="0.725cm" svg:x="27cm" svg:y="25.775cm">
          <draw:text-box>
            <text:p><text:span text:style-name="T2">csr_mepc_s</text:span></text:p>
          </draw:text-box>
        </draw:frame>
        <draw:g draw:style-name="gr1">
          <draw:custom-shape draw:style-name="gr154" draw:text-style-name="P14" draw:layer="layout" svg:width="1cm" svg:height="2cm" svg:x="34cm" svg:y="26cm">
            <text:p/>
            <draw:enhanced-geometry svg:viewBox="0 0 21600 21600" draw:type="rectangle" draw:enhanced-path="M 0 0 L 21600 0 21600 21600 0 21600 0 0 Z N"/>
          </draw:custom-shape>
          <draw:polygon draw:style-name="gr155" draw:text-style-name="P14" draw:layer="layout" svg:width="0.199cm" svg:height="0.199cm" svg:x="34cm" svg:y="27.7cm" svg:viewBox="0 0 200 200" draw:points="0,200 200,100 0,0">
            <text:p/>
          </draw:polygon>
        </draw:g>
        <draw:polygon draw:style-name="gr155" draw:text-style-name="P14" draw:layer="layout" svg:width="0.299cm" svg:height="0.999cm" svg:x="33cm" svg:y="26cm" svg:viewBox="0 0 300 1000" draw:points="0,0 0,1000 300,800 300,300">
          <text:p/>
        </draw:polygon>
        <draw:line draw:style-name="gr38" draw:text-style-name="P4" draw:layer="layout" svg:x1="33.3cm" svg:y1="26.5cm" svg:x2="34cm" svg:y2="26.5cm">
          <text:p/>
        </draw:line>
        <draw:line draw:style-name="gr38" draw:text-style-name="P4" draw:layer="layout" svg:x1="32.4cm" svg:y1="26.3cm" svg:x2="33cm" svg:y2="26.3cm">
          <text:p/>
        </draw:line>
        <draw:line draw:style-name="gr38" draw:text-style-name="P4" draw:layer="layout" svg:x1="32.4cm" svg:y1="26.7cm" svg:x2="33cm" svg:y2="26.7cm">
          <text:p/>
        </draw:line>
        <draw:frame draw:style-name="gr188" draw:text-style-name="P9" draw:layer="layout" svg:width="0.735cm" svg:height="0.725cm" svg:x="31.8cm" svg:y="25.975cm">
          <draw:text-box>
            <text:p><text:span text:style-name="T2">1</text:span></text:p>
          </draw:text-box>
        </draw:frame>
        <draw:frame draw:style-name="gr188" draw:text-style-name="P9" draw:layer="layout" svg:width="0.735cm" svg:height="0.725cm" svg:x="31.801cm" svg:y="26.376cm">
          <draw:text-box>
            <text:p><text:span text:style-name="T2">0</text:span></text:p>
          </draw:text-box>
        </draw:frame>
        <draw:line draw:style-name="gr146" draw:text-style-name="P4" draw:layer="layout" svg:x1="32.5cm" svg:y1="25.5cm" svg:x2="32.5cm" svg:y2="26.325cm">
          <text:p/>
        </draw:line>
        <draw:line draw:style-name="gr146" draw:text-style-name="P4" draw:layer="layout" svg:x1="32.5cm" svg:y1="27.4cm" svg:x2="32.5cm" svg:y2="26.7cm">
          <text:p/>
        </draw:line>
        <draw:line draw:style-name="gr38" draw:text-style-name="P4" draw:layer="layout" svg:x1="35cm" svg:y1="26.5cm" svg:x2="36cm" svg:y2="26.5cm">
          <text:p/>
        </draw:line>
        <draw:frame draw:style-name="gr201" draw:text-style-name="P9" draw:layer="layout" svg:width="2.877cm" svg:height="0.725cm" svg:x="35cm" svg:y="25.775cm">
          <draw:text-box>
            <text:p><text:span text:style-name="T2">csr_mtvec_</text:span><text:span text:style-name="T2">s</text:span></text:p>
          </draw:text-box>
        </draw:frame>
        <draw:g draw:style-name="gr1">
          <draw:custom-shape draw:style-name="gr154" draw:text-style-name="P14" draw:layer="layout" svg:width="1cm" svg:height="2cm" svg:x="18cm" svg:y="26cm">
            <text:p/>
            <draw:enhanced-geometry svg:viewBox="0 0 21600 21600" draw:type="rectangle" draw:enhanced-path="M 0 0 L 21600 0 21600 21600 0 21600 0 0 Z N"/>
          </draw:custom-shape>
          <draw:polygon draw:style-name="gr155" draw:text-style-name="P14" draw:layer="layout" svg:width="0.199cm" svg:height="0.199cm" svg:x="18cm" svg:y="27.7cm" svg:viewBox="0 0 200 200" draw:points="0,200 200,100 0,0">
            <text:p/>
          </draw:polygon>
        </draw:g>
        <draw:polygon draw:style-name="gr155" draw:text-style-name="P14" draw:layer="layout" svg:width="0.299cm" svg:height="0.999cm" svg:x="17cm" svg:y="26cm" svg:viewBox="0 0 300 1000" draw:points="0,0 0,1000 300,800 300,300">
          <text:p/>
        </draw:polygon>
        <draw:line draw:style-name="gr38" draw:text-style-name="P4" draw:layer="layout" svg:x1="17.3cm" svg:y1="26.5cm" svg:x2="18cm" svg:y2="26.5cm">
          <text:p/>
        </draw:line>
        <draw:line draw:style-name="gr38" draw:text-style-name="P4" draw:layer="layout" svg:x1="16.4cm" svg:y1="26.3cm" svg:x2="17cm" svg:y2="26.3cm">
          <text:p/>
        </draw:line>
        <draw:line draw:style-name="gr38" draw:text-style-name="P4" draw:layer="layout" svg:x1="16.4cm" svg:y1="26.7cm" svg:x2="17cm" svg:y2="26.7cm">
          <text:p/>
        </draw:line>
        <draw:frame draw:style-name="gr188" draw:text-style-name="P9" draw:layer="layout" svg:width="0.735cm" svg:height="0.725cm" svg:x="15.8cm" svg:y="25.975cm">
          <draw:text-box>
            <text:p><text:span text:style-name="T2">1</text:span></text:p>
          </draw:text-box>
        </draw:frame>
        <draw:frame draw:style-name="gr188" draw:text-style-name="P9" draw:layer="layout" svg:width="0.735cm" svg:height="0.725cm" svg:x="15.801cm" svg:y="26.376cm">
          <draw:text-box>
            <text:p><text:span text:style-name="T2">0</text:span></text:p>
          </draw:text-box>
        </draw:frame>
        <draw:line draw:style-name="gr146" draw:text-style-name="P4" draw:layer="layout" svg:x1="16.5cm" svg:y1="25.5cm" svg:x2="16.5cm" svg:y2="26.325cm">
          <text:p/>
        </draw:line>
        <draw:line draw:style-name="gr146" draw:text-style-name="P4" draw:layer="layout" svg:x1="16.5cm" svg:y1="27.4cm" svg:x2="16.5cm" svg:y2="26.7cm">
          <text:p/>
        </draw:line>
        <draw:line draw:style-name="gr38" draw:text-style-name="P4" draw:layer="layout" svg:x1="19cm" svg:y1="26.5cm" svg:x2="20cm" svg:y2="26.5cm">
          <text:p/>
        </draw:line>
        <draw:frame draw:style-name="gr199" draw:text-style-name="P9" draw:layer="layout" svg:width="3.228cm" svg:height="0.725cm" svg:x="19cm" svg:y="25.775cm">
          <draw:text-box>
            <text:p><text:span text:style-name="T2">csr_mcause</text:span><text:span text:style-name="T2">_s</text:span></text:p>
          </draw:text-box>
        </draw:frame>
        <draw:line draw:style-name="gr38" draw:text-style-name="P4" draw:layer="layout" svg:x1="6cm" svg:y1="21.004cm" svg:x2="9cm" svg:y2="21.001cm">
          <text:p/>
        </draw:line>
        <draw:frame draw:style-name="gr202" draw:text-style-name="P9" draw:layer="layout" svg:width="2.098cm" svg:height="0.725cm" svg:x="6.001cm" svg:y="20.28cm">
          <draw:text-box>
            <text:p><text:span text:style-name="T2">csr_instr</text:span></text:p>
          </draw:text-box>
        </draw:frame>
        <draw:line draw:style-name="gr146" draw:text-style-name="P4" draw:layer="layout" svg:x1="5cm" svg:y1="17.5cm" svg:x2="6cm" svg:y2="21.001cm">
          <text:p/>
        </draw:line>
        <draw:g draw:style-name="gr66">
          <draw:glue-point draw:id="4" svg:x="5cm" svg:y="0cm"/>
          <draw:glue-point draw:id="5" svg:x="-5cm" svg:y="-2.5cm"/>
          <draw:glue-point draw:id="6" svg:x="-5.005cm" svg:y="2.5cm"/>
          <draw:rect draw:style-name="gr203" draw:text-style-name="P16" draw:layer="layout" svg:width="1cm" svg:height="1cm" svg:x="33cm" svg:y="4cm">
            <text:p text:style-name="P15"><text:span text:style-name="T4">&amp;</text:span></text:p>
          </draw:rect>
          <draw:line draw:style-name="gr204" draw:text-style-name="P17" draw:layer="layout" svg:x1="32.5cm" svg:y1="4.25cm" svg:x2="33cm" svg:y2="4.25cm">
            <text:p/>
          </draw:line>
          <draw:line draw:style-name="gr205" draw:text-style-name="P17" draw:layer="layout" svg:x1="32.5cm" svg:y1="4.75cm" svg:x2="33cm" svg:y2="4.75cm">
            <text:p/>
          </draw:line>
          <draw:line draw:style-name="gr206" draw:text-style-name="P17" draw:layer="layout" svg:x1="34cm" svg:y1="4.5cm" svg:x2="34.5cm" svg:y2="4.5cm">
            <text:p/>
          </draw:line>
        </draw:g>
        <draw:line draw:style-name="gr38" draw:text-style-name="P4" draw:layer="layout" svg:x1="32.5cm" svg:y1="4.25cm" svg:x2="32.5cm" svg:y2="4cm">
          <text:p/>
        </draw:line>
        <draw:line draw:style-name="gr38" draw:text-style-name="P4" draw:layer="layout" svg:x1="32.5cm" svg:y1="4cm" svg:x2="32cm" svg:y2="4cm">
          <text:p/>
        </draw:line>
        <draw:frame draw:style-name="gr185" draw:text-style-name="P9" draw:layer="layout" svg:width="3.491cm" svg:height="0.725cm" svg:x="28.509cm" svg:y="3.475cm">
          <draw:text-box>
            <text:p><text:span text:style-name="T2">exec_phase</text:span><text:span text:style-name="T2">_s</text:span></text:p>
          </draw:text-box>
        </draw:frame>
        <draw:custom-shape draw:style-name="gr186" draw:text-style-name="P20" draw:layer="layout" svg:width="3.691cm" svg:height="1.1cm" svg:x="28.309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2.5cm" svg:y1="4.75cm" svg:x2="32.5cm" svg:y2="5cm">
          <text:p/>
        </draw:line>
        <draw:line draw:style-name="gr38" draw:text-style-name="P4" draw:layer="layout" svg:x1="32.5cm" svg:y1="5cm" svg:x2="32cm" svg:y2="5cm">
          <text:p/>
        </draw:line>
        <draw:frame draw:style-name="gr207" draw:text-style-name="P9" draw:layer="layout" svg:width="2.299cm" svg:height="0.725cm" svg:x="29.701cm" svg:y="4.5cm">
          <draw:text-box>
            <text:p><text:span text:style-name="T2">ir_valid_s</text:span></text:p>
          </draw:text-box>
        </draw:frame>
        <draw:custom-shape draw:style-name="gr197" draw:text-style-name="P14" draw:layer="layout" svg:width="1.2cm" svg:height="1.2cm" svg:x="33.9cm" svg:y="5.001cm">
          <text:p/>
          <draw:enhanced-geometry svg:viewBox="0 0 21600 21600" draw:glue-points="10800 0 0 10800 10800 21600 21600 10800" draw:text-areas="5400 5400 16200 16200" draw:type="diamond" draw:enhanced-path="M 10800 0 L 21600 10800 10800 21600 0 10800 10800 0 Z N"/>
        </draw:custom-shape>
        <draw:frame draw:style-name="gr188" draw:text-style-name="P9" draw:layer="layout" svg:width="0.735cm" svg:height="0.725cm" svg:x="33.8cm" svg:y="5.201cm">
          <draw:text-box>
            <text:p><text:span text:style-name="T2">0</text:span></text:p>
          </draw:text-box>
        </draw:frame>
        <draw:frame draw:style-name="gr188" draw:text-style-name="P9" draw:layer="layout" svg:width="0.735cm" svg:height="0.725cm" svg:x="34.435cm" svg:y="5.201cm">
          <draw:text-box>
            <text:p><text:span text:style-name="T2">1</text:span></text:p>
          </draw:text-box>
        </draw:frame>
        <draw:line draw:style-name="gr38" draw:text-style-name="P4" draw:layer="layout" svg:x1="33.9cm" svg:y1="5.6cm" svg:x2="33.5cm" svg:y2="5.6cm">
          <text:p/>
        </draw:line>
        <draw:line draw:style-name="gr146" draw:text-style-name="P4" draw:layer="layout" svg:x1="33.5cm" svg:y1="5.6cm" svg:x2="33.5cm" svg:y2="6.5cm">
          <text:p/>
        </draw:line>
        <draw:line draw:style-name="gr38" draw:text-style-name="P4" draw:layer="layout" svg:x1="35.1cm" svg:y1="5.6cm" svg:x2="35.5cm" svg:y2="5.6cm">
          <text:p/>
        </draw:line>
        <draw:line draw:style-name="gr146" draw:text-style-name="P4" draw:layer="layout" svg:x1="35.5cm" svg:y1="5.6cm" svg:x2="35.5cm" svg:y2="7cm">
          <text:p/>
        </draw:line>
        <draw:line draw:style-name="gr146" draw:text-style-name="P4" draw:layer="layout" svg:x1="34.5cm" svg:y1="4.5cm" svg:x2="34.5cm" svg:y2="5.001cm">
          <text:p/>
        </draw:line>
        <draw:custom-shape draw:style-name="gr197" draw:text-style-name="P14" draw:layer="layout" svg:width="1.2cm" svg:height="1.2cm" svg:x="34.9cm" svg:y="7.001cm">
          <text:p/>
          <draw:enhanced-geometry svg:viewBox="0 0 21600 21600" draw:glue-points="10800 0 0 10800 10800 21600 21600 10800" draw:text-areas="5400 5400 16200 16200" draw:type="diamond" draw:enhanced-path="M 10800 0 L 21600 10800 10800 21600 0 10800 10800 0 Z N"/>
        </draw:custom-shape>
        <draw:frame draw:style-name="gr188" draw:text-style-name="P9" draw:layer="layout" svg:width="0.735cm" svg:height="0.725cm" svg:x="34.8cm" svg:y="7.201cm">
          <draw:text-box>
            <text:p><text:span text:style-name="T2">0</text:span></text:p>
          </draw:text-box>
        </draw:frame>
        <draw:frame draw:style-name="gr188" draw:text-style-name="P9" draw:layer="layout" svg:width="0.735cm" svg:height="0.725cm" svg:x="35.435cm" svg:y="7.201cm">
          <draw:text-box>
            <text:p><text:span text:style-name="T2">1</text:span></text:p>
          </draw:text-box>
        </draw:frame>
        <draw:line draw:style-name="gr38" draw:text-style-name="P4" draw:layer="layout" svg:x1="34.9cm" svg:y1="7.6cm" svg:x2="34.5cm" svg:y2="7.6cm">
          <text:p/>
        </draw:line>
        <draw:line draw:style-name="gr146" draw:text-style-name="P4" draw:layer="layout" svg:x1="34.5cm" svg:y1="7.6cm" svg:x2="34.5cm" svg:y2="8.5cm">
          <text:p/>
        </draw:line>
        <draw:line draw:style-name="gr38" draw:text-style-name="P4" draw:layer="layout" svg:x1="36.1cm" svg:y1="7.6cm" svg:x2="36.5cm" svg:y2="7.6cm">
          <text:p/>
        </draw:line>
        <draw:line draw:style-name="gr146" draw:text-style-name="P4" draw:layer="layout" svg:x1="36.5cm" svg:y1="7.6cm" svg:x2="36.5cm" svg:y2="9cm">
          <text:p/>
        </draw:line>
        <draw:line draw:style-name="gr38" draw:text-style-name="P4" draw:layer="layout" svg:x1="33cm" svg:y1="7cm" svg:x2="35.5cm" svg:y2="7cm">
          <text:p/>
        </draw:line>
        <draw:frame draw:style-name="gr208" draw:text-style-name="P9" draw:layer="layout" svg:width="3.042cm" svg:height="0.725cm" svg:x="30.001cm" svg:y="6.6cm">
          <draw:text-box>
            <text:p><text:span text:style-name="T2">csr_instr_3</text:span><text:span text:style-name="T2">04</text:span></text:p>
          </draw:text-box>
        </draw:frame>
        <draw:frame draw:style-name="gr110" draw:text-style-name="P9" draw:layer="layout" svg:width="1.302cm" svg:height="0.725cm" svg:x="32.201cm" svg:y="5.6cm">
          <draw:text-box>
            <text:p><text:span text:style-name="T2">hold</text:span></text:p>
          </draw:text-box>
        </draw:frame>
        <draw:frame draw:style-name="gr110" draw:text-style-name="P9" draw:layer="layout" svg:width="1.302cm" svg:height="0.725cm" svg:x="33.201cm" svg:y="7.601cm">
          <draw:text-box>
            <text:p><text:span text:style-name="T2">hold</text:span></text:p>
          </draw:text-box>
        </draw:frame>
        <draw:polygon draw:style-name="gr155" draw:text-style-name="P14" draw:layer="layout" svg:width="0.999cm" svg:height="1.999cm" svg:x="36cm" svg:y="10cm" svg:viewBox="0 0 1000 2000" draw:points="0,0 0,2000 1000,1700 1000,300">
          <text:p/>
        </draw:polygon>
        <draw:line draw:style-name="gr38" draw:text-style-name="P4" draw:layer="layout" svg:x1="33cm" svg:y1="9cm" svg:x2="36.5cm" svg:y2="9cm">
          <text:p/>
        </draw:line>
        <draw:line draw:style-name="gr38" draw:text-style-name="P4" draw:layer="layout" svg:x1="36.5cm" svg:y1="9cm" svg:x2="36.5cm" svg:y2="10.1cm">
          <text:p/>
        </draw:line>
        <draw:frame draw:style-name="gr209" draw:text-style-name="P9" draw:layer="layout" svg:width="2.475cm" svg:height="0.725cm" svg:x="30.702cm" svg:y="8.5cm">
          <draw:text-box>
            <text:p><text:span text:style-name="T2">ir_s[14:12]</text:span></text:p>
          </draw:text-box>
        </draw:frame>
        <draw:line draw:style-name="gr38" draw:text-style-name="P4" draw:layer="layout" svg:x1="35.5cm" svg:y1="10.2cm" svg:x2="36cm" svg:y2="10.2cm">
          <text:p/>
        </draw:line>
        <draw:line draw:style-name="gr38" draw:text-style-name="P4" draw:layer="layout" svg:x1="35.5cm" svg:y1="10.5cm" svg:x2="36cm" svg:y2="10.5cm">
          <text:p/>
        </draw:line>
        <draw:line draw:style-name="gr38" draw:text-style-name="P4" draw:layer="layout" svg:x1="35.5cm" svg:y1="10.8cm" svg:x2="36cm" svg:y2="10.8cm">
          <text:p/>
        </draw:line>
        <draw:line draw:style-name="gr38" draw:text-style-name="P4" draw:layer="layout" svg:x1="35.5cm" svg:y1="11.1cm" svg:x2="36cm" svg:y2="11.1cm">
          <text:p/>
        </draw:line>
        <draw:line draw:style-name="gr38" draw:text-style-name="P4" draw:layer="layout" svg:x1="35.5cm" svg:y1="11.4cm" svg:x2="36cm" svg:y2="11.4cm">
          <text:p/>
        </draw:line>
        <draw:line draw:style-name="gr38" draw:text-style-name="P4" draw:layer="layout" svg:x1="35.5cm" svg:y1="11.7cm" svg:x2="36cm" svg:y2="11.7cm">
          <text:p/>
        </draw:line>
        <draw:frame draw:style-name="gr210" draw:text-style-name="P9" draw:layer="layout" svg:width="1.84cm" svg:height="0.725cm" svg:x="33.853cm" svg:y="9.7cm">
          <draw:text-box>
            <text:p><text:span text:style-name="T2">regA_s</text:span></text:p>
          </draw:text-box>
        </draw:frame>
        <draw:frame draw:style-name="gr211" draw:text-style-name="P9" draw:layer="layout" svg:width="4.117cm" svg:height="0.725cm" svg:x="31.576cm" svg:y="10.1cm">
          <draw:text-box>
            <text:p><text:span text:style-name="T2">csr_mie_s | </text:span><text:span text:style-name="T2">regA_s</text:span></text:p>
          </draw:text-box>
        </draw:frame>
        <draw:frame draw:style-name="gr212" draw:text-style-name="P9" draw:layer="layout" svg:width="4.536cm" svg:height="0.725cm" svg:x="31.157cm" svg:y="10.475cm">
          <draw:text-box>
            <text:p><text:span text:style-name="T2">csr_mie_s </text:span><text:span text:style-name="T2">&amp; ~regA_s</text:span></text:p>
          </draw:text-box>
        </draw:frame>
        <draw:frame draw:style-name="gr213" draw:text-style-name="P9" draw:layer="layout" svg:width="5.84cm" svg:height="0.725cm" svg:x="29.853cm" svg:y="10.876cm">
          <draw:text-box>
            <text:p><text:span text:style-name="T2">{{52{1'b0}}, </text:span><text:span text:style-name="T2">ir_s[19:15], </text:span><text:span text:style-name="T2">7'b0}</text:span></text:p>
          </draw:text-box>
        </draw:frame>
        <draw:frame draw:style-name="gr214" draw:text-style-name="P9" draw:layer="layout" svg:width="8.114cm" svg:height="0.725cm" svg:x="27.579cm" svg:y="11.3cm">
          <draw:text-box>
            <text:p><text:span text:style-name="T2">csr_mie_s | </text:span><text:span text:style-name="T2">{{52{1'b0}}, </text:span><text:span text:style-name="T2">ir_s[19:15], </text:span><text:span text:style-name="T2">7'b0}</text:span></text:p>
          </draw:text-box>
        </draw:frame>
        <draw:frame draw:style-name="gr215" draw:text-style-name="P9" draw:layer="layout" svg:width="8.533cm" svg:height="0.725cm" svg:x="27.16cm" svg:y="11.701cm">
          <draw:text-box>
            <text:p><text:span text:style-name="T2">csr_mie_s </text:span><text:span text:style-name="T2">&amp; </text:span><text:span text:style-name="T2">~{{52{1'b0}}</text:span><text:span text:style-name="T2">, </text:span><text:span text:style-name="T2">ir_s[19:15], </text:span><text:span text:style-name="T2">7'b0}</text:span></text:p>
          </draw:text-box>
        </draw:frame>
        <draw:frame draw:style-name="gr216" draw:text-style-name="P9" draw:layer="layout" svg:width="16.221cm" svg:height="8.309cm" svg:x="24.4cm" svg:y="13.175cm">
          <draw:text-box>
            <text:p><text:span text:style-name="T2">trap_taken_</text:span><text:span text:style-name="T2">s:</text:span></text:p>
            <text:p><text:span text:style-name="T3"><text:s/></text:span><text:span text:style-name="T3">- </text:span><text:span text:style-name="T3">csr_mstatus</text:span><text:span text:style-name="T3">_s[7] = </text:span><text:span text:style-name="T2">csr_mstatus</text:span><text:span text:style-name="T2">_s[3]</text:span></text:p>
            <text:p text:style-name="P6"><text:span text:style-name="T3"><text:s/></text:span><text:span text:style-name="T3">- </text:span><text:span text:style-name="T3">csr_mstatus</text:span><text:span text:style-name="T3">_s[3] = 0</text:span></text:p>
            <text:p text:style-name="P6"><text:span text:style-name="T3">else</text:span></text:p>
            <text:p text:style-name="P6"><text:span text:style-name="T3"><text:s text:c="2"/></text:span><text:span text:style-name="T3">is_mret_s </text:span><text:span text:style-name="T3">&amp;&amp; </text:span><text:span text:style-name="T3">exec_phase</text:span><text:span text:style-name="T3">_s:</text:span></text:p>
            <text:p text:style-name="P6"><text:span text:style-name="T3"><text:s text:c="3"/></text:span><text:span text:style-name="T3">- </text:span><text:span text:style-name="T3">csr_mstatus</text:span><text:span text:style-name="T3">_s[3] = </text:span><text:span text:style-name="T3">csr_mstatus</text:span><text:span text:style-name="T3">_s[7]</text:span></text:p>
            <text:p text:style-name="P6"><text:span text:style-name="T3"><text:s text:c="3"/></text:span><text:span text:style-name="T3">- </text:span><text:span text:style-name="T3">csr_mstatus</text:span><text:span text:style-name="T3">_s[7] = 1</text:span></text:p>
            <text:p text:style-name="P6"><text:span text:style-name="T3"><text:s text:c="2"/></text:span><text:span text:style-name="T3">else</text:span></text:p>
            <text:p text:style-name="P6"><text:span text:style-name="T3"><text:s text:c="4"/></text:span><text:span text:style-name="T3">exec_phase</text:span><text:span text:style-name="T3">_s &amp;&amp; </text:span><text:span text:style-name="T3">ir_valid_s:</text:span></text:p>
            <text:p text:style-name="P6"><text:span text:style-name="T3"><text:s text:c="6"/></text:span><text:span text:style-name="T3">csr_instr_3</text:span><text:span text:style-name="T3">00:</text:span></text:p>
            <text:p text:style-name="P6"><text:span text:style-name="T3"><text:s text:c="8"/></text:span><text:span text:style-name="T3">ir_s[14:12]:</text:span></text:p>
            <text:p text:style-name="P6"><text:span text:style-name="T3"><text:s text:c="10"/></text:span><text:span text:style-name="T3">3'b001: </text:span><text:span text:style-name="T3">csr_mstatus</text:span><text:span text:style-name="T3">_s &lt;= </text:span><text:span text:style-name="T3">regA_s;</text:span></text:p>
            <text:p text:style-name="P6"><text:span text:style-name="T3"><text:s text:c="16"/></text:span><text:span text:style-name="T3">3'b010: </text:span><text:span text:style-name="T3">csr_mstatus</text:span><text:span text:style-name="T3">_s &lt;= </text:span><text:span text:style-name="T3">csr_mstatus</text:span><text:span text:style-name="T3">_s | regA_s;</text:span></text:p>
            <text:p text:style-name="P6"><text:span text:style-name="T3"><text:s text:c="16"/></text:span><text:span text:style-name="T3">3'b011: </text:span><text:span text:style-name="T3">csr_mstatus</text:span><text:span text:style-name="T3">_s &lt;= </text:span><text:span text:style-name="T3">csr_mstatus</text:span><text:span text:style-name="T3">_s &amp; </text:span><text:span text:style-name="T3">~regA_s;</text:span></text:p>
            <text:p text:style-name="P6"><text:span text:style-name="T3"><text:s text:c="16"/></text:span><text:span text:style-name="T3">3'b101: </text:span><text:span text:style-name="T3">csr_mstatus</text:span><text:span text:style-name="T3">_s &lt;= </text:span><text:span text:style-name="T3">{{52{1'b0}}, </text:span><text:span text:style-name="T3">ir_s[19:15], </text:span><text:span text:style-name="T3">7'b0};</text:span></text:p>
            <text:p text:style-name="P6"><text:span text:style-name="T3"><text:s text:c="16"/></text:span><text:span text:style-name="T3">3'b110: </text:span><text:span text:style-name="T3">csr_mstatus</text:span><text:span text:style-name="T3">_s &lt;= </text:span><text:span text:style-name="T3">csr_mstatus</text:span><text:span text:style-name="T3">_s | </text:span><text:span text:style-name="T3">{{52{1'b0}}, </text:span><text:span text:style-name="T3">ir_s[19:15], </text:span><text:span text:style-name="T3">7'b0};</text:span></text:p>
            <text:p text:style-name="P6"><text:span text:style-name="T3"><text:s text:c="16"/></text:span><text:span text:style-name="T3">3'b111: </text:span><text:span text:style-name="T3">csr_mstatus</text:span><text:span text:style-name="T3">_s &lt;= </text:span><text:span text:style-name="T3">csr_mstatus</text:span><text:span text:style-name="T3">_s &amp; </text:span><text:span text:style-name="T3">~{{52{1'b0}}</text:span><text:span text:style-name="T3">, </text:span><text:span text:style-name="T3">ir_s[19:15], </text:span><text:span text:style-name="T3">7'b0};</text:span></text:p>
          </draw:text-box>
        </draw:frame>
      </draw:page>
      <draw:page draw:name="page4" draw:style-name="dp1" draw:master-page-name="Default">
        <draw:frame draw:style-name="gr217" draw:text-style-name="P3" draw:layer="layout" svg:width="3.326cm" svg:height="0.962cm" svg:x="0.99cm" svg:y="0cm">
          <draw:text-box>
            <text:p>Data Path</text:p>
          </draw:text-box>
        </draw:frame>
        <draw:frame draw:style-name="gr218" draw:text-style-name="P9" draw:layer="layout" svg:width="2.949cm" svg:height="0.725cm" svg:x="4.1cm" svg:y="1.575cm">
          <draw:text-box>
            <text:p><text:span text:style-name="T2">trap_taken_</text:span><text:span text:style-name="T2">s</text:span></text:p>
          </draw:text-box>
        </draw:frame>
        <draw:g draw:style-name="gr1">
          <draw:custom-shape draw:style-name="gr154" draw:text-style-name="P14" draw:layer="layout" svg:width="1cm" svg:height="2cm" svg:x="12cm" svg:y="8.7cm">
            <text:p/>
            <draw:enhanced-geometry svg:viewBox="0 0 21600 21600" draw:type="rectangle" draw:enhanced-path="M 0 0 L 21600 0 21600 21600 0 21600 0 0 Z N"/>
          </draw:custom-shape>
          <draw:polygon draw:style-name="gr155" draw:text-style-name="P14" draw:layer="layout" svg:width="0.199cm" svg:height="0.199cm" svg:x="12cm" svg:y="10.4cm" svg:viewBox="0 0 200 200" draw:points="0,200 200,100 0,0">
            <text:p/>
          </draw:polygon>
        </draw:g>
        <draw:line draw:style-name="gr38" draw:text-style-name="P4" draw:layer="layout" svg:x1="13cm" svg:y1="9.2cm" svg:x2="16cm" svg:y2="9.2cm">
          <text:p/>
        </draw:line>
        <draw:frame draw:style-name="gr219" draw:text-style-name="P9" draw:layer="layout" svg:width="1.086cm" svg:height="0.725cm" svg:x="12cm" svg:y="9.175cm">
          <draw:text-box>
            <text:p><text:span text:style-name="T2">PC</text:span></text:p>
          </draw:text-box>
        </draw:frame>
        <draw:frame draw:style-name="gr200" draw:text-style-name="P9" draw:layer="layout" svg:width="2.784cm" svg:height="0.725cm" svg:x="2.016cm" svg:y="11.7cm">
          <draw:text-box>
            <text:p><text:span text:style-name="T2">csr_mepc_s</text:span></text:p>
          </draw:text-box>
        </draw:frame>
        <draw:frame draw:style-name="gr220" draw:text-style-name="P9" draw:layer="layout" svg:width="3.584cm" svg:height="0.725cm" svg:x="1.958cm" svg:y="12.701cm">
          <draw:text-box>
            <text:p><text:span text:style-name="T2">csr_mtvec_</text:span><text:span text:style-name="T2">s, 00</text:span></text:p>
          </draw:text-box>
        </draw:frame>
        <draw:line draw:style-name="gr38" draw:text-style-name="P4" draw:layer="layout" svg:x1="4cm" svg:y1="13.5cm" svg:x2="10cm" svg:y2="13.5cm">
          <text:p/>
        </draw:line>
        <draw:frame draw:style-name="gr221" draw:text-style-name="P22" draw:layer="layout" svg:width="2.665cm" svg:height="0.725cm" svg:x="13cm" svg:y="8.475cm">
          <draw:text-box>
            <text:p><text:span text:style-name="T6">iBusAddr_s</text:span></text:p>
          </draw:text-box>
        </draw:frame>
        <draw:g draw:style-name="gr1">
          <draw:custom-shape draw:style-name="gr154" draw:text-style-name="P14" draw:layer="layout" svg:width="1cm" svg:height="2cm" svg:x="20cm" svg:y="8.7cm">
            <text:p/>
            <draw:enhanced-geometry svg:viewBox="0 0 21600 21600" draw:type="rectangle" draw:enhanced-path="M 0 0 L 21600 0 21600 21600 0 21600 0 0 Z N"/>
          </draw:custom-shape>
          <draw:polygon draw:style-name="gr155" draw:text-style-name="P14" draw:layer="layout" svg:width="0.199cm" svg:height="0.199cm" svg:x="20cm" svg:y="10.4cm" svg:viewBox="0 0 200 200" draw:points="0,200 200,100 0,0">
            <text:p/>
          </draw:polygon>
        </draw:g>
        <draw:frame draw:style-name="gr222" draw:text-style-name="P9" draw:layer="layout" svg:width="0.925cm" svg:height="0.725cm" svg:x="20cm" svg:y="9.175cm">
          <draw:text-box>
            <text:p><text:span text:style-name="T2">IR</text:span></text:p>
          </draw:text-box>
        </draw:frame>
        <draw:frame draw:style-name="gr46" draw:text-style-name="P9" draw:layer="layout" svg:width="1.184cm" svg:height="0.725cm" svg:x="21.001cm" svg:y="8.476cm">
          <draw:text-box>
            <text:p><text:span text:style-name="T2">ir_s</text:span></text:p>
          </draw:text-box>
        </draw:frame>
        <draw:g draw:style-name="gr66">
          <draw:rect draw:style-name="gr223" draw:text-style-name="P16" draw:layer="layout" svg:width="1cm" svg:height="1cm" svg:x="29cm" svg:y="1cm">
            <text:p text:style-name="P15"><text:span text:style-name="T5">1</text:span></text:p>
          </draw:rect>
          <draw:line draw:style-name="gr224" draw:text-style-name="P17" draw:layer="layout" svg:x1="28.5cm" svg:y1="1.5cm" svg:x2="29cm" svg:y2="1.5cm">
            <text:p/>
          </draw:line>
          <draw:circle draw:style-name="gr225" draw:text-style-name="P21" draw:layer="layout" svg:width="0.125cm" svg:height="0.126cm" svg:x="30cm" svg:y="1.437cm">
            <text:p/>
          </draw:circle>
          <draw:line draw:style-name="gr226" draw:text-style-name="P21" draw:layer="layout" svg:x1="30.125cm" svg:y1="1.5cm" svg:x2="30.5cm" svg:y2="1.5cm">
            <text:p/>
          </draw:line>
        </draw:g>
        <draw:line draw:style-name="gr38" draw:text-style-name="P4" draw:layer="layout" svg:x1="21cm" svg:y1="9.201cm" svg:x2="23cm" svg:y2="9.2cm">
          <text:p/>
        </draw:line>
        <draw:g draw:style-name="gr1">
          <draw:custom-shape draw:style-name="gr154" draw:text-style-name="P14" draw:layer="layout" svg:width="1cm" svg:height="2cm" svg:x="20.001cm" svg:y="11.001cm">
            <text:p/>
            <draw:enhanced-geometry svg:viewBox="0 0 21600 21600" draw:type="rectangle" draw:enhanced-path="M 0 0 L 21600 0 21600 21600 0 21600 0 0 Z N"/>
          </draw:custom-shape>
          <draw:polygon draw:style-name="gr155" draw:text-style-name="P14" draw:layer="layout" svg:width="0.199cm" svg:height="0.199cm" svg:x="20.001cm" svg:y="12.701cm" svg:viewBox="0 0 200 200" draw:points="0,200 200,100 0,0">
            <text:p/>
          </draw:polygon>
        </draw:g>
        <draw:frame draw:style-name="gr176" draw:text-style-name="P9" draw:layer="layout" svg:width="2.288cm" svg:height="0.725cm" svg:x="21.002cm" svg:y="10.777cm">
          <draw:text-box>
            <text:p><text:span text:style-name="T2">ir_valid_s</text:span></text:p>
          </draw:text-box>
        </draw:frame>
        <draw:line draw:style-name="gr38" draw:text-style-name="P4" draw:layer="layout" svg:x1="21.001cm" svg:y1="11.502cm" svg:x2="22cm" svg:y2="11.501cm">
          <text:p/>
        </draw:line>
        <draw:g draw:style-name="gr1">
          <draw:custom-shape draw:style-name="gr154" draw:text-style-name="P14" draw:layer="layout" svg:width="1cm" svg:height="2cm" svg:x="16cm" svg:y="8.7cm">
            <text:p/>
            <draw:enhanced-geometry svg:viewBox="0 0 21600 21600" draw:type="rectangle" draw:enhanced-path="M 0 0 L 21600 0 21600 21600 0 21600 0 0 Z N"/>
          </draw:custom-shape>
          <draw:polygon draw:style-name="gr155" draw:text-style-name="P14" draw:layer="layout" svg:width="0.199cm" svg:height="0.199cm" svg:x="16cm" svg:y="10.4cm" svg:viewBox="0 0 200 200" draw:points="0,200 200,100 0,0">
            <text:p/>
          </draw:polygon>
        </draw:g>
        <draw:frame draw:style-name="gr227" draw:text-style-name="P9" draw:layer="layout" svg:width="1.56cm" svg:height="0.725cm" draw:transform="rotate (1.5707963267949) translate (16.116cm 10.42cm)">
          <draw:text-box>
            <text:p><text:span text:style-name="T2">IMem</text:span></text:p>
          </draw:text-box>
        </draw:frame>
        <draw:line draw:style-name="gr38" draw:text-style-name="P4" draw:layer="layout" svg:x1="17cm" svg:y1="9.2cm" svg:x2="18.6cm" svg:y2="9.2cm">
          <text:p/>
        </draw:line>
        <draw:frame draw:style-name="gr228" draw:text-style-name="P22" draw:layer="layout" svg:width="3.207cm" svg:height="0.725cm" svg:x="16.1cm" svg:y="8.5cm">
          <draw:text-box>
            <text:p><text:span text:style-name="T6">iBusDataRd</text:span><text:span text:style-name="T6">_s</text:span></text:p>
          </draw:text-box>
        </draw:frame>
        <draw:g draw:style-name="gr1">
          <draw:custom-shape draw:style-name="gr229" draw:text-style-name="P23" draw:layer="layout" svg:width="2cm" svg:height="6cm" svg:x="25cm" svg:y="8cm">
            <text:p text:style-name="P7"><text:span text:style-name="T2">RegFile</text:span></text:p>
            <draw:enhanced-geometry svg:viewBox="0 0 21600 21600" draw:type="rectangle" draw:enhanced-path="M 0 0 L 21600 0 21600 21600 0 21600 0 0 Z N"/>
          </draw:custom-shape>
          <draw:g draw:style-name="gr66">
            <draw:line draw:style-name="gr230" draw:text-style-name="P24" draw:layer="layout" svg:x1="25cm" svg:y1="13.9cm" svg:x2="25.3cm" svg:y2="13.8cm">
              <text:p/>
            </draw:line>
            <draw:line draw:style-name="gr230" draw:text-style-name="P24" draw:layer="layout" svg:x1="25cm" svg:y1="13.7cm" svg:x2="25.3cm" svg:y2="13.8cm">
              <text:p/>
            </draw:line>
          </draw:g>
          <draw:frame draw:style-name="gr71" draw:text-style-name="P9" draw:layer="layout" svg:width="1.044cm" svg:height="0.725cm" svg:x="25.5cm" svg:y="8cm">
            <draw:text-box>
              <text:p><text:span text:style-name="T2">we</text:span></text:p>
            </draw:text-box>
          </draw:frame>
        </draw:g>
        <draw:line draw:style-name="gr38" draw:text-style-name="P4" draw:layer="layout" svg:x1="26cm" svg:y1="6.5cm" svg:x2="26cm" svg:y2="8cm">
          <text:p/>
        </draw:line>
        <draw:frame draw:style-name="gr209" draw:text-style-name="P9" draw:layer="layout" svg:width="2.475cm" svg:height="0.725cm" svg:x="22.759cm" svg:y="8.4cm">
          <draw:text-box>
            <text:p><text:span text:style-name="T2">ir_s[19:25]</text:span></text:p>
          </draw:text-box>
        </draw:frame>
        <draw:frame draw:style-name="gr209" draw:text-style-name="P9" draw:layer="layout" svg:width="2.475cm" svg:height="0.725cm" svg:x="22.759cm" svg:y="8.901cm">
          <draw:text-box>
            <text:p><text:span text:style-name="T2">ir_s[24:20]</text:span></text:p>
          </draw:text-box>
        </draw:frame>
        <draw:frame draw:style-name="gr231" draw:text-style-name="P9" draw:layer="layout" svg:width="2.208cm" svg:height="0.725cm" svg:x="23.026cm" svg:y="9.402cm">
          <draw:text-box>
            <text:p><text:span text:style-name="T2">ir_s[11:7]</text:span></text:p>
          </draw:text-box>
        </draw:frame>
        <draw:line draw:style-name="gr38" draw:text-style-name="P4" draw:layer="layout" svg:x1="24cm" svg:y1="9cm" svg:x2="25cm" svg:y2="9cm">
          <text:p/>
        </draw:line>
        <draw:line draw:style-name="gr38" draw:text-style-name="P4" draw:layer="layout" svg:x1="24cm" svg:y1="9.5cm" svg:x2="25cm" svg:y2="9.5cm">
          <text:p/>
        </draw:line>
        <draw:line draw:style-name="gr38" draw:text-style-name="P4" draw:layer="layout" svg:x1="24cm" svg:y1="10cm" svg:x2="25cm" svg:y2="10cm">
          <text:p/>
        </draw:line>
        <draw:line draw:style-name="gr38" draw:text-style-name="P4" draw:layer="layout" svg:x1="22.5cm" svg:y1="13cm" svg:x2="25cm" svg:y2="13cm">
          <text:p/>
        </draw:line>
        <draw:frame draw:style-name="gr232" draw:text-style-name="P9" draw:layer="layout" svg:width="3.702cm" svg:height="0.725cm" svg:x="17.498cm" svg:y="16.8cm">
          <draw:text-box>
            <text:p><text:span text:style-name="T2">regfile_data</text:span><text:span text:style-name="T2">_w_s</text:span></text:p>
          </draw:text-box>
        </draw:frame>
        <draw:frame draw:style-name="gr162" draw:text-style-name="P9" draw:layer="layout" svg:width="3.106cm" svg:height="0.725cm" svg:x="23.094cm" svg:y="7.275cm">
          <draw:text-box>
            <text:p><text:span text:style-name="T2">regWr_final</text:span><text:span text:style-name="T2">_s</text:span></text:p>
          </draw:text-box>
        </draw:frame>
        <draw:g draw:style-name="gr66">
          <draw:glue-point draw:id="4" svg:x="5cm" svg:y="0cm"/>
          <draw:glue-point draw:id="5" svg:x="-5cm" svg:y="-2.5cm"/>
          <draw:glue-point draw:id="6" svg:x="-5.005cm" svg:y="2.5cm"/>
          <draw:rect draw:style-name="gr233" draw:text-style-name="P16" draw:layer="layout" svg:width="1cm" svg:height="1cm" svg:x="24.5cm" svg:y="6cm">
            <text:p text:style-name="P15"><text:span text:style-name="T4">&amp;</text:span></text:p>
          </draw:rect>
          <draw:line draw:style-name="gr234" draw:text-style-name="P17" draw:layer="layout" svg:x1="24cm" svg:y1="6.25cm" svg:x2="24.5cm" svg:y2="6.25cm">
            <text:p/>
          </draw:line>
          <draw:line draw:style-name="gr235" draw:text-style-name="P17" draw:layer="layout" svg:x1="24cm" svg:y1="6.75cm" svg:x2="24.5cm" svg:y2="6.75cm">
            <text:p/>
          </draw:line>
          <draw:line draw:style-name="gr236" draw:text-style-name="P17" draw:layer="layout" svg:x1="25.5cm" svg:y1="6.5cm" svg:x2="26cm" svg:y2="6.5cm">
            <text:p/>
          </draw:line>
        </draw:g>
        <draw:frame draw:style-name="gr237" draw:text-style-name="P9" draw:layer="layout" svg:width="3.347cm" svg:height="0.725cm" svg:x="20.848cm" svg:y="6.375cm">
          <draw:text-box>
            <text:p><text:span text:style-name="T2">instr_commi</text:span><text:span text:style-name="T2">t_s</text:span></text:p>
          </draw:text-box>
        </draw:frame>
        <draw:frame draw:style-name="gr238" draw:text-style-name="P25" draw:layer="layout" svg:width="2.094cm" svg:height="0.725cm" svg:x="22.101cm" svg:y="5.876cm">
          <draw:text-box>
            <text:p><text:span text:style-name="T7">regWr_s</text:span></text:p>
          </draw:text-box>
        </draw:frame>
        <draw:line draw:style-name="gr38" draw:text-style-name="P4" draw:layer="layout" svg:x1="27cm" svg:y1="9cm" svg:x2="30cm" svg:y2="9cm">
          <text:p/>
        </draw:line>
        <draw:line draw:style-name="gr38" draw:text-style-name="P4" draw:layer="layout" svg:x1="27cm" svg:y1="13cm" svg:x2="30cm" svg:y2="13.001cm">
          <text:p/>
        </draw:line>
        <draw:frame draw:style-name="gr210" draw:text-style-name="P9" draw:layer="layout" svg:width="1.84cm" svg:height="0.725cm" svg:x="26.994cm" svg:y="8.275cm">
          <draw:text-box>
            <text:p><text:span text:style-name="T2">regA_s</text:span></text:p>
          </draw:text-box>
        </draw:frame>
        <draw:frame draw:style-name="gr239" draw:text-style-name="P22" draw:layer="layout" svg:width="3.338cm" svg:height="0.725cm" svg:x="26.994cm" svg:y="12.276cm">
          <draw:text-box>
            <text:p><text:span text:style-name="T6">dBusDataW</text:span><text:span text:style-name="T6">r_s</text:span></text:p>
          </draw:text-box>
        </draw:frame>
        <draw:custom-shape draw:style-name="gr240" draw:text-style-name="P14" draw:layer="layout" svg:width="2cm" svg:height="1cm" svg:x="25cm" svg:y="15cm">
          <text:p/>
          <draw:enhanced-geometry svg:viewBox="0 0 21600 21600" draw:type="rectangle" draw:enhanced-path="M 0 0 L 21600 0 21600 21600 0 21600 0 0 Z N"/>
        </draw:custom-shape>
        <draw:frame draw:style-name="gr241" draw:text-style-name="P9" draw:layer="layout" svg:width="1.323cm" svg:height="0.725cm" svg:x="25.377cm" svg:y="15.175cm">
          <draw:text-box>
            <text:p><text:span text:style-name="T2">Imm</text:span></text:p>
          </draw:text-box>
        </draw:frame>
        <draw:line draw:style-name="gr38" draw:text-style-name="P4" draw:layer="layout" svg:x1="23.5cm" svg:y1="15.5cm" svg:x2="25cm" svg:y2="15.5cm">
          <text:p/>
        </draw:line>
        <draw:line draw:style-name="gr38" draw:text-style-name="P4" draw:layer="layout" svg:x1="27cm" svg:y1="15.5cm" svg:x2="30cm" svg:y2="15.5cm">
          <text:p/>
        </draw:line>
        <draw:frame draw:style-name="gr46" draw:text-style-name="P9" draw:layer="layout" svg:width="1.184cm" svg:height="0.725cm" svg:x="23.816cm" svg:y="14.775cm">
          <draw:text-box>
            <text:p><text:span text:style-name="T2">ir_s</text:span></text:p>
          </draw:text-box>
        </draw:frame>
        <draw:frame draw:style-name="gr242" draw:text-style-name="P9" draw:layer="layout" svg:width="2.356cm" svg:height="0.725cm" svg:x="27.016cm" svg:y="14.776cm">
          <draw:text-box>
            <text:p><text:span text:style-name="T2">immExt_s</text:span></text:p>
          </draw:text-box>
        </draw:frame>
        <draw:line draw:style-name="gr38" draw:text-style-name="P4" draw:layer="layout" svg:x1="26cm" svg:y1="16cm" svg:x2="26cm" svg:y2="16.5cm">
          <text:p/>
        </draw:line>
        <draw:frame draw:style-name="gr243" draw:text-style-name="P25" draw:layer="layout" svg:width="2.593cm" svg:height="0.725cm" svg:x="24.607cm" svg:y="16.3cm">
          <draw:text-box>
            <text:p><text:span text:style-name="T7">immSrcx_s</text:span></text:p>
          </draw:text-box>
        </draw:frame>
        <draw:polygon draw:style-name="gr155" draw:text-style-name="P14" draw:layer="layout" svg:width="0.999cm" svg:height="1.999cm" svg:x="31cm" svg:y="12.5cm" svg:viewBox="0 0 1000 2000" draw:points="0,0 0,2000 1000,1700 1000,300">
          <text:p/>
        </draw:polygon>
        <draw:line draw:style-name="gr38" draw:text-style-name="P4" draw:layer="layout" svg:x1="30cm" svg:y1="13cm" svg:x2="31cm" svg:y2="13cm">
          <text:p/>
        </draw:line>
        <draw:line draw:style-name="gr38" draw:text-style-name="P4" draw:layer="layout" svg:x1="30cm" svg:y1="14cm" svg:x2="31cm" svg:y2="14cm">
          <text:p/>
        </draw:line>
        <draw:line draw:style-name="gr38" draw:text-style-name="P26" draw:layer="layout" svg:x1="31.5cm" svg:y1="15cm" svg:x2="31.5cm" svg:y2="14.4cm">
          <text:p/>
        </draw:line>
        <draw:line draw:style-name="gr38" draw:text-style-name="P4" draw:layer="layout" svg:x1="32cm" svg:y1="13.5cm" svg:x2="33.995cm" svg:y2="13.5cm">
          <text:p/>
        </draw:line>
        <draw:frame draw:style-name="gr198" draw:text-style-name="P25" draw:layer="layout" svg:width="2.428cm" svg:height="0.725cm" svg:x="30.407cm" svg:y="14.9cm">
          <draw:text-box>
            <text:p><text:span text:style-name="T7">aluSrcB_s</text:span></text:p>
          </draw:text-box>
        </draw:frame>
        <draw:frame draw:style-name="gr244" draw:text-style-name="P9" draw:layer="layout" svg:width="1.793cm" svg:height="0.725cm" svg:x="32.007cm" svg:y="12.803cm">
          <draw:text-box>
            <text:p><text:span text:style-name="T2">srcB_s</text:span></text:p>
          </draw:text-box>
        </draw:frame>
        <draw:line draw:style-name="gr38" draw:text-style-name="P4" draw:layer="layout" svg:x1="30cm" svg:y1="15.5cm" svg:x2="30cm" svg:y2="14cm">
          <text:p/>
        </draw:line>
        <draw:line draw:style-name="gr38" draw:text-style-name="P4" draw:layer="layout" svg:x1="23.5cm" svg:y1="10cm" svg:x2="23.5cm" svg:y2="22.5cm">
          <text:p/>
        </draw:line>
        <draw:polygon draw:style-name="gr155" draw:text-style-name="P14" draw:layer="layout" svg:width="0.999cm" svg:height="1.999cm" svg:x="31cm" svg:y="7.5cm" svg:viewBox="0 0 1000 2000" draw:points="0,0 0,2000 1000,1700 1000,300">
          <text:p/>
        </draw:polygon>
        <draw:line draw:style-name="gr38" draw:text-style-name="P4" draw:layer="layout" svg:x1="30cm" svg:y1="8cm" svg:x2="31cm" svg:y2="8cm">
          <text:p/>
        </draw:line>
        <draw:line draw:style-name="gr38" draw:text-style-name="P4" draw:layer="layout" svg:x1="30cm" svg:y1="9cm" svg:x2="31cm" svg:y2="9cm">
          <text:p/>
        </draw:line>
        <draw:line draw:style-name="gr38" draw:text-style-name="P4" draw:layer="layout" svg:x1="31.5cm" svg:y1="10cm" svg:x2="31.5cm" svg:y2="9.4cm">
          <text:p/>
        </draw:line>
        <draw:line draw:style-name="gr38" draw:text-style-name="P4" draw:layer="layout" svg:x1="32cm" svg:y1="8.5cm" svg:x2="34cm" svg:y2="8.5cm">
          <text:p/>
        </draw:line>
        <draw:frame draw:style-name="gr198" draw:text-style-name="P25" draw:layer="layout" svg:width="2.428cm" svg:height="0.725cm" svg:x="30.407cm" svg:y="9.9cm">
          <draw:text-box>
            <text:p><text:span text:style-name="T7">aluSrcA_s</text:span></text:p>
          </draw:text-box>
        </draw:frame>
        <draw:frame draw:style-name="gr244" draw:text-style-name="P9" draw:layer="layout" svg:width="1.793cm" svg:height="0.725cm" svg:x="32.007cm" svg:y="7.803cm">
          <draw:text-box>
            <text:p><text:span text:style-name="T2">srcA_s</text:span></text:p>
          </draw:text-box>
        </draw:frame>
        <draw:line draw:style-name="gr38" draw:text-style-name="P4" draw:layer="layout" svg:x1="30cm" svg:y1="8.5cm" svg:x2="31cm" svg:y2="8.5cm">
          <text:p/>
        </draw:line>
        <draw:frame draw:style-name="gr188" draw:text-style-name="P9" draw:layer="layout" svg:width="0.735cm" svg:height="0.725cm" svg:x="29.308cm" svg:y="8.104cm">
          <draw:text-box>
            <text:p><text:span text:style-name="T2">0</text:span></text:p>
          </draw:text-box>
        </draw:frame>
        <draw:custom-shape draw:style-name="gr40" draw:text-style-name="P5" draw:layer="layout" svg:width="0.2cm" svg:height="0.2cm" svg:x="15.404cm" svg:y="9.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5.5cm" svg:y1="9.2cm" svg:x2="15.5cm" svg:y2="4.5cm">
          <text:p/>
        </draw:line>
        <draw:line draw:style-name="gr38" draw:text-style-name="P4" draw:layer="layout" svg:x1="15.5cm" svg:y1="5cm" svg:x2="30cm" svg:y2="5cm">
          <text:p/>
        </draw:line>
        <draw:line draw:style-name="gr38" draw:text-style-name="P4" draw:layer="layout" svg:x1="30cm" svg:y1="5cm" svg:x2="30cm" svg:y2="8cm">
          <text:p/>
        </draw:line>
        <draw:polygon draw:style-name="gr155" draw:text-style-name="P14" draw:layer="layout" svg:width="0.999cm" svg:height="1.999cm" svg:x="34cm" svg:y="8cm" svg:viewBox="0 0 1000 2000" draw:points="0,0 0,800 300,1000 0,1200 0,2000 1000,1500 1000,500">
          <text:p/>
        </draw:polygon>
        <draw:frame draw:style-name="gr245" draw:text-style-name="P9" draw:layer="layout" svg:width="1.395cm" svg:height="0.725cm" svg:x="33.805cm" svg:y="8.3cm">
          <draw:text-box>
            <text:p><text:span text:style-name="T2">AluA</text:span></text:p>
          </draw:text-box>
        </draw:frame>
        <draw:polygon draw:style-name="gr155" draw:text-style-name="P14" draw:layer="layout" svg:width="0.999cm" svg:height="1.999cm" svg:x="33.995cm" svg:y="12cm" svg:viewBox="0 0 1000 2000" draw:points="0,0 0,800 300,1000 0,1200 0,2000 1000,1500 1000,500">
          <text:p/>
        </draw:polygon>
        <draw:frame draw:style-name="gr245" draw:text-style-name="P9" draw:layer="layout" svg:width="1.395cm" svg:height="0.725cm" svg:x="33.8cm" svg:y="12.275cm">
          <draw:text-box>
            <text:p><text:span text:style-name="T2">AluB</text:span></text:p>
          </draw:text-box>
        </draw:frame>
        <draw:line draw:style-name="gr38" draw:text-style-name="P4" draw:layer="layout" svg:x1="35cm" svg:y1="9cm" svg:x2="38cm" svg:y2="9.026cm">
          <text:p/>
        </draw:line>
        <draw:line draw:style-name="gr38" draw:text-style-name="P4" draw:layer="layout" svg:x1="35cm" svg:y1="13cm" svg:x2="36cm" svg:y2="13cm">
          <text:p/>
        </draw:line>
        <draw:line draw:style-name="gr38" draw:text-style-name="P4" draw:layer="layout" svg:x1="33cm" svg:y1="12.5cm" svg:x2="34cm" svg:y2="12.5cm">
          <text:p/>
        </draw:line>
        <draw:line draw:style-name="gr38" draw:text-style-name="P4" draw:layer="layout" svg:x1="33.5cm" svg:y1="9.5cm" svg:x2="34cm" svg:y2="9.5cm">
          <text:p/>
        </draw:line>
        <draw:custom-shape draw:style-name="gr40" draw:text-style-name="P5" draw:layer="layout" svg:width="0.2cm" svg:height="0.2cm" svg:x="33.404cm" svg:y="13.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3.504cm" svg:y1="13.5cm" svg:x2="33.5cm" svg:y2="9.5cm">
          <text:p/>
        </draw:line>
        <draw:custom-shape draw:style-name="gr40" draw:text-style-name="P5" draw:layer="layout" svg:width="0.2cm" svg:height="0.2cm" svg:x="32.905cm" svg:y="8.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3.004cm" svg:y1="12.5cm" svg:x2="33cm" svg:y2="8.5cm">
          <text:p/>
        </draw:line>
        <draw:frame draw:style-name="gr246" draw:text-style-name="P9" draw:layer="layout" svg:width="2.263cm" svg:height="0.725cm" svg:x="35.008cm" svg:y="8.304cm">
          <draw:text-box>
            <text:p><text:span text:style-name="T2">aluRes_s</text:span></text:p>
          </draw:text-box>
        </draw:frame>
        <draw:frame draw:style-name="gr247" draw:text-style-name="P9" draw:layer="layout" svg:width="1.747cm" svg:height="0.725cm" svg:x="35.009cm" svg:y="12.305cm">
          <draw:text-box>
            <text:p><text:span text:style-name="T2">take_s</text:span></text:p>
          </draw:text-box>
        </draw:frame>
        <draw:line draw:style-name="gr38" draw:text-style-name="P4" draw:layer="layout" svg:x1="34.5cm" svg:y1="14.4cm" svg:x2="34.5cm" svg:y2="13.8cm">
          <text:p/>
        </draw:line>
        <draw:line draw:style-name="gr38" draw:text-style-name="P4" draw:layer="layout" svg:x1="34.5cm" svg:y1="10.4cm" svg:x2="34.5cm" svg:y2="9.8cm">
          <text:p/>
        </draw:line>
        <draw:frame draw:style-name="gr248" draw:text-style-name="P25" draw:layer="layout" svg:width="2.36cm" svg:height="0.725cm" svg:x="33.34cm" svg:y="10.2cm">
          <draw:text-box>
            <text:p><text:span text:style-name="T7">aluSela_s</text:span></text:p>
          </draw:text-box>
        </draw:frame>
        <draw:frame draw:style-name="gr248" draw:text-style-name="P25" draw:layer="layout" svg:width="2.36cm" svg:height="0.725cm" svg:x="33.24cm" svg:y="14.201cm">
          <draw:text-box>
            <text:p><text:span text:style-name="T7">aluSelb_s</text:span></text:p>
          </draw:text-box>
        </draw:frame>
        <draw:frame draw:style-name="gr249" draw:text-style-name="P22" draw:layer="layout" svg:width="2.805cm" svg:height="0.725cm" svg:x="35.009cm" svg:y="7.905cm">
          <draw:text-box>
            <text:p><text:span text:style-name="T6">dBusAddr_</text:span><text:span text:style-name="T6">s</text:span></text:p>
          </draw:text-box>
        </draw:frame>
        <draw:frame draw:style-name="gr250" draw:text-style-name="P9" draw:layer="layout" svg:width="3.11cm" svg:height="0.725cm" svg:x="35.01cm" svg:y="7.506cm">
          <draw:text-box>
            <text:p><text:span text:style-name="T2">aluCalcRes</text:span><text:span text:style-name="T2">_s</text:span></text:p>
          </draw:text-box>
        </draw:frame>
        <draw:g draw:style-name="gr1">
          <draw:custom-shape draw:style-name="gr154" draw:text-style-name="P14" draw:layer="layout" svg:width="1cm" svg:height="2cm" svg:x="38cm" svg:y="8.5cm">
            <text:p/>
            <draw:enhanced-geometry svg:viewBox="0 0 21600 21600" draw:type="rectangle" draw:enhanced-path="M 0 0 L 21600 0 21600 21600 0 21600 0 0 Z N"/>
          </draw:custom-shape>
          <draw:polygon draw:style-name="gr155" draw:text-style-name="P14" draw:layer="layout" svg:width="0.199cm" svg:height="0.199cm" svg:x="38cm" svg:y="10.2cm" svg:viewBox="0 0 200 200" draw:points="0,200 200,100 0,0">
            <text:p/>
          </draw:polygon>
        </draw:g>
        <draw:frame draw:style-name="gr247" draw:text-style-name="P9" draw:layer="layout" svg:width="1.747cm" svg:height="0.725cm" draw:transform="rotate (1.5707963267949) translate (38.216cm 10.42cm)">
          <draw:text-box>
            <text:p><text:span text:style-name="T2">DMem</text:span></text:p>
          </draw:text-box>
        </draw:frame>
        <draw:frame draw:style-name="gr251" draw:text-style-name="P9" draw:layer="layout" svg:width="2.686cm" svg:height="0.725cm" svg:x="37.3cm" svg:y="10.275cm">
          <draw:text-box>
            <text:p><text:span text:style-name="T2">async. read</text:span></text:p>
          </draw:text-box>
        </draw:frame>
        <draw:frame draw:style-name="gr252" draw:text-style-name="P9" draw:layer="layout" svg:width="0.781cm" svg:height="0.725cm" svg:x="37.8cm" svg:y="8.6cm">
          <draw:text-box>
            <text:p><text:span text:style-name="T2">A</text:span></text:p>
          </draw:text-box>
        </draw:frame>
        <draw:frame draw:style-name="gr253" draw:text-style-name="P9" draw:layer="layout" svg:width="0.807cm" svg:height="0.725cm" svg:x="37.801cm" svg:y="9.101cm">
          <draw:text-box>
            <text:p><text:span text:style-name="T2">D</text:span></text:p>
          </draw:text-box>
        </draw:frame>
        <draw:frame draw:style-name="gr254" draw:text-style-name="P9" draw:layer="layout" svg:width="0.616cm" svg:height="0.725cm" svg:x="37.802cm" svg:y="9.602cm">
          <draw:text-box>
            <text:p><text:span text:style-name="T2">I</text:span></text:p>
          </draw:text-box>
        </draw:frame>
        <draw:frame draw:style-name="gr255" draw:text-style-name="P9" draw:layer="layout" svg:width="1.04cm" svg:height="0.725cm" svg:x="38.202cm" svg:y="8.302cm">
          <draw:text-box>
            <text:p><text:span text:style-name="T2">we</text:span></text:p>
          </draw:text-box>
        </draw:frame>
        <draw:frame draw:style-name="gr237" draw:text-style-name="P22" draw:layer="layout" svg:width="3.347cm" svg:height="0.725cm" svg:x="38.953cm" svg:y="8.8cm">
          <draw:text-box>
            <text:p><text:span text:style-name="T6">dBusDataR</text:span><text:span text:style-name="T6">d_s</text:span></text:p>
          </draw:text-box>
        </draw:frame>
        <draw:line draw:style-name="gr38" draw:text-style-name="P4" draw:layer="layout" svg:x1="38.8cm" svg:y1="6cm" svg:x2="38.8cm" svg:y2="8.5cm">
          <text:p/>
        </draw:line>
        <draw:frame draw:style-name="gr256" draw:text-style-name="P25" draw:layer="layout" svg:width="2.657cm" svg:height="0.725cm" svg:x="34.053cm" svg:y="5.875cm">
          <draw:text-box>
            <text:p><text:span text:style-name="T7">dMemWr_s</text:span></text:p>
          </draw:text-box>
        </draw:frame>
        <draw:g draw:style-name="gr66">
          <draw:glue-point draw:id="4" svg:x="5cm" svg:y="0cm"/>
          <draw:glue-point draw:id="5" svg:x="-5cm" svg:y="-2.5cm"/>
          <draw:glue-point draw:id="6" svg:x="-5.005cm" svg:y="2.5cm"/>
          <draw:rect draw:style-name="gr257" draw:text-style-name="P16" draw:layer="layout" svg:width="1cm" svg:height="1cm" svg:x="37cm" svg:y="5.5cm">
            <text:p text:style-name="P15"><text:span text:style-name="T4">&amp;</text:span></text:p>
          </draw:rect>
          <draw:line draw:style-name="gr258" draw:text-style-name="P17" draw:layer="layout" svg:x1="36.5cm" svg:y1="5.75cm" svg:x2="37cm" svg:y2="5.75cm">
            <text:p/>
          </draw:line>
          <draw:line draw:style-name="gr259" draw:text-style-name="P17" draw:layer="layout" svg:x1="36.5cm" svg:y1="6.25cm" svg:x2="37cm" svg:y2="6.25cm">
            <text:p/>
          </draw:line>
          <draw:line draw:style-name="gr260" draw:text-style-name="P17" draw:layer="layout" svg:x1="38cm" svg:y1="6cm" svg:x2="38.5cm" svg:y2="6cm">
            <text:p/>
          </draw:line>
        </draw:g>
        <draw:frame draw:style-name="gr237" draw:text-style-name="P9" draw:layer="layout" svg:width="3.347cm" svg:height="0.725cm" svg:x="32.7cm" svg:y="5.1cm">
          <draw:text-box>
            <text:p><text:span text:style-name="T2">exec_phase</text:span></text:p>
          </draw:text-box>
        </draw:frame>
        <draw:line draw:style-name="gr38" draw:text-style-name="P4" draw:layer="layout" svg:x1="36cm" svg:y1="5.5cm" svg:x2="36.5cm" svg:y2="5.5cm">
          <text:p/>
        </draw:line>
        <draw:line draw:style-name="gr38" draw:text-style-name="P4" draw:layer="layout" svg:x1="36.5cm" svg:y1="5.75cm" svg:x2="36.5cm" svg:y2="5.5cm">
          <text:p/>
        </draw:line>
        <draw:line draw:style-name="gr38" draw:text-style-name="P4" draw:layer="layout" svg:x1="38.5cm" svg:y1="6cm" svg:x2="38.8cm" svg:y2="6cm">
          <text:p/>
        </draw:line>
        <draw:line draw:style-name="gr38" draw:text-style-name="P4" draw:layer="layout" svg:x1="39cm" svg:y1="9.5cm" svg:x2="40cm" svg:y2="9.5cm">
          <text:p/>
        </draw:line>
        <draw:line draw:style-name="gr38" draw:text-style-name="P4" draw:layer="layout" svg:x1="36.5cm" svg:y1="9.5cm" svg:x2="38cm" svg:y2="9.5cm">
          <text:p/>
        </draw:line>
        <draw:line draw:style-name="gr38" draw:text-style-name="P4" draw:layer="layout" svg:x1="37cm" svg:y1="10cm" svg:x2="38cm" svg:y2="10cm">
          <text:p/>
        </draw:line>
        <draw:frame draw:style-name="gr46" draw:text-style-name="P9" draw:layer="layout" svg:width="1.184cm" svg:height="0.725cm" svg:x="36.916cm" svg:y="9.4cm">
          <draw:text-box>
            <text:p><text:span text:style-name="T2">ir_s</text:span></text:p>
          </draw:text-box>
        </draw:frame>
        <draw:custom-shape draw:style-name="gr40" draw:text-style-name="P5" draw:layer="layout" svg:width="0.2cm" svg:height="0.2cm" svg:x="30.405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0.5cm" svg:y1="11.5cm" svg:x2="36.5cm" svg:y2="11.5cm">
          <text:p/>
        </draw:line>
        <draw:line draw:style-name="gr38" draw:text-style-name="P4" draw:layer="layout" svg:x1="36.5cm" svg:y1="11.5cm" svg:x2="36.5cm" svg:y2="9.5cm">
          <text:p/>
        </draw:line>
        <draw:line draw:style-name="gr38" draw:text-style-name="P4" draw:layer="layout" svg:x1="30.5cm" svg:y1="13cm" svg:x2="30.5cm" svg:y2="11.5cm">
          <text:p/>
        </draw:line>
        <draw:line draw:style-name="gr38" draw:text-style-name="P4" draw:layer="layout" svg:x1="37cm" svg:y1="10cm" svg:x2="37cm" svg:y2="18cm">
          <text:p/>
        </draw:line>
        <draw:line draw:style-name="gr38" draw:text-style-name="P4" draw:layer="layout" svg:x1="23.5cm" svg:y1="18cm" svg:x2="37cm" svg:y2="18cm">
          <text:p/>
        </draw:line>
        <draw:custom-shape draw:style-name="gr40" draw:text-style-name="P5" draw:layer="layout" svg:width="0.2cm" svg:height="0.2cm" svg:x="23.406cm" svg:y="15.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55" draw:text-style-name="P14" draw:layer="layout" svg:width="0.999cm" svg:height="1.999cm" svg:x="8cm" svg:y="16.5cm" svg:viewBox="0 0 1000 2000" draw:points="0,0 0,2000 1000,1700 1000,300">
          <text:p/>
        </draw:polygon>
        <draw:line draw:style-name="gr38" draw:text-style-name="P4" draw:layer="layout" svg:x1="8.5cm" svg:y1="19cm" svg:x2="8.5cm" svg:y2="18.4cm">
          <text:p/>
        </draw:line>
        <draw:line draw:style-name="gr38" draw:text-style-name="P4" draw:layer="layout" svg:x1="7cm" svg:y1="16.7cm" svg:x2="8cm" svg:y2="16.7cm">
          <text:p/>
        </draw:line>
        <draw:line draw:style-name="gr38" draw:text-style-name="P4" draw:layer="layout" svg:x1="6.6cm" svg:y1="17.2cm" svg:x2="8cm" svg:y2="17.2cm">
          <text:p/>
        </draw:line>
        <draw:line draw:style-name="gr38" draw:text-style-name="P4" draw:layer="layout" svg:x1="6cm" svg:y1="17.8cm" svg:x2="8cm" svg:y2="17.8cm">
          <text:p/>
        </draw:line>
        <draw:line draw:style-name="gr38" draw:text-style-name="P4" draw:layer="layout" svg:x1="4cm" svg:y1="18.301cm" svg:x2="8cm" svg:y2="18.3cm">
          <text:p/>
        </draw:line>
        <draw:line draw:style-name="gr38" draw:text-style-name="P4" draw:layer="layout" svg:x1="9cm" svg:y1="17.5cm" svg:x2="22.498cm" svg:y2="17.5cm">
          <text:p/>
        </draw:line>
        <draw:frame draw:style-name="gr261" draw:text-style-name="P9" draw:layer="layout" svg:width="1.984cm" svg:height="0.725cm" svg:x="9cm" svg:y="16.8cm">
          <draw:text-box>
            <text:p><text:span text:style-name="T2">result_s</text:span></text:p>
          </draw:text-box>
        </draw:frame>
        <draw:line draw:style-name="gr38" draw:text-style-name="P4" draw:layer="layout" svg:x1="35.5cm" svg:y1="9cm" svg:x2="35.5cm" svg:y2="19cm">
          <text:p/>
        </draw:line>
        <draw:custom-shape draw:style-name="gr40" draw:text-style-name="P5" draw:layer="layout" svg:width="0.2cm" svg:height="0.2cm" svg:x="35.406cm" svg:y="8.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7cm" svg:y1="19cm" svg:x2="35.5cm" svg:y2="19cm">
          <text:p/>
        </draw:line>
        <draw:line draw:style-name="gr38" draw:text-style-name="P4" draw:layer="layout" svg:x1="40cm" svg:y1="9.5cm" svg:x2="40cm" svg:y2="19.5cm">
          <text:p/>
        </draw:line>
        <draw:line draw:style-name="gr38" draw:text-style-name="P4" draw:layer="layout" svg:x1="16cm" svg:y1="19.5cm" svg:x2="40cm" svg:y2="19.5cm">
          <text:p/>
        </draw:line>
        <draw:line draw:style-name="gr38" draw:text-style-name="P4" draw:layer="layout" svg:x1="7cm" svg:y1="16.7cm" svg:x2="7cm" svg:y2="16cm">
          <text:p/>
        </draw:line>
        <draw:line draw:style-name="gr38" draw:text-style-name="P4" draw:layer="layout" svg:x1="6.6cm" svg:y1="15.5cm" svg:x2="6.6cm" svg:y2="17.2cm">
          <text:p/>
        </draw:line>
        <draw:frame draw:style-name="gr262" draw:text-style-name="P9" draw:layer="layout" svg:width="2.005cm" svg:height="0.725cm" svg:x="4.195cm" svg:y="14.875cm">
          <draw:text-box>
            <text:p><text:span text:style-name="T2">PCp4_s</text:span></text:p>
          </draw:text-box>
        </draw:frame>
        <draw:frame draw:style-name="gr156" draw:text-style-name="P9" draw:layer="layout" svg:width="2.572cm" svg:height="0.725cm" svg:x="1.928cm" svg:y="17.5cm">
          <draw:text-box>
            <text:p><text:span text:style-name="T2">csr_data_s</text:span></text:p>
          </draw:text-box>
        </draw:frame>
        <draw:frame draw:style-name="gr263" draw:text-style-name="P25" draw:layer="layout" svg:width="2.83cm" svg:height="0.725cm" svg:x="6.195cm" svg:y="19.1cm">
          <draw:text-box>
            <text:p><text:span text:style-name="T7">resultSrcx_</text:span><text:span text:style-name="T7">s</text:span></text:p>
          </draw:text-box>
        </draw:frame>
        <draw:line draw:style-name="gr38" draw:text-style-name="P4" draw:layer="layout" svg:x1="22.5cm" svg:y1="17.5cm" svg:x2="22.498cm" svg:y2="13cm">
          <text:p/>
        </draw:line>
        <draw:g draw:style-name="gr1">
          <draw:custom-shape draw:style-name="gr165" draw:text-style-name="P14" draw:layer="layout" svg:width="0.4cm" svg:height="0.4cm" svg:x="3.8cm" svg:y="13.301cm">
            <text:p/>
            <draw:enhanced-geometry svg:viewBox="0 0 21600 21600" draw:type="rectangle" draw:enhanced-path="M 0 0 L 21600 0 21600 21600 0 21600 0 0 Z N"/>
          </draw:custom-shape>
          <draw:line draw:style-name="gr38" draw:text-style-name="P4" draw:layer="layout" svg:x1="3.8cm" svg:y1="13.301cm" svg:x2="4.2cm" svg:y2="13.701cm">
            <text:p/>
          </draw:line>
          <draw:line draw:style-name="gr38" draw:text-style-name="P4" draw:layer="layout" svg:x1="3.8cm" svg:y1="13.701cm" svg:x2="4.2cm" svg:y2="13.301cm">
            <text:p/>
          </draw:line>
        </draw:g>
        <draw:g draw:style-name="gr1">
          <draw:custom-shape draw:style-name="gr165" draw:text-style-name="P14" draw:layer="layout" svg:width="0.4cm" svg:height="0.4cm" svg:x="6.8cm" svg:y="1.8cm">
            <text:p/>
            <draw:enhanced-geometry svg:viewBox="0 0 21600 21600" draw:type="rectangle" draw:enhanced-path="M 0 0 L 21600 0 21600 21600 0 21600 0 0 Z N"/>
          </draw:custom-shape>
          <draw:line draw:style-name="gr38" draw:text-style-name="P4" draw:layer="layout" svg:x1="6.8cm" svg:y1="1.8cm" svg:x2="7.2cm" svg:y2="2.2cm">
            <text:p/>
          </draw:line>
          <draw:line draw:style-name="gr38" draw:text-style-name="P4" draw:layer="layout" svg:x1="6.8cm" svg:y1="2.2cm" svg:x2="7.2cm" svg:y2="1.8cm">
            <text:p/>
          </draw:line>
        </draw:g>
        <draw:line draw:style-name="gr38" draw:text-style-name="P26" draw:layer="layout" svg:x1="31cm" svg:y1="21cm" svg:x2="32cm" svg:y2="21cm">
          <text:p/>
        </draw:line>
        <draw:line draw:style-name="gr38" draw:text-style-name="P26" draw:layer="layout" svg:x1="31cm" svg:y1="21.5cm" svg:x2="32cm" svg:y2="21.5cm">
          <text:p/>
        </draw:line>
        <draw:line draw:style-name="gr38" draw:text-style-name="P26" draw:layer="layout" svg:x1="31cm" svg:y1="22.5cm" svg:x2="32cm" svg:y2="22.5cm">
          <text:p/>
        </draw:line>
        <draw:line draw:style-name="gr38" draw:text-style-name="P26" draw:layer="layout" svg:x1="31cm" svg:y1="23cm" svg:x2="32cm" svg:y2="23cm">
          <text:p/>
        </draw:line>
        <draw:line draw:style-name="gr38" draw:text-style-name="P26" draw:layer="layout" svg:x1="31cm" svg:y1="23.5cm" svg:x2="32cm" svg:y2="23.5cm">
          <text:p/>
        </draw:line>
        <draw:line draw:style-name="gr38" draw:text-style-name="P26" draw:layer="layout" svg:x1="31cm" svg:y1="24cm" svg:x2="32cm" svg:y2="24cm">
          <text:p/>
        </draw:line>
        <draw:line draw:style-name="gr38" draw:text-style-name="P26" draw:layer="layout" svg:x1="31cm" svg:y1="24.5cm" svg:x2="32cm" svg:y2="24.5cm">
          <text:p/>
        </draw:line>
        <draw:line draw:style-name="gr38" draw:text-style-name="P26" draw:layer="layout" svg:x1="31cm" svg:y1="25cm" svg:x2="32cm" svg:y2="25cm">
          <text:p/>
        </draw:line>
        <draw:line draw:style-name="gr38" draw:text-style-name="P26" draw:layer="layout" svg:x1="31cm" svg:y1="25.5cm" svg:x2="32cm" svg:y2="25.5cm">
          <text:p/>
        </draw:line>
        <draw:line draw:style-name="gr38" draw:text-style-name="P26" draw:layer="layout" svg:x1="31cm" svg:y1="26cm" svg:x2="35.5cm" svg:y2="26cm">
          <text:p/>
        </draw:line>
        <draw:line draw:style-name="gr38" draw:text-style-name="P4" draw:layer="layout" svg:x1="28cm" svg:y1="22cm" svg:x2="29cm" svg:y2="22cm">
          <text:p/>
        </draw:line>
        <draw:line draw:style-name="gr38" draw:text-style-name="P4" draw:layer="layout" svg:x1="28cm" svg:y1="22.5cm" svg:x2="29cm" svg:y2="22.5cm">
          <text:p/>
        </draw:line>
        <draw:line draw:style-name="gr38" draw:text-style-name="P4" draw:layer="layout" svg:x1="28cm" svg:y1="23cm" svg:x2="29cm" svg:y2="23cm">
          <text:p/>
        </draw:line>
        <draw:line draw:style-name="gr38" draw:text-style-name="P4" draw:layer="layout" svg:x1="26cm" svg:y1="21.5cm" svg:x2="29cm" svg:y2="21.5cm">
          <text:p/>
        </draw:line>
        <draw:custom-shape draw:style-name="gr264" draw:text-style-name="P14" draw:layer="layout" svg:width="2cm" svg:height="6cm" svg:x="29cm" svg:y="20.5cm">
          <text:p/>
          <draw:enhanced-geometry svg:viewBox="0 0 21600 21600" draw:type="rectangle" draw:enhanced-path="M 0 0 L 21600 0 21600 21600 0 21600 0 0 Z N"/>
        </draw:custom-shape>
        <draw:frame draw:style-name="gr200" draw:text-style-name="P9" draw:layer="layout" svg:width="2.784cm" svg:height="0.725cm" draw:transform="rotate (1.5707963267949) translate (29.617cm 25.721cm)">
          <draw:text-box>
            <text:p><text:span text:style-name="T2">InstrDecode</text:span></text:p>
          </draw:text-box>
        </draw:frame>
        <draw:frame draw:style-name="gr262" draw:text-style-name="P9" draw:layer="layout" svg:width="2.005cm" svg:height="0.725cm" svg:x="26.995cm" svg:y="21.4cm">
          <draw:text-box>
            <text:p><text:span text:style-name="T2">ir_s[6:0]</text:span></text:p>
          </draw:text-box>
        </draw:frame>
        <draw:frame draw:style-name="gr209" draw:text-style-name="P9" draw:layer="layout" svg:width="2.475cm" svg:height="0.725cm" svg:x="26.525cm" svg:y="21.9cm">
          <draw:text-box>
            <text:p><text:span text:style-name="T2">ir_s[14:12]</text:span></text:p>
          </draw:text-box>
        </draw:frame>
        <draw:frame draw:style-name="gr265" draw:text-style-name="P9" draw:layer="layout" svg:width="1.886cm" svg:height="0.725cm" svg:x="27.114cm" svg:y="22.4cm">
          <draw:text-box>
            <text:p><text:span text:style-name="T2">ir_s[30]</text:span></text:p>
          </draw:text-box>
        </draw:frame>
        <draw:frame draw:style-name="gr247" draw:text-style-name="P9" draw:layer="layout" svg:width="1.747cm" svg:height="0.725cm" svg:x="27.253cm" svg:y="20.9cm">
          <draw:text-box>
            <text:p><text:span text:style-name="T2">take_s</text:span></text:p>
          </draw:text-box>
        </draw:frame>
        <draw:frame draw:style-name="gr263" draw:text-style-name="P25" draw:layer="layout" svg:width="2.83cm" svg:height="0.725cm" svg:x="30.96cm" svg:y="20.375cm">
          <draw:text-box>
            <text:p><text:span text:style-name="T7">resultSrcx_</text:span><text:span text:style-name="T7">s</text:span></text:p>
          </draw:text-box>
        </draw:frame>
        <draw:frame draw:style-name="gr256" draw:text-style-name="P25" draw:layer="layout" svg:width="2.657cm" svg:height="0.725cm" svg:x="30.96cm" svg:y="20.876cm">
          <draw:text-box>
            <text:p><text:span text:style-name="T7">dMemWr_s</text:span></text:p>
          </draw:text-box>
        </draw:frame>
        <draw:frame draw:style-name="gr198" draw:text-style-name="P25" draw:layer="layout" svg:width="2.428cm" svg:height="0.725cm" svg:x="30.96cm" svg:y="21.9cm">
          <draw:text-box>
            <text:p><text:span text:style-name="T7">aluSrcA_s</text:span></text:p>
          </draw:text-box>
        </draw:frame>
        <draw:frame draw:style-name="gr198" draw:text-style-name="P25" draw:layer="layout" svg:width="2.428cm" svg:height="0.725cm" svg:x="30.96cm" svg:y="22.375cm">
          <draw:text-box>
            <text:p><text:span text:style-name="T7">aluSrcB_s</text:span></text:p>
          </draw:text-box>
        </draw:frame>
        <draw:frame draw:style-name="gr238" draw:text-style-name="P25" draw:layer="layout" svg:width="2.094cm" svg:height="0.725cm" svg:x="30.96cm" svg:y="22.876cm">
          <draw:text-box>
            <text:p><text:span text:style-name="T7">regWr_s</text:span></text:p>
          </draw:text-box>
        </draw:frame>
        <draw:frame draw:style-name="gr266" draw:text-style-name="P25" draw:layer="layout" svg:width="1.865cm" svg:height="0.725cm" svg:x="30.96cm" svg:y="23.375cm">
          <draw:text-box>
            <text:p><text:span text:style-name="T7">jump_s</text:span></text:p>
          </draw:text-box>
        </draw:frame>
        <draw:frame draw:style-name="gr243" draw:text-style-name="P25" draw:layer="layout" svg:width="2.593cm" svg:height="0.725cm" svg:x="30.96cm" svg:y="23.876cm">
          <draw:text-box>
            <text:p><text:span text:style-name="T7">immSrcx_s</text:span></text:p>
          </draw:text-box>
        </draw:frame>
        <draw:frame draw:style-name="gr248" draw:text-style-name="P25" draw:layer="layout" svg:width="2.36cm" svg:height="0.725cm" svg:x="30.96cm" svg:y="24.4cm">
          <draw:text-box>
            <text:p><text:span text:style-name="T7">aluSela_s</text:span></text:p>
          </draw:text-box>
        </draw:frame>
        <draw:frame draw:style-name="gr248" draw:text-style-name="P25" draw:layer="layout" svg:width="2.36cm" svg:height="0.725cm" svg:x="30.96cm" svg:y="24.875cm">
          <draw:text-box>
            <text:p><text:span text:style-name="T7">aluSelb_s</text:span></text:p>
          </draw:text-box>
        </draw:frame>
        <draw:frame draw:style-name="gr267" draw:text-style-name="P25" draw:layer="layout" svg:width="4.24cm" svg:height="0.725cm" svg:x="30.96cm" svg:y="25.4cm">
          <draw:text-box>
            <text:p><text:span text:style-name="T7">trap_illegal_</text:span><text:span text:style-name="T7">instrx_s</text:span></text:p>
          </draw:text-box>
        </draw:frame>
        <draw:custom-shape draw:style-name="gr40" draw:text-style-name="P5" draw:layer="layout" svg:width="0.2cm" svg:height="0.2cm" svg:x="23.407cm" svg:y="17.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3.5cm" svg:y1="22.5cm" svg:x2="27cm" svg:y2="22.5cm">
          <text:p/>
        </draw:line>
        <draw:line draw:style-name="gr38" draw:text-style-name="P4" draw:layer="layout" svg:x1="26cm" svg:y1="20cm" svg:x2="36cm" svg:y2="20cm">
          <text:p/>
        </draw:line>
        <draw:line draw:style-name="gr38" draw:text-style-name="P4" draw:layer="layout" svg:x1="36cm" svg:y1="13.03cm" svg:x2="36cm" svg:y2="20cm">
          <text:p/>
        </draw:line>
        <draw:line draw:style-name="gr38" draw:text-style-name="P4" draw:layer="layout" svg:x1="26cm" svg:y1="20cm" svg:x2="26cm" svg:y2="21.5cm">
          <text:p/>
        </draw:line>
        <draw:g draw:style-name="gr1">
          <draw:custom-shape draw:style-name="gr165" draw:text-style-name="P27" draw:layer="layout" svg:width="0.4cm" svg:height="0.4cm" svg:x="40.8cm" svg:y="25.3cm">
            <text:p/>
            <draw:enhanced-geometry svg:viewBox="0 0 21600 21600" draw:type="rectangle" draw:enhanced-path="M 0 0 L 21600 0 21600 21600 0 21600 0 0 Z N"/>
          </draw:custom-shape>
          <draw:line draw:style-name="gr38" draw:text-style-name="P26" draw:layer="layout" svg:x1="40.8cm" svg:y1="25.3cm" svg:x2="41.2cm" svg:y2="25.7cm">
            <text:p/>
          </draw:line>
          <draw:line draw:style-name="gr38" draw:text-style-name="P26" draw:layer="layout" svg:x1="40.8cm" svg:y1="25.7cm" svg:x2="41.2cm" svg:y2="25.3cm">
            <text:p/>
          </draw:line>
        </draw:g>
        <draw:g draw:style-name="gr66">
          <draw:glue-point draw:id="4" svg:x="5cm" svg:y="0cm"/>
          <draw:glue-point draw:id="5" svg:x="-5cm" svg:y="-2.5cm"/>
          <draw:glue-point draw:id="6" svg:x="-5.005cm" svg:y="2.5cm"/>
          <draw:rect draw:style-name="gr268" draw:text-style-name="P16" draw:layer="layout" svg:width="1cm" svg:height="1cm" svg:x="29cm" svg:y="27cm">
            <text:p text:style-name="P15"><text:span text:style-name="T4">&amp;</text:span></text:p>
          </draw:rect>
          <draw:line draw:style-name="gr269" draw:text-style-name="P17" draw:layer="layout" svg:x1="28.5cm" svg:y1="27.25cm" svg:x2="29cm" svg:y2="27.25cm">
            <text:p/>
          </draw:line>
          <draw:line draw:style-name="gr270" draw:text-style-name="P17" draw:layer="layout" svg:x1="28.5cm" svg:y1="27.75cm" svg:x2="29cm" svg:y2="27.75cm">
            <text:p/>
          </draw:line>
          <draw:line draw:style-name="gr271" draw:text-style-name="P17" draw:layer="layout" svg:x1="30cm" svg:y1="27.5cm" svg:x2="30.5cm" svg:y2="27.5cm">
            <text:p/>
          </draw:line>
        </draw:g>
        <draw:polygon draw:style-name="gr155" draw:text-style-name="P14" draw:layer="layout" svg:width="0.999cm" svg:height="1.999cm" svg:x="35.5cm" svg:y="24.5cm" svg:viewBox="0 0 1000 2000" draw:points="0,0 0,2000 1000,1700 1000,300">
          <text:p/>
        </draw:polygon>
        <draw:frame draw:style-name="gr267" draw:text-style-name="P25" draw:layer="layout" svg:width="4.24cm" svg:height="0.725cm" svg:x="36.46cm" svg:y="24.775cm">
          <draw:text-box>
            <text:p><text:span text:style-name="T7">trap_illegal_</text:span><text:span text:style-name="T7">instr_s</text:span></text:p>
          </draw:text-box>
        </draw:frame>
        <draw:line draw:style-name="gr38" draw:text-style-name="P4" draw:layer="layout" svg:x1="36cm" svg:y1="26.4cm" svg:x2="36cm" svg:y2="27.5cm">
          <text:p/>
        </draw:line>
        <draw:line draw:style-name="gr38" draw:text-style-name="P4" draw:layer="layout" svg:x1="30.5cm" svg:y1="27.5cm" svg:x2="36cm" svg:y2="27.5cm">
          <text:p/>
        </draw:line>
        <draw:line draw:style-name="gr38" draw:text-style-name="P4" draw:layer="layout" svg:x1="36.5cm" svg:y1="25.5cm" svg:x2="41cm" svg:y2="25.5cm">
          <text:p/>
        </draw:line>
        <draw:line draw:style-name="gr38" draw:text-style-name="P4" draw:layer="layout" svg:x1="35cm" svg:y1="25cm" svg:x2="35.5cm" svg:y2="25cm">
          <text:p/>
        </draw:line>
        <draw:frame draw:style-name="gr188" draw:text-style-name="P25" draw:layer="layout" svg:width="0.735cm" svg:height="0.725cm" svg:x="34.4cm" svg:y="24.6cm">
          <draw:text-box>
            <text:p><text:span text:style-name="T7">0</text:span></text:p>
          </draw:text-box>
        </draw:frame>
        <draw:frame draw:style-name="gr199" draw:text-style-name="P9" draw:layer="layout" svg:width="3.228cm" svg:height="0.725cm" svg:x="25.372cm" svg:y="27.375cm">
          <draw:text-box>
            <text:p><text:span text:style-name="T2">exec_phase</text:span><text:span text:style-name="T2">_s</text:span></text:p>
          </draw:text-box>
        </draw:frame>
        <draw:line draw:style-name="gr38" draw:text-style-name="P4" draw:layer="layout" svg:x1="22cm" svg:y1="11.502cm" svg:x2="22cm" svg:y2="27cm">
          <text:p/>
        </draw:line>
        <draw:line draw:style-name="gr38" draw:text-style-name="P4" draw:layer="layout" svg:x1="28.5cm" svg:y1="27.25cm" svg:x2="28.5cm" svg:y2="27cm">
          <text:p/>
        </draw:line>
        <draw:line draw:style-name="gr38" draw:text-style-name="P4" draw:layer="layout" svg:x1="28.5cm" svg:y1="27cm" svg:x2="22cm" svg:y2="27cm">
          <text:p/>
        </draw:line>
        <draw:g draw:style-name="gr66">
          <draw:glue-point draw:id="4" svg:x="5cm" svg:y="0cm"/>
          <draw:glue-point draw:id="5" svg:x="-5cm" svg:y="-2.5cm"/>
          <draw:glue-point draw:id="6" svg:x="-5.005cm" svg:y="2.5cm"/>
          <draw:rect draw:style-name="gr272" draw:text-style-name="P16" draw:layer="layout" svg:width="1cm" svg:height="1cm" svg:x="31cm" svg:y="2cm">
            <text:p text:style-name="P15"><text:span text:style-name="T4">&amp;</text:span></text:p>
          </draw:rect>
          <draw:line draw:style-name="gr273" draw:text-style-name="P17" draw:layer="layout" svg:x1="30.5cm" svg:y1="2.25cm" svg:x2="31cm" svg:y2="2.25cm">
            <text:p/>
          </draw:line>
          <draw:line draw:style-name="gr274" draw:text-style-name="P17" draw:layer="layout" svg:x1="30.5cm" svg:y1="2.75cm" svg:x2="31cm" svg:y2="2.75cm">
            <text:p/>
          </draw:line>
          <draw:line draw:style-name="gr275" draw:text-style-name="P17" draw:layer="layout" svg:x1="32cm" svg:y1="2.5cm" svg:x2="32.5cm" svg:y2="2.5cm">
            <text:p/>
          </draw:line>
        </draw:g>
        <draw:g draw:style-name="gr66">
          <draw:glue-point draw:id="4" svg:x="5cm" svg:y="0cm"/>
          <draw:glue-point draw:id="5" svg:x="-5cm" svg:y="-2.5cm"/>
          <draw:glue-point draw:id="6" svg:x="-5.005cm" svg:y="2.5cm"/>
          <draw:rect draw:style-name="gr276" draw:text-style-name="P16" draw:layer="layout" svg:width="1cm" svg:height="1cm" svg:x="24cm" svg:y="1cm">
            <text:p text:style-name="P15"><text:span text:style-name="T4">&amp;</text:span></text:p>
          </draw:rect>
          <draw:line draw:style-name="gr277" draw:text-style-name="P17" draw:layer="layout" svg:x1="23.5cm" svg:y1="1.25cm" svg:x2="24cm" svg:y2="1.25cm">
            <text:p/>
          </draw:line>
          <draw:line draw:style-name="gr278" draw:text-style-name="P17" draw:layer="layout" svg:x1="23.5cm" svg:y1="1.75cm" svg:x2="24cm" svg:y2="1.75cm">
            <text:p/>
          </draw:line>
          <draw:line draw:style-name="gr279" draw:text-style-name="P17" draw:layer="layout" svg:x1="25cm" svg:y1="1.5cm" svg:x2="25.5cm" svg:y2="1.5cm">
            <text:p/>
          </draw:line>
        </draw:g>
        <draw:frame draw:style-name="gr237" draw:text-style-name="P9" draw:layer="layout" svg:width="3.347cm" svg:height="0.725cm" svg:x="33.953cm" svg:y="2.8cm">
          <draw:text-box>
            <text:p><text:span text:style-name="T2">instr_commi</text:span><text:span text:style-name="T2">t_s</text:span></text:p>
          </draw:text-box>
        </draw:frame>
        <draw:custom-shape draw:style-name="gr40" draw:text-style-name="P5" draw:layer="layout" svg:width="0.2cm" svg:height="0.2cm" svg:x="21.904cm" svg:y="11.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7" draw:text-style-name="P9" draw:layer="layout" svg:width="3.347cm" svg:height="0.725cm" svg:x="20.454cm" svg:y="0.801cm">
          <draw:text-box>
            <text:p><text:span text:style-name="T2">exec_phase</text:span><text:span text:style-name="T2">_s</text:span></text:p>
          </draw:text-box>
        </draw:frame>
        <draw:frame draw:style-name="gr185" draw:text-style-name="P9" draw:layer="layout" svg:width="3.491cm" svg:height="0.725cm" svg:x="25cm" svg:y="0.775cm">
          <draw:text-box>
            <text:p><text:span text:style-name="T2">load_pendi</text:span><text:span text:style-name="T2">ng_s</text:span></text:p>
          </draw:text-box>
        </draw:frame>
        <draw:custom-shape draw:style-name="gr280" draw:text-style-name="P28" draw:layer="layout" svg:width="1cm" svg:height="1cm" svg:x="14cm" svg:y="12cm">
          <text:p text:style-name="P1">+</text:p>
          <draw:enhanced-geometry svg:viewBox="0 0 21600 21600" draw:type="rectangle" draw:enhanced-path="M 0 0 L 21600 0 21600 21600 0 21600 0 0 Z N"/>
        </draw:custom-shape>
        <draw:custom-shape draw:style-name="gr40" draw:text-style-name="P5" draw:layer="layout" svg:width="0.2cm" svg:height="0.2cm" svg:x="13.405cm" svg:y="9.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3.5cm" svg:y1="9.2cm" svg:x2="13.5cm" svg:y2="12.2cm">
          <text:p/>
        </draw:line>
        <draw:line draw:style-name="gr38" draw:text-style-name="P4" draw:layer="layout" svg:x1="13.5cm" svg:y1="12.2cm" svg:x2="14cm" svg:y2="12.2cm">
          <text:p/>
        </draw:line>
        <draw:line draw:style-name="gr38" draw:text-style-name="P4" draw:layer="layout" svg:x1="13.5cm" svg:y1="12.8cm" svg:x2="14cm" svg:y2="12.8cm">
          <text:p/>
        </draw:line>
        <draw:frame draw:style-name="gr188" draw:text-style-name="P9" draw:layer="layout" svg:width="0.735cm" svg:height="0.725cm" svg:x="12.965cm" svg:y="12.4cm">
          <draw:text-box>
            <text:p><text:span text:style-name="T2">4</text:span></text:p>
          </draw:text-box>
        </draw:frame>
        <draw:line draw:style-name="gr38" draw:text-style-name="P4" draw:layer="layout" svg:x1="15cm" svg:y1="12.5cm" svg:x2="16cm" svg:y2="12.5cm">
          <text:p/>
        </draw:line>
        <draw:frame draw:style-name="gr262" draw:text-style-name="P9" draw:layer="layout" svg:width="2.005cm" svg:height="0.725cm" svg:x="15cm" svg:y="11.8cm">
          <draw:text-box>
            <text:p><text:span text:style-name="T2">PCp4_s</text:span></text:p>
          </draw:text-box>
        </draw:frame>
        <draw:line draw:style-name="gr38" draw:text-style-name="P4" draw:layer="layout" svg:x1="16cm" svg:y1="12.5cm" svg:x2="16cm" svg:y2="15cm">
          <text:p/>
        </draw:line>
        <draw:line draw:style-name="gr38" draw:text-style-name="P4" draw:layer="layout" svg:x1="2cm" svg:y1="15cm" svg:x2="16cm" svg:y2="15cm">
          <text:p/>
        </draw:line>
        <draw:line draw:style-name="gr38" draw:text-style-name="P4" draw:layer="layout" svg:x1="6cm" svg:y1="15cm" svg:x2="6cm" svg:y2="17.8cm">
          <text:p/>
        </draw:line>
        <draw:polygon draw:style-name="gr155" draw:text-style-name="P14" draw:layer="layout" svg:width="0.999cm" svg:height="1.999cm" svg:x="13cm" svg:y="4cm" svg:viewBox="0 0 1000 2000" draw:points="1000,0 1000,2000 0,1700 0,300">
          <text:p/>
        </draw:polygon>
        <draw:custom-shape draw:style-name="gr280" draw:text-style-name="P28" draw:layer="layout" svg:width="1cm" svg:height="1cm" svg:x="13cm" svg:y="2cm">
          <text:p text:style-name="P1">+</text:p>
          <draw:enhanced-geometry svg:viewBox="0 0 21600 21600" draw:type="rectangle" draw:enhanced-path="M 0 0 L 21600 0 21600 21600 0 21600 0 0 Z N"/>
        </draw:custom-shape>
        <draw:frame draw:style-name="gr281" draw:text-style-name="P9" draw:layer="layout" svg:width="2.733cm" svg:height="0.725cm" draw:transform="rotate (1.5707963267949) translate (11.91cm 5.23cm)">
          <draw:text-box>
            <text:p><text:span text:style-name="T2">PCorRS1_s</text:span></text:p>
          </draw:text-box>
        </draw:frame>
        <draw:line draw:style-name="gr38" draw:text-style-name="P4" draw:layer="layout" svg:x1="12.5cm" svg:y1="5cm" svg:x2="13cm" svg:y2="5cm">
          <text:p/>
        </draw:line>
        <draw:line draw:style-name="gr38" draw:text-style-name="P4" draw:layer="layout" svg:x1="13.5cm" svg:y1="7cm" svg:x2="13.5cm" svg:y2="5.9cm">
          <text:p/>
        </draw:line>
        <draw:frame draw:style-name="gr266" draw:text-style-name="P25" draw:layer="layout" svg:width="1.865cm" svg:height="0.725cm" svg:x="12.535cm" svg:y="6.8cm">
          <draw:text-box>
            <text:p><text:span text:style-name="T7">jump_s</text:span></text:p>
          </draw:text-box>
        </draw:frame>
        <draw:line draw:style-name="gr38" draw:text-style-name="P4" draw:layer="layout" svg:x1="14cm" svg:y1="4.5cm" svg:x2="15.5cm" svg:y2="4.5cm">
          <text:p/>
        </draw:line>
        <draw:line draw:style-name="gr38" draw:text-style-name="P4" draw:layer="layout" svg:x1="14cm" svg:y1="5.5cm" svg:x2="15cm" svg:y2="5.5cm">
          <text:p/>
        </draw:line>
        <draw:frame draw:style-name="gr210" draw:text-style-name="P9" draw:layer="layout" svg:width="1.84cm" svg:height="0.725cm" svg:x="13.26cm" svg:y="4.875cm">
          <draw:text-box>
            <text:p><text:span text:style-name="T2">regA_s</text:span></text:p>
          </draw:text-box>
        </draw:frame>
        <draw:line draw:style-name="gr38" draw:text-style-name="P4" draw:layer="layout" svg:x1="14cm" svg:y1="2.5cm" svg:x2="16cm" svg:y2="2.5cm">
          <text:p/>
        </draw:line>
        <draw:frame draw:style-name="gr282" draw:text-style-name="P9" draw:layer="layout" svg:width="1.912cm" svg:height="0.725cm" svg:x="13.988cm" svg:y="1.8cm">
          <draw:text-box>
            <text:p><text:span text:style-name="T2">PCbr_s</text:span></text:p>
          </draw:text-box>
        </draw:frame>
        <draw:line draw:style-name="gr38" draw:text-style-name="P4" draw:layer="layout" svg:x1="12.5cm" svg:y1="2.8cm" svg:x2="13cm" svg:y2="2.8cm">
          <text:p/>
        </draw:line>
        <draw:frame draw:style-name="gr242" draw:text-style-name="P9" draw:layer="layout" svg:width="2.356cm" svg:height="0.725cm" svg:x="10.944cm" svg:y="1.575cm">
          <draw:text-box>
            <text:p><text:span text:style-name="T2">immExt_s</text:span></text:p>
          </draw:text-box>
        </draw:frame>
        <draw:line draw:style-name="gr38" draw:text-style-name="P4" draw:layer="layout" svg:x1="12.5cm" svg:y1="5cm" svg:x2="12.5cm" svg:y2="2.8cm">
          <text:p/>
        </draw:line>
        <draw:line draw:style-name="gr38" draw:text-style-name="P4" draw:layer="layout" svg:x1="12cm" svg:y1="2.2cm" svg:x2="13cm" svg:y2="2.2cm">
          <text:p/>
        </draw:line>
        <draw:custom-shape draw:style-name="gr40" draw:text-style-name="P5" draw:layer="layout" svg:width="0.2cm" svg:height="0.2cm" svg:x="15.405cm" svg:y="4.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5cm" svg:y1="5.3cm" svg:x2="29cm" svg:y2="5.3cm">
          <text:p/>
        </draw:line>
        <draw:line draw:style-name="gr38" draw:text-style-name="P4" draw:layer="layout" svg:x1="15cm" svg:y1="5.5cm" svg:x2="15cm" svg:y2="5.3cm">
          <text:p/>
        </draw:line>
        <draw:line draw:style-name="gr38" draw:text-style-name="P4" draw:layer="layout" svg:x1="29cm" svg:y1="5.3cm" svg:x2="29cm" svg:y2="9cm">
          <text:p/>
        </draw:line>
        <draw:custom-shape draw:style-name="gr40" draw:text-style-name="P5" draw:layer="layout" svg:width="0.2cm" svg:height="0.2cm" svg:x="28.9cm" svg:y="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cm" svg:y1="1.5cm" svg:x2="16cm" svg:y2="1.5cm">
          <text:p/>
        </draw:line>
        <draw:line draw:style-name="gr38" draw:text-style-name="P4" draw:layer="layout" svg:x1="16cm" svg:y1="1.5cm" svg:x2="16cm" svg:y2="2.5cm">
          <text:p/>
        </draw:line>
        <draw:custom-shape draw:style-name="gr40" draw:text-style-name="P5" draw:layer="layout" svg:width="0.2cm" svg:height="0.2cm" svg:x="5.903cm" svg:y="14.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1">
          <draw:custom-shape draw:style-name="gr165" draw:text-style-name="P14" draw:layer="layout" svg:width="0.4cm" svg:height="0.4cm" svg:x="3.8cm" svg:y="18.101cm">
            <text:p/>
            <draw:enhanced-geometry svg:viewBox="0 0 21600 21600" draw:type="rectangle" draw:enhanced-path="M 0 0 L 21600 0 21600 21600 0 21600 0 0 Z N"/>
          </draw:custom-shape>
          <draw:line draw:style-name="gr38" draw:text-style-name="P4" draw:layer="layout" svg:x1="3.8cm" svg:y1="18.101cm" svg:x2="4.2cm" svg:y2="18.501cm">
            <text:p/>
          </draw:line>
          <draw:line draw:style-name="gr38" draw:text-style-name="P4" draw:layer="layout" svg:x1="3.8cm" svg:y1="18.501cm" svg:x2="4.2cm" svg:y2="18.101cm">
            <text:p/>
          </draw:line>
        </draw:g>
        <draw:custom-shape draw:style-name="gr283" draw:text-style-name="P20" draw:layer="layout" svg:width="3.4cm" svg:height="1.1cm" svg:x="25.2cm" svg:y="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3" draw:text-style-name="P20" draw:layer="layout" svg:width="3.4cm" svg:height="1.1cm" svg:x="20.301cm" svg:y="0.6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3" draw:text-style-name="P20" draw:layer="layout" svg:width="3.4cm" svg:height="1.1cm" svg:x="32.604cm" svg:y="4.8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3" draw:text-style-name="P20" draw:layer="layout" svg:width="3.4cm" svg:height="1.1cm" svg:x="20.7cm" svg:y="6.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1">
          <draw:custom-shape draw:style-name="gr165" draw:text-style-name="P14" draw:layer="layout" svg:width="0.4cm" svg:height="0.4cm" svg:x="3.8cm" svg:y="12.3cm">
            <text:p/>
            <draw:enhanced-geometry svg:viewBox="0 0 21600 21600" draw:type="rectangle" draw:enhanced-path="M 0 0 L 21600 0 21600 21600 0 21600 0 0 Z N"/>
          </draw:custom-shape>
          <draw:line draw:style-name="gr38" draw:text-style-name="P4" draw:layer="layout" svg:x1="3.8cm" svg:y1="12.3cm" svg:x2="4.2cm" svg:y2="12.7cm">
            <text:p/>
          </draw:line>
          <draw:line draw:style-name="gr38" draw:text-style-name="P4" draw:layer="layout" svg:x1="3.8cm" svg:y1="12.7cm" svg:x2="4.2cm" svg:y2="12.3cm">
            <text:p/>
          </draw:line>
        </draw:g>
        <draw:frame draw:style-name="gr262" draw:text-style-name="P9" draw:layer="layout" svg:width="2.005cm" svg:height="0.725cm" svg:x="13.595cm" svg:y="9.105cm">
          <draw:text-box>
            <text:p><text:span text:style-name="T2">PC_s</text:span></text:p>
          </draw:text-box>
        </draw:frame>
        <draw:polygon draw:style-name="gr155" draw:text-style-name="P14" draw:layer="layout" svg:width="0.999cm" svg:height="1.999cm" svg:x="6.5cm" svg:y="7.2cm" svg:viewBox="0 0 1000 2000" draw:points="0,0 0,2000 1000,1700 1000,300">
          <text:p/>
        </draw:polygon>
        <draw:line draw:style-name="gr38" draw:text-style-name="P4" draw:layer="layout" svg:x1="2cm" svg:y1="7.7cm" svg:x2="6.5cm" svg:y2="7.7cm">
          <text:p/>
        </draw:line>
        <draw:line draw:style-name="gr38" draw:text-style-name="P4" draw:layer="layout" svg:x1="7cm" svg:y1="6.2cm" svg:x2="7cm" svg:y2="7.3cm">
          <text:p/>
        </draw:line>
        <draw:line draw:style-name="gr38" draw:text-style-name="P4" draw:layer="layout" svg:x1="3cm" svg:y1="8.7cm" svg:x2="6.5cm" svg:y2="8.7cm">
          <text:p/>
        </draw:line>
        <draw:frame draw:style-name="gr247" draw:text-style-name="P25" draw:layer="layout" svg:width="1.747cm" svg:height="0.725cm" svg:x="5.7cm" svg:y="5.4cm">
          <draw:text-box>
            <text:p><text:span text:style-name="T7">take_s</text:span></text:p>
          </draw:text-box>
        </draw:frame>
        <draw:frame draw:style-name="gr262" draw:text-style-name="P9" draw:layer="layout" svg:width="2.005cm" svg:height="0.725cm" svg:x="4.495cm" svg:y="7cm">
          <draw:text-box>
            <text:p><text:span text:style-name="T2">PCp4_s</text:span></text:p>
          </draw:text-box>
        </draw:frame>
        <draw:frame draw:style-name="gr282" draw:text-style-name="P9" draw:layer="layout" svg:width="1.912cm" svg:height="0.725cm" svg:x="4.4cm" svg:y="8.1cm">
          <draw:text-box>
            <text:p><text:span text:style-name="T2">PCbr_s</text:span></text:p>
          </draw:text-box>
        </draw:frame>
        <draw:line draw:style-name="gr38" draw:text-style-name="P4" draw:layer="layout" svg:x1="7.5cm" svg:y1="8.2cm" svg:x2="8.5cm" svg:y2="8.2cm">
          <text:p/>
        </draw:line>
        <draw:line draw:style-name="gr38" draw:text-style-name="P4" draw:layer="layout" svg:x1="9cm" svg:y1="3cm" svg:x2="9cm" svg:y2="7.8cm">
          <text:p/>
        </draw:line>
        <draw:line draw:style-name="gr38" draw:text-style-name="P4" draw:layer="layout" svg:x1="8cm" svg:y1="9.2cm" svg:x2="8.5cm" svg:y2="9.2cm">
          <text:p/>
        </draw:line>
        <draw:polygon draw:style-name="gr155" draw:text-style-name="P14" draw:layer="layout" svg:width="0.999cm" svg:height="1.999cm" svg:x="8.5cm" svg:y="7.7cm" svg:viewBox="0 0 1000 2000" draw:points="0,0 0,2000 1000,1700 1000,300">
          <text:p/>
        </draw:polygon>
        <draw:line draw:style-name="gr38" draw:text-style-name="P4" draw:layer="layout" svg:x1="9.5cm" svg:y1="8.7cm" svg:x2="10.451cm" svg:y2="8.7cm">
          <text:p/>
        </draw:line>
        <draw:line draw:style-name="gr38" draw:text-style-name="P4" draw:layer="layout" svg:x1="11.451cm" svg:y1="9.2cm" svg:x2="12cm" svg:y2="9.2cm">
          <text:p/>
        </draw:line>
        <draw:line draw:style-name="gr38" draw:text-style-name="P4" draw:layer="layout" svg:x1="10cm" svg:y1="9.7cm" svg:x2="10.451cm" svg:y2="9.7cm">
          <text:p/>
        </draw:line>
        <draw:polygon draw:style-name="gr155" draw:text-style-name="P14" draw:layer="layout" svg:width="0.999cm" svg:height="1.999cm" svg:x="10.451cm" svg:y="8.2cm" svg:viewBox="0 0 1000 2000" draw:points="0,0 0,2000 1000,1700 1000,300">
          <text:p/>
        </draw:polygon>
        <draw:line draw:style-name="gr38" draw:text-style-name="P4" draw:layer="layout" svg:x1="11cm" svg:y1="2cm" svg:x2="11cm" svg:y2="8.3cm">
          <text:p/>
        </draw:line>
        <draw:custom-shape draw:style-name="gr284" draw:text-style-name="P29" draw:layer="layout" svg:width="3.4cm" svg:height="1.1cm" svg:x="6.6cm" svg:y="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cm" svg:y1="12.5cm" svg:x2="8cm" svg:y2="12.5cm">
          <text:p/>
        </draw:line>
        <draw:line draw:style-name="gr38" draw:text-style-name="P4" draw:layer="layout" svg:x1="8cm" svg:y1="12.5cm" svg:x2="8cm" svg:y2="9.2cm">
          <text:p/>
        </draw:line>
        <draw:line draw:style-name="gr38" draw:text-style-name="P4" draw:layer="layout" svg:x1="10cm" svg:y1="13.5cm" svg:x2="10cm" svg:y2="9.7cm">
          <text:p/>
        </draw:line>
        <draw:frame draw:style-name="gr185" draw:text-style-name="P9" draw:layer="layout" svg:width="3.491cm" svg:height="0.725cm" svg:x="6.6cm" svg:y="7.775cm">
          <draw:text-box>
            <text:p><text:span text:style-name="T2">fetch0_pha</text:span><text:span text:style-name="T2">se_s</text:span></text:p>
          </draw:text-box>
        </draw:frame>
        <draw:frame draw:style-name="gr187" draw:text-style-name="P9" draw:layer="layout" svg:width="3.537cm" svg:height="0.725cm" svg:x="3.501cm" svg:y="2.576cm">
          <draw:text-box>
            <text:p><text:span text:style-name="T2">mret_pendi</text:span><text:span text:style-name="T2">ng_s</text:span></text:p>
          </draw:text-box>
        </draw:frame>
        <draw:g draw:style-name="gr1">
          <draw:custom-shape draw:style-name="gr165" draw:text-style-name="P14" draw:layer="layout" svg:width="0.4cm" svg:height="0.4cm" svg:x="6.8cm" svg:y="2.8cm">
            <text:p/>
            <draw:enhanced-geometry svg:viewBox="0 0 21600 21600" draw:type="rectangle" draw:enhanced-path="M 0 0 L 21600 0 21600 21600 0 21600 0 0 Z N"/>
          </draw:custom-shape>
          <draw:line draw:style-name="gr38" draw:text-style-name="P4" draw:layer="layout" svg:x1="6.8cm" svg:y1="2.8cm" svg:x2="7.2cm" svg:y2="3.2cm">
            <text:p/>
          </draw:line>
          <draw:line draw:style-name="gr38" draw:text-style-name="P4" draw:layer="layout" svg:x1="6.8cm" svg:y1="3.2cm" svg:x2="7.2cm" svg:y2="2.8cm">
            <text:p/>
          </draw:line>
        </draw:g>
        <draw:line draw:style-name="gr38" draw:text-style-name="P4" draw:layer="layout" svg:x1="7.038cm" svg:y1="3cm" svg:x2="9cm" svg:y2="3cm">
          <text:p/>
        </draw:line>
        <draw:line draw:style-name="gr38" draw:text-style-name="P4" draw:layer="layout" svg:x1="6.9cm" svg:y1="2cm" svg:x2="11cm" svg:y2="2cm">
          <text:p/>
        </draw:line>
        <draw:line draw:style-name="gr38" draw:text-style-name="P4" draw:layer="layout" svg:x1="3cm" svg:y1="1.5cm" svg:x2="3cm" svg:y2="8.7cm">
          <text:p/>
        </draw:line>
        <draw:line draw:style-name="gr38" draw:text-style-name="P4" draw:layer="layout" svg:x1="2cm" svg:y1="7.7cm" svg:x2="2cm" svg:y2="15cm">
          <text:p/>
        </draw:line>
        <draw:polygon draw:style-name="gr155" draw:text-style-name="P14" draw:layer="layout" svg:width="0.999cm" svg:height="1.999cm" svg:x="18.6cm" svg:y="9cm" svg:viewBox="0 0 1000 2000" draw:points="0,0 0,2000 1000,1700 1000,300">
          <text:p/>
        </draw:polygon>
        <draw:line draw:style-name="gr38" draw:text-style-name="P4" draw:layer="layout" svg:x1="19.207cm" svg:y1="8.5cm" svg:x2="19.207cm" svg:y2="9.173cm">
          <text:p/>
        </draw:line>
        <draw:frame draw:style-name="gr285" draw:text-style-name="P25" draw:layer="layout" svg:width="5.417cm" svg:height="1.673cm" svg:x="15.99cm" svg:y="6.7cm">
          <draw:text-box>
            <text:p><text:span text:style-name="T7">!</text:span><text:span text:style-name="T7">mret_pendi</text:span><text:span text:style-name="T7">ng_s,</text:span></text:p>
            <text:p><text:span text:style-name="T7">trap_taken</text:span></text:p>
            <text:p><text:span text:style-name="T7">is_mret &amp;&amp; </text:span><text:span text:style-name="T7">exec_phase</text:span><text:span text:style-name="T7">_s</text:span></text:p>
          </draw:text-box>
        </draw:frame>
        <draw:frame draw:style-name="gr286" draw:text-style-name="P9" draw:layer="layout" svg:width="2.619cm" svg:height="0.725cm" svg:x="16.3cm" svg:y="10.7cm">
          <draw:text-box>
            <text:p><text:span text:style-name="T2">h00000013</text:span></text:p>
          </draw:text-box>
        </draw:frame>
        <draw:line draw:style-name="gr38" draw:text-style-name="P4" draw:layer="layout" svg:x1="19.6cm" svg:y1="9.5cm" svg:x2="20cm" svg:y2="9.5cm">
          <text:p/>
        </draw:line>
        <draw:line draw:style-name="gr38" draw:text-style-name="P4" draw:layer="layout" svg:x1="17.7cm" svg:y1="10.8cm" svg:x2="18.6cm" svg:y2="10.8cm">
          <text:p/>
        </draw:line>
        <draw:polygon draw:style-name="gr155" draw:text-style-name="P14" draw:layer="layout" svg:width="0.999cm" svg:height="1.999cm" svg:x="18.6cm" svg:y="11.1cm" svg:viewBox="0 0 1000 2000" draw:points="0,0 0,2000 1000,1700 1000,300">
          <text:p/>
        </draw:polygon>
        <draw:line draw:style-name="gr38" draw:text-style-name="P4" draw:layer="layout" svg:x1="19.6cm" svg:y1="11.6cm" svg:x2="20cm" svg:y2="11.6cm">
          <text:p/>
        </draw:line>
        <draw:line draw:style-name="gr38" draw:text-style-name="P4" draw:layer="layout" svg:x1="18.6cm" svg:y1="11.5cm" svg:x2="18.3cm" svg:y2="11.5cm">
          <text:p/>
        </draw:line>
        <draw:line draw:style-name="gr38" draw:text-style-name="P4" draw:layer="layout" svg:x1="18.6cm" svg:y1="12.5cm" svg:x2="18.3cm" svg:y2="12.5cm">
          <text:p/>
        </draw:line>
        <draw:frame draw:style-name="gr188" draw:text-style-name="P9" draw:layer="layout" svg:width="0.735cm" svg:height="0.725cm" svg:x="17.765cm" svg:y="11.2cm">
          <draw:text-box>
            <text:p><text:span text:style-name="T2">1</text:span></text:p>
          </draw:text-box>
        </draw:frame>
        <draw:frame draw:style-name="gr188" draw:text-style-name="P9" draw:layer="layout" svg:width="0.735cm" svg:height="0.725cm" svg:x="17.766cm" svg:y="12.201cm">
          <draw:text-box>
            <text:p><text:span text:style-name="T2">0</text:span></text:p>
          </draw:text-box>
        </draw:frame>
        <draw:line draw:style-name="gr38" draw:text-style-name="P4" draw:layer="layout" svg:x1="19.2cm" svg:y1="11.2cm" svg:x2="19.2cm" svg:y2="10.8cm">
          <text:p/>
        </draw:line>
        <draw:frame draw:style-name="gr218" draw:text-style-name="P9" draw:layer="layout" svg:width="2.949cm" svg:height="0.725cm" svg:x="3.502cm" svg:y="3.577cm">
          <draw:text-box>
            <text:p><text:span text:style-name="T2">is_mret_s</text:span></text:p>
          </draw:text-box>
        </draw:frame>
        <draw:g draw:style-name="gr1">
          <draw:custom-shape draw:style-name="gr165" draw:text-style-name="P14" draw:layer="layout" svg:width="0.4cm" svg:height="0.4cm" svg:x="6.801cm" svg:y="3.801cm">
            <text:p/>
            <draw:enhanced-geometry svg:viewBox="0 0 21600 21600" draw:type="rectangle" draw:enhanced-path="M 0 0 L 21600 0 21600 21600 0 21600 0 0 Z N"/>
          </draw:custom-shape>
          <draw:line draw:style-name="gr38" draw:text-style-name="P4" draw:layer="layout" svg:x1="6.801cm" svg:y1="3.801cm" svg:x2="7.201cm" svg:y2="4.201cm">
            <text:p/>
          </draw:line>
          <draw:line draw:style-name="gr38" draw:text-style-name="P4" draw:layer="layout" svg:x1="6.801cm" svg:y1="4.201cm" svg:x2="7.201cm" svg:y2="3.801cm">
            <text:p/>
          </draw:line>
        </draw:g>
        <draw:line draw:style-name="gr38" draw:text-style-name="P4" draw:layer="layout" svg:x1="7.039cm" svg:y1="4.001cm" svg:x2="8cm" svg:y2="4.001cm">
          <text:p/>
        </draw:line>
        <draw:g draw:style-name="gr1">
          <draw:custom-shape draw:style-name="gr287" draw:text-style-name="P30" draw:layer="layout" svg:width="10.2cm" svg:height="7.1cm" svg:x="10cm" svg:y="20.8cm">
            <text:p/>
            <draw:enhanced-geometry svg:viewBox="0 0 21600 21600" draw:type="rectangle" draw:enhanced-path="M 0 0 L 21600 0 21600 21600 0 21600 0 0 Z N"/>
          </draw:custom-shape>
          <draw:line draw:style-name="gr38" draw:text-style-name="P4" draw:layer="layout" svg:x1="14cm" svg:y1="22cm" svg:x2="14cm" svg:y2="21cm">
            <text:p/>
          </draw:line>
          <draw:line draw:style-name="gr38" draw:text-style-name="P4" draw:layer="layout" svg:x1="14cm" svg:y1="21cm" svg:x2="15cm" svg:y2="21cm">
            <text:p/>
          </draw:line>
          <draw:line draw:style-name="gr38" draw:text-style-name="P4" draw:layer="layout" svg:x1="15cm" svg:y1="22cm" svg:x2="15cm" svg:y2="21cm">
            <text:p/>
          </draw:line>
          <draw:line draw:style-name="gr38" draw:text-style-name="P4" draw:layer="layout" svg:x1="14cm" svg:y1="24cm" svg:x2="15cm" svg:y2="24cm">
            <text:p/>
          </draw:line>
          <draw:line draw:style-name="gr38" draw:text-style-name="P4" draw:layer="layout" svg:x1="15cm" svg:y1="24cm" svg:x2="15cm" svg:y2="23cm">
            <text:p/>
          </draw:line>
          <draw:line draw:style-name="gr38" draw:text-style-name="P4" draw:layer="layout" svg:x1="15cm" svg:y1="23cm" svg:x2="16cm" svg:y2="23cm">
            <text:p/>
          </draw:line>
          <draw:line draw:style-name="gr38" draw:text-style-name="P4" draw:layer="layout" svg:x1="16cm" svg:y1="24cm" svg:x2="16cm" svg:y2="23cm">
            <text:p/>
          </draw:line>
          <draw:line draw:style-name="gr38" draw:text-style-name="P4" draw:layer="layout" svg:x1="14cm" svg:y1="26cm" svg:x2="16cm" svg:y2="26cm">
            <text:p/>
          </draw:line>
          <draw:line draw:style-name="gr38" draw:text-style-name="P4" draw:layer="layout" svg:x1="16cm" svg:y1="26cm" svg:x2="16cm" svg:y2="25cm">
            <text:p/>
          </draw:line>
          <draw:line draw:style-name="gr38" draw:text-style-name="P4" draw:layer="layout" svg:x1="16cm" svg:y1="25cm" svg:x2="17cm" svg:y2="25cm">
            <text:p/>
          </draw:line>
          <draw:line draw:style-name="gr38" draw:text-style-name="P4" draw:layer="layout" svg:x1="17cm" svg:y1="26cm" svg:x2="17cm" svg:y2="25cm">
            <text:p/>
          </draw:line>
          <draw:line draw:style-name="gr38" draw:text-style-name="P4" draw:layer="layout" svg:x1="15cm" svg:y1="22cm" svg:x2="17cm" svg:y2="22cm">
            <text:p/>
          </draw:line>
          <draw:line draw:style-name="gr38" draw:text-style-name="P4" draw:layer="layout" svg:x1="17cm" svg:y1="22cm" svg:x2="17cm" svg:y2="21cm">
            <text:p/>
          </draw:line>
          <draw:line draw:style-name="gr38" draw:text-style-name="P4" draw:layer="layout" svg:x1="17cm" svg:y1="21cm" svg:x2="18cm" svg:y2="21cm">
            <text:p/>
          </draw:line>
          <draw:line draw:style-name="gr38" draw:text-style-name="P4" draw:layer="layout" svg:x1="18cm" svg:y1="22cm" svg:x2="18cm" svg:y2="21cm">
            <text:p/>
          </draw:line>
          <draw:line draw:style-name="gr38" draw:text-style-name="P4" draw:layer="layout" svg:x1="16cm" svg:y1="24cm" svg:x2="18cm" svg:y2="24cm">
            <text:p/>
          </draw:line>
          <draw:line draw:style-name="gr38" draw:text-style-name="P4" draw:layer="layout" svg:x1="18cm" svg:y1="24cm" svg:x2="18cm" svg:y2="23cm">
            <text:p/>
          </draw:line>
          <draw:line draw:style-name="gr38" draw:text-style-name="P4" draw:layer="layout" svg:x1="18cm" svg:y1="23cm" svg:x2="19cm" svg:y2="23cm">
            <text:p/>
          </draw:line>
          <draw:line draw:style-name="gr38" draw:text-style-name="P4" draw:layer="layout" svg:x1="19cm" svg:y1="24cm" svg:x2="19cm" svg:y2="23cm">
            <text:p/>
          </draw:line>
          <draw:line draw:style-name="gr38" draw:text-style-name="P4" draw:layer="layout" svg:x1="17cm" svg:y1="26cm" svg:x2="19cm" svg:y2="26cm">
            <text:p/>
          </draw:line>
          <draw:line draw:style-name="gr38" draw:text-style-name="P4" draw:layer="layout" svg:x1="19cm" svg:y1="26cm" svg:x2="19cm" svg:y2="25cm">
            <text:p/>
          </draw:line>
          <draw:line draw:style-name="gr38" draw:text-style-name="P4" draw:layer="layout" svg:x1="19cm" svg:y1="25cm" svg:x2="20cm" svg:y2="25cm">
            <text:p/>
          </draw:line>
          <draw:line draw:style-name="gr38" draw:text-style-name="P4" draw:layer="layout" svg:x1="20cm" svg:y1="26cm" svg:x2="20cm" svg:y2="25cm">
            <text:p/>
          </draw:line>
          <draw:frame draw:style-name="gr185" draw:text-style-name="P9" draw:layer="layout" svg:width="3.491cm" svg:height="0.725cm" svg:x="10.042cm" svg:y="21.275cm">
            <draw:text-box>
              <text:p><text:span text:style-name="T2">fetch0_pha</text:span><text:span text:style-name="T2">se_s</text:span></text:p>
            </draw:text-box>
          </draw:frame>
          <draw:frame draw:style-name="gr185" draw:text-style-name="P9" draw:layer="layout" svg:width="3.491cm" svg:height="0.725cm" svg:x="10cm" svg:y="23.275cm">
            <draw:text-box>
              <text:p><text:span text:style-name="T2">fetch1_pha</text:span><text:span text:style-name="T2">se_s</text:span></text:p>
            </draw:text-box>
          </draw:frame>
          <draw:frame draw:style-name="gr199" draw:text-style-name="P9" draw:layer="layout" svg:width="3.228cm" svg:height="0.725cm" svg:x="10cm" svg:y="25.275cm">
            <draw:text-box>
              <text:p><text:span text:style-name="T2">exec_phase</text:span><text:span text:style-name="T2">_s</text:span></text:p>
            </draw:text-box>
          </draw:frame>
          <draw:frame draw:style-name="gr288" draw:text-style-name="P9" draw:layer="layout" svg:width="3.626cm" svg:height="0.725cm" svg:x="11.753cm" svg:y="24.775cm">
            <draw:text-box>
              <text:p><text:span text:style-name="T2">(instr_com</text:span><text:span text:style-name="T2">mit_s)</text:span></text:p>
            </draw:text-box>
          </draw:frame>
          <draw:line draw:style-name="gr289" draw:text-style-name="P4" draw:layer="layout" svg:x1="15cm" svg:y1="27.699cm" svg:x2="17cm" svg:y2="27.699cm">
            <text:p/>
          </draw:line>
          <draw:line draw:style-name="gr289" draw:text-style-name="P4" draw:layer="layout" svg:x1="17cm" svg:y1="27.699cm" svg:x2="17cm" svg:y2="26.699cm">
            <text:p/>
          </draw:line>
          <draw:line draw:style-name="gr289" draw:text-style-name="P4" draw:layer="layout" svg:x1="17cm" svg:y1="26.699cm" svg:x2="18cm" svg:y2="26.699cm">
            <text:p/>
          </draw:line>
          <draw:line draw:style-name="gr289" draw:text-style-name="P4" draw:layer="layout" svg:x1="18cm" svg:y1="27.699cm" svg:x2="18cm" svg:y2="26.699cm">
            <text:p/>
          </draw:line>
          <draw:line draw:style-name="gr289" draw:text-style-name="P4" draw:layer="layout" svg:x1="18cm" svg:y1="27.699cm" svg:x2="19cm" svg:y2="27.7cm">
            <text:p/>
          </draw:line>
          <draw:frame draw:style-name="gr157" draw:text-style-name="P9" draw:layer="layout" svg:width="3.558cm" svg:height="0.725cm" svg:x="10cm" svg:y="26.975cm">
            <draw:text-box>
              <text:p><text:span text:style-name="T2">execld_pha</text:span><text:span text:style-name="T2">se_s</text:span></text:p>
            </draw:text-box>
          </draw:frame>
        </draw:g>
        <draw:frame draw:style-name="gr237" draw:text-style-name="P9" draw:layer="layout" svg:width="3.347cm" svg:height="0.725cm" svg:x="20.453cm" svg:y="1.475cm">
          <draw:text-box>
            <text:p><text:span text:style-name="T2">opcode_s </text:span><text:span text:style-name="T2">== 3</text:span></text:p>
          </draw:text-box>
        </draw:frame>
        <draw:g draw:style-name="gr66">
          <draw:glue-point draw:id="4" svg:x="-5cm" svg:y="-2.5cm"/>
          <draw:glue-point draw:id="5" svg:x="-5cm" svg:y="2.5cm"/>
          <draw:glue-point draw:id="6" svg:x="5cm" svg:y="0cm"/>
          <draw:rect draw:style-name="gr290" draw:text-style-name="P16" draw:layer="layout" svg:width="1cm" svg:height="1cm" svg:x="33cm" svg:y="3cm">
            <text:p text:style-name="P15"><text:span text:style-name="T8">≥</text:span><text:span text:style-name="T5">1</text:span></text:p>
          </draw:rect>
          <draw:line draw:style-name="gr291" draw:text-style-name="P17" draw:layer="layout" svg:x1="32.5cm" svg:y1="3.25cm" svg:x2="33cm" svg:y2="3.25cm">
            <text:p/>
          </draw:line>
          <draw:line draw:style-name="gr292" draw:text-style-name="P17" draw:layer="layout" svg:x1="32.5cm" svg:y1="3.75cm" svg:x2="33cm" svg:y2="3.75cm">
            <text:p/>
          </draw:line>
          <draw:line draw:style-name="gr293" draw:text-style-name="P17" draw:layer="layout" svg:x1="34cm" svg:y1="3.5cm" svg:x2="34.5cm" svg:y2="3.5cm">
            <text:p/>
          </draw:line>
        </draw:g>
        <draw:frame draw:style-name="gr237" draw:text-style-name="P9" draw:layer="layout" svg:width="3.347cm" svg:height="0.725cm" svg:x="27.453cm" svg:y="2.3cm">
          <draw:text-box>
            <text:p><text:span text:style-name="T2">exec_phase</text:span><text:span text:style-name="T2">_s</text:span></text:p>
          </draw:text-box>
        </draw:frame>
        <draw:custom-shape draw:style-name="gr283" draw:text-style-name="P20" draw:layer="layout" svg:width="3.4cm" svg:height="1.1cm" svg:x="27.3cm" svg:y="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5.5cm" svg:y1="1.5cm" svg:x2="28.491cm" svg:y2="1.5cm">
          <text:p/>
        </draw:line>
        <draw:line draw:style-name="gr38" draw:text-style-name="P4" draw:layer="layout" svg:x1="30.5cm" svg:y1="1.5cm" svg:x2="30.5cm" svg:y2="2.25cm">
          <text:p/>
        </draw:line>
        <draw:line draw:style-name="gr38" draw:text-style-name="P4" draw:layer="layout" svg:x1="32.5cm" svg:y1="2.5cm" svg:x2="32.5cm" svg:y2="3.25cm">
          <text:p/>
        </draw:line>
        <draw:frame draw:style-name="gr157" draw:text-style-name="P9" draw:layer="layout" svg:width="3.558cm" svg:height="0.725cm" svg:x="29.153cm" svg:y="3.3cm">
          <draw:text-box>
            <text:p><text:span text:style-name="T2">execld_pha</text:span><text:span text:style-name="T2">se_s</text:span></text:p>
          </draw:text-box>
        </draw:frame>
        <draw:custom-shape draw:style-name="gr283" draw:text-style-name="P20" draw:layer="layout" svg:width="3.4cm" svg:height="1.1cm" svg:x="29.2cm" svg:y="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4.5cm" svg:y1="3.5cm" svg:x2="39.1cm" svg:y2="3.5cm">
          <text:p/>
        </draw:line>
        <draw:frame draw:style-name="gr294" draw:text-style-name="P25" draw:layer="layout" svg:width="3.063cm" svg:height="0.725cm" svg:x="21.101cm" svg:y="5.377cm">
          <draw:text-box>
            <text:p><text:span text:style-name="T7">!</text:span><text:span text:style-name="T7">trap_taken_</text:span><text:span text:style-name="T7">s</text:span></text:p>
          </draw:text-box>
        </draw:frame>
        <draw:line draw:style-name="gr38" draw:text-style-name="P4" draw:layer="layout" svg:x1="24cm" svg:y1="5.8cm" svg:x2="24.5cm" svg:y2="6cm">
          <text:p/>
        </draw:line>
        <draw:frame draw:style-name="gr185" draw:text-style-name="P9" draw:layer="layout" svg:width="3.491cm" svg:height="0.725cm" svg:x="4.009cm" svg:y="24.3cm">
          <draw:text-box>
            <text:p><text:span text:style-name="T2">load_pendi</text:span><text:span text:style-name="T2">ng_s</text:span></text:p>
          </draw:text-box>
        </draw:frame>
        <draw:line draw:style-name="gr146" draw:text-style-name="P4" draw:layer="layout" svg:x1="7.3cm" svg:y1="24.7cm" svg:x2="10cm" svg:y2="24.7cm">
          <text:p/>
        </draw:line>
        <draw:line draw:style-name="gr38" draw:text-style-name="P4" draw:layer="layout" svg:x1="6.6cm" svg:y1="15.5cm" svg:x2="17cm" svg:y2="15.5cm">
          <text:p/>
        </draw:line>
        <draw:line draw:style-name="gr38" draw:text-style-name="P4" draw:layer="layout" svg:x1="17cm" svg:y1="19cm" svg:x2="17cm" svg:y2="15.5cm">
          <text:p/>
        </draw:line>
        <draw:line draw:style-name="gr38" draw:text-style-name="P4" draw:layer="layout" svg:x1="7cm" svg:y1="16cm" svg:x2="16cm" svg:y2="16cm">
          <text:p/>
        </draw:line>
        <draw:line draw:style-name="gr38" draw:text-style-name="P4" draw:layer="layout" svg:x1="16cm" svg:y1="19.5cm" svg:x2="16cm" svg:y2="16cm">
          <text:p/>
        </draw:line>
      </draw:page>
      <draw:page draw:name="page5" draw:style-name="dp1" draw:master-page-name="Default">
        <draw:custom-shape draw:style-name="gr131" draw:text-style-name="P32" draw:layer="layout" svg:width="2cm" svg:height="2cm" svg:x="4cm" svg:y="17cm">
          <text:p text:style-name="P31"><text:span text:style-name="T9">P</text:span><text:span text:style-name="T9">C</text:span></text:p>
          <draw:enhanced-geometry svg:viewBox="0 0 21600 21600" draw:mirror-horizontal="false" draw:mirror-vertical="false" draw:type="rectangle" draw:enhanced-path="M 0 0 L 21600 0 21600 21600 0 21600 0 0 Z N"/>
        </draw:custom-shape>
        <draw:custom-shape draw:style-name="gr295" draw:text-style-name="P33" draw:layer="layout" svg:width="4cm" svg:height="3cm" svg:x="7cm" svg:y="16cm">
          <text:p text:style-name="P31"><text:span text:style-name="T9">I-Mem</text:span></text:p>
          <draw:enhanced-geometry svg:viewBox="0 0 21600 21600" draw:type="rectangle" draw:enhanced-path="M 0 0 L 21600 0 21600 21600 0 21600 0 0 Z N"/>
        </draw:custom-shape>
        <draw:custom-shape draw:style-name="gr296" draw:text-style-name="P32" draw:layer="layout" svg:width="7cm" svg:height="3cm" svg:x="12cm" svg:y="16cm">
          <text:p text:style-name="P31"><text:span text:style-name="T9">In</text:span><text:span text:style-name="T9">str</text:span><text:span text:style-name="T9">uc</text:span><text:span text:style-name="T9">tio</text:span><text:span text:style-name="T9">n </text:span><text:span text:style-name="T9">De</text:span><text:span text:style-name="T9">co</text:span><text:span text:style-name="T9">de</text:span></text:p>
          <draw:enhanced-geometry svg:viewBox="0 0 21600 21600" draw:type="rectangle" draw:enhanced-path="M 0 0 L 21600 0 21600 21600 0 21600 0 0 Z N"/>
        </draw:custom-shape>
        <draw:custom-shape draw:style-name="gr297" draw:text-style-name="P32" draw:layer="layout" svg:width="4cm" svg:height="3cm" svg:x="20cm" svg:y="16cm">
          <text:p text:style-name="P31"><text:span text:style-name="T9">Reg-</text:span><text:span text:style-name="T9">File</text:span></text:p>
          <draw:enhanced-geometry svg:viewBox="0 0 21600 21600" draw:type="rectangle" draw:enhanced-path="M 0 0 L 21600 0 21600 21600 0 21600 0 0 Z N"/>
        </draw:custom-shape>
        <draw:custom-shape draw:style-name="gr298" draw:text-style-name="P33" draw:layer="layout" svg:width="4cm" svg:height="3cm" svg:x="30cm" svg:y="16cm">
          <text:p text:style-name="P31"><text:span text:style-name="T9">D-Mem</text:span></text:p>
          <draw:enhanced-geometry svg:viewBox="0 0 21600 21600" draw:type="rectangle" draw:enhanced-path="M 0 0 L 21600 0 21600 21600 0 21600 0 0 Z N"/>
        </draw:custom-shape>
        <draw:custom-shape draw:style-name="gr299" draw:text-style-name="P32" draw:layer="layout" svg:width="4cm" svg:height="3cm" svg:x="25cm" svg:y="16cm">
          <text:p text:style-name="P31"><text:span text:style-name="T9">ALU</text:span></text:p>
          <draw:enhanced-geometry svg:viewBox="0 0 21600 21600" draw:type="rectangle" draw:enhanced-path="M 0 0 L 21600 0 21600 21600 0 21600 0 0 Z N"/>
        </draw:custom-shape>
        <draw:line draw:style-name="gr300" draw:text-style-name="P4" draw:layer="layout" svg:x1="23cm" svg:y1="21cm" svg:x2="34cm" svg:y2="21cm">
          <text:p/>
        </draw:line>
        <draw:frame draw:style-name="gr301" draw:text-style-name="P34" draw:layer="layout" svg:width="2.266cm" svg:height="0.962cm" svg:x="30.865cm" svg:y="21.021cm">
          <draw:text-box>
            <text:p><text:span text:style-name="T9">D-Bus</text:span></text:p>
          </draw:text-box>
        </draw:frame>
        <draw:line draw:style-name="gr302" draw:text-style-name="P1" draw:layer="layout" svg:x1="32cm" svg:y1="19cm" svg:x2="32cm" svg:y2="21cm">
          <text:p/>
        </draw:line>
        <draw:line draw:style-name="gr300" draw:text-style-name="P4" draw:layer="layout" svg:x1="4cm" svg:y1="21cm" svg:x2="21cm" svg:y2="21cm">
          <text:p/>
        </draw:line>
        <draw:frame draw:style-name="gr303" draw:text-style-name="P34" draw:layer="layout" svg:width="1.984cm" svg:height="0.962cm" svg:x="8cm" svg:y="21.038cm">
          <draw:text-box>
            <text:p><text:span text:style-name="T9">I-Bus</text:span></text:p>
          </draw:text-box>
        </draw:frame>
        <draw:line draw:style-name="gr302" draw:text-style-name="P1" draw:layer="layout" svg:x1="9cm" svg:y1="19cm" svg:x2="9cm" svg:y2="21cm">
          <text:p/>
        </draw:line>
        <draw:line draw:style-name="gr304" draw:text-style-name="P1" draw:layer="layout" svg:x1="5cm" svg:y1="19cm" svg:x2="5cm" svg:y2="21cm">
          <text:p/>
        </draw:line>
        <draw:line draw:style-name="gr305" draw:text-style-name="P1" draw:layer="layout" svg:x1="15.5cm" svg:y1="19cm" svg:x2="15.5cm" svg:y2="21cm">
          <text:p/>
        </draw:line>
        <draw:line draw:style-name="gr304" draw:text-style-name="P1" draw:layer="layout" svg:x1="27cm" svg:y1="19cm" svg:x2="27cm" svg:y2="21cm">
          <text:p/>
        </draw:line>
        <draw:line draw:style-name="gr305" draw:text-style-name="P1" draw:layer="layout" svg:x1="21cm" svg:y1="19cm" svg:x2="21cm" svg:y2="21cm">
          <text:p/>
        </draw:line>
        <draw:line draw:style-name="gr304" draw:text-style-name="P1" draw:layer="layout" svg:x1="23cm" svg:y1="19cm" svg:x2="23cm" svg:y2="21cm">
          <text:p/>
        </draw:line>
        <draw:line draw:style-name="gr146" draw:text-style-name="P4" draw:layer="layout" svg:x1="24cm" svg:y1="17cm" svg:x2="25cm" svg:y2="17cm">
          <text:p/>
        </draw:line>
        <draw:line draw:style-name="gr146" draw:text-style-name="P4" draw:layer="layout" svg:x1="24cm" svg:y1="18cm" svg:x2="25cm" svg:y2="18cm">
          <text:p/>
        </draw:line>
        <draw:line draw:style-name="gr146" draw:text-style-name="P4" draw:layer="layout" svg:x1="5cm" svg:y1="15cm" svg:x2="5cm" svg:y2="17cm">
          <text:p/>
        </draw:line>
        <draw:line draw:style-name="gr146" draw:text-style-name="P4" draw:layer="layout" svg:x1="21cm" svg:y1="15cm" svg:x2="21cm" svg:y2="16cm">
          <text:p/>
        </draw:line>
        <draw:line draw:style-name="gr146" draw:text-style-name="P4" draw:layer="layout" svg:x1="22cm" svg:y1="14.5cm" svg:x2="22cm" svg:y2="16cm">
          <text:p/>
        </draw:line>
        <draw:line draw:style-name="gr146" draw:text-style-name="P4" draw:layer="layout" svg:x1="27cm" svg:y1="14cm" svg:x2="27cm" svg:y2="16cm">
          <text:p/>
        </draw:line>
        <draw:line draw:style-name="gr146" draw:text-style-name="P4" draw:layer="layout" svg:x1="31cm" svg:y1="13.5cm" svg:x2="31cm" svg:y2="16cm">
          <text:p/>
        </draw:line>
        <draw:line draw:style-name="gr146" draw:text-style-name="P4" draw:layer="layout" svg:x1="33cm" svg:y1="13cm" svg:x2="33cm" svg:y2="16cm">
          <text:p/>
        </draw:line>
        <draw:line draw:style-name="gr38" draw:text-style-name="P4" draw:layer="layout" svg:x1="18.6cm" svg:y1="15cm" svg:x2="21cm" svg:y2="15cm">
          <text:p/>
        </draw:line>
        <draw:line draw:style-name="gr38" draw:text-style-name="P4" draw:layer="layout" svg:x1="18.6cm" svg:y1="16cm" svg:x2="18.6cm" svg:y2="15cm">
          <text:p/>
        </draw:line>
        <draw:line draw:style-name="gr38" draw:text-style-name="P4" draw:layer="layout" svg:x1="18cm" svg:y1="16cm" svg:x2="18cm" svg:y2="14.5cm">
          <text:p/>
        </draw:line>
        <draw:line draw:style-name="gr38" draw:text-style-name="P4" draw:layer="layout" svg:x1="18cm" svg:y1="14.5cm" svg:x2="22cm" svg:y2="14.5cm">
          <text:p/>
        </draw:line>
        <draw:line draw:style-name="gr38" draw:text-style-name="P4" draw:layer="layout" svg:x1="17.5cm" svg:y1="16cm" svg:x2="17.5cm" svg:y2="14cm">
          <text:p/>
        </draw:line>
        <draw:line draw:style-name="gr38" draw:text-style-name="P4" draw:layer="layout" svg:x1="17.5cm" svg:y1="14cm" svg:x2="27cm" svg:y2="14cm">
          <text:p/>
        </draw:line>
        <draw:line draw:style-name="gr38" draw:text-style-name="P4" draw:layer="layout" svg:x1="17cm" svg:y1="13.5cm" svg:x2="31cm" svg:y2="13.5cm">
          <text:p/>
        </draw:line>
        <draw:line draw:style-name="gr38" draw:text-style-name="P4" draw:layer="layout" svg:x1="17cm" svg:y1="16cm" svg:x2="17cm" svg:y2="13.5cm">
          <text:p/>
        </draw:line>
        <draw:line draw:style-name="gr38" draw:text-style-name="P4" draw:layer="layout" svg:x1="16.5cm" svg:y1="13cm" svg:x2="33cm" svg:y2="13cm">
          <text:p/>
        </draw:line>
        <draw:line draw:style-name="gr38" draw:text-style-name="P4" draw:layer="layout" svg:x1="16.5cm" svg:y1="16cm" svg:x2="16.5cm" svg:y2="13cm">
          <text:p/>
        </draw:line>
        <draw:line draw:style-name="gr38" draw:text-style-name="P4" draw:layer="layout" svg:x1="5cm" svg:y1="15cm" svg:x2="12.5cm" svg:y2="15cm">
          <text:p/>
        </draw:line>
        <draw:line draw:style-name="gr38" draw:text-style-name="P4" draw:layer="layout" svg:x1="12.5cm" svg:y1="16cm" svg:x2="12.5cm" svg:y2="15cm">
          <text:p/>
        </draw:line>
        <draw:custom-shape draw:style-name="gr306" draw:text-style-name="P4" draw:layer="layout" svg:width="32cm" svg:height="11cm" svg:x="3cm" svg:y="12cm">
          <text:p/>
          <draw:enhanced-geometry svg:viewBox="0 0 21600 21600" draw:type="rectangle" draw:enhanced-path="M 0 0 L 21600 0 21600 21600 0 21600 0 0 Z N"/>
        </draw:custom-shape>
      </draw:page>
      <draw:page draw:name="page6" draw:style-name="dp1" draw:master-page-name="Default">
        <draw:custom-shape draw:style-name="gr131" draw:text-style-name="P32" draw:layer="layout" svg:width="2cm" svg:height="2cm" svg:x="4cm" svg:y="16cm">
          <text:p text:style-name="P31"><text:span text:style-name="T9">PC</text:span></text:p>
          <draw:enhanced-geometry svg:viewBox="0 0 21600 21600" draw:mirror-horizontal="false" draw:mirror-vertical="false" draw:type="rectangle" draw:enhanced-path="M 0 0 L 21600 0 21600 21600 0 21600 0 0 Z N"/>
        </draw:custom-shape>
        <draw:custom-shape draw:style-name="gr296" draw:text-style-name="P32" draw:layer="layout" svg:width="7cm" svg:height="3cm" svg:x="12cm" svg:y="15cm">
          <text:p text:style-name="P31"><text:span text:style-name="T9">Instruction Decode</text:span></text:p>
          <draw:enhanced-geometry svg:viewBox="0 0 21600 21600" draw:type="rectangle" draw:enhanced-path="M 0 0 L 21600 0 21600 21600 0 21600 0 0 Z N"/>
        </draw:custom-shape>
        <draw:custom-shape draw:style-name="gr297" draw:text-style-name="P32" draw:layer="layout" svg:width="4cm" svg:height="3cm" svg:x="20cm" svg:y="15cm">
          <text:p text:style-name="P31"><text:span text:style-name="T9">Reg-File</text:span></text:p>
          <draw:enhanced-geometry svg:viewBox="0 0 21600 21600" draw:type="rectangle" draw:enhanced-path="M 0 0 L 21600 0 21600 21600 0 21600 0 0 Z N"/>
        </draw:custom-shape>
        <draw:custom-shape draw:style-name="gr298" draw:text-style-name="P33" draw:layer="layout" svg:width="4cm" svg:height="3cm" svg:x="30cm" svg:y="15cm">
          <text:p text:style-name="P31"><text:span text:style-name="T9">D</text:span><text:span text:style-name="T9">-</text:span><text:span text:style-name="T9">M</text:span><text:span text:style-name="T9">e</text:span><text:span text:style-name="T9">m</text:span></text:p>
          <draw:enhanced-geometry svg:viewBox="0 0 21600 21600" draw:type="rectangle" draw:enhanced-path="M 0 0 L 21600 0 21600 21600 0 21600 0 0 Z N"/>
        </draw:custom-shape>
        <draw:custom-shape draw:style-name="gr299" draw:text-style-name="P32" draw:layer="layout" svg:width="4cm" svg:height="3cm" svg:x="25cm" svg:y="15cm">
          <text:p text:style-name="P31"><text:span text:style-name="T9">A</text:span><text:span text:style-name="T9">L</text:span><text:span text:style-name="T9">U</text:span></text:p>
          <draw:enhanced-geometry svg:viewBox="0 0 21600 21600" draw:type="rectangle" draw:enhanced-path="M 0 0 L 21600 0 21600 21600 0 21600 0 0 Z N"/>
        </draw:custom-shape>
        <draw:line draw:style-name="gr300" draw:text-style-name="P4" draw:layer="layout" svg:x1="23cm" svg:y1="20cm" svg:x2="34cm" svg:y2="20cm">
          <text:p/>
        </draw:line>
        <draw:frame draw:style-name="gr301" draw:text-style-name="P34" draw:layer="layout" svg:width="2.266cm" svg:height="0.962cm" svg:x="25.865cm" svg:y="20.021cm">
          <draw:text-box>
            <text:p><text:span text:style-name="T9">D-Bus</text:span></text:p>
          </draw:text-box>
        </draw:frame>
        <draw:line draw:style-name="gr302" draw:text-style-name="P1" draw:layer="layout" svg:x1="32cm" svg:y1="18cm" svg:x2="32cm" svg:y2="20cm">
          <text:p/>
        </draw:line>
        <draw:line draw:style-name="gr300" draw:text-style-name="P4" draw:layer="layout" svg:x1="4cm" svg:y1="20cm" svg:x2="21cm" svg:y2="20cm">
          <text:p/>
        </draw:line>
        <draw:frame draw:style-name="gr303" draw:text-style-name="P34" draw:layer="layout" svg:width="1.984cm" svg:height="0.962cm" svg:x="7cm" svg:y="20.038cm">
          <draw:text-box>
            <text:p><text:span text:style-name="T9">I-Bus</text:span></text:p>
          </draw:text-box>
        </draw:frame>
        <draw:line draw:style-name="gr302" draw:text-style-name="P1" draw:layer="layout" svg:x1="9cm" svg:y1="18cm" svg:x2="9cm" svg:y2="20cm">
          <text:p/>
        </draw:line>
        <draw:line draw:style-name="gr304" draw:text-style-name="P1" draw:layer="layout" svg:x1="5cm" svg:y1="18cm" svg:x2="5cm" svg:y2="20cm">
          <text:p/>
        </draw:line>
        <draw:line draw:style-name="gr305" draw:text-style-name="P1" draw:layer="layout" svg:x1="15.5cm" svg:y1="18cm" svg:x2="15.5cm" svg:y2="20cm">
          <text:p/>
        </draw:line>
        <draw:line draw:style-name="gr304" draw:text-style-name="P1" draw:layer="layout" svg:x1="27cm" svg:y1="18cm" svg:x2="27cm" svg:y2="20cm">
          <text:p/>
        </draw:line>
        <draw:line draw:style-name="gr305" draw:text-style-name="P1" draw:layer="layout" svg:x1="21cm" svg:y1="18cm" svg:x2="21cm" svg:y2="20cm">
          <text:p/>
        </draw:line>
        <draw:line draw:style-name="gr304" draw:text-style-name="P1" draw:layer="layout" svg:x1="23cm" svg:y1="18cm" svg:x2="23cm" svg:y2="20cm">
          <text:p/>
        </draw:line>
        <draw:line draw:style-name="gr146" draw:text-style-name="P4" draw:layer="layout" svg:x1="24cm" svg:y1="16cm" svg:x2="25cm" svg:y2="16cm">
          <text:p/>
        </draw:line>
        <draw:line draw:style-name="gr146" draw:text-style-name="P4" draw:layer="layout" svg:x1="24cm" svg:y1="17cm" svg:x2="25cm" svg:y2="17cm">
          <text:p/>
        </draw:line>
        <draw:line draw:style-name="gr146" draw:text-style-name="P4" draw:layer="layout" svg:x1="5cm" svg:y1="14cm" svg:x2="5cm" svg:y2="16cm">
          <text:p/>
        </draw:line>
        <draw:line draw:style-name="gr146" draw:text-style-name="P4" draw:layer="layout" svg:x1="21cm" svg:y1="14cm" svg:x2="21cm" svg:y2="15cm">
          <text:p/>
        </draw:line>
        <draw:line draw:style-name="gr146" draw:text-style-name="P4" draw:layer="layout" svg:x1="22cm" svg:y1="13.5cm" svg:x2="22cm" svg:y2="15cm">
          <text:p/>
        </draw:line>
        <draw:line draw:style-name="gr146" draw:text-style-name="P4" draw:layer="layout" svg:x1="27cm" svg:y1="13cm" svg:x2="27cm" svg:y2="15cm">
          <text:p/>
        </draw:line>
        <draw:line draw:style-name="gr146" draw:text-style-name="P4" draw:layer="layout" svg:x1="31cm" svg:y1="12.5cm" svg:x2="31cm" svg:y2="15cm">
          <text:p/>
        </draw:line>
        <draw:line draw:style-name="gr146" draw:text-style-name="P4" draw:layer="layout" svg:x1="33cm" svg:y1="12cm" svg:x2="33cm" svg:y2="15cm">
          <text:p/>
        </draw:line>
        <draw:line draw:style-name="gr38" draw:text-style-name="P4" draw:layer="layout" svg:x1="18.6cm" svg:y1="14cm" svg:x2="21cm" svg:y2="14cm">
          <text:p/>
        </draw:line>
        <draw:line draw:style-name="gr38" draw:text-style-name="P4" draw:layer="layout" svg:x1="18.6cm" svg:y1="15cm" svg:x2="18.6cm" svg:y2="14cm">
          <text:p/>
        </draw:line>
        <draw:line draw:style-name="gr38" draw:text-style-name="P4" draw:layer="layout" svg:x1="18cm" svg:y1="15cm" svg:x2="18cm" svg:y2="13.5cm">
          <text:p/>
        </draw:line>
        <draw:line draw:style-name="gr38" draw:text-style-name="P4" draw:layer="layout" svg:x1="18cm" svg:y1="13.5cm" svg:x2="22cm" svg:y2="13.5cm">
          <text:p/>
        </draw:line>
        <draw:line draw:style-name="gr38" draw:text-style-name="P4" draw:layer="layout" svg:x1="17.5cm" svg:y1="15cm" svg:x2="17.5cm" svg:y2="13cm">
          <text:p/>
        </draw:line>
        <draw:line draw:style-name="gr38" draw:text-style-name="P4" draw:layer="layout" svg:x1="17.5cm" svg:y1="13cm" svg:x2="27cm" svg:y2="13cm">
          <text:p/>
        </draw:line>
        <draw:line draw:style-name="gr38" draw:text-style-name="P4" draw:layer="layout" svg:x1="17cm" svg:y1="12.5cm" svg:x2="31cm" svg:y2="12.5cm">
          <text:p/>
        </draw:line>
        <draw:line draw:style-name="gr38" draw:text-style-name="P4" draw:layer="layout" svg:x1="17cm" svg:y1="15cm" svg:x2="17cm" svg:y2="12.5cm">
          <text:p/>
        </draw:line>
        <draw:line draw:style-name="gr38" draw:text-style-name="P4" draw:layer="layout" svg:x1="16.5cm" svg:y1="12cm" svg:x2="33cm" svg:y2="12cm">
          <text:p/>
        </draw:line>
        <draw:line draw:style-name="gr38" draw:text-style-name="P4" draw:layer="layout" svg:x1="16.5cm" svg:y1="15cm" svg:x2="16.5cm" svg:y2="12cm">
          <text:p/>
        </draw:line>
        <draw:line draw:style-name="gr38" draw:text-style-name="P4" draw:layer="layout" svg:x1="5cm" svg:y1="14cm" svg:x2="12.5cm" svg:y2="14cm">
          <text:p/>
        </draw:line>
        <draw:line draw:style-name="gr38" draw:text-style-name="P4" draw:layer="layout" svg:x1="12.5cm" svg:y1="15cm" svg:x2="12.5cm" svg:y2="14cm">
          <text:p/>
        </draw:line>
        <draw:custom-shape draw:style-name="gr307" draw:text-style-name="P4" draw:layer="layout" svg:width="32cm" svg:height="14cm" svg:x="3cm" svg:y="11cm">
          <text:p/>
          <draw:enhanced-geometry svg:viewBox="0 0 21600 21600" draw:type="rectangle" draw:enhanced-path="M 0 0 L 21600 0 21600 21600 0 21600 0 0 Z N"/>
        </draw:custom-shape>
        <draw:custom-shape draw:style-name="gr131" draw:text-style-name="P32" draw:layer="layout" svg:width="2cm" svg:height="2cm" svg:x="3cm" svg:y="11cm">
          <text:p text:style-name="P31"><text:span text:style-name="T9">JTA</text:span><text:span text:style-name="T9">G</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2cm" svg:height="2cm" svg:x="29cm" svg:y="22cm">
          <text:p text:style-name="P31"><text:span text:style-name="T9">UART</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2cm" svg:height="2cm" svg:x="32cm" svg:y="22cm">
          <text:p text:style-name="P31"><text:span text:style-name="T9">GPIO</text:span></text:p>
          <draw:enhanced-geometry svg:viewBox="0 0 21600 21600" draw:mirror-horizontal="false" draw:mirror-vertical="false" draw:type="rectangle" draw:enhanced-path="M 0 0 L 21600 0 21600 21600 0 21600 0 0 Z N"/>
        </draw:custom-shape>
        <draw:line draw:style-name="gr302" draw:text-style-name="P1" draw:layer="layout" svg:x1="30cm" svg:y1="20cm" svg:x2="30cm" svg:y2="22cm">
          <text:p/>
        </draw:line>
        <draw:line draw:style-name="gr302" draw:text-style-name="P1" draw:layer="layout" svg:x1="33cm" svg:y1="20cm" svg:x2="33cm" svg:y2="22cm">
          <text:p/>
        </draw:line>
        <draw:custom-shape draw:style-name="gr295" draw:text-style-name="P33" draw:layer="layout" svg:width="4cm" svg:height="3cm" svg:x="7cm" svg:y="15cm">
          <text:p text:style-name="P31"><text:span text:style-name="T9">I-Mem</text:span></text:p>
          <draw:enhanced-geometry svg:viewBox="0 0 21600 21600" draw:type="rectangle" draw:enhanced-path="M 0 0 L 21600 0 21600 21600 0 21600 0 0 Z N"/>
        </draw:custom-shape>
        <draw:line draw:style-name="gr308" draw:text-style-name="P1" draw:layer="layout" svg:x1="5cm" svg:y1="13cm" svg:x2="7cm" svg:y2="15cm">
          <text:p/>
        </draw:line>
        <draw:frame draw:style-name="gr309" draw:text-style-name="P3" draw:layer="layout" svg:width="5.451cm" svg:height="0.962cm" svg:x="3.049cm" svg:y="24cm">
          <draw:text-box>
            <text:p>RWU-RV64I V1.0</text:p>
          </draw:text-box>
        </draw:frame>
      </draw:page>
      <draw:page draw:name="page7" draw:style-name="dp1" draw:master-page-name="Default">
        <draw:custom-shape draw:style-name="gr131" draw:text-style-name="P32" draw:layer="layout" svg:width="2cm" svg:height="2cm" svg:x="4cm" svg:y="16cm">
          <text:p text:style-name="P31"><text:span text:style-name="T9">P</text:span><text:span text:style-name="T9">C</text:span></text:p>
          <draw:enhanced-geometry svg:viewBox="0 0 21600 21600" draw:mirror-horizontal="false" draw:mirror-vertical="false" draw:type="rectangle" draw:enhanced-path="M 0 0 L 21600 0 21600 21600 0 21600 0 0 Z N"/>
        </draw:custom-shape>
        <draw:custom-shape draw:style-name="gr296" draw:text-style-name="P32" draw:layer="layout" svg:width="7cm" svg:height="3cm" svg:x="12cm" svg:y="15cm">
          <text:p text:style-name="P31"><text:span text:style-name="T9">I</text:span><text:span text:style-name="T9">n</text:span><text:span text:style-name="T9">st</text:span><text:span text:style-name="T9">r</text:span><text:span text:style-name="T9">u</text:span><text:span text:style-name="T9">ct</text:span><text:span text:style-name="T9">io</text:span><text:span text:style-name="T9">n </text:span><text:span text:style-name="T9">D</text:span><text:span text:style-name="T9">e</text:span><text:span text:style-name="T9">c</text:span><text:span text:style-name="T9">o</text:span><text:span text:style-name="T9">d</text:span><text:span text:style-name="T9">e</text:span></text:p>
          <draw:enhanced-geometry svg:viewBox="0 0 21600 21600" draw:type="rectangle" draw:enhanced-path="M 0 0 L 21600 0 21600 21600 0 21600 0 0 Z N"/>
        </draw:custom-shape>
        <draw:custom-shape draw:style-name="gr297" draw:text-style-name="P32" draw:layer="layout" svg:width="4cm" svg:height="3cm" svg:x="20cm" svg:y="15cm">
          <text:p text:style-name="P31"><text:span text:style-name="T9">Reg-</text:span><text:span text:style-name="T9">File</text:span></text:p>
          <draw:enhanced-geometry svg:viewBox="0 0 21600 21600" draw:type="rectangle" draw:enhanced-path="M 0 0 L 21600 0 21600 21600 0 21600 0 0 Z N"/>
        </draw:custom-shape>
        <draw:custom-shape draw:style-name="gr298" draw:text-style-name="P33" draw:layer="layout" svg:width="4cm" svg:height="3cm" svg:x="30cm" svg:y="15cm">
          <text:p text:style-name="P31"><text:span text:style-name="T9">D-</text:span><text:span text:style-name="T9">M</text:span><text:span text:style-name="T9">e</text:span><text:span text:style-name="T9">m</text:span></text:p>
          <draw:enhanced-geometry svg:viewBox="0 0 21600 21600" draw:type="rectangle" draw:enhanced-path="M 0 0 L 21600 0 21600 21600 0 21600 0 0 Z N"/>
        </draw:custom-shape>
        <draw:custom-shape draw:style-name="gr299" draw:text-style-name="P32" draw:layer="layout" svg:width="4cm" svg:height="3cm" svg:x="25cm" svg:y="15cm">
          <text:p text:style-name="P31"><text:span text:style-name="T9">AL</text:span><text:span text:style-name="T9">U</text:span></text:p>
          <draw:enhanced-geometry svg:viewBox="0 0 21600 21600" draw:type="rectangle" draw:enhanced-path="M 0 0 L 21600 0 21600 21600 0 21600 0 0 Z N"/>
        </draw:custom-shape>
        <draw:line draw:style-name="gr300" draw:text-style-name="P4" draw:layer="layout" svg:x1="23cm" svg:y1="20cm" svg:x2="34cm" svg:y2="20cm">
          <text:p/>
        </draw:line>
        <draw:frame draw:style-name="gr301" draw:text-style-name="P34" draw:layer="layout" svg:width="2.266cm" svg:height="0.962cm" svg:x="25.865cm" svg:y="20.021cm">
          <draw:text-box>
            <text:p><text:span text:style-name="T9">D-Bus</text:span></text:p>
          </draw:text-box>
        </draw:frame>
        <draw:line draw:style-name="gr302" draw:text-style-name="P1" draw:layer="layout" svg:x1="32cm" svg:y1="18cm" svg:x2="32cm" svg:y2="20cm">
          <text:p/>
        </draw:line>
        <draw:line draw:style-name="gr300" draw:text-style-name="P4" draw:layer="layout" svg:x1="4cm" svg:y1="20cm" svg:x2="21cm" svg:y2="20cm">
          <text:p/>
        </draw:line>
        <draw:frame draw:style-name="gr303" draw:text-style-name="P34" draw:layer="layout" svg:width="1.984cm" svg:height="0.962cm" svg:x="7cm" svg:y="20.038cm">
          <draw:text-box>
            <text:p><text:span text:style-name="T9">I-Bus</text:span></text:p>
          </draw:text-box>
        </draw:frame>
        <draw:line draw:style-name="gr302" draw:text-style-name="P1" draw:layer="layout" svg:x1="9cm" svg:y1="18cm" svg:x2="9cm" svg:y2="20cm">
          <text:p/>
        </draw:line>
        <draw:line draw:style-name="gr304" draw:text-style-name="P1" draw:layer="layout" svg:x1="5cm" svg:y1="18cm" svg:x2="5cm" svg:y2="20cm">
          <text:p/>
        </draw:line>
        <draw:line draw:style-name="gr305" draw:text-style-name="P1" draw:layer="layout" svg:x1="15.5cm" svg:y1="18cm" svg:x2="15.5cm" svg:y2="20cm">
          <text:p/>
        </draw:line>
        <draw:line draw:style-name="gr304" draw:text-style-name="P1" draw:layer="layout" svg:x1="27cm" svg:y1="18cm" svg:x2="27cm" svg:y2="20cm">
          <text:p/>
        </draw:line>
        <draw:line draw:style-name="gr305" draw:text-style-name="P1" draw:layer="layout" svg:x1="21cm" svg:y1="18cm" svg:x2="21cm" svg:y2="20cm">
          <text:p/>
        </draw:line>
        <draw:line draw:style-name="gr304" draw:text-style-name="P1" draw:layer="layout" svg:x1="23cm" svg:y1="18cm" svg:x2="23cm" svg:y2="20cm">
          <text:p/>
        </draw:line>
        <draw:line draw:style-name="gr146" draw:text-style-name="P4" draw:layer="layout" svg:x1="24cm" svg:y1="16cm" svg:x2="25cm" svg:y2="16cm">
          <text:p/>
        </draw:line>
        <draw:line draw:style-name="gr146" draw:text-style-name="P4" draw:layer="layout" svg:x1="24cm" svg:y1="17cm" svg:x2="25cm" svg:y2="17cm">
          <text:p/>
        </draw:line>
        <draw:line draw:style-name="gr146" draw:text-style-name="P4" draw:layer="layout" svg:x1="5cm" svg:y1="14cm" svg:x2="5cm" svg:y2="16cm">
          <text:p/>
        </draw:line>
        <draw:line draw:style-name="gr146" draw:text-style-name="P4" draw:layer="layout" svg:x1="21cm" svg:y1="14cm" svg:x2="21cm" svg:y2="15cm">
          <text:p/>
        </draw:line>
        <draw:line draw:style-name="gr146" draw:text-style-name="P4" draw:layer="layout" svg:x1="22cm" svg:y1="13.5cm" svg:x2="22cm" svg:y2="15cm">
          <text:p/>
        </draw:line>
        <draw:line draw:style-name="gr146" draw:text-style-name="P4" draw:layer="layout" svg:x1="27cm" svg:y1="13cm" svg:x2="27cm" svg:y2="15cm">
          <text:p/>
        </draw:line>
        <draw:line draw:style-name="gr146" draw:text-style-name="P4" draw:layer="layout" svg:x1="31cm" svg:y1="12.5cm" svg:x2="31cm" svg:y2="15cm">
          <text:p/>
        </draw:line>
        <draw:line draw:style-name="gr146" draw:text-style-name="P4" draw:layer="layout" svg:x1="33cm" svg:y1="12cm" svg:x2="33cm" svg:y2="15cm">
          <text:p/>
        </draw:line>
        <draw:line draw:style-name="gr38" draw:text-style-name="P4" draw:layer="layout" svg:x1="18.6cm" svg:y1="14cm" svg:x2="21cm" svg:y2="14cm">
          <text:p/>
        </draw:line>
        <draw:line draw:style-name="gr38" draw:text-style-name="P4" draw:layer="layout" svg:x1="18.6cm" svg:y1="15cm" svg:x2="18.6cm" svg:y2="14cm">
          <text:p/>
        </draw:line>
        <draw:line draw:style-name="gr38" draw:text-style-name="P4" draw:layer="layout" svg:x1="18cm" svg:y1="15cm" svg:x2="18cm" svg:y2="13.5cm">
          <text:p/>
        </draw:line>
        <draw:line draw:style-name="gr38" draw:text-style-name="P4" draw:layer="layout" svg:x1="18cm" svg:y1="13.5cm" svg:x2="22cm" svg:y2="13.5cm">
          <text:p/>
        </draw:line>
        <draw:line draw:style-name="gr38" draw:text-style-name="P4" draw:layer="layout" svg:x1="17.5cm" svg:y1="15cm" svg:x2="17.5cm" svg:y2="13cm">
          <text:p/>
        </draw:line>
        <draw:line draw:style-name="gr38" draw:text-style-name="P4" draw:layer="layout" svg:x1="17.5cm" svg:y1="13cm" svg:x2="27cm" svg:y2="13cm">
          <text:p/>
        </draw:line>
        <draw:line draw:style-name="gr38" draw:text-style-name="P4" draw:layer="layout" svg:x1="17cm" svg:y1="12.5cm" svg:x2="31cm" svg:y2="12.5cm">
          <text:p/>
        </draw:line>
        <draw:line draw:style-name="gr38" draw:text-style-name="P4" draw:layer="layout" svg:x1="17cm" svg:y1="15cm" svg:x2="17cm" svg:y2="12.5cm">
          <text:p/>
        </draw:line>
        <draw:line draw:style-name="gr38" draw:text-style-name="P4" draw:layer="layout" svg:x1="16.5cm" svg:y1="12cm" svg:x2="33cm" svg:y2="12cm">
          <text:p/>
        </draw:line>
        <draw:line draw:style-name="gr38" draw:text-style-name="P4" draw:layer="layout" svg:x1="16.5cm" svg:y1="15cm" svg:x2="16.5cm" svg:y2="12cm">
          <text:p/>
        </draw:line>
        <draw:line draw:style-name="gr38" draw:text-style-name="P4" draw:layer="layout" svg:x1="5cm" svg:y1="14cm" svg:x2="12.5cm" svg:y2="14cm">
          <text:p/>
        </draw:line>
        <draw:line draw:style-name="gr38" draw:text-style-name="P4" draw:layer="layout" svg:x1="12.5cm" svg:y1="15cm" svg:x2="12.5cm" svg:y2="14cm">
          <text:p/>
        </draw:line>
        <draw:custom-shape draw:style-name="gr307" draw:text-style-name="P4" draw:layer="layout" svg:width="32cm" svg:height="14cm" svg:x="3cm" svg:y="11cm">
          <text:p/>
          <draw:enhanced-geometry svg:viewBox="0 0 21600 21600" draw:type="rectangle" draw:enhanced-path="M 0 0 L 21600 0 21600 21600 0 21600 0 0 Z N"/>
        </draw:custom-shape>
        <draw:custom-shape draw:style-name="gr131" draw:text-style-name="P32" draw:layer="layout" svg:width="2cm" svg:height="2cm" svg:x="3cm" svg:y="11cm">
          <text:p text:style-name="P31"><text:span text:style-name="T9">JTA</text:span><text:span text:style-name="T9">G</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2cm" svg:height="2cm" svg:x="29cm" svg:y="22cm">
          <text:p text:style-name="P31"><text:span text:style-name="T9">UAR</text:span><text:span text:style-name="T9">T</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2cm" svg:height="2cm" svg:x="32cm" svg:y="22cm">
          <text:p text:style-name="P31"><text:span text:style-name="T9">GPI</text:span><text:span text:style-name="T9">O</text:span></text:p>
          <draw:enhanced-geometry svg:viewBox="0 0 21600 21600" draw:mirror-horizontal="false" draw:mirror-vertical="false" draw:type="rectangle" draw:enhanced-path="M 0 0 L 21600 0 21600 21600 0 21600 0 0 Z N"/>
        </draw:custom-shape>
        <draw:line draw:style-name="gr302" draw:text-style-name="P1" draw:layer="layout" svg:x1="30cm" svg:y1="20cm" svg:x2="30cm" svg:y2="22cm">
          <text:p/>
        </draw:line>
        <draw:line draw:style-name="gr302" draw:text-style-name="P1" draw:layer="layout" svg:x1="33cm" svg:y1="20cm" svg:x2="33cm" svg:y2="22cm">
          <text:p/>
        </draw:line>
        <draw:custom-shape draw:style-name="gr310" draw:text-style-name="P33" draw:layer="layout" svg:width="3cm" svg:height="2cm" svg:x="8cm" svg:y="26cm">
          <text:p text:style-name="P31"><text:span text:style-name="T9">N</text:span><text:span text:style-name="T9">O</text:span><text:span text:style-name="T9">R</text:span></text:p>
          <text:p text:style-name="P31"><text:span text:style-name="T9">Fl</text:span><text:span text:style-name="T9">as</text:span><text:span text:style-name="T9">h</text:span></text:p>
          <draw:enhanced-geometry svg:viewBox="0 0 21600 21600" draw:type="rectangle" draw:enhanced-path="M 0 0 L 21600 0 21600 21600 0 21600 0 0 Z N"/>
        </draw:custom-shape>
        <draw:custom-shape draw:style-name="gr310" draw:text-style-name="P33" draw:layer="layout" svg:width="3cm" svg:height="2cm" svg:x="8cm" svg:y="22cm">
          <text:p text:style-name="P31"><text:span text:style-name="T9">QS</text:span><text:span text:style-name="T9">PI</text:span></text:p>
          <text:p text:style-name="P31"><text:span text:style-name="T9">IF/</text:span><text:span text:style-name="T9">XIP</text:span></text:p>
          <draw:enhanced-geometry svg:viewBox="0 0 21600 21600" draw:type="rectangle" draw:enhanced-path="M 0 0 L 21600 0 21600 21600 0 21600 0 0 Z N"/>
        </draw:custom-shape>
        <draw:line draw:style-name="gr302" draw:text-style-name="P1" draw:layer="layout" svg:x1="10cm" svg:y1="20.038cm" svg:x2="10cm" svg:y2="22.038cm">
          <text:p/>
        </draw:line>
        <draw:line draw:style-name="gr302" draw:text-style-name="P1" draw:layer="layout" svg:x1="9.5cm" svg:y1="24cm" svg:x2="9.5cm" svg:y2="26cm">
          <text:p/>
        </draw:line>
        <draw:frame draw:style-name="gr309" draw:text-style-name="P3" draw:layer="layout" svg:width="5.451cm" svg:height="0.962cm" svg:x="3.05cm" svg:y="24cm">
          <draw:text-box>
            <text:p>RWU-RV64I V2.0</text:p>
          </draw:text-box>
        </draw:frame>
      </draw:page>
      <draw:page draw:name="page8" draw:style-name="dp1" draw:master-page-name="Default">
        <draw:custom-shape draw:style-name="gr131" draw:text-style-name="P32" draw:layer="layout" svg:width="2cm" svg:height="2cm" svg:x="4cm" svg:y="16cm">
          <text:p text:style-name="P31"><text:span text:style-name="T9">PC</text:span></text:p>
          <draw:enhanced-geometry svg:viewBox="0 0 21600 21600" draw:mirror-horizontal="false" draw:mirror-vertical="false" draw:type="rectangle" draw:enhanced-path="M 0 0 L 21600 0 21600 21600 0 21600 0 0 Z N"/>
        </draw:custom-shape>
        <draw:custom-shape draw:style-name="gr296" draw:text-style-name="P32" draw:layer="layout" svg:width="7cm" svg:height="3cm" svg:x="12cm" svg:y="15cm">
          <text:p text:style-name="P31"><text:span text:style-name="T9">Instru</text:span><text:span text:style-name="T9">ction </text:span><text:span text:style-name="T9">Decod</text:span><text:span text:style-name="T9">e</text:span></text:p>
          <draw:enhanced-geometry svg:viewBox="0 0 21600 21600" draw:type="rectangle" draw:enhanced-path="M 0 0 L 21600 0 21600 21600 0 21600 0 0 Z N"/>
        </draw:custom-shape>
        <draw:custom-shape draw:style-name="gr297" draw:text-style-name="P32" draw:layer="layout" svg:width="4cm" svg:height="3cm" svg:x="20cm" svg:y="15cm">
          <text:p text:style-name="P31"><text:span text:style-name="T9">Reg-</text:span><text:span text:style-name="T9">File</text:span></text:p>
          <draw:enhanced-geometry svg:viewBox="0 0 21600 21600" draw:type="rectangle" draw:enhanced-path="M 0 0 L 21600 0 21600 21600 0 21600 0 0 Z N"/>
        </draw:custom-shape>
        <draw:custom-shape draw:style-name="gr311" draw:text-style-name="P33" draw:layer="layout" svg:width="4cm" svg:height="1.5cm" svg:x="30cm" svg:y="15cm">
          <text:p text:style-name="P31"><text:span text:style-name="T9">D-</text:span><text:span text:style-name="T9">Mem</text:span></text:p>
          <draw:enhanced-geometry svg:viewBox="0 0 21600 21600" draw:type="rectangle" draw:enhanced-path="M 0 0 L 21600 0 21600 21600 0 21600 0 0 Z N"/>
        </draw:custom-shape>
        <draw:custom-shape draw:style-name="gr299" draw:text-style-name="P32" draw:layer="layout" svg:width="4cm" svg:height="3cm" svg:x="25cm" svg:y="15cm">
          <text:p text:style-name="P31"><text:span text:style-name="T9">ALU</text:span></text:p>
          <draw:enhanced-geometry svg:viewBox="0 0 21600 21600" draw:type="rectangle" draw:enhanced-path="M 0 0 L 21600 0 21600 21600 0 21600 0 0 Z N"/>
        </draw:custom-shape>
        <draw:line draw:style-name="gr300" draw:text-style-name="P4" draw:layer="layout" svg:x1="23cm" svg:y1="20cm" svg:x2="34cm" svg:y2="20cm">
          <text:p/>
        </draw:line>
        <draw:frame draw:style-name="gr301" draw:text-style-name="P34" draw:layer="layout" svg:width="2.266cm" svg:height="0.962cm" svg:x="25.865cm" svg:y="20.021cm">
          <draw:text-box>
            <text:p><text:span text:style-name="T9">D-Bus</text:span></text:p>
          </draw:text-box>
        </draw:frame>
        <draw:line draw:style-name="gr302" draw:text-style-name="P1" draw:layer="layout" svg:x1="32cm" svg:y1="18cm" svg:x2="32cm" svg:y2="20cm">
          <text:p/>
        </draw:line>
        <draw:line draw:style-name="gr300" draw:text-style-name="P4" draw:layer="layout" svg:x1="4cm" svg:y1="20cm" svg:x2="21cm" svg:y2="20cm">
          <text:p/>
        </draw:line>
        <draw:frame draw:style-name="gr303" draw:text-style-name="P34" draw:layer="layout" svg:width="1.984cm" svg:height="0.962cm" svg:x="7cm" svg:y="20.038cm">
          <draw:text-box>
            <text:p><text:span text:style-name="T9">I-Bus</text:span></text:p>
          </draw:text-box>
        </draw:frame>
        <draw:line draw:style-name="gr302" draw:text-style-name="P1" draw:layer="layout" svg:x1="9cm" svg:y1="18cm" svg:x2="9cm" svg:y2="20cm">
          <text:p/>
        </draw:line>
        <draw:line draw:style-name="gr304" draw:text-style-name="P1" draw:layer="layout" svg:x1="5cm" svg:y1="18cm" svg:x2="5cm" svg:y2="20cm">
          <text:p/>
        </draw:line>
        <draw:line draw:style-name="gr305" draw:text-style-name="P1" draw:layer="layout" svg:x1="15.5cm" svg:y1="18cm" svg:x2="15.5cm" svg:y2="20cm">
          <text:p/>
        </draw:line>
        <draw:line draw:style-name="gr304" draw:text-style-name="P1" draw:layer="layout" svg:x1="27cm" svg:y1="18cm" svg:x2="27cm" svg:y2="20cm">
          <text:p/>
        </draw:line>
        <draw:line draw:style-name="gr305" draw:text-style-name="P1" draw:layer="layout" svg:x1="21cm" svg:y1="18cm" svg:x2="21cm" svg:y2="20cm">
          <text:p/>
        </draw:line>
        <draw:line draw:style-name="gr304" draw:text-style-name="P1" draw:layer="layout" svg:x1="23cm" svg:y1="18cm" svg:x2="23cm" svg:y2="20cm">
          <text:p/>
        </draw:line>
        <draw:line draw:style-name="gr146" draw:text-style-name="P4" draw:layer="layout" svg:x1="24cm" svg:y1="16cm" svg:x2="25cm" svg:y2="16cm">
          <text:p/>
        </draw:line>
        <draw:line draw:style-name="gr146" draw:text-style-name="P4" draw:layer="layout" svg:x1="24cm" svg:y1="17cm" svg:x2="25cm" svg:y2="17cm">
          <text:p/>
        </draw:line>
        <draw:line draw:style-name="gr146" draw:text-style-name="P4" draw:layer="layout" svg:x1="5cm" svg:y1="14cm" svg:x2="5cm" svg:y2="16cm">
          <text:p/>
        </draw:line>
        <draw:line draw:style-name="gr146" draw:text-style-name="P4" draw:layer="layout" svg:x1="21cm" svg:y1="14cm" svg:x2="21cm" svg:y2="15cm">
          <text:p/>
        </draw:line>
        <draw:line draw:style-name="gr146" draw:text-style-name="P4" draw:layer="layout" svg:x1="22cm" svg:y1="13.5cm" svg:x2="22cm" svg:y2="15cm">
          <text:p/>
        </draw:line>
        <draw:line draw:style-name="gr146" draw:text-style-name="P4" draw:layer="layout" svg:x1="27cm" svg:y1="13cm" svg:x2="27cm" svg:y2="15cm">
          <text:p/>
        </draw:line>
        <draw:line draw:style-name="gr146" draw:text-style-name="P4" draw:layer="layout" svg:x1="31cm" svg:y1="12.5cm" svg:x2="31cm" svg:y2="15cm">
          <text:p/>
        </draw:line>
        <draw:line draw:style-name="gr146" draw:text-style-name="P4" draw:layer="layout" svg:x1="33cm" svg:y1="12cm" svg:x2="33cm" svg:y2="15cm">
          <text:p/>
        </draw:line>
        <draw:line draw:style-name="gr38" draw:text-style-name="P4" draw:layer="layout" svg:x1="18.6cm" svg:y1="14cm" svg:x2="21cm" svg:y2="14cm">
          <text:p/>
        </draw:line>
        <draw:line draw:style-name="gr38" draw:text-style-name="P4" draw:layer="layout" svg:x1="18.6cm" svg:y1="15cm" svg:x2="18.6cm" svg:y2="14cm">
          <text:p/>
        </draw:line>
        <draw:line draw:style-name="gr38" draw:text-style-name="P4" draw:layer="layout" svg:x1="18cm" svg:y1="15cm" svg:x2="18cm" svg:y2="13.5cm">
          <text:p/>
        </draw:line>
        <draw:line draw:style-name="gr38" draw:text-style-name="P4" draw:layer="layout" svg:x1="18cm" svg:y1="13.5cm" svg:x2="22cm" svg:y2="13.5cm">
          <text:p/>
        </draw:line>
        <draw:line draw:style-name="gr38" draw:text-style-name="P4" draw:layer="layout" svg:x1="17.5cm" svg:y1="15cm" svg:x2="17.5cm" svg:y2="13cm">
          <text:p/>
        </draw:line>
        <draw:line draw:style-name="gr38" draw:text-style-name="P4" draw:layer="layout" svg:x1="17.5cm" svg:y1="13cm" svg:x2="27cm" svg:y2="13cm">
          <text:p/>
        </draw:line>
        <draw:line draw:style-name="gr38" draw:text-style-name="P4" draw:layer="layout" svg:x1="17cm" svg:y1="12.5cm" svg:x2="31cm" svg:y2="12.5cm">
          <text:p/>
        </draw:line>
        <draw:line draw:style-name="gr38" draw:text-style-name="P4" draw:layer="layout" svg:x1="17cm" svg:y1="15cm" svg:x2="17cm" svg:y2="12.5cm">
          <text:p/>
        </draw:line>
        <draw:line draw:style-name="gr38" draw:text-style-name="P4" draw:layer="layout" svg:x1="16.5cm" svg:y1="12cm" svg:x2="33cm" svg:y2="12cm">
          <text:p/>
        </draw:line>
        <draw:line draw:style-name="gr38" draw:text-style-name="P4" draw:layer="layout" svg:x1="16.5cm" svg:y1="15cm" svg:x2="16.5cm" svg:y2="12cm">
          <text:p/>
        </draw:line>
        <draw:line draw:style-name="gr38" draw:text-style-name="P4" draw:layer="layout" svg:x1="5cm" svg:y1="14cm" svg:x2="12.5cm" svg:y2="14cm">
          <text:p/>
        </draw:line>
        <draw:line draw:style-name="gr38" draw:text-style-name="P4" draw:layer="layout" svg:x1="12.5cm" svg:y1="15cm" svg:x2="12.5cm" svg:y2="14cm">
          <text:p/>
        </draw:line>
        <draw:custom-shape draw:style-name="gr307" draw:text-style-name="P4" draw:layer="layout" svg:width="32cm" svg:height="14cm" svg:x="3cm" svg:y="11cm">
          <text:p/>
          <draw:enhanced-geometry svg:viewBox="0 0 21600 21600" draw:type="rectangle" draw:enhanced-path="M 0 0 L 21600 0 21600 21600 0 21600 0 0 Z N"/>
        </draw:custom-shape>
        <draw:custom-shape draw:style-name="gr131" draw:text-style-name="P32" draw:layer="layout" svg:width="2cm" svg:height="2cm" svg:x="3cm" svg:y="11cm">
          <text:p text:style-name="P31"><text:span text:style-name="T9">JTAG</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2cm" svg:height="2cm" svg:x="29cm" svg:y="22cm">
          <text:p text:style-name="P31"><text:span text:style-name="T9">U</text:span><text:span text:style-name="T9">A</text:span><text:span text:style-name="T9">R</text:span><text:span text:style-name="T9">T</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2cm" svg:height="2cm" svg:x="32cm" svg:y="22cm">
          <text:p text:style-name="P31"><text:span text:style-name="T9">G</text:span><text:span text:style-name="T9">P</text:span><text:span text:style-name="T9">I</text:span><text:span text:style-name="T9">O</text:span></text:p>
          <draw:enhanced-geometry svg:viewBox="0 0 21600 21600" draw:mirror-horizontal="false" draw:mirror-vertical="false" draw:type="rectangle" draw:enhanced-path="M 0 0 L 21600 0 21600 21600 0 21600 0 0 Z N"/>
        </draw:custom-shape>
        <draw:line draw:style-name="gr302" draw:text-style-name="P1" draw:layer="layout" svg:x1="30cm" svg:y1="20cm" svg:x2="30cm" svg:y2="22cm">
          <text:p/>
        </draw:line>
        <draw:line draw:style-name="gr302" draw:text-style-name="P1" draw:layer="layout" svg:x1="33cm" svg:y1="20cm" svg:x2="33cm" svg:y2="22cm">
          <text:p/>
        </draw:line>
        <draw:custom-shape draw:style-name="gr310" draw:text-style-name="P33" draw:layer="layout" svg:width="3cm" svg:height="2cm" svg:x="8cm" svg:y="26cm">
          <text:p text:style-name="P31"><text:span text:style-name="T9">NO</text:span><text:span text:style-name="T9">R</text:span></text:p>
          <text:p text:style-name="P31"><text:span text:style-name="T9">Fla</text:span><text:span text:style-name="T9">sh</text:span></text:p>
          <draw:enhanced-geometry svg:viewBox="0 0 21600 21600" draw:type="rectangle" draw:enhanced-path="M 0 0 L 21600 0 21600 21600 0 21600 0 0 Z N"/>
        </draw:custom-shape>
        <draw:custom-shape draw:style-name="gr310" draw:text-style-name="P33" draw:layer="layout" svg:width="3cm" svg:height="2cm" svg:x="8cm" svg:y="22cm">
          <text:p text:style-name="P31"><text:span text:style-name="T9">QSPI</text:span></text:p>
          <text:p text:style-name="P31"><text:span text:style-name="T9">IF/XIP</text:span></text:p>
          <draw:enhanced-geometry svg:viewBox="0 0 21600 21600" draw:type="rectangle" draw:enhanced-path="M 0 0 L 21600 0 21600 21600 0 21600 0 0 Z N"/>
        </draw:custom-shape>
        <draw:line draw:style-name="gr302" draw:text-style-name="P1" draw:layer="layout" svg:x1="10cm" svg:y1="20.038cm" svg:x2="10cm" svg:y2="22.038cm">
          <text:p/>
        </draw:line>
        <draw:line draw:style-name="gr302" draw:text-style-name="P1" draw:layer="layout" svg:x1="9.5cm" svg:y1="24cm" svg:x2="9.5cm" svg:y2="26cm">
          <text:p/>
        </draw:line>
        <draw:frame draw:style-name="gr309" draw:text-style-name="P3" draw:layer="layout" svg:width="5.451cm" svg:height="0.962cm" svg:x="3.05cm" svg:y="24cm">
          <draw:text-box>
            <text:p>RWU-RV64I V3.0</text:p>
          </draw:text-box>
        </draw:frame>
        <draw:custom-shape draw:style-name="gr295" draw:text-style-name="P33" draw:layer="layout" svg:width="4cm" svg:height="3cm" svg:x="7cm" svg:y="15cm">
          <text:p text:style-name="P31"><text:span text:style-name="T9">I-</text:span><text:span text:style-name="T9">Ca</text:span><text:span text:style-name="T9">ch</text:span><text:span text:style-name="T9">e</text:span></text:p>
          <draw:enhanced-geometry svg:viewBox="0 0 21600 21600" draw:type="rectangle" draw:enhanced-path="M 0 0 L 21600 0 21600 21600 0 21600 0 0 Z N"/>
        </draw:custom-shape>
        <draw:custom-shape draw:style-name="gr311" draw:text-style-name="P33" draw:layer="layout" svg:width="4cm" svg:height="1.5cm" svg:x="30cm" svg:y="16.5cm">
          <text:p text:style-name="P31"><text:span text:style-name="T9">D-</text:span><text:span text:style-name="T9">Cac</text:span><text:span text:style-name="T9">he</text:span></text:p>
          <draw:enhanced-geometry svg:viewBox="0 0 21600 21600" draw:type="rectangle" draw:enhanced-path="M 0 0 L 21600 0 21600 21600 0 21600 0 0 Z N"/>
        </draw:custom-shape>
      </draw:page>
      <draw:page draw:name="page9" draw:style-name="dp1" draw:master-page-name="Default">
        <draw:g draw:style-name="gr1">
          <draw:custom-shape draw:style-name="gr312" draw:text-style-name="P10" draw:layer="layout" svg:width="3.1cm" svg:height="4cm" svg:x="19.9cm" svg:y="8cm">
            <text:p text:style-name="P7"><text:span text:style-name="T2">DM</text:span><text:span text:style-name="T2">em</text:span><text:span text:style-name="T2">Cor</text:span><text:span text:style-name="T2">e</text:span></text:p>
            <draw:enhanced-geometry svg:viewBox="0 0 21600 21600" draw:type="rectangle" draw:enhanced-path="M 0 0 L 21600 0 21600 21600 0 21600 0 0 Z N"/>
          </draw:custom-shape>
          <draw:frame draw:style-name="gr56" draw:text-style-name="P9" draw:layer="layout" svg:width="1.467cm" svg:height="0.725cm" svg:x="20.733cm" svg:y="7.9cm">
            <draw:text-box>
              <text:p><text:span text:style-name="T2">wrEn</text:span></text:p>
            </draw:text-box>
          </draw:frame>
          <draw:g draw:style-name="gr66">
            <draw:line draw:style-name="gr60" draw:text-style-name="P11" draw:layer="layout" svg:x1="19.9cm" svg:y1="11.8cm" svg:x2="20.2cm" svg:y2="11.7cm">
              <text:p/>
            </draw:line>
            <draw:line draw:style-name="gr60" draw:text-style-name="P11" draw:layer="layout" svg:x1="19.9cm" svg:y1="11.6cm" svg:x2="20.2cm" svg:y2="11.7cm">
              <text:p/>
            </draw:line>
          </draw:g>
          <draw:frame draw:style-name="gr111" draw:text-style-name="P9" draw:layer="layout" svg:width="1.353cm" svg:height="0.725cm" svg:x="19.7cm" svg:y="8.6cm">
            <draw:text-box>
              <text:p><text:span text:style-name="T2">addr</text:span></text:p>
            </draw:text-box>
          </draw:frame>
          <draw:frame draw:style-name="gr112" draw:text-style-name="P9" draw:layer="layout" svg:width="1.425cm" svg:height="0.725cm" svg:x="19.7cm" svg:y="9.6cm">
            <draw:text-box>
              <text:p><text:span text:style-name="T2">datai</text:span></text:p>
            </draw:text-box>
          </draw:frame>
          <draw:frame draw:style-name="gr113" draw:text-style-name="P9" draw:layer="layout" svg:width="1.569cm" svg:height="0.725cm" svg:x="21.631cm" svg:y="9.6cm">
            <draw:text-box>
              <text:p><text:span text:style-name="T2">datao</text:span></text:p>
            </draw:text-box>
          </draw:frame>
          <draw:frame draw:style-name="gr313" draw:text-style-name="P9" draw:layer="layout" svg:width="1.82cm" svg:height="0.725cm" svg:x="19.7cm" svg:y="10.601cm">
            <draw:text-box>
              <text:p><text:span text:style-name="T2">byteEn</text:span></text:p>
            </draw:text-box>
          </draw:frame>
        </draw:g>
        <draw:custom-shape draw:style-name="gr40" draw:text-style-name="P5" draw:layer="layout" svg:width="0.2cm" svg:height="0.2cm" svg:x="13.9cm" svg:y="6.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9" draw:layer="layout" svg:width="1.349cm" svg:height="0.725cm" svg:x="6cm" svg:y="14.6cm">
          <draw:text-box>
            <text:p><text:span text:style-name="T2">clk_i</text:span></text:p>
          </draw:text-box>
        </draw:frame>
        <draw:g draw:style-name="gr1">
          <draw:custom-shape draw:style-name="gr314" draw:text-style-name="P10" draw:layer="layout" svg:width="4.014cm" svg:height="5cm" svg:x="11.986cm" svg:y="9cm">
            <text:p text:style-name="P7"><text:span text:style-name="T2">DM</text:span><text:span text:style-name="T2">em</text:span><text:span text:style-name="T2">Fro</text:span><text:span text:style-name="T2">nt</text:span></text:p>
            <draw:enhanced-geometry svg:viewBox="0 0 21600 21600" draw:type="rectangle" draw:enhanced-path="M 0 0 L 21600 0 21600 21600 0 21600 0 0 Z N"/>
          </draw:custom-shape>
          <draw:frame draw:style-name="gr82" draw:text-style-name="P9" draw:layer="layout" svg:width="2.771cm" svg:height="0.725cm" svg:x="11.786cm" svg:y="9.6cm">
            <draw:text-box>
              <text:p><text:span text:style-name="T2">addr</text:span></text:p>
            </draw:text-box>
          </draw:frame>
          <draw:frame draw:style-name="gr315" draw:text-style-name="P9" draw:layer="layout" svg:width="1.466cm" svg:height="0.725cm" svg:x="13.2cm" svg:y="8.875cm">
            <draw:text-box>
              <text:p><text:span text:style-name="T2">wrEn</text:span></text:p>
            </draw:text-box>
          </draw:frame>
          <draw:frame draw:style-name="gr84" draw:text-style-name="P9" draw:layer="layout" svg:width="2.018cm" svg:height="0.725cm" svg:x="11.787cm" svg:y="12.601cm">
            <draw:text-box>
              <text:p><text:span text:style-name="T2">opcode</text:span></text:p>
            </draw:text-box>
          </draw:frame>
          <draw:frame draw:style-name="gr316" draw:text-style-name="P9" draw:layer="layout" svg:width="1.538cm" svg:height="0.725cm" svg:x="11.787cm" svg:y="11.601cm">
            <draw:text-box>
              <text:p><text:span text:style-name="T2">func3</text:span></text:p>
            </draw:text-box>
          </draw:frame>
          <draw:frame draw:style-name="gr317" draw:text-style-name="P9" draw:layer="layout" svg:width="1.561cm" svg:height="0.725cm" svg:x="14.64cm" svg:y="9.6cm">
            <draw:text-box>
              <text:p><text:span text:style-name="T2">datao</text:span></text:p>
            </draw:text-box>
          </draw:frame>
          <draw:frame draw:style-name="gr318" draw:text-style-name="P9" draw:layer="layout" svg:width="1.82cm" svg:height="0.725cm" svg:x="14.381cm" svg:y="10.6cm">
            <draw:text-box>
              <text:p><text:span text:style-name="T2">byteEn</text:span></text:p>
            </draw:text-box>
          </draw:frame>
          <draw:frame draw:style-name="gr319" draw:text-style-name="P9" draw:layer="layout" svg:width="1.42cm" svg:height="0.725cm" svg:x="11.788cm" svg:y="10.602cm">
            <draw:text-box>
              <text:p><text:span text:style-name="T2">datai</text:span></text:p>
            </draw:text-box>
          </draw:frame>
        </draw:g>
        <draw:g draw:style-name="gr1">
          <draw:custom-shape draw:style-name="gr314" draw:text-style-name="P10" draw:layer="layout" svg:width="4.014cm" svg:height="5cm" svg:x="27cm" svg:y="8cm">
            <text:p text:style-name="P7"><text:span text:style-name="T2">DMemBa</text:span><text:span text:style-name="T2">ck</text:span></text:p>
            <draw:enhanced-geometry svg:viewBox="0 0 21600 21600" draw:type="rectangle" draw:enhanced-path="M 0 0 L 21600 0 21600 21600 0 21600 0 0 Z N"/>
          </draw:custom-shape>
          <draw:frame draw:style-name="gr82" draw:text-style-name="P9" draw:layer="layout" svg:width="2.771cm" svg:height="0.725cm" svg:x="26.8cm" svg:y="8.6cm">
            <draw:text-box>
              <text:p><text:span text:style-name="T2">addr</text:span></text:p>
            </draw:text-box>
          </draw:frame>
          <draw:frame draw:style-name="gr320" draw:text-style-name="P9" draw:layer="layout" svg:width="1.396cm" svg:height="0.725cm" svg:x="28.214cm" svg:y="7.875cm">
            <draw:text-box>
              <text:p><text:span text:style-name="T2">rdEn</text:span></text:p>
            </draw:text-box>
          </draw:frame>
          <draw:frame draw:style-name="gr84" draw:text-style-name="P9" draw:layer="layout" svg:width="2.018cm" svg:height="0.725cm" svg:x="26.801cm" svg:y="11.601cm">
            <draw:text-box>
              <text:p><text:span text:style-name="T2">opcode</text:span></text:p>
            </draw:text-box>
          </draw:frame>
          <draw:frame draw:style-name="gr316" draw:text-style-name="P9" draw:layer="layout" svg:width="1.538cm" svg:height="0.725cm" svg:x="26.801cm" svg:y="10.601cm">
            <draw:text-box>
              <text:p><text:span text:style-name="T2">func3</text:span></text:p>
            </draw:text-box>
          </draw:frame>
          <draw:frame draw:style-name="gr317" draw:text-style-name="P9" draw:layer="layout" svg:width="1.561cm" svg:height="0.725cm" svg:x="29.654cm" svg:y="8.6cm">
            <draw:text-box>
              <text:p><text:span text:style-name="T2">datao</text:span></text:p>
            </draw:text-box>
          </draw:frame>
          <draw:frame draw:style-name="gr319" draw:text-style-name="P9" draw:layer="layout" svg:width="1.42cm" svg:height="0.725cm" svg:x="26.802cm" svg:y="9.602cm">
            <draw:text-box>
              <text:p><text:span text:style-name="T2">datai</text:span></text:p>
            </draw:text-box>
          </draw:frame>
        </draw:g>
        <draw:frame draw:style-name="gr143" draw:text-style-name="P9" draw:layer="layout" svg:width="1.679cm" svg:height="0.725cm" svg:x="6cm" svg:y="9.575cm">
          <draw:text-box>
            <text:p><text:span text:style-name="T2">addr_i</text:span></text:p>
          </draw:text-box>
        </draw:frame>
        <draw:frame draw:style-name="gr321" draw:text-style-name="P9" draw:layer="layout" svg:width="1.796cm" svg:height="0.725cm" svg:x="6cm" svg:y="6.6cm">
          <draw:text-box>
            <text:p><text:span text:style-name="T2">wrEn_i</text:span></text:p>
          </draw:text-box>
        </draw:frame>
        <draw:frame draw:style-name="gr322" draw:text-style-name="P9" draw:layer="layout" svg:width="1.726cm" svg:height="0.725cm" svg:x="6cm" svg:y="5.6cm">
          <draw:text-box>
            <text:p><text:span text:style-name="T2">rdEn_i</text:span></text:p>
          </draw:text-box>
        </draw:frame>
        <draw:frame draw:style-name="gr323" draw:text-style-name="P9" draw:layer="layout" svg:width="2.22cm" svg:height="0.725cm" svg:x="6cm" svg:y="12.6cm">
          <draw:text-box>
            <text:p><text:span text:style-name="T2">opcode_i</text:span></text:p>
          </draw:text-box>
        </draw:frame>
        <draw:frame draw:style-name="gr324" draw:text-style-name="P9" draw:layer="layout" svg:width="1.867cm" svg:height="0.725cm" svg:x="6.035cm" svg:y="11.6cm">
          <draw:text-box>
            <text:p><text:span text:style-name="T2">func3_i</text:span></text:p>
          </draw:text-box>
        </draw:frame>
        <draw:frame draw:style-name="gr325" draw:text-style-name="P9" draw:layer="layout" svg:width="1.655cm" svg:height="0.725cm" svg:x="6.001cm" svg:y="10.6cm">
          <draw:text-box>
            <text:p><text:span text:style-name="T2">data_i</text:span></text:p>
          </draw:text-box>
        </draw:frame>
        <draw:frame draw:style-name="gr326" draw:text-style-name="P9" draw:layer="layout" svg:width="1.797cm" svg:height="0.725cm" svg:x="32.207cm" svg:y="8.575cm">
          <draw:text-box>
            <text:p><text:span text:style-name="T2">data_o</text:span></text:p>
          </draw:text-box>
        </draw:frame>
        <draw:line draw:style-name="gr327" draw:text-style-name="P4" draw:layer="layout" svg:x1="14cm" svg:y1="7cm" svg:x2="14cm" svg:y2="9cm">
          <text:p/>
        </draw:line>
        <draw:line draw:style-name="gr328" draw:text-style-name="P4" draw:layer="layout" svg:x1="21.5cm" svg:y1="7cm" svg:x2="21.5cm" svg:y2="8cm">
          <text:p/>
        </draw:line>
        <draw:line draw:style-name="gr38" draw:text-style-name="P4" draw:layer="layout" svg:x1="8cm" svg:y1="7cm" svg:x2="21.5cm" svg:y2="7cm">
          <text:p/>
        </draw:line>
        <draw:line draw:style-name="gr38" draw:text-style-name="P4" draw:layer="layout" svg:x1="8cm" svg:y1="6cm" svg:x2="29cm" svg:y2="6cm">
          <text:p/>
        </draw:line>
        <draw:line draw:style-name="gr329" draw:text-style-name="P4" draw:layer="layout" svg:x1="29cm" svg:y1="6cm" svg:x2="29cm" svg:y2="8cm">
          <text:p/>
        </draw:line>
        <draw:line draw:style-name="gr330" draw:text-style-name="P4" draw:layer="layout" svg:x1="8cm" svg:y1="10cm" svg:x2="11.986cm" svg:y2="10cm">
          <text:p/>
        </draw:line>
        <draw:line draw:style-name="gr331" draw:text-style-name="P4" draw:layer="layout" svg:x1="8cm" svg:y1="11cm" svg:x2="11.986cm" svg:y2="11cm">
          <text:p/>
        </draw:line>
        <draw:line draw:style-name="gr332" draw:text-style-name="P4" draw:layer="layout" svg:x1="8cm" svg:y1="12cm" svg:x2="11.986cm" svg:y2="12cm">
          <text:p/>
        </draw:line>
        <draw:line draw:style-name="gr333" draw:text-style-name="P4" draw:layer="layout" svg:x1="8cm" svg:y1="13cm" svg:x2="11.986cm" svg:y2="13cm">
          <text:p/>
        </draw:line>
        <draw:line draw:style-name="gr38" draw:text-style-name="P4" draw:layer="layout" svg:x1="8cm" svg:y1="15cm" svg:x2="19cm" svg:y2="15cm">
          <text:p/>
        </draw:line>
        <draw:line draw:style-name="gr334" draw:text-style-name="P4" draw:layer="layout" svg:x1="19cm" svg:y1="11.7cm" svg:x2="19.9cm" svg:y2="11.7cm">
          <text:p/>
        </draw:line>
        <draw:line draw:style-name="gr38" draw:text-style-name="P4" draw:layer="layout" svg:x1="19cm" svg:y1="15cm" svg:x2="19cm" svg:y2="11.7cm">
          <text:p/>
        </draw:line>
        <draw:line draw:style-name="gr335" draw:text-style-name="P4" draw:layer="layout" svg:x1="19cm" svg:y1="9cm" svg:x2="19.9cm" svg:y2="9cm">
          <text:p/>
        </draw:line>
        <draw:line draw:style-name="gr335" draw:text-style-name="P4" draw:layer="layout" svg:x1="16cm" svg:y1="10cm" svg:x2="19.9cm" svg:y2="10cm">
          <text:p/>
        </draw:line>
        <draw:line draw:style-name="gr335" draw:text-style-name="P4" draw:layer="layout" svg:x1="16cm" svg:y1="11cm" svg:x2="19.9cm" svg:y2="11cm">
          <text:p/>
        </draw:line>
        <draw:line draw:style-name="gr38" draw:text-style-name="P4" draw:layer="layout" svg:x1="9cm" svg:y1="10cm" svg:x2="9cm" svg:y2="7.5cm">
          <text:p/>
        </draw:line>
        <draw:line draw:style-name="gr38" draw:text-style-name="P4" draw:layer="layout" svg:x1="9cm" svg:y1="7.5cm" svg:x2="26cm" svg:y2="7.5cm">
          <text:p/>
        </draw:line>
        <draw:custom-shape draw:style-name="gr40" draw:text-style-name="P5" draw:layer="layout" svg:width="0.2cm" svg:height="0.2cm" svg:x="8.901cm" svg:y="9.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5" draw:text-style-name="P4" draw:layer="layout" svg:x1="26cm" svg:y1="9cm" svg:x2="27cm" svg:y2="9cm">
          <text:p/>
        </draw:line>
        <draw:line draw:style-name="gr38" draw:text-style-name="P4" draw:layer="layout" svg:x1="26cm" svg:y1="7.5cm" svg:x2="26cm" svg:y2="9cm">
          <text:p/>
        </draw:line>
        <draw:line draw:style-name="gr38" draw:text-style-name="P4" draw:layer="layout" svg:x1="19cm" svg:y1="7.5cm" svg:x2="19cm" svg:y2="9cm">
          <text:p/>
        </draw:line>
        <draw:custom-shape draw:style-name="gr40" draw:text-style-name="P5" draw:layer="layout" svg:width="0.2cm" svg:height="0.2cm" svg:x="18.901cm" svg:y="7.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6" draw:text-style-name="P4" draw:layer="layout" svg:x1="26cm" svg:y1="12cm" svg:x2="27cm" svg:y2="12cm">
          <text:p/>
        </draw:line>
        <draw:line draw:style-name="gr38" draw:text-style-name="P4" draw:layer="layout" svg:x1="11cm" svg:y1="16cm" svg:x2="25cm" svg:y2="16cm">
          <text:p/>
        </draw:line>
        <draw:line draw:style-name="gr38" draw:text-style-name="P4" draw:layer="layout" svg:x1="10cm" svg:y1="17cm" svg:x2="26cm" svg:y2="17cm">
          <text:p/>
        </draw:line>
        <draw:line draw:style-name="gr336" draw:text-style-name="P4" draw:layer="layout" svg:x1="25cm" svg:y1="11cm" svg:x2="27cm" svg:y2="11cm">
          <text:p/>
        </draw:line>
        <draw:line draw:style-name="gr38" draw:text-style-name="P4" draw:layer="layout" svg:x1="26cm" svg:y1="12cm" svg:x2="26cm" svg:y2="17cm">
          <text:p/>
        </draw:line>
        <draw:line draw:style-name="gr38" draw:text-style-name="P4" draw:layer="layout" svg:x1="25cm" svg:y1="11cm" svg:x2="25cm" svg:y2="16cm">
          <text:p/>
        </draw:line>
        <draw:line draw:style-name="gr38" draw:text-style-name="P4" draw:layer="layout" svg:x1="11cm" svg:y1="12cm" svg:x2="11cm" svg:y2="16cm">
          <text:p/>
        </draw:line>
        <draw:custom-shape draw:style-name="gr40" draw:text-style-name="P5" draw:layer="layout" svg:width="0.2cm" svg:height="0.2cm" svg:x="10.902cm" svg:y="11.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0cm" svg:y1="13cm" svg:x2="10cm" svg:y2="17cm">
          <text:p/>
        </draw:line>
        <draw:custom-shape draw:style-name="gr40" draw:text-style-name="P5" draw:layer="layout" svg:width="0.2cm" svg:height="0.2cm" svg:x="9.903cm" svg:y="12.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7" draw:text-style-name="P4" draw:layer="layout" svg:x1="23cm" svg:y1="10cm" svg:x2="27cm" svg:y2="10cm">
          <text:p/>
        </draw:line>
        <draw:line draw:style-name="gr338" draw:text-style-name="P4" draw:layer="layout" svg:x1="31.014cm" svg:y1="9cm" svg:x2="32cm" svg:y2="9cm">
          <text:p/>
        </draw:line>
        <draw:custom-shape draw:style-name="gr339" draw:text-style-name="P10" draw:layer="layout" svg:width="33cm" svg:height="2cm" svg:x="1cm" svg:y="25cm">
          <text:p text:style-name="P7"><text:span text:style-name="T2">Wishbon</text:span><text:span text:style-name="T2">eBus</text:span></text:p>
          <draw:enhanced-geometry svg:viewBox="0 0 21600 21600" draw:type="rectangle" draw:enhanced-path="M 0 0 L 21600 0 21600 21600 0 21600 0 0 Z N"/>
        </draw:custom-shape>
        <draw:g draw:style-name="gr1">
          <draw:custom-shape draw:style-name="gr339" draw:text-style-name="P10" draw:layer="layout" svg:width="33cm" svg:height="2cm" svg:x="1cm" svg:y="21cm">
            <text:p text:style-name="P7"><text:span text:style-name="T2">SlaveBPI</text:span></text:p>
            <draw:enhanced-geometry svg:viewBox="0 0 21600 21600" draw:type="rectangle" draw:enhanced-path="M 0 0 L 21600 0 21600 21600 0 21600 0 0 Z N"/>
          </draw:custom-shape>
          <draw:frame draw:style-name="gr313" draw:text-style-name="P9" draw:layer="layout" svg:width="1.82cm" svg:height="0.725cm" svg:x="3.2cm" svg:y="20.875cm">
            <draw:text-box>
              <text:p><text:span text:style-name="T2">addr_o</text:span></text:p>
            </draw:text-box>
          </draw:frame>
          <draw:frame draw:style-name="gr340" draw:text-style-name="P9" draw:layer="layout" svg:width="3.796cm" svg:height="0.725cm" svg:x="30cm" svg:y="20.875cm">
            <draw:text-box>
              <text:p><text:span text:style-name="T2">data_from_</text:span><text:span text:style-name="T2">core_i</text:span></text:p>
            </draw:text-box>
          </draw:frame>
          <draw:frame draw:style-name="gr341" draw:text-style-name="P9" draw:layer="layout" svg:width="3.444cm" svg:height="0.725cm" svg:x="5.2cm" svg:y="20.876cm">
            <draw:text-box>
              <text:p><text:span text:style-name="T2">data_to_cor</text:span><text:span text:style-name="T2">e_o</text:span></text:p>
            </draw:text-box>
          </draw:frame>
          <draw:frame draw:style-name="gr342" draw:text-style-name="P9" draw:layer="layout" svg:width="1.42cm" svg:height="0.725cm" svg:x="1.301cm" svg:y="20.876cm">
            <draw:text-box>
              <text:p><text:span text:style-name="T2">wr_o</text:span></text:p>
            </draw:text-box>
          </draw:frame>
          <draw:frame draw:style-name="gr143" draw:text-style-name="P9" draw:layer="layout" svg:width="1.679cm" svg:height="0.725cm" svg:x="3.125cm" svg:y="22.4cm">
            <draw:text-box>
              <text:p><text:span text:style-name="T2">addr_i</text:span></text:p>
            </draw:text-box>
          </draw:frame>
          <draw:frame draw:style-name="gr325" draw:text-style-name="P9" draw:layer="layout" svg:width="1.655cm" svg:height="0.725cm" svg:x="5.102cm" svg:y="22.377cm">
            <draw:text-box>
              <text:p><text:span text:style-name="T2">data_i</text:span></text:p>
            </draw:text-box>
          </draw:frame>
          <draw:frame draw:style-name="gr326" draw:text-style-name="P9" draw:layer="layout" svg:width="1.797cm" svg:height="0.725cm" svg:x="19.107cm" svg:y="22.4cm">
            <draw:text-box>
              <text:p><text:span text:style-name="T2">data_o</text:span></text:p>
            </draw:text-box>
          </draw:frame>
          <draw:frame draw:style-name="gr343" draw:text-style-name="P9" draw:layer="layout" svg:width="1.373cm" svg:height="0.725cm" svg:x="1.33cm" svg:y="22.375cm">
            <draw:text-box>
              <text:p><text:span text:style-name="T2">we_i</text:span></text:p>
            </draw:text-box>
          </draw:frame>
          <draw:frame draw:style-name="gr343" draw:text-style-name="P9" draw:layer="layout" svg:width="1.373cm" svg:height="0.725cm" svg:x="7.301cm" svg:y="22.378cm">
            <draw:text-box>
              <text:p><text:span text:style-name="T2">sel_i</text:span></text:p>
            </draw:text-box>
          </draw:frame>
          <draw:frame draw:style-name="gr47" draw:text-style-name="P9" draw:layer="layout" svg:width="1.396cm" svg:height="0.725cm" svg:x="9.301cm" svg:y="22.379cm">
            <draw:text-box>
              <text:p><text:span text:style-name="T2">stb_i</text:span></text:p>
            </draw:text-box>
          </draw:frame>
          <draw:frame draw:style-name="gr344" draw:text-style-name="P9" draw:layer="layout" svg:width="1.632cm" svg:height="0.725cm" svg:x="17.2cm" svg:y="22.38cm">
            <draw:text-box>
              <text:p><text:span text:style-name="T2">ack_o</text:span></text:p>
            </draw:text-box>
          </draw:frame>
          <draw:frame draw:style-name="gr345" draw:text-style-name="P9" draw:layer="layout" svg:width="1.466cm" svg:height="0.725cm" svg:x="11.202cm" svg:y="22.38cm">
            <draw:text-box>
              <text:p><text:span text:style-name="T2">cyc_i</text:span></text:p>
            </draw:text-box>
          </draw:frame>
        </draw:g>
        <draw:line draw:style-name="gr38" draw:text-style-name="P4" draw:layer="layout" svg:x1="4cm" svg:y1="21cm" svg:x2="4cm" svg:y2="10cm">
          <text:p/>
        </draw:line>
        <draw:line draw:style-name="gr346" draw:text-style-name="P4" draw:layer="layout" svg:x1="4cm" svg:y1="10cm" svg:x2="6cm" svg:y2="10cm">
          <text:p/>
        </draw:line>
        <draw:line draw:style-name="gr347" draw:text-style-name="P4" draw:layer="layout" svg:x1="33cm" svg:y1="9.4cm" svg:x2="33cm" svg:y2="21cm">
          <text:p/>
        </draw:line>
        <draw:line draw:style-name="gr38" draw:text-style-name="P4" draw:layer="layout" svg:x1="5cm" svg:y1="20cm" svg:x2="5cm" svg:y2="11cm">
          <text:p/>
        </draw:line>
        <draw:line draw:style-name="gr348" draw:text-style-name="P4" draw:layer="layout" svg:x1="5cm" svg:y1="11cm" svg:x2="6.001cm" svg:y2="11cm">
          <text:p/>
        </draw:line>
        <draw:line draw:style-name="gr38" draw:text-style-name="P4" draw:layer="layout" svg:x1="2cm" svg:y1="21cm" svg:x2="2cm" svg:y2="6cm">
          <text:p/>
        </draw:line>
        <draw:line draw:style-name="gr349" draw:text-style-name="P4" draw:layer="layout" svg:x1="2cm" svg:y1="7cm" svg:x2="6cm" svg:y2="7cm">
          <text:p/>
        </draw:line>
        <draw:frame draw:style-name="gr350" draw:text-style-name="P9" draw:layer="layout" svg:width="2.361cm" svg:height="0.725cm" svg:x="2.9cm" svg:y="23.7cm">
          <draw:text-box>
            <text:p><text:span text:style-name="T2">dBusAddr</text:span></text:p>
          </draw:text-box>
        </draw:frame>
        <draw:frame draw:style-name="gr351" draw:text-style-name="P9" draw:layer="layout" svg:width="2.894cm" svg:height="0.725cm" svg:x="4.7cm" svg:y="24.301cm">
          <draw:text-box>
            <text:p><text:span text:style-name="T2">dBusDataW</text:span><text:span text:style-name="T2">r</text:span></text:p>
          </draw:text-box>
        </draw:frame>
        <draw:frame draw:style-name="gr352" draw:text-style-name="P9" draw:layer="layout" svg:width="2.902cm" svg:height="0.725cm" svg:x="20.002cm" svg:y="24.275cm">
          <draw:text-box>
            <text:p><text:span text:style-name="T2">dBusDataR</text:span><text:span text:style-name="T2">d</text:span></text:p>
          </draw:text-box>
        </draw:frame>
        <draw:frame draw:style-name="gr313" draw:text-style-name="P9" draw:layer="layout" svg:width="1.82cm" svg:height="0.725cm" svg:x="1.1cm" svg:y="24.275cm">
          <draw:text-box>
            <text:p><text:span text:style-name="T2">wbdwe</text:span></text:p>
          </draw:text-box>
        </draw:frame>
        <draw:frame draw:style-name="gr313" draw:text-style-name="P9" draw:layer="layout" svg:width="1.82cm" svg:height="0.725cm" svg:x="8cm" svg:y="23cm">
          <draw:text-box>
            <text:p><text:span text:style-name="T2">wbdsel</text:span></text:p>
          </draw:text-box>
        </draw:frame>
        <draw:frame draw:style-name="gr353" draw:text-style-name="P9" draw:layer="layout" svg:width="1.843cm" svg:height="0.725cm" svg:x="9.96cm" svg:y="23cm">
          <draw:text-box>
            <text:p><text:span text:style-name="T2">wbdstb</text:span></text:p>
          </draw:text-box>
        </draw:frame>
        <draw:frame draw:style-name="gr354" draw:text-style-name="P9" draw:layer="layout" svg:width="1.937cm" svg:height="0.8cm" svg:x="18cm" svg:y="24.2cm">
          <draw:text-box>
            <text:p><text:span text:style-name="T2">wbdack</text:span></text:p>
          </draw:text-box>
        </draw:frame>
        <draw:frame draw:style-name="gr355" draw:text-style-name="P9" draw:layer="layout" svg:width="1.914cm" svg:height="0.725cm" svg:x="12.001cm" svg:y="23cm">
          <draw:text-box>
            <text:p><text:span text:style-name="T2">wbdcyc</text:span></text:p>
          </draw:text-box>
        </draw:frame>
        <draw:line draw:style-name="gr356" draw:text-style-name="P4" draw:layer="layout" svg:x1="20cm" svg:y1="23cm" svg:x2="20cm" svg:y2="25cm">
          <text:p/>
        </draw:line>
        <draw:line draw:style-name="gr357" draw:text-style-name="P4" draw:layer="layout" svg:x1="18cm" svg:y1="23cm" svg:x2="18cm" svg:y2="25cm">
          <text:p/>
        </draw:line>
        <draw:line draw:style-name="gr358" draw:text-style-name="P4" draw:layer="layout" svg:x1="12cm" svg:y1="25cm" svg:x2="12cm" svg:y2="23cm">
          <text:p/>
        </draw:line>
        <draw:line draw:style-name="gr359" draw:text-style-name="P4" draw:layer="layout" svg:x1="10cm" svg:y1="25cm" svg:x2="10cm" svg:y2="23cm">
          <text:p/>
        </draw:line>
        <draw:line draw:style-name="gr360" draw:text-style-name="P4" draw:layer="layout" svg:x1="8cm" svg:y1="25cm" svg:x2="8cm" svg:y2="23cm">
          <text:p/>
        </draw:line>
        <draw:line draw:style-name="gr361" draw:text-style-name="P4" draw:layer="layout" svg:x1="6cm" svg:y1="25cm" svg:x2="6cm" svg:y2="23cm">
          <text:p/>
        </draw:line>
        <draw:line draw:style-name="gr362" draw:text-style-name="P4" draw:layer="layout" svg:x1="4cm" svg:y1="25cm" svg:x2="4cm" svg:y2="23cm">
          <text:p/>
        </draw:line>
        <draw:line draw:style-name="gr363" draw:text-style-name="P4" draw:layer="layout" svg:x1="2cm" svg:y1="25cm" svg:x2="2cm" svg:y2="23cm">
          <text:p/>
        </draw:line>
        <draw:line draw:style-name="gr38" draw:text-style-name="P4" draw:layer="layout" svg:x1="7cm" svg:y1="21cm" svg:x2="7cm" svg:y2="20cm">
          <text:p/>
        </draw:line>
        <draw:line draw:style-name="gr38" draw:text-style-name="P4" draw:layer="layout" svg:x1="7cm" svg:y1="20cm" svg:x2="5cm" svg:y2="20cm">
          <text:p/>
        </draw:line>
        <draw:g draw:style-name="gr1">
          <draw:polygon draw:style-name="gr155" draw:text-style-name="P14" draw:layer="layout" svg:width="0.999cm" svg:height="0.999cm" svg:x="3.9cm" svg:y="5.5cm" svg:viewBox="0 0 1000 1000" draw:points="0,0 0,1000 1000,500">
            <text:p/>
          </draw:polygon>
          <draw:custom-shape draw:style-name="gr364" draw:text-style-name="P14" draw:layer="layout" svg:width="0.2cm" svg:height="0.2cm" svg:x="4.9cm" svg:y="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65" draw:text-style-name="P4" draw:layer="layout" svg:x1="5.1cm" svg:y1="6cm" svg:x2="6cm" svg:y2="6cm">
          <text:p/>
        </draw:line>
        <draw:line draw:style-name="gr38" draw:text-style-name="P4" draw:layer="layout" svg:x1="2cm" svg:y1="6cm" svg:x2="3.9cm" svg:y2="6cm">
          <text:p/>
        </draw:line>
        <draw:custom-shape draw:style-name="gr40" draw:text-style-name="P5" draw:layer="layout" svg:width="0.2cm" svg:height="0.2cm" svg:x="1.9cm" svg:y="6.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6" draw:text-style-name="P4" draw:layer="layout" svg:x1="24cm" svg:y1="10.2cm" svg:x2="32.8cm" svg:y2="20.875cm">
          <text:p/>
        </draw:line>
        <draw:line draw:style-name="gr367" draw:text-style-name="P4" draw:layer="layout" svg:x1="4.1cm" svg:y1="20.877cm" svg:x2="19.8cm" svg:y2="9.1cm">
          <text:p/>
        </draw:line>
        <draw:line draw:style-name="gr367" draw:text-style-name="P4" draw:layer="layout" svg:x1="2.1cm" svg:y1="20.878cm" svg:x2="21.4cm" svg:y2="7.9cm">
          <text:p/>
        </draw:line>
        <draw:line draw:style-name="gr367" draw:text-style-name="P4" draw:layer="layout" svg:x1="7.1cm" svg:y1="20.878cm" svg:x2="19.8cm" svg:y2="10.101cm">
          <text:p/>
        </draw:line>
        <draw:line draw:style-name="gr367" draw:text-style-name="P4" draw:layer="layout" svg:x1="10cm" svg:y1="22.379cm" svg:x2="19.8cm" svg:y2="11.1cm">
          <text:p/>
        </draw:line>
      </draw:page>
      <draw:page draw:name="page10" draw:style-name="dp1" draw:master-page-name="Default">
        <draw:g draw:style-name="gr1">
          <draw:custom-shape draw:style-name="gr368" draw:text-style-name="P36" draw:layer="layout" svg:width="2cm" svg:height="1.5cm" svg:x="40.99cm" svg:y="40cm">
            <text:p text:style-name="P35"><text:span text:style-name="T10">NOR</text:span></text:p>
            <draw:enhanced-geometry svg:viewBox="0 0 21600 21600" draw:type="rectangle" draw:enhanced-path="M 0 0 L 21600 0 21600 21600 0 21600 0 0 Z N"/>
          </draw:custom-shape>
          <draw:frame draw:style-name="gr369" draw:text-style-name="P37" draw:layer="layout" svg:width="0.896cm" svg:height="0.569cm" draw:transform="rotate (1.5707963267949) translate (41.69cm 40.996cm)">
            <draw:text-box>
              <text:p><text:span text:style-name="T10">CS</text:span></text:p>
            </draw:text-box>
          </draw:frame>
          <draw:frame draw:style-name="gr370" draw:text-style-name="P37" draw:layer="layout" svg:width="1.082cm" svg:height="0.569cm" draw:transform="rotate (1.5707963267949) translate (41.321cm 41.182cm)">
            <draw:text-box>
              <text:p><text:span text:style-name="T10">SCK</text:span></text:p>
            </draw:text-box>
          </draw:frame>
          <draw:frame draw:style-name="gr371" draw:text-style-name="P37" draw:layer="layout" svg:width="0.705cm" svg:height="0.569cm" draw:transform="rotate (1.5707963267949) translate (42.09cm 40.805cm)">
            <draw:text-box>
              <text:p><text:span text:style-name="T10">D</text:span></text:p>
            </draw:text-box>
          </draw:frame>
        </draw:g>
        <draw:g draw:style-name="gr1">
          <draw:custom-shape draw:style-name="gr372" draw:text-style-name="P36" draw:layer="layout" svg:width="3cm" svg:height="3.5cm" svg:x="39.99cm" svg:y="35.5cm">
            <text:p text:style-name="P35"><text:span text:style-name="T10">QSPI-Per.</text:span></text:p>
            <draw:enhanced-geometry svg:viewBox="0 0 21600 21600" draw:type="rectangle" draw:enhanced-path="M 0 0 L 21600 0 21600 21600 0 21600 0 0 Z N"/>
          </draw:custom-shape>
          <draw:frame draw:style-name="gr369" draw:text-style-name="P37" draw:layer="layout" svg:width="0.896cm" svg:height="0.569cm" draw:transform="rotate (1.5707963267949) translate (41.69cm 38.882cm)">
            <draw:text-box>
              <text:p><text:span text:style-name="T10">CS</text:span></text:p>
            </draw:text-box>
          </draw:frame>
          <draw:frame draw:style-name="gr373" draw:text-style-name="P37" draw:layer="layout" svg:width="1.759cm" svg:height="0.569cm" draw:transform="rotate (1.5707963267949) translate (41.289cm 37.452cm)">
            <draw:text-box>
              <text:p><text:span text:style-name="T10">WB-Slave</text:span></text:p>
            </draw:text-box>
          </draw:frame>
          <draw:frame draw:style-name="gr371" draw:text-style-name="P37" draw:layer="layout" svg:width="0.705cm" svg:height="0.569cm" draw:transform="rotate (1.5707963267949) translate (42.09cm 38.882cm)">
            <draw:text-box>
              <text:p><text:span text:style-name="T10">D</text:span></text:p>
            </draw:text-box>
          </draw:frame>
          <draw:frame draw:style-name="gr374" draw:text-style-name="P37" draw:layer="layout" svg:width="2.407cm" svg:height="0.569cm" draw:transform="rotate (1.5707963267949) translate (41.72cm 38.1cm)">
            <draw:text-box>
              <text:p><text:span text:style-name="T10">AR-AXI4-Slave</text:span></text:p>
            </draw:text-box>
          </draw:frame>
          <draw:frame draw:style-name="gr375" draw:text-style-name="P37" draw:layer="layout" svg:width="2.217cm" svg:height="0.569cm" draw:transform="rotate (1.5707963267949) translate (42.121cm 37.91cm)">
            <draw:text-box>
              <text:p><text:span text:style-name="T10">R-AXI4-Slave</text:span></text:p>
            </draw:text-box>
          </draw:frame>
          <draw:frame draw:style-name="gr370" draw:text-style-name="P37" draw:layer="layout" svg:width="1.082cm" svg:height="0.569cm" draw:transform="rotate (1.5707963267949) translate (41.291cm 38.882cm)">
            <draw:text-box>
              <text:p><text:span text:style-name="T10">SCK</text:span></text:p>
            </draw:text-box>
          </draw:frame>
        </draw:g>
        <draw:line draw:style-name="gr146" draw:text-style-name="P4" draw:layer="layout" svg:x1="41.59cm" svg:y1="39cm" svg:x2="41.59cm" svg:y2="40cm">
          <text:p/>
        </draw:line>
        <draw:line draw:style-name="gr308" draw:text-style-name="P1" draw:layer="layout" svg:x1="42.39cm" svg:y1="39cm" svg:x2="42.39cm" svg:y2="40cm">
          <text:p/>
        </draw:line>
        <draw:line draw:style-name="gr146" draw:text-style-name="P4" draw:layer="layout" svg:x1="41.99cm" svg:y1="39cm" svg:x2="41.99cm" svg:y2="40cm">
          <text:p/>
        </draw:line>
        <draw:g draw:style-name="gr1">
          <draw:custom-shape draw:style-name="gr376" draw:text-style-name="P36" draw:layer="layout" svg:width="6cm" svg:height="5cm" svg:x="39cm" svg:y="29cm">
            <text:p text:style-name="P35"><text:span text:style-name="T10">Memory Arbiter</text:span></text:p>
            <draw:enhanced-geometry svg:viewBox="0 0 21600 21600" draw:type="rectangle" draw:enhanced-path="M 0 0 L 21600 0 21600 21600 0 21600 0 0 Z N"/>
          </draw:custom-shape>
          <draw:frame draw:style-name="gr374" draw:text-style-name="P37" draw:layer="layout" svg:width="2.407cm" svg:height="0.569cm" draw:transform="rotate (1.5707963267949) translate (40.89cm 31.472cm)">
            <draw:text-box>
              <text:p><text:span text:style-name="T10">AR-AXI4-Slave</text:span></text:p>
            </draw:text-box>
          </draw:frame>
          <draw:frame draw:style-name="gr375" draw:text-style-name="P37" draw:layer="layout" svg:width="2.217cm" svg:height="0.569cm" draw:transform="rotate (1.5707963267949) translate (41.291cm 31.282cm)">
            <draw:text-box>
              <text:p><text:span text:style-name="T10">R-AXI4-Slave</text:span></text:p>
            </draw:text-box>
          </draw:frame>
          <draw:frame draw:style-name="gr377" draw:text-style-name="P37" draw:layer="layout" svg:width="2.564cm" svg:height="0.569cm" draw:transform="rotate (1.5707963267949) translate (41.72cm 33.9cm)">
            <draw:text-box>
              <text:p><text:span text:style-name="T10">AR-AXI4-Master</text:span></text:p>
            </draw:text-box>
          </draw:frame>
          <draw:frame draw:style-name="gr378" draw:text-style-name="P37" draw:layer="layout" svg:width="2.377cm" svg:height="0.569cm" draw:transform="rotate (1.5707963267949) translate (42.121cm 33.9cm)">
            <draw:text-box>
              <text:p><text:span text:style-name="T10">R-AXI4-Master</text:span></text:p>
            </draw:text-box>
          </draw:frame>
          <draw:frame draw:style-name="gr374" draw:text-style-name="P37" draw:layer="layout" svg:width="2.407cm" svg:height="0.569cm" draw:transform="rotate (1.5707963267949) translate (42.49cm 31.472cm)">
            <draw:text-box>
              <text:p><text:span text:style-name="T10">AR-AXI4-Slave</text:span></text:p>
            </draw:text-box>
          </draw:frame>
          <draw:frame draw:style-name="gr375" draw:text-style-name="P37" draw:layer="layout" svg:width="2.217cm" svg:height="0.569cm" draw:transform="rotate (1.5707963267949) translate (42.891cm 31.282cm)">
            <draw:text-box>
              <text:p><text:span text:style-name="T10">R-AXI4-Slave</text:span></text:p>
            </draw:text-box>
          </draw:frame>
          <draw:frame draw:style-name="gr379" draw:text-style-name="P37" draw:layer="layout" svg:width="2.454cm" svg:height="0.569cm" draw:transform="rotate (1.5707963267949) translate (43.292cm 31.519cm)">
            <draw:text-box>
              <text:p><text:span text:style-name="T10">AW-AXI4-Slave</text:span></text:p>
            </draw:text-box>
          </draw:frame>
          <draw:frame draw:style-name="gr380" draw:text-style-name="P37" draw:layer="layout" svg:width="2.276cm" svg:height="0.569cm" draw:transform="rotate (1.5707963267949) translate (43.693cm 31.341cm)">
            <draw:text-box>
              <text:p><text:span text:style-name="T10">W-AXI4-Slave</text:span></text:p>
            </draw:text-box>
          </draw:frame>
          <draw:frame draw:style-name="gr381" draw:text-style-name="P37" draw:layer="layout" svg:width="2.204cm" svg:height="0.569cm" draw:transform="rotate (1.5707963267949) translate (44.094cm 31.269cm)">
            <draw:text-box>
              <text:p><text:span text:style-name="T10">B-AXI4-Slave</text:span></text:p>
            </draw:text-box>
          </draw:frame>
        </draw:g>
        <draw:line draw:style-name="gr308" draw:text-style-name="P1" draw:layer="layout" svg:x1="42.39cm" svg:y1="34cm" svg:x2="42.39cm" svg:y2="35.5cm">
          <text:p/>
        </draw:line>
        <draw:line draw:style-name="gr308" draw:text-style-name="P1" draw:layer="layout" svg:x1="41.99cm" svg:y1="34cm" svg:x2="41.99cm" svg:y2="35.5cm">
          <text:p/>
        </draw:line>
        <draw:g draw:style-name="gr1">
          <draw:custom-shape draw:style-name="gr382" draw:text-style-name="P36" draw:layer="layout" svg:width="2cm" svg:height="2.5cm" svg:x="41cm" svg:y="1.5cm">
            <text:p text:style-name="P35"><text:span text:style-name="T10">CPU</text:span></text:p>
            <draw:enhanced-geometry svg:viewBox="0 0 21600 21600" draw:type="rectangle" draw:enhanced-path="M 0 0 L 21600 0 21600 21600 0 21600 0 0 Z N"/>
          </draw:custom-shape>
          <draw:frame draw:style-name="gr383" draw:text-style-name="P37" draw:layer="layout" svg:width="2.17cm" svg:height="0.569cm" draw:transform="rotate (1.5707963267949) translate (42.1cm 3.876cm)">
            <draw:text-box>
              <text:p><text:span text:style-name="T10">as_dcache_if</text:span></text:p>
            </draw:text-box>
          </draw:frame>
          <draw:frame draw:style-name="gr384" draw:text-style-name="P37" draw:layer="layout" svg:width="2.077cm" svg:height="0.569cm" draw:transform="rotate (1.5707963267949) translate (41.701cm 3.876cm)">
            <draw:text-box>
              <text:p><text:span text:style-name="T10">as_icache_if</text:span></text:p>
            </draw:text-box>
          </draw:frame>
          <draw:frame draw:style-name="gr385" draw:text-style-name="P37" draw:layer="layout" svg:width="1.92cm" svg:height="0.569cm" draw:transform="rotate (1.5707963267949) translate (41.031cm 3.8cm)">
            <draw:text-box>
              <text:p><text:span text:style-name="T10">WB-Master</text:span></text:p>
            </draw:text-box>
          </draw:frame>
        </draw:g>
        <draw:frame draw:style-name="gr384" draw:text-style-name="P37" draw:layer="layout" svg:width="2.077cm" svg:height="0.569cm" draw:transform="rotate (1.5707963267949) translate (12.531cm 8.1cm)">
          <draw:text-box>
            <text:p><text:span text:style-name="T10">as_icache_if</text:span></text:p>
          </draw:text-box>
        </draw:frame>
        <draw:frame draw:style-name="gr383" draw:text-style-name="P37" draw:layer="layout" svg:width="2.17cm" svg:height="0.569cm" draw:transform="rotate (1.5707963267949) translate (53.6cm 8.2cm)">
          <draw:text-box>
            <text:p><text:span text:style-name="T10">as_dcache_if</text:span></text:p>
          </draw:text-box>
        </draw:frame>
        <draw:g draw:style-name="gr1">
          <draw:custom-shape draw:style-name="gr386" draw:text-style-name="P38" draw:layer="layout" svg:width="2cm" svg:height="0.5cm" svg:x="8cm" svg:y="10cm">
            <text:p/>
            <draw:enhanced-geometry svg:viewBox="0 0 21600 21600" draw:type="rectangle" draw:enhanced-path="M 0 0 L 21600 0 21600 21600 0 21600 0 0 Z N"/>
          </draw:custom-shape>
          <draw:custom-shape draw:style-name="gr387" draw:text-style-name="P39" draw:layer="layout" svg:width="5cm" svg:height="0.5cm" svg:x="10cm" svg:y="10cm">
            <text:p/>
            <draw:enhanced-geometry svg:viewBox="0 0 21600 21600" draw:type="rectangle" draw:enhanced-path="M 0 0 L 21600 0 21600 21600 0 21600 0 0 Z N"/>
          </draw:custom-shape>
          <draw:custom-shape draw:style-name="gr388" draw:text-style-name="P39" draw:layer="layout" svg:width="1cm" svg:height="0.5cm" svg:x="7cm" svg:y="10cm">
            <text:p/>
            <draw:enhanced-geometry svg:viewBox="0 0 21600 21600" draw:type="rectangle" draw:enhanced-path="M 0 0 L 21600 0 21600 21600 0 21600 0 0 Z N"/>
          </draw:custom-shape>
          <draw:frame draw:style-name="gr389" draw:text-style-name="P40" draw:layer="layout" svg:width="1.383cm" svg:height="0.57cm" svg:x="6.6cm" svg:y="9.4cm">
            <draw:text-box>
              <text:p><text:span text:style-name="T10">V_1 bit</text:span></text:p>
            </draw:text-box>
          </draw:frame>
          <draw:frame draw:style-name="gr389" draw:text-style-name="P40" draw:layer="layout" svg:width="1.95cm" svg:height="0.57cm" svg:x="8.05cm" svg:y="9.4cm">
            <draw:text-box>
              <text:p><text:span text:style-name="T10">Tag_22 bits</text:span></text:p>
            </draw:text-box>
          </draw:frame>
          <draw:frame draw:style-name="gr389" draw:text-style-name="P40" draw:layer="layout" svg:width="2.331cm" svg:height="0.57cm" svg:x="10cm" svg:y="9.4cm">
            <draw:text-box>
              <text:p><text:span text:style-name="T10">Data_32 bytes</text:span></text:p>
            </draw:text-box>
          </draw:frame>
          <draw:custom-shape draw:style-name="gr390" draw:text-style-name="P38" draw:layer="layout" svg:width="2cm" svg:height="0.5cm" svg:x="8cm" svg:y="10.5cm">
            <text:p/>
            <draw:enhanced-geometry svg:viewBox="0 0 21600 21600" draw:type="rectangle" draw:enhanced-path="M 0 0 L 21600 0 21600 21600 0 21600 0 0 Z N"/>
          </draw:custom-shape>
          <draw:custom-shape draw:style-name="gr387" draw:text-style-name="P39" draw:layer="layout" svg:width="5cm" svg:height="0.5cm" svg:x="10cm" svg:y="10.5cm">
            <text:p/>
            <draw:enhanced-geometry svg:viewBox="0 0 21600 21600" draw:type="rectangle" draw:enhanced-path="M 0 0 L 21600 0 21600 21600 0 21600 0 0 Z N"/>
          </draw:custom-shape>
          <draw:custom-shape draw:style-name="gr388" draw:text-style-name="P39" draw:layer="layout" svg:width="1cm" svg:height="0.5cm" svg:x="7cm" svg:y="10.5cm">
            <text:p/>
            <draw:enhanced-geometry svg:viewBox="0 0 21600 21600" draw:type="rectangle" draw:enhanced-path="M 0 0 L 21600 0 21600 21600 0 21600 0 0 Z N"/>
          </draw:custom-shape>
          <draw:custom-shape draw:style-name="gr391" draw:text-style-name="P38" draw:layer="layout" svg:width="2cm" svg:height="0.5cm" svg:x="8cm" svg:y="11cm">
            <text:p/>
            <draw:enhanced-geometry svg:viewBox="0 0 21600 21600" draw:type="rectangle" draw:enhanced-path="M 0 0 L 21600 0 21600 21600 0 21600 0 0 Z N"/>
          </draw:custom-shape>
          <draw:custom-shape draw:style-name="gr387" draw:text-style-name="P39" draw:layer="layout" svg:width="5cm" svg:height="0.5cm" svg:x="10cm" svg:y="11cm">
            <text:p/>
            <draw:enhanced-geometry svg:viewBox="0 0 21600 21600" draw:type="rectangle" draw:enhanced-path="M 0 0 L 21600 0 21600 21600 0 21600 0 0 Z N"/>
          </draw:custom-shape>
          <draw:custom-shape draw:style-name="gr388" draw:text-style-name="P39" draw:layer="layout" svg:width="1cm" svg:height="0.5cm" svg:x="7cm" svg:y="11cm">
            <text:p/>
            <draw:enhanced-geometry svg:viewBox="0 0 21600 21600" draw:type="rectangle" draw:enhanced-path="M 0 0 L 21600 0 21600 21600 0 21600 0 0 Z N"/>
          </draw:custom-shape>
          <draw:custom-shape draw:style-name="gr392" draw:text-style-name="P38" draw:layer="layout" svg:width="2cm" svg:height="0.5cm" svg:x="8cm" svg:y="11.5cm">
            <text:p/>
            <draw:enhanced-geometry svg:viewBox="0 0 21600 21600" draw:type="rectangle" draw:enhanced-path="M 0 0 L 21600 0 21600 21600 0 21600 0 0 Z N"/>
          </draw:custom-shape>
          <draw:custom-shape draw:style-name="gr387" draw:text-style-name="P39" draw:layer="layout" svg:width="5cm" svg:height="0.5cm" svg:x="10cm" svg:y="11.5cm">
            <text:p/>
            <draw:enhanced-geometry svg:viewBox="0 0 21600 21600" draw:type="rectangle" draw:enhanced-path="M 0 0 L 21600 0 21600 21600 0 21600 0 0 Z N"/>
          </draw:custom-shape>
          <draw:custom-shape draw:style-name="gr388" draw:text-style-name="P39" draw:layer="layout" svg:width="1cm" svg:height="0.5cm" svg:x="7cm" svg:y="11.5cm">
            <text:p/>
            <draw:enhanced-geometry svg:viewBox="0 0 21600 21600" draw:type="rectangle" draw:enhanced-path="M 0 0 L 21600 0 21600 21600 0 21600 0 0 Z N"/>
          </draw:custom-shape>
          <draw:custom-shape draw:style-name="gr393" draw:text-style-name="P41" draw:layer="layout" svg:width="2cm" svg:height="0.5cm" svg:x="8cm" svg:y="12cm">
            <text:p/>
            <draw:enhanced-geometry svg:viewBox="0 0 21600 21600" draw:type="rectangle" draw:enhanced-path="M 0 0 L 21600 0 21600 21600 0 21600 0 0 Z N"/>
          </draw:custom-shape>
          <draw:custom-shape draw:style-name="gr394" draw:text-style-name="P36" draw:layer="layout" svg:width="5cm" svg:height="0.5cm" svg:x="10cm" svg:y="12cm">
            <text:p/>
            <draw:enhanced-geometry svg:viewBox="0 0 21600 21600" draw:type="rectangle" draw:enhanced-path="M 0 0 L 21600 0 21600 21600 0 21600 0 0 Z N"/>
          </draw:custom-shape>
          <draw:custom-shape draw:style-name="gr395" draw:text-style-name="P36" draw:layer="layout" svg:width="1cm" svg:height="0.5cm" svg:x="7cm" svg:y="12cm">
            <text:p/>
            <draw:enhanced-geometry svg:viewBox="0 0 21600 21600" draw:type="rectangle" draw:enhanced-path="M 0 0 L 21600 0 21600 21600 0 21600 0 0 Z N"/>
          </draw:custom-shape>
          <draw:custom-shape draw:style-name="gr396" draw:text-style-name="P38" draw:layer="layout" svg:width="2cm" svg:height="0.5cm" svg:x="8cm" svg:y="13cm">
            <text:p/>
            <draw:enhanced-geometry svg:viewBox="0 0 21600 21600" draw:type="rectangle" draw:enhanced-path="M 0 0 L 21600 0 21600 21600 0 21600 0 0 Z N"/>
          </draw:custom-shape>
          <draw:custom-shape draw:style-name="gr387" draw:text-style-name="P39" draw:layer="layout" svg:width="5cm" svg:height="0.5cm" svg:x="10cm" svg:y="13cm">
            <text:p/>
            <draw:enhanced-geometry svg:viewBox="0 0 21600 21600" draw:type="rectangle" draw:enhanced-path="M 0 0 L 21600 0 21600 21600 0 21600 0 0 Z N"/>
          </draw:custom-shape>
          <draw:custom-shape draw:style-name="gr388" draw:text-style-name="P39" draw:layer="layout" svg:width="1cm" svg:height="0.5cm" svg:x="7cm" svg:y="13cm">
            <text:p/>
            <draw:enhanced-geometry svg:viewBox="0 0 21600 21600" draw:type="rectangle" draw:enhanced-path="M 0 0 L 21600 0 21600 21600 0 21600 0 0 Z N"/>
          </draw:custom-shape>
          <draw:custom-shape draw:style-name="gr397" draw:text-style-name="P38" draw:layer="layout" svg:width="2cm" svg:height="0.5cm" svg:x="8cm" svg:y="13.5cm">
            <text:p/>
            <draw:enhanced-geometry svg:viewBox="0 0 21600 21600" draw:type="rectangle" draw:enhanced-path="M 0 0 L 21600 0 21600 21600 0 21600 0 0 Z N"/>
          </draw:custom-shape>
          <draw:custom-shape draw:style-name="gr387" draw:text-style-name="P39" draw:layer="layout" svg:width="5cm" svg:height="0.5cm" svg:x="10cm" svg:y="13.5cm">
            <text:p/>
            <draw:enhanced-geometry svg:viewBox="0 0 21600 21600" draw:type="rectangle" draw:enhanced-path="M 0 0 L 21600 0 21600 21600 0 21600 0 0 Z N"/>
          </draw:custom-shape>
          <draw:custom-shape draw:style-name="gr388" draw:text-style-name="P39" draw:layer="layout" svg:width="1cm" svg:height="0.5cm" svg:x="7cm" svg:y="13.5cm">
            <text:p/>
            <draw:enhanced-geometry svg:viewBox="0 0 21600 21600" draw:type="rectangle" draw:enhanced-path="M 0 0 L 21600 0 21600 21600 0 21600 0 0 Z N"/>
          </draw:custom-shape>
          <draw:custom-shape draw:style-name="gr398" draw:text-style-name="P38" draw:layer="layout" svg:width="2cm" svg:height="0.5cm" svg:x="8cm" svg:y="14cm">
            <text:p/>
            <draw:enhanced-geometry svg:viewBox="0 0 21600 21600" draw:type="rectangle" draw:enhanced-path="M 0 0 L 21600 0 21600 21600 0 21600 0 0 Z N"/>
          </draw:custom-shape>
          <draw:custom-shape draw:style-name="gr387" draw:text-style-name="P39" draw:layer="layout" svg:width="5cm" svg:height="0.5cm" svg:x="10cm" svg:y="14cm">
            <text:p/>
            <draw:enhanced-geometry svg:viewBox="0 0 21600 21600" draw:type="rectangle" draw:enhanced-path="M 0 0 L 21600 0 21600 21600 0 21600 0 0 Z N"/>
          </draw:custom-shape>
          <draw:custom-shape draw:style-name="gr388" draw:text-style-name="P39" draw:layer="layout" svg:width="1cm" svg:height="0.5cm" svg:x="7cm" svg:y="14cm">
            <text:p/>
            <draw:enhanced-geometry svg:viewBox="0 0 21600 21600" draw:type="rectangle" draw:enhanced-path="M 0 0 L 21600 0 21600 21600 0 21600 0 0 Z N"/>
          </draw:custom-shape>
          <draw:custom-shape draw:style-name="gr399" draw:text-style-name="P38" draw:layer="layout" svg:width="2cm" svg:height="0.5cm" svg:x="8cm" svg:y="14.5cm">
            <text:p/>
            <draw:enhanced-geometry svg:viewBox="0 0 21600 21600" draw:type="rectangle" draw:enhanced-path="M 0 0 L 21600 0 21600 21600 0 21600 0 0 Z N"/>
          </draw:custom-shape>
          <draw:custom-shape draw:style-name="gr387" draw:text-style-name="P39" draw:layer="layout" svg:width="5cm" svg:height="0.5cm" svg:x="10cm" svg:y="14.5cm">
            <text:p/>
            <draw:enhanced-geometry svg:viewBox="0 0 21600 21600" draw:type="rectangle" draw:enhanced-path="M 0 0 L 21600 0 21600 21600 0 21600 0 0 Z N"/>
          </draw:custom-shape>
          <draw:custom-shape draw:style-name="gr388" draw:text-style-name="P39" draw:layer="layout" svg:width="1cm" svg:height="0.5cm" svg:x="7cm" svg:y="14.5cm">
            <text:p/>
            <draw:enhanced-geometry svg:viewBox="0 0 21600 21600" draw:type="rectangle" draw:enhanced-path="M 0 0 L 21600 0 21600 21600 0 21600 0 0 Z N"/>
          </draw:custom-shape>
          <draw:custom-shape draw:style-name="gr400" draw:text-style-name="P38" draw:layer="layout" svg:width="2cm" svg:height="0.5cm" svg:x="8cm" svg:y="15cm">
            <text:p/>
            <draw:enhanced-geometry svg:viewBox="0 0 21600 21600" draw:type="rectangle" draw:enhanced-path="M 0 0 L 21600 0 21600 21600 0 21600 0 0 Z N"/>
          </draw:custom-shape>
          <draw:custom-shape draw:style-name="gr387" draw:text-style-name="P39" draw:layer="layout" svg:width="5cm" svg:height="0.5cm" svg:x="10cm" svg:y="15cm">
            <text:p/>
            <draw:enhanced-geometry svg:viewBox="0 0 21600 21600" draw:type="rectangle" draw:enhanced-path="M 0 0 L 21600 0 21600 21600 0 21600 0 0 Z N"/>
          </draw:custom-shape>
          <draw:custom-shape draw:style-name="gr388" draw:text-style-name="P39" draw:layer="layout" svg:width="1cm" svg:height="0.5cm" svg:x="7cm" svg:y="15cm">
            <text:p/>
            <draw:enhanced-geometry svg:viewBox="0 0 21600 21600" draw:type="rectangle" draw:enhanced-path="M 0 0 L 21600 0 21600 21600 0 21600 0 0 Z N"/>
          </draw:custom-shape>
          <draw:custom-shape draw:style-name="gr401" draw:text-style-name="P38" draw:layer="layout" svg:width="2cm" svg:height="0.5cm" svg:x="8cm" svg:y="15.5cm">
            <text:p/>
            <draw:enhanced-geometry svg:viewBox="0 0 21600 21600" draw:type="rectangle" draw:enhanced-path="M 0 0 L 21600 0 21600 21600 0 21600 0 0 Z N"/>
          </draw:custom-shape>
          <draw:custom-shape draw:style-name="gr387" draw:text-style-name="P39" draw:layer="layout" svg:width="5cm" svg:height="0.5cm" svg:x="10cm" svg:y="15.5cm">
            <text:p/>
            <draw:enhanced-geometry svg:viewBox="0 0 21600 21600" draw:type="rectangle" draw:enhanced-path="M 0 0 L 21600 0 21600 21600 0 21600 0 0 Z N"/>
          </draw:custom-shape>
          <draw:custom-shape draw:style-name="gr388" draw:text-style-name="P39" draw:layer="layout" svg:width="1cm" svg:height="0.5cm" svg:x="7cm" svg:y="15.5cm">
            <text:p/>
            <draw:enhanced-geometry svg:viewBox="0 0 21600 21600" draw:type="rectangle" draw:enhanced-path="M 0 0 L 21600 0 21600 21600 0 21600 0 0 Z N"/>
          </draw:custom-shape>
          <draw:frame draw:style-name="gr389" draw:text-style-name="P40" draw:layer="layout" svg:width="0.183cm" svg:height="0.57cm" svg:x="5.749cm" svg:y="10cm">
            <draw:text-box>
              <text:p><text:span text:style-name="T10">1</text:span></text:p>
            </draw:text-box>
          </draw:frame>
          <draw:frame draw:style-name="gr389" draw:text-style-name="P40" draw:layer="layout" svg:width="0.882cm" svg:height="0.57cm" svg:x="5.3cm" svg:y="15.4cm">
            <draw:text-box>
              <text:p><text:span text:style-name="T10">31</text:span></text:p>
            </draw:text-box>
          </draw:frame>
          <draw:frame draw:style-name="gr389" draw:text-style-name="P40" draw:layer="layout" svg:width="0.882cm" svg:height="0.57cm" svg:x="5.3cm" svg:y="15cm">
            <draw:text-box>
              <text:p><text:span text:style-name="T10">30</text:span></text:p>
            </draw:text-box>
          </draw:frame>
          <draw:frame draw:style-name="gr389" draw:text-style-name="P40" draw:layer="layout" svg:width="0.882cm" svg:height="0.57cm" svg:x="5.3cm" svg:y="14.5cm">
            <draw:text-box>
              <text:p><text:span text:style-name="T10">29</text:span></text:p>
            </draw:text-box>
          </draw:frame>
          <draw:frame draw:style-name="gr389" draw:text-style-name="P40" draw:layer="layout" svg:width="0.882cm" svg:height="0.57cm" svg:x="5.3cm" svg:y="14.1cm">
            <draw:text-box>
              <text:p><text:span text:style-name="T10">28</text:span></text:p>
            </draw:text-box>
          </draw:frame>
          <draw:frame draw:style-name="gr389" draw:text-style-name="P40" draw:layer="layout" svg:width="0.183cm" svg:height="0.57cm" svg:x="5.749cm" svg:y="10.4cm">
            <draw:text-box>
              <text:p><text:span text:style-name="T10">2</text:span></text:p>
            </draw:text-box>
          </draw:frame>
          <draw:frame draw:style-name="gr389" draw:text-style-name="P40" draw:layer="layout" svg:width="0.281cm" svg:height="0.57cm" svg:x="5.7cm" svg:y="10.93cm">
            <draw:text-box>
              <text:p><text:span text:style-name="T10">3</text:span></text:p>
            </draw:text-box>
          </draw:frame>
          <draw:frame draw:style-name="gr389" draw:text-style-name="P40" draw:layer="layout" svg:width="0.281cm" svg:height="0.57cm" svg:x="5.7cm" svg:y="11.43cm">
            <draw:text-box>
              <text:p><text:span text:style-name="T10">4</text:span></text:p>
            </draw:text-box>
          </draw:frame>
          <draw:frame draw:style-name="gr389" draw:text-style-name="P40" draw:layer="layout" svg:width="1.383cm" svg:height="0.57cm" svg:x="5.301cm" svg:y="9.4cm">
            <draw:text-box>
              <text:p><text:span text:style-name="T10">Index</text:span></text:p>
            </draw:text-box>
          </draw:frame>
          <draw:line draw:style-name="gr146" draw:text-style-name="P4" draw:layer="layout" svg:x1="5cm" svg:y1="12.3cm" svg:x2="7cm" svg:y2="12.3cm">
            <text:p/>
          </draw:line>
          <draw:line draw:style-name="gr38" draw:text-style-name="P4" draw:layer="layout" svg:x1="5cm" svg:y1="9cm" svg:x2="5cm" svg:y2="12.3cm">
            <text:p/>
          </draw:line>
          <draw:custom-shape draw:style-name="gr402" draw:text-style-name="P28" draw:layer="layout" svg:width="1cm" svg:height="1cm" svg:x="8cm" svg:y="17cm">
            <text:p text:style-name="P1">=</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66">
            <draw:glue-point draw:id="4" svg:x="0cm" svg:y="5cm"/>
            <draw:glue-point draw:id="5" svg:x="2.5cm" svg:y="-5cm"/>
            <draw:glue-point draw:id="6" svg:x="-2.5cm" svg:y="-5cm"/>
            <draw:rect draw:style-name="gr403" draw:text-style-name="P16" draw:layer="layout" svg:width="1cm" svg:height="1cm" draw:transform="rotate (-1.5707963267949) translate (8.5cm 19.5cm)">
              <text:p text:style-name="P15"><text:span text:style-name="T4">&amp;</text:span></text:p>
            </draw:rect>
            <draw:line draw:style-name="gr404" draw:text-style-name="P17" draw:layer="layout" svg:x1="8.25cm" svg:y1="19cm" svg:x2="8.25cm" svg:y2="19.5cm">
              <text:p/>
            </draw:line>
            <draw:line draw:style-name="gr405" draw:text-style-name="P17" draw:layer="layout" svg:x1="7.75cm" svg:y1="19cm" svg:x2="7.75cm" svg:y2="19.5cm">
              <text:p/>
            </draw:line>
            <draw:line draw:style-name="gr406" draw:text-style-name="P17" draw:layer="layout" svg:x1="8cm" svg:y1="20.5cm" svg:x2="8cm" svg:y2="21cm">
              <text:p/>
            </draw:line>
          </draw:g>
          <draw:g draw:style-name="gr66">
            <draw:glue-point draw:id="4" svg:x="3cm" svg:y="-5cm"/>
            <draw:glue-point draw:id="5" svg:x="1cm" svg:y="-5cm"/>
            <draw:glue-point draw:id="6" svg:x="-1cm" svg:y="-5cm"/>
            <draw:glue-point draw:id="7" svg:x="-3cm" svg:y="-5cm"/>
            <draw:rect draw:style-name="gr407" draw:text-style-name="P16" draw:layer="layout" svg:width="1cm" svg:height="2cm" draw:transform="rotate (-1.5707963267949) translate (9.6cm 22cm)">
              <text:p text:style-name="P15"><text:span text:style-name="T11">≥</text:span><text:span text:style-name="T11">1</text:span></text:p>
            </draw:rect>
            <draw:line draw:style-name="gr408" draw:text-style-name="P17" draw:layer="layout" svg:x1="9.2cm" svg:y1="21.5cm" svg:x2="9.2cm" svg:y2="22cm">
              <text:p/>
            </draw:line>
            <draw:line draw:style-name="gr409" draw:text-style-name="P17" draw:layer="layout" svg:x1="8.4cm" svg:y1="21.5cm" svg:x2="8.4cm" svg:y2="22cm">
              <text:p/>
            </draw:line>
            <draw:line draw:style-name="gr410" draw:text-style-name="P21" draw:layer="layout" svg:x1="8.8cm" svg:y1="21.5cm" svg:x2="8.8cm" svg:y2="22cm">
              <text:p/>
            </draw:line>
            <draw:line draw:style-name="gr411" draw:text-style-name="P21" draw:layer="layout" svg:x1="8cm" svg:y1="21.5cm" svg:x2="8cm" svg:y2="22cm">
              <text:p/>
            </draw:line>
            <draw:line draw:style-name="gr412" draw:text-style-name="P21" draw:layer="layout" svg:x1="8.6cm" svg:y1="23cm" svg:x2="8.6cm" svg:y2="23.5cm">
              <text:p/>
            </draw:line>
          </draw:g>
          <draw:line draw:style-name="gr413" draw:text-style-name="P4" draw:layer="layout" svg:x1="8.5cm" svg:y1="12.3cm" svg:x2="8.5cm" svg:y2="17cm">
            <text:p/>
          </draw:line>
          <draw:line draw:style-name="gr146" draw:text-style-name="P4" draw:layer="layout" svg:x1="4cm" svg:y1="17.5cm" svg:x2="8cm" svg:y2="17.5cm">
            <text:p/>
          </draw:line>
          <draw:line draw:style-name="gr38" draw:text-style-name="P4" draw:layer="layout" svg:x1="8.25cm" svg:y1="19cm" svg:x2="8.5cm" svg:y2="19cm">
            <text:p/>
          </draw:line>
          <draw:line draw:style-name="gr38" draw:text-style-name="P4" draw:layer="layout" svg:x1="8.5cm" svg:y1="18cm" svg:x2="8.5cm" svg:y2="19cm">
            <text:p/>
          </draw:line>
          <draw:line draw:style-name="gr38" draw:text-style-name="P4" draw:layer="layout" svg:x1="7.75cm" svg:y1="19cm" svg:x2="7.5cm" svg:y2="19cm">
            <text:p/>
          </draw:line>
          <draw:line draw:style-name="gr414" draw:text-style-name="P4" draw:layer="layout" svg:x1="7.5cm" svg:y1="12.3cm" svg:x2="7.5cm" svg:y2="19cm">
            <text:p/>
          </draw:line>
          <draw:custom-shape draw:style-name="gr415" draw:text-style-name="P42" draw:layer="layout" svg:width="2cm" svg:height="1cm" svg:x="36cm" svg:y="20.6cm">
            <text:p text:style-name="P35"><text:span text:style-name="T10">Encode</text:span></text:p>
            <draw:enhanced-geometry svg:viewBox="0 0 21600 21600" draw:type="rectangle" draw:enhanced-path="M 0 0 L 21600 0 21600 21600 0 21600 0 0 Z N"/>
          </draw:custom-shape>
          <draw:line draw:style-name="gr146" draw:text-style-name="P4" draw:layer="layout" svg:x1="40cm" svg:y1="19.5cm" svg:x2="40cm" svg:y2="20.6cm">
            <text:p/>
          </draw:line>
          <draw:line draw:style-name="gr146" draw:text-style-name="P4" draw:layer="layout" svg:x1="40.5cm" svg:y1="19cm" svg:x2="40.5cm" svg:y2="20.6cm">
            <text:p/>
          </draw:line>
          <draw:line draw:style-name="gr146" draw:text-style-name="P4" draw:layer="layout" svg:x1="41cm" svg:y1="18.5cm" svg:x2="41cm" svg:y2="20.6cm">
            <text:p/>
          </draw:line>
          <draw:polygon draw:style-name="gr155" draw:text-style-name="P14" draw:layer="layout" svg:width="2.499cm" svg:height="0.999cm" svg:x="39.5cm" svg:y="20.6cm" svg:viewBox="0 0 2500 1000" draw:points="2500,0 0,0 500,1000 2000,1000">
            <text:p/>
          </draw:polygon>
          <draw:custom-shape draw:style-name="gr416" draw:text-style-name="P38" draw:layer="layout" svg:width="2cm" svg:height="0.5cm" svg:x="17cm" svg:y="10cm">
            <text:p/>
            <draw:enhanced-geometry svg:viewBox="0 0 21600 21600" draw:type="rectangle" draw:enhanced-path="M 0 0 L 21600 0 21600 21600 0 21600 0 0 Z N"/>
          </draw:custom-shape>
          <draw:custom-shape draw:style-name="gr387" draw:text-style-name="P39" draw:layer="layout" svg:width="5cm" svg:height="0.5cm" svg:x="19cm" svg:y="10cm">
            <text:p/>
            <draw:enhanced-geometry svg:viewBox="0 0 21600 21600" draw:type="rectangle" draw:enhanced-path="M 0 0 L 21600 0 21600 21600 0 21600 0 0 Z N"/>
          </draw:custom-shape>
          <draw:custom-shape draw:style-name="gr388" draw:text-style-name="P39" draw:layer="layout" svg:width="1cm" svg:height="0.5cm" svg:x="16cm" svg:y="10cm">
            <text:p/>
            <draw:enhanced-geometry svg:viewBox="0 0 21600 21600" draw:type="rectangle" draw:enhanced-path="M 0 0 L 21600 0 21600 21600 0 21600 0 0 Z N"/>
          </draw:custom-shape>
          <draw:frame draw:style-name="gr389" draw:text-style-name="P40" draw:layer="layout" svg:width="1.383cm" svg:height="0.57cm" svg:x="15.6cm" svg:y="9.4cm">
            <draw:text-box>
              <text:p><text:span text:style-name="T10">V_1 bit</text:span></text:p>
            </draw:text-box>
          </draw:frame>
          <draw:frame draw:style-name="gr389" draw:text-style-name="P40" draw:layer="layout" svg:width="1.95cm" svg:height="0.57cm" svg:x="17.05cm" svg:y="9.4cm">
            <draw:text-box>
              <text:p><text:span text:style-name="T10">Tag_22 bits</text:span></text:p>
            </draw:text-box>
          </draw:frame>
          <draw:frame draw:style-name="gr389" draw:text-style-name="P40" draw:layer="layout" svg:width="2.331cm" svg:height="0.57cm" svg:x="19cm" svg:y="9.4cm">
            <draw:text-box>
              <text:p><text:span text:style-name="T10">Data_32 bytes</text:span></text:p>
            </draw:text-box>
          </draw:frame>
          <draw:custom-shape draw:style-name="gr417" draw:text-style-name="P38" draw:layer="layout" svg:width="2cm" svg:height="0.5cm" svg:x="17cm" svg:y="10.5cm">
            <text:p/>
            <draw:enhanced-geometry svg:viewBox="0 0 21600 21600" draw:type="rectangle" draw:enhanced-path="M 0 0 L 21600 0 21600 21600 0 21600 0 0 Z N"/>
          </draw:custom-shape>
          <draw:custom-shape draw:style-name="gr387" draw:text-style-name="P39" draw:layer="layout" svg:width="5cm" svg:height="0.5cm" svg:x="19cm" svg:y="10.5cm">
            <text:p/>
            <draw:enhanced-geometry svg:viewBox="0 0 21600 21600" draw:type="rectangle" draw:enhanced-path="M 0 0 L 21600 0 21600 21600 0 21600 0 0 Z N"/>
          </draw:custom-shape>
          <draw:custom-shape draw:style-name="gr388" draw:text-style-name="P39" draw:layer="layout" svg:width="1cm" svg:height="0.5cm" svg:x="16cm" svg:y="10.5cm">
            <text:p/>
            <draw:enhanced-geometry svg:viewBox="0 0 21600 21600" draw:type="rectangle" draw:enhanced-path="M 0 0 L 21600 0 21600 21600 0 21600 0 0 Z N"/>
          </draw:custom-shape>
          <draw:custom-shape draw:style-name="gr418" draw:text-style-name="P38" draw:layer="layout" svg:width="2cm" svg:height="0.5cm" svg:x="17cm" svg:y="11cm">
            <text:p/>
            <draw:enhanced-geometry svg:viewBox="0 0 21600 21600" draw:type="rectangle" draw:enhanced-path="M 0 0 L 21600 0 21600 21600 0 21600 0 0 Z N"/>
          </draw:custom-shape>
          <draw:custom-shape draw:style-name="gr387" draw:text-style-name="P39" draw:layer="layout" svg:width="5cm" svg:height="0.5cm" svg:x="19cm" svg:y="11cm">
            <text:p/>
            <draw:enhanced-geometry svg:viewBox="0 0 21600 21600" draw:type="rectangle" draw:enhanced-path="M 0 0 L 21600 0 21600 21600 0 21600 0 0 Z N"/>
          </draw:custom-shape>
          <draw:custom-shape draw:style-name="gr388" draw:text-style-name="P39" draw:layer="layout" svg:width="1cm" svg:height="0.5cm" svg:x="16cm" svg:y="11cm">
            <text:p/>
            <draw:enhanced-geometry svg:viewBox="0 0 21600 21600" draw:type="rectangle" draw:enhanced-path="M 0 0 L 21600 0 21600 21600 0 21600 0 0 Z N"/>
          </draw:custom-shape>
          <draw:custom-shape draw:style-name="gr419" draw:text-style-name="P38" draw:layer="layout" svg:width="2cm" svg:height="0.5cm" svg:x="17cm" svg:y="11.5cm">
            <text:p/>
            <draw:enhanced-geometry svg:viewBox="0 0 21600 21600" draw:type="rectangle" draw:enhanced-path="M 0 0 L 21600 0 21600 21600 0 21600 0 0 Z N"/>
          </draw:custom-shape>
          <draw:custom-shape draw:style-name="gr387" draw:text-style-name="P39" draw:layer="layout" svg:width="5cm" svg:height="0.5cm" svg:x="19cm" svg:y="11.5cm">
            <text:p/>
            <draw:enhanced-geometry svg:viewBox="0 0 21600 21600" draw:type="rectangle" draw:enhanced-path="M 0 0 L 21600 0 21600 21600 0 21600 0 0 Z N"/>
          </draw:custom-shape>
          <draw:custom-shape draw:style-name="gr388" draw:text-style-name="P39" draw:layer="layout" svg:width="1cm" svg:height="0.5cm" svg:x="16cm" svg:y="11.5cm">
            <text:p/>
            <draw:enhanced-geometry svg:viewBox="0 0 21600 21600" draw:type="rectangle" draw:enhanced-path="M 0 0 L 21600 0 21600 21600 0 21600 0 0 Z N"/>
          </draw:custom-shape>
          <draw:custom-shape draw:style-name="gr420" draw:text-style-name="P41" draw:layer="layout" svg:width="2cm" svg:height="0.5cm" svg:x="17cm" svg:y="12cm">
            <text:p/>
            <draw:enhanced-geometry svg:viewBox="0 0 21600 21600" draw:type="rectangle" draw:enhanced-path="M 0 0 L 21600 0 21600 21600 0 21600 0 0 Z N"/>
          </draw:custom-shape>
          <draw:custom-shape draw:style-name="gr394" draw:text-style-name="P36" draw:layer="layout" svg:width="5cm" svg:height="0.5cm" svg:x="19cm" svg:y="12cm">
            <text:p/>
            <draw:enhanced-geometry svg:viewBox="0 0 21600 21600" draw:type="rectangle" draw:enhanced-path="M 0 0 L 21600 0 21600 21600 0 21600 0 0 Z N"/>
          </draw:custom-shape>
          <draw:custom-shape draw:style-name="gr395" draw:text-style-name="P36" draw:layer="layout" svg:width="1cm" svg:height="0.5cm" svg:x="16cm" svg:y="12cm">
            <text:p/>
            <draw:enhanced-geometry svg:viewBox="0 0 21600 21600" draw:type="rectangle" draw:enhanced-path="M 0 0 L 21600 0 21600 21600 0 21600 0 0 Z N"/>
          </draw:custom-shape>
          <draw:custom-shape draw:style-name="gr421" draw:text-style-name="P38" draw:layer="layout" svg:width="2cm" svg:height="0.5cm" svg:x="17cm" svg:y="13cm">
            <text:p/>
            <draw:enhanced-geometry svg:viewBox="0 0 21600 21600" draw:type="rectangle" draw:enhanced-path="M 0 0 L 21600 0 21600 21600 0 21600 0 0 Z N"/>
          </draw:custom-shape>
          <draw:custom-shape draw:style-name="gr387" draw:text-style-name="P39" draw:layer="layout" svg:width="5cm" svg:height="0.5cm" svg:x="19cm" svg:y="13cm">
            <text:p/>
            <draw:enhanced-geometry svg:viewBox="0 0 21600 21600" draw:type="rectangle" draw:enhanced-path="M 0 0 L 21600 0 21600 21600 0 21600 0 0 Z N"/>
          </draw:custom-shape>
          <draw:custom-shape draw:style-name="gr388" draw:text-style-name="P39" draw:layer="layout" svg:width="1cm" svg:height="0.5cm" svg:x="16cm" svg:y="13cm">
            <text:p/>
            <draw:enhanced-geometry svg:viewBox="0 0 21600 21600" draw:type="rectangle" draw:enhanced-path="M 0 0 L 21600 0 21600 21600 0 21600 0 0 Z N"/>
          </draw:custom-shape>
          <draw:custom-shape draw:style-name="gr422" draw:text-style-name="P38" draw:layer="layout" svg:width="2cm" svg:height="0.5cm" svg:x="17cm" svg:y="13.5cm">
            <text:p/>
            <draw:enhanced-geometry svg:viewBox="0 0 21600 21600" draw:type="rectangle" draw:enhanced-path="M 0 0 L 21600 0 21600 21600 0 21600 0 0 Z N"/>
          </draw:custom-shape>
          <draw:custom-shape draw:style-name="gr387" draw:text-style-name="P39" draw:layer="layout" svg:width="5cm" svg:height="0.5cm" svg:x="19cm" svg:y="13.5cm">
            <text:p/>
            <draw:enhanced-geometry svg:viewBox="0 0 21600 21600" draw:type="rectangle" draw:enhanced-path="M 0 0 L 21600 0 21600 21600 0 21600 0 0 Z N"/>
          </draw:custom-shape>
          <draw:custom-shape draw:style-name="gr388" draw:text-style-name="P39" draw:layer="layout" svg:width="1cm" svg:height="0.5cm" svg:x="16cm" svg:y="13.5cm">
            <text:p/>
            <draw:enhanced-geometry svg:viewBox="0 0 21600 21600" draw:type="rectangle" draw:enhanced-path="M 0 0 L 21600 0 21600 21600 0 21600 0 0 Z N"/>
          </draw:custom-shape>
          <draw:custom-shape draw:style-name="gr423" draw:text-style-name="P38" draw:layer="layout" svg:width="2cm" svg:height="0.5cm" svg:x="17cm" svg:y="14cm">
            <text:p/>
            <draw:enhanced-geometry svg:viewBox="0 0 21600 21600" draw:type="rectangle" draw:enhanced-path="M 0 0 L 21600 0 21600 21600 0 21600 0 0 Z N"/>
          </draw:custom-shape>
          <draw:custom-shape draw:style-name="gr387" draw:text-style-name="P39" draw:layer="layout" svg:width="5cm" svg:height="0.5cm" svg:x="19cm" svg:y="14cm">
            <text:p/>
            <draw:enhanced-geometry svg:viewBox="0 0 21600 21600" draw:type="rectangle" draw:enhanced-path="M 0 0 L 21600 0 21600 21600 0 21600 0 0 Z N"/>
          </draw:custom-shape>
          <draw:custom-shape draw:style-name="gr388" draw:text-style-name="P39" draw:layer="layout" svg:width="1cm" svg:height="0.5cm" svg:x="16cm" svg:y="14cm">
            <text:p/>
            <draw:enhanced-geometry svg:viewBox="0 0 21600 21600" draw:type="rectangle" draw:enhanced-path="M 0 0 L 21600 0 21600 21600 0 21600 0 0 Z N"/>
          </draw:custom-shape>
          <draw:custom-shape draw:style-name="gr424" draw:text-style-name="P38" draw:layer="layout" svg:width="2cm" svg:height="0.5cm" svg:x="17cm" svg:y="14.5cm">
            <text:p/>
            <draw:enhanced-geometry svg:viewBox="0 0 21600 21600" draw:type="rectangle" draw:enhanced-path="M 0 0 L 21600 0 21600 21600 0 21600 0 0 Z N"/>
          </draw:custom-shape>
          <draw:custom-shape draw:style-name="gr387" draw:text-style-name="P39" draw:layer="layout" svg:width="5cm" svg:height="0.5cm" svg:x="19cm" svg:y="14.5cm">
            <text:p/>
            <draw:enhanced-geometry svg:viewBox="0 0 21600 21600" draw:type="rectangle" draw:enhanced-path="M 0 0 L 21600 0 21600 21600 0 21600 0 0 Z N"/>
          </draw:custom-shape>
          <draw:custom-shape draw:style-name="gr388" draw:text-style-name="P39" draw:layer="layout" svg:width="1cm" svg:height="0.5cm" svg:x="16cm" svg:y="14.5cm">
            <text:p/>
            <draw:enhanced-geometry svg:viewBox="0 0 21600 21600" draw:type="rectangle" draw:enhanced-path="M 0 0 L 21600 0 21600 21600 0 21600 0 0 Z N"/>
          </draw:custom-shape>
          <draw:custom-shape draw:style-name="gr425" draw:text-style-name="P38" draw:layer="layout" svg:width="2cm" svg:height="0.5cm" svg:x="17cm" svg:y="15cm">
            <text:p/>
            <draw:enhanced-geometry svg:viewBox="0 0 21600 21600" draw:type="rectangle" draw:enhanced-path="M 0 0 L 21600 0 21600 21600 0 21600 0 0 Z N"/>
          </draw:custom-shape>
          <draw:custom-shape draw:style-name="gr387" draw:text-style-name="P39" draw:layer="layout" svg:width="5cm" svg:height="0.5cm" svg:x="19cm" svg:y="15cm">
            <text:p/>
            <draw:enhanced-geometry svg:viewBox="0 0 21600 21600" draw:type="rectangle" draw:enhanced-path="M 0 0 L 21600 0 21600 21600 0 21600 0 0 Z N"/>
          </draw:custom-shape>
          <draw:custom-shape draw:style-name="gr388" draw:text-style-name="P39" draw:layer="layout" svg:width="1cm" svg:height="0.5cm" svg:x="16cm" svg:y="15cm">
            <text:p/>
            <draw:enhanced-geometry svg:viewBox="0 0 21600 21600" draw:type="rectangle" draw:enhanced-path="M 0 0 L 21600 0 21600 21600 0 21600 0 0 Z N"/>
          </draw:custom-shape>
          <draw:custom-shape draw:style-name="gr426" draw:text-style-name="P38" draw:layer="layout" svg:width="2cm" svg:height="0.5cm" svg:x="17cm" svg:y="15.5cm">
            <text:p/>
            <draw:enhanced-geometry svg:viewBox="0 0 21600 21600" draw:type="rectangle" draw:enhanced-path="M 0 0 L 21600 0 21600 21600 0 21600 0 0 Z N"/>
          </draw:custom-shape>
          <draw:custom-shape draw:style-name="gr387" draw:text-style-name="P39" draw:layer="layout" svg:width="5cm" svg:height="0.5cm" svg:x="19cm" svg:y="15.5cm">
            <text:p/>
            <draw:enhanced-geometry svg:viewBox="0 0 21600 21600" draw:type="rectangle" draw:enhanced-path="M 0 0 L 21600 0 21600 21600 0 21600 0 0 Z N"/>
          </draw:custom-shape>
          <draw:custom-shape draw:style-name="gr388" draw:text-style-name="P39" draw:layer="layout" svg:width="1cm" svg:height="0.5cm" svg:x="16cm" svg:y="15.5cm">
            <text:p/>
            <draw:enhanced-geometry svg:viewBox="0 0 21600 21600" draw:type="rectangle" draw:enhanced-path="M 0 0 L 21600 0 21600 21600 0 21600 0 0 Z N"/>
          </draw:custom-shape>
          <draw:custom-shape draw:style-name="gr402" draw:text-style-name="P28" draw:layer="layout" svg:width="1cm" svg:height="1cm" svg:x="17cm" svg:y="17cm">
            <text:p text:style-name="P1">=</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66">
            <draw:glue-point draw:id="4" svg:x="0cm" svg:y="5cm"/>
            <draw:glue-point draw:id="5" svg:x="2.5cm" svg:y="-5cm"/>
            <draw:glue-point draw:id="6" svg:x="-2.5cm" svg:y="-5cm"/>
            <draw:rect draw:style-name="gr427" draw:text-style-name="P16" draw:layer="layout" svg:width="1cm" svg:height="1cm" draw:transform="rotate (-1.5707963267949) translate (17.5cm 19.5cm)">
              <text:p text:style-name="P15"><text:span text:style-name="T4">&amp;</text:span></text:p>
            </draw:rect>
            <draw:line draw:style-name="gr428" draw:text-style-name="P17" draw:layer="layout" svg:x1="17.25cm" svg:y1="19cm" svg:x2="17.25cm" svg:y2="19.5cm">
              <text:p/>
            </draw:line>
            <draw:line draw:style-name="gr429" draw:text-style-name="P17" draw:layer="layout" svg:x1="16.75cm" svg:y1="19cm" svg:x2="16.75cm" svg:y2="19.5cm">
              <text:p/>
            </draw:line>
            <draw:line draw:style-name="gr430" draw:text-style-name="P17" draw:layer="layout" svg:x1="17cm" svg:y1="20.5cm" svg:x2="17cm" svg:y2="21cm">
              <text:p/>
            </draw:line>
          </draw:g>
          <draw:line draw:style-name="gr413" draw:text-style-name="P4" draw:layer="layout" svg:x1="17.5cm" svg:y1="12.3cm" svg:x2="17.5cm" svg:y2="17cm">
            <text:p/>
          </draw:line>
          <draw:line draw:style-name="gr146" draw:text-style-name="P4" draw:layer="layout" svg:x1="16cm" svg:y1="17.5cm" svg:x2="17cm" svg:y2="17.5cm">
            <text:p/>
          </draw:line>
          <draw:line draw:style-name="gr38" draw:text-style-name="P4" draw:layer="layout" svg:x1="17.25cm" svg:y1="19cm" svg:x2="17.5cm" svg:y2="19cm">
            <text:p/>
          </draw:line>
          <draw:line draw:style-name="gr38" draw:text-style-name="P4" draw:layer="layout" svg:x1="17.5cm" svg:y1="18cm" svg:x2="17.5cm" svg:y2="19cm">
            <text:p/>
          </draw:line>
          <draw:line draw:style-name="gr38" draw:text-style-name="P4" draw:layer="layout" svg:x1="16.75cm" svg:y1="19cm" svg:x2="16.5cm" svg:y2="19cm">
            <text:p/>
          </draw:line>
          <draw:line draw:style-name="gr414" draw:text-style-name="P4" draw:layer="layout" svg:x1="16.5cm" svg:y1="12.3cm" svg:x2="16.5cm" svg:y2="19cm">
            <text:p/>
          </draw:line>
          <draw:custom-shape draw:style-name="gr431" draw:text-style-name="P38" draw:layer="layout" svg:width="2cm" svg:height="0.5cm" svg:x="26cm" svg:y="10cm">
            <text:p/>
            <draw:enhanced-geometry svg:viewBox="0 0 21600 21600" draw:type="rectangle" draw:enhanced-path="M 0 0 L 21600 0 21600 21600 0 21600 0 0 Z N"/>
          </draw:custom-shape>
          <draw:custom-shape draw:style-name="gr387" draw:text-style-name="P39" draw:layer="layout" svg:width="5cm" svg:height="0.5cm" svg:x="28cm" svg:y="10cm">
            <text:p/>
            <draw:enhanced-geometry svg:viewBox="0 0 21600 21600" draw:type="rectangle" draw:enhanced-path="M 0 0 L 21600 0 21600 21600 0 21600 0 0 Z N"/>
          </draw:custom-shape>
          <draw:custom-shape draw:style-name="gr388" draw:text-style-name="P39" draw:layer="layout" svg:width="1cm" svg:height="0.5cm" svg:x="25cm" svg:y="10cm">
            <text:p/>
            <draw:enhanced-geometry svg:viewBox="0 0 21600 21600" draw:type="rectangle" draw:enhanced-path="M 0 0 L 21600 0 21600 21600 0 21600 0 0 Z N"/>
          </draw:custom-shape>
          <draw:frame draw:style-name="gr389" draw:text-style-name="P40" draw:layer="layout" svg:width="1.383cm" svg:height="0.57cm" svg:x="24.6cm" svg:y="9.4cm">
            <draw:text-box>
              <text:p><text:span text:style-name="T10">V_1 bit</text:span></text:p>
            </draw:text-box>
          </draw:frame>
          <draw:frame draw:style-name="gr389" draw:text-style-name="P40" draw:layer="layout" svg:width="1.95cm" svg:height="0.57cm" svg:x="26.05cm" svg:y="9.4cm">
            <draw:text-box>
              <text:p><text:span text:style-name="T10">Tag_22 bits</text:span></text:p>
            </draw:text-box>
          </draw:frame>
          <draw:frame draw:style-name="gr389" draw:text-style-name="P40" draw:layer="layout" svg:width="2.331cm" svg:height="0.57cm" svg:x="28cm" svg:y="9.4cm">
            <draw:text-box>
              <text:p><text:span text:style-name="T10">Data_32 bytes</text:span></text:p>
            </draw:text-box>
          </draw:frame>
          <draw:custom-shape draw:style-name="gr432" draw:text-style-name="P38" draw:layer="layout" svg:width="2cm" svg:height="0.5cm" svg:x="26cm" svg:y="10.5cm">
            <text:p/>
            <draw:enhanced-geometry svg:viewBox="0 0 21600 21600" draw:type="rectangle" draw:enhanced-path="M 0 0 L 21600 0 21600 21600 0 21600 0 0 Z N"/>
          </draw:custom-shape>
          <draw:custom-shape draw:style-name="gr387" draw:text-style-name="P39" draw:layer="layout" svg:width="5cm" svg:height="0.5cm" svg:x="28cm" svg:y="10.5cm">
            <text:p/>
            <draw:enhanced-geometry svg:viewBox="0 0 21600 21600" draw:type="rectangle" draw:enhanced-path="M 0 0 L 21600 0 21600 21600 0 21600 0 0 Z N"/>
          </draw:custom-shape>
          <draw:custom-shape draw:style-name="gr388" draw:text-style-name="P39" draw:layer="layout" svg:width="1cm" svg:height="0.5cm" svg:x="25cm" svg:y="10.5cm">
            <text:p/>
            <draw:enhanced-geometry svg:viewBox="0 0 21600 21600" draw:type="rectangle" draw:enhanced-path="M 0 0 L 21600 0 21600 21600 0 21600 0 0 Z N"/>
          </draw:custom-shape>
          <draw:custom-shape draw:style-name="gr433" draw:text-style-name="P38" draw:layer="layout" svg:width="2cm" svg:height="0.5cm" svg:x="26cm" svg:y="11cm">
            <text:p/>
            <draw:enhanced-geometry svg:viewBox="0 0 21600 21600" draw:type="rectangle" draw:enhanced-path="M 0 0 L 21600 0 21600 21600 0 21600 0 0 Z N"/>
          </draw:custom-shape>
          <draw:custom-shape draw:style-name="gr387" draw:text-style-name="P39" draw:layer="layout" svg:width="5cm" svg:height="0.5cm" svg:x="28cm" svg:y="11cm">
            <text:p/>
            <draw:enhanced-geometry svg:viewBox="0 0 21600 21600" draw:type="rectangle" draw:enhanced-path="M 0 0 L 21600 0 21600 21600 0 21600 0 0 Z N"/>
          </draw:custom-shape>
          <draw:custom-shape draw:style-name="gr388" draw:text-style-name="P39" draw:layer="layout" svg:width="1cm" svg:height="0.5cm" svg:x="25cm" svg:y="11cm">
            <text:p/>
            <draw:enhanced-geometry svg:viewBox="0 0 21600 21600" draw:type="rectangle" draw:enhanced-path="M 0 0 L 21600 0 21600 21600 0 21600 0 0 Z N"/>
          </draw:custom-shape>
          <draw:custom-shape draw:style-name="gr434" draw:text-style-name="P38" draw:layer="layout" svg:width="2cm" svg:height="0.5cm" svg:x="26cm" svg:y="11.5cm">
            <text:p/>
            <draw:enhanced-geometry svg:viewBox="0 0 21600 21600" draw:type="rectangle" draw:enhanced-path="M 0 0 L 21600 0 21600 21600 0 21600 0 0 Z N"/>
          </draw:custom-shape>
          <draw:custom-shape draw:style-name="gr387" draw:text-style-name="P39" draw:layer="layout" svg:width="5cm" svg:height="0.5cm" svg:x="28cm" svg:y="11.5cm">
            <text:p/>
            <draw:enhanced-geometry svg:viewBox="0 0 21600 21600" draw:type="rectangle" draw:enhanced-path="M 0 0 L 21600 0 21600 21600 0 21600 0 0 Z N"/>
          </draw:custom-shape>
          <draw:custom-shape draw:style-name="gr388" draw:text-style-name="P39" draw:layer="layout" svg:width="1cm" svg:height="0.5cm" svg:x="25cm" svg:y="11.5cm">
            <text:p/>
            <draw:enhanced-geometry svg:viewBox="0 0 21600 21600" draw:type="rectangle" draw:enhanced-path="M 0 0 L 21600 0 21600 21600 0 21600 0 0 Z N"/>
          </draw:custom-shape>
          <draw:custom-shape draw:style-name="gr435" draw:text-style-name="P41" draw:layer="layout" svg:width="2cm" svg:height="0.5cm" svg:x="26cm" svg:y="12cm">
            <text:p/>
            <draw:enhanced-geometry svg:viewBox="0 0 21600 21600" draw:type="rectangle" draw:enhanced-path="M 0 0 L 21600 0 21600 21600 0 21600 0 0 Z N"/>
          </draw:custom-shape>
          <draw:custom-shape draw:style-name="gr394" draw:text-style-name="P36" draw:layer="layout" svg:width="5cm" svg:height="0.5cm" svg:x="28cm" svg:y="12cm">
            <text:p/>
            <draw:enhanced-geometry svg:viewBox="0 0 21600 21600" draw:type="rectangle" draw:enhanced-path="M 0 0 L 21600 0 21600 21600 0 21600 0 0 Z N"/>
          </draw:custom-shape>
          <draw:custom-shape draw:style-name="gr395" draw:text-style-name="P36" draw:layer="layout" svg:width="1cm" svg:height="0.5cm" svg:x="25cm" svg:y="12cm">
            <text:p/>
            <draw:enhanced-geometry svg:viewBox="0 0 21600 21600" draw:type="rectangle" draw:enhanced-path="M 0 0 L 21600 0 21600 21600 0 21600 0 0 Z N"/>
          </draw:custom-shape>
          <draw:custom-shape draw:style-name="gr436" draw:text-style-name="P38" draw:layer="layout" svg:width="2cm" svg:height="0.5cm" svg:x="26cm" svg:y="13cm">
            <text:p/>
            <draw:enhanced-geometry svg:viewBox="0 0 21600 21600" draw:type="rectangle" draw:enhanced-path="M 0 0 L 21600 0 21600 21600 0 21600 0 0 Z N"/>
          </draw:custom-shape>
          <draw:custom-shape draw:style-name="gr387" draw:text-style-name="P39" draw:layer="layout" svg:width="5cm" svg:height="0.5cm" svg:x="28cm" svg:y="13cm">
            <text:p/>
            <draw:enhanced-geometry svg:viewBox="0 0 21600 21600" draw:type="rectangle" draw:enhanced-path="M 0 0 L 21600 0 21600 21600 0 21600 0 0 Z N"/>
          </draw:custom-shape>
          <draw:custom-shape draw:style-name="gr388" draw:text-style-name="P39" draw:layer="layout" svg:width="1cm" svg:height="0.5cm" svg:x="25cm" svg:y="13cm">
            <text:p/>
            <draw:enhanced-geometry svg:viewBox="0 0 21600 21600" draw:type="rectangle" draw:enhanced-path="M 0 0 L 21600 0 21600 21600 0 21600 0 0 Z N"/>
          </draw:custom-shape>
          <draw:custom-shape draw:style-name="gr437" draw:text-style-name="P38" draw:layer="layout" svg:width="2cm" svg:height="0.5cm" svg:x="26cm" svg:y="13.5cm">
            <text:p/>
            <draw:enhanced-geometry svg:viewBox="0 0 21600 21600" draw:type="rectangle" draw:enhanced-path="M 0 0 L 21600 0 21600 21600 0 21600 0 0 Z N"/>
          </draw:custom-shape>
          <draw:custom-shape draw:style-name="gr387" draw:text-style-name="P39" draw:layer="layout" svg:width="5cm" svg:height="0.5cm" svg:x="28cm" svg:y="13.5cm">
            <text:p/>
            <draw:enhanced-geometry svg:viewBox="0 0 21600 21600" draw:type="rectangle" draw:enhanced-path="M 0 0 L 21600 0 21600 21600 0 21600 0 0 Z N"/>
          </draw:custom-shape>
          <draw:custom-shape draw:style-name="gr388" draw:text-style-name="P39" draw:layer="layout" svg:width="1cm" svg:height="0.5cm" svg:x="25cm" svg:y="13.5cm">
            <text:p/>
            <draw:enhanced-geometry svg:viewBox="0 0 21600 21600" draw:type="rectangle" draw:enhanced-path="M 0 0 L 21600 0 21600 21600 0 21600 0 0 Z N"/>
          </draw:custom-shape>
          <draw:custom-shape draw:style-name="gr438" draw:text-style-name="P38" draw:layer="layout" svg:width="2cm" svg:height="0.5cm" svg:x="26cm" svg:y="14cm">
            <text:p/>
            <draw:enhanced-geometry svg:viewBox="0 0 21600 21600" draw:type="rectangle" draw:enhanced-path="M 0 0 L 21600 0 21600 21600 0 21600 0 0 Z N"/>
          </draw:custom-shape>
          <draw:custom-shape draw:style-name="gr387" draw:text-style-name="P39" draw:layer="layout" svg:width="5cm" svg:height="0.5cm" svg:x="28cm" svg:y="14cm">
            <text:p/>
            <draw:enhanced-geometry svg:viewBox="0 0 21600 21600" draw:type="rectangle" draw:enhanced-path="M 0 0 L 21600 0 21600 21600 0 21600 0 0 Z N"/>
          </draw:custom-shape>
          <draw:custom-shape draw:style-name="gr388" draw:text-style-name="P39" draw:layer="layout" svg:width="1cm" svg:height="0.5cm" svg:x="25cm" svg:y="14cm">
            <text:p/>
            <draw:enhanced-geometry svg:viewBox="0 0 21600 21600" draw:type="rectangle" draw:enhanced-path="M 0 0 L 21600 0 21600 21600 0 21600 0 0 Z N"/>
          </draw:custom-shape>
          <draw:custom-shape draw:style-name="gr439" draw:text-style-name="P38" draw:layer="layout" svg:width="2cm" svg:height="0.5cm" svg:x="26cm" svg:y="14.5cm">
            <text:p/>
            <draw:enhanced-geometry svg:viewBox="0 0 21600 21600" draw:type="rectangle" draw:enhanced-path="M 0 0 L 21600 0 21600 21600 0 21600 0 0 Z N"/>
          </draw:custom-shape>
          <draw:custom-shape draw:style-name="gr387" draw:text-style-name="P39" draw:layer="layout" svg:width="5cm" svg:height="0.5cm" svg:x="28cm" svg:y="14.5cm">
            <text:p/>
            <draw:enhanced-geometry svg:viewBox="0 0 21600 21600" draw:type="rectangle" draw:enhanced-path="M 0 0 L 21600 0 21600 21600 0 21600 0 0 Z N"/>
          </draw:custom-shape>
          <draw:custom-shape draw:style-name="gr388" draw:text-style-name="P39" draw:layer="layout" svg:width="1cm" svg:height="0.5cm" svg:x="25cm" svg:y="14.5cm">
            <text:p/>
            <draw:enhanced-geometry svg:viewBox="0 0 21600 21600" draw:type="rectangle" draw:enhanced-path="M 0 0 L 21600 0 21600 21600 0 21600 0 0 Z N"/>
          </draw:custom-shape>
          <draw:custom-shape draw:style-name="gr440" draw:text-style-name="P38" draw:layer="layout" svg:width="2cm" svg:height="0.5cm" svg:x="26cm" svg:y="15cm">
            <text:p/>
            <draw:enhanced-geometry svg:viewBox="0 0 21600 21600" draw:type="rectangle" draw:enhanced-path="M 0 0 L 21600 0 21600 21600 0 21600 0 0 Z N"/>
          </draw:custom-shape>
          <draw:custom-shape draw:style-name="gr387" draw:text-style-name="P39" draw:layer="layout" svg:width="5cm" svg:height="0.5cm" svg:x="28cm" svg:y="15cm">
            <text:p/>
            <draw:enhanced-geometry svg:viewBox="0 0 21600 21600" draw:type="rectangle" draw:enhanced-path="M 0 0 L 21600 0 21600 21600 0 21600 0 0 Z N"/>
          </draw:custom-shape>
          <draw:custom-shape draw:style-name="gr388" draw:text-style-name="P39" draw:layer="layout" svg:width="1cm" svg:height="0.5cm" svg:x="25cm" svg:y="15cm">
            <text:p/>
            <draw:enhanced-geometry svg:viewBox="0 0 21600 21600" draw:type="rectangle" draw:enhanced-path="M 0 0 L 21600 0 21600 21600 0 21600 0 0 Z N"/>
          </draw:custom-shape>
          <draw:custom-shape draw:style-name="gr441" draw:text-style-name="P38" draw:layer="layout" svg:width="2cm" svg:height="0.5cm" svg:x="26cm" svg:y="15.5cm">
            <text:p/>
            <draw:enhanced-geometry svg:viewBox="0 0 21600 21600" draw:type="rectangle" draw:enhanced-path="M 0 0 L 21600 0 21600 21600 0 21600 0 0 Z N"/>
          </draw:custom-shape>
          <draw:custom-shape draw:style-name="gr387" draw:text-style-name="P39" draw:layer="layout" svg:width="5cm" svg:height="0.5cm" svg:x="28cm" svg:y="15.5cm">
            <text:p/>
            <draw:enhanced-geometry svg:viewBox="0 0 21600 21600" draw:type="rectangle" draw:enhanced-path="M 0 0 L 21600 0 21600 21600 0 21600 0 0 Z N"/>
          </draw:custom-shape>
          <draw:custom-shape draw:style-name="gr388" draw:text-style-name="P39" draw:layer="layout" svg:width="1cm" svg:height="0.5cm" svg:x="25cm" svg:y="15.5cm">
            <text:p/>
            <draw:enhanced-geometry svg:viewBox="0 0 21600 21600" draw:type="rectangle" draw:enhanced-path="M 0 0 L 21600 0 21600 21600 0 21600 0 0 Z N"/>
          </draw:custom-shape>
          <draw:custom-shape draw:style-name="gr402" draw:text-style-name="P28" draw:layer="layout" svg:width="1cm" svg:height="1cm" svg:x="26cm" svg:y="17cm">
            <text:p text:style-name="P1">=</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66">
            <draw:glue-point draw:id="4" svg:x="0cm" svg:y="5cm"/>
            <draw:glue-point draw:id="5" svg:x="2.5cm" svg:y="-5cm"/>
            <draw:glue-point draw:id="6" svg:x="-2.5cm" svg:y="-5cm"/>
            <draw:rect draw:style-name="gr442" draw:text-style-name="P16" draw:layer="layout" svg:width="1cm" svg:height="1cm" draw:transform="rotate (-1.5707963267949) translate (26.5cm 19.5cm)">
              <text:p text:style-name="P15"><text:span text:style-name="T4">&amp;</text:span></text:p>
            </draw:rect>
            <draw:line draw:style-name="gr443" draw:text-style-name="P17" draw:layer="layout" svg:x1="26.25cm" svg:y1="19cm" svg:x2="26.25cm" svg:y2="19.5cm">
              <text:p/>
            </draw:line>
            <draw:line draw:style-name="gr444" draw:text-style-name="P17" draw:layer="layout" svg:x1="25.75cm" svg:y1="19cm" svg:x2="25.75cm" svg:y2="19.5cm">
              <text:p/>
            </draw:line>
            <draw:line draw:style-name="gr445" draw:text-style-name="P17" draw:layer="layout" svg:x1="26cm" svg:y1="20.5cm" svg:x2="26cm" svg:y2="21cm">
              <text:p/>
            </draw:line>
          </draw:g>
          <draw:line draw:style-name="gr413" draw:text-style-name="P4" draw:layer="layout" svg:x1="26.5cm" svg:y1="12.3cm" svg:x2="26.5cm" svg:y2="17cm">
            <text:p/>
          </draw:line>
          <draw:line draw:style-name="gr146" draw:text-style-name="P4" draw:layer="layout" svg:x1="25cm" svg:y1="17.5cm" svg:x2="26cm" svg:y2="17.5cm">
            <text:p/>
          </draw:line>
          <draw:line draw:style-name="gr38" draw:text-style-name="P4" draw:layer="layout" svg:x1="26.25cm" svg:y1="19cm" svg:x2="26.5cm" svg:y2="19cm">
            <text:p/>
          </draw:line>
          <draw:line draw:style-name="gr38" draw:text-style-name="P4" draw:layer="layout" svg:x1="26.5cm" svg:y1="18cm" svg:x2="26.5cm" svg:y2="19cm">
            <text:p/>
          </draw:line>
          <draw:line draw:style-name="gr38" draw:text-style-name="P4" draw:layer="layout" svg:x1="25.75cm" svg:y1="19cm" svg:x2="25.5cm" svg:y2="19cm">
            <text:p/>
          </draw:line>
          <draw:line draw:style-name="gr414" draw:text-style-name="P4" draw:layer="layout" svg:x1="25.5cm" svg:y1="12.3cm" svg:x2="25.5cm" svg:y2="19cm">
            <text:p/>
          </draw:line>
          <draw:custom-shape draw:style-name="gr446" draw:text-style-name="P38" draw:layer="layout" svg:width="2cm" svg:height="0.5cm" svg:x="35cm" svg:y="10cm">
            <text:p/>
            <draw:enhanced-geometry svg:viewBox="0 0 21600 21600" draw:type="rectangle" draw:enhanced-path="M 0 0 L 21600 0 21600 21600 0 21600 0 0 Z N"/>
          </draw:custom-shape>
          <draw:custom-shape draw:style-name="gr387" draw:text-style-name="P39" draw:layer="layout" svg:width="5cm" svg:height="0.5cm" svg:x="37cm" svg:y="10cm">
            <text:p/>
            <draw:enhanced-geometry svg:viewBox="0 0 21600 21600" draw:type="rectangle" draw:enhanced-path="M 0 0 L 21600 0 21600 21600 0 21600 0 0 Z N"/>
          </draw:custom-shape>
          <draw:custom-shape draw:style-name="gr388" draw:text-style-name="P39" draw:layer="layout" svg:width="1cm" svg:height="0.5cm" svg:x="34cm" svg:y="10cm">
            <text:p/>
            <draw:enhanced-geometry svg:viewBox="0 0 21600 21600" draw:type="rectangle" draw:enhanced-path="M 0 0 L 21600 0 21600 21600 0 21600 0 0 Z N"/>
          </draw:custom-shape>
          <draw:frame draw:style-name="gr389" draw:text-style-name="P40" draw:layer="layout" svg:width="1.383cm" svg:height="0.57cm" svg:x="33.6cm" svg:y="9.4cm">
            <draw:text-box>
              <text:p><text:span text:style-name="T10">V_1 bit</text:span></text:p>
            </draw:text-box>
          </draw:frame>
          <draw:frame draw:style-name="gr389" draw:text-style-name="P40" draw:layer="layout" svg:width="1.95cm" svg:height="0.57cm" svg:x="35.05cm" svg:y="9.4cm">
            <draw:text-box>
              <text:p><text:span text:style-name="T10">Tag_22 bits</text:span></text:p>
            </draw:text-box>
          </draw:frame>
          <draw:frame draw:style-name="gr389" draw:text-style-name="P40" draw:layer="layout" svg:width="2.331cm" svg:height="0.57cm" svg:x="37cm" svg:y="9.4cm">
            <draw:text-box>
              <text:p><text:span text:style-name="T10">Data_32 bytes</text:span></text:p>
            </draw:text-box>
          </draw:frame>
          <draw:custom-shape draw:style-name="gr447" draw:text-style-name="P38" draw:layer="layout" svg:width="2cm" svg:height="0.5cm" svg:x="35cm" svg:y="10.5cm">
            <text:p/>
            <draw:enhanced-geometry svg:viewBox="0 0 21600 21600" draw:type="rectangle" draw:enhanced-path="M 0 0 L 21600 0 21600 21600 0 21600 0 0 Z N"/>
          </draw:custom-shape>
          <draw:custom-shape draw:style-name="gr387" draw:text-style-name="P39" draw:layer="layout" svg:width="5cm" svg:height="0.5cm" svg:x="37cm" svg:y="10.5cm">
            <text:p/>
            <draw:enhanced-geometry svg:viewBox="0 0 21600 21600" draw:type="rectangle" draw:enhanced-path="M 0 0 L 21600 0 21600 21600 0 21600 0 0 Z N"/>
          </draw:custom-shape>
          <draw:custom-shape draw:style-name="gr388" draw:text-style-name="P39" draw:layer="layout" svg:width="1cm" svg:height="0.5cm" svg:x="34cm" svg:y="10.5cm">
            <text:p/>
            <draw:enhanced-geometry svg:viewBox="0 0 21600 21600" draw:type="rectangle" draw:enhanced-path="M 0 0 L 21600 0 21600 21600 0 21600 0 0 Z N"/>
          </draw:custom-shape>
          <draw:custom-shape draw:style-name="gr448" draw:text-style-name="P38" draw:layer="layout" svg:width="2cm" svg:height="0.5cm" svg:x="35cm" svg:y="11cm">
            <text:p/>
            <draw:enhanced-geometry svg:viewBox="0 0 21600 21600" draw:type="rectangle" draw:enhanced-path="M 0 0 L 21600 0 21600 21600 0 21600 0 0 Z N"/>
          </draw:custom-shape>
          <draw:custom-shape draw:style-name="gr387" draw:text-style-name="P39" draw:layer="layout" svg:width="5cm" svg:height="0.5cm" svg:x="37cm" svg:y="11cm">
            <text:p/>
            <draw:enhanced-geometry svg:viewBox="0 0 21600 21600" draw:type="rectangle" draw:enhanced-path="M 0 0 L 21600 0 21600 21600 0 21600 0 0 Z N"/>
          </draw:custom-shape>
          <draw:custom-shape draw:style-name="gr388" draw:text-style-name="P39" draw:layer="layout" svg:width="1cm" svg:height="0.5cm" svg:x="34cm" svg:y="11cm">
            <text:p/>
            <draw:enhanced-geometry svg:viewBox="0 0 21600 21600" draw:type="rectangle" draw:enhanced-path="M 0 0 L 21600 0 21600 21600 0 21600 0 0 Z N"/>
          </draw:custom-shape>
          <draw:custom-shape draw:style-name="gr449" draw:text-style-name="P38" draw:layer="layout" svg:width="2cm" svg:height="0.5cm" svg:x="35cm" svg:y="11.5cm">
            <text:p/>
            <draw:enhanced-geometry svg:viewBox="0 0 21600 21600" draw:type="rectangle" draw:enhanced-path="M 0 0 L 21600 0 21600 21600 0 21600 0 0 Z N"/>
          </draw:custom-shape>
          <draw:custom-shape draw:style-name="gr387" draw:text-style-name="P39" draw:layer="layout" svg:width="5cm" svg:height="0.5cm" svg:x="37cm" svg:y="11.5cm">
            <text:p/>
            <draw:enhanced-geometry svg:viewBox="0 0 21600 21600" draw:type="rectangle" draw:enhanced-path="M 0 0 L 21600 0 21600 21600 0 21600 0 0 Z N"/>
          </draw:custom-shape>
          <draw:custom-shape draw:style-name="gr388" draw:text-style-name="P39" draw:layer="layout" svg:width="1cm" svg:height="0.5cm" svg:x="34cm" svg:y="11.5cm">
            <text:p/>
            <draw:enhanced-geometry svg:viewBox="0 0 21600 21600" draw:type="rectangle" draw:enhanced-path="M 0 0 L 21600 0 21600 21600 0 21600 0 0 Z N"/>
          </draw:custom-shape>
          <draw:custom-shape draw:style-name="gr450" draw:text-style-name="P41" draw:layer="layout" svg:width="2cm" svg:height="0.5cm" svg:x="35cm" svg:y="12cm">
            <text:p/>
            <draw:enhanced-geometry svg:viewBox="0 0 21600 21600" draw:type="rectangle" draw:enhanced-path="M 0 0 L 21600 0 21600 21600 0 21600 0 0 Z N"/>
          </draw:custom-shape>
          <draw:custom-shape draw:style-name="gr394" draw:text-style-name="P36" draw:layer="layout" svg:width="5cm" svg:height="0.5cm" svg:x="37cm" svg:y="12cm">
            <text:p/>
            <draw:enhanced-geometry svg:viewBox="0 0 21600 21600" draw:type="rectangle" draw:enhanced-path="M 0 0 L 21600 0 21600 21600 0 21600 0 0 Z N"/>
          </draw:custom-shape>
          <draw:custom-shape draw:style-name="gr395" draw:text-style-name="P36" draw:layer="layout" svg:width="1cm" svg:height="0.5cm" svg:x="34cm" svg:y="12cm">
            <text:p/>
            <draw:enhanced-geometry svg:viewBox="0 0 21600 21600" draw:type="rectangle" draw:enhanced-path="M 0 0 L 21600 0 21600 21600 0 21600 0 0 Z N"/>
          </draw:custom-shape>
          <draw:custom-shape draw:style-name="gr451" draw:text-style-name="P38" draw:layer="layout" svg:width="2cm" svg:height="0.5cm" svg:x="35cm" svg:y="13cm">
            <text:p/>
            <draw:enhanced-geometry svg:viewBox="0 0 21600 21600" draw:type="rectangle" draw:enhanced-path="M 0 0 L 21600 0 21600 21600 0 21600 0 0 Z N"/>
          </draw:custom-shape>
          <draw:custom-shape draw:style-name="gr387" draw:text-style-name="P39" draw:layer="layout" svg:width="5cm" svg:height="0.5cm" svg:x="37cm" svg:y="13cm">
            <text:p/>
            <draw:enhanced-geometry svg:viewBox="0 0 21600 21600" draw:type="rectangle" draw:enhanced-path="M 0 0 L 21600 0 21600 21600 0 21600 0 0 Z N"/>
          </draw:custom-shape>
          <draw:custom-shape draw:style-name="gr388" draw:text-style-name="P39" draw:layer="layout" svg:width="1cm" svg:height="0.5cm" svg:x="34cm" svg:y="13cm">
            <text:p/>
            <draw:enhanced-geometry svg:viewBox="0 0 21600 21600" draw:type="rectangle" draw:enhanced-path="M 0 0 L 21600 0 21600 21600 0 21600 0 0 Z N"/>
          </draw:custom-shape>
          <draw:custom-shape draw:style-name="gr452" draw:text-style-name="P38" draw:layer="layout" svg:width="2cm" svg:height="0.5cm" svg:x="35cm" svg:y="13.5cm">
            <text:p/>
            <draw:enhanced-geometry svg:viewBox="0 0 21600 21600" draw:type="rectangle" draw:enhanced-path="M 0 0 L 21600 0 21600 21600 0 21600 0 0 Z N"/>
          </draw:custom-shape>
          <draw:custom-shape draw:style-name="gr387" draw:text-style-name="P39" draw:layer="layout" svg:width="5cm" svg:height="0.5cm" svg:x="37cm" svg:y="13.5cm">
            <text:p/>
            <draw:enhanced-geometry svg:viewBox="0 0 21600 21600" draw:type="rectangle" draw:enhanced-path="M 0 0 L 21600 0 21600 21600 0 21600 0 0 Z N"/>
          </draw:custom-shape>
          <draw:custom-shape draw:style-name="gr388" draw:text-style-name="P39" draw:layer="layout" svg:width="1cm" svg:height="0.5cm" svg:x="34cm" svg:y="13.5cm">
            <text:p/>
            <draw:enhanced-geometry svg:viewBox="0 0 21600 21600" draw:type="rectangle" draw:enhanced-path="M 0 0 L 21600 0 21600 21600 0 21600 0 0 Z N"/>
          </draw:custom-shape>
          <draw:custom-shape draw:style-name="gr453" draw:text-style-name="P38" draw:layer="layout" svg:width="2cm" svg:height="0.5cm" svg:x="35cm" svg:y="14cm">
            <text:p/>
            <draw:enhanced-geometry svg:viewBox="0 0 21600 21600" draw:type="rectangle" draw:enhanced-path="M 0 0 L 21600 0 21600 21600 0 21600 0 0 Z N"/>
          </draw:custom-shape>
          <draw:custom-shape draw:style-name="gr387" draw:text-style-name="P39" draw:layer="layout" svg:width="5cm" svg:height="0.5cm" svg:x="37cm" svg:y="14cm">
            <text:p/>
            <draw:enhanced-geometry svg:viewBox="0 0 21600 21600" draw:type="rectangle" draw:enhanced-path="M 0 0 L 21600 0 21600 21600 0 21600 0 0 Z N"/>
          </draw:custom-shape>
          <draw:custom-shape draw:style-name="gr388" draw:text-style-name="P39" draw:layer="layout" svg:width="1cm" svg:height="0.5cm" svg:x="34cm" svg:y="14cm">
            <text:p/>
            <draw:enhanced-geometry svg:viewBox="0 0 21600 21600" draw:type="rectangle" draw:enhanced-path="M 0 0 L 21600 0 21600 21600 0 21600 0 0 Z N"/>
          </draw:custom-shape>
          <draw:custom-shape draw:style-name="gr454" draw:text-style-name="P38" draw:layer="layout" svg:width="2cm" svg:height="0.5cm" svg:x="35cm" svg:y="14.5cm">
            <text:p/>
            <draw:enhanced-geometry svg:viewBox="0 0 21600 21600" draw:type="rectangle" draw:enhanced-path="M 0 0 L 21600 0 21600 21600 0 21600 0 0 Z N"/>
          </draw:custom-shape>
          <draw:custom-shape draw:style-name="gr387" draw:text-style-name="P39" draw:layer="layout" svg:width="5cm" svg:height="0.5cm" svg:x="37cm" svg:y="14.5cm">
            <text:p/>
            <draw:enhanced-geometry svg:viewBox="0 0 21600 21600" draw:type="rectangle" draw:enhanced-path="M 0 0 L 21600 0 21600 21600 0 21600 0 0 Z N"/>
          </draw:custom-shape>
          <draw:custom-shape draw:style-name="gr388" draw:text-style-name="P39" draw:layer="layout" svg:width="1cm" svg:height="0.5cm" svg:x="34cm" svg:y="14.5cm">
            <text:p/>
            <draw:enhanced-geometry svg:viewBox="0 0 21600 21600" draw:type="rectangle" draw:enhanced-path="M 0 0 L 21600 0 21600 21600 0 21600 0 0 Z N"/>
          </draw:custom-shape>
          <draw:custom-shape draw:style-name="gr455" draw:text-style-name="P38" draw:layer="layout" svg:width="2cm" svg:height="0.5cm" svg:x="35cm" svg:y="15cm">
            <text:p/>
            <draw:enhanced-geometry svg:viewBox="0 0 21600 21600" draw:type="rectangle" draw:enhanced-path="M 0 0 L 21600 0 21600 21600 0 21600 0 0 Z N"/>
          </draw:custom-shape>
          <draw:custom-shape draw:style-name="gr387" draw:text-style-name="P39" draw:layer="layout" svg:width="5cm" svg:height="0.5cm" svg:x="37cm" svg:y="15cm">
            <text:p/>
            <draw:enhanced-geometry svg:viewBox="0 0 21600 21600" draw:type="rectangle" draw:enhanced-path="M 0 0 L 21600 0 21600 21600 0 21600 0 0 Z N"/>
          </draw:custom-shape>
          <draw:custom-shape draw:style-name="gr388" draw:text-style-name="P39" draw:layer="layout" svg:width="1cm" svg:height="0.5cm" svg:x="34cm" svg:y="15cm">
            <text:p/>
            <draw:enhanced-geometry svg:viewBox="0 0 21600 21600" draw:type="rectangle" draw:enhanced-path="M 0 0 L 21600 0 21600 21600 0 21600 0 0 Z N"/>
          </draw:custom-shape>
          <draw:custom-shape draw:style-name="gr456" draw:text-style-name="P38" draw:layer="layout" svg:width="2cm" svg:height="0.5cm" svg:x="35cm" svg:y="15.5cm">
            <text:p/>
            <draw:enhanced-geometry svg:viewBox="0 0 21600 21600" draw:type="rectangle" draw:enhanced-path="M 0 0 L 21600 0 21600 21600 0 21600 0 0 Z N"/>
          </draw:custom-shape>
          <draw:custom-shape draw:style-name="gr387" draw:text-style-name="P39" draw:layer="layout" svg:width="5cm" svg:height="0.5cm" svg:x="37cm" svg:y="15.5cm">
            <text:p/>
            <draw:enhanced-geometry svg:viewBox="0 0 21600 21600" draw:type="rectangle" draw:enhanced-path="M 0 0 L 21600 0 21600 21600 0 21600 0 0 Z N"/>
          </draw:custom-shape>
          <draw:custom-shape draw:style-name="gr388" draw:text-style-name="P39" draw:layer="layout" svg:width="1cm" svg:height="0.5cm" svg:x="34cm" svg:y="15.5cm">
            <text:p/>
            <draw:enhanced-geometry svg:viewBox="0 0 21600 21600" draw:type="rectangle" draw:enhanced-path="M 0 0 L 21600 0 21600 21600 0 21600 0 0 Z N"/>
          </draw:custom-shape>
          <draw:custom-shape draw:style-name="gr402" draw:text-style-name="P28" draw:layer="layout" svg:width="1cm" svg:height="1cm" svg:x="35cm" svg:y="17cm">
            <text:p text:style-name="P1">=</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66">
            <draw:glue-point draw:id="4" svg:x="0cm" svg:y="5cm"/>
            <draw:glue-point draw:id="5" svg:x="2.5cm" svg:y="-5cm"/>
            <draw:glue-point draw:id="6" svg:x="-2.5cm" svg:y="-5cm"/>
            <draw:rect draw:style-name="gr457" draw:text-style-name="P16" draw:layer="layout" svg:width="1cm" svg:height="1cm" draw:transform="rotate (-1.5707963267949) translate (35.5cm 19.5cm)">
              <text:p text:style-name="P15"><text:span text:style-name="T4">&amp;</text:span></text:p>
            </draw:rect>
            <draw:line draw:style-name="gr458" draw:text-style-name="P17" draw:layer="layout" svg:x1="35.25cm" svg:y1="19cm" svg:x2="35.25cm" svg:y2="19.5cm">
              <text:p/>
            </draw:line>
            <draw:line draw:style-name="gr459" draw:text-style-name="P17" draw:layer="layout" svg:x1="34.75cm" svg:y1="19cm" svg:x2="34.75cm" svg:y2="19.5cm">
              <text:p/>
            </draw:line>
            <draw:line draw:style-name="gr460" draw:text-style-name="P17" draw:layer="layout" svg:x1="35cm" svg:y1="20.5cm" svg:x2="35cm" svg:y2="21cm">
              <text:p/>
            </draw:line>
          </draw:g>
          <draw:line draw:style-name="gr413" draw:text-style-name="P4" draw:layer="layout" svg:x1="35.5cm" svg:y1="12.3cm" svg:x2="35.5cm" svg:y2="17cm">
            <text:p/>
          </draw:line>
          <draw:line draw:style-name="gr146" draw:text-style-name="P4" draw:layer="layout" svg:x1="34cm" svg:y1="17.5cm" svg:x2="35cm" svg:y2="17.5cm">
            <text:p/>
          </draw:line>
          <draw:line draw:style-name="gr38" draw:text-style-name="P4" draw:layer="layout" svg:x1="35.25cm" svg:y1="19cm" svg:x2="35.5cm" svg:y2="19cm">
            <text:p/>
          </draw:line>
          <draw:line draw:style-name="gr38" draw:text-style-name="P4" draw:layer="layout" svg:x1="35.5cm" svg:y1="18cm" svg:x2="35.5cm" svg:y2="19cm">
            <text:p/>
          </draw:line>
          <draw:line draw:style-name="gr38" draw:text-style-name="P4" draw:layer="layout" svg:x1="34.75cm" svg:y1="19cm" svg:x2="34.5cm" svg:y2="19cm">
            <text:p/>
          </draw:line>
          <draw:line draw:style-name="gr414" draw:text-style-name="P4" draw:layer="layout" svg:x1="34.5cm" svg:y1="12.3cm" svg:x2="34.5cm" svg:y2="19cm">
            <text:p/>
          </draw:line>
          <draw:line draw:style-name="gr38" draw:text-style-name="P4" draw:layer="layout" svg:x1="4cm" svg:y1="7.5cm" svg:x2="4cm" svg:y2="17.5cm">
            <text:p/>
          </draw:line>
          <draw:custom-shape draw:style-name="gr461" draw:text-style-name="P5" draw:layer="layout" svg:width="0.2cm" svg:height="0.2cm" svg:x="3.902cm" svg:y="16.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cm" svg:y1="16.5cm" svg:x2="34cm" svg:y2="16.5cm">
            <text:p/>
          </draw:line>
          <draw:line draw:style-name="gr38" draw:text-style-name="P4" draw:layer="layout" svg:x1="34cm" svg:y1="16.5cm" svg:x2="34cm" svg:y2="17.5cm">
            <text:p/>
          </draw:line>
          <draw:line draw:style-name="gr38" draw:text-style-name="P4" draw:layer="layout" svg:x1="25cm" svg:y1="16.5cm" svg:x2="25cm" svg:y2="17.5cm">
            <text:p/>
          </draw:line>
          <draw:line draw:style-name="gr38" draw:text-style-name="P4" draw:layer="layout" svg:x1="16cm" svg:y1="16.5cm" svg:x2="16cm" svg:y2="17.5cm">
            <text:p/>
          </draw:line>
          <draw:custom-shape draw:style-name="gr461" draw:text-style-name="P5" draw:layer="layout" svg:width="0.2cm" svg:height="0.2cm" svg:x="15.903cm" svg:y="16.4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24.904cm" svg:y="16.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6" draw:text-style-name="P4" draw:layer="layout" svg:x1="8.6cm" svg:y1="23.5cm" svg:x2="8.6cm" svg:y2="24cm">
            <text:p/>
          </draw:line>
          <draw:frame draw:style-name="gr389" draw:text-style-name="P40" draw:layer="layout" svg:width="0.857cm" svg:height="0.57cm" svg:x="8.143cm" svg:y="24cm">
            <draw:text-box>
              <text:p><text:span text:style-name="T10">Hit</text:span></text:p>
            </draw:text-box>
          </draw:frame>
          <draw:line draw:style-name="gr38" draw:text-style-name="P4" draw:layer="layout" svg:x1="8cm" svg:y1="21cm" svg:x2="8cm" svg:y2="21.5cm">
            <text:p/>
          </draw:line>
          <draw:line draw:style-name="gr38" draw:text-style-name="P4" draw:layer="layout" svg:x1="36cm" svg:y1="21cm" svg:x2="8.4cm" svg:y2="21cm">
            <text:p/>
          </draw:line>
          <draw:line draw:style-name="gr38" draw:text-style-name="P4" draw:layer="layout" svg:x1="8.4cm" svg:y1="21cm" svg:x2="8.4cm" svg:y2="21.5cm">
            <text:p/>
          </draw:line>
          <draw:line draw:style-name="gr38" draw:text-style-name="P4" draw:layer="layout" svg:x1="9.2cm" svg:y1="21.4cm" svg:x2="36cm" svg:y2="21.4cm">
            <text:p/>
          </draw:line>
          <draw:line draw:style-name="gr38" draw:text-style-name="P4" draw:layer="layout" svg:x1="35cm" svg:y1="21cm" svg:x2="35cm" svg:y2="21.4cm">
            <text:p/>
          </draw:line>
          <draw:line draw:style-name="gr38" draw:text-style-name="P4" draw:layer="layout" svg:x1="36cm" svg:y1="21.2cm" svg:x2="8.8cm" svg:y2="21.2cm">
            <text:p/>
          </draw:line>
          <draw:line draw:style-name="gr38" draw:text-style-name="P4" draw:layer="layout" svg:x1="8.8cm" svg:y1="21.2cm" svg:x2="8.8cm" svg:y2="21.5cm">
            <text:p/>
          </draw:line>
          <draw:line draw:style-name="gr38" draw:text-style-name="P4" draw:layer="layout" svg:x1="26cm" svg:y1="21cm" svg:x2="26cm" svg:y2="21.2cm">
            <text:p/>
          </draw:line>
          <draw:line draw:style-name="gr38" draw:text-style-name="P4" draw:layer="layout" svg:x1="9.2cm" svg:y1="21.4cm" svg:x2="9.2cm" svg:y2="21.6cm">
            <text:p/>
          </draw:line>
          <draw:custom-shape draw:style-name="gr461" draw:text-style-name="P5" draw:layer="layout" svg:width="0.2cm" svg:height="0.2cm" svg:x="34.905cm" svg:y="21.3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25.905cm" svg:y="21.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16.904cm" svg:y="20.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6cm" svg:y1="20.8cm" svg:x2="8cm" svg:y2="20.8cm">
            <text:p/>
          </draw:line>
          <draw:custom-shape draw:style-name="gr461" draw:text-style-name="P5" draw:layer="layout" svg:width="0.2cm" svg:height="0.2cm" svg:x="7.904cm" svg:y="20.7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8.6cm" svg:y1="21.2cm" svg:x2="39cm" svg:y2="20.8cm">
            <text:p/>
          </draw:line>
          <draw:frame draw:style-name="gr462" draw:text-style-name="P37" draw:layer="layout" svg:width="0.659cm" svg:height="0.569cm" svg:x="38.4cm" svg:y="20.531cm">
            <draw:text-box>
              <text:p><text:span text:style-name="T10">2</text:span></text:p>
            </draw:text-box>
          </draw:frame>
          <draw:line draw:style-name="gr38" draw:text-style-name="P4" draw:layer="layout" svg:x1="38cm" svg:y1="21cm" svg:x2="39.7cm" svg:y2="21cm">
            <text:p/>
          </draw:line>
          <draw:line draw:style-name="gr413" draw:text-style-name="P4" draw:layer="layout" svg:x1="41.5cm" svg:y1="12.3cm" svg:x2="41.5cm" svg:y2="20.6cm">
            <text:p/>
          </draw:line>
          <draw:line draw:style-name="gr414" draw:text-style-name="P4" draw:layer="layout" svg:x1="32.5cm" svg:y1="12.3cm" svg:x2="32.5cm" svg:y2="18.5cm">
            <text:p/>
          </draw:line>
          <draw:line draw:style-name="gr414" draw:text-style-name="P4" draw:layer="layout" svg:x1="23.5cm" svg:y1="12.301cm" svg:x2="23.5cm" svg:y2="19cm">
            <text:p/>
          </draw:line>
          <draw:line draw:style-name="gr414" draw:text-style-name="P4" draw:layer="layout" svg:x1="14.5cm" svg:y1="12.302cm" svg:x2="14.5cm" svg:y2="19.5cm">
            <text:p/>
          </draw:line>
          <draw:line draw:style-name="gr38" draw:text-style-name="P4" draw:layer="layout" svg:x1="32.5cm" svg:y1="18.5cm" svg:x2="41cm" svg:y2="18.5cm">
            <text:p/>
          </draw:line>
          <draw:line draw:style-name="gr289" draw:text-style-name="P4" draw:layer="layout" svg:x1="40.5cm" svg:y1="19cm" svg:x2="39cm" svg:y2="19cm">
            <text:p/>
          </draw:line>
          <draw:line draw:style-name="gr289" draw:text-style-name="P4" draw:layer="layout" svg:x1="40cm" svg:y1="19.5cm" svg:x2="38.5cm" svg:y2="19.5cm">
            <text:p/>
          </draw:line>
          <draw:line draw:style-name="gr289" draw:text-style-name="P4" draw:layer="layout" svg:x1="24cm" svg:y1="19cm" svg:x2="23.5cm" svg:y2="19cm">
            <text:p/>
          </draw:line>
          <draw:line draw:style-name="gr289" draw:text-style-name="P4" draw:layer="layout" svg:x1="15cm" svg:y1="19.5cm" svg:x2="14.5cm" svg:y2="19.5cm">
            <text:p/>
          </draw:line>
          <draw:line draw:style-name="gr38" draw:text-style-name="P4" draw:layer="layout" svg:x1="40.8cm" svg:y1="21.6cm" svg:x2="40.8cm" svg:y2="23cm">
            <text:p/>
          </draw:line>
          <draw:line draw:style-name="gr38" draw:text-style-name="P4" draw:layer="layout" svg:x1="40.601cm" svg:y1="22.601cm" svg:x2="41.001cm" svg:y2="22.201cm">
            <text:p/>
          </draw:line>
          <draw:frame draw:style-name="gr463" draw:text-style-name="P37" draw:layer="layout" svg:width="1.463cm" svg:height="0.569cm" svg:x="40.801cm" svg:y="21.932cm">
            <draw:text-box>
              <text:p><text:span text:style-name="T10">32 Byte</text:span></text:p>
            </draw:text-box>
          </draw:frame>
          <draw:polygon draw:style-name="gr155" draw:text-style-name="P14" draw:layer="layout" svg:width="2.499cm" svg:height="0.999cm" svg:x="39.5cm" svg:y="23cm" svg:viewBox="0 0 2500 1000" draw:points="2500,0 0,0 500,1000 2000,1000">
            <text:p/>
          </draw:polygon>
          <draw:line draw:style-name="gr146" draw:text-style-name="P4" draw:layer="layout" svg:x1="40.8cm" svg:y1="24cm" svg:x2="40.8cm" svg:y2="25cm">
            <text:p/>
          </draw:line>
          <draw:line draw:style-name="gr38" draw:text-style-name="P4" draw:layer="layout" svg:x1="40.601cm" svg:y1="24.602cm" svg:x2="41.001cm" svg:y2="24.202cm">
            <text:p/>
          </draw:line>
          <draw:frame draw:style-name="gr464" draw:text-style-name="P37" draw:layer="layout" svg:width="1.302cm" svg:height="0.569cm" svg:x="40.801cm" svg:y="23.933cm">
            <draw:text-box>
              <text:p><text:span text:style-name="T10">1 Byte</text:span></text:p>
            </draw:text-box>
          </draw:frame>
          <draw:custom-shape draw:style-name="gr465" draw:text-style-name="P42" draw:layer="layout" svg:width="3cm" svg:height="0.5cm" svg:x="2cm" svg:y="7cm">
            <text:p text:style-name="P35"><text:span text:style-name="T10">Tag(22bits)</text:span></text:p>
            <draw:enhanced-geometry svg:viewBox="0 0 21600 21600" draw:type="rectangle" draw:enhanced-path="M 0 0 L 21600 0 21600 21600 0 21600 0 0 Z N"/>
          </draw:custom-shape>
          <draw:custom-shape draw:style-name="gr465" draw:text-style-name="P42" draw:layer="layout" svg:width="3cm" svg:height="0.5cm" svg:x="5cm" svg:y="7cm">
            <text:p text:style-name="P35"><text:span text:style-name="T10">Index(5bits)</text:span></text:p>
            <draw:enhanced-geometry svg:viewBox="0 0 21600 21600" draw:type="rectangle" draw:enhanced-path="M 0 0 L 21600 0 21600 21600 0 21600 0 0 Z N"/>
          </draw:custom-shape>
          <draw:custom-shape draw:style-name="gr465" draw:text-style-name="P42" draw:layer="layout" svg:width="3cm" svg:height="0.5cm" svg:x="8cm" svg:y="7cm">
            <text:p text:style-name="P35"><text:span text:style-name="T10">Offset(5bits)</text:span></text:p>
            <draw:enhanced-geometry svg:viewBox="0 0 21600 21600" draw:type="rectangle" draw:enhanced-path="M 0 0 L 21600 0 21600 21600 0 21600 0 0 Z N"/>
          </draw:custom-shape>
          <draw:frame draw:style-name="gr389" draw:text-style-name="P40" draw:layer="layout" svg:width="1.903cm" svg:height="0.57cm" svg:x="4.8cm" svg:y="6.03cm">
            <draw:text-box>
              <text:p><text:span text:style-name="T10">Address</text:span></text:p>
            </draw:text-box>
          </draw:frame>
          <draw:line draw:style-name="gr38" draw:text-style-name="P4" draw:layer="layout" svg:x1="3cm" svg:y1="8.4cm" svg:x2="3cm" svg:y2="23.5cm">
            <text:p/>
          </draw:line>
          <draw:line draw:style-name="gr38" draw:text-style-name="P4" draw:layer="layout" svg:x1="6cm" svg:y1="7.5cm" svg:x2="6cm" svg:y2="9cm">
            <text:p/>
          </draw:line>
          <draw:line draw:style-name="gr38" draw:text-style-name="P4" draw:layer="layout" svg:x1="6cm" svg:y1="9cm" svg:x2="5cm" svg:y2="9cm">
            <text:p/>
          </draw:line>
          <draw:line draw:style-name="gr38" draw:text-style-name="P4" draw:layer="layout" svg:x1="3cm" svg:y1="8.4cm" svg:x2="9cm" svg:y2="8.4cm">
            <text:p/>
          </draw:line>
          <draw:line draw:style-name="gr38" draw:text-style-name="P4" draw:layer="layout" svg:x1="9cm" svg:y1="7.5cm" svg:x2="9cm" svg:y2="8.4cm">
            <text:p/>
          </draw:line>
          <draw:line draw:style-name="gr38" draw:text-style-name="P4" draw:layer="layout" svg:x1="3cm" svg:y1="23.5cm" svg:x2="39.8cm" svg:y2="23.5cm">
            <text:p/>
          </draw:line>
          <draw:custom-shape draw:style-name="gr466" draw:text-style-name="P43" draw:layer="layout" svg:width="40cm" svg:height="19cm" svg:x="2cm" svg:y="6cm">
            <text:p/>
            <draw:enhanced-geometry svg:viewBox="0 0 21600 21600" draw:type="rectangle" draw:enhanced-path="M 0 0 L 21600 0 21600 21600 0 21600 0 0 Z N"/>
          </draw:custom-shape>
          <draw:frame draw:style-name="gr467" draw:text-style-name="P44" draw:layer="layout" svg:width="1.526cm" svg:height="0.569cm" svg:x="2.074cm" svg:y="6.1cm">
            <draw:text-box>
              <text:p><text:span text:style-name="T12">I-Cache</text:span></text:p>
            </draw:text-box>
          </draw:frame>
        </draw:g>
        <draw:g draw:style-name="gr1">
          <draw:custom-shape draw:style-name="gr468" draw:text-style-name="P38" draw:layer="layout" svg:width="2cm" svg:height="0.5cm" svg:x="49cm" svg:y="10cm">
            <text:p/>
            <draw:enhanced-geometry svg:viewBox="0 0 21600 21600" draw:type="rectangle" draw:enhanced-path="M 0 0 L 21600 0 21600 21600 0 21600 0 0 Z N"/>
          </draw:custom-shape>
          <draw:custom-shape draw:style-name="gr387" draw:text-style-name="P39" draw:layer="layout" svg:width="5cm" svg:height="0.5cm" svg:x="51cm" svg:y="10cm">
            <text:p/>
            <draw:enhanced-geometry svg:viewBox="0 0 21600 21600" draw:type="rectangle" draw:enhanced-path="M 0 0 L 21600 0 21600 21600 0 21600 0 0 Z N"/>
          </draw:custom-shape>
          <draw:custom-shape draw:style-name="gr388" draw:text-style-name="P39" draw:layer="layout" svg:width="1cm" svg:height="0.5cm" svg:x="48cm" svg:y="10cm">
            <text:p/>
            <draw:enhanced-geometry svg:viewBox="0 0 21600 21600" draw:type="rectangle" draw:enhanced-path="M 0 0 L 21600 0 21600 21600 0 21600 0 0 Z N"/>
          </draw:custom-shape>
          <draw:frame draw:style-name="gr389" draw:text-style-name="P40" draw:layer="layout" svg:width="1.383cm" svg:height="0.57cm" svg:x="47.6cm" svg:y="9.4cm">
            <draw:text-box>
              <text:p><text:span text:style-name="T10">V_1 bit</text:span></text:p>
            </draw:text-box>
          </draw:frame>
          <draw:frame draw:style-name="gr389" draw:text-style-name="P40" draw:layer="layout" svg:width="1.95cm" svg:height="0.57cm" svg:x="49.05cm" svg:y="9.4cm">
            <draw:text-box>
              <text:p><text:span text:style-name="T10">Tag_22 bits</text:span></text:p>
            </draw:text-box>
          </draw:frame>
          <draw:frame draw:style-name="gr389" draw:text-style-name="P40" draw:layer="layout" svg:width="2.331cm" svg:height="0.57cm" svg:x="51cm" svg:y="9.4cm">
            <draw:text-box>
              <text:p><text:span text:style-name="T10">Data_32 bytes</text:span></text:p>
            </draw:text-box>
          </draw:frame>
          <draw:custom-shape draw:style-name="gr469" draw:text-style-name="P38" draw:layer="layout" svg:width="2cm" svg:height="0.5cm" svg:x="49cm" svg:y="10.5cm">
            <text:p/>
            <draw:enhanced-geometry svg:viewBox="0 0 21600 21600" draw:type="rectangle" draw:enhanced-path="M 0 0 L 21600 0 21600 21600 0 21600 0 0 Z N"/>
          </draw:custom-shape>
          <draw:custom-shape draw:style-name="gr387" draw:text-style-name="P39" draw:layer="layout" svg:width="5cm" svg:height="0.5cm" svg:x="51cm" svg:y="10.5cm">
            <text:p/>
            <draw:enhanced-geometry svg:viewBox="0 0 21600 21600" draw:type="rectangle" draw:enhanced-path="M 0 0 L 21600 0 21600 21600 0 21600 0 0 Z N"/>
          </draw:custom-shape>
          <draw:custom-shape draw:style-name="gr388" draw:text-style-name="P39" draw:layer="layout" svg:width="1cm" svg:height="0.5cm" svg:x="48cm" svg:y="10.5cm">
            <text:p/>
            <draw:enhanced-geometry svg:viewBox="0 0 21600 21600" draw:type="rectangle" draw:enhanced-path="M 0 0 L 21600 0 21600 21600 0 21600 0 0 Z N"/>
          </draw:custom-shape>
          <draw:custom-shape draw:style-name="gr470" draw:text-style-name="P38" draw:layer="layout" svg:width="2cm" svg:height="0.5cm" svg:x="49cm" svg:y="11cm">
            <text:p/>
            <draw:enhanced-geometry svg:viewBox="0 0 21600 21600" draw:type="rectangle" draw:enhanced-path="M 0 0 L 21600 0 21600 21600 0 21600 0 0 Z N"/>
          </draw:custom-shape>
          <draw:custom-shape draw:style-name="gr387" draw:text-style-name="P39" draw:layer="layout" svg:width="5cm" svg:height="0.5cm" svg:x="51cm" svg:y="11cm">
            <text:p/>
            <draw:enhanced-geometry svg:viewBox="0 0 21600 21600" draw:type="rectangle" draw:enhanced-path="M 0 0 L 21600 0 21600 21600 0 21600 0 0 Z N"/>
          </draw:custom-shape>
          <draw:custom-shape draw:style-name="gr388" draw:text-style-name="P39" draw:layer="layout" svg:width="1cm" svg:height="0.5cm" svg:x="48cm" svg:y="11cm">
            <text:p/>
            <draw:enhanced-geometry svg:viewBox="0 0 21600 21600" draw:type="rectangle" draw:enhanced-path="M 0 0 L 21600 0 21600 21600 0 21600 0 0 Z N"/>
          </draw:custom-shape>
          <draw:custom-shape draw:style-name="gr471" draw:text-style-name="P38" draw:layer="layout" svg:width="2cm" svg:height="0.5cm" svg:x="49cm" svg:y="11.5cm">
            <text:p/>
            <draw:enhanced-geometry svg:viewBox="0 0 21600 21600" draw:type="rectangle" draw:enhanced-path="M 0 0 L 21600 0 21600 21600 0 21600 0 0 Z N"/>
          </draw:custom-shape>
          <draw:custom-shape draw:style-name="gr387" draw:text-style-name="P39" draw:layer="layout" svg:width="5cm" svg:height="0.5cm" svg:x="51cm" svg:y="11.5cm">
            <text:p/>
            <draw:enhanced-geometry svg:viewBox="0 0 21600 21600" draw:type="rectangle" draw:enhanced-path="M 0 0 L 21600 0 21600 21600 0 21600 0 0 Z N"/>
          </draw:custom-shape>
          <draw:custom-shape draw:style-name="gr388" draw:text-style-name="P39" draw:layer="layout" svg:width="1cm" svg:height="0.5cm" svg:x="48cm" svg:y="11.5cm">
            <text:p/>
            <draw:enhanced-geometry svg:viewBox="0 0 21600 21600" draw:type="rectangle" draw:enhanced-path="M 0 0 L 21600 0 21600 21600 0 21600 0 0 Z N"/>
          </draw:custom-shape>
          <draw:custom-shape draw:style-name="gr472" draw:text-style-name="P41" draw:layer="layout" svg:width="2cm" svg:height="0.5cm" svg:x="49cm" svg:y="12cm">
            <text:p/>
            <draw:enhanced-geometry svg:viewBox="0 0 21600 21600" draw:type="rectangle" draw:enhanced-path="M 0 0 L 21600 0 21600 21600 0 21600 0 0 Z N"/>
          </draw:custom-shape>
          <draw:custom-shape draw:style-name="gr394" draw:text-style-name="P36" draw:layer="layout" svg:width="5cm" svg:height="0.5cm" svg:x="51cm" svg:y="12cm">
            <text:p/>
            <draw:enhanced-geometry svg:viewBox="0 0 21600 21600" draw:type="rectangle" draw:enhanced-path="M 0 0 L 21600 0 21600 21600 0 21600 0 0 Z N"/>
          </draw:custom-shape>
          <draw:custom-shape draw:style-name="gr395" draw:text-style-name="P36" draw:layer="layout" svg:width="1cm" svg:height="0.5cm" svg:x="48cm" svg:y="12cm">
            <text:p/>
            <draw:enhanced-geometry svg:viewBox="0 0 21600 21600" draw:type="rectangle" draw:enhanced-path="M 0 0 L 21600 0 21600 21600 0 21600 0 0 Z N"/>
          </draw:custom-shape>
          <draw:custom-shape draw:style-name="gr473" draw:text-style-name="P38" draw:layer="layout" svg:width="2cm" svg:height="0.5cm" svg:x="49cm" svg:y="13cm">
            <text:p/>
            <draw:enhanced-geometry svg:viewBox="0 0 21600 21600" draw:type="rectangle" draw:enhanced-path="M 0 0 L 21600 0 21600 21600 0 21600 0 0 Z N"/>
          </draw:custom-shape>
          <draw:custom-shape draw:style-name="gr387" draw:text-style-name="P39" draw:layer="layout" svg:width="5cm" svg:height="0.5cm" svg:x="51cm" svg:y="13cm">
            <text:p/>
            <draw:enhanced-geometry svg:viewBox="0 0 21600 21600" draw:type="rectangle" draw:enhanced-path="M 0 0 L 21600 0 21600 21600 0 21600 0 0 Z N"/>
          </draw:custom-shape>
          <draw:custom-shape draw:style-name="gr388" draw:text-style-name="P39" draw:layer="layout" svg:width="1cm" svg:height="0.5cm" svg:x="48cm" svg:y="13cm">
            <text:p/>
            <draw:enhanced-geometry svg:viewBox="0 0 21600 21600" draw:type="rectangle" draw:enhanced-path="M 0 0 L 21600 0 21600 21600 0 21600 0 0 Z N"/>
          </draw:custom-shape>
          <draw:custom-shape draw:style-name="gr474" draw:text-style-name="P38" draw:layer="layout" svg:width="2cm" svg:height="0.5cm" svg:x="49cm" svg:y="13.5cm">
            <text:p/>
            <draw:enhanced-geometry svg:viewBox="0 0 21600 21600" draw:type="rectangle" draw:enhanced-path="M 0 0 L 21600 0 21600 21600 0 21600 0 0 Z N"/>
          </draw:custom-shape>
          <draw:custom-shape draw:style-name="gr387" draw:text-style-name="P39" draw:layer="layout" svg:width="5cm" svg:height="0.5cm" svg:x="51cm" svg:y="13.5cm">
            <text:p/>
            <draw:enhanced-geometry svg:viewBox="0 0 21600 21600" draw:type="rectangle" draw:enhanced-path="M 0 0 L 21600 0 21600 21600 0 21600 0 0 Z N"/>
          </draw:custom-shape>
          <draw:custom-shape draw:style-name="gr388" draw:text-style-name="P39" draw:layer="layout" svg:width="1cm" svg:height="0.5cm" svg:x="48cm" svg:y="13.5cm">
            <text:p/>
            <draw:enhanced-geometry svg:viewBox="0 0 21600 21600" draw:type="rectangle" draw:enhanced-path="M 0 0 L 21600 0 21600 21600 0 21600 0 0 Z N"/>
          </draw:custom-shape>
          <draw:custom-shape draw:style-name="gr475" draw:text-style-name="P38" draw:layer="layout" svg:width="2cm" svg:height="0.5cm" svg:x="49cm" svg:y="14cm">
            <text:p/>
            <draw:enhanced-geometry svg:viewBox="0 0 21600 21600" draw:type="rectangle" draw:enhanced-path="M 0 0 L 21600 0 21600 21600 0 21600 0 0 Z N"/>
          </draw:custom-shape>
          <draw:custom-shape draw:style-name="gr387" draw:text-style-name="P39" draw:layer="layout" svg:width="5cm" svg:height="0.5cm" svg:x="51cm" svg:y="14cm">
            <text:p/>
            <draw:enhanced-geometry svg:viewBox="0 0 21600 21600" draw:type="rectangle" draw:enhanced-path="M 0 0 L 21600 0 21600 21600 0 21600 0 0 Z N"/>
          </draw:custom-shape>
          <draw:custom-shape draw:style-name="gr388" draw:text-style-name="P39" draw:layer="layout" svg:width="1cm" svg:height="0.5cm" svg:x="48cm" svg:y="14cm">
            <text:p/>
            <draw:enhanced-geometry svg:viewBox="0 0 21600 21600" draw:type="rectangle" draw:enhanced-path="M 0 0 L 21600 0 21600 21600 0 21600 0 0 Z N"/>
          </draw:custom-shape>
          <draw:custom-shape draw:style-name="gr476" draw:text-style-name="P38" draw:layer="layout" svg:width="2cm" svg:height="0.5cm" svg:x="49cm" svg:y="14.5cm">
            <text:p/>
            <draw:enhanced-geometry svg:viewBox="0 0 21600 21600" draw:type="rectangle" draw:enhanced-path="M 0 0 L 21600 0 21600 21600 0 21600 0 0 Z N"/>
          </draw:custom-shape>
          <draw:custom-shape draw:style-name="gr387" draw:text-style-name="P39" draw:layer="layout" svg:width="5cm" svg:height="0.5cm" svg:x="51cm" svg:y="14.5cm">
            <text:p/>
            <draw:enhanced-geometry svg:viewBox="0 0 21600 21600" draw:type="rectangle" draw:enhanced-path="M 0 0 L 21600 0 21600 21600 0 21600 0 0 Z N"/>
          </draw:custom-shape>
          <draw:custom-shape draw:style-name="gr388" draw:text-style-name="P39" draw:layer="layout" svg:width="1cm" svg:height="0.5cm" svg:x="48cm" svg:y="14.5cm">
            <text:p/>
            <draw:enhanced-geometry svg:viewBox="0 0 21600 21600" draw:type="rectangle" draw:enhanced-path="M 0 0 L 21600 0 21600 21600 0 21600 0 0 Z N"/>
          </draw:custom-shape>
          <draw:custom-shape draw:style-name="gr477" draw:text-style-name="P38" draw:layer="layout" svg:width="2cm" svg:height="0.5cm" svg:x="49cm" svg:y="15cm">
            <text:p/>
            <draw:enhanced-geometry svg:viewBox="0 0 21600 21600" draw:type="rectangle" draw:enhanced-path="M 0 0 L 21600 0 21600 21600 0 21600 0 0 Z N"/>
          </draw:custom-shape>
          <draw:custom-shape draw:style-name="gr387" draw:text-style-name="P39" draw:layer="layout" svg:width="5cm" svg:height="0.5cm" svg:x="51cm" svg:y="15cm">
            <text:p/>
            <draw:enhanced-geometry svg:viewBox="0 0 21600 21600" draw:type="rectangle" draw:enhanced-path="M 0 0 L 21600 0 21600 21600 0 21600 0 0 Z N"/>
          </draw:custom-shape>
          <draw:custom-shape draw:style-name="gr388" draw:text-style-name="P39" draw:layer="layout" svg:width="1cm" svg:height="0.5cm" svg:x="48cm" svg:y="15cm">
            <text:p/>
            <draw:enhanced-geometry svg:viewBox="0 0 21600 21600" draw:type="rectangle" draw:enhanced-path="M 0 0 L 21600 0 21600 21600 0 21600 0 0 Z N"/>
          </draw:custom-shape>
          <draw:custom-shape draw:style-name="gr478" draw:text-style-name="P38" draw:layer="layout" svg:width="2cm" svg:height="0.5cm" svg:x="49cm" svg:y="15.5cm">
            <text:p/>
            <draw:enhanced-geometry svg:viewBox="0 0 21600 21600" draw:type="rectangle" draw:enhanced-path="M 0 0 L 21600 0 21600 21600 0 21600 0 0 Z N"/>
          </draw:custom-shape>
          <draw:custom-shape draw:style-name="gr387" draw:text-style-name="P39" draw:layer="layout" svg:width="5cm" svg:height="0.5cm" svg:x="51cm" svg:y="15.5cm">
            <text:p/>
            <draw:enhanced-geometry svg:viewBox="0 0 21600 21600" draw:type="rectangle" draw:enhanced-path="M 0 0 L 21600 0 21600 21600 0 21600 0 0 Z N"/>
          </draw:custom-shape>
          <draw:custom-shape draw:style-name="gr388" draw:text-style-name="P39" draw:layer="layout" svg:width="1cm" svg:height="0.5cm" svg:x="48cm" svg:y="15.5cm">
            <text:p/>
            <draw:enhanced-geometry svg:viewBox="0 0 21600 21600" draw:type="rectangle" draw:enhanced-path="M 0 0 L 21600 0 21600 21600 0 21600 0 0 Z N"/>
          </draw:custom-shape>
          <draw:frame draw:style-name="gr389" draw:text-style-name="P40" draw:layer="layout" svg:width="0.183cm" svg:height="0.57cm" svg:x="46.749cm" svg:y="10cm">
            <draw:text-box>
              <text:p><text:span text:style-name="T10">1</text:span></text:p>
            </draw:text-box>
          </draw:frame>
          <draw:frame draw:style-name="gr389" draw:text-style-name="P40" draw:layer="layout" svg:width="0.882cm" svg:height="0.57cm" svg:x="46.3cm" svg:y="15.4cm">
            <draw:text-box>
              <text:p><text:span text:style-name="T10">31</text:span></text:p>
            </draw:text-box>
          </draw:frame>
          <draw:frame draw:style-name="gr389" draw:text-style-name="P40" draw:layer="layout" svg:width="0.882cm" svg:height="0.57cm" svg:x="46.3cm" svg:y="15cm">
            <draw:text-box>
              <text:p><text:span text:style-name="T10">30</text:span></text:p>
            </draw:text-box>
          </draw:frame>
          <draw:frame draw:style-name="gr389" draw:text-style-name="P40" draw:layer="layout" svg:width="0.882cm" svg:height="0.57cm" svg:x="46.3cm" svg:y="14.5cm">
            <draw:text-box>
              <text:p><text:span text:style-name="T10">29</text:span></text:p>
            </draw:text-box>
          </draw:frame>
          <draw:frame draw:style-name="gr389" draw:text-style-name="P40" draw:layer="layout" svg:width="0.882cm" svg:height="0.57cm" svg:x="46.3cm" svg:y="14.1cm">
            <draw:text-box>
              <text:p><text:span text:style-name="T10">28</text:span></text:p>
            </draw:text-box>
          </draw:frame>
          <draw:frame draw:style-name="gr389" draw:text-style-name="P40" draw:layer="layout" svg:width="0.183cm" svg:height="0.57cm" svg:x="46.749cm" svg:y="10.4cm">
            <draw:text-box>
              <text:p><text:span text:style-name="T10">2</text:span></text:p>
            </draw:text-box>
          </draw:frame>
          <draw:frame draw:style-name="gr389" draw:text-style-name="P40" draw:layer="layout" svg:width="0.281cm" svg:height="0.57cm" svg:x="46.7cm" svg:y="10.93cm">
            <draw:text-box>
              <text:p><text:span text:style-name="T10">3</text:span></text:p>
            </draw:text-box>
          </draw:frame>
          <draw:frame draw:style-name="gr389" draw:text-style-name="P40" draw:layer="layout" svg:width="0.281cm" svg:height="0.57cm" svg:x="46.7cm" svg:y="11.43cm">
            <draw:text-box>
              <text:p><text:span text:style-name="T10">4</text:span></text:p>
            </draw:text-box>
          </draw:frame>
          <draw:frame draw:style-name="gr389" draw:text-style-name="P40" draw:layer="layout" svg:width="1.383cm" svg:height="0.57cm" svg:x="46.301cm" svg:y="9.4cm">
            <draw:text-box>
              <text:p><text:span text:style-name="T10">Index</text:span></text:p>
            </draw:text-box>
          </draw:frame>
          <draw:line draw:style-name="gr146" draw:text-style-name="P4" draw:layer="layout" svg:x1="46cm" svg:y1="12.3cm" svg:x2="48cm" svg:y2="12.3cm">
            <text:p/>
          </draw:line>
          <draw:line draw:style-name="gr38" draw:text-style-name="P4" draw:layer="layout" svg:x1="46cm" svg:y1="9cm" svg:x2="46cm" svg:y2="12.3cm">
            <text:p/>
          </draw:line>
          <draw:custom-shape draw:style-name="gr402" draw:text-style-name="P28" draw:layer="layout" svg:width="1cm" svg:height="1cm" svg:x="49cm" svg:y="17cm">
            <text:p text:style-name="P1">=</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66">
            <draw:glue-point draw:id="4" svg:x="0cm" svg:y="5cm"/>
            <draw:glue-point draw:id="5" svg:x="2.5cm" svg:y="-5cm"/>
            <draw:glue-point draw:id="6" svg:x="-2.5cm" svg:y="-5cm"/>
            <draw:rect draw:style-name="gr479" draw:text-style-name="P16" draw:layer="layout" svg:width="1cm" svg:height="1cm" draw:transform="rotate (-1.5707963267949) translate (49.5cm 19.5cm)">
              <text:p text:style-name="P15"><text:span text:style-name="T4">&amp;</text:span></text:p>
            </draw:rect>
            <draw:line draw:style-name="gr480" draw:text-style-name="P17" draw:layer="layout" svg:x1="49.25cm" svg:y1="19cm" svg:x2="49.25cm" svg:y2="19.5cm">
              <text:p/>
            </draw:line>
            <draw:line draw:style-name="gr481" draw:text-style-name="P17" draw:layer="layout" svg:x1="48.75cm" svg:y1="19cm" svg:x2="48.75cm" svg:y2="19.5cm">
              <text:p/>
            </draw:line>
            <draw:line draw:style-name="gr482" draw:text-style-name="P17" draw:layer="layout" svg:x1="49cm" svg:y1="20.5cm" svg:x2="49cm" svg:y2="21cm">
              <text:p/>
            </draw:line>
          </draw:g>
          <draw:g draw:style-name="gr66">
            <draw:glue-point draw:id="4" svg:x="3cm" svg:y="-5cm"/>
            <draw:glue-point draw:id="5" svg:x="1cm" svg:y="-5cm"/>
            <draw:glue-point draw:id="6" svg:x="-1cm" svg:y="-5cm"/>
            <draw:glue-point draw:id="7" svg:x="-3cm" svg:y="-5cm"/>
            <draw:rect draw:style-name="gr483" draw:text-style-name="P16" draw:layer="layout" svg:width="1cm" svg:height="2cm" draw:transform="rotate (-1.5707963267949) translate (50.6cm 22cm)">
              <text:p text:style-name="P15"><text:span text:style-name="T11">≥</text:span><text:span text:style-name="T11">1</text:span></text:p>
            </draw:rect>
            <draw:line draw:style-name="gr484" draw:text-style-name="P17" draw:layer="layout" svg:x1="50.2cm" svg:y1="21.5cm" svg:x2="50.2cm" svg:y2="22cm">
              <text:p/>
            </draw:line>
            <draw:line draw:style-name="gr485" draw:text-style-name="P17" draw:layer="layout" svg:x1="49.4cm" svg:y1="21.5cm" svg:x2="49.4cm" svg:y2="22cm">
              <text:p/>
            </draw:line>
            <draw:line draw:style-name="gr486" draw:text-style-name="P21" draw:layer="layout" svg:x1="49.8cm" svg:y1="21.5cm" svg:x2="49.8cm" svg:y2="22cm">
              <text:p/>
            </draw:line>
            <draw:line draw:style-name="gr487" draw:text-style-name="P21" draw:layer="layout" svg:x1="49cm" svg:y1="21.5cm" svg:x2="49cm" svg:y2="22cm">
              <text:p/>
            </draw:line>
            <draw:line draw:style-name="gr488" draw:text-style-name="P21" draw:layer="layout" svg:x1="49.6cm" svg:y1="23cm" svg:x2="49.6cm" svg:y2="23.5cm">
              <text:p/>
            </draw:line>
          </draw:g>
          <draw:line draw:style-name="gr413" draw:text-style-name="P4" draw:layer="layout" svg:x1="49.5cm" svg:y1="12.3cm" svg:x2="49.5cm" svg:y2="17cm">
            <text:p/>
          </draw:line>
          <draw:line draw:style-name="gr146" draw:text-style-name="P4" draw:layer="layout" svg:x1="45cm" svg:y1="17.5cm" svg:x2="49cm" svg:y2="17.5cm">
            <text:p/>
          </draw:line>
          <draw:line draw:style-name="gr38" draw:text-style-name="P4" draw:layer="layout" svg:x1="49.25cm" svg:y1="19cm" svg:x2="49.5cm" svg:y2="19cm">
            <text:p/>
          </draw:line>
          <draw:line draw:style-name="gr38" draw:text-style-name="P4" draw:layer="layout" svg:x1="49.5cm" svg:y1="18cm" svg:x2="49.5cm" svg:y2="19cm">
            <text:p/>
          </draw:line>
          <draw:line draw:style-name="gr38" draw:text-style-name="P4" draw:layer="layout" svg:x1="48.75cm" svg:y1="19cm" svg:x2="48.5cm" svg:y2="19cm">
            <text:p/>
          </draw:line>
          <draw:line draw:style-name="gr414" draw:text-style-name="P4" draw:layer="layout" svg:x1="48.5cm" svg:y1="12.3cm" svg:x2="48.5cm" svg:y2="19cm">
            <text:p/>
          </draw:line>
          <draw:custom-shape draw:style-name="gr415" draw:text-style-name="P42" draw:layer="layout" svg:width="2cm" svg:height="1cm" svg:x="77cm" svg:y="20.6cm">
            <text:p text:style-name="P35"><text:span text:style-name="T10">Encode</text:span></text:p>
            <draw:enhanced-geometry svg:viewBox="0 0 21600 21600" draw:type="rectangle" draw:enhanced-path="M 0 0 L 21600 0 21600 21600 0 21600 0 0 Z N"/>
          </draw:custom-shape>
          <draw:line draw:style-name="gr146" draw:text-style-name="P4" draw:layer="layout" svg:x1="81cm" svg:y1="19.5cm" svg:x2="81cm" svg:y2="20.6cm">
            <text:p/>
          </draw:line>
          <draw:line draw:style-name="gr146" draw:text-style-name="P4" draw:layer="layout" svg:x1="81.5cm" svg:y1="19cm" svg:x2="81.5cm" svg:y2="20.6cm">
            <text:p/>
          </draw:line>
          <draw:line draw:style-name="gr146" draw:text-style-name="P4" draw:layer="layout" svg:x1="82cm" svg:y1="18.5cm" svg:x2="82cm" svg:y2="20.6cm">
            <text:p/>
          </draw:line>
          <draw:polygon draw:style-name="gr155" draw:text-style-name="P14" draw:layer="layout" svg:width="2.499cm" svg:height="0.999cm" svg:x="80.5cm" svg:y="20.6cm" svg:viewBox="0 0 2500 1000" draw:points="2500,0 0,0 500,1000 2000,1000">
            <text:p/>
          </draw:polygon>
          <draw:custom-shape draw:style-name="gr489" draw:text-style-name="P38" draw:layer="layout" svg:width="2cm" svg:height="0.5cm" svg:x="58cm" svg:y="10cm">
            <text:p/>
            <draw:enhanced-geometry svg:viewBox="0 0 21600 21600" draw:type="rectangle" draw:enhanced-path="M 0 0 L 21600 0 21600 21600 0 21600 0 0 Z N"/>
          </draw:custom-shape>
          <draw:custom-shape draw:style-name="gr387" draw:text-style-name="P39" draw:layer="layout" svg:width="5cm" svg:height="0.5cm" svg:x="60cm" svg:y="10cm">
            <text:p/>
            <draw:enhanced-geometry svg:viewBox="0 0 21600 21600" draw:type="rectangle" draw:enhanced-path="M 0 0 L 21600 0 21600 21600 0 21600 0 0 Z N"/>
          </draw:custom-shape>
          <draw:custom-shape draw:style-name="gr388" draw:text-style-name="P39" draw:layer="layout" svg:width="1cm" svg:height="0.5cm" svg:x="57cm" svg:y="10cm">
            <text:p/>
            <draw:enhanced-geometry svg:viewBox="0 0 21600 21600" draw:type="rectangle" draw:enhanced-path="M 0 0 L 21600 0 21600 21600 0 21600 0 0 Z N"/>
          </draw:custom-shape>
          <draw:frame draw:style-name="gr389" draw:text-style-name="P40" draw:layer="layout" svg:width="1.383cm" svg:height="0.57cm" svg:x="56.6cm" svg:y="9.4cm">
            <draw:text-box>
              <text:p><text:span text:style-name="T10">V_1 bit</text:span></text:p>
            </draw:text-box>
          </draw:frame>
          <draw:frame draw:style-name="gr389" draw:text-style-name="P40" draw:layer="layout" svg:width="1.95cm" svg:height="0.57cm" svg:x="58.05cm" svg:y="9.4cm">
            <draw:text-box>
              <text:p><text:span text:style-name="T10">Tag_22 bits</text:span></text:p>
            </draw:text-box>
          </draw:frame>
          <draw:frame draw:style-name="gr389" draw:text-style-name="P40" draw:layer="layout" svg:width="2.331cm" svg:height="0.57cm" svg:x="60cm" svg:y="9.4cm">
            <draw:text-box>
              <text:p><text:span text:style-name="T10">Data_32 bytes</text:span></text:p>
            </draw:text-box>
          </draw:frame>
          <draw:custom-shape draw:style-name="gr490" draw:text-style-name="P38" draw:layer="layout" svg:width="2cm" svg:height="0.5cm" svg:x="58cm" svg:y="10.5cm">
            <text:p/>
            <draw:enhanced-geometry svg:viewBox="0 0 21600 21600" draw:type="rectangle" draw:enhanced-path="M 0 0 L 21600 0 21600 21600 0 21600 0 0 Z N"/>
          </draw:custom-shape>
          <draw:custom-shape draw:style-name="gr387" draw:text-style-name="P39" draw:layer="layout" svg:width="5cm" svg:height="0.5cm" svg:x="60cm" svg:y="10.5cm">
            <text:p/>
            <draw:enhanced-geometry svg:viewBox="0 0 21600 21600" draw:type="rectangle" draw:enhanced-path="M 0 0 L 21600 0 21600 21600 0 21600 0 0 Z N"/>
          </draw:custom-shape>
          <draw:custom-shape draw:style-name="gr388" draw:text-style-name="P39" draw:layer="layout" svg:width="1cm" svg:height="0.5cm" svg:x="57cm" svg:y="10.5cm">
            <text:p/>
            <draw:enhanced-geometry svg:viewBox="0 0 21600 21600" draw:type="rectangle" draw:enhanced-path="M 0 0 L 21600 0 21600 21600 0 21600 0 0 Z N"/>
          </draw:custom-shape>
          <draw:custom-shape draw:style-name="gr491" draw:text-style-name="P38" draw:layer="layout" svg:width="2cm" svg:height="0.5cm" svg:x="58cm" svg:y="11cm">
            <text:p/>
            <draw:enhanced-geometry svg:viewBox="0 0 21600 21600" draw:type="rectangle" draw:enhanced-path="M 0 0 L 21600 0 21600 21600 0 21600 0 0 Z N"/>
          </draw:custom-shape>
          <draw:custom-shape draw:style-name="gr387" draw:text-style-name="P39" draw:layer="layout" svg:width="5cm" svg:height="0.5cm" svg:x="60cm" svg:y="11cm">
            <text:p/>
            <draw:enhanced-geometry svg:viewBox="0 0 21600 21600" draw:type="rectangle" draw:enhanced-path="M 0 0 L 21600 0 21600 21600 0 21600 0 0 Z N"/>
          </draw:custom-shape>
          <draw:custom-shape draw:style-name="gr388" draw:text-style-name="P39" draw:layer="layout" svg:width="1cm" svg:height="0.5cm" svg:x="57cm" svg:y="11cm">
            <text:p/>
            <draw:enhanced-geometry svg:viewBox="0 0 21600 21600" draw:type="rectangle" draw:enhanced-path="M 0 0 L 21600 0 21600 21600 0 21600 0 0 Z N"/>
          </draw:custom-shape>
          <draw:custom-shape draw:style-name="gr492" draw:text-style-name="P38" draw:layer="layout" svg:width="2cm" svg:height="0.5cm" svg:x="58cm" svg:y="11.5cm">
            <text:p/>
            <draw:enhanced-geometry svg:viewBox="0 0 21600 21600" draw:type="rectangle" draw:enhanced-path="M 0 0 L 21600 0 21600 21600 0 21600 0 0 Z N"/>
          </draw:custom-shape>
          <draw:custom-shape draw:style-name="gr387" draw:text-style-name="P39" draw:layer="layout" svg:width="5cm" svg:height="0.5cm" svg:x="60cm" svg:y="11.5cm">
            <text:p/>
            <draw:enhanced-geometry svg:viewBox="0 0 21600 21600" draw:type="rectangle" draw:enhanced-path="M 0 0 L 21600 0 21600 21600 0 21600 0 0 Z N"/>
          </draw:custom-shape>
          <draw:custom-shape draw:style-name="gr388" draw:text-style-name="P39" draw:layer="layout" svg:width="1cm" svg:height="0.5cm" svg:x="57cm" svg:y="11.5cm">
            <text:p/>
            <draw:enhanced-geometry svg:viewBox="0 0 21600 21600" draw:type="rectangle" draw:enhanced-path="M 0 0 L 21600 0 21600 21600 0 21600 0 0 Z N"/>
          </draw:custom-shape>
          <draw:custom-shape draw:style-name="gr493" draw:text-style-name="P41" draw:layer="layout" svg:width="2cm" svg:height="0.5cm" svg:x="58cm" svg:y="12cm">
            <text:p/>
            <draw:enhanced-geometry svg:viewBox="0 0 21600 21600" draw:type="rectangle" draw:enhanced-path="M 0 0 L 21600 0 21600 21600 0 21600 0 0 Z N"/>
          </draw:custom-shape>
          <draw:custom-shape draw:style-name="gr394" draw:text-style-name="P36" draw:layer="layout" svg:width="5cm" svg:height="0.5cm" svg:x="60cm" svg:y="12cm">
            <text:p/>
            <draw:enhanced-geometry svg:viewBox="0 0 21600 21600" draw:type="rectangle" draw:enhanced-path="M 0 0 L 21600 0 21600 21600 0 21600 0 0 Z N"/>
          </draw:custom-shape>
          <draw:custom-shape draw:style-name="gr395" draw:text-style-name="P36" draw:layer="layout" svg:width="1cm" svg:height="0.5cm" svg:x="57cm" svg:y="12cm">
            <text:p/>
            <draw:enhanced-geometry svg:viewBox="0 0 21600 21600" draw:type="rectangle" draw:enhanced-path="M 0 0 L 21600 0 21600 21600 0 21600 0 0 Z N"/>
          </draw:custom-shape>
          <draw:custom-shape draw:style-name="gr494" draw:text-style-name="P38" draw:layer="layout" svg:width="2cm" svg:height="0.5cm" svg:x="58cm" svg:y="13cm">
            <text:p/>
            <draw:enhanced-geometry svg:viewBox="0 0 21600 21600" draw:type="rectangle" draw:enhanced-path="M 0 0 L 21600 0 21600 21600 0 21600 0 0 Z N"/>
          </draw:custom-shape>
          <draw:custom-shape draw:style-name="gr387" draw:text-style-name="P39" draw:layer="layout" svg:width="5cm" svg:height="0.5cm" svg:x="60cm" svg:y="13cm">
            <text:p/>
            <draw:enhanced-geometry svg:viewBox="0 0 21600 21600" draw:type="rectangle" draw:enhanced-path="M 0 0 L 21600 0 21600 21600 0 21600 0 0 Z N"/>
          </draw:custom-shape>
          <draw:custom-shape draw:style-name="gr388" draw:text-style-name="P39" draw:layer="layout" svg:width="1cm" svg:height="0.5cm" svg:x="57cm" svg:y="13cm">
            <text:p/>
            <draw:enhanced-geometry svg:viewBox="0 0 21600 21600" draw:type="rectangle" draw:enhanced-path="M 0 0 L 21600 0 21600 21600 0 21600 0 0 Z N"/>
          </draw:custom-shape>
          <draw:custom-shape draw:style-name="gr495" draw:text-style-name="P38" draw:layer="layout" svg:width="2cm" svg:height="0.5cm" svg:x="58cm" svg:y="13.5cm">
            <text:p/>
            <draw:enhanced-geometry svg:viewBox="0 0 21600 21600" draw:type="rectangle" draw:enhanced-path="M 0 0 L 21600 0 21600 21600 0 21600 0 0 Z N"/>
          </draw:custom-shape>
          <draw:custom-shape draw:style-name="gr387" draw:text-style-name="P39" draw:layer="layout" svg:width="5cm" svg:height="0.5cm" svg:x="60cm" svg:y="13.5cm">
            <text:p/>
            <draw:enhanced-geometry svg:viewBox="0 0 21600 21600" draw:type="rectangle" draw:enhanced-path="M 0 0 L 21600 0 21600 21600 0 21600 0 0 Z N"/>
          </draw:custom-shape>
          <draw:custom-shape draw:style-name="gr388" draw:text-style-name="P39" draw:layer="layout" svg:width="1cm" svg:height="0.5cm" svg:x="57cm" svg:y="13.5cm">
            <text:p/>
            <draw:enhanced-geometry svg:viewBox="0 0 21600 21600" draw:type="rectangle" draw:enhanced-path="M 0 0 L 21600 0 21600 21600 0 21600 0 0 Z N"/>
          </draw:custom-shape>
          <draw:custom-shape draw:style-name="gr496" draw:text-style-name="P38" draw:layer="layout" svg:width="2cm" svg:height="0.5cm" svg:x="58cm" svg:y="14cm">
            <text:p/>
            <draw:enhanced-geometry svg:viewBox="0 0 21600 21600" draw:type="rectangle" draw:enhanced-path="M 0 0 L 21600 0 21600 21600 0 21600 0 0 Z N"/>
          </draw:custom-shape>
          <draw:custom-shape draw:style-name="gr387" draw:text-style-name="P39" draw:layer="layout" svg:width="5cm" svg:height="0.5cm" svg:x="60cm" svg:y="14cm">
            <text:p/>
            <draw:enhanced-geometry svg:viewBox="0 0 21600 21600" draw:type="rectangle" draw:enhanced-path="M 0 0 L 21600 0 21600 21600 0 21600 0 0 Z N"/>
          </draw:custom-shape>
          <draw:custom-shape draw:style-name="gr388" draw:text-style-name="P39" draw:layer="layout" svg:width="1cm" svg:height="0.5cm" svg:x="57cm" svg:y="14cm">
            <text:p/>
            <draw:enhanced-geometry svg:viewBox="0 0 21600 21600" draw:type="rectangle" draw:enhanced-path="M 0 0 L 21600 0 21600 21600 0 21600 0 0 Z N"/>
          </draw:custom-shape>
          <draw:custom-shape draw:style-name="gr497" draw:text-style-name="P38" draw:layer="layout" svg:width="2cm" svg:height="0.5cm" svg:x="58cm" svg:y="14.5cm">
            <text:p/>
            <draw:enhanced-geometry svg:viewBox="0 0 21600 21600" draw:type="rectangle" draw:enhanced-path="M 0 0 L 21600 0 21600 21600 0 21600 0 0 Z N"/>
          </draw:custom-shape>
          <draw:custom-shape draw:style-name="gr387" draw:text-style-name="P39" draw:layer="layout" svg:width="5cm" svg:height="0.5cm" svg:x="60cm" svg:y="14.5cm">
            <text:p/>
            <draw:enhanced-geometry svg:viewBox="0 0 21600 21600" draw:type="rectangle" draw:enhanced-path="M 0 0 L 21600 0 21600 21600 0 21600 0 0 Z N"/>
          </draw:custom-shape>
          <draw:custom-shape draw:style-name="gr388" draw:text-style-name="P39" draw:layer="layout" svg:width="1cm" svg:height="0.5cm" svg:x="57cm" svg:y="14.5cm">
            <text:p/>
            <draw:enhanced-geometry svg:viewBox="0 0 21600 21600" draw:type="rectangle" draw:enhanced-path="M 0 0 L 21600 0 21600 21600 0 21600 0 0 Z N"/>
          </draw:custom-shape>
          <draw:custom-shape draw:style-name="gr498" draw:text-style-name="P38" draw:layer="layout" svg:width="2cm" svg:height="0.5cm" svg:x="58cm" svg:y="15cm">
            <text:p/>
            <draw:enhanced-geometry svg:viewBox="0 0 21600 21600" draw:type="rectangle" draw:enhanced-path="M 0 0 L 21600 0 21600 21600 0 21600 0 0 Z N"/>
          </draw:custom-shape>
          <draw:custom-shape draw:style-name="gr387" draw:text-style-name="P39" draw:layer="layout" svg:width="5cm" svg:height="0.5cm" svg:x="60cm" svg:y="15cm">
            <text:p/>
            <draw:enhanced-geometry svg:viewBox="0 0 21600 21600" draw:type="rectangle" draw:enhanced-path="M 0 0 L 21600 0 21600 21600 0 21600 0 0 Z N"/>
          </draw:custom-shape>
          <draw:custom-shape draw:style-name="gr388" draw:text-style-name="P39" draw:layer="layout" svg:width="1cm" svg:height="0.5cm" svg:x="57cm" svg:y="15cm">
            <text:p/>
            <draw:enhanced-geometry svg:viewBox="0 0 21600 21600" draw:type="rectangle" draw:enhanced-path="M 0 0 L 21600 0 21600 21600 0 21600 0 0 Z N"/>
          </draw:custom-shape>
          <draw:custom-shape draw:style-name="gr499" draw:text-style-name="P38" draw:layer="layout" svg:width="2cm" svg:height="0.5cm" svg:x="58cm" svg:y="15.5cm">
            <text:p/>
            <draw:enhanced-geometry svg:viewBox="0 0 21600 21600" draw:type="rectangle" draw:enhanced-path="M 0 0 L 21600 0 21600 21600 0 21600 0 0 Z N"/>
          </draw:custom-shape>
          <draw:custom-shape draw:style-name="gr387" draw:text-style-name="P39" draw:layer="layout" svg:width="5cm" svg:height="0.5cm" svg:x="60cm" svg:y="15.5cm">
            <text:p/>
            <draw:enhanced-geometry svg:viewBox="0 0 21600 21600" draw:type="rectangle" draw:enhanced-path="M 0 0 L 21600 0 21600 21600 0 21600 0 0 Z N"/>
          </draw:custom-shape>
          <draw:custom-shape draw:style-name="gr388" draw:text-style-name="P39" draw:layer="layout" svg:width="1cm" svg:height="0.5cm" svg:x="57cm" svg:y="15.5cm">
            <text:p/>
            <draw:enhanced-geometry svg:viewBox="0 0 21600 21600" draw:type="rectangle" draw:enhanced-path="M 0 0 L 21600 0 21600 21600 0 21600 0 0 Z N"/>
          </draw:custom-shape>
          <draw:custom-shape draw:style-name="gr402" draw:text-style-name="P28" draw:layer="layout" svg:width="1cm" svg:height="1cm" svg:x="58cm" svg:y="17cm">
            <text:p text:style-name="P1">=</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66">
            <draw:glue-point draw:id="4" svg:x="0cm" svg:y="5cm"/>
            <draw:glue-point draw:id="5" svg:x="2.5cm" svg:y="-5cm"/>
            <draw:glue-point draw:id="6" svg:x="-2.5cm" svg:y="-5cm"/>
            <draw:rect draw:style-name="gr500" draw:text-style-name="P16" draw:layer="layout" svg:width="1cm" svg:height="1cm" draw:transform="rotate (-1.5707963267949) translate (58.5cm 19.5cm)">
              <text:p text:style-name="P15"><text:span text:style-name="T4">&amp;</text:span></text:p>
            </draw:rect>
            <draw:line draw:style-name="gr501" draw:text-style-name="P17" draw:layer="layout" svg:x1="58.25cm" svg:y1="19cm" svg:x2="58.25cm" svg:y2="19.5cm">
              <text:p/>
            </draw:line>
            <draw:line draw:style-name="gr502" draw:text-style-name="P17" draw:layer="layout" svg:x1="57.75cm" svg:y1="19cm" svg:x2="57.75cm" svg:y2="19.5cm">
              <text:p/>
            </draw:line>
            <draw:line draw:style-name="gr503" draw:text-style-name="P17" draw:layer="layout" svg:x1="58cm" svg:y1="20.5cm" svg:x2="58cm" svg:y2="21cm">
              <text:p/>
            </draw:line>
          </draw:g>
          <draw:line draw:style-name="gr413" draw:text-style-name="P4" draw:layer="layout" svg:x1="58.5cm" svg:y1="12.3cm" svg:x2="58.5cm" svg:y2="17cm">
            <text:p/>
          </draw:line>
          <draw:line draw:style-name="gr146" draw:text-style-name="P4" draw:layer="layout" svg:x1="57cm" svg:y1="17.5cm" svg:x2="58cm" svg:y2="17.5cm">
            <text:p/>
          </draw:line>
          <draw:line draw:style-name="gr38" draw:text-style-name="P4" draw:layer="layout" svg:x1="58.25cm" svg:y1="19cm" svg:x2="58.5cm" svg:y2="19cm">
            <text:p/>
          </draw:line>
          <draw:line draw:style-name="gr38" draw:text-style-name="P4" draw:layer="layout" svg:x1="58.5cm" svg:y1="18cm" svg:x2="58.5cm" svg:y2="19cm">
            <text:p/>
          </draw:line>
          <draw:line draw:style-name="gr38" draw:text-style-name="P4" draw:layer="layout" svg:x1="57.75cm" svg:y1="19cm" svg:x2="57.5cm" svg:y2="19cm">
            <text:p/>
          </draw:line>
          <draw:line draw:style-name="gr414" draw:text-style-name="P4" draw:layer="layout" svg:x1="57.5cm" svg:y1="12.3cm" svg:x2="57.5cm" svg:y2="19cm">
            <text:p/>
          </draw:line>
          <draw:custom-shape draw:style-name="gr504" draw:text-style-name="P38" draw:layer="layout" svg:width="2cm" svg:height="0.5cm" svg:x="67cm" svg:y="10cm">
            <text:p/>
            <draw:enhanced-geometry svg:viewBox="0 0 21600 21600" draw:type="rectangle" draw:enhanced-path="M 0 0 L 21600 0 21600 21600 0 21600 0 0 Z N"/>
          </draw:custom-shape>
          <draw:custom-shape draw:style-name="gr387" draw:text-style-name="P39" draw:layer="layout" svg:width="5cm" svg:height="0.5cm" svg:x="69cm" svg:y="10cm">
            <text:p/>
            <draw:enhanced-geometry svg:viewBox="0 0 21600 21600" draw:type="rectangle" draw:enhanced-path="M 0 0 L 21600 0 21600 21600 0 21600 0 0 Z N"/>
          </draw:custom-shape>
          <draw:custom-shape draw:style-name="gr388" draw:text-style-name="P39" draw:layer="layout" svg:width="1cm" svg:height="0.5cm" svg:x="66cm" svg:y="10cm">
            <text:p/>
            <draw:enhanced-geometry svg:viewBox="0 0 21600 21600" draw:type="rectangle" draw:enhanced-path="M 0 0 L 21600 0 21600 21600 0 21600 0 0 Z N"/>
          </draw:custom-shape>
          <draw:frame draw:style-name="gr389" draw:text-style-name="P40" draw:layer="layout" svg:width="1.383cm" svg:height="0.57cm" svg:x="65.6cm" svg:y="9.4cm">
            <draw:text-box>
              <text:p><text:span text:style-name="T10">V_1 bit</text:span></text:p>
            </draw:text-box>
          </draw:frame>
          <draw:frame draw:style-name="gr389" draw:text-style-name="P40" draw:layer="layout" svg:width="1.95cm" svg:height="0.57cm" svg:x="67.05cm" svg:y="9.4cm">
            <draw:text-box>
              <text:p><text:span text:style-name="T10">Tag_22 bits</text:span></text:p>
            </draw:text-box>
          </draw:frame>
          <draw:frame draw:style-name="gr389" draw:text-style-name="P40" draw:layer="layout" svg:width="2.331cm" svg:height="0.57cm" svg:x="69cm" svg:y="9.4cm">
            <draw:text-box>
              <text:p><text:span text:style-name="T10">Data_32 bytes</text:span></text:p>
            </draw:text-box>
          </draw:frame>
          <draw:custom-shape draw:style-name="gr505" draw:text-style-name="P38" draw:layer="layout" svg:width="2cm" svg:height="0.5cm" svg:x="67cm" svg:y="10.5cm">
            <text:p/>
            <draw:enhanced-geometry svg:viewBox="0 0 21600 21600" draw:type="rectangle" draw:enhanced-path="M 0 0 L 21600 0 21600 21600 0 21600 0 0 Z N"/>
          </draw:custom-shape>
          <draw:custom-shape draw:style-name="gr387" draw:text-style-name="P39" draw:layer="layout" svg:width="5cm" svg:height="0.5cm" svg:x="69cm" svg:y="10.5cm">
            <text:p/>
            <draw:enhanced-geometry svg:viewBox="0 0 21600 21600" draw:type="rectangle" draw:enhanced-path="M 0 0 L 21600 0 21600 21600 0 21600 0 0 Z N"/>
          </draw:custom-shape>
          <draw:custom-shape draw:style-name="gr388" draw:text-style-name="P39" draw:layer="layout" svg:width="1cm" svg:height="0.5cm" svg:x="66cm" svg:y="10.5cm">
            <text:p/>
            <draw:enhanced-geometry svg:viewBox="0 0 21600 21600" draw:type="rectangle" draw:enhanced-path="M 0 0 L 21600 0 21600 21600 0 21600 0 0 Z N"/>
          </draw:custom-shape>
          <draw:custom-shape draw:style-name="gr506" draw:text-style-name="P38" draw:layer="layout" svg:width="2cm" svg:height="0.5cm" svg:x="67cm" svg:y="11cm">
            <text:p/>
            <draw:enhanced-geometry svg:viewBox="0 0 21600 21600" draw:type="rectangle" draw:enhanced-path="M 0 0 L 21600 0 21600 21600 0 21600 0 0 Z N"/>
          </draw:custom-shape>
          <draw:custom-shape draw:style-name="gr387" draw:text-style-name="P39" draw:layer="layout" svg:width="5cm" svg:height="0.5cm" svg:x="69cm" svg:y="11cm">
            <text:p/>
            <draw:enhanced-geometry svg:viewBox="0 0 21600 21600" draw:type="rectangle" draw:enhanced-path="M 0 0 L 21600 0 21600 21600 0 21600 0 0 Z N"/>
          </draw:custom-shape>
          <draw:custom-shape draw:style-name="gr388" draw:text-style-name="P39" draw:layer="layout" svg:width="1cm" svg:height="0.5cm" svg:x="66cm" svg:y="11cm">
            <text:p/>
            <draw:enhanced-geometry svg:viewBox="0 0 21600 21600" draw:type="rectangle" draw:enhanced-path="M 0 0 L 21600 0 21600 21600 0 21600 0 0 Z N"/>
          </draw:custom-shape>
          <draw:custom-shape draw:style-name="gr507" draw:text-style-name="P38" draw:layer="layout" svg:width="2cm" svg:height="0.5cm" svg:x="67cm" svg:y="11.5cm">
            <text:p/>
            <draw:enhanced-geometry svg:viewBox="0 0 21600 21600" draw:type="rectangle" draw:enhanced-path="M 0 0 L 21600 0 21600 21600 0 21600 0 0 Z N"/>
          </draw:custom-shape>
          <draw:custom-shape draw:style-name="gr387" draw:text-style-name="P39" draw:layer="layout" svg:width="5cm" svg:height="0.5cm" svg:x="69cm" svg:y="11.5cm">
            <text:p/>
            <draw:enhanced-geometry svg:viewBox="0 0 21600 21600" draw:type="rectangle" draw:enhanced-path="M 0 0 L 21600 0 21600 21600 0 21600 0 0 Z N"/>
          </draw:custom-shape>
          <draw:custom-shape draw:style-name="gr388" draw:text-style-name="P39" draw:layer="layout" svg:width="1cm" svg:height="0.5cm" svg:x="66cm" svg:y="11.5cm">
            <text:p/>
            <draw:enhanced-geometry svg:viewBox="0 0 21600 21600" draw:type="rectangle" draw:enhanced-path="M 0 0 L 21600 0 21600 21600 0 21600 0 0 Z N"/>
          </draw:custom-shape>
          <draw:custom-shape draw:style-name="gr508" draw:text-style-name="P41" draw:layer="layout" svg:width="2cm" svg:height="0.5cm" svg:x="67cm" svg:y="12cm">
            <text:p/>
            <draw:enhanced-geometry svg:viewBox="0 0 21600 21600" draw:type="rectangle" draw:enhanced-path="M 0 0 L 21600 0 21600 21600 0 21600 0 0 Z N"/>
          </draw:custom-shape>
          <draw:custom-shape draw:style-name="gr394" draw:text-style-name="P36" draw:layer="layout" svg:width="5cm" svg:height="0.5cm" svg:x="69cm" svg:y="12cm">
            <text:p/>
            <draw:enhanced-geometry svg:viewBox="0 0 21600 21600" draw:type="rectangle" draw:enhanced-path="M 0 0 L 21600 0 21600 21600 0 21600 0 0 Z N"/>
          </draw:custom-shape>
          <draw:custom-shape draw:style-name="gr395" draw:text-style-name="P36" draw:layer="layout" svg:width="1cm" svg:height="0.5cm" svg:x="66cm" svg:y="12cm">
            <text:p/>
            <draw:enhanced-geometry svg:viewBox="0 0 21600 21600" draw:type="rectangle" draw:enhanced-path="M 0 0 L 21600 0 21600 21600 0 21600 0 0 Z N"/>
          </draw:custom-shape>
          <draw:custom-shape draw:style-name="gr509" draw:text-style-name="P38" draw:layer="layout" svg:width="2cm" svg:height="0.5cm" svg:x="67cm" svg:y="13cm">
            <text:p/>
            <draw:enhanced-geometry svg:viewBox="0 0 21600 21600" draw:type="rectangle" draw:enhanced-path="M 0 0 L 21600 0 21600 21600 0 21600 0 0 Z N"/>
          </draw:custom-shape>
          <draw:custom-shape draw:style-name="gr387" draw:text-style-name="P39" draw:layer="layout" svg:width="5cm" svg:height="0.5cm" svg:x="69cm" svg:y="13cm">
            <text:p/>
            <draw:enhanced-geometry svg:viewBox="0 0 21600 21600" draw:type="rectangle" draw:enhanced-path="M 0 0 L 21600 0 21600 21600 0 21600 0 0 Z N"/>
          </draw:custom-shape>
          <draw:custom-shape draw:style-name="gr388" draw:text-style-name="P39" draw:layer="layout" svg:width="1cm" svg:height="0.5cm" svg:x="66cm" svg:y="13cm">
            <text:p/>
            <draw:enhanced-geometry svg:viewBox="0 0 21600 21600" draw:type="rectangle" draw:enhanced-path="M 0 0 L 21600 0 21600 21600 0 21600 0 0 Z N"/>
          </draw:custom-shape>
          <draw:custom-shape draw:style-name="gr510" draw:text-style-name="P38" draw:layer="layout" svg:width="2cm" svg:height="0.5cm" svg:x="67cm" svg:y="13.5cm">
            <text:p/>
            <draw:enhanced-geometry svg:viewBox="0 0 21600 21600" draw:type="rectangle" draw:enhanced-path="M 0 0 L 21600 0 21600 21600 0 21600 0 0 Z N"/>
          </draw:custom-shape>
          <draw:custom-shape draw:style-name="gr387" draw:text-style-name="P39" draw:layer="layout" svg:width="5cm" svg:height="0.5cm" svg:x="69cm" svg:y="13.5cm">
            <text:p/>
            <draw:enhanced-geometry svg:viewBox="0 0 21600 21600" draw:type="rectangle" draw:enhanced-path="M 0 0 L 21600 0 21600 21600 0 21600 0 0 Z N"/>
          </draw:custom-shape>
          <draw:custom-shape draw:style-name="gr388" draw:text-style-name="P39" draw:layer="layout" svg:width="1cm" svg:height="0.5cm" svg:x="66cm" svg:y="13.5cm">
            <text:p/>
            <draw:enhanced-geometry svg:viewBox="0 0 21600 21600" draw:type="rectangle" draw:enhanced-path="M 0 0 L 21600 0 21600 21600 0 21600 0 0 Z N"/>
          </draw:custom-shape>
          <draw:custom-shape draw:style-name="gr511" draw:text-style-name="P38" draw:layer="layout" svg:width="2cm" svg:height="0.5cm" svg:x="67cm" svg:y="14cm">
            <text:p/>
            <draw:enhanced-geometry svg:viewBox="0 0 21600 21600" draw:type="rectangle" draw:enhanced-path="M 0 0 L 21600 0 21600 21600 0 21600 0 0 Z N"/>
          </draw:custom-shape>
          <draw:custom-shape draw:style-name="gr387" draw:text-style-name="P39" draw:layer="layout" svg:width="5cm" svg:height="0.5cm" svg:x="69cm" svg:y="14cm">
            <text:p/>
            <draw:enhanced-geometry svg:viewBox="0 0 21600 21600" draw:type="rectangle" draw:enhanced-path="M 0 0 L 21600 0 21600 21600 0 21600 0 0 Z N"/>
          </draw:custom-shape>
          <draw:custom-shape draw:style-name="gr388" draw:text-style-name="P39" draw:layer="layout" svg:width="1cm" svg:height="0.5cm" svg:x="66cm" svg:y="14cm">
            <text:p/>
            <draw:enhanced-geometry svg:viewBox="0 0 21600 21600" draw:type="rectangle" draw:enhanced-path="M 0 0 L 21600 0 21600 21600 0 21600 0 0 Z N"/>
          </draw:custom-shape>
          <draw:custom-shape draw:style-name="gr512" draw:text-style-name="P38" draw:layer="layout" svg:width="2cm" svg:height="0.5cm" svg:x="67cm" svg:y="14.5cm">
            <text:p/>
            <draw:enhanced-geometry svg:viewBox="0 0 21600 21600" draw:type="rectangle" draw:enhanced-path="M 0 0 L 21600 0 21600 21600 0 21600 0 0 Z N"/>
          </draw:custom-shape>
          <draw:custom-shape draw:style-name="gr387" draw:text-style-name="P39" draw:layer="layout" svg:width="5cm" svg:height="0.5cm" svg:x="69cm" svg:y="14.5cm">
            <text:p/>
            <draw:enhanced-geometry svg:viewBox="0 0 21600 21600" draw:type="rectangle" draw:enhanced-path="M 0 0 L 21600 0 21600 21600 0 21600 0 0 Z N"/>
          </draw:custom-shape>
          <draw:custom-shape draw:style-name="gr388" draw:text-style-name="P39" draw:layer="layout" svg:width="1cm" svg:height="0.5cm" svg:x="66cm" svg:y="14.5cm">
            <text:p/>
            <draw:enhanced-geometry svg:viewBox="0 0 21600 21600" draw:type="rectangle" draw:enhanced-path="M 0 0 L 21600 0 21600 21600 0 21600 0 0 Z N"/>
          </draw:custom-shape>
          <draw:custom-shape draw:style-name="gr513" draw:text-style-name="P38" draw:layer="layout" svg:width="2cm" svg:height="0.5cm" svg:x="67cm" svg:y="15cm">
            <text:p/>
            <draw:enhanced-geometry svg:viewBox="0 0 21600 21600" draw:type="rectangle" draw:enhanced-path="M 0 0 L 21600 0 21600 21600 0 21600 0 0 Z N"/>
          </draw:custom-shape>
          <draw:custom-shape draw:style-name="gr387" draw:text-style-name="P39" draw:layer="layout" svg:width="5cm" svg:height="0.5cm" svg:x="69cm" svg:y="15cm">
            <text:p/>
            <draw:enhanced-geometry svg:viewBox="0 0 21600 21600" draw:type="rectangle" draw:enhanced-path="M 0 0 L 21600 0 21600 21600 0 21600 0 0 Z N"/>
          </draw:custom-shape>
          <draw:custom-shape draw:style-name="gr388" draw:text-style-name="P39" draw:layer="layout" svg:width="1cm" svg:height="0.5cm" svg:x="66cm" svg:y="15cm">
            <text:p/>
            <draw:enhanced-geometry svg:viewBox="0 0 21600 21600" draw:type="rectangle" draw:enhanced-path="M 0 0 L 21600 0 21600 21600 0 21600 0 0 Z N"/>
          </draw:custom-shape>
          <draw:custom-shape draw:style-name="gr514" draw:text-style-name="P38" draw:layer="layout" svg:width="2cm" svg:height="0.5cm" svg:x="67cm" svg:y="15.5cm">
            <text:p/>
            <draw:enhanced-geometry svg:viewBox="0 0 21600 21600" draw:type="rectangle" draw:enhanced-path="M 0 0 L 21600 0 21600 21600 0 21600 0 0 Z N"/>
          </draw:custom-shape>
          <draw:custom-shape draw:style-name="gr387" draw:text-style-name="P39" draw:layer="layout" svg:width="5cm" svg:height="0.5cm" svg:x="69cm" svg:y="15.5cm">
            <text:p/>
            <draw:enhanced-geometry svg:viewBox="0 0 21600 21600" draw:type="rectangle" draw:enhanced-path="M 0 0 L 21600 0 21600 21600 0 21600 0 0 Z N"/>
          </draw:custom-shape>
          <draw:custom-shape draw:style-name="gr388" draw:text-style-name="P39" draw:layer="layout" svg:width="1cm" svg:height="0.5cm" svg:x="66cm" svg:y="15.5cm">
            <text:p/>
            <draw:enhanced-geometry svg:viewBox="0 0 21600 21600" draw:type="rectangle" draw:enhanced-path="M 0 0 L 21600 0 21600 21600 0 21600 0 0 Z N"/>
          </draw:custom-shape>
          <draw:custom-shape draw:style-name="gr402" draw:text-style-name="P28" draw:layer="layout" svg:width="1cm" svg:height="1cm" svg:x="67cm" svg:y="17cm">
            <text:p text:style-name="P1">=</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66">
            <draw:glue-point draw:id="4" svg:x="0cm" svg:y="5cm"/>
            <draw:glue-point draw:id="5" svg:x="2.5cm" svg:y="-5cm"/>
            <draw:glue-point draw:id="6" svg:x="-2.5cm" svg:y="-5cm"/>
            <draw:rect draw:style-name="gr515" draw:text-style-name="P16" draw:layer="layout" svg:width="1cm" svg:height="1cm" draw:transform="rotate (-1.5707963267949) translate (67.5cm 19.5cm)">
              <text:p text:style-name="P15"><text:span text:style-name="T4">&amp;</text:span></text:p>
            </draw:rect>
            <draw:line draw:style-name="gr516" draw:text-style-name="P17" draw:layer="layout" svg:x1="67.25cm" svg:y1="19cm" svg:x2="67.25cm" svg:y2="19.5cm">
              <text:p/>
            </draw:line>
            <draw:line draw:style-name="gr517" draw:text-style-name="P17" draw:layer="layout" svg:x1="66.75cm" svg:y1="19cm" svg:x2="66.75cm" svg:y2="19.5cm">
              <text:p/>
            </draw:line>
            <draw:line draw:style-name="gr518" draw:text-style-name="P17" draw:layer="layout" svg:x1="67cm" svg:y1="20.5cm" svg:x2="67cm" svg:y2="21cm">
              <text:p/>
            </draw:line>
          </draw:g>
          <draw:line draw:style-name="gr413" draw:text-style-name="P4" draw:layer="layout" svg:x1="67.5cm" svg:y1="12.3cm" svg:x2="67.5cm" svg:y2="17cm">
            <text:p/>
          </draw:line>
          <draw:line draw:style-name="gr146" draw:text-style-name="P4" draw:layer="layout" svg:x1="66cm" svg:y1="17.5cm" svg:x2="67cm" svg:y2="17.5cm">
            <text:p/>
          </draw:line>
          <draw:line draw:style-name="gr38" draw:text-style-name="P4" draw:layer="layout" svg:x1="67.25cm" svg:y1="19cm" svg:x2="67.5cm" svg:y2="19cm">
            <text:p/>
          </draw:line>
          <draw:line draw:style-name="gr38" draw:text-style-name="P4" draw:layer="layout" svg:x1="67.5cm" svg:y1="18cm" svg:x2="67.5cm" svg:y2="19cm">
            <text:p/>
          </draw:line>
          <draw:line draw:style-name="gr38" draw:text-style-name="P4" draw:layer="layout" svg:x1="66.75cm" svg:y1="19cm" svg:x2="66.5cm" svg:y2="19cm">
            <text:p/>
          </draw:line>
          <draw:line draw:style-name="gr414" draw:text-style-name="P4" draw:layer="layout" svg:x1="66.5cm" svg:y1="12.3cm" svg:x2="66.5cm" svg:y2="19cm">
            <text:p/>
          </draw:line>
          <draw:custom-shape draw:style-name="gr519" draw:text-style-name="P38" draw:layer="layout" svg:width="2cm" svg:height="0.5cm" svg:x="76cm" svg:y="10cm">
            <text:p/>
            <draw:enhanced-geometry svg:viewBox="0 0 21600 21600" draw:type="rectangle" draw:enhanced-path="M 0 0 L 21600 0 21600 21600 0 21600 0 0 Z N"/>
          </draw:custom-shape>
          <draw:custom-shape draw:style-name="gr387" draw:text-style-name="P39" draw:layer="layout" svg:width="5cm" svg:height="0.5cm" svg:x="78cm" svg:y="10cm">
            <text:p/>
            <draw:enhanced-geometry svg:viewBox="0 0 21600 21600" draw:type="rectangle" draw:enhanced-path="M 0 0 L 21600 0 21600 21600 0 21600 0 0 Z N"/>
          </draw:custom-shape>
          <draw:custom-shape draw:style-name="gr388" draw:text-style-name="P39" draw:layer="layout" svg:width="1cm" svg:height="0.5cm" svg:x="75cm" svg:y="10cm">
            <text:p/>
            <draw:enhanced-geometry svg:viewBox="0 0 21600 21600" draw:type="rectangle" draw:enhanced-path="M 0 0 L 21600 0 21600 21600 0 21600 0 0 Z N"/>
          </draw:custom-shape>
          <draw:frame draw:style-name="gr389" draw:text-style-name="P40" draw:layer="layout" svg:width="1.383cm" svg:height="0.57cm" svg:x="74.6cm" svg:y="9.4cm">
            <draw:text-box>
              <text:p><text:span text:style-name="T10">V_1 bit</text:span></text:p>
            </draw:text-box>
          </draw:frame>
          <draw:frame draw:style-name="gr389" draw:text-style-name="P40" draw:layer="layout" svg:width="1.95cm" svg:height="0.57cm" svg:x="76.05cm" svg:y="9.4cm">
            <draw:text-box>
              <text:p><text:span text:style-name="T10">Tag_22 bits</text:span></text:p>
            </draw:text-box>
          </draw:frame>
          <draw:frame draw:style-name="gr389" draw:text-style-name="P40" draw:layer="layout" svg:width="2.331cm" svg:height="0.57cm" svg:x="78cm" svg:y="9.4cm">
            <draw:text-box>
              <text:p><text:span text:style-name="T10">Data_32 bytes</text:span></text:p>
            </draw:text-box>
          </draw:frame>
          <draw:custom-shape draw:style-name="gr520" draw:text-style-name="P38" draw:layer="layout" svg:width="2cm" svg:height="0.5cm" svg:x="76cm" svg:y="10.5cm">
            <text:p/>
            <draw:enhanced-geometry svg:viewBox="0 0 21600 21600" draw:type="rectangle" draw:enhanced-path="M 0 0 L 21600 0 21600 21600 0 21600 0 0 Z N"/>
          </draw:custom-shape>
          <draw:custom-shape draw:style-name="gr387" draw:text-style-name="P39" draw:layer="layout" svg:width="5cm" svg:height="0.5cm" svg:x="78cm" svg:y="10.5cm">
            <text:p/>
            <draw:enhanced-geometry svg:viewBox="0 0 21600 21600" draw:type="rectangle" draw:enhanced-path="M 0 0 L 21600 0 21600 21600 0 21600 0 0 Z N"/>
          </draw:custom-shape>
          <draw:custom-shape draw:style-name="gr388" draw:text-style-name="P39" draw:layer="layout" svg:width="1cm" svg:height="0.5cm" svg:x="75cm" svg:y="10.5cm">
            <text:p/>
            <draw:enhanced-geometry svg:viewBox="0 0 21600 21600" draw:type="rectangle" draw:enhanced-path="M 0 0 L 21600 0 21600 21600 0 21600 0 0 Z N"/>
          </draw:custom-shape>
          <draw:custom-shape draw:style-name="gr521" draw:text-style-name="P38" draw:layer="layout" svg:width="2cm" svg:height="0.5cm" svg:x="76cm" svg:y="11cm">
            <text:p/>
            <draw:enhanced-geometry svg:viewBox="0 0 21600 21600" draw:type="rectangle" draw:enhanced-path="M 0 0 L 21600 0 21600 21600 0 21600 0 0 Z N"/>
          </draw:custom-shape>
          <draw:custom-shape draw:style-name="gr387" draw:text-style-name="P39" draw:layer="layout" svg:width="5cm" svg:height="0.5cm" svg:x="78cm" svg:y="11cm">
            <text:p/>
            <draw:enhanced-geometry svg:viewBox="0 0 21600 21600" draw:type="rectangle" draw:enhanced-path="M 0 0 L 21600 0 21600 21600 0 21600 0 0 Z N"/>
          </draw:custom-shape>
          <draw:custom-shape draw:style-name="gr388" draw:text-style-name="P39" draw:layer="layout" svg:width="1cm" svg:height="0.5cm" svg:x="75cm" svg:y="11cm">
            <text:p/>
            <draw:enhanced-geometry svg:viewBox="0 0 21600 21600" draw:type="rectangle" draw:enhanced-path="M 0 0 L 21600 0 21600 21600 0 21600 0 0 Z N"/>
          </draw:custom-shape>
          <draw:custom-shape draw:style-name="gr522" draw:text-style-name="P38" draw:layer="layout" svg:width="2cm" svg:height="0.5cm" svg:x="76cm" svg:y="11.5cm">
            <text:p/>
            <draw:enhanced-geometry svg:viewBox="0 0 21600 21600" draw:type="rectangle" draw:enhanced-path="M 0 0 L 21600 0 21600 21600 0 21600 0 0 Z N"/>
          </draw:custom-shape>
          <draw:custom-shape draw:style-name="gr387" draw:text-style-name="P39" draw:layer="layout" svg:width="5cm" svg:height="0.5cm" svg:x="78cm" svg:y="11.5cm">
            <text:p/>
            <draw:enhanced-geometry svg:viewBox="0 0 21600 21600" draw:type="rectangle" draw:enhanced-path="M 0 0 L 21600 0 21600 21600 0 21600 0 0 Z N"/>
          </draw:custom-shape>
          <draw:custom-shape draw:style-name="gr388" draw:text-style-name="P39" draw:layer="layout" svg:width="1cm" svg:height="0.5cm" svg:x="75cm" svg:y="11.5cm">
            <text:p/>
            <draw:enhanced-geometry svg:viewBox="0 0 21600 21600" draw:type="rectangle" draw:enhanced-path="M 0 0 L 21600 0 21600 21600 0 21600 0 0 Z N"/>
          </draw:custom-shape>
          <draw:custom-shape draw:style-name="gr523" draw:text-style-name="P41" draw:layer="layout" svg:width="2cm" svg:height="0.5cm" svg:x="76cm" svg:y="12cm">
            <text:p/>
            <draw:enhanced-geometry svg:viewBox="0 0 21600 21600" draw:type="rectangle" draw:enhanced-path="M 0 0 L 21600 0 21600 21600 0 21600 0 0 Z N"/>
          </draw:custom-shape>
          <draw:custom-shape draw:style-name="gr394" draw:text-style-name="P36" draw:layer="layout" svg:width="5cm" svg:height="0.5cm" svg:x="78cm" svg:y="12cm">
            <text:p/>
            <draw:enhanced-geometry svg:viewBox="0 0 21600 21600" draw:type="rectangle" draw:enhanced-path="M 0 0 L 21600 0 21600 21600 0 21600 0 0 Z N"/>
          </draw:custom-shape>
          <draw:custom-shape draw:style-name="gr395" draw:text-style-name="P36" draw:layer="layout" svg:width="1cm" svg:height="0.5cm" svg:x="75cm" svg:y="12cm">
            <text:p/>
            <draw:enhanced-geometry svg:viewBox="0 0 21600 21600" draw:type="rectangle" draw:enhanced-path="M 0 0 L 21600 0 21600 21600 0 21600 0 0 Z N"/>
          </draw:custom-shape>
          <draw:custom-shape draw:style-name="gr524" draw:text-style-name="P38" draw:layer="layout" svg:width="2cm" svg:height="0.5cm" svg:x="76cm" svg:y="13cm">
            <text:p/>
            <draw:enhanced-geometry svg:viewBox="0 0 21600 21600" draw:type="rectangle" draw:enhanced-path="M 0 0 L 21600 0 21600 21600 0 21600 0 0 Z N"/>
          </draw:custom-shape>
          <draw:custom-shape draw:style-name="gr387" draw:text-style-name="P39" draw:layer="layout" svg:width="5cm" svg:height="0.5cm" svg:x="78cm" svg:y="13cm">
            <text:p/>
            <draw:enhanced-geometry svg:viewBox="0 0 21600 21600" draw:type="rectangle" draw:enhanced-path="M 0 0 L 21600 0 21600 21600 0 21600 0 0 Z N"/>
          </draw:custom-shape>
          <draw:custom-shape draw:style-name="gr388" draw:text-style-name="P39" draw:layer="layout" svg:width="1cm" svg:height="0.5cm" svg:x="75cm" svg:y="13cm">
            <text:p/>
            <draw:enhanced-geometry svg:viewBox="0 0 21600 21600" draw:type="rectangle" draw:enhanced-path="M 0 0 L 21600 0 21600 21600 0 21600 0 0 Z N"/>
          </draw:custom-shape>
          <draw:custom-shape draw:style-name="gr525" draw:text-style-name="P38" draw:layer="layout" svg:width="2cm" svg:height="0.5cm" svg:x="76cm" svg:y="13.5cm">
            <text:p/>
            <draw:enhanced-geometry svg:viewBox="0 0 21600 21600" draw:type="rectangle" draw:enhanced-path="M 0 0 L 21600 0 21600 21600 0 21600 0 0 Z N"/>
          </draw:custom-shape>
          <draw:custom-shape draw:style-name="gr387" draw:text-style-name="P39" draw:layer="layout" svg:width="5cm" svg:height="0.5cm" svg:x="78cm" svg:y="13.5cm">
            <text:p/>
            <draw:enhanced-geometry svg:viewBox="0 0 21600 21600" draw:type="rectangle" draw:enhanced-path="M 0 0 L 21600 0 21600 21600 0 21600 0 0 Z N"/>
          </draw:custom-shape>
          <draw:custom-shape draw:style-name="gr388" draw:text-style-name="P39" draw:layer="layout" svg:width="1cm" svg:height="0.5cm" svg:x="75cm" svg:y="13.5cm">
            <text:p/>
            <draw:enhanced-geometry svg:viewBox="0 0 21600 21600" draw:type="rectangle" draw:enhanced-path="M 0 0 L 21600 0 21600 21600 0 21600 0 0 Z N"/>
          </draw:custom-shape>
          <draw:custom-shape draw:style-name="gr526" draw:text-style-name="P38" draw:layer="layout" svg:width="2cm" svg:height="0.5cm" svg:x="76cm" svg:y="14cm">
            <text:p/>
            <draw:enhanced-geometry svg:viewBox="0 0 21600 21600" draw:type="rectangle" draw:enhanced-path="M 0 0 L 21600 0 21600 21600 0 21600 0 0 Z N"/>
          </draw:custom-shape>
          <draw:custom-shape draw:style-name="gr387" draw:text-style-name="P39" draw:layer="layout" svg:width="5cm" svg:height="0.5cm" svg:x="78cm" svg:y="14cm">
            <text:p/>
            <draw:enhanced-geometry svg:viewBox="0 0 21600 21600" draw:type="rectangle" draw:enhanced-path="M 0 0 L 21600 0 21600 21600 0 21600 0 0 Z N"/>
          </draw:custom-shape>
          <draw:custom-shape draw:style-name="gr388" draw:text-style-name="P39" draw:layer="layout" svg:width="1cm" svg:height="0.5cm" svg:x="75cm" svg:y="14cm">
            <text:p/>
            <draw:enhanced-geometry svg:viewBox="0 0 21600 21600" draw:type="rectangle" draw:enhanced-path="M 0 0 L 21600 0 21600 21600 0 21600 0 0 Z N"/>
          </draw:custom-shape>
          <draw:custom-shape draw:style-name="gr527" draw:text-style-name="P38" draw:layer="layout" svg:width="2cm" svg:height="0.5cm" svg:x="76cm" svg:y="14.5cm">
            <text:p/>
            <draw:enhanced-geometry svg:viewBox="0 0 21600 21600" draw:type="rectangle" draw:enhanced-path="M 0 0 L 21600 0 21600 21600 0 21600 0 0 Z N"/>
          </draw:custom-shape>
          <draw:custom-shape draw:style-name="gr387" draw:text-style-name="P39" draw:layer="layout" svg:width="5cm" svg:height="0.5cm" svg:x="78cm" svg:y="14.5cm">
            <text:p/>
            <draw:enhanced-geometry svg:viewBox="0 0 21600 21600" draw:type="rectangle" draw:enhanced-path="M 0 0 L 21600 0 21600 21600 0 21600 0 0 Z N"/>
          </draw:custom-shape>
          <draw:custom-shape draw:style-name="gr388" draw:text-style-name="P39" draw:layer="layout" svg:width="1cm" svg:height="0.5cm" svg:x="75cm" svg:y="14.5cm">
            <text:p/>
            <draw:enhanced-geometry svg:viewBox="0 0 21600 21600" draw:type="rectangle" draw:enhanced-path="M 0 0 L 21600 0 21600 21600 0 21600 0 0 Z N"/>
          </draw:custom-shape>
          <draw:custom-shape draw:style-name="gr528" draw:text-style-name="P38" draw:layer="layout" svg:width="2cm" svg:height="0.5cm" svg:x="76cm" svg:y="15cm">
            <text:p/>
            <draw:enhanced-geometry svg:viewBox="0 0 21600 21600" draw:type="rectangle" draw:enhanced-path="M 0 0 L 21600 0 21600 21600 0 21600 0 0 Z N"/>
          </draw:custom-shape>
          <draw:custom-shape draw:style-name="gr387" draw:text-style-name="P39" draw:layer="layout" svg:width="5cm" svg:height="0.5cm" svg:x="78cm" svg:y="15cm">
            <text:p/>
            <draw:enhanced-geometry svg:viewBox="0 0 21600 21600" draw:type="rectangle" draw:enhanced-path="M 0 0 L 21600 0 21600 21600 0 21600 0 0 Z N"/>
          </draw:custom-shape>
          <draw:custom-shape draw:style-name="gr388" draw:text-style-name="P39" draw:layer="layout" svg:width="1cm" svg:height="0.5cm" svg:x="75cm" svg:y="15cm">
            <text:p/>
            <draw:enhanced-geometry svg:viewBox="0 0 21600 21600" draw:type="rectangle" draw:enhanced-path="M 0 0 L 21600 0 21600 21600 0 21600 0 0 Z N"/>
          </draw:custom-shape>
          <draw:custom-shape draw:style-name="gr529" draw:text-style-name="P38" draw:layer="layout" svg:width="2cm" svg:height="0.5cm" svg:x="76cm" svg:y="15.5cm">
            <text:p/>
            <draw:enhanced-geometry svg:viewBox="0 0 21600 21600" draw:type="rectangle" draw:enhanced-path="M 0 0 L 21600 0 21600 21600 0 21600 0 0 Z N"/>
          </draw:custom-shape>
          <draw:custom-shape draw:style-name="gr387" draw:text-style-name="P39" draw:layer="layout" svg:width="5cm" svg:height="0.5cm" svg:x="78cm" svg:y="15.5cm">
            <text:p/>
            <draw:enhanced-geometry svg:viewBox="0 0 21600 21600" draw:type="rectangle" draw:enhanced-path="M 0 0 L 21600 0 21600 21600 0 21600 0 0 Z N"/>
          </draw:custom-shape>
          <draw:custom-shape draw:style-name="gr388" draw:text-style-name="P39" draw:layer="layout" svg:width="1cm" svg:height="0.5cm" svg:x="75cm" svg:y="15.5cm">
            <text:p/>
            <draw:enhanced-geometry svg:viewBox="0 0 21600 21600" draw:type="rectangle" draw:enhanced-path="M 0 0 L 21600 0 21600 21600 0 21600 0 0 Z N"/>
          </draw:custom-shape>
          <draw:custom-shape draw:style-name="gr402" draw:text-style-name="P28" draw:layer="layout" svg:width="1cm" svg:height="1cm" svg:x="76cm" svg:y="17cm">
            <text:p text:style-name="P1">=</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66">
            <draw:glue-point draw:id="4" svg:x="0cm" svg:y="5cm"/>
            <draw:glue-point draw:id="5" svg:x="2.5cm" svg:y="-5cm"/>
            <draw:glue-point draw:id="6" svg:x="-2.5cm" svg:y="-5cm"/>
            <draw:rect draw:style-name="gr530" draw:text-style-name="P16" draw:layer="layout" svg:width="1cm" svg:height="1cm" draw:transform="rotate (-1.5707963267949) translate (76.5cm 19.5cm)">
              <text:p text:style-name="P15"><text:span text:style-name="T4">&amp;</text:span></text:p>
            </draw:rect>
            <draw:line draw:style-name="gr531" draw:text-style-name="P17" draw:layer="layout" svg:x1="76.25cm" svg:y1="19cm" svg:x2="76.25cm" svg:y2="19.5cm">
              <text:p/>
            </draw:line>
            <draw:line draw:style-name="gr532" draw:text-style-name="P17" draw:layer="layout" svg:x1="75.75cm" svg:y1="19cm" svg:x2="75.75cm" svg:y2="19.5cm">
              <text:p/>
            </draw:line>
            <draw:line draw:style-name="gr533" draw:text-style-name="P17" draw:layer="layout" svg:x1="76cm" svg:y1="20.5cm" svg:x2="76cm" svg:y2="21cm">
              <text:p/>
            </draw:line>
          </draw:g>
          <draw:line draw:style-name="gr413" draw:text-style-name="P4" draw:layer="layout" svg:x1="76.5cm" svg:y1="12.3cm" svg:x2="76.5cm" svg:y2="17cm">
            <text:p/>
          </draw:line>
          <draw:line draw:style-name="gr146" draw:text-style-name="P4" draw:layer="layout" svg:x1="75cm" svg:y1="17.5cm" svg:x2="76cm" svg:y2="17.5cm">
            <text:p/>
          </draw:line>
          <draw:line draw:style-name="gr38" draw:text-style-name="P4" draw:layer="layout" svg:x1="76.25cm" svg:y1="19cm" svg:x2="76.5cm" svg:y2="19cm">
            <text:p/>
          </draw:line>
          <draw:line draw:style-name="gr38" draw:text-style-name="P4" draw:layer="layout" svg:x1="76.5cm" svg:y1="18cm" svg:x2="76.5cm" svg:y2="19cm">
            <text:p/>
          </draw:line>
          <draw:line draw:style-name="gr38" draw:text-style-name="P4" draw:layer="layout" svg:x1="75.75cm" svg:y1="19cm" svg:x2="75.5cm" svg:y2="19cm">
            <text:p/>
          </draw:line>
          <draw:line draw:style-name="gr414" draw:text-style-name="P4" draw:layer="layout" svg:x1="75.5cm" svg:y1="12.3cm" svg:x2="75.5cm" svg:y2="19cm">
            <text:p/>
          </draw:line>
          <draw:line draw:style-name="gr38" draw:text-style-name="P4" draw:layer="layout" svg:x1="45cm" svg:y1="7.5cm" svg:x2="45cm" svg:y2="17.5cm">
            <text:p/>
          </draw:line>
          <draw:custom-shape draw:style-name="gr461" draw:text-style-name="P5" draw:layer="layout" svg:width="0.2cm" svg:height="0.2cm" svg:x="44.902cm" svg:y="16.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5cm" svg:y1="16.5cm" svg:x2="75cm" svg:y2="16.5cm">
            <text:p/>
          </draw:line>
          <draw:line draw:style-name="gr38" draw:text-style-name="P4" draw:layer="layout" svg:x1="75cm" svg:y1="16.5cm" svg:x2="75cm" svg:y2="17.5cm">
            <text:p/>
          </draw:line>
          <draw:line draw:style-name="gr38" draw:text-style-name="P4" draw:layer="layout" svg:x1="66cm" svg:y1="16.5cm" svg:x2="66cm" svg:y2="17.5cm">
            <text:p/>
          </draw:line>
          <draw:line draw:style-name="gr38" draw:text-style-name="P4" draw:layer="layout" svg:x1="57cm" svg:y1="16.5cm" svg:x2="57cm" svg:y2="17.5cm">
            <text:p/>
          </draw:line>
          <draw:custom-shape draw:style-name="gr461" draw:text-style-name="P5" draw:layer="layout" svg:width="0.2cm" svg:height="0.2cm" svg:x="56.903cm" svg:y="16.4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65.904cm" svg:y="16.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6" draw:text-style-name="P4" draw:layer="layout" svg:x1="49.6cm" svg:y1="23.5cm" svg:x2="49.6cm" svg:y2="24cm">
            <text:p/>
          </draw:line>
          <draw:frame draw:style-name="gr389" draw:text-style-name="P40" draw:layer="layout" svg:width="0.857cm" svg:height="0.57cm" svg:x="49.143cm" svg:y="24cm">
            <draw:text-box>
              <text:p><text:span text:style-name="T10">Hit</text:span></text:p>
            </draw:text-box>
          </draw:frame>
          <draw:line draw:style-name="gr38" draw:text-style-name="P4" draw:layer="layout" svg:x1="49cm" svg:y1="21cm" svg:x2="49cm" svg:y2="21.5cm">
            <text:p/>
          </draw:line>
          <draw:line draw:style-name="gr38" draw:text-style-name="P4" draw:layer="layout" svg:x1="77cm" svg:y1="21cm" svg:x2="49.4cm" svg:y2="21cm">
            <text:p/>
          </draw:line>
          <draw:line draw:style-name="gr38" draw:text-style-name="P4" draw:layer="layout" svg:x1="49.4cm" svg:y1="21cm" svg:x2="49.4cm" svg:y2="21.5cm">
            <text:p/>
          </draw:line>
          <draw:line draw:style-name="gr38" draw:text-style-name="P4" draw:layer="layout" svg:x1="50.2cm" svg:y1="21.4cm" svg:x2="77cm" svg:y2="21.4cm">
            <text:p/>
          </draw:line>
          <draw:line draw:style-name="gr38" draw:text-style-name="P4" draw:layer="layout" svg:x1="76cm" svg:y1="21cm" svg:x2="76cm" svg:y2="21.4cm">
            <text:p/>
          </draw:line>
          <draw:line draw:style-name="gr38" draw:text-style-name="P4" draw:layer="layout" svg:x1="77cm" svg:y1="21.2cm" svg:x2="49.8cm" svg:y2="21.2cm">
            <text:p/>
          </draw:line>
          <draw:line draw:style-name="gr38" draw:text-style-name="P4" draw:layer="layout" svg:x1="49.8cm" svg:y1="21.2cm" svg:x2="49.8cm" svg:y2="21.5cm">
            <text:p/>
          </draw:line>
          <draw:line draw:style-name="gr38" draw:text-style-name="P4" draw:layer="layout" svg:x1="67cm" svg:y1="21cm" svg:x2="67cm" svg:y2="21.2cm">
            <text:p/>
          </draw:line>
          <draw:line draw:style-name="gr38" draw:text-style-name="P4" draw:layer="layout" svg:x1="50.2cm" svg:y1="21.4cm" svg:x2="50.2cm" svg:y2="21.6cm">
            <text:p/>
          </draw:line>
          <draw:custom-shape draw:style-name="gr461" draw:text-style-name="P5" draw:layer="layout" svg:width="0.2cm" svg:height="0.2cm" svg:x="75.905cm" svg:y="21.3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66.905cm" svg:y="21.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57.904cm" svg:y="20.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77cm" svg:y1="20.8cm" svg:x2="49cm" svg:y2="20.8cm">
            <text:p/>
          </draw:line>
          <draw:custom-shape draw:style-name="gr461" draw:text-style-name="P5" draw:layer="layout" svg:width="0.2cm" svg:height="0.2cm" svg:x="48.904cm" svg:y="20.7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79.6cm" svg:y1="21.2cm" svg:x2="80cm" svg:y2="20.8cm">
            <text:p/>
          </draw:line>
          <draw:frame draw:style-name="gr462" draw:text-style-name="P37" draw:layer="layout" svg:width="0.659cm" svg:height="0.569cm" svg:x="79.4cm" svg:y="20.531cm">
            <draw:text-box>
              <text:p><text:span text:style-name="T10">2</text:span></text:p>
            </draw:text-box>
          </draw:frame>
          <draw:line draw:style-name="gr38" draw:text-style-name="P4" draw:layer="layout" svg:x1="79cm" svg:y1="21cm" svg:x2="80.7cm" svg:y2="21cm">
            <text:p/>
          </draw:line>
          <draw:line draw:style-name="gr413" draw:text-style-name="P4" draw:layer="layout" svg:x1="82.5cm" svg:y1="12.3cm" svg:x2="82.5cm" svg:y2="20.6cm">
            <text:p/>
          </draw:line>
          <draw:line draw:style-name="gr414" draw:text-style-name="P4" draw:layer="layout" svg:x1="73.5cm" svg:y1="12.3cm" svg:x2="73.5cm" svg:y2="18.5cm">
            <text:p/>
          </draw:line>
          <draw:line draw:style-name="gr414" draw:text-style-name="P4" draw:layer="layout" svg:x1="64.5cm" svg:y1="12.301cm" svg:x2="64.5cm" svg:y2="19cm">
            <text:p/>
          </draw:line>
          <draw:line draw:style-name="gr414" draw:text-style-name="P4" draw:layer="layout" svg:x1="55.5cm" svg:y1="12.302cm" svg:x2="55.5cm" svg:y2="19.5cm">
            <text:p/>
          </draw:line>
          <draw:line draw:style-name="gr38" draw:text-style-name="P4" draw:layer="layout" svg:x1="73.5cm" svg:y1="18.5cm" svg:x2="82cm" svg:y2="18.5cm">
            <text:p/>
          </draw:line>
          <draw:line draw:style-name="gr289" draw:text-style-name="P4" draw:layer="layout" svg:x1="81.5cm" svg:y1="19cm" svg:x2="80cm" svg:y2="19cm">
            <text:p/>
          </draw:line>
          <draw:line draw:style-name="gr289" draw:text-style-name="P4" draw:layer="layout" svg:x1="81cm" svg:y1="19.5cm" svg:x2="79.5cm" svg:y2="19.5cm">
            <text:p/>
          </draw:line>
          <draw:line draw:style-name="gr289" draw:text-style-name="P4" draw:layer="layout" svg:x1="65cm" svg:y1="19cm" svg:x2="64.5cm" svg:y2="19cm">
            <text:p/>
          </draw:line>
          <draw:line draw:style-name="gr289" draw:text-style-name="P4" draw:layer="layout" svg:x1="56cm" svg:y1="19.5cm" svg:x2="55.5cm" svg:y2="19.5cm">
            <text:p/>
          </draw:line>
          <draw:line draw:style-name="gr38" draw:text-style-name="P4" draw:layer="layout" svg:x1="81.8cm" svg:y1="21.6cm" svg:x2="81.8cm" svg:y2="23cm">
            <text:p/>
          </draw:line>
          <draw:line draw:style-name="gr38" draw:text-style-name="P4" draw:layer="layout" svg:x1="81.601cm" svg:y1="22.601cm" svg:x2="82.001cm" svg:y2="22.201cm">
            <text:p/>
          </draw:line>
          <draw:frame draw:style-name="gr463" draw:text-style-name="P37" draw:layer="layout" svg:width="1.463cm" svg:height="0.569cm" svg:x="81.801cm" svg:y="21.932cm">
            <draw:text-box>
              <text:p><text:span text:style-name="T10">32 Byte</text:span></text:p>
            </draw:text-box>
          </draw:frame>
          <draw:polygon draw:style-name="gr155" draw:text-style-name="P14" draw:layer="layout" svg:width="2.499cm" svg:height="0.999cm" svg:x="80.5cm" svg:y="23cm" svg:viewBox="0 0 2500 1000" draw:points="2500,0 0,0 500,1000 2000,1000">
            <text:p/>
          </draw:polygon>
          <draw:line draw:style-name="gr146" draw:text-style-name="P4" draw:layer="layout" svg:x1="81.8cm" svg:y1="24cm" svg:x2="81.8cm" svg:y2="25cm">
            <text:p/>
          </draw:line>
          <draw:line draw:style-name="gr38" draw:text-style-name="P4" draw:layer="layout" svg:x1="81.601cm" svg:y1="24.602cm" svg:x2="82.001cm" svg:y2="24.202cm">
            <text:p/>
          </draw:line>
          <draw:frame draw:style-name="gr464" draw:text-style-name="P37" draw:layer="layout" svg:width="1.302cm" svg:height="0.569cm" svg:x="81.801cm" svg:y="23.933cm">
            <draw:text-box>
              <text:p><text:span text:style-name="T10">1 Byte</text:span></text:p>
            </draw:text-box>
          </draw:frame>
          <draw:custom-shape draw:style-name="gr465" draw:text-style-name="P42" draw:layer="layout" svg:width="3cm" svg:height="0.5cm" svg:x="43cm" svg:y="7cm">
            <text:p text:style-name="P35"><text:span text:style-name="T10">Tag(22bits)</text:span></text:p>
            <draw:enhanced-geometry svg:viewBox="0 0 21600 21600" draw:type="rectangle" draw:enhanced-path="M 0 0 L 21600 0 21600 21600 0 21600 0 0 Z N"/>
          </draw:custom-shape>
          <draw:custom-shape draw:style-name="gr465" draw:text-style-name="P42" draw:layer="layout" svg:width="3cm" svg:height="0.5cm" svg:x="46cm" svg:y="7cm">
            <text:p text:style-name="P35"><text:span text:style-name="T10">Index(5bits)</text:span></text:p>
            <draw:enhanced-geometry svg:viewBox="0 0 21600 21600" draw:type="rectangle" draw:enhanced-path="M 0 0 L 21600 0 21600 21600 0 21600 0 0 Z N"/>
          </draw:custom-shape>
          <draw:custom-shape draw:style-name="gr465" draw:text-style-name="P42" draw:layer="layout" svg:width="3cm" svg:height="0.5cm" svg:x="49cm" svg:y="7cm">
            <text:p text:style-name="P35"><text:span text:style-name="T10">Offset(5bits)</text:span></text:p>
            <draw:enhanced-geometry svg:viewBox="0 0 21600 21600" draw:type="rectangle" draw:enhanced-path="M 0 0 L 21600 0 21600 21600 0 21600 0 0 Z N"/>
          </draw:custom-shape>
          <draw:frame draw:style-name="gr389" draw:text-style-name="P40" draw:layer="layout" svg:width="1.903cm" svg:height="0.57cm" svg:x="45.8cm" svg:y="6.03cm">
            <draw:text-box>
              <text:p><text:span text:style-name="T10">Address</text:span></text:p>
            </draw:text-box>
          </draw:frame>
          <draw:line draw:style-name="gr38" draw:text-style-name="P4" draw:layer="layout" svg:x1="44cm" svg:y1="8.4cm" svg:x2="44cm" svg:y2="23.5cm">
            <text:p/>
          </draw:line>
          <draw:line draw:style-name="gr38" draw:text-style-name="P4" draw:layer="layout" svg:x1="47cm" svg:y1="7.5cm" svg:x2="47cm" svg:y2="9cm">
            <text:p/>
          </draw:line>
          <draw:line draw:style-name="gr38" draw:text-style-name="P4" draw:layer="layout" svg:x1="47cm" svg:y1="9cm" svg:x2="46cm" svg:y2="9cm">
            <text:p/>
          </draw:line>
          <draw:line draw:style-name="gr38" draw:text-style-name="P4" draw:layer="layout" svg:x1="44cm" svg:y1="8.4cm" svg:x2="50cm" svg:y2="8.4cm">
            <text:p/>
          </draw:line>
          <draw:line draw:style-name="gr38" draw:text-style-name="P4" draw:layer="layout" svg:x1="50cm" svg:y1="7.5cm" svg:x2="50cm" svg:y2="8.4cm">
            <text:p/>
          </draw:line>
          <draw:line draw:style-name="gr38" draw:text-style-name="P4" draw:layer="layout" svg:x1="44cm" svg:y1="23.5cm" svg:x2="80.8cm" svg:y2="23.5cm">
            <text:p/>
          </draw:line>
          <draw:custom-shape draw:style-name="gr466" draw:text-style-name="P43" draw:layer="layout" svg:width="40cm" svg:height="19cm" svg:x="43cm" svg:y="6cm">
            <text:p/>
            <draw:enhanced-geometry svg:viewBox="0 0 21600 21600" draw:type="rectangle" draw:enhanced-path="M 0 0 L 21600 0 21600 21600 0 21600 0 0 Z N"/>
          </draw:custom-shape>
          <draw:frame draw:style-name="gr467" draw:text-style-name="P44" draw:layer="layout" svg:width="1.526cm" svg:height="0.569cm" svg:x="43.074cm" svg:y="6.1cm">
            <draw:text-box>
              <text:p><text:span text:style-name="T12">I-Cache</text:span></text:p>
            </draw:text-box>
          </draw:frame>
        </draw:g>
        <draw:line draw:style-name="gr146" draw:text-style-name="P4" draw:layer="layout" svg:x1="53.9cm" svg:y1="5cm" svg:x2="53.9cm" svg:y2="6cm">
          <text:p/>
        </draw:line>
        <draw:line draw:style-name="gr38" draw:text-style-name="P4" draw:layer="layout" svg:x1="42.5cm" svg:y1="5cm" svg:x2="53.9cm" svg:y2="5cm">
          <text:p/>
        </draw:line>
        <draw:line draw:style-name="gr146" draw:text-style-name="P4" draw:layer="layout" svg:x1="42.5cm" svg:y1="5cm" svg:x2="42.5cm" svg:y2="4cm">
          <text:p/>
        </draw:line>
        <draw:line draw:style-name="gr146" draw:text-style-name="P4" draw:layer="layout" svg:x1="42.1cm" svg:y1="5.001cm" svg:x2="42.1cm" svg:y2="4.001cm">
          <text:p/>
        </draw:line>
        <draw:line draw:style-name="gr38" draw:text-style-name="P4" draw:layer="layout" svg:x1="12.9cm" svg:y1="5cm" svg:x2="42.1cm" svg:y2="5.001cm">
          <text:p/>
        </draw:line>
        <draw:line draw:style-name="gr146" draw:text-style-name="P4" draw:layer="layout" svg:x1="12.9cm" svg:y1="5cm" svg:x2="12.9cm" svg:y2="6cm">
          <text:p/>
        </draw:line>
        <draw:custom-shape draw:style-name="gr534" draw:text-style-name="P36" draw:layer="layout" svg:width="3.5cm" svg:height="1cm" svg:x="56cm" svg:y="5.5cm">
          <text:p text:style-name="P35"><text:span text:style-name="T10">Scratchpad-SRAM</text:span></text:p>
          <draw:enhanced-geometry svg:viewBox="0 0 21600 21600" draw:type="rectangle" draw:enhanced-path="M 0 0 L 21600 0 21600 21600 0 21600 0 0 Z N"/>
        </draw:custom-shape>
        <draw:line draw:style-name="gr146" draw:text-style-name="P4" draw:layer="layout" svg:x1="41.2cm" svg:y1="28cm" svg:x2="41.2cm" svg:y2="29cm">
          <text:p/>
        </draw:line>
        <draw:line draw:style-name="gr146" draw:text-style-name="P4" draw:layer="layout" svg:x1="41.6cm" svg:y1="28cm" svg:x2="41.6cm" svg:y2="29cm">
          <text:p/>
        </draw:line>
        <draw:line draw:style-name="gr146" draw:text-style-name="P4" draw:layer="layout" svg:x1="42.8cm" svg:y1="28cm" svg:x2="42.8cm" svg:y2="29cm">
          <text:p/>
        </draw:line>
        <draw:line draw:style-name="gr146" draw:text-style-name="P4" draw:layer="layout" svg:x1="43.2cm" svg:y1="28cm" svg:x2="43.2cm" svg:y2="29cm">
          <text:p/>
        </draw:line>
        <draw:line draw:style-name="gr146" draw:text-style-name="P4" draw:layer="layout" svg:x1="43.6cm" svg:y1="28cm" svg:x2="43.6cm" svg:y2="29cm">
          <text:p/>
        </draw:line>
        <draw:line draw:style-name="gr146" draw:text-style-name="P4" draw:layer="layout" svg:x1="44cm" svg:y1="28cm" svg:x2="44cm" svg:y2="29cm">
          <text:p/>
        </draw:line>
        <draw:line draw:style-name="gr146" draw:text-style-name="P4" draw:layer="layout" svg:x1="44.4cm" svg:y1="28cm" svg:x2="44.4cm" svg:y2="29cm">
          <text:p/>
        </draw:line>
        <draw:line draw:style-name="gr146" draw:text-style-name="P4" draw:layer="layout" svg:x1="35cm" svg:y1="26cm" svg:x2="35cm" svg:y2="25cm">
          <text:p/>
        </draw:line>
        <draw:line draw:style-name="gr146" draw:text-style-name="P4" draw:layer="layout" svg:x1="35.4cm" svg:y1="26cm" svg:x2="35.4cm" svg:y2="25.001cm">
          <text:p/>
        </draw:line>
        <draw:line draw:style-name="gr146" draw:text-style-name="P4" draw:layer="layout" svg:x1="45cm" svg:y1="26cm" svg:x2="45cm" svg:y2="25.001cm">
          <text:p/>
        </draw:line>
        <draw:line draw:style-name="gr146" draw:text-style-name="P4" draw:layer="layout" svg:x1="45.4cm" svg:y1="26cm" svg:x2="45.4cm" svg:y2="25.002cm">
          <text:p/>
        </draw:line>
        <draw:line draw:style-name="gr146" draw:text-style-name="P4" draw:layer="layout" svg:x1="45.8cm" svg:y1="26cm" svg:x2="45.8cm" svg:y2="25.002cm">
          <text:p/>
        </draw:line>
        <draw:line draw:style-name="gr146" draw:text-style-name="P4" draw:layer="layout" svg:x1="46.2cm" svg:y1="26cm" svg:x2="46.2cm" svg:y2="25.003cm">
          <text:p/>
        </draw:line>
        <draw:line draw:style-name="gr146" draw:text-style-name="P4" draw:layer="layout" svg:x1="46.6cm" svg:y1="26cm" svg:x2="46.6cm" svg:y2="25.004cm">
          <text:p/>
        </draw:line>
        <draw:line draw:style-name="gr38" draw:text-style-name="P4" draw:layer="layout" svg:x1="41.2cm" svg:y1="28cm" svg:x2="35cm" svg:y2="26cm">
          <text:p/>
        </draw:line>
        <draw:line draw:style-name="gr38" draw:text-style-name="P4" draw:layer="layout" svg:x1="41.6cm" svg:y1="28cm" svg:x2="35.4cm" svg:y2="26cm">
          <text:p/>
        </draw:line>
        <draw:line draw:style-name="gr38" draw:text-style-name="P4" draw:layer="layout" svg:x1="42.8cm" svg:y1="28cm" svg:x2="45cm" svg:y2="26cm">
          <text:p/>
        </draw:line>
        <draw:line draw:style-name="gr38" draw:text-style-name="P4" draw:layer="layout" svg:x1="43.2cm" svg:y1="28cm" svg:x2="45.4cm" svg:y2="26cm">
          <text:p/>
        </draw:line>
        <draw:line draw:style-name="gr38" draw:text-style-name="P4" draw:layer="layout" svg:x1="43.6cm" svg:y1="28cm" svg:x2="45.8cm" svg:y2="26cm">
          <text:p/>
        </draw:line>
        <draw:line draw:style-name="gr38" draw:text-style-name="P4" draw:layer="layout" svg:x1="44cm" svg:y1="28cm" svg:x2="46.2cm" svg:y2="26cm">
          <text:p/>
        </draw:line>
        <draw:line draw:style-name="gr38" draw:text-style-name="P4" draw:layer="layout" svg:x1="44.4cm" svg:y1="28cm" svg:x2="46.6cm" svg:y2="26cm">
          <text:p/>
        </draw:line>
        <draw:line draw:style-name="gr146" draw:text-style-name="P4" draw:layer="layout" svg:x1="41.5cm" svg:y1="35cm" svg:x2="41.5cm" svg:y2="35.5cm">
          <text:p/>
        </draw:line>
        <draw:line draw:style-name="gr38" draw:text-style-name="P4" draw:layer="layout" svg:x1="38cm" svg:y1="35cm" svg:x2="41.5cm" svg:y2="35cm">
          <text:p/>
        </draw:line>
        <draw:line draw:style-name="gr146" draw:text-style-name="P4" draw:layer="layout" svg:x1="41cm" svg:y1="3cm" svg:x2="39cm" svg:y2="3cm">
          <text:p/>
        </draw:line>
        <draw:custom-shape draw:style-name="gr534" draw:text-style-name="P36" draw:layer="layout" svg:width="3.5cm" svg:height="1cm" svg:x="33cm" svg:y="24cm">
          <text:p text:style-name="P35"><text:span text:style-name="T10">Cache-Controller</text:span></text:p>
          <draw:enhanced-geometry svg:viewBox="0 0 21600 21600" draw:type="rectangle" draw:enhanced-path="M 0 0 L 21600 0 21600 21600 0 21600 0 0 Z N"/>
        </draw:custom-shape>
        <draw:custom-shape draw:style-name="gr534" draw:text-style-name="P36" draw:layer="layout" svg:width="3.5cm" svg:height="1cm" svg:x="33cm" svg:y="24cm">
          <text:p text:style-name="P35"><text:span text:style-name="T10">I-Cache-Controller</text:span></text:p>
          <draw:enhanced-geometry svg:viewBox="0 0 21600 21600" draw:type="rectangle" draw:enhanced-path="M 0 0 L 21600 0 21600 21600 0 21600 0 0 Z N"/>
        </draw:custom-shape>
        <draw:custom-shape draw:style-name="gr534" draw:text-style-name="P36" draw:layer="layout" svg:width="3.5cm" svg:height="1cm" svg:x="44cm" svg:y="24cm">
          <text:p text:style-name="P35"><text:span text:style-name="T10">D-Cache-Controller</text:span></text:p>
          <draw:enhanced-geometry svg:viewBox="0 0 21600 21600" draw:type="rectangle" draw:enhanced-path="M 0 0 L 21600 0 21600 21600 0 21600 0 0 Z N"/>
        </draw:custom-shape>
      </draw:page>
      <draw:page draw:name="page11" draw:style-name="dp1" draw:master-page-name="Standard">
        <draw:line draw:style-name="gr146" draw:text-style-name="P4" draw:layer="layout" svg:x1="13cm" svg:y1="21cm" svg:x2="12cm" svg:y2="22.999cm">
          <text:p/>
        </draw:line>
        <draw:line draw:style-name="gr38" draw:text-style-name="P4" draw:layer="layout" svg:x1="23cm" svg:y1="43.5cm" svg:x2="23cm" svg:y2="41cm">
          <text:p/>
        </draw:line>
        <draw:line draw:style-name="gr38" draw:text-style-name="P4" draw:layer="layout" svg:x1="23cm" svg:y1="41cm" svg:x2="8.5cm" svg:y2="41cm">
          <text:p/>
        </draw:line>
        <draw:line draw:style-name="gr38" draw:text-style-name="P4" draw:layer="layout" svg:x1="8.5cm" svg:y1="41cm" svg:x2="8.5cm" svg:y2="42.1cm">
          <text:p/>
        </draw:line>
        <draw:custom-shape draw:style-name="gr461" draw:text-style-name="P5" draw:layer="layout" svg:width="0.2cm" svg:height="0.2cm" svg:x="18.402cm" svg:y="48.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9.4cm" svg:y1="39.2cm" svg:x2="54cm" svg:y2="39.2cm">
          <text:p/>
        </draw:line>
        <draw:line draw:style-name="gr38" draw:text-style-name="P4" draw:layer="layout" svg:x1="23cm" svg:y1="47.7cm" svg:x2="25cm" svg:y2="47.7cm">
          <text:p/>
        </draw:line>
        <draw:line draw:style-name="gr38" draw:text-style-name="P4" draw:layer="layout" svg:x1="44cm" svg:y1="48cm" svg:x2="44cm" svg:y2="47.5cm">
          <text:p/>
        </draw:line>
        <draw:line draw:style-name="gr38" draw:text-style-name="P4" draw:layer="layout" svg:x1="44cm" svg:y1="48cm" svg:x2="48.5cm" svg:y2="48cm">
          <text:p/>
        </draw:line>
        <draw:line draw:style-name="gr38" draw:text-style-name="P4" draw:layer="layout" svg:x1="48.5cm" svg:y1="49.5cm" svg:x2="48.5cm" svg:y2="48cm">
          <text:p/>
        </draw:line>
        <draw:g draw:style-name="gr1">
          <draw:g draw:style-name="gr66">
            <draw:glue-point draw:id="4" svg:x="-5cm" svg:y="-2.5cm"/>
            <draw:glue-point draw:id="5" svg:x="-5cm" svg:y="2.5cm"/>
            <draw:rect draw:style-name="gr535" draw:text-style-name="P45" draw:layer="layout" svg:width="1cm" svg:height="1cm" svg:x="47cm" svg:y="49cm">
              <text:p text:style-name="P15"><text:span text:style-name="T11">&amp;</text:span></text:p>
            </draw:rect>
            <draw:line draw:style-name="gr536" draw:text-style-name="P17" draw:layer="layout" svg:x1="46.5cm" svg:y1="49.25cm" svg:x2="47cm" svg:y2="49.25cm">
              <text:p/>
            </draw:line>
            <draw:line draw:style-name="gr537" draw:text-style-name="P17" draw:layer="layout" svg:x1="46.5cm" svg:y1="49.75cm" svg:x2="47cm" svg:y2="49.75cm">
              <text:p/>
            </draw:line>
            <draw:line draw:style-name="gr538" draw:text-style-name="P17" draw:layer="layout" svg:x1="48cm" svg:y1="49.5cm" svg:x2="48.5cm" svg:y2="49.5cm">
              <text:p/>
            </draw:line>
            <draw:line draw:style-name="gr539" draw:text-style-name="P21" draw:layer="layout" svg:x1="46.5cm" svg:y1="49.5cm" svg:x2="47cm" svg:y2="49.5cm">
              <text:p/>
            </draw:line>
          </draw:g>
          <draw:frame draw:style-name="gr540" draw:text-style-name="P37" draw:layer="layout" svg:width="1.565cm" svg:height="0.569cm" svg:x="44.435cm" svg:y="48.731cm">
            <draw:text-box>
              <text:p><text:span text:style-name="T10">regWr_s</text:span></text:p>
            </draw:text-box>
          </draw:frame>
          <draw:frame draw:style-name="gr375" draw:text-style-name="P37" draw:layer="layout" svg:width="2.217cm" svg:height="0.569cm" svg:x="43.783cm" svg:y="49.031cm">
            <draw:text-box>
              <text:p><text:span text:style-name="T10">!trap_taken_s</text:span></text:p>
            </draw:text-box>
          </draw:frame>
          <draw:frame draw:style-name="gr374" draw:text-style-name="P37" draw:layer="layout" svg:width="2.407cm" svg:height="0.569cm" svg:x="43.576cm" svg:y="49.331cm">
            <draw:text-box>
              <text:p><text:span text:style-name="T10">instr_commit_s</text:span></text:p>
            </draw:text-box>
          </draw:frame>
          <draw:line draw:style-name="gr38" draw:text-style-name="P4" draw:layer="layout" svg:x1="43cm" svg:y1="49.2cm" svg:x2="46.5cm" svg:y2="49.2cm">
            <text:p/>
          </draw:line>
          <draw:line draw:style-name="gr38" draw:text-style-name="P4" draw:layer="layout" svg:x1="43cm" svg:y1="49.5cm" svg:x2="46.5cm" svg:y2="49.5cm">
            <text:p/>
          </draw:line>
          <draw:line draw:style-name="gr38" draw:text-style-name="P4" draw:layer="layout" svg:x1="43cm" svg:y1="49.8cm" svg:x2="46.5cm" svg:y2="49.8cm">
            <text:p/>
          </draw:line>
          <draw:line draw:style-name="gr38" draw:text-style-name="P4" draw:layer="layout" svg:x1="46.5cm" svg:y1="49.25cm" svg:x2="46.5cm" svg:y2="49.2cm">
            <text:p/>
          </draw:line>
          <draw:line draw:style-name="gr38" draw:text-style-name="P4" draw:layer="layout" svg:x1="46.5cm" svg:y1="49.75cm" svg:x2="46.5cm" svg:y2="49.8cm">
            <text:p/>
          </draw:line>
          <draw:frame draw:style-name="gr541" draw:text-style-name="P37" draw:layer="layout" svg:width="2.246cm" svg:height="0.569cm" svg:x="47.8cm" svg:y="49.4cm">
            <draw:text-box>
              <text:p><text:span text:style-name="T10">regWr_final_s</text:span></text:p>
            </draw:text-box>
          </draw:frame>
        </draw:g>
        <draw:line draw:style-name="gr38" draw:text-style-name="P4" draw:layer="layout" svg:x1="38cm" svg:y1="53.1cm" svg:x2="38cm" svg:y2="37cm">
          <text:p/>
        </draw:line>
        <draw:custom-shape draw:style-name="gr461" draw:text-style-name="P5" draw:layer="layout" svg:width="0.2cm" svg:height="0.2cm" svg:x="37.902cm" svg:y="45.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37.903cm" svg:y="45.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37.904cm" svg:y="44.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9.6cm" svg:y1="48.2cm" svg:x2="49.6cm" svg:y2="41.3cm">
          <text:p/>
        </draw:line>
        <draw:line draw:style-name="gr38" draw:text-style-name="P4" draw:layer="layout" svg:x1="55cm" svg:y1="44.3cm" svg:x2="55cm" svg:y2="50.3cm">
          <text:p/>
        </draw:line>
        <draw:line draw:style-name="gr38" draw:text-style-name="P4" draw:layer="layout" svg:x1="54cm" svg:y1="43.8cm" svg:x2="54cm" svg:y2="49.8cm">
          <text:p/>
        </draw:line>
        <draw:line draw:style-name="gr38" draw:text-style-name="P4" draw:layer="layout" svg:x1="53cm" svg:y1="44.6cm" svg:x2="54cm" svg:y2="44.6cm">
          <text:p/>
        </draw:line>
        <draw:line draw:style-name="gr38" draw:text-style-name="P4" draw:layer="layout" svg:x1="53cm" svg:y1="48cm" svg:x2="55cm" svg:y2="48cm">
          <text:p/>
        </draw:line>
        <draw:line draw:style-name="gr38" draw:text-style-name="P4" draw:layer="layout" svg:x1="56cm" svg:y1="43.8cm" svg:x2="54cm" svg:y2="43.8cm">
          <text:p/>
        </draw:line>
        <draw:line draw:style-name="gr38" draw:text-style-name="P4" draw:layer="layout" svg:x1="56cm" svg:y1="44.3cm" svg:x2="55cm" svg:y2="44.3cm">
          <text:p/>
        </draw:line>
        <draw:line draw:style-name="gr38" draw:text-style-name="P4" draw:layer="layout" svg:x1="56cm" svg:y1="49.8cm" svg:x2="54cm" svg:y2="49.8cm">
          <text:p/>
        </draw:line>
        <draw:line draw:style-name="gr38" draw:text-style-name="P4" draw:layer="layout" svg:x1="56cm" svg:y1="50.3cm" svg:x2="55cm" svg:y2="50.3cm">
          <text:p/>
        </draw:line>
        <draw:custom-shape draw:style-name="gr461" draw:text-style-name="P5" draw:layer="layout" svg:width="0.2cm" svg:height="0.2cm" svg:x="53.906cm" svg:y="44.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54.907cm" svg:y="47.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2" draw:text-style-name="P37" draw:layer="layout" svg:width="2.043cm" svg:height="0.569cm" svg:x="59.8cm" svg:y="43.062cm">
          <draw:text-box>
            <text:p><text:span text:style-name="T10">dBusAddr_s</text:span></text:p>
          </draw:text-box>
        </draw:frame>
        <draw:frame draw:style-name="gr543" draw:text-style-name="P37" draw:layer="layout" svg:width="2.25cm" svg:height="0.569cm" svg:x="59.8cm" svg:y="43.462cm">
          <draw:text-box>
            <text:p><text:span text:style-name="T10">aluCalcRes_s</text:span></text:p>
          </draw:text-box>
        </draw:frame>
        <draw:custom-shape draw:style-name="gr461" draw:text-style-name="P5" draw:layer="layout" svg:width="0.2cm" svg:height="0.2cm" svg:x="37.904cm" svg:y="46.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8cm" svg:y1="52.3cm" svg:x2="41cm" svg:y2="52.3cm">
          <text:p/>
        </draw:line>
        <draw:line draw:style-name="gr38" draw:text-style-name="P4" draw:layer="layout" svg:x1="38cm" svg:y1="52.7cm" svg:x2="41cm" svg:y2="52.702cm">
          <text:p/>
        </draw:line>
        <draw:line draw:style-name="gr38" draw:text-style-name="P4" draw:layer="layout" svg:x1="38cm" svg:y1="53.1cm" svg:x2="41cm" svg:y2="53.1cm">
          <text:p/>
        </draw:line>
        <draw:custom-shape draw:style-name="gr461" draw:text-style-name="P5" draw:layer="layout" svg:width="0.2cm" svg:height="0.2cm" svg:x="37.905cm" svg:y="52.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37.906cm" svg:y="52.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0cm" svg:y1="53.5cm" svg:x2="51.8cm" svg:y2="53.5cm">
          <text:p/>
        </draw:line>
        <draw:line draw:style-name="gr38" draw:text-style-name="P4" draw:layer="layout" svg:x1="51.8cm" svg:y1="53.5cm" svg:x2="51.8cm" svg:y2="49cm">
          <text:p/>
        </draw:line>
        <draw:line draw:style-name="gr38" draw:text-style-name="P4" draw:layer="layout" svg:x1="53.2cm" svg:y1="53.901cm" svg:x2="53.2cm" svg:y2="45.8cm">
          <text:p/>
        </draw:line>
        <draw:line draw:style-name="gr38" draw:text-style-name="P4" draw:layer="layout" svg:x1="53.2cm" svg:y1="45.8cm" svg:x2="51.8cm" svg:y2="45.8cm">
          <text:p/>
        </draw:line>
        <draw:line draw:style-name="gr38" draw:text-style-name="P4" draw:layer="layout" svg:x1="50cm" svg:y1="53.901cm" svg:x2="53.2cm" svg:y2="53.901cm">
          <text:p/>
        </draw:line>
        <draw:line draw:style-name="gr38" draw:text-style-name="P4" draw:layer="layout" svg:x1="42cm" svg:y1="49.2cm" svg:x2="43cm" svg:y2="49.2cm">
          <text:p/>
        </draw:line>
        <draw:line draw:style-name="gr38" draw:text-style-name="P4" draw:layer="layout" svg:x1="51cm" svg:y1="54.301cm" svg:x2="51cm" svg:y2="50.5cm">
          <text:p/>
        </draw:line>
        <draw:line draw:style-name="gr38" draw:text-style-name="P4" draw:layer="layout" svg:x1="42cm" svg:y1="50.5cm" svg:x2="42cm" svg:y2="49.2cm">
          <text:p/>
        </draw:line>
        <draw:line draw:style-name="gr38" draw:text-style-name="P4" draw:layer="layout" svg:x1="42cm" svg:y1="50.5cm" svg:x2="51cm" svg:y2="50.5cm">
          <text:p/>
        </draw:line>
        <draw:line draw:style-name="gr38" draw:text-style-name="P4" draw:layer="layout" svg:x1="50cm" svg:y1="54.301cm" svg:x2="51cm" svg:y2="54.301cm">
          <text:p/>
        </draw:line>
        <draw:line draw:style-name="gr38" draw:text-style-name="P4" draw:layer="layout" svg:x1="50cm" svg:y1="55.901cm" svg:x2="58.5cm" svg:y2="55.9cm">
          <text:p/>
        </draw:line>
        <draw:line draw:style-name="gr38" draw:text-style-name="P4" draw:layer="layout" svg:x1="50cm" svg:y1="55.5cm" svg:x2="55.5cm" svg:y2="55.5cm">
          <text:p/>
        </draw:line>
        <draw:line draw:style-name="gr38" draw:text-style-name="P4" draw:layer="layout" svg:x1="58.5cm" svg:y1="55.9cm" svg:x2="58.5cm" svg:y2="52.001cm">
          <text:p/>
        </draw:line>
        <draw:line draw:style-name="gr38" draw:text-style-name="P4" draw:layer="layout" svg:x1="55.5cm" svg:y1="48.5cm" svg:x2="58.5cm" svg:y2="48.5cm">
          <text:p/>
        </draw:line>
        <draw:line draw:style-name="gr38" draw:text-style-name="P4" draw:layer="layout" svg:x1="55.5cm" svg:y1="55.5cm" svg:x2="55.5cm" svg:y2="48.5cm">
          <text:p/>
        </draw:line>
        <draw:line draw:style-name="gr38" draw:text-style-name="P4" draw:layer="layout" svg:x1="62cm" svg:y1="58cm" svg:x2="62cm" svg:y2="50.5cm">
          <text:p/>
        </draw:line>
        <draw:line draw:style-name="gr38" draw:text-style-name="P4" draw:layer="layout" svg:x1="8.6cm" svg:y1="58cm" svg:x2="62cm" svg:y2="58cm">
          <text:p/>
        </draw:line>
        <draw:line draw:style-name="gr38" draw:text-style-name="P4" draw:layer="layout" svg:x1="40cm" svg:y1="53.5cm" svg:x2="41cm" svg:y2="53.501cm">
          <text:p/>
        </draw:line>
        <draw:line draw:style-name="gr38" draw:text-style-name="P4" draw:layer="layout" svg:x1="40cm" svg:y1="58cm" svg:x2="40cm" svg:y2="53.5cm">
          <text:p/>
        </draw:line>
        <draw:line draw:style-name="gr38" draw:text-style-name="P4" draw:layer="layout" svg:x1="8.6cm" svg:y1="58cm" svg:x2="8.6cm" svg:y2="43.5cm">
          <text:p/>
        </draw:line>
        <draw:custom-shape draw:style-name="gr461" draw:text-style-name="P5" draw:layer="layout" svg:width="0.2cm" svg:height="0.2cm" svg:x="39.907cm" svg:y="57.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3.5cm" svg:y1="55.1cm" svg:x2="53.5cm" svg:y2="43.3cm">
          <text:p/>
        </draw:line>
        <draw:line draw:style-name="gr38" draw:text-style-name="P4" draw:layer="layout" svg:x1="45cm" svg:y1="43.3cm" svg:x2="53.5cm" svg:y2="43.3cm">
          <text:p/>
        </draw:line>
        <draw:line draw:style-name="gr38" draw:text-style-name="P4" draw:layer="layout" svg:x1="50cm" svg:y1="55.102cm" svg:x2="53.5cm" svg:y2="55.1cm">
          <text:p/>
        </draw:line>
        <draw:line draw:style-name="gr38" draw:text-style-name="P4" draw:layer="layout" svg:x1="76cm" svg:y1="41.2cm" svg:x2="77cm" svg:y2="41.2cm">
          <text:p/>
        </draw:line>
        <draw:line draw:style-name="gr38" draw:text-style-name="P4" draw:layer="layout" svg:x1="79.8cm" svg:y1="52.3cm" svg:x2="79.8cm" svg:y2="42.2cm">
          <text:p/>
        </draw:line>
        <draw:line draw:style-name="gr38" draw:text-style-name="P4" draw:layer="layout" svg:x1="50cm" svg:y1="52.3cm" svg:x2="79.8cm" svg:y2="52.3cm">
          <text:p/>
        </draw:line>
        <draw:line draw:style-name="gr38" draw:text-style-name="P4" draw:layer="layout" svg:x1="50cm" svg:y1="52.701cm" svg:x2="62.5cm" svg:y2="52.701cm">
          <text:p/>
        </draw:line>
        <draw:line draw:style-name="gr38" draw:text-style-name="P4" draw:layer="layout" svg:x1="62.5cm" svg:y1="47.501cm" svg:x2="66cm" svg:y2="47.5cm">
          <text:p/>
        </draw:line>
        <draw:line draw:style-name="gr38" draw:text-style-name="P4" draw:layer="layout" svg:x1="62.5cm" svg:y1="52.701cm" svg:x2="62.5cm" svg:y2="47.5cm">
          <text:p/>
        </draw:line>
        <draw:line draw:style-name="gr38" draw:text-style-name="P4" draw:layer="layout" svg:x1="50cm" svg:y1="54.7cm" svg:x2="54.5cm" svg:y2="54.7cm">
          <text:p/>
        </draw:line>
        <draw:line draw:style-name="gr38" draw:text-style-name="P4" draw:layer="layout" svg:x1="75cm" svg:y1="40.9cm" svg:x2="77cm" svg:y2="40.9cm">
          <text:p/>
        </draw:line>
        <draw:line draw:style-name="gr38" draw:text-style-name="P4" draw:layer="layout" svg:x1="75cm" svg:y1="44.5cm" svg:x2="75cm" svg:y2="40.9cm">
          <text:p/>
        </draw:line>
        <draw:custom-shape draw:style-name="gr461" draw:text-style-name="P5" draw:layer="layout" svg:width="0.2cm" svg:height="0.2cm" svg:x="62.406cm" svg:y="44.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8.503cm" svg:y1="39.5cm" svg:x2="38.503cm" svg:y2="44.6cm">
          <text:p/>
        </draw:line>
        <draw:line draw:style-name="gr38" draw:text-style-name="P4" draw:layer="layout" svg:x1="38.503cm" svg:y1="39.5cm" svg:x2="82cm" svg:y2="39.5cm">
          <text:p/>
        </draw:line>
        <draw:line draw:style-name="gr38" draw:text-style-name="P4" draw:layer="layout" svg:x1="82cm" svg:y1="40.7cm" svg:x2="82cm" svg:y2="39.5cm">
          <text:p/>
        </draw:line>
        <draw:line draw:style-name="gr38" draw:text-style-name="P4" draw:layer="layout" svg:x1="81.5cm" svg:y1="40.7cm" svg:x2="82cm" svg:y2="40.7cm">
          <text:p/>
        </draw:line>
        <draw:line draw:style-name="gr38" draw:text-style-name="P4" draw:layer="layout" svg:x1="49.9cm" svg:y1="47.8cm" svg:x2="49.9cm" svg:y2="46.401cm">
          <text:p/>
        </draw:line>
        <draw:custom-shape draw:style-name="gr461" draw:text-style-name="P5" draw:layer="layout" svg:width="0.2cm" svg:height="0.2cm" svg:x="49.808cm" svg:y="46.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50.001cm" svg:y="5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50.002cm" svg:y="53.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49.206cm" svg:y="44.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9.3cm" svg:y1="38cm" svg:x2="49.3cm" svg:y2="44.3cm">
          <text:p/>
        </draw:line>
        <draw:g draw:style-name="gr1">
          <draw:frame draw:style-name="gr545" draw:text-style-name="P37" draw:layer="layout" svg:width="1.886cm" svg:height="0.569cm" svg:x="43.328cm" svg:y="15.175cm">
            <draw:text-box>
              <text:p><text:span text:style-name="T10">irq_ext_i[7]</text:span></text:p>
            </draw:text-box>
          </draw:frame>
          <draw:frame draw:style-name="gr546" draw:text-style-name="P37" draw:layer="layout" svg:width="2.551cm" svg:height="0.569cm" svg:x="45.3cm" svg:y="14.575cm">
            <draw:text-box>
              <text:p><text:span text:style-name="T10">irq_ext_sync1_s</text:span></text:p>
            </draw:text-box>
          </draw:frame>
          <draw:line draw:style-name="gr38" draw:text-style-name="P4" draw:layer="layout" svg:x1="44.5cm" svg:y1="15cm" svg:x2="45.5cm" svg:y2="15cm">
            <text:p/>
          </draw:line>
          <draw:line draw:style-name="gr38" draw:text-style-name="P4" draw:layer="layout" svg:x1="45.5cm" svg:y1="15cm" svg:x2="48cm" svg:y2="15cm">
            <text:p/>
          </draw:line>
          <draw:g draw:style-name="gr1">
            <draw:custom-shape draw:style-name="gr165" draw:text-style-name="P14" draw:layer="layout" svg:width="0.4cm" svg:height="0.4cm" svg:x="44.3cm" svg:y="14.8cm">
              <text:p/>
              <draw:enhanced-geometry svg:viewBox="0 0 21600 21600" draw:type="rectangle" draw:enhanced-path="M 0 0 L 21600 0 21600 21600 0 21600 0 0 Z N"/>
            </draw:custom-shape>
            <draw:line draw:style-name="gr547" draw:text-style-name="P47" draw:layer="layout" svg:x1="44.3cm" svg:y1="14.8cm" svg:x2="44.7cm" svg:y2="15.2cm">
              <text:p/>
            </draw:line>
            <draw:line draw:style-name="gr547" draw:text-style-name="P47" draw:layer="layout" svg:x1="44.3cm" svg:y1="15.2cm" svg:x2="44.7cm" svg:y2="14.8cm">
              <text:p/>
            </draw:line>
          </draw:g>
          <draw:line draw:style-name="gr38" draw:text-style-name="P4" draw:layer="layout" svg:x1="48.5cm" svg:y1="15cm" svg:x2="51cm" svg:y2="15cm">
            <text:p/>
          </draw:line>
          <draw:frame draw:style-name="gr546" draw:text-style-name="P37" draw:layer="layout" svg:width="2.551cm" svg:height="0.569cm" svg:x="48.349cm" svg:y="14.531cm">
            <draw:text-box>
              <text:p><text:span text:style-name="T10">irq_ext_sync2_s</text:span></text:p>
            </draw:text-box>
          </draw:frame>
          <draw:custom-shape draw:style-name="gr548" draw:text-style-name="P43" draw:layer="layout" svg:width="8cm" svg:height="2cm" svg:x="43cm" svg:y="14cm">
            <text:p/>
            <draw:enhanced-geometry svg:viewBox="0 0 21600 21600" draw:type="rectangle" draw:enhanced-path="M 0 0 L 21600 0 21600 21600 0 21600 0 0 Z N"/>
          </draw:custom-shape>
          <draw:frame draw:style-name="gr549" draw:text-style-name="P44" draw:layer="layout" svg:width="1.857cm" svg:height="0.569cm" svg:x="45.8cm" svg:y="15.231cm">
            <draw:text-box>
              <text:p><text:span text:style-name="T12">IRQ: Sync</text:span></text:p>
            </draw:text-box>
          </draw:frame>
          <draw:g draw:style-name="gr1">
            <draw:custom-shape draw:style-name="gr550" draw:text-style-name="P48" draw:layer="layout" svg:width="0.5cm" svg:height="1cm" svg:x="45cm" svg:y="14.5cm">
              <text:p/>
              <draw:enhanced-geometry svg:viewBox="0 0 21600 21600" draw:mirror-horizontal="false" draw:mirror-vertical="false" draw:type="rectangle" draw:enhanced-path="M 0 0 L 21600 0 21600 21600 0 21600 0 0 Z N"/>
            </draw:custom-shape>
            <draw:line draw:style-name="gr60" draw:text-style-name="P11" draw:layer="layout" svg:x1="45cm" svg:y1="15.45cm" svg:x2="45.15cm" svg:y2="15.4cm">
              <text:p/>
            </draw:line>
            <draw:line draw:style-name="gr60" draw:text-style-name="P11" draw:layer="layout" svg:x1="45cm" svg:y1="15.35cm" svg:x2="45.15cm" svg:y2="15.4cm">
              <text:p/>
            </draw:line>
          </draw:g>
          <draw:g draw:style-name="gr1">
            <draw:custom-shape draw:style-name="gr550" draw:text-style-name="P48" draw:layer="layout" svg:width="0.5cm" svg:height="1cm" svg:x="48cm" svg:y="14.5cm">
              <text:p/>
              <draw:enhanced-geometry svg:viewBox="0 0 21600 21600" draw:mirror-horizontal="false" draw:mirror-vertical="false" draw:type="rectangle" draw:enhanced-path="M 0 0 L 21600 0 21600 21600 0 21600 0 0 Z N"/>
            </draw:custom-shape>
            <draw:line draw:style-name="gr60" draw:text-style-name="P11" draw:layer="layout" svg:x1="48cm" svg:y1="15.45cm" svg:x2="48.15cm" svg:y2="15.4cm">
              <text:p/>
            </draw:line>
            <draw:line draw:style-name="gr60" draw:text-style-name="P11" draw:layer="layout" svg:x1="48cm" svg:y1="15.35cm" svg:x2="48.15cm" svg:y2="15.4cm">
              <text:p/>
            </draw:line>
          </draw:g>
        </draw:g>
        <draw:g draw:style-name="gr1">
          <draw:frame draw:style-name="gr541" draw:text-style-name="P37" draw:layer="layout" svg:width="2.246cm" svg:height="0.569cm" svg:x="52.3cm" svg:y="14.5cm">
            <draw:text-box>
              <text:p><text:span text:style-name="T10">csr_mip_s[11]</text:span></text:p>
            </draw:text-box>
          </draw:frame>
          <draw:line draw:style-name="gr38" draw:text-style-name="P4" draw:layer="layout" svg:x1="52.5cm" svg:y1="15cm" svg:x2="55cm" svg:y2="15cm">
            <text:p/>
          </draw:line>
          <draw:custom-shape draw:style-name="gr551" draw:text-style-name="P43" draw:layer="layout" svg:width="4cm" svg:height="2cm" svg:x="51cm" svg:y="14cm">
            <text:p/>
            <draw:enhanced-geometry svg:viewBox="0 0 21600 21600" draw:type="rectangle" draw:enhanced-path="M 0 0 L 21600 0 21600 21600 0 21600 0 0 Z N"/>
          </draw:custom-shape>
          <draw:frame draw:style-name="gr552" draw:text-style-name="P44" draw:layer="layout" svg:width="1.776cm" svg:height="0.569cm" svg:x="53.194cm" svg:y="14.031cm">
            <draw:text-box>
              <text:p><text:span text:style-name="T12">CSR: MIP</text:span></text:p>
            </draw:text-box>
          </draw:frame>
          <draw:g draw:style-name="gr1">
            <draw:custom-shape draw:style-name="gr550" draw:text-style-name="P48" draw:layer="layout" svg:width="0.5cm" svg:height="1cm" svg:x="52cm" svg:y="14.5cm">
              <text:p/>
              <draw:enhanced-geometry svg:viewBox="0 0 21600 21600" draw:mirror-horizontal="false" draw:mirror-vertical="false" draw:type="rectangle" draw:enhanced-path="M 0 0 L 21600 0 21600 21600 0 21600 0 0 Z N"/>
            </draw:custom-shape>
            <draw:line draw:style-name="gr60" draw:text-style-name="P11" draw:layer="layout" svg:x1="52cm" svg:y1="15.45cm" svg:x2="52.15cm" svg:y2="15.4cm">
              <text:p/>
            </draw:line>
            <draw:line draw:style-name="gr60" draw:text-style-name="P11" draw:layer="layout" svg:x1="52cm" svg:y1="15.35cm" svg:x2="52.15cm" svg:y2="15.4cm">
              <text:p/>
            </draw:line>
          </draw:g>
          <draw:line draw:style-name="gr38" draw:text-style-name="P4" draw:layer="layout" svg:x1="51cm" svg:y1="15cm" svg:x2="52cm" svg:y2="15cm">
            <text:p/>
          </draw:line>
        </draw:g>
        <draw:g draw:style-name="gr1">
          <draw:g draw:style-name="gr1">
            <draw:frame draw:style-name="gr553" draw:text-style-name="P37" draw:layer="layout" svg:width="0.955cm" svg:height="0.569cm" svg:x="35.346cm" svg:y="45.73cm">
              <draw:text-box>
                <text:p><text:span text:style-name="T10">ir_s</text:span></text:p>
              </draw:text-box>
            </draw:frame>
            <draw:g draw:style-name="gr1">
              <draw:custom-shape draw:style-name="gr554" draw:text-style-name="P50" draw:layer="layout" svg:width="0.5cm" svg:height="1cm" svg:x="35.001cm" svg:y="46cm">
                <text:p text:style-name="P49"><text:span text:style-name="T10">IR</text:span></text:p>
                <draw:enhanced-geometry svg:viewBox="0 0 21600 21600" draw:mirror-horizontal="false" draw:mirror-vertical="false" draw:type="rectangle" draw:enhanced-path="M 0 0 L 21600 0 21600 21600 0 21600 0 0 Z N"/>
              </draw:custom-shape>
              <draw:line draw:style-name="gr60" draw:text-style-name="P11" draw:layer="layout" svg:x1="35.001cm" svg:y1="46.95cm" svg:x2="35.151cm" svg:y2="46.9cm">
                <text:p/>
              </draw:line>
              <draw:line draw:style-name="gr60" draw:text-style-name="P11" draw:layer="layout" svg:x1="35.001cm" svg:y1="46.85cm" svg:x2="35.151cm" svg:y2="46.9cm">
                <text:p/>
              </draw:line>
              <draw:frame draw:style-name="gr555" draw:text-style-name="P37" draw:layer="layout" svg:width="0.659cm" svg:height="0.569cm" svg:x="34.801cm" svg:y="45.931cm">
                <draw:text-box>
                  <text:p><text:span text:style-name="T10">d</text:span></text:p>
                </draw:text-box>
              </draw:frame>
            </draw:g>
            <draw:polygon draw:style-name="gr58" draw:text-style-name="P1" draw:layer="layout" svg:width="0.499cm" svg:height="0.999cm" svg:x="31.001cm" svg:y="47cm" svg:viewBox="0 0 500 1000" draw:points="0,0 0,1000 500,850 500,150">
              <text:p/>
            </draw:polygon>
            <draw:line draw:style-name="gr38" draw:text-style-name="P4" draw:layer="layout" svg:x1="35.501cm" svg:y1="46.2cm" svg:x2="37cm" svg:y2="46.2cm">
              <text:p/>
            </draw:line>
            <draw:frame draw:style-name="gr556" draw:text-style-name="P37" draw:layer="layout" svg:width="2.614cm" svg:height="0.569cm" svg:x="28.9cm" svg:y="48.1cm">
              <draw:text-box>
                <text:p><text:span text:style-name="T10">!mret_pending_s</text:span></text:p>
              </draw:text-box>
            </draw:frame>
            <draw:line draw:style-name="gr146" draw:text-style-name="P4" draw:layer="layout" svg:x1="31.3cm" svg:y1="49cm" svg:x2="31.301cm" svg:y2="47.9cm">
              <text:p/>
            </draw:line>
            <draw:line draw:style-name="gr38" draw:text-style-name="P4" draw:layer="layout" svg:x1="29.5cm" svg:y1="47.299cm" svg:x2="31.001cm" svg:y2="47.3cm">
              <text:p/>
            </draw:line>
            <draw:line draw:style-name="gr38" draw:text-style-name="P4" draw:layer="layout" svg:x1="25cm" svg:y1="47.7cm" svg:x2="31.001cm" svg:y2="47.7cm">
              <text:p/>
            </draw:line>
            <draw:frame draw:style-name="gr557" draw:text-style-name="P37" draw:layer="layout" svg:width="2.314cm" svg:height="0.569cm" svg:x="28.901cm" svg:y="47.331cm">
              <draw:text-box>
                <text:p><text:span text:style-name="T10">iBusDataRd_s</text:span></text:p>
              </draw:text-box>
            </draw:frame>
            <draw:line draw:style-name="gr38" draw:text-style-name="P4" draw:layer="layout" svg:x1="35.501cm" svg:y1="46.7cm" svg:x2="37cm" svg:y2="46.7cm">
              <text:p/>
            </draw:line>
            <draw:frame draw:style-name="gr558" draw:text-style-name="P37" draw:layer="layout" svg:width="1.7cm" svg:height="0.569cm" svg:x="35.301cm" svg:y="46.261cm">
              <draw:text-box>
                <text:p><text:span text:style-name="T10">ir_valid_s</text:span></text:p>
              </draw:text-box>
            </draw:frame>
            <draw:line draw:style-name="gr38" draw:text-style-name="P4" draw:layer="layout" svg:x1="29.501cm" svg:y1="47.8cm" svg:x2="31.001cm" svg:y2="47.8cm">
              <text:p/>
            </draw:line>
            <draw:frame draw:style-name="gr559" draw:text-style-name="P37" draw:layer="layout" svg:width="1.035cm" svg:height="0.569cm" svg:x="30.201cm" svg:y="47.632cm">
              <draw:text-box>
                <text:p><text:span text:style-name="T10">1‘b1</text:span></text:p>
              </draw:text-box>
            </draw:frame>
            <draw:line draw:style-name="gr38" draw:text-style-name="P4" draw:layer="layout" svg:x1="29.5cm" svg:y1="47.199cm" svg:x2="31.001cm" svg:y2="47.2cm">
              <text:p/>
            </draw:line>
            <draw:frame draw:style-name="gr560" draw:text-style-name="P37" draw:layer="layout" svg:width="2.288cm" svg:height="0.569cm" svg:x="28.9cm" svg:y="46.83cm">
              <draw:text-box>
                <text:p><text:span text:style-name="T10">32'h00000013</text:span></text:p>
              </draw:text-box>
            </draw:frame>
            <draw:frame draw:style-name="gr559" draw:text-style-name="P37" draw:layer="layout" svg:width="1.035cm" svg:height="0.569cm" svg:x="30.18cm" svg:y="47.063cm">
              <draw:text-box>
                <text:p><text:span text:style-name="T10">1‘b0</text:span></text:p>
              </draw:text-box>
            </draw:frame>
            <draw:polygon draw:style-name="gr58" draw:text-style-name="P1" draw:layer="layout" svg:width="0.499cm" svg:height="0.999cm" svg:x="33cm" svg:y="45.699cm" svg:viewBox="0 0 500 1000" draw:points="0,0 0,1000 500,850 500,150">
              <text:p/>
            </draw:polygon>
            <draw:line draw:style-name="gr146" draw:text-style-name="P4" draw:layer="layout" svg:x1="33.3cm" svg:y1="47.099cm" svg:x2="33.3cm" svg:y2="46.599cm">
              <text:p/>
            </draw:line>
            <draw:line draw:style-name="gr38" draw:text-style-name="P4" draw:layer="layout" svg:x1="32.4cm" svg:y1="45.999cm" svg:x2="33cm" svg:y2="45.999cm">
              <text:p/>
            </draw:line>
            <draw:line draw:style-name="gr38" draw:text-style-name="P4" draw:layer="layout" svg:x1="32.5cm" svg:y1="46.399cm" svg:x2="33cm" svg:y2="46.399cm">
              <text:p/>
            </draw:line>
            <draw:line draw:style-name="gr38" draw:text-style-name="P4" draw:layer="layout" svg:x1="33.5cm" svg:y1="46.199cm" svg:x2="35.001cm" svg:y2="46.199cm">
              <text:p/>
            </draw:line>
            <draw:line draw:style-name="gr38" draw:text-style-name="P4" draw:layer="layout" svg:x1="33.5cm" svg:y1="46.299cm" svg:x2="35cm" svg:y2="46.299cm">
              <text:p/>
            </draw:line>
            <draw:line draw:style-name="gr38" draw:text-style-name="P4" draw:layer="layout" svg:x1="32.5cm" svg:y1="45.899cm" svg:x2="33cm" svg:y2="45.899cm">
              <text:p/>
            </draw:line>
            <draw:line draw:style-name="gr38" draw:text-style-name="P4" draw:layer="layout" svg:x1="32.6cm" svg:y1="46.499cm" svg:x2="33cm" svg:y2="46.499cm">
              <text:p/>
            </draw:line>
            <draw:frame draw:style-name="gr561" draw:text-style-name="P51" draw:layer="layout" svg:width="2.504cm" svg:height="0.569cm" svg:x="32.7cm" svg:y="47.03cm">
              <draw:text-box>
                <text:p><text:span text:style-name="T13">fetch1_phase_s</text:span></text:p>
              </draw:text-box>
            </draw:frame>
            <draw:line draw:style-name="gr38" draw:text-style-name="P4" draw:layer="layout" svg:x1="31.501cm" svg:y1="47.499cm" svg:x2="32.5cm" svg:y2="47.499cm">
              <text:p/>
            </draw:line>
            <draw:line draw:style-name="gr38" draw:text-style-name="P4" draw:layer="layout" svg:x1="31.501cm" svg:y1="47.599cm" svg:x2="32.6cm" svg:y2="47.599cm">
              <text:p/>
            </draw:line>
            <draw:line draw:style-name="gr38" draw:text-style-name="P4" draw:layer="layout" svg:x1="32.5cm" svg:y1="47.499cm" svg:x2="32.5cm" svg:y2="46.399cm">
              <text:p/>
            </draw:line>
            <draw:line draw:style-name="gr38" draw:text-style-name="P4" draw:layer="layout" svg:x1="32.6cm" svg:y1="47.599cm" svg:x2="32.6cm" svg:y2="46.499cm">
              <text:p/>
            </draw:line>
            <draw:polygon draw:style-name="gr58" draw:text-style-name="P1" draw:layer="layout" svg:width="0.499cm" svg:height="0.999cm" svg:x="31.002cm" svg:y="45cm" svg:viewBox="0 0 500 1000" draw:points="0,0 0,1000 500,850 500,150">
              <text:p/>
            </draw:polygon>
            <draw:frame draw:style-name="gr562" draw:text-style-name="P37" draw:layer="layout" svg:width="2.14cm" svg:height="0.569cm" svg:x="29.402cm" svg:y="46.031cm">
              <draw:text-box>
                <text:p><text:span text:style-name="T10">trap_taken_s</text:span></text:p>
              </draw:text-box>
            </draw:frame>
            <draw:line draw:style-name="gr146" draw:text-style-name="P4" draw:layer="layout" svg:x1="31.3cm" svg:y1="46.5cm" svg:x2="31.302cm" svg:y2="45.9cm">
              <text:p/>
            </draw:line>
            <draw:line draw:style-name="gr38" draw:text-style-name="P4" draw:layer="layout" svg:x1="30.401cm" svg:y1="45.299cm" svg:x2="31.002cm" svg:y2="45.3cm">
              <text:p/>
            </draw:line>
            <draw:line draw:style-name="gr38" draw:text-style-name="P4" draw:layer="layout" svg:x1="29.502cm" svg:y1="45.7cm" svg:x2="31.002cm" svg:y2="45.7cm">
              <text:p/>
            </draw:line>
            <draw:frame draw:style-name="gr563" draw:text-style-name="P37" draw:layer="layout" svg:width="4.096cm" svg:height="0.569cm" svg:x="25.4cm" svg:y="43.999cm">
              <draw:text-box>
                <text:p><text:span text:style-name="T10">is_mret_s &amp;&amp; </text:span><text:span text:style-name="T13">exec_phase_s</text:span></text:p>
              </draw:text-box>
            </draw:frame>
            <draw:line draw:style-name="gr38" draw:text-style-name="P4" draw:layer="layout" svg:x1="29.502cm" svg:y1="45.8cm" svg:x2="31.002cm" svg:y2="45.8cm">
              <text:p/>
            </draw:line>
            <draw:frame draw:style-name="gr559" draw:text-style-name="P37" draw:layer="layout" svg:width="1.035cm" svg:height="0.569cm" svg:x="30.202cm" svg:y="45.632cm">
              <draw:text-box>
                <text:p><text:span text:style-name="T10">1‘b0</text:span></text:p>
              </draw:text-box>
            </draw:frame>
            <draw:line draw:style-name="gr38" draw:text-style-name="P4" draw:layer="layout" svg:x1="30.5cm" svg:y1="45.199cm" svg:x2="31.002cm" svg:y2="45.2cm">
              <text:p/>
            </draw:line>
            <draw:frame draw:style-name="gr560" draw:text-style-name="P37" draw:layer="layout" svg:width="2.288cm" svg:height="0.569cm" svg:x="28.901cm" svg:y="45.33cm">
              <draw:text-box>
                <text:p><text:span text:style-name="T10">32'h00000013</text:span></text:p>
              </draw:text-box>
            </draw:frame>
            <draw:line draw:style-name="gr38" draw:text-style-name="P4" draw:layer="layout" svg:x1="31.502cm" svg:y1="45.499cm" svg:x2="32.501cm" svg:y2="45.499cm">
              <text:p/>
            </draw:line>
            <draw:line draw:style-name="gr38" draw:text-style-name="P4" draw:layer="layout" svg:x1="31.502cm" svg:y1="45.599cm" svg:x2="32.4cm" svg:y2="45.599cm">
              <text:p/>
            </draw:line>
            <draw:line draw:style-name="gr38" draw:text-style-name="P4" draw:layer="layout" svg:x1="32.501cm" svg:y1="45.499cm" svg:x2="32.5cm" svg:y2="45.899cm">
              <text:p/>
            </draw:line>
            <draw:line draw:style-name="gr38" draw:text-style-name="P4" draw:layer="layout" svg:x1="32.4cm" svg:y1="45.599cm" svg:x2="32.4cm" svg:y2="45.999cm">
              <text:p/>
            </draw:line>
            <draw:polygon draw:style-name="gr58" draw:text-style-name="P1" draw:layer="layout" svg:width="0.499cm" svg:height="0.999cm" svg:x="29.003cm" svg:y="43cm" svg:viewBox="0 0 500 1000" draw:points="0,0 0,1000 500,850 500,150">
              <text:p/>
            </draw:polygon>
            <draw:line draw:style-name="gr146" draw:text-style-name="P4" draw:layer="layout" svg:x1="29.303cm" svg:y1="44.4cm" svg:x2="29.303cm" svg:y2="43.9cm">
              <text:p/>
            </draw:line>
            <draw:line draw:style-name="gr38" draw:text-style-name="P4" draw:layer="layout" svg:x1="28.5cm" svg:y1="43.299cm" svg:x2="29.003cm" svg:y2="43.3cm">
              <text:p/>
            </draw:line>
            <draw:line draw:style-name="gr38" draw:text-style-name="P4" draw:layer="layout" svg:x1="27.503cm" svg:y1="43.7cm" svg:x2="29.003cm" svg:y2="43.7cm">
              <text:p/>
            </draw:line>
            <draw:line draw:style-name="gr38" draw:text-style-name="P4" draw:layer="layout" svg:x1="27.503cm" svg:y1="43.8cm" svg:x2="29.003cm" svg:y2="43.8cm">
              <text:p/>
            </draw:line>
            <draw:frame draw:style-name="gr559" draw:text-style-name="P37" draw:layer="layout" svg:width="1.035cm" svg:height="0.569cm" svg:x="28.203cm" svg:y="43.632cm">
              <draw:text-box>
                <text:p><text:span text:style-name="T10">1‘b0</text:span></text:p>
              </draw:text-box>
            </draw:frame>
            <draw:line draw:style-name="gr38" draw:text-style-name="P4" draw:layer="layout" svg:x1="28.5cm" svg:y1="43.199cm" svg:x2="29.003cm" svg:y2="43.2cm">
              <text:p/>
            </draw:line>
            <draw:frame draw:style-name="gr560" draw:text-style-name="P37" draw:layer="layout" svg:width="2.288cm" svg:height="0.569cm" svg:x="26.902cm" svg:y="43.33cm">
              <draw:text-box>
                <text:p><text:span text:style-name="T10">32'h00000013</text:span></text:p>
              </draw:text-box>
            </draw:frame>
            <draw:frame draw:style-name="gr564" draw:text-style-name="P37" draw:layer="layout" svg:width="1.129cm" svg:height="0.569cm" svg:x="27.6cm" svg:y="42.93cm">
              <draw:text-box>
                <text:p><text:span text:style-name="T10">store</text:span></text:p>
              </draw:text-box>
            </draw:frame>
            <draw:line draw:style-name="gr38" draw:text-style-name="P4" draw:layer="layout" svg:x1="29.503cm" svg:y1="43.499cm" svg:x2="30.502cm" svg:y2="43.499cm">
              <text:p/>
            </draw:line>
            <draw:line draw:style-name="gr38" draw:text-style-name="P4" draw:layer="layout" svg:x1="29.503cm" svg:y1="43.599cm" svg:x2="30.401cm" svg:y2="43.599cm">
              <text:p/>
            </draw:line>
            <draw:line draw:style-name="gr38" draw:text-style-name="P4" draw:layer="layout" svg:x1="30.502cm" svg:y1="43.499cm" svg:x2="30.5cm" svg:y2="45.199cm">
              <text:p/>
            </draw:line>
            <draw:line draw:style-name="gr38" draw:text-style-name="P4" draw:layer="layout" svg:x1="30.401cm" svg:y1="43.599cm" svg:x2="30.4cm" svg:y2="45.3cm">
              <text:p/>
            </draw:line>
            <draw:line draw:style-name="gr38" draw:text-style-name="P4" draw:layer="layout" svg:x1="25.6cm" svg:y1="44.3cm" svg:x2="25cm" svg:y2="44.3cm">
              <text:p/>
            </draw:line>
            <draw:line draw:style-name="gr38" draw:text-style-name="P4" draw:layer="layout" svg:x1="31.3cm" svg:y1="46.5cm" svg:x2="25.008cm" svg:y2="46.5cm">
              <text:p/>
            </draw:line>
          </draw:g>
          <draw:frame draw:style-name="gr565" draw:text-style-name="P44" draw:layer="layout" svg:width="2.094cm" svg:height="0.569cm" svg:x="33.506cm" svg:y="45cm">
            <draw:text-box>
              <text:p><text:span text:style-name="T12">IR: Register</text:span></text:p>
            </draw:text-box>
          </draw:frame>
          <draw:custom-shape draw:style-name="gr566" draw:text-style-name="P43" draw:layer="layout" svg:width="12cm" svg:height="6.5cm" svg:x="25cm" svg:y="42.5cm">
            <text:p/>
            <draw:enhanced-geometry svg:viewBox="0 0 21600 21600" draw:type="rectangle" draw:enhanced-path="M 0 0 L 21600 0 21600 21600 0 21600 0 0 Z N"/>
          </draw:custom-shape>
        </draw:g>
        <draw:g draw:style-name="gr1">
          <draw:g draw:style-name="gr1">
            <draw:frame draw:style-name="gr567" draw:text-style-name="P37" draw:layer="layout" svg:width="1.73cm" svg:height="0.569cm" svg:x="9.839cm" svg:y="10.031cm">
              <draw:text-box>
                <text:p><text:span text:style-name="T10">is_mret_s</text:span></text:p>
              </draw:text-box>
            </draw:frame>
            <draw:g draw:style-name="gr66">
              <draw:glue-point draw:id="4" svg:x="-5cm" svg:y="-2.5cm"/>
              <draw:glue-point draw:id="5" svg:x="-5cm" svg:y="2.5cm"/>
              <draw:rect draw:style-name="gr568" draw:text-style-name="P45" draw:layer="layout" svg:width="1cm" svg:height="1cm" svg:x="8.986cm" svg:y="10cm">
                <text:p text:style-name="P15"><text:span text:style-name="T11">&amp;</text:span></text:p>
              </draw:rect>
              <draw:line draw:style-name="gr569" draw:text-style-name="P17" draw:layer="layout" svg:x1="8.486cm" svg:y1="10.25cm" svg:x2="8.986cm" svg:y2="10.25cm">
                <text:p/>
              </draw:line>
              <draw:line draw:style-name="gr570" draw:text-style-name="P17" draw:layer="layout" svg:x1="8.486cm" svg:y1="10.75cm" svg:x2="8.986cm" svg:y2="10.75cm">
                <text:p/>
              </draw:line>
              <draw:line draw:style-name="gr571" draw:text-style-name="P17" draw:layer="layout" svg:x1="9.986cm" svg:y1="10.5cm" svg:x2="10.486cm" svg:y2="10.5cm">
                <text:p/>
              </draw:line>
              <draw:line draw:style-name="gr572" draw:text-style-name="P21" draw:layer="layout" svg:x1="8.486cm" svg:y1="10.5cm" svg:x2="8.986cm" svg:y2="10.5cm">
                <text:p/>
              </draw:line>
            </draw:g>
            <draw:frame draw:style-name="gr573" draw:text-style-name="P37" draw:layer="layout" svg:width="3.41cm" svg:height="0.569cm" svg:x="5.386cm" svg:y="9.8cm">
              <draw:text-box>
                <text:p><text:span text:style-name="T10">ir_s[6:0] == </text:span><text:span text:style-name="T10">7'b1110011</text:span></text:p>
              </draw:text-box>
            </draw:frame>
            <draw:frame draw:style-name="gr574" draw:text-style-name="P37" draw:layer="layout" svg:width="3.156cm" svg:height="0.569cm" svg:x="5.386cm" svg:y="10.1cm">
              <draw:text-box>
                <text:p><text:span text:style-name="T10">ir_s[14:12] == </text:span><text:span text:style-name="T10">3'b000</text:span></text:p>
              </draw:text-box>
            </draw:frame>
            <draw:frame draw:style-name="gr575" draw:text-style-name="P37" draw:layer="layout" svg:width="3.313cm" svg:height="0.569cm" svg:x="5.386cm" svg:y="10.431cm">
              <draw:text-box>
                <text:p><text:span text:style-name="T10">ir_s[31:20] == </text:span><text:span text:style-name="T10">12'h302</text:span></text:p>
              </draw:text-box>
            </draw:frame>
            <draw:line draw:style-name="gr38" draw:text-style-name="P4" draw:layer="layout" svg:x1="10.486cm" svg:y1="10.5cm" svg:x2="12.986cm" svg:y2="10.5cm">
              <text:p/>
            </draw:line>
            <draw:line draw:style-name="gr38" draw:text-style-name="P4" draw:layer="layout" svg:x1="2.986cm" svg:y1="10.5cm" svg:x2="5.586cm" svg:y2="10.5cm">
              <text:p/>
            </draw:line>
          </draw:g>
          <draw:g draw:style-name="gr1">
            <draw:frame draw:style-name="gr576" draw:text-style-name="P37" draw:layer="layout" svg:width="2.818cm" svg:height="0.569cm" svg:x="9.839cm" svg:y="12.031cm">
              <draw:text-box>
                <text:p><text:span text:style-name="T10">is_mret_fetched_</text:span><text:span text:style-name="T10">s</text:span></text:p>
              </draw:text-box>
            </draw:frame>
            <draw:g draw:style-name="gr66">
              <draw:glue-point draw:id="4" svg:x="-5cm" svg:y="-2.5cm"/>
              <draw:glue-point draw:id="5" svg:x="-5cm" svg:y="2.5cm"/>
              <draw:rect draw:style-name="gr577" draw:text-style-name="P45" draw:layer="layout" svg:width="1cm" svg:height="1cm" svg:x="8.986cm" svg:y="12cm">
                <text:p text:style-name="P15"><text:span text:style-name="T11">&amp;</text:span></text:p>
              </draw:rect>
              <draw:line draw:style-name="gr578" draw:text-style-name="P17" draw:layer="layout" svg:x1="8.486cm" svg:y1="12.25cm" svg:x2="8.986cm" svg:y2="12.25cm">
                <text:p/>
              </draw:line>
              <draw:line draw:style-name="gr579" draw:text-style-name="P17" draw:layer="layout" svg:x1="8.486cm" svg:y1="12.75cm" svg:x2="8.986cm" svg:y2="12.75cm">
                <text:p/>
              </draw:line>
              <draw:line draw:style-name="gr580" draw:text-style-name="P17" draw:layer="layout" svg:x1="9.986cm" svg:y1="12.5cm" svg:x2="10.486cm" svg:y2="12.5cm">
                <text:p/>
              </draw:line>
              <draw:line draw:style-name="gr581" draw:text-style-name="P21" draw:layer="layout" svg:x1="8.486cm" svg:y1="12.5cm" svg:x2="8.986cm" svg:y2="12.5cm">
                <text:p/>
              </draw:line>
            </draw:g>
            <draw:frame draw:style-name="gr582" draw:text-style-name="P37" draw:layer="layout" svg:width="4.765cm" svg:height="0.569cm" svg:x="3.786cm" svg:y="11.8cm">
              <draw:text-box>
                <text:p><text:span text:style-name="T10">iBusDataRd_s[6:</text:span><text:span text:style-name="T10">0] == 7'b1110011</text:span></text:p>
              </draw:text-box>
            </draw:frame>
            <draw:frame draw:style-name="gr583" draw:text-style-name="P37" draw:layer="layout" svg:width="4.511cm" svg:height="0.569cm" svg:x="3.786cm" svg:y="12.1cm">
              <draw:text-box>
                <text:p><text:span text:style-name="T10">iBusDataRd_s[14</text:span><text:span text:style-name="T10">:12] == 3'b000</text:span></text:p>
              </draw:text-box>
            </draw:frame>
            <draw:frame draw:style-name="gr584" draw:text-style-name="P37" draw:layer="layout" svg:width="4.672cm" svg:height="0.569cm" svg:x="3.786cm" svg:y="12.4cm">
              <draw:text-box>
                <text:p><text:span text:style-name="T10">iBusDataRd_s[31</text:span><text:span text:style-name="T10">:20] == 12'h302</text:span></text:p>
              </draw:text-box>
            </draw:frame>
            <draw:line draw:style-name="gr38" draw:text-style-name="P4" draw:layer="layout" svg:x1="10.486cm" svg:y1="12.5cm" svg:x2="12.986cm" svg:y2="12.5cm">
              <text:p/>
            </draw:line>
            <draw:line draw:style-name="gr38" draw:text-style-name="P4" draw:layer="layout" svg:x1="2.986cm" svg:y1="12.4cm" svg:x2="3.986cm" svg:y2="12.4cm">
              <text:p/>
            </draw:line>
          </draw:g>
          <draw:frame draw:style-name="gr585" draw:text-style-name="P44" draw:layer="layout" svg:width="2.322cm" svg:height="0.569cm" svg:x="9.936cm" svg:y="9.5cm">
            <draw:text-box>
              <text:p><text:span text:style-name="T12">MRET: Detect</text:span></text:p>
            </draw:text-box>
          </draw:frame>
          <draw:custom-shape draw:style-name="gr586" draw:text-style-name="P43" draw:layer="layout" svg:width="10cm" svg:height="4cm" svg:x="2.986cm" svg:y="9cm">
            <text:p/>
            <draw:enhanced-geometry svg:viewBox="0 0 21600 21600" draw:type="rectangle" draw:enhanced-path="M 0 0 L 21600 0 21600 21600 0 21600 0 0 Z N"/>
          </draw:custom-shape>
        </draw:g>
        <draw:g draw:style-name="gr1">
          <draw:g draw:style-name="gr1">
            <draw:g draw:style-name="gr1">
              <draw:g draw:name="intermediate-event-none 1" draw:style-name="gr66">
                <draw:path draw:style-name="gr587" draw:text-style-name="P52" draw:layer="layout" svg:width="1.999cm" svg:height="1.999cm" svg:x="8.976cm" svg:y="22cm" svg:viewBox="0 0 2000 2000" svg:d="M2000 999c0-551-448-999-1001-999s-999 448-999 999 446 1001 999 1001 1001-450 1001-1001z">
                  <text:p/>
                </draw:path>
                <draw:path draw:style-name="gr588" draw:text-style-name="P52" draw:layer="layout" svg:width="1.757cm" svg:height="1.759cm" svg:x="9.096cm" svg:y="22.12cm" svg:viewBox="0 0 1758 1760" svg:d="M1758 879c0-485-393-879-881-879-485 0-877 394-877 879 0 488 392 881 877 881 488 0 881-393 881-881z">
                  <text:p/>
                </draw:path>
              </draw:g>
              <draw:frame draw:style-name="gr589" draw:text-style-name="P37" draw:layer="layout" svg:width="2.123cm" svg:height="0.569cm" svg:x="8.915cm" svg:y="22.716cm">
                <draw:text-box>
                  <text:p><text:span text:style-name="T10">FETCH0_ST</text:span></text:p>
                </draw:text-box>
              </draw:frame>
            </draw:g>
            <draw:g draw:style-name="gr66">
              <draw:path draw:name="start-event-none" draw:style-name="gr590" draw:text-style-name="P52" draw:layer="layout" svg:width="1.999cm" svg:height="1.999cm" svg:x="11.976cm" svg:y="23.999cm" svg:viewBox="0 0 2000 2000" svg:d="M2000 999c0-551-450-999-1003-999-551 0-997 448-997 999s446 1001 997 1001c553 0 1003-450 1003-1001z">
                <svg:title>start-event-none</svg:title>
                <text:p/>
              </draw:path>
              <draw:frame draw:style-name="gr589" draw:text-style-name="P37" draw:layer="layout" svg:width="2.123cm" svg:height="0.569cm" svg:x="11.915cm" svg:y="24.715cm">
                <draw:text-box>
                  <text:p><text:span text:style-name="T10">FETCH1_ST</text:span></text:p>
                </draw:text-box>
              </draw:frame>
            </draw:g>
            <draw:g draw:style-name="gr66">
              <draw:path draw:name="start-event-none 1" draw:style-name="gr591" draw:text-style-name="P52" draw:layer="layout" svg:width="1.999cm" svg:height="1.999cm" svg:x="9cm" svg:y="26cm" svg:viewBox="0 0 2000 2000" svg:d="M2000 999c0-551-450-999-1003-999-551 0-997 448-997 999s446 1001 997 1001c553 0 1003-450 1003-1001z">
                <svg:title>start-event-none</svg:title>
                <text:p/>
              </draw:path>
              <draw:frame draw:style-name="gr592" draw:text-style-name="P37" draw:layer="layout" svg:width="1.793cm" svg:height="0.569cm" svg:x="9.104cm" svg:y="26.716cm">
                <draw:text-box>
                  <text:p><text:span text:style-name="T10">EXEC_ST</text:span></text:p>
                </draw:text-box>
              </draw:frame>
            </draw:g>
            <draw:g draw:style-name="gr66">
              <draw:path draw:name="start-event-none 2" draw:style-name="gr593" draw:text-style-name="P52" draw:layer="layout" svg:width="1.999cm" svg:height="1.999cm" svg:x="6.023cm" svg:y="24cm" svg:viewBox="0 0 2000 2000" svg:d="M2000 999c0-551-450-999-1003-999-551 0-997 448-997 999s446 1001 997 1001c553 0 1003-450 1003-1001z">
                <svg:title>start-event-none</svg:title>
                <text:p/>
              </draw:path>
              <draw:frame draw:style-name="gr594" draw:text-style-name="P37" draw:layer="layout" svg:width="2.153cm" svg:height="0.569cm" svg:x="5.947cm" svg:y="24.716cm">
                <draw:text-box>
                  <text:p><text:span text:style-name="T10">EXECLD_ST</text:span></text:p>
                </draw:text-box>
              </draw:frame>
            </draw:g>
            <draw:line draw:style-name="gr146" draw:text-style-name="P4" draw:layer="layout" svg:x1="10.976cm" svg:y1="22.999cm" svg:x2="12.973cm" svg:y2="23.999cm">
              <text:p/>
            </draw:line>
            <draw:line draw:style-name="gr146" draw:text-style-name="P4" draw:layer="layout" svg:x1="12.973cm" svg:y1="25.999cm" svg:x2="11cm" svg:y2="26.999cm">
              <text:p/>
            </draw:line>
            <draw:line draw:style-name="gr146" draw:text-style-name="P4" draw:layer="layout" svg:x1="9.997cm" svg:y1="26cm" svg:x2="9.997cm" svg:y2="24cm">
              <text:p/>
            </draw:line>
            <draw:line draw:style-name="gr146" draw:text-style-name="P4" draw:layer="layout" svg:x1="9cm" svg:y1="26.999cm" svg:x2="7.02cm" svg:y2="26cm">
              <text:p/>
            </draw:line>
            <draw:frame draw:style-name="gr595" draw:text-style-name="P37" draw:layer="layout" svg:width="2.6cm" svg:height="0.569cm" svg:x="6.4cm" svg:y="26.6cm">
              <draw:text-box>
                <text:p><text:span text:style-name="T10">load_pending_s</text:span></text:p>
              </draw:text-box>
            </draw:frame>
            <draw:frame draw:style-name="gr595" draw:text-style-name="P37" draw:layer="layout" svg:width="2.6cm" svg:height="0.569cm" svg:x="9cm" svg:y="24.931cm">
              <draw:text-box>
                <text:p><text:span text:style-name="T10">!load_pending_s</text:span></text:p>
              </draw:text-box>
            </draw:frame>
            <draw:line draw:style-name="gr146" draw:text-style-name="P4" draw:layer="layout" svg:x1="7.02cm" svg:y1="24cm" svg:x2="8.976cm" svg:y2="22.999cm">
              <text:p/>
            </draw:line>
            <draw:frame draw:style-name="gr596" draw:text-style-name="P53" draw:layer="layout" svg:width="7.3cm" svg:height="1.523cm" svg:x="11.7cm" svg:y="26.477cm">
              <draw:text-box>
                <text:p><text:span text:style-name="T13">fetch0_phase_s</text:span><text:span text:style-name="T10"> = </text:span><text:span text:style-name="T10">(state_s == </text:span><text:span text:style-name="T10">FETCH0_ST) ? 1 </text:span><text:span text:style-name="T10">: 0;</text:span></text:p>
                <text:p><text:span text:style-name="T13">fetch1_phase_s</text:span><text:span text:style-name="T10"> = </text:span><text:span text:style-name="T10">(state_s == </text:span><text:span text:style-name="T10">FETCH1_ST) ? 1 </text:span><text:span text:style-name="T10">: 0;</text:span></text:p>
                <text:p><text:span text:style-name="T13">exec_phase_s</text:span><text:span text:style-name="T10"> <text:s text:c="2"/>= </text:span><text:span text:style-name="T10">(state_s == </text:span><text:span text:style-name="T10">EXEC_ST) <text:s text:c="2"/>? 1 : </text:span><text:span text:style-name="T10">0;</text:span></text:p>
                <text:p><text:span text:style-name="T13">execld_phase_s</text:span><text:span text:style-name="T10"> </text:span><text:span text:style-name="T10">= (state_s == </text:span><text:span text:style-name="T10">EXECLD_ST) <text:s text:c="2"/>? </text:span><text:span text:style-name="T10">1 : 0;</text:span></text:p>
              </draw:text-box>
            </draw:frame>
          </draw:g>
          <draw:frame draw:style-name="gr597" draw:text-style-name="P44" draw:layer="layout" svg:width="3.495cm" svg:height="0.569cm" svg:x="13.4cm" svg:y="25.8cm">
            <draw:text-box>
              <text:p><text:span text:style-name="T12">FSM: I-Mem </text:span><text:span text:style-name="T12">sync read</text:span></text:p>
            </draw:text-box>
          </draw:frame>
          <draw:custom-shape draw:style-name="gr598" draw:text-style-name="P43" draw:layer="layout" svg:width="15cm" svg:height="6cm" svg:x="4cm" svg:y="22cm">
            <text:p/>
            <draw:enhanced-geometry svg:viewBox="0 0 21600 21600" draw:type="rectangle" draw:enhanced-path="M 0 0 L 21600 0 21600 21600 0 21600 0 0 Z N"/>
          </draw:custom-shape>
        </draw:g>
        <draw:g draw:style-name="gr1">
          <draw:g draw:style-name="gr1">
            <draw:g draw:style-name="gr66">
              <draw:rect draw:style-name="gr599" draw:text-style-name="P16" draw:layer="layout" svg:width="1cm" svg:height="1cm" svg:x="14cm" svg:y="18cm">
                <text:p text:style-name="P15"><text:span text:style-name="T5">1</text:span></text:p>
              </draw:rect>
              <draw:line draw:style-name="gr600" draw:text-style-name="P17" draw:layer="layout" svg:x1="13.5cm" svg:y1="18.5cm" svg:x2="14cm" svg:y2="18.5cm">
                <text:p/>
              </draw:line>
              <draw:circle draw:style-name="gr601" draw:text-style-name="P21" draw:layer="layout" svg:width="0.125cm" svg:height="0.126cm" svg:x="15cm" svg:y="18.437cm">
                <text:p/>
              </draw:circle>
              <draw:line draw:style-name="gr602" draw:text-style-name="P21" draw:layer="layout" svg:x1="15.125cm" svg:y1="18.5cm" svg:x2="15.5cm" svg:y2="18.5cm">
                <text:p/>
              </draw:line>
            </draw:g>
            <draw:g draw:style-name="gr66">
              <draw:glue-point draw:id="4" svg:x="5cm" svg:y="0cm"/>
              <draw:glue-point draw:id="5" svg:x="-5cm" svg:y="-2.5cm"/>
              <draw:glue-point draw:id="6" svg:x="-5.005cm" svg:y="2.5cm"/>
              <draw:rect draw:style-name="gr603" draw:text-style-name="P16" draw:layer="layout" svg:width="1cm" svg:height="1cm" svg:x="16cm" svg:y="19cm">
                <text:p text:style-name="P15"><text:span text:style-name="T4">&amp;</text:span></text:p>
              </draw:rect>
              <draw:line draw:style-name="gr604" draw:text-style-name="P17" draw:layer="layout" svg:x1="15.5cm" svg:y1="19.25cm" svg:x2="16cm" svg:y2="19.25cm">
                <text:p/>
              </draw:line>
              <draw:line draw:style-name="gr605" draw:text-style-name="P17" draw:layer="layout" svg:x1="15.5cm" svg:y1="19.75cm" svg:x2="16cm" svg:y2="19.75cm">
                <text:p/>
              </draw:line>
              <draw:line draw:style-name="gr606" draw:text-style-name="P17" draw:layer="layout" svg:x1="17cm" svg:y1="19.5cm" svg:x2="17.5cm" svg:y2="19.5cm">
                <text:p/>
              </draw:line>
            </draw:g>
            <draw:g draw:style-name="gr66">
              <draw:glue-point draw:id="4" svg:x="5cm" svg:y="0cm"/>
              <draw:glue-point draw:id="5" svg:x="-5cm" svg:y="-2.5cm"/>
              <draw:glue-point draw:id="6" svg:x="-5.005cm" svg:y="2.5cm"/>
              <draw:rect draw:style-name="gr607" draw:text-style-name="P16" draw:layer="layout" svg:width="1cm" svg:height="1cm" svg:x="11cm" svg:y="18cm">
                <text:p text:style-name="P15"><text:span text:style-name="T4">&amp;</text:span></text:p>
              </draw:rect>
              <draw:line draw:style-name="gr608" draw:text-style-name="P17" draw:layer="layout" svg:x1="10.5cm" svg:y1="18.25cm" svg:x2="11cm" svg:y2="18.25cm">
                <text:p/>
              </draw:line>
              <draw:line draw:style-name="gr609" draw:text-style-name="P17" draw:layer="layout" svg:x1="10.5cm" svg:y1="18.75cm" svg:x2="11cm" svg:y2="18.75cm">
                <text:p/>
              </draw:line>
              <draw:line draw:style-name="gr610" draw:text-style-name="P17" draw:layer="layout" svg:x1="12cm" svg:y1="18.5cm" svg:x2="12.5cm" svg:y2="18.5cm">
                <text:p/>
              </draw:line>
            </draw:g>
            <draw:frame draw:style-name="gr374" draw:text-style-name="P37" draw:layer="layout" svg:width="2.407cm" svg:height="0.569cm" svg:x="18.853cm" svg:y="20.1cm">
              <draw:text-box>
                <text:p><text:span text:style-name="T10">instr_commit_s</text:span></text:p>
              </draw:text-box>
            </draw:frame>
            <draw:frame draw:style-name="gr611" draw:text-style-name="P51" draw:layer="layout" svg:width="2.331cm" svg:height="0.569cm" svg:x="8.854cm" svg:y="17.8cm">
              <draw:text-box>
                <text:p><text:span text:style-name="T13">exec_phase_s</text:span></text:p>
              </draw:text-box>
            </draw:frame>
            <draw:frame draw:style-name="gr561" draw:text-style-name="P37" draw:layer="layout" svg:width="2.504cm" svg:height="0.569cm" svg:x="11.8cm" svg:y="18.075cm">
              <draw:text-box>
                <text:p><text:span text:style-name="T10">load_pending_s</text:span></text:p>
              </draw:text-box>
            </draw:frame>
            <draw:frame draw:style-name="gr378" draw:text-style-name="P37" draw:layer="layout" svg:width="2.377cm" svg:height="0.569cm" svg:x="8.853cm" svg:y="18.375cm">
              <draw:text-box>
                <text:p><text:span text:style-name="T10">opcode_s == 3</text:span></text:p>
              </draw:text-box>
            </draw:frame>
            <draw:g draw:style-name="gr66">
              <draw:glue-point draw:id="4" svg:x="-5cm" svg:y="-2.5cm"/>
              <draw:glue-point draw:id="5" svg:x="-5cm" svg:y="2.5cm"/>
              <draw:glue-point draw:id="6" svg:x="5cm" svg:y="0cm"/>
              <draw:rect draw:style-name="gr612" draw:text-style-name="P16" draw:layer="layout" svg:width="1cm" svg:height="1cm" svg:x="18cm" svg:y="20cm">
                <text:p text:style-name="P15"><text:span text:style-name="T8">≥</text:span><text:span text:style-name="T5">1</text:span></text:p>
              </draw:rect>
              <draw:line draw:style-name="gr613" draw:text-style-name="P17" draw:layer="layout" svg:x1="17.5cm" svg:y1="20.25cm" svg:x2="18cm" svg:y2="20.25cm">
                <text:p/>
              </draw:line>
              <draw:line draw:style-name="gr614" draw:text-style-name="P17" draw:layer="layout" svg:x1="17.5cm" svg:y1="20.75cm" svg:x2="18cm" svg:y2="20.75cm">
                <text:p/>
              </draw:line>
              <draw:line draw:style-name="gr615" draw:text-style-name="P17" draw:layer="layout" svg:x1="19cm" svg:y1="20.5cm" svg:x2="19.5cm" svg:y2="20.5cm">
                <text:p/>
              </draw:line>
            </draw:g>
            <draw:frame draw:style-name="gr616" draw:text-style-name="P51" draw:layer="layout" svg:width="2.447cm" svg:height="0.569cm" svg:x="13.853cm" svg:y="19.3cm">
              <draw:text-box>
                <text:p><text:span text:style-name="T13">exec_phase_s</text:span></text:p>
              </draw:text-box>
            </draw:frame>
            <draw:line draw:style-name="gr38" draw:text-style-name="P4" draw:layer="layout" svg:x1="12.5cm" svg:y1="18.5cm" svg:x2="13.491cm" svg:y2="18.5cm">
              <text:p/>
            </draw:line>
            <draw:line draw:style-name="gr38" draw:text-style-name="P4" draw:layer="layout" svg:x1="15.5cm" svg:y1="18.5cm" svg:x2="15.5cm" svg:y2="19.25cm">
              <text:p/>
            </draw:line>
            <draw:line draw:style-name="gr38" draw:text-style-name="P4" draw:layer="layout" svg:x1="17.5cm" svg:y1="19.5cm" svg:x2="17.5cm" svg:y2="20.25cm">
              <text:p/>
            </draw:line>
            <draw:frame draw:style-name="gr546" draw:text-style-name="P51" draw:layer="layout" svg:width="2.551cm" svg:height="0.569cm" svg:x="15.653cm" svg:y="20.3cm">
              <draw:text-box>
                <text:p><text:span text:style-name="T13">execld_phase_s</text:span></text:p>
              </draw:text-box>
            </draw:frame>
            <draw:line draw:style-name="gr38" draw:text-style-name="P4" draw:layer="layout" svg:x1="19.5cm" svg:y1="20.5cm" svg:x2="22cm" svg:y2="20.5cm">
              <text:p/>
            </draw:line>
            <draw:frame draw:style-name="gr617" draw:text-style-name="P37" draw:layer="layout" svg:width="1.51cm" svg:height="0.569cm" svg:x="8.853cm" svg:y="18.731cm">
              <draw:text-box>
                <text:p><text:span text:style-name="T10">ir_s[6:0]</text:span></text:p>
              </draw:text-box>
            </draw:frame>
            <draw:line draw:style-name="gr38" draw:text-style-name="P4" draw:layer="layout" svg:x1="8cm" svg:y1="18.8cm" svg:x2="10.5cm" svg:y2="18.8cm">
              <text:p/>
            </draw:line>
            <draw:line draw:style-name="gr38" draw:text-style-name="P4" draw:layer="layout" svg:x1="10.5cm" svg:y1="18.8cm" svg:x2="10.5cm" svg:y2="18.75cm">
              <text:p/>
            </draw:line>
            <draw:custom-shape draw:style-name="gr461" draw:text-style-name="P5" draw:layer="layout" svg:width="0.2cm" svg:height="0.2cm" svg:x="12.901cm" svg:y="18.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3cm" svg:y1="18.5cm" svg:x2="13cm" svg:y2="21cm">
              <text:p/>
            </draw:line>
          </draw:g>
          <draw:custom-shape draw:style-name="gr618" draw:text-style-name="P43" draw:layer="layout" svg:width="14cm" svg:height="3.5cm" svg:x="8cm" svg:y="17.5cm">
            <text:p/>
            <draw:enhanced-geometry svg:viewBox="0 0 21600 21600" draw:type="rectangle" draw:enhanced-path="M 0 0 L 21600 0 21600 21600 0 21600 0 0 Z N"/>
          </draw:custom-shape>
          <draw:frame draw:style-name="gr619" draw:text-style-name="P44" draw:layer="layout" svg:width="2.204cm" svg:height="0.569cm" svg:x="16.696cm" svg:y="18.1cm">
            <draw:text-box>
              <text:p><text:span text:style-name="T12">Instr commit</text:span></text:p>
            </draw:text-box>
          </draw:frame>
          <draw:frame draw:style-name="gr620" draw:text-style-name="P54" draw:layer="layout" svg:width="1.179cm" svg:height="0.569cm" svg:x="12.321cm" svg:y="17.6cm">
            <draw:text-box>
              <text:p><text:span text:style-name="T14">Load</text:span></text:p>
            </draw:text-box>
          </draw:frame>
          <draw:frame draw:style-name="gr621" draw:text-style-name="P54" draw:layer="layout" svg:width="1.539cm" svg:height="0.569cm" svg:x="18.5cm" svg:y="19cm">
            <draw:text-box>
              <text:p><text:span text:style-name="T14">No load</text:span></text:p>
            </draw:text-box>
          </draw:frame>
        </draw:g>
        <draw:g draw:style-name="gr1">
          <draw:g draw:style-name="gr66">
            <draw:glue-point draw:id="4" svg:x="-5cm" svg:y="-2.5cm"/>
            <draw:glue-point draw:id="5" svg:x="-5cm" svg:y="2.5cm"/>
            <draw:rect draw:style-name="gr622" draw:text-style-name="P45" draw:layer="layout" svg:width="1cm" svg:height="1cm" svg:x="60cm" svg:y="2cm">
              <text:p text:style-name="P15"><text:span text:style-name="T11">&amp;</text:span></text:p>
            </draw:rect>
            <draw:line draw:style-name="gr623" draw:text-style-name="P17" draw:layer="layout" svg:x1="59.5cm" svg:y1="2.25cm" svg:x2="60cm" svg:y2="2.25cm">
              <text:p/>
            </draw:line>
            <draw:line draw:style-name="gr624" draw:text-style-name="P17" draw:layer="layout" svg:x1="59.5cm" svg:y1="2.75cm" svg:x2="60cm" svg:y2="2.75cm">
              <text:p/>
            </draw:line>
            <draw:line draw:style-name="gr625" draw:text-style-name="P17" draw:layer="layout" svg:x1="61cm" svg:y1="2.5cm" svg:x2="61.5cm" svg:y2="2.5cm">
              <text:p/>
            </draw:line>
            <draw:line draw:style-name="gr626" draw:text-style-name="P21" draw:layer="layout" svg:x1="59.5cm" svg:y1="2.5cm" svg:x2="60cm" svg:y2="2.5cm">
              <text:p/>
            </draw:line>
          </draw:g>
          <draw:frame draw:style-name="gr627" draw:text-style-name="P37" draw:layer="layout" svg:width="2.28cm" svg:height="0.569cm" svg:x="60.8cm" svg:y="2cm">
            <draw:text-box>
              <text:p><text:span text:style-name="T10">irq_pending_s</text:span></text:p>
            </draw:text-box>
          </draw:frame>
          <draw:frame draw:style-name="gr541" draw:text-style-name="P37" draw:layer="layout" svg:width="2.246cm" svg:height="0.569cm" svg:x="57.054cm" svg:y="2.531cm">
            <draw:text-box>
              <text:p><text:span text:style-name="T10">csr_mip_s[11]</text:span></text:p>
            </draw:text-box>
          </draw:frame>
          <draw:frame draw:style-name="gr541" draw:text-style-name="P37" draw:layer="layout" svg:width="2.246cm" svg:height="0.569cm" svg:x="57.1cm" svg:y="2cm">
            <draw:text-box>
              <text:p><text:span text:style-name="T10">csr_mie_s[11]</text:span></text:p>
            </draw:text-box>
          </draw:frame>
          <draw:frame draw:style-name="gr628" draw:text-style-name="P37" draw:layer="layout" svg:width="2.644cm" svg:height="0.569cm" svg:x="57.2cm" svg:y="1.331cm">
            <draw:text-box>
              <text:p><text:span text:style-name="T10">csr_mstatus_mie</text:span></text:p>
            </draw:text-box>
          </draw:frame>
          <draw:frame draw:style-name="gr628" draw:text-style-name="P37" draw:layer="layout" svg:width="2.644cm" svg:height="0.569cm" svg:x="57.056cm" svg:y="1.6cm">
            <draw:text-box>
              <text:p><text:span text:style-name="T10">csr_mstatus_s[3]</text:span></text:p>
            </draw:text-box>
          </draw:frame>
          <draw:line draw:style-name="gr38" draw:text-style-name="P4" draw:layer="layout" svg:x1="59.5cm" svg:y1="2.25cm" svg:x2="59.5cm" svg:y2="2cm">
            <text:p/>
          </draw:line>
          <draw:line draw:style-name="gr38" draw:text-style-name="P4" draw:layer="layout" svg:x1="59.5cm" svg:y1="2.75cm" svg:x2="59.5cm" svg:y2="3cm">
            <text:p/>
          </draw:line>
          <draw:line draw:style-name="gr38" draw:text-style-name="P4" draw:layer="layout" svg:x1="58cm" svg:y1="2cm" svg:x2="59.5cm" svg:y2="2cm">
            <text:p/>
          </draw:line>
          <draw:line draw:style-name="gr38" draw:text-style-name="P4" draw:layer="layout" svg:x1="58cm" svg:y1="2.5cm" svg:x2="59.5cm" svg:y2="2.5cm">
            <text:p/>
          </draw:line>
          <draw:line draw:style-name="gr38" draw:text-style-name="P4" draw:layer="layout" svg:x1="58cm" svg:y1="3cm" svg:x2="59.5cm" svg:y2="3cm">
            <text:p/>
          </draw:line>
          <draw:frame draw:style-name="gr595" draw:text-style-name="P44" draw:layer="layout" svg:width="2.4cm" svg:height="0.569cm" svg:x="60.1cm" svg:y="1.3cm">
            <draw:text-box>
              <text:p><text:span text:style-name="T12">IRQ: Pending</text:span></text:p>
            </draw:text-box>
          </draw:frame>
          <draw:custom-shape draw:style-name="gr629" draw:text-style-name="P43" draw:layer="layout" svg:width="6.5cm" svg:height="3cm" svg:x="57cm" svg:y="1cm">
            <text:p/>
            <draw:enhanced-geometry svg:viewBox="0 0 21600 21600" draw:type="rectangle" draw:enhanced-path="M 0 0 L 21600 0 21600 21600 0 21600 0 0 Z N"/>
          </draw:custom-shape>
          <draw:line draw:style-name="gr38" draw:text-style-name="P4" draw:layer="layout" svg:x1="61.5cm" svg:y1="2.5cm" svg:x2="63.5cm" svg:y2="2.5cm">
            <text:p/>
          </draw:line>
          <draw:line draw:style-name="gr38" draw:text-style-name="P4" draw:layer="layout" svg:x1="58cm" svg:y1="2cm" svg:x2="57cm" svg:y2="2cm">
            <text:p/>
          </draw:line>
          <draw:line draw:style-name="gr38" draw:text-style-name="P4" draw:layer="layout" svg:x1="58cm" svg:y1="2.5cm" svg:x2="57cm" svg:y2="2.5cm">
            <text:p/>
          </draw:line>
          <draw:line draw:style-name="gr38" draw:text-style-name="P4" draw:layer="layout" svg:x1="58cm" svg:y1="3cm" svg:x2="57cm" svg:y2="3cm">
            <text:p/>
          </draw:line>
        </draw:g>
        <draw:g draw:style-name="gr1">
          <draw:g draw:style-name="gr1">
            <draw:custom-shape draw:style-name="gr630" draw:text-style-name="P36" draw:layer="layout" svg:width="3cm" svg:height="1cm" svg:x="43cm" svg:y="41cm">
              <text:p text:style-name="P35"><text:span text:style-name="T10">ImmGen</text:span></text:p>
              <draw:enhanced-geometry svg:viewBox="0 0 21600 21600" draw:type="rectangle" draw:enhanced-path="M 0 0 L 21600 0 21600 21600 0 21600 0 0 Z N"/>
            </draw:custom-shape>
            <draw:frame draw:style-name="gr559" draw:text-style-name="P37" draw:layer="layout" svg:width="1.035cm" svg:height="0.569cm" svg:x="43cm" svg:y="41cm">
              <draw:text-box>
                <text:p><text:span text:style-name="T10">instr</text:span></text:p>
              </draw:text-box>
            </draw:frame>
            <draw:frame draw:style-name="gr631" draw:text-style-name="P37" draw:layer="layout" svg:width="1.603cm" svg:height="0.569cm" svg:x="44.197cm" svg:y="41.4cm">
              <draw:text-box>
                <text:p><text:span text:style-name="T10">immSrcx</text:span></text:p>
              </draw:text-box>
            </draw:frame>
            <draw:frame draw:style-name="gr632" draw:text-style-name="P37" draw:layer="layout" svg:width="1.446cm" svg:height="0.569cm" svg:x="44.554cm" svg:y="41.031cm">
              <draw:text-box>
                <text:p><text:span text:style-name="T10">immExt</text:span></text:p>
              </draw:text-box>
            </draw:frame>
          </draw:g>
          <draw:line draw:style-name="gr38" draw:text-style-name="P4" draw:layer="layout" svg:x1="42cm" svg:y1="41.3cm" svg:x2="43cm" svg:y2="41.3cm">
            <text:p/>
          </draw:line>
          <draw:line draw:style-name="gr38" draw:text-style-name="P4" draw:layer="layout" svg:x1="46cm" svg:y1="41.3cm" svg:x2="47.5cm" svg:y2="41.3cm">
            <text:p/>
          </draw:line>
          <draw:line draw:style-name="gr146" draw:text-style-name="P4" draw:layer="layout" svg:x1="45cm" svg:y1="43cm" svg:x2="45cm" svg:y2="42cm">
            <text:p/>
          </draw:line>
          <draw:frame draw:style-name="gr633" draw:text-style-name="P37" draw:layer="layout" svg:width="1.903cm" svg:height="0.569cm" svg:x="44.8cm" svg:y="42.2cm">
            <draw:text-box>
              <text:p><text:span text:style-name="T10">immSrcx_s</text:span></text:p>
            </draw:text-box>
          </draw:frame>
          <draw:frame draw:style-name="gr634" draw:text-style-name="P37" draw:layer="layout" svg:width="1.747cm" svg:height="0.569cm" svg:x="45.801cm" svg:y="40.832cm">
            <draw:text-box>
              <text:p><text:span text:style-name="T10">immExt_s</text:span></text:p>
            </draw:text-box>
          </draw:frame>
          <draw:frame draw:style-name="gr635" draw:text-style-name="P44" draw:layer="layout" svg:width="1.683cm" svg:height="0.569cm" svg:x="43.717cm" svg:y="40.331cm">
            <draw:text-box>
              <text:p><text:span text:style-name="T12">Imm-gen</text:span></text:p>
            </draw:text-box>
          </draw:frame>
          <draw:custom-shape draw:style-name="gr636" draw:text-style-name="P43" draw:layer="layout" svg:width="5.5cm" svg:height="3cm" svg:x="42cm" svg:y="40cm">
            <text:p/>
            <draw:enhanced-geometry svg:viewBox="0 0 21600 21600" draw:type="rectangle" draw:enhanced-path="M 0 0 L 21600 0 21600 21600 0 21600 0 0 Z N"/>
          </draw:custom-shape>
        </draw:g>
        <draw:line draw:style-name="gr38" draw:text-style-name="P4" draw:layer="layout" svg:x1="47.5cm" svg:y1="41.3cm" svg:x2="49.6cm" svg:y2="41.3cm">
          <text:p/>
        </draw:line>
        <draw:line draw:style-name="gr38" draw:text-style-name="P4" draw:layer="layout" svg:x1="38cm" svg:y1="41.3cm" svg:x2="42cm" svg:y2="41.3cm">
          <text:p/>
        </draw:line>
        <draw:frame draw:style-name="gr383" draw:text-style-name="P37" draw:layer="layout" svg:width="2.17cm" svg:height="0.569cm" svg:x="46.946cm" svg:y="56.2cm">
          <draw:text-box>
            <text:p><text:span text:style-name="T10">trap_illegal_s</text:span></text:p>
          </draw:text-box>
        </draw:frame>
        <draw:g draw:style-name="gr1">
          <draw:g draw:style-name="gr1">
            <draw:custom-shape draw:style-name="gr637" draw:text-style-name="P56" draw:layer="layout" svg:width="5cm" svg:height="4cm" svg:x="62cm" svg:y="8cm">
              <text:p text:style-name="P55"><text:span text:style-name="T12">TrapMisAligned</text:span></text:p>
              <draw:enhanced-geometry svg:viewBox="0 0 21600 21600" draw:type="rectangle" draw:enhanced-path="M 0 0 L 21600 0 21600 21600 0 21600 0 0 Z N"/>
            </draw:custom-shape>
            <draw:frame draw:style-name="gr638" draw:text-style-name="P37" draw:layer="layout" svg:width="2.03cm" svg:height="0.569cm" svg:x="61.953cm" svg:y="8.031cm">
              <draw:text-box>
                <text:p><text:span text:style-name="T10">exec_phase</text:span></text:p>
              </draw:text-box>
            </draw:frame>
            <draw:frame draw:style-name="gr639" draw:text-style-name="P37" draw:layer="layout" svg:width="1.429cm" svg:height="0.569cm" svg:x="61.953cm" svg:y="8.831cm">
              <draw:text-box>
                <text:p><text:span text:style-name="T10">opcode</text:span></text:p>
              </draw:text-box>
            </draw:frame>
            <draw:frame draw:style-name="gr555" draw:text-style-name="P37" draw:layer="layout" svg:width="0.659cm" svg:height="0.569cm" svg:x="61.953cm" svg:y="9.231cm">
              <draw:text-box>
                <text:p><text:span text:style-name="T10">ir</text:span></text:p>
              </draw:text-box>
            </draw:frame>
            <draw:frame draw:style-name="gr640" draw:text-style-name="P37" draw:layer="layout" svg:width="1.399cm" svg:height="0.569cm" svg:x="61.953cm" svg:y="8.431cm">
              <draw:text-box>
                <text:p><text:span text:style-name="T10">ir_valid</text:span></text:p>
              </draw:text-box>
            </draw:frame>
            <draw:frame draw:style-name="gr641" draw:text-style-name="P37" draw:layer="layout" svg:width="2.5cm" svg:height="0.569cm" svg:x="64.5cm" svg:y="8cm">
              <draw:text-box>
                <text:p><text:span text:style-name="T10">trap_misaligned</text:span></text:p>
              </draw:text-box>
            </draw:frame>
            <draw:frame draw:style-name="gr634" draw:text-style-name="P37" draw:layer="layout" svg:width="1.747cm" svg:height="0.569cm" svg:x="61.953cm" svg:y="9.631cm">
              <draw:text-box>
                <text:p><text:span text:style-name="T10">dBusAddr</text:span></text:p>
              </draw:text-box>
            </draw:frame>
            <draw:frame draw:style-name="gr559" draw:text-style-name="P37" draw:layer="layout" svg:width="1.035cm" svg:height="0.569cm" svg:x="61.953cm" svg:y="10.032cm">
              <draw:text-box>
                <text:p><text:span text:style-name="T10">take</text:span></text:p>
              </draw:text-box>
            </draw:frame>
            <draw:frame draw:style-name="gr642" draw:text-style-name="P37" draw:layer="layout" svg:width="1.145cm" svg:height="0.569cm" svg:x="61.953cm" svg:y="10.433cm">
              <draw:text-box>
                <text:p><text:span text:style-name="T10">PCbr</text:span></text:p>
              </draw:text-box>
            </draw:frame>
            <draw:line draw:style-name="gr38" draw:text-style-name="P4" draw:layer="layout" svg:x1="61cm" svg:y1="8.3cm" svg:x2="62cm" svg:y2="8.3cm">
              <text:p/>
            </draw:line>
            <draw:line draw:style-name="gr38" draw:text-style-name="P4" draw:layer="layout" svg:x1="59cm" svg:y1="8.7cm" svg:x2="62cm" svg:y2="8.7cm">
              <text:p/>
            </draw:line>
            <draw:line draw:style-name="gr38" draw:text-style-name="P4" draw:layer="layout" svg:x1="59cm" svg:y1="9.1cm" svg:x2="62cm" svg:y2="9.1cm">
              <text:p/>
            </draw:line>
            <draw:line draw:style-name="gr38" draw:text-style-name="P4" draw:layer="layout" svg:x1="59cm" svg:y1="9.5cm" svg:x2="62cm" svg:y2="9.5cm">
              <text:p/>
            </draw:line>
            <draw:line draw:style-name="gr38" draw:text-style-name="P4" draw:layer="layout" svg:x1="59cm" svg:y1="9.9cm" svg:x2="62cm" svg:y2="9.9cm">
              <text:p/>
            </draw:line>
            <draw:line draw:style-name="gr38" draw:text-style-name="P4" draw:layer="layout" svg:x1="59cm" svg:y1="10.3cm" svg:x2="62cm" svg:y2="10.3cm">
              <text:p/>
            </draw:line>
            <draw:line draw:style-name="gr38" draw:text-style-name="P4" draw:layer="layout" svg:x1="59cm" svg:y1="10.7cm" svg:x2="62cm" svg:y2="10.7cm">
              <text:p/>
            </draw:line>
            <draw:line draw:style-name="gr38" draw:text-style-name="P4" draw:layer="layout" svg:x1="67cm" svg:y1="8.3cm" svg:x2="70cm" svg:y2="8.3cm">
              <text:p/>
            </draw:line>
            <draw:frame draw:style-name="gr643" draw:text-style-name="P37" draw:layer="layout" svg:width="2.801cm" svg:height="0.569cm" svg:x="66.8cm" svg:y="7.831cm">
              <draw:text-box>
                <text:p><text:span text:style-name="T10">trap_misaligned_</text:span><text:span text:style-name="T10">s</text:span></text:p>
              </draw:text-box>
            </draw:frame>
            <draw:frame draw:style-name="gr611" draw:text-style-name="P51" draw:layer="layout" svg:width="2.331cm" svg:height="0.569cm" svg:x="59.8cm" svg:y="7.8cm">
              <draw:text-box>
                <text:p><text:span text:style-name="T13">exec_phase_s</text:span></text:p>
              </draw:text-box>
            </draw:frame>
            <draw:frame draw:style-name="gr558" draw:text-style-name="P37" draw:layer="layout" svg:width="1.7cm" svg:height="0.569cm" svg:x="60.431cm" svg:y="8.231cm">
              <draw:text-box>
                <text:p><text:span text:style-name="T10">ir_valid_s</text:span></text:p>
              </draw:text-box>
            </draw:frame>
            <draw:frame draw:style-name="gr567" draw:text-style-name="P37" draw:layer="layout" svg:width="1.73cm" svg:height="0.569cm" svg:x="60.401cm" svg:y="8.631cm">
              <draw:text-box>
                <text:p><text:span text:style-name="T10">opcode_s</text:span></text:p>
              </draw:text-box>
            </draw:frame>
            <draw:frame draw:style-name="gr553" draw:text-style-name="P37" draw:layer="layout" svg:width="0.955cm" svg:height="0.569cm" svg:x="61.176cm" svg:y="9cm">
              <draw:text-box>
                <text:p><text:span text:style-name="T10">ir_s</text:span></text:p>
              </draw:text-box>
            </draw:frame>
            <draw:frame draw:style-name="gr542" draw:text-style-name="P37" draw:layer="layout" svg:width="2.043cm" svg:height="0.569cm" svg:x="60.088cm" svg:y="9.433cm">
              <draw:text-box>
                <text:p><text:span text:style-name="T10">dBusAddr_s</text:span></text:p>
              </draw:text-box>
            </draw:frame>
            <draw:frame draw:style-name="gr644" draw:text-style-name="P37" draw:layer="layout" svg:width="1.336cm" svg:height="0.569cm" svg:x="60.795cm" svg:y="9.833cm">
              <draw:text-box>
                <text:p><text:span text:style-name="T10">take_s</text:span></text:p>
              </draw:text-box>
            </draw:frame>
            <draw:frame draw:style-name="gr632" draw:text-style-name="P37" draw:layer="layout" svg:width="1.446cm" svg:height="0.569cm" svg:x="60.685cm" svg:y="10.233cm">
              <draw:text-box>
                <text:p><text:span text:style-name="T10">PCbr_s</text:span></text:p>
              </draw:text-box>
            </draw:frame>
          </draw:g>
          <draw:frame draw:style-name="gr645" draw:text-style-name="P44" draw:layer="layout" svg:width="2.75cm" svg:height="0.569cm" svg:x="62.85cm" svg:y="7.231cm">
            <draw:text-box>
              <text:p><text:span text:style-name="T12">Trap: </text:span><text:span text:style-name="T12">Misaligned</text:span></text:p>
            </draw:text-box>
          </draw:frame>
          <draw:custom-shape draw:style-name="gr646" draw:text-style-name="P43" draw:layer="layout" svg:width="11cm" svg:height="5cm" svg:x="59cm" svg:y="7cm">
            <text:p/>
            <draw:enhanced-geometry svg:viewBox="0 0 21600 21600" draw:type="rectangle" draw:enhanced-path="M 0 0 L 21600 0 21600 21600 0 21600 0 0 Z N"/>
          </draw:custom-shape>
        </draw:g>
        <draw:g draw:style-name="gr1">
          <draw:g draw:style-name="gr1">
            <draw:frame draw:style-name="gr647" draw:text-style-name="P37" draw:layer="layout" svg:width="2.534cm" svg:height="0.569cm" svg:x="20.287cm" svg:y="10.7cm">
              <draw:text-box>
                <text:p><text:span text:style-name="T10">mret_pending_s</text:span></text:p>
              </draw:text-box>
            </draw:frame>
            <draw:g draw:style-name="gr1">
              <draw:custom-shape draw:style-name="gr550" draw:text-style-name="P48" draw:layer="layout" svg:width="0.5cm" svg:height="1cm" svg:x="19.987cm" svg:y="11cm">
                <text:p/>
                <draw:enhanced-geometry svg:viewBox="0 0 21600 21600" draw:mirror-horizontal="false" draw:mirror-vertical="false" draw:type="rectangle" draw:enhanced-path="M 0 0 L 21600 0 21600 21600 0 21600 0 0 Z N"/>
              </draw:custom-shape>
              <draw:line draw:style-name="gr60" draw:text-style-name="P11" draw:layer="layout" svg:x1="19.987cm" svg:y1="11.95cm" svg:x2="20.137cm" svg:y2="11.9cm">
                <text:p/>
              </draw:line>
              <draw:line draw:style-name="gr60" draw:text-style-name="P11" draw:layer="layout" svg:x1="19.987cm" svg:y1="11.85cm" svg:x2="20.137cm" svg:y2="11.9cm">
                <text:p/>
              </draw:line>
            </draw:g>
            <draw:line draw:style-name="gr38" draw:text-style-name="P4" draw:layer="layout" svg:x1="20.487cm" svg:y1="11.2cm" svg:x2="22.986cm" svg:y2="11.2cm">
              <text:p/>
            </draw:line>
            <draw:frame draw:style-name="gr559" draw:text-style-name="P37" draw:layer="layout" svg:width="1.035cm" svg:height="0.569cm" svg:x="17.186cm" svg:y="11cm">
              <draw:text-box>
                <text:p><text:span text:style-name="T10">1‘b1</text:span></text:p>
              </draw:text-box>
            </draw:frame>
            <draw:polygon draw:style-name="gr58" draw:text-style-name="P1" draw:layer="layout" svg:width="0.499cm" svg:height="0.999cm" svg:x="17.986cm" svg:y="10.699cm" svg:viewBox="0 0 500 1000" draw:points="0,0 0,1000 500,850 500,150">
              <text:p/>
            </draw:polygon>
            <draw:line draw:style-name="gr146" draw:text-style-name="P4" draw:layer="layout" svg:x1="18.286cm" svg:y1="12.099cm" svg:x2="18.286cm" svg:y2="11.599cm">
              <text:p/>
            </draw:line>
            <draw:line draw:style-name="gr38" draw:text-style-name="P4" draw:layer="layout" svg:x1="17.386cm" svg:y1="10.999cm" svg:x2="17.986cm" svg:y2="10.999cm">
              <text:p/>
            </draw:line>
            <draw:line draw:style-name="gr38" draw:text-style-name="P4" draw:layer="layout" svg:x1="17.486cm" svg:y1="11.399cm" svg:x2="17.986cm" svg:y2="11.399cm">
              <text:p/>
            </draw:line>
            <draw:line draw:style-name="gr38" draw:text-style-name="P4" draw:layer="layout" svg:x1="18.486cm" svg:y1="11.199cm" svg:x2="19.987cm" svg:y2="11.199cm">
              <text:p/>
            </draw:line>
            <draw:frame draw:style-name="gr648" draw:text-style-name="P51" draw:layer="layout" svg:width="5.18cm" svg:height="0.569cm" svg:x="16.186cm" svg:y="11.93cm">
              <draw:text-box>
                <text:p><text:span text:style-name="T13">exec_phase_s </text:span><text:span text:style-name="T15">&amp;&amp; </text:span><text:span text:style-name="T15">is_mret_fetched_</text:span><text:span text:style-name="T15">s</text:span></text:p>
              </draw:text-box>
            </draw:frame>
            <draw:polygon draw:style-name="gr58" draw:text-style-name="P1" draw:layer="layout" svg:width="0.499cm" svg:height="0.999cm" svg:x="15.988cm" svg:y="10cm" svg:viewBox="0 0 500 1000" draw:points="0,0 0,1000 500,850 500,150">
              <text:p/>
            </draw:polygon>
            <draw:frame draw:style-name="gr561" draw:text-style-name="P37" draw:layer="layout" svg:width="2.504cm" svg:height="0.569cm" svg:x="14.388cm" svg:y="11.231cm">
              <draw:text-box>
                <text:p text:style-name="P6"><text:span text:style-name="T13">fetch0_phase_s</text:span></text:p>
              </draw:text-box>
            </draw:frame>
            <draw:line draw:style-name="gr146" draw:text-style-name="P4" draw:layer="layout" svg:x1="16.288cm" svg:y1="11.4cm" svg:x2="16.288cm" svg:y2="10.9cm">
              <text:p/>
            </draw:line>
            <draw:line draw:style-name="gr38" draw:text-style-name="P4" draw:layer="layout" svg:x1="15.486cm" svg:y1="10.299cm" svg:x2="15.988cm" svg:y2="10.3cm">
              <text:p/>
            </draw:line>
            <draw:line draw:style-name="gr38" draw:text-style-name="P4" draw:layer="layout" svg:x1="15.486cm" svg:y1="10.7cm" svg:x2="15.988cm" svg:y2="10.7cm">
              <text:p/>
            </draw:line>
            <draw:frame draw:style-name="gr649" draw:text-style-name="P37" draw:layer="layout" svg:width="1.027cm" svg:height="0.569cm" svg:x="15.187cm" svg:y="10.33cm">
              <draw:text-box>
                <text:p><text:span text:style-name="T10">1'b0</text:span></text:p>
              </draw:text-box>
            </draw:frame>
            <draw:line draw:style-name="gr38" draw:text-style-name="P4" draw:layer="layout" svg:x1="16.488cm" svg:y1="10.599cm" svg:x2="17.386cm" svg:y2="10.599cm">
              <text:p/>
            </draw:line>
            <draw:line draw:style-name="gr38" draw:text-style-name="P4" draw:layer="layout" svg:x1="17.386cm" svg:y1="10.599cm" svg:x2="17.386cm" svg:y2="10.999cm">
              <text:p/>
            </draw:line>
            <draw:frame draw:style-name="gr564" draw:text-style-name="P37" draw:layer="layout" svg:width="1.129cm" svg:height="0.569cm" svg:x="14.986cm" svg:y="9.831cm">
              <draw:text-box>
                <text:p><text:span text:style-name="T10">store</text:span></text:p>
              </draw:text-box>
            </draw:frame>
            <draw:line draw:style-name="gr38" draw:text-style-name="P4" draw:layer="layout" svg:x1="19.986cm" svg:y1="12.4cm" svg:x2="19.986cm" svg:y2="12.499cm">
              <text:p/>
            </draw:line>
            <draw:line draw:style-name="gr38" draw:text-style-name="P4" draw:layer="layout" svg:x1="19.986cm" svg:y1="12.499cm" svg:x2="13.986cm" svg:y2="12.499cm">
              <text:p/>
            </draw:line>
          </draw:g>
          <draw:frame draw:style-name="gr650" draw:text-style-name="P44" draw:layer="layout" svg:width="2.576cm" svg:height="0.569cm" svg:x="17.586cm" svg:y="9.831cm">
            <draw:text-box>
              <text:p><text:span text:style-name="T12">MRET: Pending</text:span></text:p>
            </draw:text-box>
          </draw:frame>
          <draw:custom-shape draw:style-name="gr651" draw:text-style-name="P43" draw:layer="layout" svg:width="9cm" svg:height="4cm" svg:x="13.986cm" svg:y="9cm">
            <text:p/>
            <draw:enhanced-geometry svg:viewBox="0 0 21600 21600" draw:type="rectangle" draw:enhanced-path="M 0 0 L 21600 0 21600 21600 0 21600 0 0 Z N"/>
          </draw:custom-shape>
        </draw:g>
        <draw:g draw:style-name="gr1">
          <draw:g draw:style-name="gr1">
            <draw:frame draw:style-name="gr652" draw:text-style-name="P37" draw:layer="layout" svg:width="2.299cm" svg:height="0.569cm" svg:x="77.001cm" svg:y="2.7cm">
              <draw:text-box>
                <text:p><text:span text:style-name="T10">trap_taken_s</text:span></text:p>
              </draw:text-box>
            </draw:frame>
            <draw:g draw:style-name="gr1">
              <draw:custom-shape draw:style-name="gr550" draw:text-style-name="P48" draw:layer="layout" svg:width="0.5cm" svg:height="1cm" svg:x="76.701cm" svg:y="3cm">
                <text:p/>
                <draw:enhanced-geometry svg:viewBox="0 0 21600 21600" draw:mirror-horizontal="false" draw:mirror-vertical="false" draw:type="rectangle" draw:enhanced-path="M 0 0 L 21600 0 21600 21600 0 21600 0 0 Z N"/>
              </draw:custom-shape>
              <draw:line draw:style-name="gr60" draw:text-style-name="P11" draw:layer="layout" svg:x1="76.701cm" svg:y1="3.95cm" svg:x2="76.851cm" svg:y2="3.9cm">
                <text:p/>
              </draw:line>
              <draw:line draw:style-name="gr60" draw:text-style-name="P11" draw:layer="layout" svg:x1="76.701cm" svg:y1="3.85cm" svg:x2="76.851cm" svg:y2="3.9cm">
                <text:p/>
              </draw:line>
            </draw:g>
            <draw:line draw:style-name="gr38" draw:text-style-name="P4" draw:layer="layout" svg:x1="77.201cm" svg:y1="3.2cm" svg:x2="79.7cm" svg:y2="3.2cm">
              <text:p/>
            </draw:line>
            <draw:frame draw:style-name="gr559" draw:text-style-name="P37" draw:layer="layout" svg:width="1.035cm" svg:height="0.569cm" svg:x="73.9cm" svg:y="2.6cm">
              <draw:text-box>
                <text:p><text:span text:style-name="T10">1‘b0</text:span></text:p>
              </draw:text-box>
            </draw:frame>
            <draw:polygon draw:style-name="gr58" draw:text-style-name="P1" draw:layer="layout" svg:width="0.499cm" svg:height="0.999cm" svg:x="74.7cm" svg:y="2.699cm" svg:viewBox="0 0 500 1000" draw:points="0,0 0,1000 500,850 500,150">
              <text:p/>
            </draw:polygon>
            <draw:line draw:style-name="gr146" draw:text-style-name="P4" draw:layer="layout" svg:x1="75cm" svg:y1="4.099cm" svg:x2="75cm" svg:y2="3.599cm">
              <text:p/>
            </draw:line>
            <draw:line draw:style-name="gr38" draw:text-style-name="P4" draw:layer="layout" svg:x1="74.2cm" svg:y1="2.999cm" svg:x2="74.7cm" svg:y2="2.999cm">
              <text:p/>
            </draw:line>
            <draw:line draw:style-name="gr38" draw:text-style-name="P4" draw:layer="layout" svg:x1="74.2cm" svg:y1="3.399cm" svg:x2="74.7cm" svg:y2="3.399cm">
              <text:p/>
            </draw:line>
            <draw:line draw:style-name="gr38" draw:text-style-name="P4" draw:layer="layout" svg:x1="75.2cm" svg:y1="3.199cm" svg:x2="76.701cm" svg:y2="3.199cm">
              <text:p/>
            </draw:line>
            <draw:frame draw:style-name="gr653" draw:text-style-name="P57" draw:layer="layout" svg:width="4.253cm" svg:height="0.569cm" svg:x="74.1cm" svg:y="3.93cm">
              <draw:text-box>
                <text:p><text:span text:style-name="T15">instr_commit_s </text:span><text:span text:style-name="T15">&amp;&amp; !is_mret_s</text:span></text:p>
              </draw:text-box>
            </draw:frame>
            <draw:polygon draw:style-name="gr58" draw:text-style-name="P1" draw:layer="layout" svg:width="0.499cm" svg:height="0.999cm" svg:x="72.702cm" svg:y="3.5cm" svg:viewBox="0 0 500 1000" draw:points="0,0 0,1000 500,850 500,150">
              <text:p/>
            </draw:polygon>
            <draw:line draw:style-name="gr146" draw:text-style-name="P4" draw:layer="layout" svg:x1="73.002cm" svg:y1="4.9cm" svg:x2="73.002cm" svg:y2="4.4cm">
              <text:p/>
            </draw:line>
            <draw:line draw:style-name="gr38" draw:text-style-name="P4" draw:layer="layout" svg:x1="72.2cm" svg:y1="3.799cm" svg:x2="72.702cm" svg:y2="3.8cm">
              <text:p/>
            </draw:line>
            <draw:line draw:style-name="gr38" draw:text-style-name="P4" draw:layer="layout" svg:x1="72.2cm" svg:y1="4.2cm" svg:x2="72.702cm" svg:y2="4.2cm">
              <text:p/>
            </draw:line>
            <draw:frame draw:style-name="gr649" draw:text-style-name="P37" draw:layer="layout" svg:width="1.027cm" svg:height="0.569cm" svg:x="71.901cm" svg:y="3.83cm">
              <draw:text-box>
                <text:p><text:span text:style-name="T10">1'b1</text:span></text:p>
              </draw:text-box>
            </draw:frame>
            <draw:line draw:style-name="gr38" draw:text-style-name="P4" draw:layer="layout" svg:x1="73.202cm" svg:y1="4cm" svg:x2="74.2cm" svg:y2="4cm">
              <text:p/>
            </draw:line>
            <draw:line draw:style-name="gr38" draw:text-style-name="P4" draw:layer="layout" svg:x1="74.2cm" svg:y1="3.399cm" svg:x2="74.2cm" svg:y2="4cm">
              <text:p/>
            </draw:line>
            <draw:frame draw:style-name="gr383" draw:text-style-name="P57" draw:layer="layout" svg:width="2.17cm" svg:height="0.569cm" svg:x="72.247cm" svg:y="4.8cm">
              <draw:text-box>
                <text:p><text:span text:style-name="T15">trap_illegal_s</text:span></text:p>
              </draw:text-box>
            </draw:frame>
            <draw:polygon draw:style-name="gr58" draw:text-style-name="P1" draw:layer="layout" svg:width="0.499cm" svg:height="0.999cm" svg:x="70.703cm" svg:y="2.5cm" svg:viewBox="0 0 500 1000" draw:points="0,0 0,1000 500,850 500,150">
              <text:p/>
            </draw:polygon>
            <draw:line draw:style-name="gr146" draw:text-style-name="P4" draw:layer="layout" svg:x1="71.003cm" svg:y1="3.9cm" svg:x2="71.003cm" svg:y2="3.4cm">
              <text:p/>
            </draw:line>
            <draw:line draw:style-name="gr38" draw:text-style-name="P4" draw:layer="layout" svg:x1="70.201cm" svg:y1="2.799cm" svg:x2="70.703cm" svg:y2="2.8cm">
              <text:p/>
            </draw:line>
            <draw:line draw:style-name="gr38" draw:text-style-name="P4" draw:layer="layout" svg:x1="70.201cm" svg:y1="3.2cm" svg:x2="70.703cm" svg:y2="3.2cm">
              <text:p/>
            </draw:line>
            <draw:frame draw:style-name="gr649" draw:text-style-name="P37" draw:layer="layout" svg:width="1.027cm" svg:height="0.569cm" svg:x="69.902cm" svg:y="2.83cm">
              <draw:text-box>
                <text:p><text:span text:style-name="T10">1'b1</text:span></text:p>
              </draw:text-box>
            </draw:frame>
            <draw:line draw:style-name="gr38" draw:text-style-name="P4" draw:layer="layout" svg:x1="71.203cm" svg:y1="3cm" svg:x2="72.201cm" svg:y2="3cm">
              <text:p/>
            </draw:line>
            <draw:line draw:style-name="gr38" draw:text-style-name="P4" draw:layer="layout" svg:x1="72.201cm" svg:y1="3cm" svg:x2="72.2cm" svg:y2="3.799cm">
              <text:p/>
            </draw:line>
            <draw:frame draw:style-name="gr643" draw:text-style-name="P57" draw:layer="layout" svg:width="2.801cm" svg:height="0.569cm" svg:x="69.048cm" svg:y="3.8cm">
              <draw:text-box>
                <text:p><text:span text:style-name="T15">trap_misaligned_</text:span><text:span text:style-name="T15">s</text:span></text:p>
              </draw:text-box>
            </draw:frame>
            <draw:polygon draw:style-name="gr58" draw:text-style-name="P1" draw:layer="layout" svg:width="0.499cm" svg:height="0.999cm" svg:x="68.704cm" svg:y="1.5cm" svg:viewBox="0 0 500 1000" draw:points="0,0 0,1000 500,850 500,150">
              <text:p/>
            </draw:polygon>
            <draw:line draw:style-name="gr146" draw:text-style-name="P4" draw:layer="layout" svg:x1="69.004cm" svg:y1="2.9cm" svg:x2="69.004cm" svg:y2="2.4cm">
              <text:p/>
            </draw:line>
            <draw:line draw:style-name="gr38" draw:text-style-name="P4" draw:layer="layout" svg:x1="68.202cm" svg:y1="1.799cm" svg:x2="68.704cm" svg:y2="1.8cm">
              <text:p/>
            </draw:line>
            <draw:line draw:style-name="gr38" draw:text-style-name="P4" draw:layer="layout" svg:x1="68.202cm" svg:y1="2.2cm" svg:x2="68.704cm" svg:y2="2.2cm">
              <text:p/>
            </draw:line>
            <draw:frame draw:style-name="gr649" draw:text-style-name="P37" draw:layer="layout" svg:width="1.027cm" svg:height="0.569cm" svg:x="67.903cm" svg:y="1.83cm">
              <draw:text-box>
                <text:p><text:span text:style-name="T10">1'b1</text:span></text:p>
              </draw:text-box>
            </draw:frame>
            <draw:line draw:style-name="gr38" draw:text-style-name="P4" draw:layer="layout" svg:x1="69.204cm" svg:y1="2cm" svg:x2="70.202cm" svg:y2="2cm">
              <text:p/>
            </draw:line>
            <draw:line draw:style-name="gr38" draw:text-style-name="P4" draw:layer="layout" svg:x1="70.202cm" svg:y1="2cm" svg:x2="70.201cm" svg:y2="2.799cm">
              <text:p/>
            </draw:line>
            <draw:frame draw:style-name="gr627" draw:text-style-name="P57" draw:layer="layout" svg:width="2.28cm" svg:height="0.569cm" svg:x="67.549cm" svg:y="2.7cm">
              <draw:text-box>
                <text:p><text:span text:style-name="T15">irq_pending_s</text:span></text:p>
              </draw:text-box>
            </draw:frame>
            <draw:frame draw:style-name="gr649" draw:text-style-name="P37" draw:layer="layout" svg:width="1.027cm" svg:height="0.569cm" svg:x="67.904cm" svg:y="1.431cm">
              <draw:text-box>
                <text:p><text:span text:style-name="T10">1'b0</text:span></text:p>
              </draw:text-box>
            </draw:frame>
            <draw:line draw:style-name="gr38" draw:text-style-name="P4" draw:layer="layout" svg:x1="67.2cm" svg:y1="3.4cm" svg:x2="69cm" svg:y2="3.4cm">
              <text:p/>
            </draw:line>
            <draw:line draw:style-name="gr38" draw:text-style-name="P4" draw:layer="layout" svg:x1="69cm" svg:y1="3.4cm" svg:x2="69cm" svg:y2="3.2cm">
              <text:p/>
            </draw:line>
            <draw:line draw:style-name="gr38" draw:text-style-name="P4" draw:layer="layout" svg:x1="71cm" svg:y1="4.3cm" svg:x2="71cm" svg:y2="6cm">
              <text:p/>
            </draw:line>
            <draw:line draw:style-name="gr38" draw:text-style-name="P4" draw:layer="layout" svg:x1="73cm" svg:y1="5.369cm" svg:x2="73cm" svg:y2="6cm">
              <text:p/>
            </draw:line>
            <draw:line draw:style-name="gr38" draw:text-style-name="P4" draw:layer="layout" svg:x1="75cm" svg:y1="4.499cm" svg:x2="75cm" svg:y2="6cm">
              <text:p/>
            </draw:line>
            <draw:line draw:style-name="gr38" draw:text-style-name="P4" draw:layer="layout" svg:x1="77.2cm" svg:y1="4.499cm" svg:x2="77.2cm" svg:y2="6cm">
              <text:p/>
            </draw:line>
          </draw:g>
          <draw:frame draw:style-name="gr565" draw:text-style-name="P44" draw:layer="layout" svg:width="2.094cm" svg:height="0.569cm" svg:x="74.3cm" svg:y="1.831cm">
            <draw:text-box>
              <text:p><text:span text:style-name="T12">Trap: Taken</text:span></text:p>
            </draw:text-box>
          </draw:frame>
          <draw:custom-shape draw:style-name="gr654" draw:text-style-name="P43" draw:layer="layout" svg:width="12.5cm" svg:height="5cm" svg:x="67.2cm" svg:y="1cm">
            <text:p/>
            <draw:enhanced-geometry svg:viewBox="0 0 21600 21600" draw:type="rectangle" draw:enhanced-path="M 0 0 L 21600 0 21600 21600 0 21600 0 0 Z N"/>
          </draw:custom-shape>
        </draw:g>
        <draw:g draw:style-name="gr1">
          <draw:frame draw:style-name="gr655" draw:text-style-name="P37" draw:layer="layout" svg:width="1.793cm" svg:height="0.569cm" svg:x="52.807cm" svg:y="9.731cm">
            <draw:text-box>
              <text:p><text:span text:style-name="T10">csr_mie_s</text:span></text:p>
            </draw:text-box>
          </draw:frame>
          <draw:line draw:style-name="gr38" draw:text-style-name="P4" draw:layer="layout" svg:x1="53cm" svg:y1="10.2cm" svg:x2="55cm" svg:y2="10.2cm">
            <text:p/>
          </draw:line>
          <draw:custom-shape draw:style-name="gr656" draw:text-style-name="P43" draw:layer="layout" svg:width="15cm" svg:height="4cm" svg:x="40cm" svg:y="9cm">
            <text:p/>
            <draw:enhanced-geometry svg:viewBox="0 0 21600 21600" draw:type="rectangle" draw:enhanced-path="M 0 0 L 21600 0 21600 21600 0 21600 0 0 Z N"/>
          </draw:custom-shape>
          <draw:frame draw:style-name="gr552" draw:text-style-name="P44" draw:layer="layout" svg:width="1.776cm" svg:height="0.569cm" svg:x="44.8cm" svg:y="9.431cm">
            <draw:text-box>
              <text:p><text:span text:style-name="T12">CSR: MIE</text:span></text:p>
            </draw:text-box>
          </draw:frame>
          <draw:frame draw:style-name="gr657" draw:text-style-name="P40" draw:layer="layout" svg:width="2.88cm" svg:height="0.887cm" svg:x="49.62cm" svg:y="10.782cm">
            <draw:text-box>
              <text:p><text:span text:style-name="T13">exec_phase_s </text:span><text:span text:style-name="T15">&amp;&amp; </text:span></text:p>
              <text:p><text:span text:style-name="T15">ir_valid_s</text:span></text:p>
            </draw:text-box>
          </draw:frame>
          <draw:polygon draw:style-name="gr58" draw:text-style-name="P1" draw:layer="layout" svg:width="0.499cm" svg:height="0.999cm" svg:x="50.502cm" svg:y="9.504cm" svg:viewBox="0 0 500 1000" draw:points="0,0 0,1000 500,850 500,150">
            <text:p/>
          </draw:polygon>
          <draw:line draw:style-name="gr146" draw:text-style-name="P4" draw:layer="layout" svg:x1="50.802cm" svg:y1="10.904cm" svg:x2="50.802cm" svg:y2="10.404cm">
            <text:p/>
          </draw:line>
          <draw:line draw:style-name="gr38" draw:text-style-name="P4" draw:layer="layout" svg:x1="50cm" svg:y1="9.803cm" svg:x2="50.502cm" svg:y2="9.804cm">
            <text:p/>
          </draw:line>
          <draw:line draw:style-name="gr38" draw:text-style-name="P4" draw:layer="layout" svg:x1="50cm" svg:y1="10.204cm" svg:x2="50.502cm" svg:y2="10.204cm">
            <text:p/>
          </draw:line>
          <draw:frame draw:style-name="gr564" draw:text-style-name="P37" draw:layer="layout" svg:width="1.129cm" svg:height="0.569cm" svg:x="49.5cm" svg:y="9.335cm">
            <draw:text-box>
              <text:p><text:span text:style-name="T10">store</text:span></text:p>
            </draw:text-box>
          </draw:frame>
          <draw:polygon draw:style-name="gr58" draw:text-style-name="P1" draw:layer="layout" svg:width="0.499cm" svg:height="0.999cm" svg:x="49cm" svg:y="10.382cm" svg:viewBox="0 0 500 1000" draw:points="0,0 0,1000 500,850 500,150">
            <text:p/>
          </draw:polygon>
          <draw:line draw:style-name="gr146" draw:text-style-name="P4" draw:layer="layout" svg:x1="49.3cm" svg:y1="11.782cm" svg:x2="49.3cm" svg:y2="11.282cm">
            <text:p/>
          </draw:line>
          <draw:line draw:style-name="gr38" draw:text-style-name="P4" draw:layer="layout" svg:x1="48.498cm" svg:y1="10.681cm" svg:x2="49cm" svg:y2="10.682cm">
            <text:p/>
          </draw:line>
          <draw:line draw:style-name="gr38" draw:text-style-name="P4" draw:layer="layout" svg:x1="48cm" svg:y1="11.1cm" svg:x2="49cm" svg:y2="11.082cm">
            <text:p/>
          </draw:line>
          <draw:frame draw:style-name="gr564" draw:text-style-name="P37" draw:layer="layout" svg:width="1.129cm" svg:height="0.569cm" svg:x="47.998cm" svg:y="10.213cm">
            <draw:text-box>
              <text:p><text:span text:style-name="T10">store</text:span></text:p>
            </draw:text-box>
          </draw:frame>
          <draw:line draw:style-name="gr38" draw:text-style-name="P4" draw:layer="layout" svg:x1="49.5cm" svg:y1="10.882cm" svg:x2="50cm" svg:y2="10.882cm">
            <text:p/>
          </draw:line>
          <draw:line draw:style-name="gr38" draw:text-style-name="P4" draw:layer="layout" svg:x1="50cm" svg:y1="10.204cm" svg:x2="50cm" svg:y2="10.882cm">
            <text:p/>
          </draw:line>
          <draw:frame draw:style-name="gr658" draw:text-style-name="P37" draw:layer="layout" svg:width="4.134cm" svg:height="0.887cm" svg:x="47.564cm" svg:y="11.613cm">
            <draw:text-box>
              <text:p><text:span text:style-name="T10">(ir_s[6:0] == </text:span><text:span text:style-name="T10">7'b1110011) &amp;&amp; </text:span></text:p>
              <text:p><text:span text:style-name="T10">(ir_s[31:20] == </text:span><text:span text:style-name="T10">12'h304)</text:span></text:p>
            </draw:text-box>
          </draw:frame>
          <draw:frame draw:style-name="gr659" draw:text-style-name="P58" draw:layer="layout" svg:width="8.122cm" svg:height="2.155cm" svg:x="40.478cm" svg:y="9.882cm">
            <draw:text-box>
              <text:p><text:span text:style-name="T16">case(ir_s[14:12])</text:span></text:p>
              <text:p><text:span text:style-name="T16"><text:s text:c="12"/></text:span><text:span text:style-name="T16">3'b001: </text:span><text:span text:style-name="T16">csr_mie_s &lt;= regA_s; <text:s text:c="4"/></text:span><text:span text:style-name="T16"><text:s text:c="35"/>// </text:span><text:span text:style-name="T16">csrrw</text:span></text:p>
              <text:p><text:span text:style-name="T16"><text:s text:c="12"/></text:span><text:span text:style-name="T16">3'b010: </text:span><text:span text:style-name="T16">csr_mie_s &lt;= csr_mie_s </text:span><text:span text:style-name="T16">| regA_s; <text:s text:c="24"/></text:span><text:span text:style-name="T16"><text:s text:c="3"/>// csrrs</text:span></text:p>
              <text:p><text:span text:style-name="T16"><text:s text:c="12"/></text:span><text:span text:style-name="T16">3'b011: </text:span><text:span text:style-name="T16">csr_mie_s &lt;= csr_mie_s </text:span><text:span text:style-name="T16">&amp; ~regA_s; <text:s text:c="21"/></text:span><text:span text:style-name="T16"><text:s text:c="5"/>// csrrc</text:span></text:p>
              <text:p><text:span text:style-name="T16"><text:s text:c="12"/></text:span><text:span text:style-name="T16">3'b101: </text:span><text:span text:style-name="T16">csr_mie_s &lt;= </text:span><text:span text:style-name="T16">{{52{1'b0}}, ir_s[19:15], </text:span><text:span text:style-name="T16">7'b0}; <text:s text:c="14"/>// csrrwi</text:span></text:p>
              <text:p><text:span text:style-name="T16"><text:s text:c="12"/></text:span><text:span text:style-name="T16">3'b110: </text:span><text:span text:style-name="T16">csr_mie_s &lt;= csr_mie_s </text:span><text:span text:style-name="T16">| {{52{1'b0}}, ir_s[19:15], </text:span><text:span text:style-name="T16">7'b0}; <text:s text:c="2"/>// csrrsi</text:span></text:p>
              <text:p><text:span text:style-name="T16"><text:s text:c="12"/></text:span><text:span text:style-name="T16">3'b111: </text:span><text:span text:style-name="T16">csr_mie_s &lt;= csr_mie_s </text:span><text:span text:style-name="T16">&amp; ~{{52{1'b0}}, </text:span><text:span text:style-name="T16">ir_s[19:15], 7'b0}; <text:s/>// </text:span><text:span text:style-name="T16">csrrci</text:span></text:p>
              <text:p><text:span text:style-name="T16"><text:s text:c="10"/></text:span><text:span text:style-name="T16">endcase</text:span></text:p>
            </draw:text-box>
          </draw:frame>
          <draw:g draw:style-name="gr1">
            <draw:custom-shape draw:style-name="gr550" draw:text-style-name="P48" draw:layer="layout" svg:width="0.5cm" svg:height="1cm" svg:x="52.5cm" svg:y="10cm">
              <text:p/>
              <draw:enhanced-geometry svg:viewBox="0 0 21600 21600" draw:mirror-horizontal="false" draw:mirror-vertical="false" draw:type="rectangle" draw:enhanced-path="M 0 0 L 21600 0 21600 21600 0 21600 0 0 Z N"/>
            </draw:custom-shape>
            <draw:line draw:style-name="gr60" draw:text-style-name="P11" draw:layer="layout" svg:x1="52.5cm" svg:y1="10.95cm" svg:x2="52.65cm" svg:y2="10.9cm">
              <text:p/>
            </draw:line>
            <draw:line draw:style-name="gr60" draw:text-style-name="P11" draw:layer="layout" svg:x1="52.5cm" svg:y1="10.85cm" svg:x2="52.65cm" svg:y2="10.9cm">
              <text:p/>
            </draw:line>
          </draw:g>
          <draw:line draw:style-name="gr38" draw:text-style-name="P4" draw:layer="layout" svg:x1="51.002cm" svg:y1="10cm" svg:x2="52cm" svg:y2="10cm">
            <text:p/>
          </draw:line>
          <draw:line draw:style-name="gr38" draw:text-style-name="P4" draw:layer="layout" svg:x1="52cm" svg:y1="10.2cm" svg:x2="52.5cm" svg:y2="10.2cm">
            <text:p/>
          </draw:line>
          <draw:line draw:style-name="gr38" draw:text-style-name="P4" draw:layer="layout" svg:x1="52cm" svg:y1="10cm" svg:x2="52cm" svg:y2="10.2cm">
            <text:p/>
          </draw:line>
          <draw:line draw:style-name="gr38" draw:text-style-name="P4" draw:layer="layout" svg:x1="40cm" svg:y1="9.5cm" svg:x2="43.8cm" svg:y2="9.5cm">
            <text:p/>
          </draw:line>
          <draw:line draw:style-name="gr38" draw:text-style-name="P4" draw:layer="layout" svg:x1="43.8cm" svg:y1="10cm" svg:x2="43.8cm" svg:y2="9.5cm">
            <text:p/>
          </draw:line>
          <draw:line draw:style-name="gr38" draw:text-style-name="P4" draw:layer="layout" svg:x1="49.3cm" svg:y1="12.4cm" svg:x2="49.3cm" svg:y2="13cm">
            <text:p/>
          </draw:line>
          <draw:line draw:style-name="gr38" draw:text-style-name="P4" draw:layer="layout" svg:x1="51.1cm" svg:y1="11.4cm" svg:x2="52cm" svg:y2="11.4cm">
            <text:p/>
          </draw:line>
          <draw:line draw:style-name="gr38" draw:text-style-name="P4" draw:layer="layout" svg:x1="52cm" svg:y1="13cm" svg:x2="52cm" svg:y2="11.4cm">
            <text:p/>
          </draw:line>
        </draw:g>
        <draw:g draw:style-name="gr1">
          <draw:frame draw:style-name="gr660" draw:text-style-name="P37" draw:layer="layout" svg:width="2.327cm" svg:height="0.569cm" svg:x="52.3cm" svg:y="5.531cm">
            <draw:text-box>
              <text:p><text:span text:style-name="T10">csr_mstatus_s</text:span></text:p>
            </draw:text-box>
          </draw:frame>
          <draw:line draw:style-name="gr38" draw:text-style-name="P4" draw:layer="layout" svg:x1="52.5cm" svg:y1="6cm" svg:x2="55cm" svg:y2="6cm">
            <text:p/>
          </draw:line>
          <draw:custom-shape draw:style-name="gr661" draw:text-style-name="P43" draw:layer="layout" svg:width="22cm" svg:height="7cm" svg:x="33cm" svg:y="1cm">
            <text:p/>
            <draw:enhanced-geometry svg:viewBox="0 0 21600 21600" draw:mirror-horizontal="false" draw:mirror-vertical="false" draw:type="rectangle" draw:enhanced-path="M 0 0 L 21600 0 21600 21600 0 21600 0 0 Z N"/>
          </draw:custom-shape>
          <draw:frame draw:style-name="gr662" draw:text-style-name="P44" draw:layer="layout" svg:width="2.602cm" svg:height="0.569cm" svg:x="49.6cm" svg:y="2.6cm">
            <draw:text-box>
              <text:p><text:span text:style-name="T12">CSR: MSTATUS</text:span></text:p>
            </draw:text-box>
          </draw:frame>
          <draw:frame draw:style-name="gr657" draw:text-style-name="P40" draw:layer="layout" svg:width="2.88cm" svg:height="0.887cm" svg:x="42.62cm" svg:y="2.782cm">
            <draw:text-box>
              <text:p><text:span text:style-name="T13">exec_phase_s </text:span><text:span text:style-name="T15">&amp;&amp; </text:span></text:p>
              <text:p><text:span text:style-name="T15">ir_valid_s</text:span></text:p>
            </draw:text-box>
          </draw:frame>
          <draw:polygon draw:style-name="gr58" draw:text-style-name="P1" draw:layer="layout" svg:width="0.499cm" svg:height="0.999cm" svg:x="43.502cm" svg:y="1.504cm" svg:viewBox="0 0 500 1000" draw:points="0,0 0,1000 500,850 500,150">
            <text:p/>
          </draw:polygon>
          <draw:line draw:style-name="gr146" draw:text-style-name="P4" draw:layer="layout" svg:x1="43.802cm" svg:y1="2.904cm" svg:x2="43.802cm" svg:y2="2.404cm">
            <text:p/>
          </draw:line>
          <draw:line draw:style-name="gr38" draw:text-style-name="P4" draw:layer="layout" svg:x1="43cm" svg:y1="1.803cm" svg:x2="43.502cm" svg:y2="1.804cm">
            <text:p/>
          </draw:line>
          <draw:line draw:style-name="gr38" draw:text-style-name="P4" draw:layer="layout" svg:x1="43cm" svg:y1="2.204cm" svg:x2="43.502cm" svg:y2="2.204cm">
            <text:p/>
          </draw:line>
          <draw:frame draw:style-name="gr564" draw:text-style-name="P37" draw:layer="layout" svg:width="1.129cm" svg:height="0.569cm" svg:x="42.5cm" svg:y="1.335cm">
            <draw:text-box>
              <text:p><text:span text:style-name="T10">store</text:span></text:p>
            </draw:text-box>
          </draw:frame>
          <draw:polygon draw:style-name="gr58" draw:text-style-name="P1" draw:layer="layout" svg:width="0.499cm" svg:height="0.999cm" svg:x="42cm" svg:y="2.382cm" svg:viewBox="0 0 500 1000" draw:points="0,0 0,1000 500,850 500,150">
            <text:p/>
          </draw:polygon>
          <draw:line draw:style-name="gr146" draw:text-style-name="P4" draw:layer="layout" svg:x1="42.3cm" svg:y1="3.782cm" svg:x2="42.3cm" svg:y2="3.282cm">
            <text:p/>
          </draw:line>
          <draw:line draw:style-name="gr38" draw:text-style-name="P4" draw:layer="layout" svg:x1="41.498cm" svg:y1="2.681cm" svg:x2="42cm" svg:y2="2.682cm">
            <text:p/>
          </draw:line>
          <draw:line draw:style-name="gr38" draw:text-style-name="P4" draw:layer="layout" svg:x1="41cm" svg:y1="3.1cm" svg:x2="42cm" svg:y2="3.082cm">
            <text:p/>
          </draw:line>
          <draw:frame draw:style-name="gr564" draw:text-style-name="P37" draw:layer="layout" svg:width="1.129cm" svg:height="0.569cm" svg:x="40.998cm" svg:y="2.213cm">
            <draw:text-box>
              <text:p><text:span text:style-name="T10">store</text:span></text:p>
            </draw:text-box>
          </draw:frame>
          <draw:line draw:style-name="gr38" draw:text-style-name="P4" draw:layer="layout" svg:x1="42.5cm" svg:y1="2.882cm" svg:x2="43cm" svg:y2="2.882cm">
            <text:p/>
          </draw:line>
          <draw:line draw:style-name="gr38" draw:text-style-name="P4" draw:layer="layout" svg:x1="43cm" svg:y1="2.204cm" svg:x2="43cm" svg:y2="2.882cm">
            <text:p/>
          </draw:line>
          <draw:frame draw:style-name="gr658" draw:text-style-name="P37" draw:layer="layout" svg:width="4.134cm" svg:height="0.887cm" svg:x="40.564cm" svg:y="3.613cm">
            <draw:text-box>
              <text:p><text:span text:style-name="T10">(ir_s[6:0] == </text:span><text:span text:style-name="T10">7'b1110011) &amp;&amp; </text:span></text:p>
              <text:p><text:span text:style-name="T10">(ir_s[31:20] == </text:span><text:span text:style-name="T10">12'h300)</text:span></text:p>
            </draw:text-box>
          </draw:frame>
          <draw:frame draw:style-name="gr663" draw:text-style-name="P58" draw:layer="layout" svg:width="8.804cm" svg:height="2.155cm" svg:x="33.078cm" svg:y="1.882cm">
            <draw:text-box>
              <text:p><text:span text:style-name="T16">case(ir_s[14:12])</text:span></text:p>
              <text:p><text:span text:style-name="T16"><text:s text:c="12"/></text:span><text:span text:style-name="T16">3'b001: </text:span><text:span text:style-name="T16">csr_mstatus_s &lt;= </text:span><text:span text:style-name="T16">regA_s; <text:s text:c="26"/></text:span><text:span text:style-name="T16"><text:s text:c="13"/>// csrrw</text:span></text:p>
              <text:p><text:span text:style-name="T16"><text:s text:c="12"/></text:span><text:span text:style-name="T16">3'b010: </text:span><text:span text:style-name="T16">csr_mstatus_s &lt;= </text:span><text:span text:style-name="T16">csr_mstatus_s | regA_s; </text:span><text:span text:style-name="T16"><text:s text:c="27"/>// csrrs</text:span></text:p>
              <text:p><text:span text:style-name="T16"><text:s text:c="12"/></text:span><text:span text:style-name="T16">3'b011: </text:span><text:span text:style-name="T16">csr_mstatus_s &lt;= </text:span><text:span text:style-name="T16">csr_mstatus_s &amp; </text:span><text:span text:style-name="T16">~regA_s; <text:s text:c="24"/></text:span><text:span text:style-name="T16"><text:s text:c="2"/>// csrrc</text:span></text:p>
              <text:p><text:span text:style-name="T16"><text:s text:c="12"/></text:span><text:span text:style-name="T16">3'b101: </text:span><text:span text:style-name="T16">csr_mstatus_s &lt;= </text:span><text:span text:style-name="T16">{{52{1'b0}}, ir_s[19:15], </text:span><text:span text:style-name="T16">7'b0}; <text:s text:c="14"/>// csrrwi</text:span></text:p>
              <text:p><text:span text:style-name="T16"><text:s text:c="12"/></text:span><text:span text:style-name="T16">3'b110: </text:span><text:span text:style-name="T16">csr_mstatus_s &lt;= </text:span><text:span text:style-name="T16">csr_mstatus_s | </text:span><text:span text:style-name="T16">{{52{1'b0}}, ir_s[19:15], </text:span><text:span text:style-name="T16">7'b0}; <text:s text:c="2"/>// csrrsi</text:span></text:p>
              <text:p><text:span text:style-name="T16"><text:s text:c="12"/></text:span><text:span text:style-name="T16">3'b111: </text:span><text:span text:style-name="T16">csr_mstatus_s &lt;= </text:span><text:span text:style-name="T16">csr_msttus_s &amp; </text:span><text:span text:style-name="T16">~{{52{1'b0}}, ir_s[19:15], </text:span><text:span text:style-name="T16">7'b0}; <text:s/>// csrrci</text:span></text:p>
              <text:p><text:span text:style-name="T16"><text:s text:c="10"/></text:span><text:span text:style-name="T16">endcase</text:span></text:p>
            </draw:text-box>
          </draw:frame>
          <draw:g draw:style-name="gr1">
            <draw:custom-shape draw:style-name="gr550" draw:text-style-name="P48" draw:layer="layout" svg:width="0.5cm" svg:height="1cm" svg:x="52cm" svg:y="5.8cm">
              <text:p/>
              <draw:enhanced-geometry svg:viewBox="0 0 21600 21600" draw:mirror-horizontal="false" draw:mirror-vertical="false" draw:type="rectangle" draw:enhanced-path="M 0 0 L 21600 0 21600 21600 0 21600 0 0 Z N"/>
            </draw:custom-shape>
            <draw:line draw:style-name="gr60" draw:text-style-name="P11" draw:layer="layout" svg:x1="52cm" svg:y1="6.75cm" svg:x2="52.15cm" svg:y2="6.7cm">
              <text:p/>
            </draw:line>
            <draw:line draw:style-name="gr60" draw:text-style-name="P11" draw:layer="layout" svg:x1="52cm" svg:y1="6.65cm" svg:x2="52.15cm" svg:y2="6.7cm">
              <text:p/>
            </draw:line>
          </draw:g>
          <draw:line draw:style-name="gr38" draw:text-style-name="P4" draw:layer="layout" svg:x1="51.002cm" svg:y1="6cm" svg:x2="52cm" svg:y2="6cm">
            <text:p/>
          </draw:line>
          <draw:polygon draw:style-name="gr58" draw:text-style-name="P1" draw:layer="layout" svg:width="0.499cm" svg:height="0.999cm" svg:x="50.502cm" svg:y="5.504cm" svg:viewBox="0 0 500 1000" draw:points="0,0 0,1000 500,850 500,150">
            <text:p/>
          </draw:polygon>
          <draw:line draw:style-name="gr146" draw:text-style-name="P4" draw:layer="layout" svg:x1="50.802cm" svg:y1="6.904cm" svg:x2="50.802cm" svg:y2="6.404cm">
            <text:p/>
          </draw:line>
          <draw:line draw:style-name="gr38" draw:text-style-name="P4" draw:layer="layout" svg:x1="50cm" svg:y1="5.803cm" svg:x2="50.502cm" svg:y2="5.804cm">
            <text:p/>
          </draw:line>
          <draw:line draw:style-name="gr38" draw:text-style-name="P4" draw:layer="layout" svg:x1="50cm" svg:y1="6.204cm" svg:x2="50.502cm" svg:y2="6.204cm">
            <text:p/>
          </draw:line>
          <draw:frame draw:style-name="gr562" draw:text-style-name="P37" draw:layer="layout" svg:width="2.14cm" svg:height="0.569cm" svg:x="50cm" svg:y="6.9cm">
            <draw:text-box>
              <text:p><text:span text:style-name="T10">trap_taken_s</text:span></text:p>
            </draw:text-box>
          </draw:frame>
          <draw:frame draw:style-name="gr664" draw:text-style-name="P58" draw:layer="layout" svg:width="4.122cm" svg:height="0.727cm" svg:x="46.6cm" svg:y="5.873cm">
            <draw:text-box>
              <text:p><text:span text:style-name="T16">csr_mstatus_s[7] &lt;= </text:span><text:span text:style-name="T16">csr_mstatus_mie;</text:span></text:p>
              <text:p><text:span text:style-name="T16">csr_mstatus_s[3] &lt;= 0;</text:span></text:p>
            </draw:text-box>
          </draw:frame>
          <draw:polygon draw:style-name="gr58" draw:text-style-name="P1" draw:layer="layout" svg:width="0.499cm" svg:height="0.999cm" svg:x="48.502cm" svg:y="3.504cm" svg:viewBox="0 0 500 1000" draw:points="0,0 0,1000 500,850 500,150">
            <text:p/>
          </draw:polygon>
          <draw:line draw:style-name="gr146" draw:text-style-name="P4" draw:layer="layout" svg:x1="48.802cm" svg:y1="4.904cm" svg:x2="48.802cm" svg:y2="4.404cm">
            <text:p/>
          </draw:line>
          <draw:line draw:style-name="gr38" draw:text-style-name="P4" draw:layer="layout" svg:x1="48cm" svg:y1="3.803cm" svg:x2="48.502cm" svg:y2="3.804cm">
            <text:p/>
          </draw:line>
          <draw:line draw:style-name="gr38" draw:text-style-name="P4" draw:layer="layout" svg:x1="48cm" svg:y1="4.204cm" svg:x2="48.502cm" svg:y2="4.204cm">
            <text:p/>
          </draw:line>
          <draw:frame draw:style-name="gr665" draw:text-style-name="P37" draw:layer="layout" svg:width="2.331cm" svg:height="0.887cm" svg:x="47.7cm" svg:y="4.7cm">
            <draw:text-box>
              <text:p><text:span text:style-name="T10">is_mret_s &amp;&amp; </text:span></text:p>
              <text:p><text:span text:style-name="T13">exec_phase_s</text:span></text:p>
            </draw:text-box>
          </draw:frame>
          <draw:frame draw:style-name="gr666" draw:text-style-name="P58" draw:layer="layout" svg:width="4.24cm" svg:height="0.727cm" svg:x="44.5cm" svg:y="3.873cm">
            <draw:text-box>
              <text:p><text:span text:style-name="T16">csr_mstatus_s[3] &lt;= </text:span><text:span text:style-name="T16">csr_mstatus_mpie;</text:span></text:p>
              <text:p><text:span text:style-name="T16">csr_mstatus_s[7] &lt;= </text:span><text:span text:style-name="T16">1'b1;</text:span></text:p>
            </draw:text-box>
          </draw:frame>
          <draw:line draw:style-name="gr38" draw:text-style-name="P4" draw:layer="layout" svg:x1="49.002cm" svg:y1="4cm" svg:x2="50cm" svg:y2="4cm">
            <text:p/>
          </draw:line>
          <draw:line draw:style-name="gr38" draw:text-style-name="P4" draw:layer="layout" svg:x1="50cm" svg:y1="4cm" svg:x2="50cm" svg:y2="5.803cm">
            <text:p/>
          </draw:line>
          <draw:line draw:style-name="gr38" draw:text-style-name="P4" draw:layer="layout" svg:x1="44.002cm" svg:y1="2cm" svg:x2="48cm" svg:y2="2cm">
            <text:p/>
          </draw:line>
          <draw:line draw:style-name="gr38" draw:text-style-name="P4" draw:layer="layout" svg:x1="48cm" svg:y1="2cm" svg:x2="48cm" svg:y2="3.804cm">
            <text:p/>
          </draw:line>
          <draw:line draw:style-name="gr38" draw:text-style-name="P4" draw:layer="layout" svg:x1="33cm" svg:y1="1.5cm" svg:x2="36.8cm" svg:y2="1.5cm">
            <text:p/>
          </draw:line>
          <draw:line draw:style-name="gr38" draw:text-style-name="P4" draw:layer="layout" svg:x1="36.8cm" svg:y1="2.2cm" svg:x2="36.8cm" svg:y2="1.5cm">
            <text:p/>
          </draw:line>
          <draw:line draw:style-name="gr38" draw:text-style-name="P4" draw:layer="layout" svg:x1="42.3cm" svg:y1="4.4cm" svg:x2="42.3cm" svg:y2="8cm">
            <text:p/>
          </draw:line>
          <draw:line draw:style-name="gr38" draw:text-style-name="P4" draw:layer="layout" svg:x1="50.8cm" svg:y1="7.469cm" svg:x2="50.8cm" svg:y2="8cm">
            <text:p/>
          </draw:line>
          <draw:line draw:style-name="gr38" draw:text-style-name="P4" draw:layer="layout" svg:x1="47.8cm" svg:y1="5cm" svg:x2="46.4cm" svg:y2="5cm">
            <text:p/>
          </draw:line>
          <draw:line draw:style-name="gr38" draw:text-style-name="P4" draw:layer="layout" svg:x1="46.4cm" svg:y1="5cm" svg:x2="46.4cm" svg:y2="8cm">
            <text:p/>
          </draw:line>
          <draw:line draw:style-name="gr38" draw:text-style-name="P4" draw:layer="layout" svg:x1="44.6cm" svg:y1="3.4cm" svg:x2="44.6cm" svg:y2="8cm">
            <text:p/>
          </draw:line>
          <draw:line draw:style-name="gr38" draw:text-style-name="P4" draw:layer="layout" svg:x1="44.6cm" svg:y1="3.4cm" svg:x2="44.1cm" svg:y2="3.4cm">
            <text:p/>
          </draw:line>
        </draw:g>
        <draw:g draw:style-name="gr1">
          <draw:frame draw:style-name="gr638" draw:text-style-name="P37" draw:layer="layout" svg:width="2.03cm" svg:height="0.569cm" svg:x="52.3cm" svg:y="25.331cm">
            <draw:text-box>
              <text:p><text:span text:style-name="T10">csr_mepc_s</text:span></text:p>
            </draw:text-box>
          </draw:frame>
          <draw:line draw:style-name="gr38" draw:text-style-name="P4" draw:layer="layout" svg:x1="52.5cm" svg:y1="25.8cm" svg:x2="55cm" svg:y2="25.8cm">
            <text:p/>
          </draw:line>
          <draw:custom-shape draw:style-name="gr667" draw:text-style-name="P43" draw:layer="layout" svg:width="19cm" svg:height="6cm" svg:x="36cm" svg:y="22cm">
            <text:p/>
            <draw:enhanced-geometry svg:viewBox="0 0 21600 21600" draw:mirror-horizontal="false" draw:mirror-vertical="false" draw:type="rectangle" draw:enhanced-path="M 0 0 L 21600 0 21600 21600 0 21600 0 0 Z N"/>
          </draw:custom-shape>
          <draw:frame draw:style-name="gr662" draw:text-style-name="P44" draw:layer="layout" svg:width="2.1cm" svg:height="0.569cm" svg:x="50.3cm" svg:y="24.5cm">
            <draw:text-box>
              <text:p><text:span text:style-name="T12">CSR: MEPC</text:span></text:p>
            </draw:text-box>
          </draw:frame>
          <draw:frame draw:style-name="gr657" draw:text-style-name="P40" draw:layer="layout" svg:width="2.88cm" svg:height="0.887cm" svg:x="45.62cm" svg:y="23.782cm">
            <draw:text-box>
              <text:p><text:span text:style-name="T13">exec_phase_s </text:span><text:span text:style-name="T15">&amp;&amp; </text:span></text:p>
              <text:p><text:span text:style-name="T15">ir_valid_s</text:span></text:p>
            </draw:text-box>
          </draw:frame>
          <draw:polygon draw:style-name="gr58" draw:text-style-name="P1" draw:layer="layout" svg:width="0.499cm" svg:height="0.999cm" svg:x="46.502cm" svg:y="22.504cm" svg:viewBox="0 0 500 1000" draw:points="0,0 0,1000 500,850 500,150">
            <text:p/>
          </draw:polygon>
          <draw:line draw:style-name="gr146" draw:text-style-name="P4" draw:layer="layout" svg:x1="46.802cm" svg:y1="23.904cm" svg:x2="46.802cm" svg:y2="23.404cm">
            <text:p/>
          </draw:line>
          <draw:line draw:style-name="gr38" draw:text-style-name="P4" draw:layer="layout" svg:x1="46cm" svg:y1="22.803cm" svg:x2="46.502cm" svg:y2="22.804cm">
            <text:p/>
          </draw:line>
          <draw:line draw:style-name="gr38" draw:text-style-name="P4" draw:layer="layout" svg:x1="46cm" svg:y1="23.204cm" svg:x2="46.502cm" svg:y2="23.204cm">
            <text:p/>
          </draw:line>
          <draw:frame draw:style-name="gr564" draw:text-style-name="P37" draw:layer="layout" svg:width="1.129cm" svg:height="0.569cm" svg:x="45.5cm" svg:y="22.335cm">
            <draw:text-box>
              <text:p><text:span text:style-name="T10">store</text:span></text:p>
            </draw:text-box>
          </draw:frame>
          <draw:polygon draw:style-name="gr58" draw:text-style-name="P1" draw:layer="layout" svg:width="0.499cm" svg:height="0.999cm" svg:x="45cm" svg:y="23.382cm" svg:viewBox="0 0 500 1000" draw:points="0,0 0,1000 500,850 500,150">
            <text:p/>
          </draw:polygon>
          <draw:line draw:style-name="gr146" draw:text-style-name="P4" draw:layer="layout" svg:x1="45.3cm" svg:y1="24.782cm" svg:x2="45.3cm" svg:y2="24.282cm">
            <text:p/>
          </draw:line>
          <draw:line draw:style-name="gr38" draw:text-style-name="P4" draw:layer="layout" svg:x1="44.498cm" svg:y1="23.681cm" svg:x2="45cm" svg:y2="23.682cm">
            <text:p/>
          </draw:line>
          <draw:line draw:style-name="gr38" draw:text-style-name="P4" draw:layer="layout" svg:x1="44cm" svg:y1="24.1cm" svg:x2="45cm" svg:y2="24.082cm">
            <text:p/>
          </draw:line>
          <draw:frame draw:style-name="gr564" draw:text-style-name="P37" draw:layer="layout" svg:width="1.129cm" svg:height="0.569cm" svg:x="43.998cm" svg:y="23.213cm">
            <draw:text-box>
              <text:p><text:span text:style-name="T10">store</text:span></text:p>
            </draw:text-box>
          </draw:frame>
          <draw:line draw:style-name="gr38" draw:text-style-name="P4" draw:layer="layout" svg:x1="45.5cm" svg:y1="23.882cm" svg:x2="46cm" svg:y2="23.882cm">
            <text:p/>
          </draw:line>
          <draw:line draw:style-name="gr38" draw:text-style-name="P4" draw:layer="layout" svg:x1="46cm" svg:y1="23.204cm" svg:x2="46cm" svg:y2="23.882cm">
            <text:p/>
          </draw:line>
          <draw:frame draw:style-name="gr658" draw:text-style-name="P37" draw:layer="layout" svg:width="4.134cm" svg:height="0.887cm" svg:x="43.564cm" svg:y="24.613cm">
            <draw:text-box>
              <text:p><text:span text:style-name="T10">(ir_s[6:0] == </text:span><text:span text:style-name="T10">7'b1110011) &amp;&amp; </text:span></text:p>
              <text:p><text:span text:style-name="T10">(ir_s[31:20] == </text:span><text:span text:style-name="T10">12'h341)</text:span></text:p>
            </draw:text-box>
          </draw:frame>
          <draw:frame draw:style-name="gr663" draw:text-style-name="P58" draw:layer="layout" svg:width="8.804cm" svg:height="2.155cm" svg:x="36.078cm" svg:y="22.882cm">
            <draw:text-box>
              <text:p><text:span text:style-name="T16">case(ir_s[14:12])</text:span></text:p>
              <text:p><text:span text:style-name="T16"><text:s text:c="12"/></text:span><text:span text:style-name="T16">3'b001: </text:span><text:span text:style-name="T16">csr_mepc_s &lt;= regA_s; <text:s/></text:span><text:span text:style-name="T16"><text:s text:c="38"/>/</text:span><text:span text:style-name="T16">/ csrrw</text:span></text:p>
              <text:p><text:span text:style-name="T16"><text:s text:c="12"/></text:span><text:span text:style-name="T16">3'b010: </text:span><text:span text:style-name="T16">csr_mepc_s &lt;= </text:span><text:span text:style-name="T16">csr_mepc_s | regA_s; <text:s text:c="4"/></text:span><text:span text:style-name="T16"><text:s text:c="23"/>// csrrs</text:span></text:p>
              <text:p><text:span text:style-name="T16"><text:s text:c="12"/></text:span><text:span text:style-name="T16">3'b011: </text:span><text:span text:style-name="T16">csr_mepc_s &lt;= </text:span><text:span text:style-name="T16">csr_mepc_s &amp; ~regA_s; </text:span><text:span text:style-name="T16"><text:s text:c="26"/>// csrrc</text:span></text:p>
              <text:p><text:span text:style-name="T16"><text:s text:c="12"/></text:span><text:span text:style-name="T16">3'b101: </text:span><text:span text:style-name="T16">csr_mepc_s &lt;= </text:span><text:span text:style-name="T16">{{52{1'b0}}, ir_s[19:15], </text:span><text:span text:style-name="T16">7'b0}; <text:s text:c="14"/>// csrrwi</text:span></text:p>
              <text:p><text:span text:style-name="T16"><text:s text:c="12"/></text:span><text:span text:style-name="T16">3'b110: </text:span><text:span text:style-name="T16">csr_mepc_s &lt;= </text:span><text:span text:style-name="T16">csr_mepc_s | </text:span><text:span text:style-name="T16">{{52{1'b0}}, ir_s[19:15], </text:span><text:span text:style-name="T16">7'b0}; <text:s text:c="2"/>// csrrsi</text:span></text:p>
              <text:p><text:span text:style-name="T16"><text:s text:c="12"/></text:span><text:span text:style-name="T16">3'b111: </text:span><text:span text:style-name="T16">csr_mepc_s &lt;= </text:span><text:span text:style-name="T16">csr_mepc_s &amp; </text:span><text:span text:style-name="T16">~{{52{1'b0}}, ir_s[19:15], </text:span><text:span text:style-name="T16">7'b0}; <text:s/>// csrrci</text:span></text:p>
              <text:p><text:span text:style-name="T16"><text:s text:c="10"/></text:span><text:span text:style-name="T16">endcase</text:span></text:p>
            </draw:text-box>
          </draw:frame>
          <draw:g draw:style-name="gr1">
            <draw:custom-shape draw:style-name="gr550" draw:text-style-name="P48" draw:layer="layout" svg:width="0.5cm" svg:height="1cm" svg:x="52cm" svg:y="25.6cm">
              <text:p/>
              <draw:enhanced-geometry svg:viewBox="0 0 21600 21600" draw:mirror-horizontal="false" draw:mirror-vertical="false" draw:type="rectangle" draw:enhanced-path="M 0 0 L 21600 0 21600 21600 0 21600 0 0 Z N"/>
            </draw:custom-shape>
            <draw:line draw:style-name="gr60" draw:text-style-name="P11" draw:layer="layout" svg:x1="52cm" svg:y1="26.55cm" svg:x2="52.15cm" svg:y2="26.5cm">
              <text:p/>
            </draw:line>
            <draw:line draw:style-name="gr60" draw:text-style-name="P11" draw:layer="layout" svg:x1="52cm" svg:y1="26.45cm" svg:x2="52.15cm" svg:y2="26.5cm">
              <text:p/>
            </draw:line>
          </draw:g>
          <draw:line draw:style-name="gr38" draw:text-style-name="P4" draw:layer="layout" svg:x1="51.002cm" svg:y1="25.8cm" svg:x2="52cm" svg:y2="25.8cm">
            <text:p/>
          </draw:line>
          <draw:polygon draw:style-name="gr58" draw:text-style-name="P1" draw:layer="layout" svg:width="0.499cm" svg:height="0.999cm" svg:x="50.5cm" svg:y="25.3cm" svg:viewBox="0 0 500 1000" draw:points="0,0 0,1000 500,850 500,150">
            <text:p/>
          </draw:polygon>
          <draw:line draw:style-name="gr146" draw:text-style-name="P4" draw:layer="layout" svg:x1="50.8cm" svg:y1="26.7cm" svg:x2="50.8cm" svg:y2="26.2cm">
            <text:p/>
          </draw:line>
          <draw:line draw:style-name="gr38" draw:text-style-name="P4" draw:layer="layout" svg:x1="49.998cm" svg:y1="25.599cm" svg:x2="50.5cm" svg:y2="25.6cm">
            <text:p/>
          </draw:line>
          <draw:line draw:style-name="gr38" draw:text-style-name="P4" draw:layer="layout" svg:x1="49.998cm" svg:y1="26cm" svg:x2="50.5cm" svg:y2="26cm">
            <text:p/>
          </draw:line>
          <draw:frame draw:style-name="gr562" draw:text-style-name="P37" draw:layer="layout" svg:width="2.14cm" svg:height="0.569cm" svg:x="49.7cm" svg:y="26.631cm">
            <draw:text-box>
              <text:p><text:span text:style-name="T10">trap_taken_s</text:span></text:p>
            </draw:text-box>
          </draw:frame>
          <draw:polygon draw:style-name="gr58" draw:text-style-name="P1" draw:layer="layout" svg:width="0.499cm" svg:height="0.999cm" svg:x="48.502cm" svg:y="25.5cm" svg:viewBox="0 0 500 1000" draw:points="0,0 0,1000 500,850 500,150">
            <text:p/>
          </draw:polygon>
          <draw:line draw:style-name="gr146" draw:text-style-name="P4" draw:layer="layout" svg:x1="48.802cm" svg:y1="26.9cm" svg:x2="48.802cm" svg:y2="26.4cm">
            <text:p/>
          </draw:line>
          <draw:line draw:style-name="gr38" draw:text-style-name="P4" draw:layer="layout" svg:x1="48cm" svg:y1="25.799cm" svg:x2="48.502cm" svg:y2="25.8cm">
            <text:p/>
          </draw:line>
          <draw:line draw:style-name="gr38" draw:text-style-name="P4" draw:layer="layout" svg:x1="48cm" svg:y1="26.2cm" svg:x2="48.502cm" svg:y2="26.2cm">
            <text:p/>
          </draw:line>
          <draw:frame draw:style-name="gr668" draw:text-style-name="P37" draw:layer="layout" svg:width="2.801cm" svg:height="0.887cm" svg:x="47cm" svg:y="27.013cm">
            <draw:text-box>
              <text:p><text:span text:style-name="T10">trap_illegal_s || </text:span></text:p>
              <text:p><text:span text:style-name="T10">trap_misaligned_</text:span><text:span text:style-name="T10">s</text:span></text:p>
            </draw:text-box>
          </draw:frame>
          <draw:line draw:style-name="gr38" draw:text-style-name="P4" draw:layer="layout" svg:x1="49.002cm" svg:y1="25.996cm" svg:x2="50cm" svg:y2="25.996cm">
            <text:p/>
          </draw:line>
          <draw:frame draw:style-name="gr669" draw:text-style-name="P37" draw:layer="layout" svg:width="1.192cm" svg:height="0.569cm" svg:x="47.5cm" svg:y="25.831cm">
            <draw:text-box>
              <text:p><text:span text:style-name="T10">PC_s</text:span></text:p>
            </draw:text-box>
          </draw:frame>
          <draw:frame draw:style-name="gr617" draw:text-style-name="P37" draw:layer="layout" svg:width="1.51cm" svg:height="0.569cm" svg:x="47.2cm" svg:y="25.431cm">
            <draw:text-box>
              <text:p><text:span text:style-name="T10">PCp4_s</text:span></text:p>
            </draw:text-box>
          </draw:frame>
          <draw:line draw:style-name="gr38" draw:text-style-name="P4" draw:layer="layout" svg:x1="47.002cm" svg:y1="23cm" svg:x2="50cm" svg:y2="23cm">
            <text:p/>
          </draw:line>
          <draw:line draw:style-name="gr38" draw:text-style-name="P4" draw:layer="layout" svg:x1="49.998cm" svg:y1="25.599cm" svg:x2="50cm" svg:y2="23cm">
            <text:p/>
          </draw:line>
          <draw:line draw:style-name="gr38" draw:text-style-name="P4" draw:layer="layout" svg:x1="36cm" svg:y1="22.5cm" svg:x2="39.6cm" svg:y2="22.5cm">
            <text:p/>
          </draw:line>
          <draw:line draw:style-name="gr38" draw:text-style-name="P4" draw:layer="layout" svg:x1="39.6cm" svg:y1="22.5cm" svg:x2="39.6cm" svg:y2="23.2cm">
            <text:p/>
          </draw:line>
          <draw:line draw:style-name="gr38" draw:text-style-name="P4" draw:layer="layout" svg:x1="45.3cm" svg:y1="25.4cm" svg:x2="45.3cm" svg:y2="28cm">
            <text:p/>
          </draw:line>
          <draw:line draw:style-name="gr38" draw:text-style-name="P4" draw:layer="layout" svg:x1="47.2cm" svg:y1="27.3cm" svg:x2="47cm" svg:y2="27.3cm">
            <text:p/>
          </draw:line>
          <draw:line draw:style-name="gr38" draw:text-style-name="P4" draw:layer="layout" svg:x1="47cm" svg:y1="28cm" svg:x2="47cm" svg:y2="27.3cm">
            <text:p/>
          </draw:line>
          <draw:line draw:style-name="gr38" draw:text-style-name="P4" draw:layer="layout" svg:x1="49.6cm" svg:y1="27.6cm" svg:x2="49.801cm" svg:y2="27.6cm">
            <text:p/>
          </draw:line>
          <draw:line draw:style-name="gr38" draw:text-style-name="P4" draw:layer="layout" svg:x1="49.8cm" svg:y1="28cm" svg:x2="49.801cm" svg:y2="27.6cm">
            <text:p/>
          </draw:line>
          <draw:line draw:style-name="gr38" draw:text-style-name="P4" draw:layer="layout" svg:x1="50.8cm" svg:y1="27.1cm" svg:x2="50.8cm" svg:y2="28cm">
            <text:p/>
          </draw:line>
          <draw:line draw:style-name="gr38" draw:text-style-name="P4" draw:layer="layout" svg:x1="46.3cm" svg:y1="28cm" svg:x2="46.3cm" svg:y2="25.6cm">
            <text:p/>
          </draw:line>
          <draw:line draw:style-name="gr38" draw:text-style-name="P4" draw:layer="layout" svg:x1="48cm" svg:y1="25cm" svg:x2="46.3cm" svg:y2="25.6cm">
            <text:p/>
          </draw:line>
          <draw:line draw:style-name="gr38" draw:text-style-name="P4" draw:layer="layout" svg:x1="48cm" svg:y1="25cm" svg:x2="47.1cm" svg:y2="24.4cm">
            <text:p/>
          </draw:line>
        </draw:g>
        <draw:g draw:style-name="gr1">
          <draw:frame draw:style-name="gr670" draw:text-style-name="P37" draw:layer="layout" svg:width="2.094cm" svg:height="0.569cm" svg:x="52.806cm" svg:y="17.531cm">
            <draw:text-box>
              <text:p><text:span text:style-name="T10">csr_mtvec_s</text:span></text:p>
            </draw:text-box>
          </draw:frame>
          <draw:custom-shape draw:style-name="gr671" draw:text-style-name="P43" draw:layer="layout" svg:width="14cm" svg:height="4cm" svg:x="41cm" svg:y="17cm">
            <text:p/>
            <draw:enhanced-geometry svg:viewBox="0 0 21600 21600" draw:mirror-horizontal="false" draw:mirror-vertical="false" draw:type="rectangle" draw:enhanced-path="M 0 0 L 21600 0 21600 21600 0 21600 0 0 Z N"/>
          </draw:custom-shape>
          <draw:frame draw:style-name="gr662" draw:text-style-name="P44" draw:layer="layout" svg:width="2.3cm" svg:height="0.569cm" svg:x="51.7cm" svg:y="17.031cm">
            <draw:text-box>
              <text:p><text:span text:style-name="T12">CSR: MTVEC</text:span></text:p>
            </draw:text-box>
          </draw:frame>
          <draw:frame draw:style-name="gr657" draw:text-style-name="P40" draw:layer="layout" svg:width="2.88cm" svg:height="0.887cm" svg:x="50.12cm" svg:y="18.782cm">
            <draw:text-box>
              <text:p><text:span text:style-name="T13">exec_phase_s </text:span><text:span text:style-name="T15">&amp;&amp; </text:span></text:p>
              <text:p><text:span text:style-name="T15">ir_valid_s</text:span></text:p>
            </draw:text-box>
          </draw:frame>
          <draw:polygon draw:style-name="gr58" draw:text-style-name="P1" draw:layer="layout" svg:width="0.499cm" svg:height="0.999cm" svg:x="51.002cm" svg:y="17.504cm" svg:viewBox="0 0 500 1000" draw:points="0,0 0,1000 500,850 500,150">
            <text:p/>
          </draw:polygon>
          <draw:line draw:style-name="gr146" draw:text-style-name="P4" draw:layer="layout" svg:x1="51.302cm" svg:y1="18.904cm" svg:x2="51.302cm" svg:y2="18.404cm">
            <text:p/>
          </draw:line>
          <draw:line draw:style-name="gr38" draw:text-style-name="P4" draw:layer="layout" svg:x1="50.5cm" svg:y1="17.803cm" svg:x2="51.002cm" svg:y2="17.804cm">
            <text:p/>
          </draw:line>
          <draw:line draw:style-name="gr38" draw:text-style-name="P4" draw:layer="layout" svg:x1="50.5cm" svg:y1="18.204cm" svg:x2="51.002cm" svg:y2="18.204cm">
            <text:p/>
          </draw:line>
          <draw:frame draw:style-name="gr564" draw:text-style-name="P37" draw:layer="layout" svg:width="1.129cm" svg:height="0.569cm" svg:x="50cm" svg:y="17.335cm">
            <draw:text-box>
              <text:p><text:span text:style-name="T10">store</text:span></text:p>
            </draw:text-box>
          </draw:frame>
          <draw:polygon draw:style-name="gr58" draw:text-style-name="P1" draw:layer="layout" svg:width="0.499cm" svg:height="0.999cm" svg:x="49.5cm" svg:y="18.382cm" svg:viewBox="0 0 500 1000" draw:points="0,0 0,1000 500,850 500,150">
            <text:p/>
          </draw:polygon>
          <draw:line draw:style-name="gr146" draw:text-style-name="P4" draw:layer="layout" svg:x1="49.8cm" svg:y1="19.782cm" svg:x2="49.8cm" svg:y2="19.282cm">
            <text:p/>
          </draw:line>
          <draw:line draw:style-name="gr38" draw:text-style-name="P4" draw:layer="layout" svg:x1="48.998cm" svg:y1="18.681cm" svg:x2="49.5cm" svg:y2="18.682cm">
            <text:p/>
          </draw:line>
          <draw:line draw:style-name="gr38" draw:text-style-name="P4" draw:layer="layout" svg:x1="48.5cm" svg:y1="19.1cm" svg:x2="49.5cm" svg:y2="19.082cm">
            <text:p/>
          </draw:line>
          <draw:frame draw:style-name="gr564" draw:text-style-name="P37" draw:layer="layout" svg:width="1.129cm" svg:height="0.569cm" svg:x="48.498cm" svg:y="18.213cm">
            <draw:text-box>
              <text:p><text:span text:style-name="T10">store</text:span></text:p>
            </draw:text-box>
          </draw:frame>
          <draw:line draw:style-name="gr38" draw:text-style-name="P4" draw:layer="layout" svg:x1="50cm" svg:y1="18.882cm" svg:x2="50.5cm" svg:y2="18.882cm">
            <text:p/>
          </draw:line>
          <draw:line draw:style-name="gr38" draw:text-style-name="P4" draw:layer="layout" svg:x1="50.5cm" svg:y1="18.204cm" svg:x2="50.5cm" svg:y2="18.882cm">
            <text:p/>
          </draw:line>
          <draw:frame draw:style-name="gr658" draw:text-style-name="P37" draw:layer="layout" svg:width="4.134cm" svg:height="0.887cm" svg:x="48.064cm" svg:y="19.613cm">
            <draw:text-box>
              <text:p><text:span text:style-name="T10">(ir_s[6:0] == </text:span><text:span text:style-name="T10">7'b1110011) &amp;&amp; </text:span></text:p>
              <text:p><text:span text:style-name="T10">(ir_s[31:20] == </text:span><text:span text:style-name="T10">12'h305)</text:span></text:p>
            </draw:text-box>
          </draw:frame>
          <draw:frame draw:style-name="gr672" draw:text-style-name="P58" draw:layer="layout" svg:width="7.767cm" svg:height="2.155cm" svg:x="41.078cm" svg:y="17.882cm">
            <draw:text-box>
              <text:p><text:span text:style-name="T16">case(ir_s[14:12])</text:span></text:p>
              <text:p><text:span text:style-name="T16"><text:s text:c="12"/></text:span><text:span text:style-name="T16">3'b001: </text:span><text:span text:style-name="T16">csr_mtvec_s &lt;= regA_s;</text:span></text:p>
              <text:p><text:span text:style-name="T17"><text:s text:c="12"/></text:span><text:span text:style-name="T17">3'b010: </text:span><text:span text:style-name="T17">csr_mtvec_s &lt;= </text:span><text:span text:style-name="T17">csr_m</text:span><text:span text:style-name="T16">tvec_s | regA_s;</text:span></text:p>
              <text:p><text:span text:style-name="T17"><text:s text:c="12"/></text:span><text:span text:style-name="T17">3'b011: </text:span><text:span text:style-name="T17">csr_mtvec_s &lt;= </text:span><text:span text:style-name="T17">csr_m</text:span><text:span text:style-name="T16">tvec_s &amp; </text:span><text:span text:style-name="T16">~regA_s;</text:span></text:p>
              <text:p><text:span text:style-name="T17"><text:s text:c="12"/></text:span><text:span text:style-name="T17">3'b101: </text:span><text:span text:style-name="T17">csr_m</text:span><text:span text:style-name="T16">tvec_s &lt;= </text:span><text:span text:style-name="T16">{{52{1'b0}}, ir_s[19:15], </text:span><text:span text:style-name="T16">7'b0};</text:span></text:p>
              <text:p><text:span text:style-name="T17"><text:s text:c="12"/></text:span><text:span text:style-name="T17">3'b110: </text:span><text:span text:style-name="T17">csr_mtvec_s &lt;= </text:span><text:span text:style-name="T17">csr_m</text:span><text:span text:style-name="T16">tvec_s | </text:span><text:span text:style-name="T16">{{52{1'b0}}, ir_s[19:15], </text:span><text:span text:style-name="T16">7'b0};</text:span></text:p>
              <text:p><text:span text:style-name="T17"><text:s text:c="12"/></text:span><text:span text:style-name="T17">3'b111: </text:span><text:span text:style-name="T17">csr_mtvec_s &lt;= </text:span><text:span text:style-name="T17">csr_m</text:span><text:span text:style-name="T16">tvec_s &amp; </text:span><text:span text:style-name="T16">~{{52{1'b0}}, ir_s[19:15], </text:span><text:span text:style-name="T16">7'b0};</text:span></text:p>
              <text:p><text:span text:style-name="T16"><text:s text:c="10"/></text:span><text:span text:style-name="T16">endcase</text:span></text:p>
            </draw:text-box>
          </draw:frame>
          <draw:g draw:style-name="gr1">
            <draw:custom-shape draw:style-name="gr550" draw:text-style-name="P48" draw:layer="layout" svg:width="0.5cm" svg:height="1cm" svg:x="52.5cm" svg:y="17.8cm">
              <text:p/>
              <draw:enhanced-geometry svg:viewBox="0 0 21600 21600" draw:mirror-horizontal="false" draw:mirror-vertical="false" draw:type="rectangle" draw:enhanced-path="M 0 0 L 21600 0 21600 21600 0 21600 0 0 Z N"/>
            </draw:custom-shape>
            <draw:line draw:style-name="gr60" draw:text-style-name="P11" draw:layer="layout" svg:x1="52.5cm" svg:y1="18.75cm" svg:x2="52.65cm" svg:y2="18.7cm">
              <text:p/>
            </draw:line>
            <draw:line draw:style-name="gr60" draw:text-style-name="P11" draw:layer="layout" svg:x1="52.5cm" svg:y1="18.65cm" svg:x2="52.65cm" svg:y2="18.7cm">
              <text:p/>
            </draw:line>
          </draw:g>
          <draw:line draw:style-name="gr38" draw:text-style-name="P4" draw:layer="layout" svg:x1="51.502cm" svg:y1="18cm" svg:x2="52.5cm" svg:y2="18cm">
            <text:p/>
          </draw:line>
          <draw:line draw:style-name="gr38" draw:text-style-name="P4" draw:layer="layout" svg:x1="53cm" svg:y1="18cm" svg:x2="55cm" svg:y2="18cm">
            <text:p/>
          </draw:line>
          <draw:line draw:style-name="gr38" draw:text-style-name="P4" draw:layer="layout" svg:x1="41cm" svg:y1="17.5cm" svg:x2="44.6cm" svg:y2="17.5cm">
            <text:p/>
          </draw:line>
          <draw:line draw:style-name="gr38" draw:text-style-name="P4" draw:layer="layout" svg:x1="44.6cm" svg:y1="17.5cm" svg:x2="44.6cm" svg:y2="18.2cm">
            <text:p/>
          </draw:line>
          <draw:line draw:style-name="gr38" draw:text-style-name="P4" draw:layer="layout" svg:x1="49.8cm" svg:y1="20.4cm" svg:x2="49.8cm" svg:y2="21cm">
            <text:p/>
          </draw:line>
          <draw:line draw:style-name="gr38" draw:text-style-name="P4" draw:layer="layout" svg:x1="53cm" svg:y1="19.4cm" svg:x2="53cm" svg:y2="21cm">
            <text:p/>
          </draw:line>
          <draw:line draw:style-name="gr38" draw:text-style-name="P4" draw:layer="layout" svg:x1="51.7cm" svg:y1="19.4cm" svg:x2="53cm" svg:y2="19.4cm">
            <text:p/>
          </draw:line>
        </draw:g>
        <draw:g draw:style-name="gr1">
          <draw:frame draw:style-name="gr660" draw:text-style-name="P37" draw:layer="layout" svg:width="2.327cm" svg:height="0.569cm" svg:x="52.3cm" svg:y="32.331cm">
            <draw:text-box>
              <text:p><text:span text:style-name="T10">csr_mcause_s</text:span></text:p>
            </draw:text-box>
          </draw:frame>
          <draw:line draw:style-name="gr38" draw:text-style-name="P4" draw:layer="layout" svg:x1="52.5cm" svg:y1="32.9cm" svg:x2="55cm" svg:y2="32.9cm">
            <text:p/>
          </draw:line>
          <draw:custom-shape draw:style-name="gr673" draw:text-style-name="P43" draw:layer="layout" svg:width="14cm" svg:height="6cm" svg:x="41cm" svg:y="29cm">
            <text:p/>
            <draw:enhanced-geometry svg:viewBox="0 0 21600 21600" draw:mirror-horizontal="false" draw:mirror-vertical="false" draw:type="rectangle" draw:enhanced-path="M 0 0 L 21600 0 21600 21600 0 21600 0 0 Z N"/>
          </draw:custom-shape>
          <draw:frame draw:style-name="gr662" draw:text-style-name="P44" draw:layer="layout" svg:width="2.5cm" svg:height="0.569cm" svg:x="50.3cm" svg:y="31.5cm">
            <draw:text-box>
              <text:p><text:span text:style-name="T12">CSR: MCAUSE</text:span></text:p>
            </draw:text-box>
          </draw:frame>
          <draw:polygon draw:style-name="gr58" draw:text-style-name="P1" draw:layer="layout" svg:width="0.499cm" svg:height="0.999cm" svg:x="46.502cm" svg:y="31.5cm" svg:viewBox="0 0 500 1000" draw:points="0,0 0,1000 500,850 500,150">
            <text:p/>
          </draw:polygon>
          <draw:line draw:style-name="gr146" draw:text-style-name="P4" draw:layer="layout" svg:x1="46.802cm" svg:y1="32.9cm" svg:x2="46.802cm" svg:y2="32.4cm">
            <text:p/>
          </draw:line>
          <draw:line draw:style-name="gr38" draw:text-style-name="P4" draw:layer="layout" svg:x1="46cm" svg:y1="31.799cm" svg:x2="46.502cm" svg:y2="31.8cm">
            <text:p/>
          </draw:line>
          <draw:line draw:style-name="gr38" draw:text-style-name="P4" draw:layer="layout" svg:x1="46cm" svg:y1="32.2cm" svg:x2="46.502cm" svg:y2="32.2cm">
            <text:p/>
          </draw:line>
          <draw:frame draw:style-name="gr564" draw:text-style-name="P37" draw:layer="layout" svg:width="1.129cm" svg:height="0.569cm" svg:x="43.6cm" svg:y="29.831cm">
            <draw:text-box>
              <text:p><text:span text:style-name="T10">store</text:span></text:p>
            </draw:text-box>
          </draw:frame>
          <draw:g draw:style-name="gr1">
            <draw:custom-shape draw:style-name="gr550" draw:text-style-name="P48" draw:layer="layout" svg:width="0.5cm" svg:height="1cm" svg:x="52cm" svg:y="32.6cm">
              <text:p/>
              <draw:enhanced-geometry svg:viewBox="0 0 21600 21600" draw:mirror-horizontal="false" draw:mirror-vertical="false" draw:type="rectangle" draw:enhanced-path="M 0 0 L 21600 0 21600 21600 0 21600 0 0 Z N"/>
            </draw:custom-shape>
            <draw:line draw:style-name="gr60" draw:text-style-name="P11" draw:layer="layout" svg:x1="52cm" svg:y1="33.55cm" svg:x2="52.15cm" svg:y2="33.5cm">
              <text:p/>
            </draw:line>
            <draw:line draw:style-name="gr60" draw:text-style-name="P11" draw:layer="layout" svg:x1="52cm" svg:y1="33.45cm" svg:x2="52.15cm" svg:y2="33.5cm">
              <text:p/>
            </draw:line>
          </draw:g>
          <draw:line draw:style-name="gr38" draw:text-style-name="P4" draw:layer="layout" svg:x1="51.002cm" svg:y1="32.8cm" svg:x2="52cm" svg:y2="32.8cm">
            <text:p/>
          </draw:line>
          <draw:polygon draw:style-name="gr58" draw:text-style-name="P1" draw:layer="layout" svg:width="0.499cm" svg:height="0.999cm" svg:x="50.5cm" svg:y="32.3cm" svg:viewBox="0 0 500 1000" draw:points="0,0 0,1000 500,850 500,150">
            <text:p/>
          </draw:polygon>
          <draw:line draw:style-name="gr146" draw:text-style-name="P4" draw:layer="layout" svg:x1="50.8cm" svg:y1="33.7cm" svg:x2="50.8cm" svg:y2="33.2cm">
            <text:p/>
          </draw:line>
          <draw:line draw:style-name="gr38" draw:text-style-name="P4" draw:layer="layout" svg:x1="49.998cm" svg:y1="32.599cm" svg:x2="50.5cm" svg:y2="32.6cm">
            <text:p/>
          </draw:line>
          <draw:line draw:style-name="gr38" draw:text-style-name="P4" draw:layer="layout" svg:x1="49.998cm" svg:y1="33cm" svg:x2="50.5cm" svg:y2="33cm">
            <text:p/>
          </draw:line>
          <draw:frame draw:style-name="gr562" draw:text-style-name="P37" draw:layer="layout" svg:width="2.14cm" svg:height="0.569cm" svg:x="49.7cm" svg:y="33.631cm">
            <draw:text-box>
              <text:p><text:span text:style-name="T10">trap_taken_s</text:span></text:p>
            </draw:text-box>
          </draw:frame>
          <draw:polygon draw:style-name="gr58" draw:text-style-name="P1" draw:layer="layout" svg:width="0.499cm" svg:height="0.999cm" svg:x="48.502cm" svg:y="32.5cm" svg:viewBox="0 0 500 1000" draw:points="0,0 0,1000 500,850 500,150">
            <text:p/>
          </draw:polygon>
          <draw:line draw:style-name="gr146" draw:text-style-name="P4" draw:layer="layout" svg:x1="48.802cm" svg:y1="33.9cm" svg:x2="48.802cm" svg:y2="33.4cm">
            <text:p/>
          </draw:line>
          <draw:line draw:style-name="gr38" draw:text-style-name="P4" draw:layer="layout" svg:x1="48cm" svg:y1="32.799cm" svg:x2="48.502cm" svg:y2="32.8cm">
            <text:p/>
          </draw:line>
          <draw:line draw:style-name="gr38" draw:text-style-name="P4" draw:layer="layout" svg:x1="48cm" svg:y1="33.2cm" svg:x2="48.502cm" svg:y2="33.2cm">
            <text:p/>
          </draw:line>
          <draw:frame draw:style-name="gr383" draw:text-style-name="P37" draw:layer="layout" svg:width="2.17cm" svg:height="0.569cm" svg:x="47.6cm" svg:y="33.831cm">
            <draw:text-box>
              <text:p><text:span text:style-name="T10">trap_illegal_s</text:span></text:p>
            </draw:text-box>
          </draw:frame>
          <draw:line draw:style-name="gr38" draw:text-style-name="P4" draw:layer="layout" svg:x1="49.002cm" svg:y1="32.996cm" svg:x2="50cm" svg:y2="32.996cm">
            <text:p/>
          </draw:line>
          <draw:frame draw:style-name="gr674" draw:text-style-name="P37" draw:layer="layout" svg:width="1.184cm" svg:height="0.569cm" svg:x="47.516cm" svg:y="32.831cm">
            <draw:text-box>
              <text:p><text:span text:style-name="T10">64'd2</text:span></text:p>
            </draw:text-box>
          </draw:frame>
          <draw:frame draw:style-name="gr643" draw:text-style-name="P37" draw:layer="layout" svg:width="2.801cm" svg:height="0.569cm" svg:x="45cm" svg:y="32.8cm">
            <draw:text-box>
              <text:p><text:span text:style-name="T10">trap_misaligned_</text:span><text:span text:style-name="T10">s</text:span></text:p>
            </draw:text-box>
          </draw:frame>
          <draw:line draw:style-name="gr38" draw:text-style-name="P4" draw:layer="layout" svg:x1="47.002cm" svg:y1="32cm" svg:x2="48cm" svg:y2="32cm">
            <text:p/>
          </draw:line>
          <draw:line draw:style-name="gr38" draw:text-style-name="P4" draw:layer="layout" svg:x1="48cm" svg:y1="32cm" svg:x2="48cm" svg:y2="32.799cm">
            <text:p/>
          </draw:line>
          <draw:polygon draw:style-name="gr58" draw:text-style-name="P1" draw:layer="layout" svg:width="0.499cm" svg:height="0.999cm" svg:x="44.5cm" svg:y="32cm" svg:viewBox="0 0 500 1000" draw:points="0,0 0,1000 500,850 500,150">
            <text:p/>
          </draw:polygon>
          <draw:line draw:style-name="gr146" draw:text-style-name="P4" draw:layer="layout" svg:x1="44.8cm" svg:y1="33.4cm" svg:x2="44.8cm" svg:y2="32.9cm">
            <text:p/>
          </draw:line>
          <draw:line draw:style-name="gr38" draw:text-style-name="P4" draw:layer="layout" svg:x1="43.998cm" svg:y1="32.299cm" svg:x2="44.5cm" svg:y2="32.3cm">
            <text:p/>
          </draw:line>
          <draw:line draw:style-name="gr38" draw:text-style-name="P4" draw:layer="layout" svg:x1="43.998cm" svg:y1="32.7cm" svg:x2="44.5cm" svg:y2="32.7cm">
            <text:p/>
          </draw:line>
          <draw:frame draw:style-name="gr675" draw:text-style-name="P37" draw:layer="layout" svg:width="1.95cm" svg:height="0.569cm" svg:x="43.601cm" svg:y="33.301cm">
            <draw:text-box>
              <text:p><text:span text:style-name="T10">dMemRd_s</text:span></text:p>
            </draw:text-box>
          </draw:frame>
          <draw:frame draw:style-name="gr674" draw:text-style-name="P37" draw:layer="layout" svg:width="1.184cm" svg:height="0.569cm" svg:x="43.516cm" svg:y="32.331cm">
            <draw:text-box>
              <text:p><text:span text:style-name="T10">64'd4</text:span></text:p>
            </draw:text-box>
          </draw:frame>
          <draw:line draw:style-name="gr38" draw:text-style-name="P4" draw:layer="layout" svg:x1="45cm" svg:y1="32.5cm" svg:x2="46cm" svg:y2="32.5cm">
            <text:p/>
          </draw:line>
          <draw:line draw:style-name="gr38" draw:text-style-name="P4" draw:layer="layout" svg:x1="46cm" svg:y1="32.5cm" svg:x2="46cm" svg:y2="32.2cm">
            <text:p/>
          </draw:line>
          <draw:polygon draw:style-name="gr58" draw:text-style-name="P1" draw:layer="layout" svg:width="0.499cm" svg:height="0.999cm" svg:x="42.5cm" svg:y="31.5cm" svg:viewBox="0 0 500 1000" draw:points="0,0 0,1000 500,850 500,150">
            <text:p/>
          </draw:polygon>
          <draw:line draw:style-name="gr146" draw:text-style-name="P4" draw:layer="layout" svg:x1="42.8cm" svg:y1="32.9cm" svg:x2="42.8cm" svg:y2="32.4cm">
            <text:p/>
          </draw:line>
          <draw:line draw:style-name="gr38" draw:text-style-name="P4" draw:layer="layout" svg:x1="41.998cm" svg:y1="31.799cm" svg:x2="42.5cm" svg:y2="31.8cm">
            <text:p/>
          </draw:line>
          <draw:line draw:style-name="gr38" draw:text-style-name="P4" draw:layer="layout" svg:x1="41.998cm" svg:y1="32.2cm" svg:x2="42.5cm" svg:y2="32.2cm">
            <text:p/>
          </draw:line>
          <draw:frame draw:style-name="gr674" draw:text-style-name="P37" draw:layer="layout" svg:width="1.184cm" svg:height="0.569cm" svg:x="41.516cm" svg:y="31.8cm">
            <draw:text-box>
              <text:p><text:span text:style-name="T10">64'd6</text:span></text:p>
            </draw:text-box>
          </draw:frame>
          <draw:frame draw:style-name="gr676" draw:text-style-name="P37" draw:layer="layout" svg:width="1.946cm" svg:height="0.569cm" svg:x="41.701cm" svg:y="32.802cm">
            <draw:text-box>
              <text:p><text:span text:style-name="T10">dMemWr_s</text:span></text:p>
            </draw:text-box>
          </draw:frame>
          <draw:frame draw:style-name="gr674" draw:text-style-name="P37" draw:layer="layout" svg:width="1.184cm" svg:height="0.569cm" svg:x="41.516cm" svg:y="31.401cm">
            <draw:text-box>
              <text:p><text:span text:style-name="T10">64'd0</text:span></text:p>
            </draw:text-box>
          </draw:frame>
          <draw:line draw:style-name="gr38" draw:text-style-name="P4" draw:layer="layout" svg:x1="43cm" svg:y1="32cm" svg:x2="44cm" svg:y2="32cm">
            <text:p/>
          </draw:line>
          <draw:line draw:style-name="gr38" draw:text-style-name="P4" draw:layer="layout" svg:x1="44cm" svg:y1="32cm" svg:x2="43.998cm" svg:y2="32.299cm">
            <text:p/>
          </draw:line>
          <draw:polygon draw:style-name="gr58" draw:text-style-name="P1" draw:layer="layout" svg:width="0.499cm" svg:height="0.999cm" svg:x="44.501cm" svg:y="30.001cm" svg:viewBox="0 0 500 1000" draw:points="0,0 0,1000 500,850 500,150">
            <text:p/>
          </draw:polygon>
          <draw:line draw:style-name="gr146" draw:text-style-name="P4" draw:layer="layout" svg:x1="44.801cm" svg:y1="31.401cm" svg:x2="44.801cm" svg:y2="30.901cm">
            <text:p/>
          </draw:line>
          <draw:line draw:style-name="gr38" draw:text-style-name="P4" draw:layer="layout" svg:x1="43.999cm" svg:y1="30.3cm" svg:x2="44.501cm" svg:y2="30.301cm">
            <text:p/>
          </draw:line>
          <draw:line draw:style-name="gr38" draw:text-style-name="P4" draw:layer="layout" svg:x1="43.999cm" svg:y1="30.701cm" svg:x2="44.501cm" svg:y2="30.701cm">
            <text:p/>
          </draw:line>
          <draw:frame draw:style-name="gr677" draw:text-style-name="P37" draw:layer="layout" svg:width="2.195cm" svg:height="0.569cm" svg:x="42.5cm" svg:y="30.231cm">
            <draw:text-box>
              <text:p><text:span text:style-name="T10">{1'b1, 63'd11}</text:span></text:p>
            </draw:text-box>
          </draw:frame>
          <draw:frame draw:style-name="gr627" draw:text-style-name="P37" draw:layer="layout" svg:width="2.28cm" svg:height="0.569cm" svg:x="43.7cm" svg:y="31.231cm">
            <draw:text-box>
              <text:p><text:span text:style-name="T10">irq_pending_s</text:span></text:p>
            </draw:text-box>
          </draw:frame>
          <draw:frame draw:style-name="gr564" draw:text-style-name="P37" draw:layer="layout" svg:width="1.129cm" svg:height="0.569cm" svg:x="49.601cm" svg:y="32.132cm">
            <draw:text-box>
              <text:p><text:span text:style-name="T10">store</text:span></text:p>
            </draw:text-box>
          </draw:frame>
          <draw:line draw:style-name="gr38" draw:text-style-name="P4" draw:layer="layout" svg:x1="45.001cm" svg:y1="30.5cm" svg:x2="46cm" svg:y2="30.5cm">
            <text:p/>
          </draw:line>
          <draw:line draw:style-name="gr38" draw:text-style-name="P4" draw:layer="layout" svg:x1="46cm" svg:y1="30.5cm" svg:x2="46cm" svg:y2="31.799cm">
            <text:p/>
          </draw:line>
          <draw:line draw:style-name="gr38" draw:text-style-name="P4" draw:layer="layout" svg:x1="50.8cm" svg:y1="34.1cm" svg:x2="50.8cm" svg:y2="35cm">
            <text:p/>
          </draw:line>
          <draw:line draw:style-name="gr38" draw:text-style-name="P4" draw:layer="layout" svg:x1="48.8cm" svg:y1="34.4cm" svg:x2="48.8cm" svg:y2="35cm">
            <text:p/>
          </draw:line>
          <draw:line draw:style-name="gr38" draw:text-style-name="P4" draw:layer="layout" svg:x1="46.8cm" svg:y1="33.3cm" svg:x2="46.8cm" svg:y2="35cm">
            <text:p/>
          </draw:line>
          <draw:line draw:style-name="gr38" draw:text-style-name="P4" draw:layer="layout" svg:x1="44.8cm" svg:y1="33.87cm" svg:x2="44.8cm" svg:y2="35cm">
            <text:p/>
          </draw:line>
          <draw:line draw:style-name="gr38" draw:text-style-name="P4" draw:layer="layout" svg:x1="42.8cm" svg:y1="33.371cm" svg:x2="42.8cm" svg:y2="35cm">
            <text:p/>
          </draw:line>
          <draw:line draw:style-name="gr38" draw:text-style-name="P4" draw:layer="layout" svg:x1="41cm" svg:y1="31.1cm" svg:x2="44cm" svg:y2="31.1cm">
            <text:p/>
          </draw:line>
          <draw:line draw:style-name="gr38" draw:text-style-name="P4" draw:layer="layout" svg:x1="44cm" svg:y1="31.3cm" svg:x2="44cm" svg:y2="31.1cm">
            <text:p/>
          </draw:line>
        </draw:g>
        <draw:g draw:style-name="gr1">
          <draw:g draw:style-name="gr1">
            <draw:g draw:style-name="gr1">
              <draw:custom-shape draw:style-name="gr678" draw:text-style-name="P56" draw:layer="layout" svg:width="3cm" svg:height="3cm" svg:x="70.5cm" svg:y="31cm">
                <text:p text:style-name="P55"><text:span text:style-name="T12">CSR: Dec</text:span></text:p>
                <draw:enhanced-geometry svg:viewBox="0 0 21600 21600" draw:type="rectangle" draw:enhanced-path="M 0 0 L 21600 0 21600 21600 0 21600 0 0 Z N"/>
              </draw:custom-shape>
              <draw:frame draw:style-name="gr679" draw:text-style-name="P37" draw:layer="layout" svg:width="1.493cm" svg:height="0.569cm" svg:x="70.407cm" svg:y="31cm">
                <draw:text-box>
                  <text:p><text:span text:style-name="T10">mstatus</text:span></text:p>
                </draw:text-box>
              </draw:frame>
              <draw:frame draw:style-name="gr553" draw:text-style-name="P37" draw:layer="layout" svg:width="0.955cm" svg:height="0.569cm" svg:x="70.407cm" svg:y="31.431cm">
                <draw:text-box>
                  <text:p><text:span text:style-name="T10">mie</text:span></text:p>
                </draw:text-box>
              </draw:frame>
              <draw:frame draw:style-name="gr555" draw:text-style-name="P37" draw:layer="layout" svg:width="0.659cm" svg:height="0.569cm" svg:x="71.941cm" svg:y="33.4cm">
                <draw:text-box>
                  <text:p><text:span text:style-name="T10">ir</text:span></text:p>
                </draw:text-box>
              </draw:frame>
              <draw:frame draw:style-name="gr680" draw:text-style-name="P37" draw:layer="layout" svg:width="1.586cm" svg:height="0.569cm" svg:x="71.9cm" svg:y="31cm">
                <draw:text-box>
                  <text:p><text:span text:style-name="T10">csr_data</text:span></text:p>
                </draw:text-box>
              </draw:frame>
              <draw:frame draw:style-name="gr681" draw:text-style-name="P37" draw:layer="layout" svg:width="1.256cm" svg:height="0.569cm" svg:x="70.407cm" svg:y="31.831cm">
                <draw:text-box>
                  <text:p><text:span text:style-name="T10">mtvec</text:span></text:p>
                </draw:text-box>
              </draw:frame>
              <draw:frame draw:style-name="gr669" draw:text-style-name="P37" draw:layer="layout" svg:width="1.192cm" svg:height="0.569cm" svg:x="70.407cm" svg:y="32.231cm">
                <draw:text-box>
                  <text:p><text:span text:style-name="T10">mepc</text:span></text:p>
                </draw:text-box>
              </draw:frame>
              <draw:frame draw:style-name="gr679" draw:text-style-name="P37" draw:layer="layout" svg:width="1.493cm" svg:height="0.569cm" svg:x="70.407cm" svg:y="32.631cm">
                <draw:text-box>
                  <text:p><text:span text:style-name="T10">mcause</text:span></text:p>
                </draw:text-box>
              </draw:frame>
              <draw:frame draw:style-name="gr553" draw:text-style-name="P37" draw:layer="layout" svg:width="0.955cm" svg:height="0.569cm" svg:x="70.407cm" svg:y="33.031cm">
                <draw:text-box>
                  <text:p><text:span text:style-name="T10">mip</text:span></text:p>
                </draw:text-box>
              </draw:frame>
            </draw:g>
            <draw:frame draw:style-name="gr545" draw:text-style-name="P37" draw:layer="layout" svg:width="1.886cm" svg:height="0.569cm" svg:x="73.3cm" svg:y="30.9cm">
              <draw:text-box>
                <text:p><text:span text:style-name="T10">csr_data_s</text:span></text:p>
              </draw:text-box>
            </draw:frame>
            <draw:frame draw:style-name="gr660" draw:text-style-name="P37" draw:layer="layout" svg:width="2.327cm" svg:height="0.569cm" svg:x="68.402cm" svg:y="30.831cm">
              <draw:text-box>
                <text:p><text:span text:style-name="T10">csr_mstatus_s</text:span></text:p>
              </draw:text-box>
            </draw:frame>
            <draw:line draw:style-name="gr38" draw:text-style-name="P4" draw:layer="layout" svg:x1="73.5cm" svg:y1="31.3cm" svg:x2="75.5cm" svg:y2="31.3cm">
              <text:p/>
            </draw:line>
            <draw:line draw:style-name="gr38" draw:text-style-name="P4" draw:layer="layout" svg:x1="68cm" svg:y1="31.3cm" svg:x2="70.5cm" svg:y2="31.3cm">
              <text:p/>
            </draw:line>
            <draw:line draw:style-name="gr38" draw:text-style-name="P4" draw:layer="layout" svg:x1="68cm" svg:y1="31.7cm" svg:x2="70.5cm" svg:y2="31.7cm">
              <text:p/>
            </draw:line>
            <draw:line draw:style-name="gr38" draw:text-style-name="P4" draw:layer="layout" svg:x1="68cm" svg:y1="32.1cm" svg:x2="70.5cm" svg:y2="32.1cm">
              <text:p/>
            </draw:line>
            <draw:line draw:style-name="gr38" draw:text-style-name="P4" draw:layer="layout" svg:x1="68cm" svg:y1="32.5cm" svg:x2="70.5cm" svg:y2="32.5cm">
              <text:p/>
            </draw:line>
            <draw:line draw:style-name="gr38" draw:text-style-name="P4" draw:layer="layout" svg:x1="68cm" svg:y1="32.9cm" svg:x2="70.5cm" svg:y2="32.9cm">
              <text:p/>
            </draw:line>
            <draw:line draw:style-name="gr38" draw:text-style-name="P4" draw:layer="layout" svg:x1="68cm" svg:y1="33.3cm" svg:x2="70.5cm" svg:y2="33.3cm">
              <text:p/>
            </draw:line>
            <draw:frame draw:style-name="gr682" draw:text-style-name="P37" draw:layer="layout" svg:width="1.093cm" svg:height="0.569cm" svg:x="72.007cm" svg:y="33.931cm">
              <draw:text-box>
                <text:p><text:span text:style-name="T10">ir_s</text:span></text:p>
              </draw:text-box>
            </draw:frame>
            <draw:line draw:style-name="gr38" draw:text-style-name="P4" draw:layer="layout" svg:x1="72.2cm" svg:y1="34cm" svg:x2="72.2cm" svg:y2="35cm">
              <text:p/>
            </draw:line>
            <draw:frame draw:style-name="gr655" draw:text-style-name="P37" draw:layer="layout" svg:width="1.793cm" svg:height="0.569cm" svg:x="68.936cm" svg:y="31.232cm">
              <draw:text-box>
                <text:p><text:span text:style-name="T10">csr_mie_s</text:span></text:p>
              </draw:text-box>
            </draw:frame>
            <draw:frame draw:style-name="gr670" draw:text-style-name="P37" draw:layer="layout" svg:width="2.094cm" svg:height="0.569cm" svg:x="68.635cm" svg:y="31.633cm">
              <draw:text-box>
                <text:p><text:span text:style-name="T10">csr_mtvec_s</text:span></text:p>
              </draw:text-box>
            </draw:frame>
            <draw:frame draw:style-name="gr638" draw:text-style-name="P37" draw:layer="layout" svg:width="2.03cm" svg:height="0.569cm" svg:x="68.699cm" svg:y="32.034cm">
              <draw:text-box>
                <text:p><text:span text:style-name="T10">csr_mepc_s</text:span></text:p>
              </draw:text-box>
            </draw:frame>
            <draw:frame draw:style-name="gr660" draw:text-style-name="P37" draw:layer="layout" svg:width="2.327cm" svg:height="0.569cm" svg:x="68.402cm" svg:y="32.435cm">
              <draw:text-box>
                <text:p><text:span text:style-name="T10">csr_mcause_s</text:span></text:p>
              </draw:text-box>
            </draw:frame>
            <draw:frame draw:style-name="gr655" draw:text-style-name="P37" draw:layer="layout" svg:width="1.793cm" svg:height="0.569cm" svg:x="68.936cm" svg:y="32.836cm">
              <draw:text-box>
                <text:p><text:span text:style-name="T10">csr_mip_s</text:span></text:p>
              </draw:text-box>
            </draw:frame>
          </draw:g>
          <draw:frame draw:style-name="gr683" draw:text-style-name="P44" draw:layer="layout" svg:width="2.297cm" svg:height="0.569cm" svg:x="68.903cm" svg:y="34.1cm">
            <draw:text-box>
              <text:p><text:span text:style-name="T12">CSR: Decode</text:span></text:p>
            </draw:text-box>
          </draw:frame>
          <draw:custom-shape draw:style-name="gr684" draw:text-style-name="P43" draw:layer="layout" svg:width="7.5cm" svg:height="4.5cm" svg:x="68cm" svg:y="30.5cm">
            <text:p/>
            <draw:enhanced-geometry svg:viewBox="0 0 21600 21600" draw:type="rectangle" draw:enhanced-path="M 0 0 L 21600 0 21600 21600 0 21600 0 0 Z N"/>
          </draw:custom-shape>
        </draw:g>
        <draw:line draw:style-name="gr38" draw:text-style-name="P4" draw:layer="layout" svg:x1="64cm" svg:y1="2.5cm" svg:x2="64cm" svg:y2="3.4cm">
          <text:p/>
        </draw:line>
        <draw:g draw:style-name="gr1">
          <draw:g draw:style-name="gr1">
            <draw:frame draw:style-name="gr669" draw:text-style-name="P37" draw:layer="layout" svg:width="1.192cm" svg:height="0.569cm" svg:x="16.799cm" svg:y="47.9cm">
              <draw:text-box>
                <text:p><text:span text:style-name="T10">PC_s</text:span></text:p>
              </draw:text-box>
            </draw:frame>
            <draw:g draw:style-name="gr1">
              <draw:custom-shape draw:style-name="gr554" draw:text-style-name="P50" draw:layer="layout" svg:width="0.5cm" svg:height="1cm" svg:x="16.499cm" svg:y="47.8cm">
                <text:p text:style-name="P49"><text:span text:style-name="T10">PC</text:span></text:p>
                <draw:enhanced-geometry svg:viewBox="0 0 21600 21600" draw:mirror-horizontal="false" draw:mirror-vertical="false" draw:type="rectangle" draw:enhanced-path="M 0 0 L 21600 0 21600 21600 0 21600 0 0 Z N"/>
              </draw:custom-shape>
              <draw:line draw:style-name="gr60" draw:text-style-name="P11" draw:layer="layout" svg:x1="16.499cm" svg:y1="48.75cm" svg:x2="16.649cm" svg:y2="48.7cm">
                <text:p/>
              </draw:line>
              <draw:line draw:style-name="gr60" draw:text-style-name="P11" draw:layer="layout" svg:x1="16.499cm" svg:y1="48.65cm" svg:x2="16.649cm" svg:y2="48.7cm">
                <text:p/>
              </draw:line>
              <draw:frame draw:style-name="gr685" draw:text-style-name="P37" draw:layer="layout" svg:width="0.815cm" svg:height="0.569cm" svg:x="16.299cm" svg:y="48.2cm">
                <draw:text-box>
                  <text:p><text:span text:style-name="T10">en</text:span></text:p>
                </draw:text-box>
              </draw:frame>
              <draw:frame draw:style-name="gr555" draw:text-style-name="P37" draw:layer="layout" svg:width="0.659cm" svg:height="0.569cm" svg:x="16.299cm" svg:y="47.731cm">
                <draw:text-box>
                  <text:p><text:span text:style-name="T10">d</text:span></text:p>
                </draw:text-box>
              </draw:frame>
            </draw:g>
            <draw:polygon draw:style-name="gr58" draw:text-style-name="P1" draw:layer="layout" svg:width="0.499cm" svg:height="0.999cm" svg:x="14.499cm" svg:y="45.8cm" svg:viewBox="0 0 500 1000" draw:points="0,0 0,1000 500,850 500,150">
              <text:p/>
            </draw:polygon>
            <draw:frame draw:style-name="gr561" draw:text-style-name="P51" draw:layer="layout" svg:width="2.504cm" svg:height="0.569cm" svg:x="14.199cm" svg:y="48.05cm">
              <draw:text-box>
                <text:p><text:span text:style-name="T13">fetch0_phase_s</text:span></text:p>
              </draw:text-box>
            </draw:frame>
            <draw:line draw:style-name="gr38" draw:text-style-name="P4" draw:layer="layout" svg:x1="14.999cm" svg:y1="48.5cm" svg:x2="16.499cm" svg:y2="48.5cm">
              <text:p/>
            </draw:line>
            <draw:line draw:style-name="gr38" draw:text-style-name="P4" draw:layer="layout" svg:x1="15.999cm" svg:y1="48cm" svg:x2="16.499cm" svg:y2="48cm">
              <text:p/>
            </draw:line>
            <draw:line draw:style-name="gr38" draw:text-style-name="P4" draw:layer="layout" svg:x1="16.999cm" svg:y1="48.3cm" svg:x2="17.999cm" svg:y2="48.3cm">
              <text:p/>
            </draw:line>
            <draw:frame draw:style-name="gr562" draw:text-style-name="P37" draw:layer="layout" svg:width="2.14cm" svg:height="0.569cm" svg:x="12.899cm" svg:y="46.831cm">
              <draw:text-box>
                <text:p><text:span text:style-name="T10">trap_taken_s</text:span></text:p>
              </draw:text-box>
            </draw:frame>
            <draw:line draw:style-name="gr146" draw:text-style-name="P4" draw:layer="layout" svg:x1="14.8cm" svg:y1="47.3cm" svg:x2="14.799cm" svg:y2="46.7cm">
              <text:p/>
            </draw:line>
            <draw:line draw:style-name="gr38" draw:text-style-name="P4" draw:layer="layout" svg:x1="13.999cm" svg:y1="46.1cm" svg:x2="14.499cm" svg:y2="46.1cm">
              <text:p/>
            </draw:line>
            <draw:line draw:style-name="gr38" draw:text-style-name="P4" draw:layer="layout" svg:x1="12.999cm" svg:y1="46.5cm" svg:x2="14.499cm" svg:y2="46.5cm">
              <text:p/>
            </draw:line>
            <draw:frame draw:style-name="gr686" draw:text-style-name="P37" draw:layer="layout" svg:width="3.834cm" svg:height="0.569cm" svg:x="10.899cm" svg:y="46.131cm">
              <draw:text-box>
                <text:p><text:span text:style-name="T10">{csr_mtvec_s[63:</text:span><text:span text:style-name="T10">2], 2'b00}</text:span></text:p>
              </draw:text-box>
            </draw:frame>
            <draw:polygon draw:style-name="gr58" draw:text-style-name="P1" draw:layer="layout" svg:width="0.499cm" svg:height="0.999cm" svg:x="12.499cm" svg:y="43.8cm" svg:viewBox="0 0 500 1000" draw:points="0,0 0,1000 500,850 500,150">
              <text:p/>
            </draw:polygon>
            <draw:frame draw:style-name="gr647" draw:text-style-name="P37" draw:layer="layout" svg:width="2.534cm" svg:height="0.569cm" svg:x="10.499cm" svg:y="44.831cm">
              <draw:text-box>
                <text:p><text:span text:style-name="T10">mret_pending_s</text:span></text:p>
              </draw:text-box>
            </draw:frame>
            <draw:line draw:style-name="gr146" draw:text-style-name="P4" draw:layer="layout" svg:x1="12.8cm" svg:y1="45.3cm" svg:x2="12.799cm" svg:y2="44.7cm">
              <text:p/>
            </draw:line>
            <draw:line draw:style-name="gr38" draw:text-style-name="P4" draw:layer="layout" svg:x1="11.999cm" svg:y1="44.1cm" svg:x2="12.499cm" svg:y2="44.1cm">
              <text:p/>
            </draw:line>
            <draw:line draw:style-name="gr38" draw:text-style-name="P4" draw:layer="layout" svg:x1="10.999cm" svg:y1="44.5cm" svg:x2="12.499cm" svg:y2="44.5cm">
              <text:p/>
            </draw:line>
            <draw:frame draw:style-name="gr638" draw:text-style-name="P37" draw:layer="layout" svg:width="2.03cm" svg:height="0.569cm" svg:x="10.699cm" svg:y="44.031cm">
              <draw:text-box>
                <text:p><text:span text:style-name="T10">csr_mepc_r</text:span></text:p>
              </draw:text-box>
            </draw:frame>
            <draw:line draw:style-name="gr38" draw:text-style-name="P4" draw:layer="layout" svg:x1="14.999cm" svg:y1="46.3cm" svg:x2="15.999cm" svg:y2="46.3cm">
              <text:p/>
            </draw:line>
            <draw:line draw:style-name="gr38" draw:text-style-name="P4" draw:layer="layout" svg:x1="15.999cm" svg:y1="46.3cm" svg:x2="15.999cm" svg:y2="48cm">
              <text:p/>
            </draw:line>
            <draw:line draw:style-name="gr38" draw:text-style-name="P4" draw:layer="layout" svg:x1="12.999cm" svg:y1="44.3cm" svg:x2="13.999cm" svg:y2="44.3cm">
              <text:p/>
            </draw:line>
            <draw:line draw:style-name="gr38" draw:text-style-name="P4" draw:layer="layout" svg:x1="13.999cm" svg:y1="44.3cm" svg:x2="13.999cm" svg:y2="46.1cm">
              <text:p/>
            </draw:line>
            <draw:polygon draw:style-name="gr58" draw:text-style-name="P1" draw:layer="layout" svg:width="0.499cm" svg:height="0.999cm" svg:x="10.5cm" svg:y="41.8cm" svg:viewBox="0 0 500 1000" draw:points="0,0 0,1000 500,850 500,150">
              <text:p/>
            </draw:polygon>
            <draw:frame draw:style-name="gr644" draw:text-style-name="P37" draw:layer="layout" svg:width="1.336cm" svg:height="0.569cm" svg:x="9.7cm" svg:y="42.831cm">
              <draw:text-box>
                <text:p><text:span text:style-name="T10">take_s</text:span></text:p>
              </draw:text-box>
            </draw:frame>
            <draw:line draw:style-name="gr146" draw:text-style-name="P4" draw:layer="layout" svg:x1="10.8cm" svg:y1="43.5cm" svg:x2="10.8cm" svg:y2="42.7cm">
              <text:p/>
            </draw:line>
            <draw:line draw:style-name="gr38" draw:text-style-name="P4" draw:layer="layout" svg:x1="9cm" svg:y1="42.1cm" svg:x2="10.5cm" svg:y2="42.1cm">
              <text:p/>
            </draw:line>
            <draw:line draw:style-name="gr38" draw:text-style-name="P4" draw:layer="layout" svg:x1="9cm" svg:y1="42.5cm" svg:x2="10.5cm" svg:y2="42.5cm">
              <text:p/>
            </draw:line>
            <draw:line draw:style-name="gr38" draw:text-style-name="P4" draw:layer="layout" svg:x1="11cm" svg:y1="42.3cm" svg:x2="12cm" svg:y2="42.3cm">
              <text:p/>
            </draw:line>
            <draw:line draw:style-name="gr38" draw:text-style-name="P4" draw:layer="layout" svg:x1="11.999cm" svg:y1="42.3cm" svg:x2="11.999cm" svg:y2="44.1cm">
              <text:p/>
            </draw:line>
            <draw:frame draw:style-name="gr617" draw:text-style-name="P37" draw:layer="layout" svg:width="1.51cm" svg:height="0.569cm" svg:x="9.2cm" svg:y="41.732cm">
              <draw:text-box>
                <text:p><text:span text:style-name="T10">PCp4_s</text:span></text:p>
              </draw:text-box>
            </draw:frame>
            <draw:line draw:style-name="gr38" draw:text-style-name="P4" draw:layer="layout" svg:x1="9cm" svg:y1="44.5cm" svg:x2="11.012cm" svg:y2="44.5cm">
              <text:p/>
            </draw:line>
            <draw:line draw:style-name="gr38" draw:text-style-name="P4" draw:layer="layout" svg:x1="12.999cm" svg:y1="46.5cm" svg:x2="9cm" svg:y2="46.5cm">
              <text:p/>
            </draw:line>
            <draw:line draw:style-name="gr38" draw:text-style-name="P4" draw:layer="layout" svg:x1="14.8cm" svg:y1="47.3cm" svg:x2="9cm" svg:y2="47.3cm">
              <text:p/>
            </draw:line>
            <draw:line draw:style-name="gr38" draw:text-style-name="P4" draw:layer="layout" svg:x1="9cm" svg:y1="43.5cm" svg:x2="10.8cm" svg:y2="43.5cm">
              <text:p/>
            </draw:line>
            <draw:line draw:style-name="gr38" draw:text-style-name="P4" draw:layer="layout" svg:x1="12.8cm" svg:y1="45.3cm" svg:x2="9cm" svg:y2="45.3cm">
              <text:p/>
            </draw:line>
          </draw:g>
          <draw:custom-shape draw:style-name="gr687" draw:text-style-name="P43" draw:layer="layout" svg:width="9cm" svg:height="8cm" svg:x="9cm" svg:y="41.3cm">
            <text:p/>
            <draw:enhanced-geometry svg:viewBox="0 0 21600 21600" draw:type="rectangle" draw:enhanced-path="M 0 0 L 21600 0 21600 21600 0 21600 0 0 Z N"/>
          </draw:custom-shape>
          <draw:frame draw:style-name="gr619" draw:text-style-name="P44" draw:layer="layout" svg:width="2.204cm" svg:height="0.569cm" svg:x="14.095cm" svg:y="48.631cm">
            <draw:text-box>
              <text:p><text:span text:style-name="T12">PC: Register</text:span></text:p>
            </draw:text-box>
          </draw:frame>
        </draw:g>
        <draw:line draw:style-name="gr38" draw:text-style-name="P4" draw:layer="layout" svg:x1="19cm" svg:y1="48.3cm" svg:x2="20.7cm" svg:y2="48.3cm">
          <text:p/>
        </draw:line>
        <draw:g draw:style-name="gr1">
          <draw:g draw:style-name="gr1">
            <draw:custom-shape draw:style-name="gr688" draw:text-style-name="P59" draw:layer="layout" svg:width="1cm" svg:height="1cm" svg:x="20.5cm" svg:y="42.998cm">
              <text:p text:style-name="P35"><text:span text:style-name="T10">+</text:span></text:p>
              <draw:enhanced-geometry svg:viewBox="0 0 21600 21600" draw:type="rectangle" draw:enhanced-path="M 0 0 L 21600 0 21600 21600 0 21600 0 0 Z N"/>
            </draw:custom-shape>
            <draw:line draw:style-name="gr146" draw:text-style-name="P4" draw:layer="layout" svg:x1="19.5cm" svg:y1="43.698cm" svg:x2="20.5cm" svg:y2="43.698cm">
              <text:p/>
            </draw:line>
            <draw:line draw:style-name="gr146" draw:text-style-name="P4" draw:layer="layout" svg:x1="20cm" svg:y1="43.298cm" svg:x2="20.5cm" svg:y2="43.298cm">
              <text:p/>
            </draw:line>
            <draw:frame draw:style-name="gr555" draw:text-style-name="P37" draw:layer="layout" svg:width="0.659cm" svg:height="0.569cm" svg:x="19.748cm" svg:y="42.8cm">
              <draw:text-box>
                <text:p><text:span text:style-name="T10">4</text:span></text:p>
              </draw:text-box>
            </draw:frame>
            <draw:line draw:style-name="gr38" draw:text-style-name="P4" draw:layer="layout" svg:x1="21.5cm" svg:y1="43.5cm" svg:x2="22.5cm" svg:y2="43.5cm">
              <text:p/>
            </draw:line>
          </draw:g>
          <draw:custom-shape draw:style-name="gr689" draw:text-style-name="P43" draw:layer="layout" svg:width="3cm" svg:height="2cm" svg:x="19.5cm" svg:y="42.5cm">
            <text:p/>
            <draw:enhanced-geometry svg:viewBox="0 0 21600 21600" draw:type="rectangle" draw:enhanced-path="M 0 0 L 21600 0 21600 21600 0 21600 0 0 Z N"/>
          </draw:custom-shape>
          <draw:frame draw:style-name="gr690" draw:text-style-name="P44" draw:layer="layout" svg:width="1.391cm" svg:height="0.569cm" svg:x="20.209cm" svg:y="42.531cm">
            <draw:text-box>
              <text:p><text:span text:style-name="T12">PC: +4</text:span></text:p>
            </draw:text-box>
          </draw:frame>
        </draw:g>
        <draw:line draw:style-name="gr38" draw:text-style-name="P4" draw:layer="layout" svg:x1="22.5cm" svg:y1="43.5cm" svg:x2="23cm" svg:y2="43.5cm">
          <text:p/>
        </draw:line>
        <draw:line draw:style-name="gr38" draw:text-style-name="P4" draw:layer="layout" svg:x1="18.5cm" svg:y1="43.7cm" svg:x2="19.5cm" svg:y2="43.698cm">
          <text:p/>
        </draw:line>
        <draw:line draw:style-name="gr38" draw:text-style-name="P4" draw:layer="layout" svg:x1="8.5cm" svg:y1="42.1cm" svg:x2="9cm" svg:y2="42.1cm">
          <text:p/>
        </draw:line>
        <draw:line draw:style-name="gr38" draw:text-style-name="P4" draw:layer="layout" svg:x1="8cm" svg:y1="42.5cm" svg:x2="10cm" svg:y2="42.5cm">
          <text:p/>
        </draw:line>
        <draw:line draw:style-name="gr38" draw:text-style-name="P4" draw:layer="layout" svg:x1="45cm" svg:y1="43.3cm" svg:x2="45cm" svg:y2="43cm">
          <text:p/>
        </draw:line>
        <draw:g draw:style-name="gr1">
          <draw:g draw:style-name="gr1">
            <draw:custom-shape draw:style-name="gr691" draw:text-style-name="P36" draw:layer="layout" svg:width="4.507cm" svg:height="3cm" svg:x="41.993cm" svg:y="44.001cm">
              <text:p text:style-name="P35"><text:span text:style-name="T10">RegFile</text:span></text:p>
              <draw:enhanced-geometry svg:viewBox="0 0 21600 21600" draw:type="rectangle" draw:enhanced-path="M 0 0 L 21600 0 21600 21600 0 21600 0 0 Z N"/>
            </draw:custom-shape>
            <draw:g draw:style-name="gr66">
              <draw:line draw:style-name="gr60" draw:text-style-name="P11" draw:layer="layout" svg:x1="41.993cm" svg:y1="46.951cm" svg:x2="42.143cm" svg:y2="46.901cm">
                <text:p/>
              </draw:line>
              <draw:line draw:style-name="gr60" draw:text-style-name="P11" draw:layer="layout" svg:x1="41.993cm" svg:y1="46.851cm" svg:x2="42.143cm" svg:y2="46.901cm">
                <text:p/>
              </draw:line>
            </draw:g>
            <draw:frame draw:style-name="gr692" draw:text-style-name="P37" draw:layer="layout" svg:width="3.576cm" svg:height="0.569cm" svg:x="41.995cm" svg:y="44.701cm">
              <draw:text-box>
                <text:p><text:span text:style-name="T10">instr(19:15):raddr</text:span><text:span text:style-name="T10">01(4:0)</text:span></text:p>
              </draw:text-box>
            </draw:frame>
            <draw:frame draw:style-name="gr692" draw:text-style-name="P37" draw:layer="layout" svg:width="3.576cm" svg:height="0.569cm" svg:x="41.993cm" svg:y="45.132cm">
              <draw:text-box>
                <text:p><text:span text:style-name="T10">instr(24:20):raddr</text:span><text:span text:style-name="T10">02(4:0)</text:span></text:p>
              </draw:text-box>
            </draw:frame>
            <draw:frame draw:style-name="gr693" draw:text-style-name="P37" draw:layer="layout" svg:width="3.508cm" svg:height="0.569cm" svg:x="41.987cm" svg:y="45.601cm">
              <draw:text-box>
                <text:p><text:span text:style-name="T10">instr(11:7):waddr</text:span><text:span text:style-name="T10">01(4:0)</text:span></text:p>
              </draw:text-box>
            </draw:frame>
            <draw:frame draw:style-name="gr694" draw:text-style-name="P37" draw:layer="layout" svg:width="2.315cm" svg:height="0.569cm" svg:x="41.981cm" svg:y="44.332cm">
              <draw:text-box>
                <text:p><text:span text:style-name="T10">wdata01(63:0)</text:span></text:p>
              </draw:text-box>
            </draw:frame>
            <draw:frame draw:style-name="gr381" draw:text-style-name="P37" draw:layer="layout" svg:width="2.204cm" svg:height="0.569cm" svg:x="44.291cm" svg:y="44.101cm">
              <draw:text-box>
                <text:p><text:span text:style-name="T10">rdata01(63:0)</text:span></text:p>
              </draw:text-box>
            </draw:frame>
            <draw:frame draw:style-name="gr381" draw:text-style-name="P37" draw:layer="layout" svg:width="2.204cm" svg:height="0.569cm" svg:x="44.295cm" svg:y="46.132cm">
              <draw:text-box>
                <text:p><text:span text:style-name="T10">rdata02(63:0)</text:span></text:p>
              </draw:text-box>
            </draw:frame>
            <draw:frame draw:style-name="gr695" draw:text-style-name="P37" draw:layer="layout" svg:width="0.865cm" svg:height="0.569cm" svg:x="43.537cm" svg:y="46.432cm">
              <draw:text-box>
                <text:p><text:span text:style-name="T10">we</text:span></text:p>
              </draw:text-box>
            </draw:frame>
          </draw:g>
          <draw:line draw:style-name="gr38" draw:text-style-name="P4" draw:layer="layout" svg:x1="39cm" svg:y1="45cm" svg:x2="41.993cm" svg:y2="45.001cm">
            <text:p/>
          </draw:line>
          <draw:line draw:style-name="gr38" draw:text-style-name="P4" draw:layer="layout" svg:x1="39cm" svg:y1="45.4cm" svg:x2="41.994cm" svg:y2="45.401cm">
            <text:p/>
          </draw:line>
          <draw:line draw:style-name="gr38" draw:text-style-name="P4" draw:layer="layout" svg:x1="39cm" svg:y1="45.9cm" svg:x2="41.995cm" svg:y2="45.901cm">
            <text:p/>
          </draw:line>
          <draw:line draw:style-name="gr38" draw:text-style-name="P4" draw:layer="layout" svg:x1="39cm" svg:y1="44.6cm" svg:x2="41.996cm" svg:y2="44.601cm">
            <text:p/>
          </draw:line>
          <draw:line draw:style-name="gr38" draw:text-style-name="P4" draw:layer="layout" svg:x1="46.5cm" svg:y1="44.301cm" svg:x2="49cm" svg:y2="44.3cm">
            <text:p/>
          </draw:line>
          <draw:line draw:style-name="gr38" draw:text-style-name="P4" draw:layer="layout" svg:x1="46.499cm" svg:y1="46.501cm" svg:x2="49cm" svg:y2="46.501cm">
            <text:p/>
          </draw:line>
          <draw:frame draw:style-name="gr628" draw:text-style-name="P37" draw:layer="layout" svg:width="2.644cm" svg:height="0.569cm" svg:x="39.5cm" svg:y="44.132cm">
            <draw:text-box>
              <text:p><text:span text:style-name="T10">regfile_data_w_s</text:span></text:p>
            </draw:text-box>
          </draw:frame>
          <draw:frame draw:style-name="gr679" draw:text-style-name="P37" draw:layer="layout" svg:width="1.493cm" svg:height="0.569cm" svg:x="40.6cm" svg:y="43.833cm">
            <draw:text-box>
              <text:p><text:span text:style-name="T10">result_s</text:span></text:p>
            </draw:text-box>
          </draw:frame>
          <draw:line draw:style-name="gr38" draw:text-style-name="P4" draw:layer="layout" svg:x1="44cm" svg:y1="47.5cm" svg:x2="44cm" svg:y2="47.001cm">
            <text:p/>
          </draw:line>
          <draw:frame draw:style-name="gr696" draw:text-style-name="P37" draw:layer="layout" svg:width="1.823cm" svg:height="0.569cm" svg:x="40.358cm" svg:y="44.563cm">
            <draw:text-box>
              <text:p><text:span text:style-name="T10">ir_s[19:15]</text:span></text:p>
            </draw:text-box>
          </draw:frame>
          <draw:frame draw:style-name="gr696" draw:text-style-name="P37" draw:layer="layout" svg:width="1.823cm" svg:height="0.569cm" svg:x="40.277cm" svg:y="44.932cm">
            <draw:text-box>
              <text:p><text:span text:style-name="T10">ir_s[24:20]</text:span></text:p>
            </draw:text-box>
          </draw:frame>
          <draw:frame draw:style-name="gr697" draw:text-style-name="P37" draw:layer="layout" svg:width="1.645cm" svg:height="0.569cm" svg:x="40.558cm" svg:y="45.501cm">
            <draw:text-box>
              <text:p><text:span text:style-name="T10">ir_s[11:7]</text:span></text:p>
            </draw:text-box>
          </draw:frame>
          <draw:frame draw:style-name="gr640" draw:text-style-name="P37" draw:layer="layout" svg:width="1.399cm" svg:height="0.569cm" svg:x="46.307cm" svg:y="43.901cm">
            <draw:text-box>
              <text:p><text:span text:style-name="T10">regA_s</text:span></text:p>
            </draw:text-box>
          </draw:frame>
          <draw:frame draw:style-name="gr698" draw:text-style-name="P37" draw:layer="layout" svg:width="2.403cm" svg:height="0.569cm" svg:x="46.297cm" svg:y="46.032cm">
            <draw:text-box>
              <text:p><text:span text:style-name="T10">dBusDataWr_s</text:span></text:p>
            </draw:text-box>
          </draw:frame>
          <draw:custom-shape draw:style-name="gr586" draw:text-style-name="P43" draw:layer="layout" svg:width="10cm" svg:height="4cm" svg:x="39cm" svg:y="43.5cm">
            <text:p/>
            <draw:enhanced-geometry svg:viewBox="0 0 21600 21600" draw:type="rectangle" draw:enhanced-path="M 0 0 L 21600 0 21600 21600 0 21600 0 0 Z N"/>
          </draw:custom-shape>
          <draw:frame draw:style-name="gr699" draw:text-style-name="P44" draw:layer="layout" svg:width="1.522cm" svg:height="0.569cm" svg:x="43.078cm" svg:y="43.532cm">
            <draw:text-box>
              <text:p><text:span text:style-name="T12">RegFile</text:span></text:p>
            </draw:text-box>
          </draw:frame>
        </draw:g>
        <draw:line draw:style-name="gr38" draw:text-style-name="P4" draw:layer="layout" svg:x1="49cm" svg:y1="44.3cm" svg:x2="50cm" svg:y2="44.3cm">
          <text:p/>
        </draw:line>
        <draw:line draw:style-name="gr38" draw:text-style-name="P4" draw:layer="layout" svg:x1="49cm" svg:y1="46.501cm" svg:x2="49.9cm" svg:y2="46.5cm">
          <text:p/>
        </draw:line>
        <draw:g draw:style-name="gr1">
          <draw:polygon draw:style-name="gr58" draw:text-style-name="P1" draw:layer="layout" svg:width="0.499cm" svg:height="0.999cm" svg:x="51.5cm" svg:y="44.1cm" svg:viewBox="0 0 500 1000" draw:points="0,0 0,1000 500,850 500,150">
            <text:p/>
          </draw:polygon>
          <draw:frame draw:style-name="gr655" draw:text-style-name="P37" draw:layer="layout" svg:width="1.793cm" svg:height="0.569cm" svg:x="50.1cm" svg:y="45.031cm">
            <draw:text-box>
              <text:p><text:span text:style-name="T10">aluSrcA_s</text:span></text:p>
            </draw:text-box>
          </draw:frame>
          <draw:line draw:style-name="gr146" draw:text-style-name="P4" draw:layer="layout" svg:x1="51.8cm" svg:y1="45.6cm" svg:x2="51.8cm" svg:y2="45cm">
            <text:p/>
          </draw:line>
          <draw:line draw:style-name="gr38" draw:text-style-name="P4" draw:layer="layout" svg:x1="50cm" svg:y1="44.3cm" svg:x2="51.5cm" svg:y2="44.3cm">
            <text:p/>
          </draw:line>
          <draw:line draw:style-name="gr38" draw:text-style-name="P4" draw:layer="layout" svg:x1="51cm" svg:y1="44.9cm" svg:x2="51.5cm" svg:y2="44.9cm">
            <text:p/>
          </draw:line>
          <draw:line draw:style-name="gr38" draw:text-style-name="P4" draw:layer="layout" svg:x1="52cm" svg:y1="44.6cm" svg:x2="53cm" svg:y2="44.6cm">
            <text:p/>
          </draw:line>
          <draw:frame draw:style-name="gr700" draw:text-style-name="P37" draw:layer="layout" svg:width="1.366cm" svg:height="0.569cm" svg:x="51.834cm" svg:y="44.131cm">
            <draw:text-box>
              <text:p><text:span text:style-name="T10">srcA_s</text:span></text:p>
            </draw:text-box>
          </draw:frame>
          <draw:line draw:style-name="gr38" draw:text-style-name="P4" draw:layer="layout" svg:x1="50cm" svg:y1="44.6cm" svg:x2="51.5cm" svg:y2="44.6cm">
            <text:p/>
          </draw:line>
          <draw:frame draw:style-name="gr555" draw:text-style-name="P37" draw:layer="layout" svg:width="0.659cm" svg:height="0.569cm" svg:x="50.541cm" svg:y="44.631cm">
            <draw:text-box>
              <text:p><text:span text:style-name="T10">0</text:span></text:p>
            </draw:text-box>
          </draw:frame>
          <draw:frame draw:style-name="gr669" draw:text-style-name="P37" draw:layer="layout" svg:width="1.192cm" svg:height="0.569cm" svg:x="50.508cm" svg:y="44.2cm">
            <draw:text-box>
              <text:p><text:span text:style-name="T10">PC_s</text:span></text:p>
            </draw:text-box>
          </draw:frame>
          <draw:custom-shape draw:style-name="gr689" draw:text-style-name="P43" draw:layer="layout" svg:width="3cm" svg:height="2cm" svg:x="50cm" svg:y="43.6cm">
            <text:p/>
            <draw:enhanced-geometry svg:viewBox="0 0 21600 21600" draw:type="rectangle" draw:enhanced-path="M 0 0 L 21600 0 21600 21600 0 21600 0 0 Z N"/>
          </draw:custom-shape>
          <draw:frame draw:style-name="gr701" draw:text-style-name="P44" draw:layer="layout" svg:width="1.497cm" svg:height="0.569cm" svg:x="50.803cm" svg:y="43.631cm">
            <draw:text-box>
              <text:p><text:span text:style-name="T12">MUX: A</text:span></text:p>
            </draw:text-box>
          </draw:frame>
        </draw:g>
        <draw:g draw:style-name="gr1">
          <draw:polygon draw:style-name="gr58" draw:text-style-name="P1" draw:layer="layout" svg:width="0.499cm" svg:height="0.999cm" svg:x="51.5cm" svg:y="47.5cm" svg:viewBox="0 0 500 1000" draw:points="0,0 0,1000 500,850 500,150">
            <text:p/>
          </draw:polygon>
          <draw:frame draw:style-name="gr655" draw:text-style-name="P37" draw:layer="layout" svg:width="1.793cm" svg:height="0.569cm" svg:x="50.1cm" svg:y="48.431cm">
            <draw:text-box>
              <text:p><text:span text:style-name="T10">aluSrcB_s</text:span></text:p>
            </draw:text-box>
          </draw:frame>
          <draw:line draw:style-name="gr146" draw:text-style-name="P4" draw:layer="layout" svg:x1="51.8cm" svg:y1="49cm" svg:x2="51.8cm" svg:y2="48.4cm">
            <text:p/>
          </draw:line>
          <draw:line draw:style-name="gr38" draw:text-style-name="P4" draw:layer="layout" svg:x1="50cm" svg:y1="47.8cm" svg:x2="51.5cm" svg:y2="47.8cm">
            <text:p/>
          </draw:line>
          <draw:line draw:style-name="gr38" draw:text-style-name="P4" draw:layer="layout" svg:x1="50cm" svg:y1="48.2cm" svg:x2="51.5cm" svg:y2="48.2cm">
            <text:p/>
          </draw:line>
          <draw:line draw:style-name="gr38" draw:text-style-name="P4" draw:layer="layout" svg:x1="52cm" svg:y1="48cm" svg:x2="53cm" svg:y2="48cm">
            <text:p/>
          </draw:line>
          <draw:frame draw:style-name="gr700" draw:text-style-name="P37" draw:layer="layout" svg:width="1.366cm" svg:height="0.569cm" svg:x="51.834cm" svg:y="47.531cm">
            <draw:text-box>
              <text:p><text:span text:style-name="T10">srcB_s</text:span></text:p>
            </draw:text-box>
          </draw:frame>
          <draw:custom-shape draw:style-name="gr689" draw:text-style-name="P43" draw:layer="layout" svg:width="3cm" svg:height="2cm" svg:x="50cm" svg:y="47cm">
            <text:p/>
            <draw:enhanced-geometry svg:viewBox="0 0 21600 21600" draw:type="rectangle" draw:enhanced-path="M 0 0 L 21600 0 21600 21600 0 21600 0 0 Z N"/>
          </draw:custom-shape>
          <draw:frame draw:style-name="gr702" draw:text-style-name="P44" draw:layer="layout" svg:width="1.51cm" svg:height="0.569cm" svg:x="50.803cm" svg:y="47.031cm">
            <draw:text-box>
              <text:p><text:span text:style-name="T12">MUX: B</text:span></text:p>
            </draw:text-box>
          </draw:frame>
        </draw:g>
        <draw:line draw:style-name="gr38" draw:text-style-name="P4" draw:layer="layout" svg:x1="49.6cm" svg:y1="48.2cm" svg:x2="50cm" svg:y2="48.2cm">
          <text:p/>
        </draw:line>
        <draw:g draw:style-name="gr1">
          <draw:g draw:style-name="gr1">
            <draw:g draw:style-name="gr1">
              <draw:custom-shape draw:style-name="gr703" draw:text-style-name="P36" draw:layer="layout" svg:width="3cm" svg:height="2.031cm" svg:x="57cm" svg:y="43.5cm">
                <text:p text:style-name="P35"><text:span text:style-name="T10">alua</text:span></text:p>
                <draw:enhanced-geometry svg:viewBox="0 0 21600 21600" draw:type="rectangle" draw:enhanced-path="M 0 0 L 21600 0 21600 21600 0 21600 0 0 Z N"/>
              </draw:custom-shape>
              <draw:frame draw:style-name="gr704" draw:text-style-name="P37" draw:layer="layout" svg:width="1.37cm" svg:height="0.569cm" svg:x="57cm" svg:y="43.531cm">
                <draw:text-box>
                  <text:p><text:span text:style-name="T10">data01</text:span></text:p>
                </draw:text-box>
              </draw:frame>
              <draw:frame draw:style-name="gr704" draw:text-style-name="P37" draw:layer="layout" svg:width="1.37cm" svg:height="0.569cm" svg:x="57cm" svg:y="44cm">
                <draw:text-box>
                  <text:p><text:span text:style-name="T10">data02</text:span></text:p>
                </draw:text-box>
              </draw:frame>
              <draw:frame draw:style-name="gr632" draw:text-style-name="P37" draw:layer="layout" svg:width="1.446cm" svg:height="0.569cm" svg:x="58.054cm" svg:y="44.962cm">
                <draw:text-box>
                  <text:p><text:span text:style-name="T10">aluSela</text:span></text:p>
                </draw:text-box>
              </draw:frame>
              <draw:frame draw:style-name="gr705" draw:text-style-name="P37" draw:layer="layout" svg:width="1.683cm" svg:height="0.569cm" svg:x="58.3cm" svg:y="44.4cm">
                <draw:text-box>
                  <text:p><text:span text:style-name="T10">aluResult</text:span></text:p>
                </draw:text-box>
              </draw:frame>
            </draw:g>
            <draw:frame draw:style-name="gr705" draw:text-style-name="P37" draw:layer="layout" svg:width="1.683cm" svg:height="0.569cm" svg:x="59.817cm" svg:y="44.031cm">
              <draw:text-box>
                <text:p><text:span text:style-name="T10">aluRes_s</text:span></text:p>
              </draw:text-box>
            </draw:frame>
            <draw:frame draw:style-name="gr634" draw:text-style-name="P37" draw:layer="layout" svg:width="1.747cm" svg:height="0.569cm" svg:x="58.383cm" svg:y="45.431cm">
              <draw:text-box>
                <text:p><text:span text:style-name="T10">aluSela_s</text:span></text:p>
              </draw:text-box>
            </draw:frame>
            <draw:line draw:style-name="gr38" draw:text-style-name="P4" draw:layer="layout" svg:x1="55.983cm" svg:y1="43.8cm" svg:x2="56.983cm" svg:y2="43.8cm">
              <text:p/>
            </draw:line>
            <draw:line draw:style-name="gr38" draw:text-style-name="P4" draw:layer="layout" svg:x1="55.983cm" svg:y1="44.3cm" svg:x2="56.983cm" svg:y2="44.3cm">
              <text:p/>
            </draw:line>
            <draw:line draw:style-name="gr38" draw:text-style-name="P4" draw:layer="layout" svg:x1="58.5cm" svg:y1="45.531cm" svg:x2="58.5cm" svg:y2="46cm">
              <text:p/>
            </draw:line>
            <draw:line draw:style-name="gr38" draw:text-style-name="P4" draw:layer="layout" svg:x1="59.983cm" svg:y1="44.5cm" svg:x2="61.5cm" svg:y2="44.5cm">
              <text:p/>
            </draw:line>
          </draw:g>
          <draw:custom-shape draw:style-name="gr636" draw:text-style-name="P43" draw:layer="layout" svg:width="5.5cm" svg:height="3cm" svg:x="55.983cm" svg:y="43cm">
            <text:p/>
            <draw:enhanced-geometry svg:viewBox="0 0 21600 21600" draw:type="rectangle" draw:enhanced-path="M 0 0 L 21600 0 21600 21600 0 21600 0 0 Z N"/>
          </draw:custom-shape>
          <draw:frame draw:style-name="gr706" draw:text-style-name="P44" draw:layer="layout" svg:width="1.874cm" svg:height="0.569cm" svg:x="57.509cm" svg:y="43.031cm">
            <draw:text-box>
              <text:p><text:span text:style-name="T12">ALU: Algo</text:span></text:p>
            </draw:text-box>
          </draw:frame>
        </draw:g>
        <draw:g draw:style-name="gr1">
          <draw:g draw:style-name="gr1">
            <draw:g draw:style-name="gr1">
              <draw:custom-shape draw:style-name="gr703" draw:text-style-name="P36" draw:layer="layout" svg:width="3cm" svg:height="2.031cm" svg:x="57cm" svg:y="49.5cm">
                <text:p text:style-name="P35"><text:span text:style-name="T10">alub</text:span></text:p>
                <draw:enhanced-geometry svg:viewBox="0 0 21600 21600" draw:type="rectangle" draw:enhanced-path="M 0 0 L 21600 0 21600 21600 0 21600 0 0 Z N"/>
              </draw:custom-shape>
              <draw:frame draw:style-name="gr704" draw:text-style-name="P37" draw:layer="layout" svg:width="1.37cm" svg:height="0.569cm" svg:x="57cm" svg:y="49.531cm">
                <draw:text-box>
                  <text:p><text:span text:style-name="T10">data01</text:span></text:p>
                </draw:text-box>
              </draw:frame>
              <draw:frame draw:style-name="gr704" draw:text-style-name="P37" draw:layer="layout" svg:width="1.37cm" svg:height="0.569cm" svg:x="57cm" svg:y="50cm">
                <draw:text-box>
                  <text:p><text:span text:style-name="T10">data02</text:span></text:p>
                </draw:text-box>
              </draw:frame>
              <draw:frame draw:style-name="gr632" draw:text-style-name="P37" draw:layer="layout" svg:width="1.446cm" svg:height="0.569cm" svg:x="58.054cm" svg:y="50.962cm">
                <draw:text-box>
                  <text:p><text:span text:style-name="T10">aluSelb</text:span></text:p>
                </draw:text-box>
              </draw:frame>
              <draw:frame draw:style-name="gr559" draw:text-style-name="P37" draw:layer="layout" svg:width="1.035cm" svg:height="0.569cm" svg:x="58.9cm" svg:y="50.4cm">
                <draw:text-box>
                  <text:p><text:span text:style-name="T10">take</text:span></text:p>
                </draw:text-box>
              </draw:frame>
            </draw:g>
            <draw:frame draw:style-name="gr644" draw:text-style-name="P37" draw:layer="layout" svg:width="1.336cm" svg:height="0.569cm" svg:x="59.817cm" svg:y="50.031cm">
              <draw:text-box>
                <text:p><text:span text:style-name="T10">take_s</text:span></text:p>
              </draw:text-box>
            </draw:frame>
            <draw:frame draw:style-name="gr634" draw:text-style-name="P37" draw:layer="layout" svg:width="1.747cm" svg:height="0.569cm" svg:x="58.264cm" svg:y="51.4cm">
              <draw:text-box>
                <text:p><text:span text:style-name="T10">aluSelb_s</text:span></text:p>
              </draw:text-box>
            </draw:frame>
            <draw:line draw:style-name="gr38" draw:text-style-name="P4" draw:layer="layout" svg:x1="56cm" svg:y1="49.8cm" svg:x2="57cm" svg:y2="49.8cm">
              <text:p/>
            </draw:line>
            <draw:line draw:style-name="gr38" draw:text-style-name="P4" draw:layer="layout" svg:x1="56cm" svg:y1="50.3cm" svg:x2="57cm" svg:y2="50.3cm">
              <text:p/>
            </draw:line>
            <draw:line draw:style-name="gr38" draw:text-style-name="P4" draw:layer="layout" svg:x1="58.5cm" svg:y1="51.532cm" svg:x2="58.5cm" svg:y2="52.001cm">
              <text:p/>
            </draw:line>
            <draw:line draw:style-name="gr38" draw:text-style-name="P4" draw:layer="layout" svg:x1="60cm" svg:y1="50.5cm" svg:x2="61.5cm" svg:y2="50.5cm">
              <text:p/>
            </draw:line>
          </draw:g>
          <draw:custom-shape draw:style-name="gr636" draw:text-style-name="P43" draw:layer="layout" svg:width="5.5cm" svg:height="3cm" svg:x="56cm" svg:y="49cm">
            <text:p/>
            <draw:enhanced-geometry svg:viewBox="0 0 21600 21600" draw:type="rectangle" draw:enhanced-path="M 0 0 L 21600 0 21600 21600 0 21600 0 0 Z N"/>
          </draw:custom-shape>
          <draw:frame draw:style-name="gr707" draw:text-style-name="P44" draw:layer="layout" svg:width="2.233cm" svg:height="0.569cm" svg:x="57.5cm" svg:y="49.031cm">
            <draw:text-box>
              <text:p><text:span text:style-name="T12">ALU: Branch</text:span></text:p>
            </draw:text-box>
          </draw:frame>
        </draw:g>
        <draw:line draw:style-name="gr38" draw:text-style-name="P4" draw:layer="layout" svg:x1="58.5cm" svg:y1="48.5cm" svg:x2="58.5cm" svg:y2="46cm">
          <text:p/>
        </draw:line>
        <draw:line draw:style-name="gr38" draw:text-style-name="P4" draw:layer="layout" svg:x1="51.8cm" svg:y1="45.8cm" svg:x2="51.8cm" svg:y2="45.6cm">
          <text:p/>
        </draw:line>
        <draw:line draw:style-name="gr38" draw:text-style-name="P4" draw:layer="layout" svg:x1="49.9cm" svg:y1="47.8cm" svg:x2="50cm" svg:y2="47.8cm">
          <text:p/>
        </draw:line>
        <draw:line draw:style-name="gr38" draw:text-style-name="P4" draw:layer="layout" svg:x1="62.5cm" svg:y1="46.5cm" svg:x2="49.9cm" svg:y2="46.5cm">
          <text:p/>
        </draw:line>
        <draw:line draw:style-name="gr38" draw:text-style-name="P4" draw:layer="layout" svg:x1="62.5cm" svg:y1="45.5cm" svg:x2="66cm" svg:y2="45.5cm">
          <text:p/>
        </draw:line>
        <draw:line draw:style-name="gr38" draw:text-style-name="P4" draw:layer="layout" svg:x1="62.5cm" svg:y1="45.5cm" svg:x2="62.5cm" svg:y2="44.5cm">
          <text:p/>
        </draw:line>
        <draw:line draw:style-name="gr38" draw:text-style-name="P4" draw:layer="layout" svg:x1="37cm" svg:y1="46.2cm" svg:x2="38cm" svg:y2="46.2cm">
          <text:p/>
        </draw:line>
        <draw:line draw:style-name="gr38" draw:text-style-name="P4" draw:layer="layout" svg:x1="38cm" svg:y1="45.004cm" svg:x2="39cm" svg:y2="45cm">
          <text:p/>
        </draw:line>
        <draw:line draw:style-name="gr38" draw:text-style-name="P4" draw:layer="layout" svg:x1="38cm" svg:y1="45.4cm" svg:x2="39cm" svg:y2="45.4cm">
          <text:p/>
        </draw:line>
        <draw:line draw:style-name="gr38" draw:text-style-name="P4" draw:layer="layout" svg:x1="38cm" svg:y1="45.9cm" svg:x2="39cm" svg:y2="45.9cm">
          <text:p/>
        </draw:line>
        <draw:line draw:style-name="gr38" draw:text-style-name="P4" draw:layer="layout" svg:x1="38.503cm" svg:y1="44.6cm" svg:x2="39cm" svg:y2="44.6cm">
          <text:p/>
        </draw:line>
        <draw:g draw:style-name="gr1">
          <draw:g draw:style-name="gr1">
            <draw:g draw:style-name="gr1">
              <draw:custom-shape draw:style-name="gr708" draw:text-style-name="P36" draw:layer="layout" svg:width="4cm" svg:height="5cm" svg:x="43cm" svg:y="52.001cm">
                <text:p text:style-name="P35"><text:span text:style-name="T10">control</text:span></text:p>
                <draw:enhanced-geometry svg:viewBox="0 0 21600 21600" draw:type="rectangle" draw:enhanced-path="M 0 0 L 21600 0 21600 21600 0 21600 0 0 Z N"/>
              </draw:custom-shape>
              <draw:frame draw:style-name="gr709" draw:text-style-name="P37" draw:layer="layout" svg:width="1.429cm" svg:height="0.569cm" svg:x="43cm" svg:y="52.001cm">
                <draw:text-box>
                  <text:p><text:span text:style-name="T10">opcode</text:span></text:p>
                </draw:text-box>
              </draw:frame>
              <draw:frame draw:style-name="gr710" draw:text-style-name="P37" draw:layer="layout" svg:width="1.192cm" svg:height="0.569cm" svg:x="43cm" svg:y="52.432cm">
                <draw:text-box>
                  <text:p><text:span text:style-name="T10">func3</text:span></text:p>
                </draw:text-box>
              </draw:frame>
              <draw:frame draw:style-name="gr702" draw:text-style-name="P37" draw:layer="layout" svg:width="1.51cm" svg:height="0.569cm" svg:x="43cm" svg:y="52.832cm">
                <draw:text-box>
                  <text:p><text:span text:style-name="T10">func7b5</text:span></text:p>
                </draw:text-box>
              </draw:frame>
              <draw:frame draw:style-name="gr711" draw:text-style-name="P37" draw:layer="layout" svg:width="1.054cm" svg:height="0.569cm" svg:x="43cm" svg:y="53.232cm">
                <draw:text-box>
                  <text:p><text:span text:style-name="T10">take</text:span></text:p>
                </draw:text-box>
              </draw:frame>
              <draw:frame draw:style-name="gr712" draw:text-style-name="P37" draw:layer="layout" svg:width="1.62cm" svg:height="0.569cm" svg:x="45.326cm" svg:y="52.032cm">
                <draw:text-box>
                  <text:p><text:span text:style-name="T10">resultSrc</text:span></text:p>
                </draw:text-box>
              </draw:frame>
              <draw:frame draw:style-name="gr713" draw:text-style-name="P37" draw:layer="layout" svg:width="1.645cm" svg:height="0.569cm" svg:x="45.301cm" svg:y="52.432cm">
                <draw:text-box>
                  <text:p><text:span text:style-name="T10">dMemWr</text:span></text:p>
                </draw:text-box>
              </draw:frame>
              <draw:frame draw:style-name="gr714" draw:text-style-name="P37" draw:layer="layout" svg:width="1.649cm" svg:height="0.569cm" svg:x="45.297cm" svg:y="52.832cm">
                <draw:text-box>
                  <text:p><text:span text:style-name="T10">dMemRd</text:span></text:p>
                </draw:text-box>
              </draw:frame>
              <draw:frame draw:style-name="gr715" draw:text-style-name="P37" draw:layer="layout" svg:width="1.493cm" svg:height="0.569cm" svg:x="45.453cm" svg:y="53.232cm">
                <draw:text-box>
                  <text:p><text:span text:style-name="T10">aluSrcB</text:span></text:p>
                </draw:text-box>
              </draw:frame>
              <draw:frame draw:style-name="gr715" draw:text-style-name="P37" draw:layer="layout" svg:width="1.493cm" svg:height="0.569cm" svg:x="45.453cm" svg:y="53.632cm">
                <draw:text-box>
                  <text:p><text:span text:style-name="T10">aluSrcA</text:span></text:p>
                </draw:text-box>
              </draw:frame>
              <draw:frame draw:style-name="gr716" draw:text-style-name="P37" draw:layer="layout" svg:width="1.268cm" svg:height="0.569cm" svg:x="45.678cm" svg:y="54.032cm">
                <draw:text-box>
                  <text:p><text:span text:style-name="T10">regWr</text:span></text:p>
                </draw:text-box>
              </draw:frame>
              <draw:frame draw:style-name="gr717" draw:text-style-name="P37" draw:layer="layout" svg:width="1.117cm" svg:height="0.569cm" svg:x="45.829cm" svg:y="54.432cm">
                <draw:text-box>
                  <text:p><text:span text:style-name="T10">jump</text:span></text:p>
                </draw:text-box>
              </draw:frame>
              <draw:frame draw:style-name="gr463" draw:text-style-name="P37" draw:layer="layout" svg:width="1.463cm" svg:height="0.569cm" svg:x="45.483cm" svg:y="54.832cm">
                <draw:text-box>
                  <text:p><text:span text:style-name="T10">immSrc</text:span></text:p>
                </draw:text-box>
              </draw:frame>
              <draw:frame draw:style-name="gr718" draw:text-style-name="P37" draw:layer="layout" svg:width="1.446cm" svg:height="0.569cm" svg:x="45.5cm" svg:y="55.201cm">
                <draw:text-box>
                  <text:p><text:span text:style-name="T10">aluSela</text:span></text:p>
                </draw:text-box>
              </draw:frame>
              <draw:frame draw:style-name="gr719" draw:text-style-name="P37" draw:layer="layout" svg:width="2.708cm" svg:height="0.569cm" svg:x="44.238cm" svg:y="56.001cm">
                <draw:text-box>
                  <text:p><text:span text:style-name="T10">trap_illegal_instrx</text:span></text:p>
                </draw:text-box>
              </draw:frame>
              <draw:frame draw:style-name="gr718" draw:text-style-name="P37" draw:layer="layout" svg:width="1.446cm" svg:height="0.569cm" svg:x="45.5cm" svg:y="55.601cm">
                <draw:text-box>
                  <text:p><text:span text:style-name="T10">aluSelb</text:span></text:p>
                </draw:text-box>
              </draw:frame>
            </draw:g>
            <draw:frame draw:style-name="gr617" draw:text-style-name="P37" draw:layer="layout" svg:width="1.51cm" svg:height="0.569cm" svg:x="41.7cm" svg:y="51.832cm">
              <draw:text-box>
                <text:p><text:span text:style-name="T10">ir_s[6:0]</text:span></text:p>
              </draw:text-box>
            </draw:frame>
            <draw:frame draw:style-name="gr696" draw:text-style-name="P37" draw:layer="layout" svg:width="1.823cm" svg:height="0.569cm" svg:x="41.4cm" svg:y="52.232cm">
              <draw:text-box>
                <text:p><text:span text:style-name="T10">ir_s[14:12]</text:span></text:p>
              </draw:text-box>
            </draw:frame>
            <draw:frame draw:style-name="gr639" draw:text-style-name="P37" draw:layer="layout" svg:width="1.429cm" svg:height="0.569cm" svg:x="41.771cm" svg:y="52.632cm">
              <draw:text-box>
                <text:p><text:span text:style-name="T10">ir_s[30]</text:span></text:p>
              </draw:text-box>
            </draw:frame>
            <draw:frame draw:style-name="gr644" draw:text-style-name="P37" draw:layer="layout" svg:width="1.336cm" svg:height="0.569cm" svg:x="41.9cm" svg:y="53.032cm">
              <draw:text-box>
                <text:p><text:span text:style-name="T10">take_s</text:span></text:p>
              </draw:text-box>
            </draw:frame>
            <draw:line draw:style-name="gr38" draw:text-style-name="P4" draw:layer="layout" svg:x1="41cm" svg:y1="52.3cm" svg:x2="43cm" svg:y2="52.301cm">
              <text:p/>
            </draw:line>
            <draw:line draw:style-name="gr38" draw:text-style-name="P4" draw:layer="layout" svg:x1="41cm" svg:y1="52.7cm" svg:x2="43cm" svg:y2="52.701cm">
              <text:p/>
            </draw:line>
            <draw:line draw:style-name="gr38" draw:text-style-name="P4" draw:layer="layout" svg:x1="41cm" svg:y1="53.1cm" svg:x2="43cm" svg:y2="53.101cm">
              <text:p/>
            </draw:line>
            <draw:line draw:style-name="gr38" draw:text-style-name="P4" draw:layer="layout" svg:x1="41cm" svg:y1="53.5cm" svg:x2="43cm" svg:y2="53.501cm">
              <text:p/>
            </draw:line>
            <draw:line draw:style-name="gr38" draw:text-style-name="P4" draw:layer="layout" svg:x1="47cm" svg:y1="52.301cm" svg:x2="50cm" svg:y2="52.3cm">
              <text:p/>
            </draw:line>
            <draw:line draw:style-name="gr38" draw:text-style-name="P4" draw:layer="layout" svg:x1="47cm" svg:y1="52.701cm" svg:x2="50cm" svg:y2="52.701cm">
              <text:p/>
            </draw:line>
            <draw:line draw:style-name="gr38" draw:text-style-name="P4" draw:layer="layout" svg:x1="47cm" svg:y1="53.101cm" svg:x2="50.002cm" svg:y2="53.1cm">
              <text:p/>
            </draw:line>
            <draw:line draw:style-name="gr38" draw:text-style-name="P4" draw:layer="layout" svg:x1="47cm" svg:y1="53.501cm" svg:x2="50cm" svg:y2="53.5cm">
              <text:p/>
            </draw:line>
            <draw:line draw:style-name="gr38" draw:text-style-name="P4" draw:layer="layout" svg:x1="47cm" svg:y1="53.901cm" svg:x2="50cm" svg:y2="53.901cm">
              <text:p/>
            </draw:line>
            <draw:line draw:style-name="gr38" draw:text-style-name="P4" draw:layer="layout" svg:x1="47cm" svg:y1="54.301cm" svg:x2="50cm" svg:y2="54.301cm">
              <text:p/>
            </draw:line>
            <draw:line draw:style-name="gr38" draw:text-style-name="P4" draw:layer="layout" svg:x1="47cm" svg:y1="54.701cm" svg:x2="50cm" svg:y2="54.7cm">
              <text:p/>
            </draw:line>
            <draw:line draw:style-name="gr38" draw:text-style-name="P4" draw:layer="layout" svg:x1="47cm" svg:y1="55.101cm" svg:x2="50cm" svg:y2="55.102cm">
              <text:p/>
            </draw:line>
            <draw:line draw:style-name="gr38" draw:text-style-name="P4" draw:layer="layout" svg:x1="47cm" svg:y1="55.501cm" svg:x2="50cm" svg:y2="55.5cm">
              <text:p/>
            </draw:line>
            <draw:line draw:style-name="gr38" draw:text-style-name="P4" draw:layer="layout" svg:x1="47cm" svg:y1="55.901cm" svg:x2="50cm" svg:y2="55.901cm">
              <text:p/>
            </draw:line>
            <draw:line draw:style-name="gr38" draw:text-style-name="P4" draw:layer="layout" svg:x1="47cm" svg:y1="56.301cm" svg:x2="50cm" svg:y2="56.3cm">
              <text:p/>
            </draw:line>
            <draw:frame draw:style-name="gr720" draw:text-style-name="P37" draw:layer="layout" svg:width="2.06cm" svg:height="0.569cm" svg:x="46.8cm" svg:y="51.833cm">
              <draw:text-box>
                <text:p><text:span text:style-name="T10">resultSrcx_s</text:span></text:p>
              </draw:text-box>
            </draw:frame>
            <draw:frame draw:style-name="gr676" draw:text-style-name="P37" draw:layer="layout" svg:width="1.946cm" svg:height="0.569cm" svg:x="46.8cm" svg:y="52.234cm">
              <draw:text-box>
                <text:p><text:span text:style-name="T10">dMemWr_s</text:span></text:p>
              </draw:text-box>
            </draw:frame>
            <draw:frame draw:style-name="gr675" draw:text-style-name="P37" draw:layer="layout" svg:width="1.95cm" svg:height="0.569cm" svg:x="46.8cm" svg:y="52.635cm">
              <draw:text-box>
                <text:p><text:span text:style-name="T10">dMemRd_s</text:span></text:p>
              </draw:text-box>
            </draw:frame>
            <draw:frame draw:style-name="gr655" draw:text-style-name="P37" draw:layer="layout" svg:width="1.793cm" svg:height="0.569cm" svg:x="46.8cm" svg:y="53.036cm">
              <draw:text-box>
                <text:p><text:span text:style-name="T10">aluSrcB_s</text:span></text:p>
              </draw:text-box>
            </draw:frame>
            <draw:frame draw:style-name="gr655" draw:text-style-name="P37" draw:layer="layout" svg:width="1.793cm" svg:height="0.569cm" svg:x="46.801cm" svg:y="53.437cm">
              <draw:text-box>
                <text:p><text:span text:style-name="T10">aluSrcA_s</text:span></text:p>
              </draw:text-box>
            </draw:frame>
            <draw:frame draw:style-name="gr540" draw:text-style-name="P37" draw:layer="layout" svg:width="1.565cm" svg:height="0.569cm" svg:x="46.802cm" svg:y="53.838cm">
              <draw:text-box>
                <text:p><text:span text:style-name="T10">regWr_s</text:span></text:p>
              </draw:text-box>
            </draw:frame>
            <draw:frame draw:style-name="gr721" draw:text-style-name="P37" draw:layer="layout" svg:width="1.412cm" svg:height="0.569cm" svg:x="46.803cm" svg:y="54.239cm">
              <draw:text-box>
                <text:p><text:span text:style-name="T10">jump_s</text:span></text:p>
              </draw:text-box>
            </draw:frame>
            <draw:frame draw:style-name="gr633" draw:text-style-name="P37" draw:layer="layout" svg:width="1.903cm" svg:height="0.569cm" svg:x="46.803cm" svg:y="54.64cm">
              <draw:text-box>
                <text:p><text:span text:style-name="T10">immSrcx_s</text:span></text:p>
              </draw:text-box>
            </draw:frame>
            <draw:frame draw:style-name="gr634" draw:text-style-name="P37" draw:layer="layout" svg:width="1.747cm" svg:height="0.569cm" svg:x="46.804cm" svg:y="55.041cm">
              <draw:text-box>
                <text:p><text:span text:style-name="T10">aluSela_s</text:span></text:p>
              </draw:text-box>
            </draw:frame>
            <draw:frame draw:style-name="gr634" draw:text-style-name="P37" draw:layer="layout" svg:width="1.747cm" svg:height="0.569cm" svg:x="46.805cm" svg:y="55.442cm">
              <draw:text-box>
                <text:p><text:span text:style-name="T10">aluSelb_s</text:span></text:p>
              </draw:text-box>
            </draw:frame>
            <draw:frame draw:style-name="gr722" draw:text-style-name="P37" draw:layer="layout" svg:width="3.008cm" svg:height="0.569cm" svg:x="46.806cm" svg:y="55.843cm">
              <draw:text-box>
                <text:p><text:span text:style-name="T10">trap_illegal_instrx</text:span><text:span text:style-name="T10">_s</text:span></text:p>
              </draw:text-box>
            </draw:frame>
          </draw:g>
          <draw:custom-shape draw:style-name="gr723" draw:text-style-name="P43" draw:layer="layout" svg:width="9cm" svg:height="6cm" svg:x="41cm" svg:y="51.5cm">
            <text:p/>
            <draw:enhanced-geometry svg:viewBox="0 0 21600 21600" draw:type="rectangle" draw:enhanced-path="M 0 0 L 21600 0 21600 21600 0 21600 0 0 Z N"/>
          </draw:custom-shape>
          <draw:frame draw:style-name="gr683" draw:text-style-name="P44" draw:layer="layout" svg:width="2.297cm" svg:height="0.569cm" svg:x="43.603cm" svg:y="51.531cm">
            <draw:text-box>
              <text:p><text:span text:style-name="T12">Instr.-Decode</text:span></text:p>
            </draw:text-box>
          </draw:frame>
        </draw:g>
        <draw:line draw:style-name="gr38" draw:text-style-name="P4" draw:layer="layout" svg:x1="76cm" svg:y1="46.5cm" svg:x2="76cm" svg:y2="41.2cm">
          <text:p/>
        </draw:line>
        <draw:line draw:style-name="gr38" draw:text-style-name="P4" draw:layer="layout" svg:x1="64cm" svg:y1="3.4cm" svg:x2="67.2cm" svg:y2="3.4cm">
          <text:p/>
        </draw:line>
        <draw:line draw:style-name="gr38" draw:text-style-name="P4" draw:layer="layout" svg:x1="70cm" svg:y1="8.3cm" svg:x2="71cm" svg:y2="8.3cm">
          <text:p/>
        </draw:line>
        <draw:line draw:style-name="gr38" draw:text-style-name="P4" draw:layer="layout" svg:x1="71cm" svg:y1="8.3cm" svg:x2="71cm" svg:y2="6cm">
          <text:p/>
        </draw:line>
        <draw:custom-shape draw:style-name="gr544" draw:text-style-name="P46" draw:layer="layout" svg:width="0.2cm" svg:height="0.2cm" svg:x="42.903cm" svg:y="49.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42.904cm" svg:y="49.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31.207cm" svg:y="4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24.808cm" svg:y="46.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24.809cm" svg:y="44.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8.81cm" svg:y="4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8.811cm" svg:y="45.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8.812cm" svg:y="44.4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8.811cm" svg:y="4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2.986cm" svg:y1="12.5cm" svg:x2="13.986cm" svg:y2="12.499cm">
          <text:p/>
        </draw:line>
        <draw:custom-shape draw:style-name="gr544" draw:text-style-name="P46" draw:layer="layout" svg:width="0.2cm" svg:height="0.2cm" svg:x="12.999cm" svg:y="10.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23cm" svg:y="11.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2.801cm" svg:y="12.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8.6cm" svg:y1="43.5cm" svg:x2="9cm" svg:y2="43.5cm">
          <text:p/>
        </draw:line>
        <draw:line draw:style-name="gr38" draw:text-style-name="P4" draw:layer="layout" svg:x1="61.5cm" svg:y1="50.5cm" svg:x2="62cm" svg:y2="50.5cm">
          <text:p/>
        </draw:line>
        <draw:line draw:style-name="gr38" draw:text-style-name="P4" draw:layer="layout" svg:x1="76cm" svg:y1="40.2cm" svg:x2="76cm" svg:y2="31.3cm">
          <text:p/>
        </draw:line>
        <draw:line draw:style-name="gr38" draw:text-style-name="P4" draw:layer="layout" svg:x1="75.5cm" svg:y1="31.3cm" svg:x2="76cm" svg:y2="31.3cm">
          <text:p/>
        </draw:line>
        <draw:line draw:style-name="gr38" draw:text-style-name="P4" draw:layer="layout" svg:x1="63.5cm" svg:y1="2.5cm" svg:x2="64cm" svg:y2="2.5cm">
          <text:p/>
        </draw:line>
        <draw:line draw:style-name="gr38" draw:text-style-name="P4" draw:layer="layout" svg:x1="55cm" svg:y1="6cm" svg:x2="55.5cm" svg:y2="6cm">
          <text:p/>
        </draw:line>
        <draw:line draw:style-name="gr38" draw:text-style-name="P4" draw:layer="layout" svg:x1="55.5cm" svg:y1="13cm" svg:x2="55.5cm" svg:y2="2cm">
          <text:p/>
        </draw:line>
        <draw:line draw:style-name="gr38" draw:text-style-name="P4" draw:layer="layout" svg:x1="55.5cm" svg:y1="2cm" svg:x2="57cm" svg:y2="2cm">
          <text:p/>
        </draw:line>
        <draw:line draw:style-name="gr38" draw:text-style-name="P4" draw:layer="layout" svg:x1="56cm" svg:y1="14cm" svg:x2="56cm" svg:y2="2.5cm">
          <text:p/>
        </draw:line>
        <draw:line draw:style-name="gr38" draw:text-style-name="P4" draw:layer="layout" svg:x1="56cm" svg:y1="2.5cm" svg:x2="57cm" svg:y2="2.5cm">
          <text:p/>
        </draw:line>
        <draw:line draw:style-name="gr38" draw:text-style-name="P4" draw:layer="layout" svg:x1="56.5cm" svg:y1="3cm" svg:x2="57cm" svg:y2="3cm">
          <text:p/>
        </draw:line>
        <draw:line draw:style-name="gr38" draw:text-style-name="P4" draw:layer="layout" svg:x1="55cm" svg:y1="10.2cm" svg:x2="56cm" svg:y2="10.2cm">
          <text:p/>
        </draw:line>
        <draw:line draw:style-name="gr38" draw:text-style-name="P4" draw:layer="layout" svg:x1="55cm" svg:y1="15cm" svg:x2="60cm" svg:y2="15cm">
          <text:p/>
        </draw:line>
        <draw:line draw:style-name="gr38" draw:text-style-name="P4" draw:layer="layout" svg:x1="56.5cm" svg:y1="15cm" svg:x2="56.5cm" svg:y2="3cm">
          <text:p/>
        </draw:line>
        <draw:g draw:style-name="gr1">
          <draw:g draw:style-name="gr66">
            <draw:polygon draw:style-name="gr58" draw:text-style-name="P1" draw:layer="layout" svg:width="0.499cm" svg:height="0.999cm" svg:x="79.5cm" svg:y="40.2cm" svg:viewBox="0 0 500 1000" draw:points="0,0 0,1000 500,850 500,150">
              <text:p/>
            </draw:polygon>
            <draw:frame draw:style-name="gr720" draw:text-style-name="P37" draw:layer="layout" svg:width="2.06cm" svg:height="0.569cm" svg:x="78cm" svg:y="41.2cm">
              <draw:text-box>
                <text:p><text:span text:style-name="T10">resultSrcx_s</text:span></text:p>
              </draw:text-box>
            </draw:frame>
            <draw:line draw:style-name="gr146" draw:text-style-name="P4" draw:layer="layout" svg:x1="79.8cm" svg:y1="42.2cm" svg:x2="79.8cm" svg:y2="41.1cm">
              <text:p/>
            </draw:line>
            <draw:line draw:style-name="gr38" draw:text-style-name="P4" draw:layer="layout" svg:x1="77cm" svg:y1="40.2cm" svg:x2="79.5cm" svg:y2="40.2cm">
              <text:p/>
            </draw:line>
            <draw:line draw:style-name="gr38" draw:text-style-name="P4" draw:layer="layout" svg:x1="77cm" svg:y1="41.2cm" svg:x2="79.5cm" svg:y2="41.2cm">
              <text:p/>
            </draw:line>
            <draw:line draw:style-name="gr38" draw:text-style-name="P4" draw:layer="layout" svg:x1="80cm" svg:y1="40.7cm" svg:x2="81.5cm" svg:y2="40.7cm">
              <text:p/>
            </draw:line>
            <draw:frame draw:style-name="gr679" draw:text-style-name="P37" draw:layer="layout" svg:width="1.493cm" svg:height="0.569cm" svg:x="79.807cm" svg:y="40.2cm">
              <draw:text-box>
                <text:p><text:span text:style-name="T10">result_s</text:span></text:p>
              </draw:text-box>
            </draw:frame>
            <draw:line draw:style-name="gr38" draw:text-style-name="P4" draw:layer="layout" svg:x1="77cm" svg:y1="40.9cm" svg:x2="79.5cm" svg:y2="40.9cm">
              <text:p/>
            </draw:line>
            <draw:frame draw:style-name="gr374" draw:text-style-name="P37" draw:layer="layout" svg:width="2.407cm" svg:height="0.569cm" svg:x="77.293cm" svg:y="40.731cm">
              <draw:text-box>
                <text:p><text:span text:style-name="T10">dBusDataRd_s</text:span></text:p>
              </draw:text-box>
            </draw:frame>
            <draw:frame draw:style-name="gr543" draw:text-style-name="P37" draw:layer="layout" svg:width="2.25cm" svg:height="0.569cm" svg:x="77.45cm" svg:y="40.431cm">
              <draw:text-box>
                <text:p><text:span text:style-name="T10">aluCalcRes_s</text:span></text:p>
              </draw:text-box>
            </draw:frame>
            <draw:line draw:style-name="gr38" draw:text-style-name="P4" draw:layer="layout" svg:x1="77cm" svg:y1="40.5cm" svg:x2="79.5cm" svg:y2="40.5cm">
              <text:p/>
            </draw:line>
            <draw:frame draw:style-name="gr724" draw:text-style-name="P37" draw:layer="layout" svg:width="1.776cm" svg:height="0.569cm" svg:x="77.9cm" svg:y="40.031cm">
              <draw:text-box>
                <text:p><text:span text:style-name="T10">PC_link_s</text:span></text:p>
              </draw:text-box>
            </draw:frame>
            <draw:frame draw:style-name="gr545" draw:text-style-name="P37" draw:layer="layout" svg:width="1.886cm" svg:height="0.569cm" svg:x="77.814cm" svg:y="39.731cm">
              <draw:text-box>
                <text:p><text:span text:style-name="T10">csr_data_s</text:span></text:p>
              </draw:text-box>
            </draw:frame>
          </draw:g>
          <draw:custom-shape draw:style-name="gr725" draw:text-style-name="P43" draw:layer="layout" svg:width="4.5cm" svg:height="2.5cm" svg:x="77cm" svg:y="39.7cm">
            <text:p/>
            <draw:enhanced-geometry svg:viewBox="0 0 21600 21600" draw:type="rectangle" draw:enhanced-path="M 0 0 L 21600 0 21600 21600 0 21600 0 0 Z N"/>
          </draw:custom-shape>
          <draw:frame draw:style-name="gr683" draw:text-style-name="P44" draw:layer="layout" svg:width="2.297cm" svg:height="0.569cm" svg:x="77.503cm" svg:y="41.631cm">
            <draw:text-box>
              <text:p><text:span text:style-name="T12">MUX: Result</text:span></text:p>
            </draw:text-box>
          </draw:frame>
        </draw:g>
        <draw:line draw:style-name="gr38" draw:text-style-name="P4" draw:layer="layout" svg:x1="76cm" svg:y1="40.2cm" svg:x2="77cm" svg:y2="40.2cm">
          <text:p/>
        </draw:line>
        <draw:g draw:style-name="gr1">
          <draw:g draw:style-name="gr1">
            <draw:polygon draw:style-name="gr58" draw:text-style-name="P1" draw:layer="layout" svg:width="0.499cm" svg:height="0.999cm" svg:x="57cm" svg:y="40.3cm" svg:viewBox="0 0 500 1000" draw:points="0,0 0,1000 500,850 500,150">
              <text:p/>
            </draw:polygon>
            <draw:frame draw:style-name="gr721" draw:text-style-name="P37" draw:layer="layout" svg:width="1.412cm" svg:height="0.569cm" svg:x="56.1cm" svg:y="41.331cm">
              <draw:text-box>
                <text:p><text:span text:style-name="T10">jump_s</text:span></text:p>
              </draw:text-box>
            </draw:frame>
            <draw:line draw:style-name="gr146" draw:text-style-name="P4" draw:layer="layout" svg:x1="57.3cm" svg:y1="42cm" svg:x2="57.3cm" svg:y2="41.2cm">
              <text:p/>
            </draw:line>
            <draw:line draw:style-name="gr38" draw:text-style-name="P4" draw:layer="layout" svg:x1="55cm" svg:y1="40.6cm" svg:x2="57cm" svg:y2="40.6cm">
              <text:p/>
            </draw:line>
            <draw:line draw:style-name="gr38" draw:text-style-name="P4" draw:layer="layout" svg:x1="55cm" svg:y1="41cm" svg:x2="57cm" svg:y2="41cm">
              <text:p/>
            </draw:line>
            <draw:frame draw:style-name="gr640" draw:text-style-name="P37" draw:layer="layout" svg:width="1.399cm" svg:height="0.569cm" svg:x="55.8cm" svg:y="40.631cm">
              <draw:text-box>
                <text:p><text:span text:style-name="T10">regA_s</text:span></text:p>
              </draw:text-box>
            </draw:frame>
            <draw:line draw:style-name="gr38" draw:text-style-name="P4" draw:layer="layout" svg:x1="57.5cm" svg:y1="40.8cm" svg:x2="58.5cm" svg:y2="40.8cm">
              <text:p/>
            </draw:line>
            <draw:frame draw:style-name="gr675" draw:text-style-name="P37" draw:layer="layout" svg:width="1.95cm" svg:height="0.569cm" svg:x="55.2cm" svg:y="40.232cm">
              <draw:text-box>
                <text:p><text:span text:style-name="T10">PC_instr_r</text:span></text:p>
              </draw:text-box>
            </draw:frame>
            <draw:frame draw:style-name="gr726" draw:text-style-name="P37" draw:layer="layout" svg:width="1.996cm" svg:height="0.569cm" svg:x="57.3cm" svg:y="40.4cm">
              <draw:text-box>
                <text:p><text:span text:style-name="T10">PCorRS1_s</text:span></text:p>
              </draw:text-box>
            </draw:frame>
            <draw:custom-shape draw:style-name="gr688" draw:text-style-name="P59" draw:layer="layout" svg:width="1cm" svg:height="1cm" svg:x="59.5cm" svg:y="40.5cm">
              <text:p text:style-name="P35"><text:span text:style-name="T10">+</text:span></text:p>
              <draw:enhanced-geometry svg:viewBox="0 0 21600 21600" draw:type="rectangle" draw:enhanced-path="M 0 0 L 21600 0 21600 21600 0 21600 0 0 Z N"/>
            </draw:custom-shape>
            <draw:line draw:style-name="gr146" draw:text-style-name="P4" draw:layer="layout" svg:x1="58.5cm" svg:y1="41.2cm" svg:x2="59.5cm" svg:y2="41.2cm">
              <text:p/>
            </draw:line>
            <draw:line draw:style-name="gr146" draw:text-style-name="P4" draw:layer="layout" svg:x1="58.5cm" svg:y1="40.8cm" svg:x2="59.5cm" svg:y2="40.8cm">
              <text:p/>
            </draw:line>
            <draw:frame draw:style-name="gr634" draw:text-style-name="P37" draw:layer="layout" svg:width="1.747cm" svg:height="0.569cm" svg:x="57.6cm" svg:y="40.731cm">
              <draw:text-box>
                <text:p><text:span text:style-name="T10">immExt_s</text:span></text:p>
              </draw:text-box>
            </draw:frame>
            <draw:line draw:style-name="gr38" draw:text-style-name="P4" draw:layer="layout" svg:x1="60.5cm" svg:y1="41cm" svg:x2="62cm" svg:y2="41cm">
              <text:p/>
            </draw:line>
            <draw:frame draw:style-name="gr632" draw:text-style-name="P37" draw:layer="layout" svg:width="1.446cm" svg:height="0.569cm" svg:x="60.254cm" svg:y="40.6cm">
              <draw:text-box>
                <text:p><text:span text:style-name="T10">PCbr_s</text:span></text:p>
              </draw:text-box>
            </draw:frame>
            <draw:line draw:style-name="gr38" draw:text-style-name="P4" draw:layer="layout" svg:x1="58.5cm" svg:y1="41.2cm" svg:x2="58.5cm" svg:y2="42cm">
              <text:p/>
            </draw:line>
          </draw:g>
          <draw:custom-shape draw:style-name="gr727" draw:text-style-name="P43" draw:layer="layout" svg:width="7cm" svg:height="2cm" svg:x="55cm" svg:y="40cm">
            <text:p/>
            <draw:enhanced-geometry svg:viewBox="0 0 21600 21600" draw:type="rectangle" draw:enhanced-path="M 0 0 L 21600 0 21600 21600 0 21600 0 0 Z N"/>
          </draw:custom-shape>
          <draw:frame draw:style-name="gr728" draw:text-style-name="P44" draw:layer="layout" svg:width="2.043cm" svg:height="0.569cm" svg:x="59.8cm" svg:y="41.4cm">
            <draw:text-box>
              <text:p><text:span text:style-name="T12">PC: Branch</text:span></text:p>
            </draw:text-box>
          </draw:frame>
        </draw:g>
        <draw:line draw:style-name="gr38" draw:text-style-name="P4" draw:layer="layout" svg:x1="76.5cm" svg:y1="40.5cm" svg:x2="77cm" svg:y2="40.5cm">
          <text:p/>
        </draw:line>
        <draw:line draw:style-name="gr38" draw:text-style-name="P4" draw:layer="layout" svg:x1="61.5cm" svg:y1="44.5cm" svg:x2="75cm" svg:y2="44.5cm">
          <text:p/>
        </draw:line>
        <draw:line draw:style-name="gr38" draw:text-style-name="P4" draw:layer="layout" svg:x1="49.6cm" svg:y1="42.7cm" svg:x2="58.5cm" svg:y2="42.7cm">
          <text:p/>
        </draw:line>
        <draw:line draw:style-name="gr38" draw:text-style-name="P4" draw:layer="layout" svg:x1="58.5cm" svg:y1="42cm" svg:x2="58.5cm" svg:y2="42.7cm">
          <text:p/>
        </draw:line>
        <draw:custom-shape draw:style-name="gr461" draw:text-style-name="P5" draw:layer="layout" svg:width="0.2cm" svg:height="0.2cm" svg:x="49.506cm" svg:y="42.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4.5cm" svg:y1="42.3cm" svg:x2="54.5cm" svg:y2="54.7cm">
          <text:p/>
        </draw:line>
        <draw:line draw:style-name="gr38" draw:text-style-name="P4" draw:layer="layout" svg:x1="54.5cm" svg:y1="42.3cm" svg:x2="57.3cm" svg:y2="42.3cm">
          <text:p/>
        </draw:line>
        <draw:line draw:style-name="gr38" draw:text-style-name="P4" draw:layer="layout" svg:x1="57.3cm" svg:y1="42cm" svg:x2="57.3cm" svg:y2="42.3cm">
          <text:p/>
        </draw:line>
        <draw:line draw:style-name="gr38" draw:text-style-name="P4" draw:layer="layout" svg:x1="55cm" svg:y1="32.9cm" svg:x2="68cm" svg:y2="32.9cm">
          <text:p/>
        </draw:line>
        <draw:line draw:style-name="gr38" draw:text-style-name="P4" draw:layer="layout" svg:x1="55cm" svg:y1="25.8cm" svg:x2="56cm" svg:y2="25.8cm">
          <text:p/>
        </draw:line>
        <draw:line draw:style-name="gr38" draw:text-style-name="P4" draw:layer="layout" svg:x1="56cm" svg:y1="32.5cm" svg:x2="68cm" svg:y2="32.5cm">
          <text:p/>
        </draw:line>
        <draw:line draw:style-name="gr38" draw:text-style-name="P4" draw:layer="layout" svg:x1="56cm" svg:y1="25.8cm" svg:x2="56cm" svg:y2="32.5cm">
          <text:p/>
        </draw:line>
        <draw:line draw:style-name="gr38" draw:text-style-name="P4" draw:layer="layout" svg:x1="55cm" svg:y1="18cm" svg:x2="57cm" svg:y2="18cm">
          <text:p/>
        </draw:line>
        <draw:line draw:style-name="gr38" draw:text-style-name="P4" draw:layer="layout" svg:x1="57cm" svg:y1="18cm" svg:x2="57cm" svg:y2="32.1cm">
          <text:p/>
        </draw:line>
        <draw:line draw:style-name="gr38" draw:text-style-name="P4" draw:layer="layout" svg:x1="57cm" svg:y1="32.1cm" svg:x2="68cm" svg:y2="32.1cm">
          <text:p/>
        </draw:line>
        <draw:line draw:style-name="gr38" draw:text-style-name="P4" draw:layer="layout" svg:x1="58cm" svg:y1="31.7cm" svg:x2="68cm" svg:y2="31.7cm">
          <text:p/>
        </draw:line>
        <draw:line draw:style-name="gr38" draw:text-style-name="P4" draw:layer="layout" svg:x1="56cm" svg:y1="14cm" svg:x2="58cm" svg:y2="14cm">
          <text:p/>
        </draw:line>
        <draw:custom-shape draw:style-name="gr461" draw:text-style-name="P5" draw:layer="layout" svg:width="0.2cm" svg:height="0.2cm" svg:x="55.907cm" svg:y="10.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8cm" svg:y1="14cm" svg:x2="58cm" svg:y2="31.7cm">
          <text:p/>
        </draw:line>
        <draw:line draw:style-name="gr38" draw:text-style-name="P4" draw:layer="layout" svg:x1="59cm" svg:y1="31.3cm" svg:x2="68cm" svg:y2="31.3cm">
          <text:p/>
        </draw:line>
        <draw:custom-shape draw:style-name="gr461" draw:text-style-name="P5" draw:layer="layout" svg:width="0.2cm" svg:height="0.2cm" svg:x="55.408cm" svg:y="5.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5.5cm" svg:y1="13cm" svg:x2="59cm" svg:y2="13cm">
          <text:p/>
        </draw:line>
        <draw:line draw:style-name="gr38" draw:text-style-name="P4" draw:layer="layout" svg:x1="59cm" svg:y1="13cm" svg:x2="59cm" svg:y2="31.3cm">
          <text:p/>
        </draw:line>
        <draw:custom-shape draw:style-name="gr461" draw:text-style-name="P5" draw:layer="layout" svg:width="0.2cm" svg:height="0.2cm" svg:x="56.408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60cm" svg:y1="15cm" svg:x2="60cm" svg:y2="33.3cm">
          <text:p/>
        </draw:line>
        <draw:line draw:style-name="gr38" draw:text-style-name="P4" draw:layer="layout" svg:x1="60cm" svg:y1="33.3cm" svg:x2="68cm" svg:y2="33.3cm">
          <text:p/>
        </draw:line>
        <draw:line draw:style-name="gr38" draw:text-style-name="P4" draw:layer="layout" svg:x1="54cm" svg:y1="40.6cm" svg:x2="55cm" svg:y2="40.6cm">
          <text:p/>
        </draw:line>
        <draw:line draw:style-name="gr38" draw:text-style-name="P4" draw:layer="layout" svg:x1="54cm" svg:y1="39.2cm" svg:x2="54cm" svg:y2="40.6cm">
          <text:p/>
        </draw:line>
        <draw:line draw:style-name="gr38" draw:text-style-name="P4" draw:layer="layout" svg:x1="49.3cm" svg:y1="41cm" svg:x2="55cm" svg:y2="41cm">
          <text:p/>
        </draw:line>
        <draw:line draw:style-name="gr38" draw:text-style-name="P4" draw:layer="layout" svg:x1="6cm" svg:y1="38.9cm" svg:x2="63cm" svg:y2="38.9cm">
          <text:p/>
        </draw:line>
        <draw:line draw:style-name="gr38" draw:text-style-name="P4" draw:layer="layout" svg:x1="62cm" svg:y1="41cm" svg:x2="63cm" svg:y2="41cm">
          <text:p/>
        </draw:line>
        <draw:line draw:style-name="gr38" draw:text-style-name="P4" draw:layer="layout" svg:x1="63cm" svg:y1="38.9cm" svg:x2="63cm" svg:y2="41cm">
          <text:p/>
        </draw:line>
        <draw:line draw:style-name="gr38" draw:text-style-name="P4" draw:layer="layout" svg:x1="6cm" svg:y1="42.5cm" svg:x2="6cm" svg:y2="38.9cm">
          <text:p/>
        </draw:line>
        <draw:line draw:style-name="gr38" draw:text-style-name="P4" draw:layer="layout" svg:x1="49.9cm" svg:y1="39.2cm" svg:x2="49.9cm" svg:y2="44.6cm">
          <text:p/>
        </draw:line>
        <draw:line draw:style-name="gr38" draw:text-style-name="P4" draw:layer="layout" svg:x1="49.9cm" svg:y1="44.6cm" svg:x2="50cm" svg:y2="44.6cm">
          <text:p/>
        </draw:line>
        <draw:custom-shape draw:style-name="gr461" draw:text-style-name="P5" draw:layer="layout" svg:width="0.2cm" svg:height="0.2cm" svg:x="49.807cm" svg:y="39.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37.905cm" svg:y="41.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502cm" svg:y1="8.202cm" svg:x2="1.5cm" svg:y2="37cm">
          <text:p/>
        </draw:line>
        <draw:line draw:style-name="gr38" draw:text-style-name="P4" draw:layer="layout" svg:x1="1.502cm" svg:y1="37cm" svg:x2="72.2cm" svg:y2="37cm">
          <text:p/>
        </draw:line>
        <draw:custom-shape draw:style-name="gr461" draw:text-style-name="P5" draw:layer="layout" svg:width="0.2cm" svg:height="0.2cm" svg:x="37.906cm" svg:y="36.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72.2cm" svg:y1="37cm" svg:x2="72.2cm" svg:y2="35cm">
          <text:p/>
        </draw:line>
        <draw:line draw:style-name="gr38" draw:text-style-name="P4" draw:layer="layout" svg:x1="45.3cm" svg:y1="28.2cm" svg:x2="1.5cm" svg:y2="28.2cm">
          <text:p/>
        </draw:line>
        <draw:line draw:style-name="gr38" draw:text-style-name="P4" draw:layer="layout" svg:x1="46.3cm" svg:y1="28.5cm" svg:x2="32.5cm" svg:y2="28.5cm">
          <text:p/>
        </draw:line>
        <draw:line draw:style-name="gr38" draw:text-style-name="P4" draw:layer="layout" svg:x1="37.5cm" svg:y1="37.5cm" svg:x2="37.5cm" svg:y2="46.7cm">
          <text:p/>
        </draw:line>
        <draw:line draw:style-name="gr38" draw:text-style-name="P4" draw:layer="layout" svg:x1="37.001cm" svg:y1="46.7cm" svg:x2="37.5cm" svg:y2="46.7cm">
          <text:p/>
        </draw:line>
        <draw:line draw:style-name="gr38" draw:text-style-name="P4" draw:layer="layout" svg:x1="32.5cm" svg:y1="37.5cm" svg:x2="37.5cm" svg:y2="37.5cm">
          <text:p/>
        </draw:line>
        <draw:line draw:style-name="gr38" draw:text-style-name="P4" draw:layer="layout" svg:x1="32.5cm" svg:y1="37.5cm" svg:x2="32.5cm" svg:y2="8.502cm">
          <text:p/>
        </draw:line>
        <draw:custom-shape draw:style-name="gr461" draw:text-style-name="P5" draw:layer="layout" svg:width="0.2cm" svg:height="0.2cm" svg:x="1.407cm" svg:y="28.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5.3cm" svg:y1="28.2cm" svg:x2="45.3cm" svg:y2="28cm">
          <text:p/>
        </draw:line>
        <draw:line draw:style-name="gr38" draw:text-style-name="P4" draw:layer="layout" svg:x1="46.3cm" svg:y1="28.5cm" svg:x2="46.3cm" svg:y2="28cm">
          <text:p/>
        </draw:line>
        <draw:custom-shape draw:style-name="gr461" draw:text-style-name="P5" draw:layer="layout" svg:width="0.2cm" svg:height="0.2cm" svg:x="32.408cm" svg:y="28.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9.8cm" svg:y1="21.2cm" svg:x2="1.5cm" svg:y2="21.2cm">
          <text:p/>
        </draw:line>
        <draw:line draw:style-name="gr38" draw:text-style-name="P4" draw:layer="layout" svg:x1="49.8cm" svg:y1="21.2cm" svg:x2="49.8cm" svg:y2="21cm">
          <text:p/>
        </draw:line>
        <draw:custom-shape draw:style-name="gr461" draw:text-style-name="P5" draw:layer="layout" svg:width="0.2cm" svg:height="0.2cm" svg:x="1.408cm" svg:y="21.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3cm" svg:y1="21.5cm" svg:x2="32.5cm" svg:y2="21.5cm">
          <text:p/>
        </draw:line>
        <draw:custom-shape draw:style-name="gr461" draw:text-style-name="P5" draw:layer="layout" svg:width="0.2cm" svg:height="0.2cm" svg:x="32.409cm" svg:y="21.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3cm" svg:y1="21.5cm" svg:x2="53cm" svg:y2="21cm">
          <text:p/>
        </draw:line>
        <draw:line draw:style-name="gr38" draw:text-style-name="P4" draw:layer="layout" svg:x1="49.301cm" svg:y1="13.201cm" svg:x2="1.502cm" svg:y2="13.2cm">
          <text:p/>
        </draw:line>
        <draw:line draw:style-name="gr38" draw:text-style-name="P4" draw:layer="layout" svg:x1="49.301cm" svg:y1="13.201cm" svg:x2="49.301cm" svg:y2="13.001cm">
          <text:p/>
        </draw:line>
        <draw:custom-shape draw:style-name="gr461" draw:text-style-name="P5" draw:layer="layout" svg:width="0.2cm" svg:height="0.2cm" svg:x="1.409cm" svg:y="13.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2.001cm" svg:y1="13.501cm" svg:x2="32.501cm" svg:y2="13.501cm">
          <text:p/>
        </draw:line>
        <draw:custom-shape draw:style-name="gr461" draw:text-style-name="P5" draw:layer="layout" svg:width="0.2cm" svg:height="0.2cm" svg:x="32.41cm" svg:y="13.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2.001cm" svg:y1="13.501cm" svg:x2="52.001cm" svg:y2="13.001cm">
          <text:p/>
        </draw:line>
        <draw:line draw:style-name="gr38" draw:text-style-name="P4" draw:layer="layout" svg:x1="42.302cm" svg:y1="8.202cm" svg:x2="1.502cm" svg:y2="8.202cm">
          <text:p/>
        </draw:line>
        <draw:line draw:style-name="gr38" draw:text-style-name="P4" draw:layer="layout" svg:x1="42.302cm" svg:y1="8.202cm" svg:x2="42.302cm" svg:y2="8.002cm">
          <text:p/>
        </draw:line>
        <draw:line draw:style-name="gr38" draw:text-style-name="P4" draw:layer="layout" svg:x1="44.602cm" svg:y1="8.502cm" svg:x2="32.502cm" svg:y2="8.502cm">
          <text:p/>
        </draw:line>
        <draw:line draw:style-name="gr38" draw:text-style-name="P4" draw:layer="layout" svg:x1="44.602cm" svg:y1="8.502cm" svg:x2="44.602cm" svg:y2="8.002cm">
          <text:p/>
        </draw:line>
        <draw:line draw:style-name="gr38" draw:text-style-name="P4" draw:layer="layout" svg:x1="33cm" svg:y1="1.5cm" svg:x2="30cm" svg:y2="1.5cm">
          <text:p/>
        </draw:line>
        <draw:line draw:style-name="gr38" draw:text-style-name="P4" draw:layer="layout" svg:x1="30cm" svg:y1="1.5cm" svg:x2="30cm" svg:y2="38cm">
          <text:p/>
        </draw:line>
        <draw:line draw:style-name="gr38" draw:text-style-name="P4" draw:layer="layout" svg:x1="40cm" svg:y1="9.5cm" svg:x2="30cm" svg:y2="9.5cm">
          <text:p/>
        </draw:line>
        <draw:custom-shape draw:style-name="gr461" draw:text-style-name="P5" draw:layer="layout" svg:width="0.2cm" svg:height="0.2cm" svg:x="29.911cm" svg:y="9.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1cm" svg:y1="17.5cm" svg:x2="30cm" svg:y2="17.5cm">
          <text:p/>
        </draw:line>
        <draw:custom-shape draw:style-name="gr461" draw:text-style-name="P5" draw:layer="layout" svg:width="0.2cm" svg:height="0.2cm" svg:x="29.91cm" svg:y="1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6cm" svg:y1="22.5cm" svg:x2="30cm" svg:y2="22.5cm">
          <text:p/>
        </draw:line>
        <draw:custom-shape draw:style-name="gr461" draw:text-style-name="P5" draw:layer="layout" svg:width="0.2cm" svg:height="0.2cm" svg:x="29.91cm" svg:y="22.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0cm" svg:y1="38cm" svg:x2="49.3cm" svg:y2="38cm">
          <text:p/>
        </draw:line>
        <draw:custom-shape draw:style-name="gr461" draw:text-style-name="P5" draw:layer="layout" svg:width="0.2cm" svg:height="0.2cm" svg:x="49.208cm" svg:y="40.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22.014cm" svg:y="20.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58.815cm" svg:y="10.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58.816cm" svg:y="10.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58.817cm" svg:y="9.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58.818cm" svg:y="9.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58.819cm" svg:y="9.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58.82cm" svg:y="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77.121cm" svg:y="6.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74.922cm" svg:y="6.0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72.923cm" svg:y="6.0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502cm" svg:y1="18.8cm" svg:x2="8cm" svg:y2="18.8cm">
          <text:p/>
        </draw:line>
        <draw:custom-shape draw:style-name="gr461" draw:text-style-name="P5" draw:layer="layout" svg:width="0.2cm" svg:height="0.2cm" svg:x="1.409cm" svg:y="18.7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502cm" svg:y1="10.5cm" svg:x2="3cm" svg:y2="10.5cm">
          <text:p/>
        </draw:line>
        <draw:custom-shape draw:style-name="gr461" draw:text-style-name="P5" draw:layer="layout" svg:width="0.2cm" svg:height="0.2cm" svg:x="1.41cm" svg:y="1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42.708cm" svg:y="35.0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44.709cm" svg:y="35.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46.709cm" svg:y="35.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48.71cm" svg:y="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49.711cm" svg:y="28.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46.912cm" svg:y="28.0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40.809cm" svg:y="31.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46.312cm" svg:y="8.0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9" draw:text-style-name="P60" draw:layer="layout" svg:width="2cm" svg:height="0.4cm" svg:x="23.5cm" svg:y="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0" draw:text-style-name="P54" draw:layer="layout" svg:width="3.66cm" svg:height="0.569cm" svg:x="23.04cm" svg:y="10.4cm">
          <draw:text-box>
            <text:p><text:span text:style-name="T14">MRET: Return </text:span><text:span text:style-name="T14">from IRQ</text:span></text:p>
          </draw:text-box>
        </draw:frame>
        <draw:custom-shape draw:style-name="gr729" draw:text-style-name="P60" draw:layer="layout" svg:width="2cm" svg:height="0.4cm" svg:x="31cm" svg:y="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0" draw:text-style-name="P54" draw:layer="layout" svg:width="3.66cm" svg:height="0.569cm" svg:x="30.54cm" svg:y="6.2cm">
          <draw:text-box>
            <text:p><text:span text:style-name="T14">MRET: Return </text:span><text:span text:style-name="T14">from IRQ</text:span></text:p>
          </draw:text-box>
        </draw:frame>
        <draw:custom-shape draw:style-name="gr729" draw:text-style-name="P60" draw:layer="layout" svg:width="2cm" svg:height="0.4cm" svg:x="22.7cm" svg:y="2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1" draw:text-style-name="P54" draw:layer="layout" svg:width="2.547cm" svg:height="0.569cm" svg:x="22.453cm" svg:y="19.7cm">
          <draw:text-box>
            <text:p><text:span text:style-name="T14">Phase: No load</text:span></text:p>
          </draw:text-box>
        </draw:frame>
        <draw:custom-shape draw:style-name="gr729" draw:text-style-name="P60" draw:layer="layout" svg:width="2cm" svg:height="0.4cm" svg:x="39cm" svg:y="34.8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2" draw:text-style-name="P54" draw:layer="layout" svg:width="2.25cm" svg:height="0.569cm" svg:x="38.54cm" svg:y="34.301cm">
          <draw:text-box>
            <text:p><text:span text:style-name="T14">TRAP: Illegal</text:span></text:p>
          </draw:text-box>
        </draw:frame>
        <draw:custom-shape draw:style-name="gr729" draw:text-style-name="P60" draw:layer="layout" svg:width="2cm" svg:height="0.4cm" svg:x="39.001cm" svg:y="33.8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3" draw:text-style-name="P54" draw:layer="layout" svg:width="2.911cm" svg:height="0.569cm" svg:x="38.541cm" svg:y="33.302cm">
          <draw:text-box>
            <text:p><text:span text:style-name="T14">TRAP: </text:span><text:span text:style-name="T14">Misaligned</text:span></text:p>
          </draw:text-box>
        </draw:frame>
        <draw:custom-shape draw:style-name="gr729" draw:text-style-name="P60" draw:layer="layout" svg:width="2cm" svg:height="0.4cm" svg:x="39.002cm" svg:y="29.8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4" draw:text-style-name="P54" draw:layer="layout" svg:width="2.564cm" svg:height="0.569cm" svg:x="38.542cm" svg:y="29.303cm">
          <draw:text-box>
            <text:p><text:span text:style-name="T14">TRAP: Pending</text:span></text:p>
          </draw:text-box>
        </draw:frame>
        <draw:custom-shape draw:style-name="gr729" draw:text-style-name="P60" draw:layer="layout" svg:width="2cm" svg:height="0.4cm" svg:x="34cm" svg:y="27.8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2" draw:text-style-name="P54" draw:layer="layout" svg:width="2.25cm" svg:height="0.569cm" svg:x="33.54cm" svg:y="27.303cm">
          <draw:text-box>
            <text:p><text:span text:style-name="T14">TRAP: Illegal</text:span></text:p>
          </draw:text-box>
        </draw:frame>
        <draw:custom-shape draw:style-name="gr729" draw:text-style-name="P60" draw:layer="layout" svg:width="2cm" svg:height="0.4cm" svg:x="34.001cm" svg:y="26.8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3" draw:text-style-name="P54" draw:layer="layout" svg:width="2.911cm" svg:height="0.569cm" svg:x="33.541cm" svg:y="26.304cm">
          <draw:text-box>
            <text:p><text:span text:style-name="T14">TRAP: </text:span><text:span text:style-name="T14">Misaligned</text:span></text:p>
          </draw:text-box>
        </draw:frame>
        <draw:custom-shape draw:style-name="gr729" draw:text-style-name="P60" draw:layer="layout" svg:width="2cm" svg:height="0.4cm" svg:x="51.001cm" svg:y="57.4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2" draw:text-style-name="P54" draw:layer="layout" svg:width="2.25cm" svg:height="0.569cm" svg:x="50.541cm" svg:y="56.902cm">
          <draw:text-box>
            <text:p><text:span text:style-name="T14">TRAP: Illegal</text:span></text:p>
          </draw:text-box>
        </draw:frame>
        <draw:custom-shape draw:style-name="gr729" draw:text-style-name="P60" draw:layer="layout" svg:width="2cm" svg:height="0.4cm" svg:x="64.002cm" svg:y="1.8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4" draw:text-style-name="P54" draw:layer="layout" svg:width="2.564cm" svg:height="0.569cm" svg:x="63.542cm" svg:y="1.304cm">
          <draw:text-box>
            <text:p><text:span text:style-name="T14">TRAP: Pending</text:span></text:p>
          </draw:text-box>
        </draw:frame>
        <draw:custom-shape draw:style-name="gr729" draw:text-style-name="P60" draw:layer="layout" svg:width="2cm" svg:height="0.4cm" svg:x="39.001cm" svg:y="32.8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5" draw:text-style-name="P54" draw:layer="layout" svg:width="2.369cm" svg:height="0.569cm" svg:x="38.541cm" svg:y="32.302cm">
          <draw:text-box>
            <text:p><text:span text:style-name="T14">DMEM: Rd/Wr</text:span></text:p>
          </draw:text-box>
        </draw:frame>
        <draw:custom-shape draw:style-name="gr729" draw:text-style-name="P60" draw:layer="layout" svg:width="2cm" svg:height="0.4cm" svg:x="70.402cm" svg:y="8.8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3" draw:text-style-name="P54" draw:layer="layout" svg:width="2.911cm" svg:height="0.569cm" svg:x="69.942cm" svg:y="8.305cm">
          <draw:text-box>
            <text:p><text:span text:style-name="T14">TRAP: </text:span><text:span text:style-name="T14">Misaligned</text:span></text:p>
          </draw:text-box>
        </draw:frame>
        <draw:custom-shape draw:style-name="gr729" draw:text-style-name="P60" draw:layer="layout" svg:width="2cm" svg:height="0.4cm" svg:x="65.203cm" svg:y="3.8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3" draw:text-style-name="P54" draw:layer="layout" svg:width="2.911cm" svg:height="0.569cm" svg:x="64.743cm" svg:y="3.306cm">
          <draw:text-box>
            <text:p><text:span text:style-name="T14">TRAP: </text:span><text:span text:style-name="T14">Misaligned</text:span></text:p>
          </draw:text-box>
        </draw:frame>
        <draw:custom-shape draw:style-name="gr729" draw:text-style-name="P60" draw:layer="layout" svg:width="2cm" svg:height="0.4cm" svg:x="80.002cm" svg:y="1.8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6" draw:text-style-name="P54" draw:layer="layout" svg:width="2.255cm" svg:height="0.569cm" svg:x="79.542cm" svg:y="1.305cm">
          <draw:text-box>
            <text:p><text:span text:style-name="T14">TRAP: Taken</text:span></text:p>
          </draw:text-box>
        </draw:frame>
        <draw:custom-shape draw:style-name="gr729" draw:text-style-name="P60" draw:layer="layout" svg:width="2cm" svg:height="0.4cm" svg:x="65.2cm" svg:y="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1" draw:text-style-name="P54" draw:layer="layout" svg:width="2.547cm" svg:height="0.569cm" svg:x="64.953cm" svg:y="4.2cm">
          <draw:text-box>
            <text:p><text:span text:style-name="T14">Phase: No load</text:span></text:p>
          </draw:text-box>
        </draw:frame>
        <draw:custom-shape draw:style-name="gr729" draw:text-style-name="P60" draw:layer="layout" svg:width="2cm" svg:height="0.4cm" svg:x="65.2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2" draw:text-style-name="P54" draw:layer="layout" svg:width="2.25cm" svg:height="0.569cm" svg:x="64.74cm" svg:y="5.3cm">
          <draw:text-box>
            <text:p><text:span text:style-name="T14">TRAP: Illegal</text:span></text:p>
          </draw:text-box>
        </draw:frame>
        <draw:custom-shape draw:style-name="gr729" draw:text-style-name="P60" draw:layer="layout" svg:width="2cm" svg:height="0.4cm" svg:x="65.2cm" svg:y="6.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7" draw:text-style-name="P54" draw:layer="layout" svg:width="3.757cm" svg:height="0.569cm" svg:x="64.74cm" svg:y="6.101cm">
          <draw:text-box>
            <text:p><text:span text:style-name="T14">MRET: !Return </text:span><text:span text:style-name="T14">from IRQ</text:span></text:p>
          </draw:text-box>
        </draw:frame>
        <draw:custom-shape draw:style-name="gr729" draw:text-style-name="P60" draw:layer="layout" svg:width="2cm" svg:height="0.4cm" svg:x="4.96cm" svg:y="4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0" draw:text-style-name="P54" draw:layer="layout" svg:width="3.66cm" svg:height="0.569cm" svg:x="4.5cm" svg:y="45.2cm">
          <draw:text-box>
            <text:p><text:span text:style-name="T14">MRET: Return </text:span><text:span text:style-name="T14">from IRQ</text:span></text:p>
          </draw:text-box>
        </draw:frame>
        <draw:custom-shape draw:style-name="gr729" draw:text-style-name="P60" draw:layer="layout" svg:width="2cm" svg:height="0.4cm" svg:x="23cm" svg:y="4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0" draw:text-style-name="P54" draw:layer="layout" svg:width="3.66cm" svg:height="0.569cm" svg:x="22.54cm" svg:y="44.2cm">
          <draw:text-box>
            <text:p><text:span text:style-name="T14">MRET: Return </text:span><text:span text:style-name="T14">from IRQ</text:span></text:p>
          </draw:text-box>
        </draw:frame>
        <draw:custom-shape draw:style-name="gr729" draw:text-style-name="P60" draw:layer="layout" svg:width="2cm" svg:height="0.4cm" svg:x="23cm" svg:y="4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6" draw:text-style-name="P54" draw:layer="layout" svg:width="2.255cm" svg:height="0.569cm" svg:x="22.54cm" svg:y="45.3cm">
          <draw:text-box>
            <text:p><text:span text:style-name="T14">TRAP: Taken</text:span></text:p>
          </draw:text-box>
        </draw:frame>
        <draw:custom-shape draw:style-name="gr729" draw:text-style-name="P60" draw:layer="layout" svg:width="2cm" svg:height="0.4cm" svg:x="39.001cm" svg:y="31.8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6" draw:text-style-name="P54" draw:layer="layout" svg:width="2.255cm" svg:height="0.569cm" svg:x="38.541cm" svg:y="31.301cm">
          <draw:text-box>
            <text:p><text:span text:style-name="T14">TRAP: Taken</text:span></text:p>
          </draw:text-box>
        </draw:frame>
        <draw:custom-shape draw:style-name="gr729" draw:text-style-name="P60" draw:layer="layout" svg:width="2cm" svg:height="0.4cm" svg:x="34.002cm" svg:y="25.8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6" draw:text-style-name="P54" draw:layer="layout" svg:width="2.255cm" svg:height="0.569cm" svg:x="33.542cm" svg:y="25.302cm">
          <draw:text-box>
            <text:p><text:span text:style-name="T14">TRAP: Taken</text:span></text:p>
          </draw:text-box>
        </draw:frame>
        <draw:custom-shape draw:style-name="gr544" draw:text-style-name="P46" draw:layer="layout" svg:width="0.2cm" svg:height="0.2cm" svg:x="50.712cm" svg:y="28.0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50.711cm" svg:y="35.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9" draw:text-style-name="P60" draw:layer="layout" svg:width="2cm" svg:height="0.4cm" svg:x="31.003cm" svg:y="5.8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6" draw:text-style-name="P54" draw:layer="layout" svg:width="2.255cm" svg:height="0.569cm" svg:x="30.543cm" svg:y="5.303cm">
          <draw:text-box>
            <text:p><text:span text:style-name="T14">TRAP: Taken</text:span></text:p>
          </draw:text-box>
        </draw:frame>
        <draw:custom-shape draw:style-name="gr544" draw:text-style-name="P46" draw:layer="layout" svg:width="0.2cm" svg:height="0.2cm" svg:x="50.713cm" svg:y="8.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79.722cm" svg:y="3.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9" draw:text-style-name="P60" draw:layer="layout" svg:width="2cm" svg:height="0.4cm" svg:x="5.003cm" svg:y="46.8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6" draw:text-style-name="P54" draw:layer="layout" svg:width="2.255cm" svg:height="0.569cm" svg:x="4.543cm" svg:y="46.303cm">
          <draw:text-box>
            <text:p><text:span text:style-name="T14">TRAP: Taken</text:span></text:p>
          </draw:text-box>
        </draw:frame>
        <draw:custom-shape draw:style-name="gr729" draw:text-style-name="P60" draw:layer="layout" svg:width="2cm" svg:height="0.4cm" svg:x="39.5cm" svg:y="49.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1" draw:text-style-name="P54" draw:layer="layout" svg:width="2.547cm" svg:height="0.569cm" svg:x="39.253cm" svg:y="49.2cm">
          <draw:text-box>
            <text:p><text:span text:style-name="T14">Phase: No load</text:span></text:p>
          </draw:text-box>
        </draw:frame>
        <draw:custom-shape draw:style-name="gr729" draw:text-style-name="P60" draw:layer="layout" svg:width="2cm" svg:height="0.4cm" svg:x="39.5cm" svg:y="4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8" draw:text-style-name="P54" draw:layer="layout" svg:width="2.348cm" svg:height="0.569cm" svg:x="39.04cm" svg:y="48.3cm">
          <draw:text-box>
            <text:p><text:span text:style-name="T14">TRAP: !Taken</text:span></text:p>
          </draw:text-box>
        </draw:frame>
        <draw:custom-shape draw:style-name="gr729" draw:text-style-name="P60" draw:layer="layout" svg:width="2cm" svg:height="0.4cm" svg:x="51cm" svg:y="5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5" draw:text-style-name="P54" draw:layer="layout" svg:width="2.369cm" svg:height="0.569cm" svg:x="50.54cm" svg:y="55.8cm">
          <draw:text-box>
            <text:p><text:span text:style-name="T14">DMEM: Rd/Wr</text:span></text:p>
          </draw:text-box>
        </draw:frame>
        <draw:frame draw:style-name="gr739" draw:text-style-name="P54" draw:layer="layout" svg:width="4.439cm" svg:height="0.569cm" svg:x="13.2cm" svg:y="42.5cm">
          <draw:text-box>
            <text:p><text:span text:style-name="T14">fetch0: set </text:span><text:span text:style-name="T14">address for I-</text:span><text:span text:style-name="T14">Mem</text:span></text:p>
          </draw:text-box>
        </draw:frame>
        <draw:frame draw:style-name="gr740" draw:text-style-name="P54" draw:layer="layout" svg:width="4.202cm" svg:height="0.569cm" svg:x="31.9cm" svg:y="48cm">
          <draw:text-box>
            <text:p><text:span text:style-name="T14">fetch1: get data </text:span><text:span text:style-name="T14">from I-Mem</text:span></text:p>
          </draw:text-box>
        </draw:frame>
        <draw:frame draw:style-name="gr741" draw:text-style-name="P54" draw:layer="layout" svg:width="3.465cm" svg:height="0.887cm" svg:x="66.535cm" svg:y="47.213cm">
          <draw:text-box>
            <text:p><text:span text:style-name="T14">exec: execute &amp; </text:span><text:span text:style-name="T14">write </text:span></text:p>
            <text:p><text:span text:style-name="T14">data to D-Mem</text:span></text:p>
          </draw:text-box>
        </draw:frame>
        <draw:frame draw:style-name="gr742" draw:text-style-name="P54" draw:layer="layout" svg:width="2.217cm" svg:height="0.569cm" svg:x="16.4cm" svg:y="18.431cm">
          <draw:text-box>
            <text:p><text:span text:style-name="T14">No load path</text:span></text:p>
          </draw:text-box>
        </draw:frame>
        <draw:frame draw:style-name="gr743" draw:text-style-name="P54" draw:layer="layout" svg:width="5.451cm" svg:height="0.569cm" svg:x="12.8cm" svg:y="20.531cm">
          <draw:text-box>
            <text:p><text:span text:style-name="T14">Load path: load </text:span><text:span text:style-name="T14">is over, now </text:span><text:span text:style-name="T14">execute</text:span></text:p>
          </draw:text-box>
        </draw:frame>
        <draw:custom-shape draw:style-name="gr729" draw:text-style-name="P60" draw:layer="layout" svg:width="2cm" svg:height="0.4cm" svg:x="22cm" svg:y="4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44" draw:text-style-name="P54" draw:layer="layout" svg:width="3.304cm" svg:height="0.569cm" svg:x="21.5cm" svg:y="48.3cm">
          <draw:text-box>
            <text:p><text:span text:style-name="T14">Instr: Before </text:span><text:span text:style-name="T14">register</text:span></text:p>
          </draw:text-box>
        </draw:frame>
        <draw:custom-shape draw:style-name="gr729" draw:text-style-name="P60" draw:layer="layout" svg:width="2cm" svg:height="0.4cm" svg:x="34.96cm" svg:y="4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45" draw:text-style-name="P54" draw:layer="layout" svg:width="2.424cm" svg:height="0.569cm" svg:x="34.5cm" svg:y="44.3cm">
          <draw:text-box>
            <text:p><text:span text:style-name="T14">Instr: Register</text:span></text:p>
          </draw:text-box>
        </draw:frame>
        <draw:custom-shape draw:style-name="gr729" draw:text-style-name="P60" draw:layer="layout" svg:width="2cm" svg:height="0.4cm" svg:x="1.962cm" svg:y="1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44" draw:text-style-name="P54" draw:layer="layout" svg:width="3.304cm" svg:height="0.569cm" svg:x="1.502cm" svg:y="11.3cm">
          <draw:text-box>
            <text:p><text:span text:style-name="T14">Instr: Before </text:span><text:span text:style-name="T14">register</text:span></text:p>
          </draw:text-box>
        </draw:frame>
        <draw:custom-shape draw:style-name="gr729" draw:text-style-name="P60" draw:layer="layout" svg:width="2cm" svg:height="0.4cm" svg:x="1.962cm" svg:y="9.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45" draw:text-style-name="P54" draw:layer="layout" svg:width="2.424cm" svg:height="0.569cm" svg:x="1.502cm" svg:y="9.3cm">
          <draw:text-box>
            <text:p><text:span text:style-name="T14">Instr: Register</text:span></text:p>
          </draw:text-box>
        </draw:frame>
        <draw:frame draw:style-name="gr746" draw:text-style-name="P61" draw:layer="layout" svg:width="4.63cm" svg:height="0.965cm" svg:x="11.2cm" svg:y="41.4cm">
          <draw:text-box>
            <text:p><text:span text:style-name="T18">When a „branch taken“ </text:span><text:span text:style-name="T18">has been detected,, </text:span></text:p>
            <text:p><text:span text:style-name="T18">the new address will be </text:span><text:span text:style-name="T18">Pcbr otherwise the </text:span></text:p>
            <text:p><text:span text:style-name="T18">next instruction in the I-</text:span><text:span text:style-name="T18">Mem will be taken.</text:span></text:p>
          </draw:text-box>
        </draw:frame>
        <draw:frame draw:style-name="gr746" draw:text-style-name="P61" draw:layer="layout" svg:width="4.63cm" svg:height="0.965cm" svg:x="12.999cm" svg:y="43.335cm">
          <draw:text-box>
            <text:p><text:span text:style-name="T18">When a „return from </text:span><text:span text:style-name="T18">interrupt“ is registered, </text:span></text:p>
            <text:p><text:span text:style-name="T18">the new address will be </text:span><text:span text:style-name="T18">the return address, </text:span></text:p>
            <text:p><text:span text:style-name="T18">which was stored in </text:span><text:span text:style-name="T18">register MEPC.</text:span></text:p>
          </draw:text-box>
        </draw:frame>
        <draw:frame draw:style-name="gr747" draw:text-style-name="P61" draw:layer="layout" svg:width="4.392cm" svg:height="0.965cm" svg:x="13.8cm" svg:y="44.7cm">
          <draw:text-box>
            <text:p><text:span text:style-name="T18">When a „trap taken“ is </text:span><text:span text:style-name="T18">registered, </text:span></text:p>
            <text:p><text:span text:style-name="T18">the new address will be </text:span><text:span text:style-name="T18">the ISR address, </text:span></text:p>
            <text:p><text:span text:style-name="T18">which was stored in </text:span><text:span text:style-name="T18">register MTVEC.</text:span></text:p>
          </draw:text-box>
        </draw:frame>
        <draw:g draw:style-name="gr1">
          <draw:custom-shape draw:style-name="gr165" draw:text-style-name="P14" draw:layer="layout" svg:width="0.4cm" svg:height="0.4cm" svg:x="20.5cm" svg:y="48.1cm">
            <text:p/>
            <draw:enhanced-geometry svg:viewBox="0 0 21600 21600" draw:type="rectangle" draw:enhanced-path="M 0 0 L 21600 0 21600 21600 0 21600 0 0 Z N"/>
          </draw:custom-shape>
          <draw:line draw:style-name="gr38" draw:text-style-name="P4" draw:layer="layout" svg:x1="20.5cm" svg:y1="48.1cm" svg:x2="20.9cm" svg:y2="48.5cm">
            <text:p/>
          </draw:line>
          <draw:line draw:style-name="gr38" draw:text-style-name="P4" draw:layer="layout" svg:x1="20.5cm" svg:y1="48.5cm" svg:x2="20.9cm" svg:y2="48.1cm">
            <text:p/>
          </draw:line>
        </draw:g>
        <draw:frame draw:style-name="gr748" draw:text-style-name="P37" draw:layer="layout" svg:width="1.967cm" svg:height="0.569cm" svg:x="19.833cm" svg:y="47.632cm">
          <draw:text-box>
            <text:p><text:span text:style-name="T10">iBusAddr_o</text:span></text:p>
          </draw:text-box>
        </draw:frame>
        <draw:frame draw:style-name="gr557" draw:text-style-name="P37" draw:layer="layout" svg:width="2.314cm" svg:height="0.569cm" svg:x="22.986cm" svg:y="47.031cm">
          <draw:text-box>
            <text:p><text:span text:style-name="T10">iBusDataRd_i</text:span></text:p>
          </draw:text-box>
        </draw:frame>
        <draw:g draw:style-name="gr1">
          <draw:custom-shape draw:style-name="gr165" draw:text-style-name="P14" draw:layer="layout" svg:width="0.4cm" svg:height="0.4cm" svg:x="22.8cm" svg:y="47.5cm">
            <text:p/>
            <draw:enhanced-geometry svg:viewBox="0 0 21600 21600" draw:type="rectangle" draw:enhanced-path="M 0 0 L 21600 0 21600 21600 0 21600 0 0 Z N"/>
          </draw:custom-shape>
          <draw:line draw:style-name="gr38" draw:text-style-name="P4" draw:layer="layout" svg:x1="22.8cm" svg:y1="47.5cm" svg:x2="23.2cm" svg:y2="47.9cm">
            <text:p/>
          </draw:line>
          <draw:line draw:style-name="gr38" draw:text-style-name="P4" draw:layer="layout" svg:x1="22.8cm" svg:y1="47.9cm" svg:x2="23.2cm" svg:y2="47.5cm">
            <text:p/>
          </draw:line>
        </draw:g>
        <draw:custom-shape draw:style-name="gr749" draw:text-style-name="P4" draw:layer="layout" svg:width="2.3cm" svg:height="3.7cm" svg:x="20.7cm" svg:y="46.7cm">
          <text:p/>
          <draw:enhanced-geometry svg:viewBox="0 0 21600 21600" draw:type="rectangle" draw:enhanced-path="M 0 0 L 21600 0 21600 21600 0 21600 0 0 Z N"/>
        </draw:custom-shape>
        <draw:frame draw:style-name="gr750" draw:text-style-name="P44" draw:layer="layout" svg:width="1.967cm" svg:height="0.887cm" svg:x="20.833cm" svg:y="46.8cm">
          <draw:text-box>
            <text:p><text:span text:style-name="T12">I-Mem:</text:span></text:p>
            <text:p><text:span text:style-name="T12">- on Top</text:span></text:p>
          </draw:text-box>
        </draw:frame>
        <draw:g draw:style-name="gr1">
          <draw:custom-shape draw:style-name="gr165" draw:text-style-name="P14" draw:layer="layout" svg:width="0.4cm" svg:height="0.4cm" svg:x="65.8cm" svg:y="45.3cm">
            <text:p/>
            <draw:enhanced-geometry svg:viewBox="0 0 21600 21600" draw:type="rectangle" draw:enhanced-path="M 0 0 L 21600 0 21600 21600 0 21600 0 0 Z N"/>
          </draw:custom-shape>
          <draw:line draw:style-name="gr38" draw:text-style-name="P4" draw:layer="layout" svg:x1="65.8cm" svg:y1="45.3cm" svg:x2="66.2cm" svg:y2="45.7cm">
            <text:p/>
          </draw:line>
          <draw:line draw:style-name="gr38" draw:text-style-name="P4" draw:layer="layout" svg:x1="65.8cm" svg:y1="45.7cm" svg:x2="66.2cm" svg:y2="45.3cm">
            <text:p/>
          </draw:line>
        </draw:g>
        <draw:frame draw:style-name="gr720" draw:text-style-name="P37" draw:layer="layout" svg:width="2.06cm" svg:height="0.569cm" svg:x="63.9cm" svg:y="44.931cm">
          <draw:text-box>
            <text:p><text:span text:style-name="T10">dBusAddr_o</text:span></text:p>
          </draw:text-box>
        </draw:frame>
        <draw:frame draw:style-name="gr611" draw:text-style-name="P37" draw:layer="layout" svg:width="2.331cm" svg:height="0.569cm" svg:x="69.969cm" svg:y="45.831cm">
          <draw:text-box>
            <text:p><text:span text:style-name="T10">dBusDataRd_i</text:span></text:p>
          </draw:text-box>
        </draw:frame>
        <draw:g draw:style-name="gr1">
          <draw:custom-shape draw:style-name="gr165" draw:text-style-name="P14" draw:layer="layout" svg:width="0.4cm" svg:height="0.4cm" svg:x="69.783cm" svg:y="46.3cm">
            <text:p/>
            <draw:enhanced-geometry svg:viewBox="0 0 21600 21600" draw:type="rectangle" draw:enhanced-path="M 0 0 L 21600 0 21600 21600 0 21600 0 0 Z N"/>
          </draw:custom-shape>
          <draw:line draw:style-name="gr38" draw:text-style-name="P4" draw:layer="layout" svg:x1="69.783cm" svg:y1="46.3cm" svg:x2="70.183cm" svg:y2="46.7cm">
            <text:p/>
          </draw:line>
          <draw:line draw:style-name="gr38" draw:text-style-name="P4" draw:layer="layout" svg:x1="69.783cm" svg:y1="46.7cm" svg:x2="70.183cm" svg:y2="46.3cm">
            <text:p/>
          </draw:line>
        </draw:g>
        <draw:frame draw:style-name="gr751" draw:text-style-name="P37" draw:layer="layout" svg:width="2.42cm" svg:height="0.569cm" svg:x="63.58cm" svg:y="45.931cm">
          <draw:text-box>
            <text:p><text:span text:style-name="T10">dBusDataWr_o</text:span></text:p>
          </draw:text-box>
        </draw:frame>
        <draw:g draw:style-name="gr1">
          <draw:custom-shape draw:style-name="gr165" draw:text-style-name="P14" draw:layer="layout" svg:width="0.4cm" svg:height="0.4cm" svg:x="65.8cm" svg:y="47.3cm">
            <text:p/>
            <draw:enhanced-geometry svg:viewBox="0 0 21600 21600" draw:type="rectangle" draw:enhanced-path="M 0 0 L 21600 0 21600 21600 0 21600 0 0 Z N"/>
          </draw:custom-shape>
          <draw:line draw:style-name="gr38" draw:text-style-name="P4" draw:layer="layout" svg:x1="65.8cm" svg:y1="47.3cm" svg:x2="66.2cm" svg:y2="47.7cm">
            <text:p/>
          </draw:line>
          <draw:line draw:style-name="gr38" draw:text-style-name="P4" draw:layer="layout" svg:x1="65.8cm" svg:y1="47.7cm" svg:x2="66.2cm" svg:y2="47.3cm">
            <text:p/>
          </draw:line>
        </draw:g>
        <draw:frame draw:style-name="gr675" draw:text-style-name="P37" draw:layer="layout" svg:width="1.95cm" svg:height="0.569cm" svg:x="64.1cm" svg:y="46.932cm">
          <draw:text-box>
            <text:p><text:span text:style-name="T10">dBusWe_o</text:span></text:p>
          </draw:text-box>
        </draw:frame>
        <draw:line draw:style-name="gr38" draw:text-style-name="P4" draw:layer="layout" svg:x1="62.5cm" svg:y1="46.5cm" svg:x2="66cm" svg:y2="46.5cm">
          <text:p/>
        </draw:line>
        <draw:g draw:style-name="gr1">
          <draw:custom-shape draw:style-name="gr165" draw:text-style-name="P14" draw:layer="layout" svg:width="0.4cm" svg:height="0.4cm" svg:x="65.8cm" svg:y="46.3cm">
            <text:p/>
            <draw:enhanced-geometry svg:viewBox="0 0 21600 21600" draw:type="rectangle" draw:enhanced-path="M 0 0 L 21600 0 21600 21600 0 21600 0 0 Z N"/>
          </draw:custom-shape>
          <draw:line draw:style-name="gr38" draw:text-style-name="P4" draw:layer="layout" svg:x1="65.8cm" svg:y1="46.3cm" svg:x2="66.2cm" svg:y2="46.7cm">
            <text:p/>
          </draw:line>
          <draw:line draw:style-name="gr38" draw:text-style-name="P4" draw:layer="layout" svg:x1="65.8cm" svg:y1="46.7cm" svg:x2="66.2cm" svg:y2="46.3cm">
            <text:p/>
          </draw:line>
        </draw:g>
        <draw:frame draw:style-name="gr389" draw:text-style-name="P40" draw:layer="layout" svg:width="4.308cm" svg:height="0.57cm" svg:x="59.9cm" svg:y="47cm">
          <draw:text-box>
            <text:p><text:span text:style-name="T10">dMemWr_s &amp;&amp; </text:span><text:span text:style-name="T13">exec_phase_s</text:span></text:p>
          </draw:text-box>
        </draw:frame>
        <draw:custom-shape draw:style-name="gr752" draw:text-style-name="P4" draw:layer="layout" svg:width="4cm" svg:height="3.7cm" svg:x="66cm" svg:y="45cm">
          <text:p/>
          <draw:enhanced-geometry svg:viewBox="0 0 21600 21600" draw:type="rectangle" draw:enhanced-path="M 0 0 L 21600 0 21600 21600 0 21600 0 0 Z N"/>
        </draw:custom-shape>
        <draw:frame draw:style-name="gr750" draw:text-style-name="P44" draw:layer="layout" svg:width="1.967cm" svg:height="0.887cm" svg:x="66.133cm" svg:y="45.1cm">
          <draw:text-box>
            <text:p><text:span text:style-name="T12">D-Mem:</text:span></text:p>
            <text:p><text:span text:style-name="T12">- on Top</text:span></text:p>
          </draw:text-box>
        </draw:frame>
        <draw:line draw:style-name="gr38" draw:text-style-name="P4" draw:layer="layout" svg:x1="70cm" svg:y1="46.5cm" svg:x2="76cm" svg:y2="46.5cm">
          <text:p/>
        </draw:line>
        <draw:custom-shape draw:style-name="gr688" draw:text-style-name="P59" draw:layer="layout" svg:width="1cm" svg:height="1cm" svg:x="7cm" svg:y="42cm">
          <text:p text:style-name="P35"><text:span text:style-name="T10">+4</text:span></text:p>
          <draw:enhanced-geometry svg:viewBox="0 0 21600 21600" draw:type="rectangle" draw:enhanced-path="M 0 0 L 21600 0 21600 21600 0 21600 0 0 Z N"/>
        </draw:custom-shape>
        <draw:line draw:style-name="gr38" draw:text-style-name="P4" draw:layer="layout" svg:x1="6cm" svg:y1="42.5cm" svg:x2="7cm" svg:y2="42.5cm">
          <text:p/>
        </draw:line>
        <draw:frame draw:style-name="gr632" draw:text-style-name="P37" draw:layer="layout" svg:width="1.446cm" svg:height="0.569cm" svg:x="5.8cm" svg:y="42.032cm">
          <draw:text-box>
            <text:p><text:span text:style-name="T10">PCbr_s</text:span></text:p>
          </draw:text-box>
        </draw:frame>
        <draw:polygon draw:style-name="gr58" draw:text-style-name="P1" draw:layer="layout" svg:width="0.499cm" svg:height="0.999cm" svg:x="18.3cm" svg:y="50cm" svg:viewBox="0 0 500 1000" draw:points="0,0 0,1000 500,850 500,150">
          <text:p/>
        </draw:polygon>
        <draw:line draw:style-name="gr146" draw:text-style-name="P4" draw:layer="layout" svg:x1="18.601cm" svg:y1="51.501cm" svg:x2="18.6cm" svg:y2="50.901cm">
          <text:p/>
        </draw:line>
        <draw:line draw:style-name="gr38" draw:text-style-name="P4" draw:layer="layout" svg:x1="18cm" svg:y1="51.5cm" svg:x2="18.6cm" svg:y2="51.5cm">
          <text:p/>
        </draw:line>
        <draw:frame draw:style-name="gr753" draw:text-style-name="P37" draw:layer="layout" svg:width="3.876cm" svg:height="0.569cm" svg:x="14.9cm" svg:y="51.031cm">
          <draw:text-box>
            <text:p><text:span text:style-name="T13">fetch0_phase_s</text:span><text:span text:style-name="T10"> </text:span><text:span text:style-name="T10">&amp;&amp; take_s</text:span></text:p>
          </draw:text-box>
        </draw:frame>
        <draw:frame draw:style-name="gr632" draw:text-style-name="P37" draw:layer="layout" svg:width="1.446cm" svg:height="0.569cm" svg:x="17cm" svg:y="49.831cm">
          <draw:text-box>
            <text:p><text:span text:style-name="T10">PCbr_s</text:span></text:p>
          </draw:text-box>
        </draw:frame>
        <draw:frame draw:style-name="gr754" draw:text-style-name="P37" draw:layer="layout" svg:width="1.2cm" svg:height="0.569cm" svg:x="17.3cm" svg:y="50.232cm">
          <draw:text-box>
            <text:p><text:span text:style-name="T10">PC_s</text:span></text:p>
          </draw:text-box>
        </draw:frame>
        <draw:line draw:style-name="gr38" draw:text-style-name="P4" draw:layer="layout" svg:x1="17.3cm" svg:y1="50.3cm" svg:x2="18.3cm" svg:y2="50.3cm">
          <text:p/>
        </draw:line>
        <draw:line draw:style-name="gr38" draw:text-style-name="P4" draw:layer="layout" svg:x1="17.3cm" svg:y1="50.7cm" svg:x2="18.3cm" svg:y2="50.7cm">
          <text:p/>
        </draw:line>
        <draw:line draw:style-name="gr38" draw:text-style-name="P4" draw:layer="layout" svg:x1="16cm" svg:y1="50.7cm" svg:x2="17.3cm" svg:y2="50.7cm">
          <text:p/>
        </draw:line>
        <draw:line draw:style-name="gr38" draw:text-style-name="P4" draw:layer="layout" svg:x1="16cm" svg:y1="49.6cm" svg:x2="18.5cm" svg:y2="49.6cm">
          <text:p/>
        </draw:line>
        <draw:line draw:style-name="gr38" draw:text-style-name="P4" draw:layer="layout" svg:x1="18.5cm" svg:y1="43.7cm" svg:x2="18.5cm" svg:y2="49.6cm">
          <text:p/>
        </draw:line>
        <draw:line draw:style-name="gr38" draw:text-style-name="P4" draw:layer="layout" svg:x1="18cm" svg:y1="48.3cm" svg:x2="18.5cm" svg:y2="48.3cm">
          <text:p/>
        </draw:line>
        <draw:line draw:style-name="gr38" draw:text-style-name="P4" draw:layer="layout" svg:x1="16cm" svg:y1="49.6cm" svg:x2="16cm" svg:y2="50.7cm">
          <text:p/>
        </draw:line>
        <draw:line draw:style-name="gr38" draw:text-style-name="P4" draw:layer="layout" svg:x1="18.8cm" svg:y1="50.5cm" svg:x2="19cm" svg:y2="50.5cm">
          <text:p/>
        </draw:line>
        <draw:line draw:style-name="gr38" draw:text-style-name="P4" draw:layer="layout" svg:x1="19cm" svg:y1="52.2cm" svg:x2="19cm" svg:y2="48.3cm">
          <text:p/>
        </draw:line>
        <draw:g draw:style-name="gr1">
          <draw:custom-shape draw:style-name="gr550" draw:text-style-name="P48" draw:layer="layout" svg:width="0.5cm" svg:height="1cm" svg:x="19.5cm" svg:y="52cm">
            <text:p/>
            <draw:enhanced-geometry svg:viewBox="0 0 21600 21600" draw:mirror-horizontal="false" draw:mirror-vertical="false" draw:type="rectangle" draw:enhanced-path="M 0 0 L 21600 0 21600 21600 0 21600 0 0 Z N"/>
          </draw:custom-shape>
          <draw:line draw:style-name="gr230" draw:text-style-name="P24" draw:layer="layout" svg:x1="19.5cm" svg:y1="52.95cm" svg:x2="19.65cm" svg:y2="52.9cm">
            <text:p/>
          </draw:line>
          <draw:line draw:style-name="gr230" draw:text-style-name="P24" draw:layer="layout" svg:x1="19.5cm" svg:y1="52.85cm" svg:x2="19.65cm" svg:y2="52.9cm">
            <text:p/>
          </draw:line>
          <draw:frame draw:style-name="gr685" draw:text-style-name="P37" draw:layer="layout" svg:width="0.815cm" svg:height="0.569cm" svg:x="19.3cm" svg:y="52.331cm">
            <draw:text-box>
              <text:p><text:span text:style-name="T10">en</text:span></text:p>
            </draw:text-box>
          </draw:frame>
          <draw:frame draw:style-name="gr555" draw:text-style-name="P37" draw:layer="layout" svg:width="0.659cm" svg:height="0.569cm" svg:x="19.3cm" svg:y="51.931cm">
            <draw:text-box>
              <text:p><text:span text:style-name="T10">d</text:span></text:p>
            </draw:text-box>
          </draw:frame>
        </draw:g>
        <draw:frame draw:style-name="gr561" draw:text-style-name="P51" draw:layer="layout" svg:width="2.504cm" svg:height="0.569cm" svg:x="17.196cm" svg:y="52.231cm">
          <draw:text-box>
            <text:p><text:span text:style-name="T13">fetch0_phase_s</text:span></text:p>
          </draw:text-box>
        </draw:frame>
        <draw:line draw:style-name="gr38" draw:text-style-name="P4" draw:layer="layout" svg:x1="19cm" svg:y1="52.7cm" svg:x2="19.5cm" svg:y2="52.7cm">
          <text:p/>
        </draw:line>
        <draw:line draw:style-name="gr38" draw:text-style-name="P4" draw:layer="layout" svg:x1="19cm" svg:y1="52.2cm" svg:x2="19.5cm" svg:y2="52.2cm">
          <text:p/>
        </draw:line>
        <draw:frame draw:style-name="gr755" draw:text-style-name="P37" draw:layer="layout" svg:width="1.84cm" svg:height="0.569cm" svg:x="19.8cm" svg:y="51.8cm">
          <draw:text-box>
            <text:p><text:span text:style-name="T10">PC_instr_r</text:span></text:p>
          </draw:text-box>
        </draw:frame>
        <draw:line draw:style-name="gr38" draw:text-style-name="P4" draw:layer="layout" svg:x1="20cm" svg:y1="52.2cm" svg:x2="22cm" svg:y2="52.2cm">
          <text:p/>
        </draw:line>
        <draw:custom-shape draw:style-name="gr461" draw:text-style-name="P5" draw:layer="layout" svg:width="0.2cm" svg:height="0.2cm" svg:x="18.902cm" svg:y="50.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8" draw:text-style-name="P59" draw:layer="layout" svg:width="1cm" svg:height="1cm" svg:x="22cm" svg:y="52cm">
          <text:p text:style-name="P35"><text:span text:style-name="T10">+4</text:span></text:p>
          <draw:enhanced-geometry svg:viewBox="0 0 21600 21600" draw:type="rectangle" draw:enhanced-path="M 0 0 L 21600 0 21600 21600 0 21600 0 0 Z N"/>
        </draw:custom-shape>
        <draw:frame draw:style-name="gr724" draw:text-style-name="P37" draw:layer="layout" svg:width="1.776cm" svg:height="0.569cm" svg:x="22.801cm" svg:y="51.801cm">
          <draw:text-box>
            <text:p><text:span text:style-name="T10">PC_link_s</text:span></text:p>
          </draw:text-box>
        </draw:frame>
        <draw:line draw:style-name="gr38" draw:text-style-name="P4" draw:layer="layout" svg:x1="23.001cm" svg:y1="52.201cm" svg:x2="25.001cm" svg:y2="52.201cm">
          <text:p/>
        </draw:line>
        <draw:line draw:style-name="gr38" draw:text-style-name="P4" draw:layer="layout" svg:x1="20.5cm" svg:y1="52.2cm" svg:x2="20.5cm" svg:y2="51cm">
          <text:p/>
        </draw:line>
        <draw:line draw:style-name="gr38" draw:text-style-name="P4" draw:layer="layout" svg:x1="19.4cm" svg:y1="51cm" svg:x2="19.4cm" svg:y2="39.2cm">
          <text:p/>
        </draw:line>
        <draw:line draw:style-name="gr38" draw:text-style-name="P4" draw:layer="layout" svg:x1="19.4cm" svg:y1="51cm" svg:x2="20.5cm" svg:y2="51cm">
          <text:p/>
        </draw:line>
        <draw:custom-shape draw:style-name="gr461" draw:text-style-name="P5" draw:layer="layout" svg:width="0.2cm" svg:height="0.2cm" svg:x="20.403cm" svg:y="52.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76.5cm" svg:y1="58.3cm" svg:x2="76.5cm" svg:y2="40.5cm">
          <text:p/>
        </draw:line>
        <draw:line draw:style-name="gr38" draw:text-style-name="P4" draw:layer="layout" svg:x1="25cm" svg:y1="58.3cm" svg:x2="76.5cm" svg:y2="58.3cm">
          <text:p/>
        </draw:line>
        <draw:line draw:style-name="gr38" draw:text-style-name="P4" draw:layer="layout" svg:x1="25cm" svg:y1="58.3cm" svg:x2="25cm" svg:y2="52.2cm">
          <text:p/>
        </draw:line>
      </draw:page>
      <draw:page draw:name="page12" draw:style-name="dp1" draw:master-page-name="Standard">
        <draw:g draw:style-name="gr1">
          <draw:g draw:style-name="gr1">
            <draw:g draw:style-name="gr1">
              <draw:custom-shape draw:style-name="gr703" draw:text-style-name="P36" draw:layer="layout" svg:width="3cm" svg:height="2.031cm" svg:x="57cm" svg:y="49.501cm">
                <text:p text:style-name="P35"><text:span text:style-name="T10">alub</text:span></text:p>
                <draw:enhanced-geometry svg:viewBox="0 0 21600 21600" draw:type="rectangle" draw:enhanced-path="M 0 0 L 21600 0 21600 21600 0 21600 0 0 Z N"/>
              </draw:custom-shape>
              <draw:frame draw:style-name="gr704" draw:text-style-name="P37" draw:layer="layout" svg:width="1.37cm" svg:height="0.569cm" svg:x="57cm" svg:y="49.532cm">
                <draw:text-box>
                  <text:p><text:span text:style-name="T10">data01</text:span></text:p>
                </draw:text-box>
              </draw:frame>
              <draw:frame draw:style-name="gr704" draw:text-style-name="P37" draw:layer="layout" svg:width="1.37cm" svg:height="0.569cm" svg:x="57cm" svg:y="50.001cm">
                <draw:text-box>
                  <text:p><text:span text:style-name="T10">data02</text:span></text:p>
                </draw:text-box>
              </draw:frame>
              <draw:frame draw:style-name="gr632" draw:text-style-name="P37" draw:layer="layout" svg:width="1.446cm" svg:height="0.569cm" svg:x="58.054cm" svg:y="50.963cm">
                <draw:text-box>
                  <text:p><text:span text:style-name="T10">aluSelb</text:span></text:p>
                </draw:text-box>
              </draw:frame>
              <draw:frame draw:style-name="gr559" draw:text-style-name="P37" draw:layer="layout" svg:width="1.035cm" svg:height="0.569cm" svg:x="58.9cm" svg:y="50.401cm">
                <draw:text-box>
                  <text:p><text:span text:style-name="T10">take</text:span></text:p>
                </draw:text-box>
              </draw:frame>
            </draw:g>
            <draw:frame draw:style-name="gr644" draw:text-style-name="P37" draw:layer="layout" svg:width="1.336cm" svg:height="0.569cm" svg:x="59.817cm" svg:y="50.032cm">
              <draw:text-box>
                <text:p><text:span text:style-name="T10">take_s</text:span></text:p>
              </draw:text-box>
            </draw:frame>
            <draw:frame draw:style-name="gr634" draw:text-style-name="P37" draw:layer="layout" svg:width="1.747cm" svg:height="0.569cm" svg:x="58.264cm" svg:y="51.401cm">
              <draw:text-box>
                <text:p><text:span text:style-name="T10">aluSelb_s</text:span></text:p>
              </draw:text-box>
            </draw:frame>
            <draw:line draw:style-name="gr38" draw:text-style-name="P4" draw:layer="layout" svg:x1="56cm" svg:y1="49.801cm" svg:x2="57cm" svg:y2="49.801cm">
              <text:p/>
            </draw:line>
            <draw:line draw:style-name="gr38" draw:text-style-name="P4" draw:layer="layout" svg:x1="56cm" svg:y1="50.301cm" svg:x2="57cm" svg:y2="50.301cm">
              <text:p/>
            </draw:line>
            <draw:line draw:style-name="gr38" draw:text-style-name="P4" draw:layer="layout" svg:x1="58.5cm" svg:y1="51.533cm" svg:x2="58.5cm" svg:y2="52.002cm">
              <text:p/>
            </draw:line>
            <draw:line draw:style-name="gr38" draw:text-style-name="P4" draw:layer="layout" svg:x1="60cm" svg:y1="50.501cm" svg:x2="61.5cm" svg:y2="50.501cm">
              <text:p/>
            </draw:line>
          </draw:g>
          <draw:custom-shape draw:style-name="gr636" draw:text-style-name="P43" draw:layer="layout" svg:width="5.5cm" svg:height="3cm" svg:x="56cm" svg:y="49.001cm">
            <text:p/>
            <draw:enhanced-geometry svg:viewBox="0 0 21600 21600" draw:type="rectangle" draw:enhanced-path="M 0 0 L 21600 0 21600 21600 0 21600 0 0 Z N"/>
          </draw:custom-shape>
          <draw:frame draw:style-name="gr707" draw:text-style-name="P44" draw:layer="layout" svg:width="2.233cm" svg:height="0.569cm" svg:x="57.5cm" svg:y="49.032cm">
            <draw:text-box>
              <text:p><text:span text:style-name="T12">ALU: Branch</text:span></text:p>
            </draw:text-box>
          </draw:frame>
        </draw:g>
        <draw:g draw:style-name="gr1">
          <draw:g draw:style-name="gr1">
            <draw:g draw:style-name="gr1">
              <draw:custom-shape draw:style-name="gr703" draw:text-style-name="P36" draw:layer="layout" svg:width="3cm" svg:height="2.031cm" svg:x="57.001cm" svg:y="43.5cm">
                <text:p text:style-name="P35"><text:span text:style-name="T10">alua</text:span></text:p>
                <draw:enhanced-geometry svg:viewBox="0 0 21600 21600" draw:type="rectangle" draw:enhanced-path="M 0 0 L 21600 0 21600 21600 0 21600 0 0 Z N"/>
              </draw:custom-shape>
              <draw:frame draw:style-name="gr704" draw:text-style-name="P37" draw:layer="layout" svg:width="1.37cm" svg:height="0.569cm" svg:x="57.001cm" svg:y="43.531cm">
                <draw:text-box>
                  <text:p><text:span text:style-name="T10">data01</text:span></text:p>
                </draw:text-box>
              </draw:frame>
              <draw:frame draw:style-name="gr704" draw:text-style-name="P37" draw:layer="layout" svg:width="1.37cm" svg:height="0.569cm" svg:x="57.001cm" svg:y="44cm">
                <draw:text-box>
                  <text:p><text:span text:style-name="T10">data02</text:span></text:p>
                </draw:text-box>
              </draw:frame>
              <draw:frame draw:style-name="gr632" draw:text-style-name="P37" draw:layer="layout" svg:width="1.446cm" svg:height="0.569cm" svg:x="58.055cm" svg:y="44.962cm">
                <draw:text-box>
                  <text:p><text:span text:style-name="T10">aluSela</text:span></text:p>
                </draw:text-box>
              </draw:frame>
              <draw:frame draw:style-name="gr705" draw:text-style-name="P37" draw:layer="layout" svg:width="1.683cm" svg:height="0.569cm" svg:x="58.301cm" svg:y="44.4cm">
                <draw:text-box>
                  <text:p><text:span text:style-name="T10">aluResult</text:span></text:p>
                </draw:text-box>
              </draw:frame>
            </draw:g>
            <draw:frame draw:style-name="gr705" draw:text-style-name="P37" draw:layer="layout" svg:width="1.683cm" svg:height="0.569cm" svg:x="59.818cm" svg:y="44.031cm">
              <draw:text-box>
                <text:p><text:span text:style-name="T10">aluRes_s</text:span></text:p>
              </draw:text-box>
            </draw:frame>
            <draw:frame draw:style-name="gr634" draw:text-style-name="P37" draw:layer="layout" svg:width="1.747cm" svg:height="0.569cm" svg:x="58.384cm" svg:y="45.431cm">
              <draw:text-box>
                <text:p><text:span text:style-name="T10">aluSela_s</text:span></text:p>
              </draw:text-box>
            </draw:frame>
            <draw:line draw:style-name="gr38" draw:text-style-name="P4" draw:layer="layout" svg:x1="55.984cm" svg:y1="43.8cm" svg:x2="56.984cm" svg:y2="43.8cm">
              <text:p/>
            </draw:line>
            <draw:line draw:style-name="gr38" draw:text-style-name="P4" draw:layer="layout" svg:x1="55.984cm" svg:y1="44.3cm" svg:x2="56.984cm" svg:y2="44.3cm">
              <text:p/>
            </draw:line>
            <draw:line draw:style-name="gr38" draw:text-style-name="P4" draw:layer="layout" svg:x1="58.501cm" svg:y1="45.531cm" svg:x2="58.501cm" svg:y2="46cm">
              <text:p/>
            </draw:line>
            <draw:line draw:style-name="gr38" draw:text-style-name="P4" draw:layer="layout" svg:x1="59.984cm" svg:y1="44.5cm" svg:x2="61.501cm" svg:y2="44.5cm">
              <text:p/>
            </draw:line>
          </draw:g>
          <draw:custom-shape draw:style-name="gr636" draw:text-style-name="P43" draw:layer="layout" svg:width="5.5cm" svg:height="3cm" svg:x="55.984cm" svg:y="43cm">
            <text:p/>
            <draw:enhanced-geometry svg:viewBox="0 0 21600 21600" draw:type="rectangle" draw:enhanced-path="M 0 0 L 21600 0 21600 21600 0 21600 0 0 Z N"/>
          </draw:custom-shape>
          <draw:frame draw:style-name="gr706" draw:text-style-name="P44" draw:layer="layout" svg:width="1.874cm" svg:height="0.569cm" svg:x="57.51cm" svg:y="43.031cm">
            <draw:text-box>
              <text:p><text:span text:style-name="T12">ALU: Algo</text:span></text:p>
            </draw:text-box>
          </draw:frame>
        </draw:g>
        <draw:frame draw:style-name="gr756" draw:text-style-name="P37" draw:layer="layout" svg:width="1.793cm" svg:height="0.569cm" svg:x="61.3cm" svg:y="50.031cm">
          <draw:text-box>
            <text:p><text:span text:style-name="T10">ex_take_s</text:span></text:p>
          </draw:text-box>
        </draw:frame>
        <draw:line draw:style-name="gr38" draw:text-style-name="P4" draw:layer="layout" svg:x1="61.5cm" svg:y1="50.501cm" svg:x2="63cm" svg:y2="50.5cm">
          <text:p/>
        </draw:line>
        <draw:frame draw:style-name="gr756" draw:text-style-name="P37" draw:layer="layout" svg:width="2.344cm" svg:height="0.569cm" svg:x="56.303cm" svg:y="46.003cm">
          <draw:text-box>
            <text:p><text:span text:style-name="T10">id_ex_aluOp_r</text:span></text:p>
          </draw:text-box>
        </draw:frame>
        <draw:frame draw:style-name="gr756" draw:text-style-name="P37" draw:layer="layout" svg:width="1.823cm" svg:height="0.569cm" svg:x="54.4cm" svg:y="43.3cm">
          <draw:text-box>
            <text:p><text:span text:style-name="T10">ex_srcA_s</text:span></text:p>
          </draw:text-box>
        </draw:frame>
        <draw:frame draw:style-name="gr756" draw:text-style-name="P37" draw:layer="layout" svg:width="1.823cm" svg:height="0.569cm" svg:x="54.405cm" svg:y="43.805cm">
          <draw:text-box>
            <text:p><text:span text:style-name="T10">ex_srcB_s</text:span></text:p>
          </draw:text-box>
        </draw:frame>
        <draw:frame draw:style-name="gr756" draw:text-style-name="P37" draw:layer="layout" svg:width="2.14cm" svg:height="0.569cm" svg:x="61.306cm" svg:y="44.006cm">
          <draw:text-box>
            <text:p><text:span text:style-name="T10">ex_aluRes_s</text:span></text:p>
          </draw:text-box>
        </draw:frame>
        <draw:line draw:style-name="gr38" draw:text-style-name="P4" draw:layer="layout" svg:x1="61.501cm" svg:y1="44.5cm" svg:x2="63cm" svg:y2="44.5cm">
          <text:p/>
        </draw:line>
        <draw:frame draw:style-name="gr756" draw:text-style-name="P37" draw:layer="layout" svg:width="1.823cm" svg:height="0.569cm" svg:x="54.404cm" svg:y="49.304cm">
          <draw:text-box>
            <text:p><text:span text:style-name="T10">ex_srcA_s</text:span></text:p>
          </draw:text-box>
        </draw:frame>
        <draw:frame draw:style-name="gr756" draw:text-style-name="P37" draw:layer="layout" svg:width="1.823cm" svg:height="0.569cm" svg:x="54.405cm" svg:y="49.805cm">
          <draw:text-box>
            <text:p><text:span text:style-name="T10">ex_srcB_s</text:span></text:p>
          </draw:text-box>
        </draw:frame>
        <draw:frame draw:style-name="gr756" draw:text-style-name="P37" draw:layer="layout" svg:width="2.217cm" svg:height="0.569cm" svg:x="56.503cm" svg:y="52.004cm">
          <draw:text-box>
            <text:p><text:span text:style-name="T10">id_ex_brOp_r</text:span></text:p>
          </draw:text-box>
        </draw:frame>
        <draw:line draw:style-name="gr38" draw:text-style-name="P4" draw:layer="layout" svg:x1="56cm" svg:y1="43.8cm" svg:x2="55cm" svg:y2="43.8cm">
          <text:p/>
        </draw:line>
        <draw:line draw:style-name="gr38" draw:text-style-name="P4" draw:layer="layout" svg:x1="56cm" svg:y1="44.3cm" svg:x2="55cm" svg:y2="44.3cm">
          <text:p/>
        </draw:line>
        <draw:line draw:style-name="gr38" draw:text-style-name="P4" draw:layer="layout" svg:x1="56cm" svg:y1="49.8cm" svg:x2="55cm" svg:y2="49.8cm">
          <text:p/>
        </draw:line>
        <draw:line draw:style-name="gr38" draw:text-style-name="P4" draw:layer="layout" svg:x1="56cm" svg:y1="50.3cm" svg:x2="55cm" svg:y2="50.3cm">
          <text:p/>
        </draw:line>
        <draw:line draw:style-name="gr38" draw:text-style-name="P4" draw:layer="layout" svg:x1="58.501cm" svg:y1="46cm" svg:x2="58.5cm" svg:y2="47cm">
          <text:p/>
        </draw:line>
        <draw:line draw:style-name="gr38" draw:text-style-name="P4" draw:layer="layout" svg:x1="58.5cm" svg:y1="52.002cm" svg:x2="58.5cm" svg:y2="53cm">
          <text:p/>
        </draw:line>
        <draw:g draw:style-name="gr1">
          <draw:g draw:style-name="gr1">
            <draw:g draw:style-name="gr1">
              <draw:custom-shape draw:style-name="gr708" draw:text-style-name="P36" draw:layer="layout" svg:width="4cm" svg:height="5cm" svg:x="37cm" svg:y="50.501cm">
                <text:p text:style-name="P35"><text:span text:style-name="T10">contr</text:span><text:span text:style-name="T10">ol</text:span></text:p>
                <draw:enhanced-geometry svg:viewBox="0 0 21600 21600" draw:type="rectangle" draw:enhanced-path="M 0 0 L 21600 0 21600 21600 0 21600 0 0 Z N"/>
              </draw:custom-shape>
              <draw:frame draw:style-name="gr709" draw:text-style-name="P37" draw:layer="layout" svg:width="1.429cm" svg:height="0.569cm" svg:x="37cm" svg:y="50.501cm">
                <draw:text-box>
                  <text:p><text:span text:style-name="T10">opcode</text:span></text:p>
                </draw:text-box>
              </draw:frame>
              <draw:frame draw:style-name="gr710" draw:text-style-name="P37" draw:layer="layout" svg:width="1.192cm" svg:height="0.569cm" svg:x="37cm" svg:y="50.932cm">
                <draw:text-box>
                  <text:p><text:span text:style-name="T10">func3</text:span></text:p>
                </draw:text-box>
              </draw:frame>
              <draw:frame draw:style-name="gr702" draw:text-style-name="P37" draw:layer="layout" svg:width="1.51cm" svg:height="0.569cm" svg:x="37cm" svg:y="51.332cm">
                <draw:text-box>
                  <text:p><text:span text:style-name="T10">func7b5</text:span></text:p>
                </draw:text-box>
              </draw:frame>
              <draw:frame draw:style-name="gr711" draw:text-style-name="P37" draw:layer="layout" svg:width="1.054cm" svg:height="0.569cm" svg:x="37cm" svg:y="51.732cm">
                <draw:text-box>
                  <text:p><text:span text:style-name="T10">take</text:span></text:p>
                </draw:text-box>
              </draw:frame>
              <draw:frame draw:style-name="gr712" draw:text-style-name="P37" draw:layer="layout" svg:width="1.62cm" svg:height="0.569cm" svg:x="39.326cm" svg:y="50.532cm">
                <draw:text-box>
                  <text:p><text:span text:style-name="T10">resultSrc</text:span></text:p>
                </draw:text-box>
              </draw:frame>
              <draw:frame draw:style-name="gr713" draw:text-style-name="P37" draw:layer="layout" svg:width="1.645cm" svg:height="0.569cm" svg:x="39.301cm" svg:y="50.932cm">
                <draw:text-box>
                  <text:p><text:span text:style-name="T10">dMemWr</text:span></text:p>
                </draw:text-box>
              </draw:frame>
              <draw:frame draw:style-name="gr714" draw:text-style-name="P37" draw:layer="layout" svg:width="1.649cm" svg:height="0.569cm" svg:x="39.297cm" svg:y="51.332cm">
                <draw:text-box>
                  <text:p><text:span text:style-name="T10">dMemRd</text:span></text:p>
                </draw:text-box>
              </draw:frame>
              <draw:frame draw:style-name="gr715" draw:text-style-name="P37" draw:layer="layout" svg:width="1.493cm" svg:height="0.569cm" svg:x="39.453cm" svg:y="51.732cm">
                <draw:text-box>
                  <text:p><text:span text:style-name="T10">aluSrcB</text:span></text:p>
                </draw:text-box>
              </draw:frame>
              <draw:frame draw:style-name="gr715" draw:text-style-name="P37" draw:layer="layout" svg:width="1.493cm" svg:height="0.569cm" svg:x="39.453cm" svg:y="52.132cm">
                <draw:text-box>
                  <text:p><text:span text:style-name="T10">aluSrcA</text:span></text:p>
                </draw:text-box>
              </draw:frame>
              <draw:frame draw:style-name="gr716" draw:text-style-name="P37" draw:layer="layout" svg:width="1.268cm" svg:height="0.569cm" svg:x="39.678cm" svg:y="52.532cm">
                <draw:text-box>
                  <text:p><text:span text:style-name="T10">regWr</text:span></text:p>
                </draw:text-box>
              </draw:frame>
              <draw:frame draw:style-name="gr717" draw:text-style-name="P37" draw:layer="layout" svg:width="1.117cm" svg:height="0.569cm" svg:x="39.829cm" svg:y="52.932cm">
                <draw:text-box>
                  <text:p><text:span text:style-name="T10">jump</text:span></text:p>
                </draw:text-box>
              </draw:frame>
              <draw:frame draw:style-name="gr463" draw:text-style-name="P37" draw:layer="layout" svg:width="1.463cm" svg:height="0.569cm" svg:x="39.483cm" svg:y="53.332cm">
                <draw:text-box>
                  <text:p><text:span text:style-name="T10">immSrc</text:span></text:p>
                </draw:text-box>
              </draw:frame>
              <draw:frame draw:style-name="gr718" draw:text-style-name="P37" draw:layer="layout" svg:width="1.446cm" svg:height="0.569cm" svg:x="39.5cm" svg:y="53.701cm">
                <draw:text-box>
                  <text:p><text:span text:style-name="T10">aluSela</text:span></text:p>
                </draw:text-box>
              </draw:frame>
              <draw:frame draw:style-name="gr719" draw:text-style-name="P37" draw:layer="layout" svg:width="2.708cm" svg:height="0.569cm" svg:x="38.238cm" svg:y="54.501cm">
                <draw:text-box>
                  <text:p><text:span text:style-name="T10">trap_illegal_instrx</text:span></text:p>
                </draw:text-box>
              </draw:frame>
              <draw:frame draw:style-name="gr718" draw:text-style-name="P37" draw:layer="layout" svg:width="1.446cm" svg:height="0.569cm" svg:x="39.5cm" svg:y="54.101cm">
                <draw:text-box>
                  <text:p><text:span text:style-name="T10">aluSelb</text:span></text:p>
                </draw:text-box>
              </draw:frame>
            </draw:g>
            <draw:frame draw:style-name="gr617" draw:text-style-name="P37" draw:layer="layout" svg:width="1.51cm" svg:height="0.569cm" svg:x="35.7cm" svg:y="50.332cm">
              <draw:text-box>
                <text:p><text:span text:style-name="T10">ir_s[6:0]</text:span></text:p>
              </draw:text-box>
            </draw:frame>
            <draw:frame draw:style-name="gr696" draw:text-style-name="P37" draw:layer="layout" svg:width="1.823cm" svg:height="0.569cm" svg:x="35.4cm" svg:y="50.732cm">
              <draw:text-box>
                <text:p><text:span text:style-name="T10">ir_s[14:12]</text:span></text:p>
              </draw:text-box>
            </draw:frame>
            <draw:frame draw:style-name="gr639" draw:text-style-name="P37" draw:layer="layout" svg:width="1.429cm" svg:height="0.569cm" svg:x="35.771cm" svg:y="51.132cm">
              <draw:text-box>
                <text:p><text:span text:style-name="T10">ir_s[30]</text:span></text:p>
              </draw:text-box>
            </draw:frame>
            <draw:frame draw:style-name="gr644" draw:text-style-name="P37" draw:layer="layout" svg:width="1.336cm" svg:height="0.569cm" svg:x="35.9cm" svg:y="51.532cm">
              <draw:text-box>
                <text:p><text:span text:style-name="T10">take_s</text:span></text:p>
              </draw:text-box>
            </draw:frame>
            <draw:line draw:style-name="gr38" draw:text-style-name="P4" draw:layer="layout" svg:x1="35cm" svg:y1="50.8cm" svg:x2="37cm" svg:y2="50.801cm">
              <text:p/>
            </draw:line>
            <draw:line draw:style-name="gr38" draw:text-style-name="P4" draw:layer="layout" svg:x1="35cm" svg:y1="51.2cm" svg:x2="37cm" svg:y2="51.201cm">
              <text:p/>
            </draw:line>
            <draw:line draw:style-name="gr38" draw:text-style-name="P4" draw:layer="layout" svg:x1="35cm" svg:y1="51.6cm" svg:x2="37cm" svg:y2="51.601cm">
              <text:p/>
            </draw:line>
            <draw:line draw:style-name="gr38" draw:text-style-name="P4" draw:layer="layout" svg:x1="35cm" svg:y1="52cm" svg:x2="37cm" svg:y2="52.001cm">
              <text:p/>
            </draw:line>
            <draw:line draw:style-name="gr38" draw:text-style-name="P4" draw:layer="layout" svg:x1="41cm" svg:y1="50.801cm" svg:x2="44cm" svg:y2="50.8cm">
              <text:p/>
            </draw:line>
            <draw:line draw:style-name="gr38" draw:text-style-name="P4" draw:layer="layout" svg:x1="41cm" svg:y1="51.201cm" svg:x2="44cm" svg:y2="51.201cm">
              <text:p/>
            </draw:line>
            <draw:line draw:style-name="gr38" draw:text-style-name="P4" draw:layer="layout" svg:x1="41cm" svg:y1="51.601cm" svg:x2="44.002cm" svg:y2="51.6cm">
              <text:p/>
            </draw:line>
            <draw:line draw:style-name="gr38" draw:text-style-name="P4" draw:layer="layout" svg:x1="41cm" svg:y1="52.001cm" svg:x2="44cm" svg:y2="52cm">
              <text:p/>
            </draw:line>
            <draw:line draw:style-name="gr38" draw:text-style-name="P4" draw:layer="layout" svg:x1="41cm" svg:y1="52.401cm" svg:x2="44cm" svg:y2="52.401cm">
              <text:p/>
            </draw:line>
            <draw:line draw:style-name="gr38" draw:text-style-name="P4" draw:layer="layout" svg:x1="41cm" svg:y1="52.801cm" svg:x2="44cm" svg:y2="52.801cm">
              <text:p/>
            </draw:line>
            <draw:line draw:style-name="gr38" draw:text-style-name="P4" draw:layer="layout" svg:x1="41cm" svg:y1="53.201cm" svg:x2="44cm" svg:y2="53.2cm">
              <text:p/>
            </draw:line>
            <draw:line draw:style-name="gr38" draw:text-style-name="P4" draw:layer="layout" svg:x1="41cm" svg:y1="53.601cm" svg:x2="44cm" svg:y2="53.602cm">
              <text:p/>
            </draw:line>
            <draw:line draw:style-name="gr38" draw:text-style-name="P4" draw:layer="layout" svg:x1="41cm" svg:y1="54.001cm" svg:x2="44cm" svg:y2="54cm">
              <text:p/>
            </draw:line>
            <draw:line draw:style-name="gr38" draw:text-style-name="P4" draw:layer="layout" svg:x1="41cm" svg:y1="54.401cm" svg:x2="44cm" svg:y2="54.401cm">
              <text:p/>
            </draw:line>
            <draw:line draw:style-name="gr38" draw:text-style-name="P4" draw:layer="layout" svg:x1="41cm" svg:y1="54.801cm" svg:x2="44cm" svg:y2="54.8cm">
              <text:p/>
            </draw:line>
            <draw:frame draw:style-name="gr720" draw:text-style-name="P37" draw:layer="layout" svg:width="2.06cm" svg:height="0.569cm" svg:x="40.8cm" svg:y="50.333cm">
              <draw:text-box>
                <text:p><text:span text:style-name="T10">resultSrcx_s</text:span></text:p>
              </draw:text-box>
            </draw:frame>
            <draw:frame draw:style-name="gr676" draw:text-style-name="P37" draw:layer="layout" svg:width="1.946cm" svg:height="0.569cm" svg:x="40.8cm" svg:y="50.734cm">
              <draw:text-box>
                <text:p><text:span text:style-name="T10">dMemWr_s</text:span></text:p>
              </draw:text-box>
            </draw:frame>
            <draw:frame draw:style-name="gr675" draw:text-style-name="P37" draw:layer="layout" svg:width="1.95cm" svg:height="0.569cm" svg:x="40.8cm" svg:y="51.135cm">
              <draw:text-box>
                <text:p><text:span text:style-name="T10">dMemRd_s</text:span></text:p>
              </draw:text-box>
            </draw:frame>
            <draw:frame draw:style-name="gr655" draw:text-style-name="P37" draw:layer="layout" svg:width="1.793cm" svg:height="0.569cm" svg:x="40.8cm" svg:y="51.536cm">
              <draw:text-box>
                <text:p><text:span text:style-name="T10">aluSrcB_s</text:span></text:p>
              </draw:text-box>
            </draw:frame>
            <draw:frame draw:style-name="gr655" draw:text-style-name="P37" draw:layer="layout" svg:width="1.793cm" svg:height="0.569cm" svg:x="40.801cm" svg:y="51.937cm">
              <draw:text-box>
                <text:p><text:span text:style-name="T10">aluSrcA_s</text:span></text:p>
              </draw:text-box>
            </draw:frame>
            <draw:frame draw:style-name="gr540" draw:text-style-name="P37" draw:layer="layout" svg:width="1.565cm" svg:height="0.569cm" svg:x="40.802cm" svg:y="52.338cm">
              <draw:text-box>
                <text:p><text:span text:style-name="T10">regWr_s</text:span></text:p>
              </draw:text-box>
            </draw:frame>
            <draw:frame draw:style-name="gr721" draw:text-style-name="P37" draw:layer="layout" svg:width="1.412cm" svg:height="0.569cm" svg:x="40.803cm" svg:y="52.739cm">
              <draw:text-box>
                <text:p><text:span text:style-name="T10">jump_s</text:span></text:p>
              </draw:text-box>
            </draw:frame>
            <draw:frame draw:style-name="gr633" draw:text-style-name="P37" draw:layer="layout" svg:width="1.903cm" svg:height="0.569cm" svg:x="40.803cm" svg:y="53.14cm">
              <draw:text-box>
                <text:p><text:span text:style-name="T10">immSrcx_s</text:span></text:p>
              </draw:text-box>
            </draw:frame>
            <draw:frame draw:style-name="gr634" draw:text-style-name="P37" draw:layer="layout" svg:width="1.747cm" svg:height="0.569cm" svg:x="40.804cm" svg:y="53.541cm">
              <draw:text-box>
                <text:p><text:span text:style-name="T10">aluSela_s</text:span></text:p>
              </draw:text-box>
            </draw:frame>
            <draw:frame draw:style-name="gr634" draw:text-style-name="P37" draw:layer="layout" svg:width="1.747cm" svg:height="0.569cm" svg:x="40.805cm" svg:y="53.942cm">
              <draw:text-box>
                <text:p><text:span text:style-name="T10">aluSelb_s</text:span></text:p>
              </draw:text-box>
            </draw:frame>
            <draw:frame draw:style-name="gr722" draw:text-style-name="P37" draw:layer="layout" svg:width="3.008cm" svg:height="0.569cm" svg:x="40.806cm" svg:y="54.343cm">
              <draw:text-box>
                <text:p><text:span text:style-name="T10">trap_illegal_instrx</text:span><text:span text:style-name="T10">_s</text:span></text:p>
              </draw:text-box>
            </draw:frame>
          </draw:g>
          <draw:custom-shape draw:style-name="gr723" draw:text-style-name="P43" draw:layer="layout" svg:width="9cm" svg:height="6cm" svg:x="35cm" svg:y="50cm">
            <text:p/>
            <draw:enhanced-geometry svg:viewBox="0 0 21600 21600" draw:type="rectangle" draw:enhanced-path="M 0 0 L 21600 0 21600 21600 0 21600 0 0 Z N"/>
          </draw:custom-shape>
          <draw:frame draw:style-name="gr683" draw:text-style-name="P44" draw:layer="layout" svg:width="2.297cm" svg:height="0.569cm" svg:x="37.603cm" svg:y="50.031cm">
            <draw:text-box>
              <text:p><text:span text:style-name="T12">Instr.-Decode</text:span></text:p>
            </draw:text-box>
          </draw:frame>
        </draw:g>
        <draw:frame draw:style-name="gr756" draw:text-style-name="P37" draw:layer="layout" svg:width="2.297cm" svg:height="0.569cm" svg:x="43.8cm" svg:y="50.4cm">
          <draw:text-box>
            <text:p><text:span text:style-name="T10">id_resultSrc_s</text:span></text:p>
          </draw:text-box>
        </draw:frame>
        <draw:line draw:style-name="gr38" draw:text-style-name="P4" draw:layer="layout" svg:x1="44cm" svg:y1="50.8cm" svg:x2="45cm" svg:y2="50.8cm">
          <text:p/>
        </draw:line>
        <draw:line draw:style-name="gr38" draw:text-style-name="P4" draw:layer="layout" svg:x1="34cm" svg:y1="50.8cm" svg:x2="35cm" svg:y2="50.8cm">
          <text:p/>
        </draw:line>
        <draw:line draw:style-name="gr38" draw:text-style-name="P4" draw:layer="layout" svg:x1="34cm" svg:y1="51.2cm" svg:x2="35cm" svg:y2="51.2cm">
          <text:p/>
        </draw:line>
        <draw:line draw:style-name="gr38" draw:text-style-name="P4" draw:layer="layout" svg:x1="34cm" svg:y1="51.6cm" svg:x2="35cm" svg:y2="51.6cm">
          <text:p/>
        </draw:line>
        <draw:line draw:style-name="gr38" draw:text-style-name="P4" draw:layer="layout" svg:x1="34cm" svg:y1="52cm" svg:x2="35cm" svg:y2="52cm">
          <text:p/>
        </draw:line>
        <draw:frame draw:style-name="gr756" draw:text-style-name="P37" draw:layer="layout" svg:width="1.967cm" svg:height="0.569cm" svg:x="33.2cm" svg:y="50.3cm">
          <draw:text-box>
            <text:p><text:span text:style-name="T10">if_id_instr_r</text:span></text:p>
          </draw:text-box>
        </draw:frame>
        <draw:frame draw:style-name="gr756" draw:text-style-name="P37" draw:layer="layout" svg:width="1.967cm" svg:height="0.569cm" svg:x="33.201cm" svg:y="50.701cm">
          <draw:text-box>
            <text:p><text:span text:style-name="T10">if_id_instr_r</text:span></text:p>
          </draw:text-box>
        </draw:frame>
        <draw:frame draw:style-name="gr756" draw:text-style-name="P37" draw:layer="layout" svg:width="1.967cm" svg:height="0.569cm" svg:x="33.202cm" svg:y="51.102cm">
          <draw:text-box>
            <text:p><text:span text:style-name="T10">if_id_instr_r</text:span></text:p>
          </draw:text-box>
        </draw:frame>
        <draw:frame draw:style-name="gr757" draw:text-style-name="P37" draw:layer="layout" svg:width="0.659cm" svg:height="0.569cm" svg:x="34.503cm" svg:y="51.503cm">
          <draw:text-box>
            <text:p><text:span text:style-name="T10">0</text:span></text:p>
          </draw:text-box>
        </draw:frame>
        <draw:line draw:style-name="gr38" draw:text-style-name="P4" draw:layer="layout" svg:x1="44cm" svg:y1="51.2cm" svg:x2="45cm" svg:y2="51.2cm">
          <text:p/>
        </draw:line>
        <draw:line draw:style-name="gr38" draw:text-style-name="P4" draw:layer="layout" svg:x1="44cm" svg:y1="51.6cm" svg:x2="45cm" svg:y2="51.6cm">
          <text:p/>
        </draw:line>
        <draw:line draw:style-name="gr38" draw:text-style-name="P4" draw:layer="layout" svg:x1="44cm" svg:y1="52cm" svg:x2="45cm" svg:y2="52cm">
          <text:p/>
        </draw:line>
        <draw:line draw:style-name="gr38" draw:text-style-name="P4" draw:layer="layout" svg:x1="44cm" svg:y1="52.4cm" svg:x2="45cm" svg:y2="52.4cm">
          <text:p/>
        </draw:line>
        <draw:line draw:style-name="gr38" draw:text-style-name="P4" draw:layer="layout" svg:x1="44cm" svg:y1="52.8cm" svg:x2="45cm" svg:y2="52.8cm">
          <text:p/>
        </draw:line>
        <draw:line draw:style-name="gr38" draw:text-style-name="P4" draw:layer="layout" svg:x1="44cm" svg:y1="53.2cm" svg:x2="45cm" svg:y2="53.2cm">
          <text:p/>
        </draw:line>
        <draw:line draw:style-name="gr38" draw:text-style-name="P4" draw:layer="layout" svg:x1="44cm" svg:y1="53.6cm" svg:x2="45cm" svg:y2="53.6cm">
          <text:p/>
        </draw:line>
        <draw:line draw:style-name="gr38" draw:text-style-name="P4" draw:layer="layout" svg:x1="44cm" svg:y1="54cm" svg:x2="45cm" svg:y2="54cm">
          <text:p/>
        </draw:line>
        <draw:line draw:style-name="gr38" draw:text-style-name="P4" draw:layer="layout" svg:x1="44cm" svg:y1="54.4cm" svg:x2="45cm" svg:y2="54.4cm">
          <text:p/>
        </draw:line>
        <draw:line draw:style-name="gr38" draw:text-style-name="P4" draw:layer="layout" svg:x1="44cm" svg:y1="54.8cm" svg:x2="45cm" svg:y2="54.8cm">
          <text:p/>
        </draw:line>
        <draw:frame draw:style-name="gr756" draw:text-style-name="P37" draw:layer="layout" svg:width="2.322cm" svg:height="0.569cm" svg:x="43.801cm" svg:y="50.801cm">
          <draw:text-box>
            <text:p><text:span text:style-name="T10">id_dMemWr_s</text:span></text:p>
          </draw:text-box>
        </draw:frame>
        <draw:frame draw:style-name="gr756" draw:text-style-name="P37" draw:layer="layout" svg:width="2.327cm" svg:height="0.569cm" svg:x="43.801cm" svg:y="51.202cm">
          <draw:text-box>
            <text:p><text:span text:style-name="T10">id_dMemRd_s</text:span></text:p>
          </draw:text-box>
        </draw:frame>
        <draw:frame draw:style-name="gr756" draw:text-style-name="P37" draw:layer="layout" svg:width="2.17cm" svg:height="0.569cm" svg:x="43.802cm" svg:y="51.603cm">
          <draw:text-box>
            <text:p><text:span text:style-name="T10">id_aluSrcB_s</text:span></text:p>
          </draw:text-box>
        </draw:frame>
        <draw:frame draw:style-name="gr756" draw:text-style-name="P37" draw:layer="layout" svg:width="2.17cm" svg:height="0.569cm" svg:x="43.802cm" svg:y="52.004cm">
          <draw:text-box>
            <text:p><text:span text:style-name="T10">id_aluSrcA_s</text:span></text:p>
          </draw:text-box>
        </draw:frame>
        <draw:frame draw:style-name="gr756" draw:text-style-name="P37" draw:layer="layout" svg:width="1.946cm" svg:height="0.569cm" svg:x="43.802cm" svg:y="52.405cm">
          <draw:text-box>
            <text:p><text:span text:style-name="T10">id_regWr_s</text:span></text:p>
          </draw:text-box>
        </draw:frame>
        <draw:frame draw:style-name="gr756" draw:text-style-name="P37" draw:layer="layout" svg:width="1.793cm" svg:height="0.569cm" svg:x="43.802cm" svg:y="52.806cm">
          <draw:text-box>
            <text:p><text:span text:style-name="T10">id_jump_s</text:span></text:p>
          </draw:text-box>
        </draw:frame>
        <draw:frame draw:style-name="gr756" draw:text-style-name="P37" draw:layer="layout" svg:width="2.14cm" svg:height="0.569cm" svg:x="43.803cm" svg:y="53.207cm">
          <draw:text-box>
            <text:p><text:span text:style-name="T10">id_immSrc_s</text:span></text:p>
          </draw:text-box>
        </draw:frame>
        <draw:frame draw:style-name="gr756" draw:text-style-name="P37" draw:layer="layout" svg:width="1.933cm" svg:height="0.569cm" svg:x="43.803cm" svg:y="53.608cm">
          <draw:text-box>
            <text:p><text:span text:style-name="T10">id_aluOp_s</text:span></text:p>
          </draw:text-box>
        </draw:frame>
        <draw:frame draw:style-name="gr756" draw:text-style-name="P37" draw:layer="layout" svg:width="1.81cm" svg:height="0.569cm" svg:x="43.804cm" svg:y="54.009cm">
          <draw:text-box>
            <text:p><text:span text:style-name="T10">id_brOp_s</text:span></text:p>
          </draw:text-box>
        </draw:frame>
        <draw:frame draw:style-name="gr756" draw:text-style-name="P37" draw:layer="layout" svg:width="2.551cm" svg:height="0.569cm" svg:x="43.804cm" svg:y="54.41cm">
          <draw:text-box>
            <text:p><text:span text:style-name="T10">id_trap_illegal_s</text:span></text:p>
          </draw:text-box>
        </draw:frame>
        <draw:g draw:style-name="gr1">
          <draw:g draw:style-name="gr1">
            <draw:custom-shape draw:style-name="gr691" draw:text-style-name="P36" draw:layer="layout" svg:width="4.507cm" svg:height="3cm" svg:x="37.993cm" svg:y="42.001cm">
              <text:p text:style-name="P35"><text:span text:style-name="T10">RegFile</text:span></text:p>
              <draw:enhanced-geometry svg:viewBox="0 0 21600 21600" draw:type="rectangle" draw:enhanced-path="M 0 0 L 21600 0 21600 21600 0 21600 0 0 Z N"/>
            </draw:custom-shape>
            <draw:g draw:style-name="gr66">
              <draw:line draw:style-name="gr60" draw:text-style-name="P11" draw:layer="layout" svg:x1="37.993cm" svg:y1="44.951cm" svg:x2="38.143cm" svg:y2="44.901cm">
                <text:p/>
              </draw:line>
              <draw:line draw:style-name="gr60" draw:text-style-name="P11" draw:layer="layout" svg:x1="37.993cm" svg:y1="44.851cm" svg:x2="38.143cm" svg:y2="44.901cm">
                <text:p/>
              </draw:line>
            </draw:g>
            <draw:frame draw:style-name="gr692" draw:text-style-name="P37" draw:layer="layout" svg:width="3.576cm" svg:height="0.569cm" svg:x="37.995cm" svg:y="42.701cm">
              <draw:text-box>
                <text:p><text:span text:style-name="T10">instr(19:15):raddr</text:span><text:span text:style-name="T10">01(4:0)</text:span></text:p>
              </draw:text-box>
            </draw:frame>
            <draw:frame draw:style-name="gr692" draw:text-style-name="P37" draw:layer="layout" svg:width="3.576cm" svg:height="0.569cm" svg:x="37.993cm" svg:y="43.132cm">
              <draw:text-box>
                <text:p><text:span text:style-name="T10">instr(24:20):raddr</text:span><text:span text:style-name="T10">02(4:0)</text:span></text:p>
              </draw:text-box>
            </draw:frame>
            <draw:frame draw:style-name="gr693" draw:text-style-name="P37" draw:layer="layout" svg:width="3.508cm" svg:height="0.569cm" svg:x="37.987cm" svg:y="43.601cm">
              <draw:text-box>
                <text:p><text:span text:style-name="T10">instr(11:7):waddr</text:span><text:span text:style-name="T10">01(4:0)</text:span></text:p>
              </draw:text-box>
            </draw:frame>
            <draw:frame draw:style-name="gr694" draw:text-style-name="P37" draw:layer="layout" svg:width="2.315cm" svg:height="0.569cm" svg:x="37.981cm" svg:y="42.332cm">
              <draw:text-box>
                <text:p><text:span text:style-name="T10">wdata01(63:0)</text:span></text:p>
              </draw:text-box>
            </draw:frame>
            <draw:frame draw:style-name="gr381" draw:text-style-name="P37" draw:layer="layout" svg:width="2.204cm" svg:height="0.569cm" svg:x="40.291cm" svg:y="42.101cm">
              <draw:text-box>
                <text:p><text:span text:style-name="T10">rdata01(63:0)</text:span></text:p>
              </draw:text-box>
            </draw:frame>
            <draw:frame draw:style-name="gr381" draw:text-style-name="P37" draw:layer="layout" svg:width="2.204cm" svg:height="0.569cm" svg:x="40.295cm" svg:y="44.132cm">
              <draw:text-box>
                <text:p><text:span text:style-name="T10">rdata02(63:0)</text:span></text:p>
              </draw:text-box>
            </draw:frame>
            <draw:frame draw:style-name="gr695" draw:text-style-name="P37" draw:layer="layout" svg:width="0.865cm" svg:height="0.569cm" svg:x="39.537cm" svg:y="44.432cm">
              <draw:text-box>
                <text:p><text:span text:style-name="T10">we</text:span></text:p>
              </draw:text-box>
            </draw:frame>
          </draw:g>
          <draw:line draw:style-name="gr38" draw:text-style-name="P4" draw:layer="layout" svg:x1="35cm" svg:y1="43cm" svg:x2="37.993cm" svg:y2="43.001cm">
            <text:p/>
          </draw:line>
          <draw:line draw:style-name="gr38" draw:text-style-name="P4" draw:layer="layout" svg:x1="35cm" svg:y1="43.4cm" svg:x2="37.994cm" svg:y2="43.401cm">
            <text:p/>
          </draw:line>
          <draw:line draw:style-name="gr38" draw:text-style-name="P4" draw:layer="layout" svg:x1="35cm" svg:y1="43.9cm" svg:x2="37.995cm" svg:y2="43.901cm">
            <text:p/>
          </draw:line>
          <draw:line draw:style-name="gr38" draw:text-style-name="P4" draw:layer="layout" svg:x1="35cm" svg:y1="42.6cm" svg:x2="37.996cm" svg:y2="42.601cm">
            <text:p/>
          </draw:line>
          <draw:line draw:style-name="gr38" draw:text-style-name="P4" draw:layer="layout" svg:x1="42.5cm" svg:y1="42.301cm" svg:x2="45cm" svg:y2="42.3cm">
            <text:p/>
          </draw:line>
          <draw:line draw:style-name="gr38" draw:text-style-name="P4" draw:layer="layout" svg:x1="42.499cm" svg:y1="44.501cm" svg:x2="45cm" svg:y2="44.501cm">
            <text:p/>
          </draw:line>
          <draw:frame draw:style-name="gr628" draw:text-style-name="P37" draw:layer="layout" svg:width="2.644cm" svg:height="0.569cm" svg:x="35.5cm" svg:y="42.132cm">
            <draw:text-box>
              <text:p><text:span text:style-name="T10">regfile_data_w_s</text:span></text:p>
            </draw:text-box>
          </draw:frame>
          <draw:frame draw:style-name="gr679" draw:text-style-name="P37" draw:layer="layout" svg:width="1.493cm" svg:height="0.569cm" svg:x="36.6cm" svg:y="41.833cm">
            <draw:text-box>
              <text:p><text:span text:style-name="T10">result_s</text:span></text:p>
            </draw:text-box>
          </draw:frame>
          <draw:line draw:style-name="gr38" draw:text-style-name="P4" draw:layer="layout" svg:x1="40cm" svg:y1="45.5cm" svg:x2="40cm" svg:y2="45.001cm">
            <text:p/>
          </draw:line>
          <draw:frame draw:style-name="gr696" draw:text-style-name="P37" draw:layer="layout" svg:width="1.823cm" svg:height="0.569cm" svg:x="36.358cm" svg:y="42.563cm">
            <draw:text-box>
              <text:p><text:span text:style-name="T10">ir_s[19:15]</text:span></text:p>
            </draw:text-box>
          </draw:frame>
          <draw:frame draw:style-name="gr696" draw:text-style-name="P37" draw:layer="layout" svg:width="1.823cm" svg:height="0.569cm" svg:x="36.277cm" svg:y="42.932cm">
            <draw:text-box>
              <text:p><text:span text:style-name="T10">ir_s[24:20]</text:span></text:p>
            </draw:text-box>
          </draw:frame>
          <draw:frame draw:style-name="gr697" draw:text-style-name="P37" draw:layer="layout" svg:width="1.645cm" svg:height="0.569cm" svg:x="36.558cm" svg:y="43.501cm">
            <draw:text-box>
              <text:p><text:span text:style-name="T10">ir_s[11:7]</text:span></text:p>
            </draw:text-box>
          </draw:frame>
          <draw:frame draw:style-name="gr640" draw:text-style-name="P37" draw:layer="layout" svg:width="1.399cm" svg:height="0.569cm" svg:x="42.307cm" svg:y="41.901cm">
            <draw:text-box>
              <text:p><text:span text:style-name="T10">regA_s</text:span></text:p>
            </draw:text-box>
          </draw:frame>
          <draw:frame draw:style-name="gr698" draw:text-style-name="P37" draw:layer="layout" svg:width="2.403cm" svg:height="0.569cm" svg:x="42.297cm" svg:y="44.032cm">
            <draw:text-box>
              <text:p><text:span text:style-name="T10">dBusDataWr_s</text:span></text:p>
            </draw:text-box>
          </draw:frame>
          <draw:custom-shape draw:style-name="gr586" draw:text-style-name="P43" draw:layer="layout" svg:width="10cm" svg:height="4cm" svg:x="35cm" svg:y="41.5cm">
            <text:p/>
            <draw:enhanced-geometry svg:viewBox="0 0 21600 21600" draw:type="rectangle" draw:enhanced-path="M 0 0 L 21600 0 21600 21600 0 21600 0 0 Z N"/>
          </draw:custom-shape>
          <draw:frame draw:style-name="gr699" draw:text-style-name="P44" draw:layer="layout" svg:width="1.522cm" svg:height="0.569cm" svg:x="39.078cm" svg:y="41.532cm">
            <draw:text-box>
              <text:p><text:span text:style-name="T12">RegFile</text:span></text:p>
            </draw:text-box>
          </draw:frame>
        </draw:g>
        <draw:frame draw:style-name="gr756" draw:text-style-name="P37" draw:layer="layout" svg:width="1.933cm" svg:height="0.569cm" svg:x="44.8cm" svg:y="41.831cm">
          <draw:text-box>
            <text:p><text:span text:style-name="T10">rf_rdata1_s</text:span></text:p>
          </draw:text-box>
        </draw:frame>
        <draw:line draw:style-name="gr38" draw:text-style-name="P4" draw:layer="layout" svg:x1="45cm" svg:y1="42.3cm" svg:x2="46cm" svg:y2="42.3cm">
          <text:p/>
        </draw:line>
        <draw:line draw:style-name="gr38" draw:text-style-name="P4" draw:layer="layout" svg:x1="45cm" svg:y1="44.5cm" svg:x2="46cm" svg:y2="44.5cm">
          <text:p/>
        </draw:line>
        <draw:line draw:style-name="gr38" draw:text-style-name="P4" draw:layer="layout" svg:x1="34cm" svg:y1="42.6cm" svg:x2="35cm" svg:y2="42.6cm">
          <text:p/>
        </draw:line>
        <draw:line draw:style-name="gr38" draw:text-style-name="P4" draw:layer="layout" svg:x1="34cm" svg:y1="43cm" svg:x2="35cm" svg:y2="43cm">
          <text:p/>
        </draw:line>
        <draw:line draw:style-name="gr38" draw:text-style-name="P4" draw:layer="layout" svg:x1="34cm" svg:y1="43.4cm" svg:x2="35cm" svg:y2="43.4cm">
          <text:p/>
        </draw:line>
        <draw:line draw:style-name="gr38" draw:text-style-name="P4" draw:layer="layout" svg:x1="34cm" svg:y1="43.9cm" svg:x2="35cm" svg:y2="43.9cm">
          <text:p/>
        </draw:line>
        <draw:line draw:style-name="gr38" draw:text-style-name="P4" draw:layer="layout" svg:x1="40cm" svg:y1="45.5cm" svg:x2="40cm" svg:y2="47cm">
          <text:p/>
        </draw:line>
        <draw:frame draw:style-name="gr756" draw:text-style-name="P37" draw:layer="layout" svg:width="1.933cm" svg:height="0.569cm" svg:x="44.801cm" svg:y="44.032cm">
          <draw:text-box>
            <text:p><text:span text:style-name="T10">rf_rdata2_s</text:span></text:p>
          </draw:text-box>
        </draw:frame>
        <draw:frame draw:style-name="gr756" draw:text-style-name="P37" draw:layer="layout" svg:width="2.767cm" svg:height="0.569cm" svg:x="37.402cm" svg:y="45.533cm">
          <draw:text-box>
            <text:p><text:span text:style-name="T10">wb_regWr_final_</text:span><text:span text:style-name="T10">s</text:span></text:p>
          </draw:text-box>
        </draw:frame>
        <draw:frame draw:style-name="gr756" draw:text-style-name="P37" draw:layer="layout" svg:width="1.967cm" svg:height="0.569cm" svg:x="33.201cm" svg:y="42.501cm">
          <draw:text-box>
            <text:p><text:span text:style-name="T10">if_id_instr_r</text:span></text:p>
          </draw:text-box>
        </draw:frame>
        <draw:frame draw:style-name="gr756" draw:text-style-name="P37" draw:layer="layout" svg:width="1.967cm" svg:height="0.569cm" svg:x="33.202cm" svg:y="42.902cm">
          <draw:text-box>
            <text:p><text:span text:style-name="T10">if_id_instr_r</text:span></text:p>
          </draw:text-box>
        </draw:frame>
        <draw:frame draw:style-name="gr756" draw:text-style-name="P37" draw:layer="layout" svg:width="2.598cm" svg:height="0.569cm" svg:x="32.603cm" svg:y="43.403cm">
          <draw:text-box>
            <text:p><text:span text:style-name="T10">mem_wb_instr_r</text:span></text:p>
          </draw:text-box>
        </draw:frame>
        <draw:frame draw:style-name="gr756" draw:text-style-name="P37" draw:layer="layout" svg:width="2.013cm" svg:height="0.569cm" svg:x="33.202cm" svg:y="42.102cm">
          <draw:text-box>
            <text:p><text:span text:style-name="T10">wb_result_s</text:span></text:p>
          </draw:text-box>
        </draw:frame>
        <draw:g draw:style-name="gr1">
          <draw:frame draw:style-name="gr660" draw:text-style-name="P37" draw:layer="layout" svg:width="2.327cm" svg:height="0.569cm" svg:x="69.3cm" svg:y="32.331cm">
            <draw:text-box>
              <text:p><text:span text:style-name="T10">csr_mcause_s</text:span></text:p>
            </draw:text-box>
          </draw:frame>
          <draw:line draw:style-name="gr38" draw:text-style-name="P4" draw:layer="layout" svg:x1="69.5cm" svg:y1="32.9cm" svg:x2="72cm" svg:y2="32.9cm">
            <text:p/>
          </draw:line>
          <draw:custom-shape draw:style-name="gr673" draw:text-style-name="P43" draw:layer="layout" svg:width="14cm" svg:height="6cm" svg:x="58cm" svg:y="29cm">
            <text:p/>
            <draw:enhanced-geometry svg:viewBox="0 0 21600 21600" draw:mirror-horizontal="false" draw:mirror-vertical="false" draw:type="rectangle" draw:enhanced-path="M 0 0 L 21600 0 21600 21600 0 21600 0 0 Z N"/>
          </draw:custom-shape>
          <draw:frame draw:style-name="gr662" draw:text-style-name="P44" draw:layer="layout" svg:width="2.5cm" svg:height="0.569cm" svg:x="67.3cm" svg:y="31.5cm">
            <draw:text-box>
              <text:p><text:span text:style-name="T12">CSR: MCAUSE</text:span></text:p>
            </draw:text-box>
          </draw:frame>
          <draw:polygon draw:style-name="gr58" draw:text-style-name="P1" draw:layer="layout" svg:width="0.499cm" svg:height="0.999cm" svg:x="63.502cm" svg:y="31.5cm" svg:viewBox="0 0 500 1000" draw:points="0,0 0,1000 500,850 500,150">
            <text:p/>
          </draw:polygon>
          <draw:line draw:style-name="gr146" draw:text-style-name="P4" draw:layer="layout" svg:x1="63.802cm" svg:y1="32.9cm" svg:x2="63.802cm" svg:y2="32.4cm">
            <text:p/>
          </draw:line>
          <draw:line draw:style-name="gr38" draw:text-style-name="P4" draw:layer="layout" svg:x1="63cm" svg:y1="31.799cm" svg:x2="63.502cm" svg:y2="31.8cm">
            <text:p/>
          </draw:line>
          <draw:line draw:style-name="gr38" draw:text-style-name="P4" draw:layer="layout" svg:x1="63cm" svg:y1="32.2cm" svg:x2="63.502cm" svg:y2="32.2cm">
            <text:p/>
          </draw:line>
          <draw:frame draw:style-name="gr564" draw:text-style-name="P37" draw:layer="layout" svg:width="1.129cm" svg:height="0.569cm" svg:x="60.6cm" svg:y="29.831cm">
            <draw:text-box>
              <text:p><text:span text:style-name="T10">store</text:span></text:p>
            </draw:text-box>
          </draw:frame>
          <draw:g draw:style-name="gr1">
            <draw:custom-shape draw:style-name="gr550" draw:text-style-name="P48" draw:layer="layout" svg:width="0.5cm" svg:height="1cm" svg:x="69cm" svg:y="32.6cm">
              <text:p/>
              <draw:enhanced-geometry svg:viewBox="0 0 21600 21600" draw:mirror-horizontal="false" draw:mirror-vertical="false" draw:type="rectangle" draw:enhanced-path="M 0 0 L 21600 0 21600 21600 0 21600 0 0 Z N"/>
            </draw:custom-shape>
            <draw:line draw:style-name="gr60" draw:text-style-name="P11" draw:layer="layout" svg:x1="69cm" svg:y1="33.55cm" svg:x2="69.15cm" svg:y2="33.5cm">
              <text:p/>
            </draw:line>
            <draw:line draw:style-name="gr60" draw:text-style-name="P11" draw:layer="layout" svg:x1="69cm" svg:y1="33.45cm" svg:x2="69.15cm" svg:y2="33.5cm">
              <text:p/>
            </draw:line>
          </draw:g>
          <draw:line draw:style-name="gr38" draw:text-style-name="P4" draw:layer="layout" svg:x1="68.002cm" svg:y1="32.8cm" svg:x2="69cm" svg:y2="32.8cm">
            <text:p/>
          </draw:line>
          <draw:polygon draw:style-name="gr58" draw:text-style-name="P1" draw:layer="layout" svg:width="0.499cm" svg:height="0.999cm" svg:x="67.5cm" svg:y="32.3cm" svg:viewBox="0 0 500 1000" draw:points="0,0 0,1000 500,850 500,150">
            <text:p/>
          </draw:polygon>
          <draw:line draw:style-name="gr146" draw:text-style-name="P4" draw:layer="layout" svg:x1="67.8cm" svg:y1="33.7cm" svg:x2="67.8cm" svg:y2="33.2cm">
            <text:p/>
          </draw:line>
          <draw:line draw:style-name="gr38" draw:text-style-name="P4" draw:layer="layout" svg:x1="66.998cm" svg:y1="32.599cm" svg:x2="67.5cm" svg:y2="32.6cm">
            <text:p/>
          </draw:line>
          <draw:line draw:style-name="gr38" draw:text-style-name="P4" draw:layer="layout" svg:x1="66.998cm" svg:y1="33cm" svg:x2="67.5cm" svg:y2="33cm">
            <text:p/>
          </draw:line>
          <draw:frame draw:style-name="gr562" draw:text-style-name="P37" draw:layer="layout" svg:width="2.14cm" svg:height="0.569cm" svg:x="66.7cm" svg:y="33.631cm">
            <draw:text-box>
              <text:p><text:span text:style-name="T10">trap_taken_s</text:span></text:p>
            </draw:text-box>
          </draw:frame>
          <draw:polygon draw:style-name="gr58" draw:text-style-name="P1" draw:layer="layout" svg:width="0.499cm" svg:height="0.999cm" svg:x="65.502cm" svg:y="32.5cm" svg:viewBox="0 0 500 1000" draw:points="0,0 0,1000 500,850 500,150">
            <text:p/>
          </draw:polygon>
          <draw:line draw:style-name="gr146" draw:text-style-name="P4" draw:layer="layout" svg:x1="65.802cm" svg:y1="33.9cm" svg:x2="65.802cm" svg:y2="33.4cm">
            <text:p/>
          </draw:line>
          <draw:line draw:style-name="gr38" draw:text-style-name="P4" draw:layer="layout" svg:x1="65cm" svg:y1="32.799cm" svg:x2="65.502cm" svg:y2="32.8cm">
            <text:p/>
          </draw:line>
          <draw:line draw:style-name="gr38" draw:text-style-name="P4" draw:layer="layout" svg:x1="65cm" svg:y1="33.2cm" svg:x2="65.502cm" svg:y2="33.2cm">
            <text:p/>
          </draw:line>
          <draw:frame draw:style-name="gr383" draw:text-style-name="P37" draw:layer="layout" svg:width="2.17cm" svg:height="0.569cm" svg:x="64.6cm" svg:y="33.831cm">
            <draw:text-box>
              <text:p><text:span text:style-name="T10">trap_illegal_s</text:span></text:p>
            </draw:text-box>
          </draw:frame>
          <draw:line draw:style-name="gr38" draw:text-style-name="P4" draw:layer="layout" svg:x1="66.002cm" svg:y1="32.996cm" svg:x2="67cm" svg:y2="32.996cm">
            <text:p/>
          </draw:line>
          <draw:frame draw:style-name="gr674" draw:text-style-name="P37" draw:layer="layout" svg:width="1.184cm" svg:height="0.569cm" svg:x="64.516cm" svg:y="32.831cm">
            <draw:text-box>
              <text:p><text:span text:style-name="T10">64'd2</text:span></text:p>
            </draw:text-box>
          </draw:frame>
          <draw:frame draw:style-name="gr643" draw:text-style-name="P37" draw:layer="layout" svg:width="2.801cm" svg:height="0.569cm" svg:x="62cm" svg:y="32.8cm">
            <draw:text-box>
              <text:p><text:span text:style-name="T10">trap_misaligned_</text:span><text:span text:style-name="T10">s</text:span></text:p>
            </draw:text-box>
          </draw:frame>
          <draw:line draw:style-name="gr38" draw:text-style-name="P4" draw:layer="layout" svg:x1="64.002cm" svg:y1="32cm" svg:x2="65cm" svg:y2="32cm">
            <text:p/>
          </draw:line>
          <draw:line draw:style-name="gr38" draw:text-style-name="P4" draw:layer="layout" svg:x1="65cm" svg:y1="32cm" svg:x2="65cm" svg:y2="32.799cm">
            <text:p/>
          </draw:line>
          <draw:polygon draw:style-name="gr58" draw:text-style-name="P1" draw:layer="layout" svg:width="0.499cm" svg:height="0.999cm" svg:x="61.5cm" svg:y="32cm" svg:viewBox="0 0 500 1000" draw:points="0,0 0,1000 500,850 500,150">
            <text:p/>
          </draw:polygon>
          <draw:line draw:style-name="gr146" draw:text-style-name="P4" draw:layer="layout" svg:x1="61.8cm" svg:y1="33.4cm" svg:x2="61.8cm" svg:y2="32.9cm">
            <text:p/>
          </draw:line>
          <draw:line draw:style-name="gr38" draw:text-style-name="P4" draw:layer="layout" svg:x1="60.998cm" svg:y1="32.299cm" svg:x2="61.5cm" svg:y2="32.3cm">
            <text:p/>
          </draw:line>
          <draw:line draw:style-name="gr38" draw:text-style-name="P4" draw:layer="layout" svg:x1="60.998cm" svg:y1="32.7cm" svg:x2="61.5cm" svg:y2="32.7cm">
            <text:p/>
          </draw:line>
          <draw:frame draw:style-name="gr675" draw:text-style-name="P37" draw:layer="layout" svg:width="1.95cm" svg:height="0.569cm" svg:x="60.601cm" svg:y="33.301cm">
            <draw:text-box>
              <text:p><text:span text:style-name="T10">dMemRd_s</text:span></text:p>
            </draw:text-box>
          </draw:frame>
          <draw:frame draw:style-name="gr674" draw:text-style-name="P37" draw:layer="layout" svg:width="1.184cm" svg:height="0.569cm" svg:x="60.516cm" svg:y="32.331cm">
            <draw:text-box>
              <text:p><text:span text:style-name="T10">64'd4</text:span></text:p>
            </draw:text-box>
          </draw:frame>
          <draw:line draw:style-name="gr38" draw:text-style-name="P4" draw:layer="layout" svg:x1="62cm" svg:y1="32.5cm" svg:x2="63cm" svg:y2="32.5cm">
            <text:p/>
          </draw:line>
          <draw:line draw:style-name="gr38" draw:text-style-name="P4" draw:layer="layout" svg:x1="63cm" svg:y1="32.5cm" svg:x2="63cm" svg:y2="32.2cm">
            <text:p/>
          </draw:line>
          <draw:polygon draw:style-name="gr58" draw:text-style-name="P1" draw:layer="layout" svg:width="0.499cm" svg:height="0.999cm" svg:x="59.5cm" svg:y="31.5cm" svg:viewBox="0 0 500 1000" draw:points="0,0 0,1000 500,850 500,150">
            <text:p/>
          </draw:polygon>
          <draw:line draw:style-name="gr146" draw:text-style-name="P4" draw:layer="layout" svg:x1="59.8cm" svg:y1="32.9cm" svg:x2="59.8cm" svg:y2="32.4cm">
            <text:p/>
          </draw:line>
          <draw:line draw:style-name="gr38" draw:text-style-name="P4" draw:layer="layout" svg:x1="58.998cm" svg:y1="31.799cm" svg:x2="59.5cm" svg:y2="31.8cm">
            <text:p/>
          </draw:line>
          <draw:line draw:style-name="gr38" draw:text-style-name="P4" draw:layer="layout" svg:x1="58.998cm" svg:y1="32.2cm" svg:x2="59.5cm" svg:y2="32.2cm">
            <text:p/>
          </draw:line>
          <draw:frame draw:style-name="gr674" draw:text-style-name="P37" draw:layer="layout" svg:width="1.184cm" svg:height="0.569cm" svg:x="58.516cm" svg:y="31.8cm">
            <draw:text-box>
              <text:p><text:span text:style-name="T10">64'd6</text:span></text:p>
            </draw:text-box>
          </draw:frame>
          <draw:frame draw:style-name="gr676" draw:text-style-name="P37" draw:layer="layout" svg:width="1.946cm" svg:height="0.569cm" svg:x="58.701cm" svg:y="32.802cm">
            <draw:text-box>
              <text:p><text:span text:style-name="T10">dMemWr_s</text:span></text:p>
            </draw:text-box>
          </draw:frame>
          <draw:frame draw:style-name="gr674" draw:text-style-name="P37" draw:layer="layout" svg:width="1.184cm" svg:height="0.569cm" svg:x="58.516cm" svg:y="31.401cm">
            <draw:text-box>
              <text:p><text:span text:style-name="T10">64'd0</text:span></text:p>
            </draw:text-box>
          </draw:frame>
          <draw:line draw:style-name="gr38" draw:text-style-name="P4" draw:layer="layout" svg:x1="60cm" svg:y1="32cm" svg:x2="61cm" svg:y2="32cm">
            <text:p/>
          </draw:line>
          <draw:line draw:style-name="gr38" draw:text-style-name="P4" draw:layer="layout" svg:x1="61cm" svg:y1="32cm" svg:x2="60.998cm" svg:y2="32.299cm">
            <text:p/>
          </draw:line>
          <draw:polygon draw:style-name="gr58" draw:text-style-name="P1" draw:layer="layout" svg:width="0.499cm" svg:height="0.999cm" svg:x="61.501cm" svg:y="30.001cm" svg:viewBox="0 0 500 1000" draw:points="0,0 0,1000 500,850 500,150">
            <text:p/>
          </draw:polygon>
          <draw:line draw:style-name="gr146" draw:text-style-name="P4" draw:layer="layout" svg:x1="61.801cm" svg:y1="31.401cm" svg:x2="61.801cm" svg:y2="30.901cm">
            <text:p/>
          </draw:line>
          <draw:line draw:style-name="gr38" draw:text-style-name="P4" draw:layer="layout" svg:x1="60.999cm" svg:y1="30.3cm" svg:x2="61.501cm" svg:y2="30.301cm">
            <text:p/>
          </draw:line>
          <draw:line draw:style-name="gr38" draw:text-style-name="P4" draw:layer="layout" svg:x1="60.999cm" svg:y1="30.701cm" svg:x2="61.501cm" svg:y2="30.701cm">
            <text:p/>
          </draw:line>
          <draw:frame draw:style-name="gr677" draw:text-style-name="P37" draw:layer="layout" svg:width="2.195cm" svg:height="0.569cm" svg:x="59.5cm" svg:y="30.231cm">
            <draw:text-box>
              <text:p><text:span text:style-name="T10">{1'b1, 63'd11}</text:span></text:p>
            </draw:text-box>
          </draw:frame>
          <draw:frame draw:style-name="gr627" draw:text-style-name="P37" draw:layer="layout" svg:width="2.28cm" svg:height="0.569cm" svg:x="60.7cm" svg:y="31.231cm">
            <draw:text-box>
              <text:p><text:span text:style-name="T10">irq_pending_s</text:span></text:p>
            </draw:text-box>
          </draw:frame>
          <draw:frame draw:style-name="gr564" draw:text-style-name="P37" draw:layer="layout" svg:width="1.129cm" svg:height="0.569cm" svg:x="66.601cm" svg:y="32.132cm">
            <draw:text-box>
              <text:p><text:span text:style-name="T10">store</text:span></text:p>
            </draw:text-box>
          </draw:frame>
          <draw:line draw:style-name="gr38" draw:text-style-name="P4" draw:layer="layout" svg:x1="62.001cm" svg:y1="30.5cm" svg:x2="63cm" svg:y2="30.5cm">
            <text:p/>
          </draw:line>
          <draw:line draw:style-name="gr38" draw:text-style-name="P4" draw:layer="layout" svg:x1="63cm" svg:y1="30.5cm" svg:x2="63cm" svg:y2="31.799cm">
            <text:p/>
          </draw:line>
          <draw:line draw:style-name="gr38" draw:text-style-name="P4" draw:layer="layout" svg:x1="67.8cm" svg:y1="34.1cm" svg:x2="67.8cm" svg:y2="35cm">
            <text:p/>
          </draw:line>
          <draw:line draw:style-name="gr38" draw:text-style-name="P4" draw:layer="layout" svg:x1="65.8cm" svg:y1="34.4cm" svg:x2="65.8cm" svg:y2="35cm">
            <text:p/>
          </draw:line>
          <draw:line draw:style-name="gr38" draw:text-style-name="P4" draw:layer="layout" svg:x1="63.8cm" svg:y1="33.3cm" svg:x2="63.8cm" svg:y2="35cm">
            <text:p/>
          </draw:line>
          <draw:line draw:style-name="gr38" draw:text-style-name="P4" draw:layer="layout" svg:x1="61.8cm" svg:y1="33.87cm" svg:x2="61.8cm" svg:y2="35cm">
            <text:p/>
          </draw:line>
          <draw:line draw:style-name="gr38" draw:text-style-name="P4" draw:layer="layout" svg:x1="59.8cm" svg:y1="33.371cm" svg:x2="59.8cm" svg:y2="35cm">
            <text:p/>
          </draw:line>
          <draw:line draw:style-name="gr38" draw:text-style-name="P4" draw:layer="layout" svg:x1="58cm" svg:y1="31.1cm" svg:x2="61cm" svg:y2="31.1cm">
            <text:p/>
          </draw:line>
          <draw:line draw:style-name="gr38" draw:text-style-name="P4" draw:layer="layout" svg:x1="61cm" svg:y1="31.3cm" svg:x2="61cm" svg:y2="31.1cm">
            <text:p/>
          </draw:line>
        </draw:g>
        <draw:line draw:style-name="gr38" draw:text-style-name="P4" draw:layer="layout" svg:x1="72cm" svg:y1="32.9cm" svg:x2="73cm" svg:y2="32.9cm">
          <text:p/>
        </draw:line>
        <draw:frame draw:style-name="gr756" draw:text-style-name="P37" draw:layer="layout" svg:width="2.28cm" svg:height="0.569cm" svg:x="71.8cm" svg:y="32.4cm">
          <draw:text-box>
            <text:p><text:span text:style-name="T10">csr_mcause_r</text:span></text:p>
          </draw:text-box>
        </draw:frame>
        <draw:frame draw:style-name="gr756" draw:text-style-name="P37" draw:layer="layout" svg:width="2.661cm" svg:height="0.569cm" svg:x="66.5cm" svg:y="35cm">
          <draw:text-box>
            <text:p><text:span text:style-name="T10">wb_trap_taken_s</text:span></text:p>
          </draw:text-box>
        </draw:frame>
        <draw:frame draw:style-name="gr756" draw:text-style-name="P37" draw:layer="layout" svg:width="2.691cm" svg:height="0.569cm" svg:x="64.501cm" svg:y="35.301cm">
          <draw:text-box>
            <text:p><text:span text:style-name="T10">wb_trap_illegal_s</text:span></text:p>
          </draw:text-box>
        </draw:frame>
        <draw:frame draw:style-name="gr756" draw:text-style-name="P37" draw:layer="layout" svg:width="3.321cm" svg:height="0.569cm" svg:x="62.502cm" svg:y="35.002cm">
          <draw:text-box>
            <text:p><text:span text:style-name="T10">wb_trap_misalign</text:span><text:span text:style-name="T10">ed_s</text:span></text:p>
          </draw:text-box>
        </draw:frame>
        <draw:frame draw:style-name="gr756" draw:text-style-name="P37" draw:layer="layout" svg:width="2.801cm" svg:height="0.569cm" svg:x="55.403cm" svg:y="30.603cm">
          <draw:text-box>
            <text:p><text:span text:style-name="T10">wb_irq_pending_</text:span><text:span text:style-name="T10">s</text:span></text:p>
          </draw:text-box>
        </draw:frame>
        <draw:line draw:style-name="gr38" draw:text-style-name="P4" draw:layer="layout" svg:x1="59.8cm" svg:y1="35cm" svg:x2="59.8cm" svg:y2="36cm">
          <text:p/>
        </draw:line>
        <draw:line draw:style-name="gr38" draw:text-style-name="P4" draw:layer="layout" svg:x1="61.8cm" svg:y1="35cm" svg:x2="61.8cm" svg:y2="36cm">
          <text:p/>
        </draw:line>
        <draw:line draw:style-name="gr38" draw:text-style-name="P4" draw:layer="layout" svg:x1="63.8cm" svg:y1="35cm" svg:x2="63.8cm" svg:y2="36cm">
          <text:p/>
        </draw:line>
        <draw:line draw:style-name="gr38" draw:text-style-name="P4" draw:layer="layout" svg:x1="65.8cm" svg:y1="35cm" svg:x2="65.8cm" svg:y2="36cm">
          <text:p/>
        </draw:line>
        <draw:line draw:style-name="gr38" draw:text-style-name="P4" draw:layer="layout" svg:x1="67.8cm" svg:y1="35cm" svg:x2="67.8cm" svg:y2="36cm">
          <text:p/>
        </draw:line>
        <draw:line draw:style-name="gr38" draw:text-style-name="P4" draw:layer="layout" svg:x1="57cm" svg:y1="31.1cm" svg:x2="58cm" svg:y2="31.1cm">
          <text:p/>
        </draw:line>
        <draw:frame draw:style-name="gr756" draw:text-style-name="P37" draw:layer="layout" svg:width="3.36cm" svg:height="0.569cm" svg:x="60.303cm" svg:y="35.303cm">
          <draw:text-box>
            <text:p><text:span text:style-name="T10">mem_wb_inst_r </text:span><text:span text:style-name="T10">= load</text:span></text:p>
          </draw:text-box>
        </draw:frame>
        <draw:frame draw:style-name="gr756" draw:text-style-name="P37" draw:layer="layout" svg:width="3.457cm" svg:height="0.569cm" svg:x="58.303cm" svg:y="35.004cm">
          <draw:text-box>
            <text:p><text:span text:style-name="T10">mem_wb_inst_r </text:span><text:span text:style-name="T10">= store</text:span></text:p>
          </draw:text-box>
        </draw:frame>
        <draw:g draw:style-name="gr1">
          <draw:frame draw:style-name="gr670" draw:text-style-name="P37" draw:layer="layout" svg:width="2.094cm" svg:height="0.569cm" svg:x="69.806cm" svg:y="22.531cm">
            <draw:text-box>
              <text:p><text:span text:style-name="T10">csr_mtvec_s</text:span></text:p>
            </draw:text-box>
          </draw:frame>
          <draw:custom-shape draw:style-name="gr656" draw:text-style-name="P43" draw:layer="layout" svg:width="15cm" svg:height="4cm" svg:x="57cm" svg:y="22cm">
            <text:p/>
            <draw:enhanced-geometry svg:viewBox="0 0 21600 21600" draw:mirror-horizontal="false" draw:mirror-vertical="false" draw:type="rectangle" draw:enhanced-path="M 0 0 L 21600 0 21600 21600 0 21600 0 0 Z N"/>
          </draw:custom-shape>
          <draw:frame draw:style-name="gr662" draw:text-style-name="P44" draw:layer="layout" svg:width="2.3cm" svg:height="0.569cm" svg:x="68.7cm" svg:y="22.031cm">
            <draw:text-box>
              <text:p><text:span text:style-name="T12">CSR: MTVEC</text:span></text:p>
            </draw:text-box>
          </draw:frame>
          <draw:polygon draw:style-name="gr58" draw:text-style-name="P1" draw:layer="layout" svg:width="0.499cm" svg:height="0.999cm" svg:x="68.002cm" svg:y="22.504cm" svg:viewBox="0 0 500 1000" draw:points="0,0 0,1000 500,850 500,150">
            <text:p/>
          </draw:polygon>
          <draw:line draw:style-name="gr146" draw:text-style-name="P4" draw:layer="layout" svg:x1="68.302cm" svg:y1="23.904cm" svg:x2="68.302cm" svg:y2="23.404cm">
            <text:p/>
          </draw:line>
          <draw:line draw:style-name="gr38" draw:text-style-name="P4" draw:layer="layout" svg:x1="67.5cm" svg:y1="22.803cm" svg:x2="68.002cm" svg:y2="22.804cm">
            <text:p/>
          </draw:line>
          <draw:line draw:style-name="gr38" draw:text-style-name="P4" draw:layer="layout" svg:x1="67.5cm" svg:y1="23.204cm" svg:x2="68.002cm" svg:y2="23.204cm">
            <text:p/>
          </draw:line>
          <draw:frame draw:style-name="gr564" draw:text-style-name="P37" draw:layer="layout" svg:width="1.129cm" svg:height="0.569cm" svg:x="67cm" svg:y="22.335cm">
            <draw:text-box>
              <text:p><text:span text:style-name="T10">store</text:span></text:p>
            </draw:text-box>
          </draw:frame>
          <draw:frame draw:style-name="gr658" draw:text-style-name="P37" draw:layer="layout" svg:width="10.087cm" svg:height="2.159cm" svg:x="57.1cm" svg:y="22.313cm">
            <draw:text-box>
              <text:p><text:span text:style-name="T10">case </text:span><text:span text:style-name="T10">(mem_wb_instr_r</text:span><text:span text:style-name="T10">[14:12])</text:span></text:p>
              <text:p><text:span text:style-name="T10"><text:s text:c="8"/></text:span><text:span text:style-name="T10">3'b001, </text:span><text:span text:style-name="T10">3'b101: </text:span><text:span text:style-name="T10">csr_mtvec_r &lt;= </text:span><text:span text:style-name="T10">mem_wb_csr_wd</text:span><text:span text:style-name="T10">ata_r;</text:span></text:p>
              <text:p><text:span text:style-name="T10"><text:s text:c="8"/></text:span><text:span text:style-name="T10">3'b010, </text:span><text:span text:style-name="T10">3'b110: </text:span><text:span text:style-name="T10">csr_mtvec_r &lt;= </text:span><text:span text:style-name="T10">csr_mtvec_r | </text:span><text:span text:style-name="T10">mem_wb_csr_wd</text:span><text:span text:style-name="T10">ata_r;</text:span></text:p>
              <text:p><text:span text:style-name="T10"><text:s text:c="8"/></text:span><text:span text:style-name="T10">3'b011, </text:span><text:span text:style-name="T10">3'b111: </text:span><text:span text:style-name="T10">csr_mtvec_r &lt;= </text:span><text:span text:style-name="T10">csr_mtvec_r &amp; </text:span><text:span text:style-name="T10">~mem_wb_csr_w</text:span><text:span text:style-name="T10">data_r;</text:span></text:p>
              <text:p><text:span text:style-name="T10"><text:s text:c="8"/></text:span><text:span text:style-name="T10">default:;</text:span></text:p>
              <text:p><text:span text:style-name="T10"><text:s text:c="6"/></text:span><text:span text:style-name="T10">endcase</text:span></text:p>
            </draw:text-box>
          </draw:frame>
          <draw:g draw:style-name="gr1">
            <draw:custom-shape draw:style-name="gr550" draw:text-style-name="P48" draw:layer="layout" svg:width="0.5cm" svg:height="1cm" svg:x="69.5cm" svg:y="22.8cm">
              <text:p/>
              <draw:enhanced-geometry svg:viewBox="0 0 21600 21600" draw:mirror-horizontal="false" draw:mirror-vertical="false" draw:type="rectangle" draw:enhanced-path="M 0 0 L 21600 0 21600 21600 0 21600 0 0 Z N"/>
            </draw:custom-shape>
            <draw:line draw:style-name="gr60" draw:text-style-name="P11" draw:layer="layout" svg:x1="69.5cm" svg:y1="23.75cm" svg:x2="69.65cm" svg:y2="23.7cm">
              <text:p/>
            </draw:line>
            <draw:line draw:style-name="gr60" draw:text-style-name="P11" draw:layer="layout" svg:x1="69.5cm" svg:y1="23.65cm" svg:x2="69.65cm" svg:y2="23.7cm">
              <text:p/>
            </draw:line>
          </draw:g>
          <draw:line draw:style-name="gr38" draw:text-style-name="P4" draw:layer="layout" svg:x1="68.502cm" svg:y1="23cm" svg:x2="69.5cm" svg:y2="23cm">
            <text:p/>
          </draw:line>
          <draw:line draw:style-name="gr38" draw:text-style-name="P4" draw:layer="layout" svg:x1="70cm" svg:y1="23cm" svg:x2="72cm" svg:y2="23cm">
            <text:p/>
          </draw:line>
          <draw:frame draw:style-name="gr658" draw:text-style-name="P37" draw:layer="layout" svg:width="5.773cm" svg:height="1.523cm" svg:x="66.113cm" svg:y="24cm">
            <draw:text-box>
              <text:p><text:span text:style-name="T10">wb_commit_s &amp;&amp;</text:span></text:p>
              <text:p><text:span text:style-name="T10">!wb_trap_taken_s </text:span><text:span text:style-name="T10">&amp;&amp;</text:span></text:p>
              <text:p><text:span text:style-name="T10">(mem_wb_instr_r</text:span><text:span text:style-name="T10">[6:0] == </text:span><text:span text:style-name="T10">7'b1110011) &amp;&amp; </text:span></text:p>
              <text:p><text:span text:style-name="T10">(mem_wb_instr_r</text:span><text:span text:style-name="T10">[31:20] == </text:span><text:span text:style-name="T10">12'h305)</text:span></text:p>
            </draw:text-box>
          </draw:frame>
          <draw:line draw:style-name="gr38" draw:text-style-name="P4" draw:layer="layout" svg:x1="67cm" svg:y1="23.2cm" svg:x2="67.5cm" svg:y2="23.204cm">
            <text:p/>
          </draw:line>
        </draw:g>
        <draw:line draw:style-name="gr38" draw:text-style-name="P4" draw:layer="layout" svg:x1="72cm" svg:y1="23.001cm" svg:x2="73cm" svg:y2="23.001cm">
          <text:p/>
        </draw:line>
        <draw:frame draw:style-name="gr756" draw:text-style-name="P37" draw:layer="layout" svg:width="2.043cm" svg:height="0.569cm" svg:x="71.8cm" svg:y="22.501cm">
          <draw:text-box>
            <text:p><text:span text:style-name="T10">csr_mtvec_r</text:span></text:p>
          </draw:text-box>
        </draw:frame>
        <draw:line draw:style-name="gr38" draw:text-style-name="P4" draw:layer="layout" svg:x1="56cm" svg:y1="22.5cm" svg:x2="57cm" svg:y2="22.5cm">
          <text:p/>
        </draw:line>
        <draw:line draw:style-name="gr38" draw:text-style-name="P4" draw:layer="layout" svg:x1="64cm" svg:y1="26cm" svg:x2="64cm" svg:y2="27cm">
          <text:p/>
        </draw:line>
        <draw:line draw:style-name="gr38" draw:text-style-name="P4" draw:layer="layout" svg:x1="70cm" svg:y1="26cm" svg:x2="70cm" svg:y2="27cm">
          <text:p/>
        </draw:line>
        <draw:frame draw:style-name="gr756" draw:text-style-name="P37" draw:layer="layout" svg:width="3.351cm" svg:height="0.569cm" svg:x="53.8cm" svg:y="22cm">
          <draw:text-box>
            <text:p><text:span text:style-name="T10">mem_wb_csr_wd</text:span><text:span text:style-name="T10">ata_r</text:span></text:p>
          </draw:text-box>
        </draw:frame>
        <draw:frame draw:style-name="gr756" draw:text-style-name="P37" draw:layer="layout" svg:width="2.598cm" svg:height="0.569cm" svg:x="61.6cm" svg:y="26cm">
          <draw:text-box>
            <text:p><text:span text:style-name="T10">mem_wb_instr_r</text:span></text:p>
          </draw:text-box>
        </draw:frame>
        <draw:frame draw:style-name="gr756" draw:text-style-name="P37" draw:layer="layout" svg:width="2.233cm" svg:height="0.569cm" svg:x="69.3cm" svg:y="26.001cm">
          <draw:text-box>
            <text:p><text:span text:style-name="T10">wb_commit_s</text:span></text:p>
          </draw:text-box>
        </draw:frame>
        <draw:frame draw:style-name="gr756" draw:text-style-name="P37" draw:layer="layout" svg:width="2.661cm" svg:height="0.569cm" svg:x="66.701cm" svg:y="26.302cm">
          <draw:text-box>
            <text:p><text:span text:style-name="T10">wb_trap_taken_s</text:span></text:p>
          </draw:text-box>
        </draw:frame>
        <draw:line draw:style-name="gr38" draw:text-style-name="P4" draw:layer="layout" svg:x1="68cm" svg:y1="26cm" svg:x2="68cm" svg:y2="27cm">
          <text:p/>
        </draw:line>
        <draw:g draw:style-name="gr1">
          <draw:frame draw:style-name="gr670" draw:text-style-name="P37" draw:layer="layout" svg:width="2.094cm" svg:height="0.569cm" svg:x="69.807cm" svg:y="14.531cm">
            <draw:text-box>
              <text:p><text:span text:style-name="T10">csr_mepc_s</text:span></text:p>
            </draw:text-box>
          </draw:frame>
          <draw:custom-shape draw:style-name="gr758" draw:text-style-name="P43" draw:layer="layout" svg:width="17.001cm" svg:height="6cm" svg:x="55cm" svg:y="13cm">
            <text:p/>
            <draw:enhanced-geometry svg:viewBox="0 0 21600 21600" draw:mirror-horizontal="false" draw:mirror-vertical="false" draw:type="rectangle" draw:enhanced-path="M 0 0 L 21600 0 21600 21600 0 21600 0 0 Z N"/>
          </draw:custom-shape>
          <draw:frame draw:style-name="gr662" draw:text-style-name="P44" draw:layer="layout" svg:width="2.3cm" svg:height="0.569cm" svg:x="68.701cm" svg:y="14.031cm">
            <draw:text-box>
              <text:p><text:span text:style-name="T12">CSR: MEPC</text:span></text:p>
            </draw:text-box>
          </draw:frame>
          <draw:frame draw:style-name="gr658" draw:text-style-name="P37" draw:layer="layout" svg:width="9.96cm" svg:height="2.159cm" svg:x="55.101cm" svg:y="13.213cm">
            <draw:text-box>
              <text:p><text:span text:style-name="T10">case </text:span><text:span text:style-name="T10">(mem_wb_instr_r</text:span><text:span text:style-name="T10">[14:12])</text:span></text:p>
              <text:p><text:span text:style-name="T10"><text:s text:c="8"/></text:span><text:span text:style-name="T10">3'b001, </text:span><text:span text:style-name="T10">3'b101: </text:span><text:span text:style-name="T10">csr_mepc_r &lt;= </text:span><text:span text:style-name="T10">mem_wb_csr_wd</text:span><text:span text:style-name="T10">ata_r;</text:span></text:p>
              <text:p><text:span text:style-name="T10"><text:s text:c="8"/></text:span><text:span text:style-name="T10">3'b010, </text:span><text:span text:style-name="T10">3'b110: </text:span><text:span text:style-name="T10">csr_mepc_r &lt;= </text:span><text:span text:style-name="T10">csr_mepc_r | </text:span><text:span text:style-name="T10">mem_wb_csr_wd</text:span><text:span text:style-name="T10">ata_r;</text:span></text:p>
              <text:p><text:span text:style-name="T10"><text:s text:c="8"/></text:span><text:span text:style-name="T10">3'b011, </text:span><text:span text:style-name="T10">3'b111: </text:span><text:span text:style-name="T10">csr_mepc_r &lt;= </text:span><text:span text:style-name="T10">csr_mepc_r &amp; </text:span><text:span text:style-name="T10">~mem_wb_csr_w</text:span><text:span text:style-name="T10">data_r;</text:span></text:p>
              <text:p><text:span text:style-name="T10"><text:s text:c="8"/></text:span><text:span text:style-name="T10">default:;</text:span></text:p>
              <text:p><text:span text:style-name="T10"><text:s text:c="6"/></text:span><text:span text:style-name="T10">endcase</text:span></text:p>
            </draw:text-box>
          </draw:frame>
          <draw:g draw:style-name="gr1">
            <draw:custom-shape draw:style-name="gr550" draw:text-style-name="P48" draw:layer="layout" svg:width="0.5cm" svg:height="1cm" svg:x="69.501cm" svg:y="14.8cm">
              <text:p/>
              <draw:enhanced-geometry svg:viewBox="0 0 21600 21600" draw:mirror-horizontal="false" draw:mirror-vertical="false" draw:type="rectangle" draw:enhanced-path="M 0 0 L 21600 0 21600 21600 0 21600 0 0 Z N"/>
            </draw:custom-shape>
            <draw:line draw:style-name="gr60" draw:text-style-name="P11" draw:layer="layout" svg:x1="69.501cm" svg:y1="15.75cm" svg:x2="69.651cm" svg:y2="15.7cm">
              <text:p/>
            </draw:line>
            <draw:line draw:style-name="gr60" draw:text-style-name="P11" draw:layer="layout" svg:x1="69.501cm" svg:y1="15.65cm" svg:x2="69.651cm" svg:y2="15.7cm">
              <text:p/>
            </draw:line>
          </draw:g>
          <draw:line draw:style-name="gr38" draw:text-style-name="P4" draw:layer="layout" svg:x1="68.503cm" svg:y1="15cm" svg:x2="69.501cm" svg:y2="15cm">
            <text:p/>
          </draw:line>
          <draw:line draw:style-name="gr38" draw:text-style-name="P4" draw:layer="layout" svg:x1="70.001cm" svg:y1="15cm" svg:x2="72.001cm" svg:y2="15cm">
            <text:p/>
          </draw:line>
          <draw:frame draw:style-name="gr658" draw:text-style-name="P37" draw:layer="layout" svg:width="5.773cm" svg:height="1.523cm" svg:x="65.127cm" svg:y="17.5cm">
            <draw:text-box>
              <text:p><text:span text:style-name="T10">wb_commit_s &amp;&amp;</text:span></text:p>
              <text:p><text:span text:style-name="T10">!wb_trap_taken_s </text:span><text:span text:style-name="T10">&amp;&amp;</text:span></text:p>
              <text:p><text:span text:style-name="T10">(mem_wb_instr_r</text:span><text:span text:style-name="T10">[6:0] == </text:span><text:span text:style-name="T10">7'b1110011) &amp;&amp; </text:span></text:p>
              <text:p><text:span text:style-name="T10">(mem_wb_instr_r</text:span><text:span text:style-name="T10">[31:20] == </text:span><text:span text:style-name="T10">12'h341)</text:span></text:p>
            </draw:text-box>
          </draw:frame>
          <draw:polygon draw:style-name="gr58" draw:text-style-name="P1" draw:layer="layout" svg:width="0.499cm" svg:height="0.999cm" svg:x="68cm" svg:y="14.5cm" svg:viewBox="0 0 500 1000" draw:points="0,0 0,1000 500,850 500,150">
            <text:p/>
          </draw:polygon>
          <draw:line draw:style-name="gr38" draw:text-style-name="P4" draw:layer="layout" svg:x1="67cm" svg:y1="14.8cm" svg:x2="68cm" svg:y2="14.8cm">
            <text:p/>
          </draw:line>
          <draw:line draw:style-name="gr38" draw:text-style-name="P4" draw:layer="layout" svg:x1="67cm" svg:y1="15.2cm" svg:x2="68cm" svg:y2="15.2cm">
            <text:p/>
          </draw:line>
          <draw:line draw:style-name="gr146" draw:text-style-name="P4" draw:layer="layout" svg:x1="68.3cm" svg:y1="15.9cm" svg:x2="68.3cm" svg:y2="15.4cm">
            <text:p/>
          </draw:line>
          <draw:frame draw:style-name="gr564" draw:text-style-name="P37" draw:layer="layout" svg:width="2.661cm" svg:height="0.569cm" svg:x="67.5cm" svg:y="15.9cm">
            <draw:text-box>
              <text:p><text:span text:style-name="T10">wb_trap_taken_s</text:span></text:p>
            </draw:text-box>
          </draw:frame>
          <draw:polygon draw:style-name="gr58" draw:text-style-name="P1" draw:layer="layout" svg:width="0.499cm" svg:height="0.999cm" svg:x="66cm" svg:y="15.5cm" svg:viewBox="0 0 500 1000" draw:points="0,0 0,1000 500,850 500,150">
            <text:p/>
          </draw:polygon>
          <draw:line draw:style-name="gr38" draw:text-style-name="P4" draw:layer="layout" svg:x1="65.5cm" svg:y1="15.8cm" svg:x2="66cm" svg:y2="15.8cm">
            <text:p/>
          </draw:line>
          <draw:line draw:style-name="gr38" draw:text-style-name="P4" draw:layer="layout" svg:x1="65.5cm" svg:y1="16.2cm" svg:x2="66cm" svg:y2="16.2cm">
            <text:p/>
          </draw:line>
          <draw:line draw:style-name="gr146" draw:text-style-name="P4" draw:layer="layout" svg:x1="66.3cm" svg:y1="16.9cm" svg:x2="66.3cm" svg:y2="16.4cm">
            <text:p/>
          </draw:line>
          <draw:line draw:style-name="gr38" draw:text-style-name="P4" draw:layer="layout" svg:x1="66.5cm" svg:y1="16cm" svg:x2="67cm" svg:y2="16cm">
            <text:p/>
          </draw:line>
          <draw:line draw:style-name="gr38" draw:text-style-name="P4" draw:layer="layout" svg:x1="67cm" svg:y1="15.2cm" svg:x2="67cm" svg:y2="16cm">
            <text:p/>
          </draw:line>
          <draw:frame draw:style-name="gr564" draw:text-style-name="P37" draw:layer="layout" svg:width="5.819cm" svg:height="0.569cm" svg:x="61.101cm" svg:y="16.801cm">
            <draw:text-box>
              <text:p><text:span text:style-name="T10">wb_trap_illegal_s </text:span><text:span text:style-name="T10">|| </text:span><text:span text:style-name="T10">wb_trap_misalign</text:span><text:span text:style-name="T10">ed_s</text:span></text:p>
            </draw:text-box>
          </draw:frame>
          <draw:frame draw:style-name="gr564" draw:text-style-name="P37" draw:layer="layout" svg:width="2.36cm" svg:height="0.569cm" svg:x="63.339cm" svg:y="15.9cm">
            <draw:text-box>
              <text:p><text:span text:style-name="T10">mem_wb_pc_r</text:span></text:p>
            </draw:text-box>
          </draw:frame>
          <draw:frame draw:style-name="gr564" draw:text-style-name="P37" draw:layer="layout" svg:width="2.843cm" svg:height="0.569cm" svg:x="62.839cm" svg:y="15.501cm">
            <draw:text-box>
              <text:p><text:span text:style-name="T10">mem_wb_pc_r + </text:span><text:span text:style-name="T10">4</text:span></text:p>
            </draw:text-box>
          </draw:frame>
          <draw:polygon draw:style-name="gr58" draw:text-style-name="P1" draw:layer="layout" svg:width="0.499cm" svg:height="0.999cm" svg:x="66.003cm" svg:y="13.505cm" svg:viewBox="0 0 500 1000" draw:points="0,0 0,1000 500,850 500,150">
            <text:p/>
          </draw:polygon>
          <draw:line draw:style-name="gr146" draw:text-style-name="P4" draw:layer="layout" svg:x1="66.3cm" svg:y1="15cm" svg:x2="66.303cm" svg:y2="14.405cm">
            <text:p/>
          </draw:line>
          <draw:line draw:style-name="gr38" draw:text-style-name="P4" draw:layer="layout" svg:x1="65.501cm" svg:y1="13.804cm" svg:x2="66.003cm" svg:y2="13.805cm">
            <text:p/>
          </draw:line>
          <draw:line draw:style-name="gr38" draw:text-style-name="P4" draw:layer="layout" svg:x1="65.501cm" svg:y1="14.205cm" svg:x2="66.003cm" svg:y2="14.205cm">
            <text:p/>
          </draw:line>
          <draw:frame draw:style-name="gr564" draw:text-style-name="P37" draw:layer="layout" svg:width="1.129cm" svg:height="0.569cm" svg:x="65.001cm" svg:y="13.336cm">
            <draw:text-box>
              <text:p><text:span text:style-name="T10">store</text:span></text:p>
            </draw:text-box>
          </draw:frame>
          <draw:line draw:style-name="gr38" draw:text-style-name="P4" draw:layer="layout" svg:x1="65.001cm" svg:y1="14.201cm" svg:x2="65.501cm" svg:y2="14.205cm">
            <text:p/>
          </draw:line>
          <draw:line draw:style-name="gr38" draw:text-style-name="P4" draw:layer="layout" svg:x1="66.503cm" svg:y1="14cm" svg:x2="67cm" svg:y2="14cm">
            <text:p/>
          </draw:line>
          <draw:line draw:style-name="gr38" draw:text-style-name="P4" draw:layer="layout" svg:x1="67cm" svg:y1="14cm" svg:x2="67cm" svg:y2="14.8cm">
            <text:p/>
          </draw:line>
          <draw:line draw:style-name="gr38" draw:text-style-name="P4" draw:layer="layout" svg:x1="67.4cm" svg:y1="17.5cm" svg:x2="67.4cm" svg:y2="15cm">
            <text:p/>
          </draw:line>
          <draw:line draw:style-name="gr38" draw:text-style-name="P4" draw:layer="layout" svg:x1="67.4cm" svg:y1="15cm" svg:x2="66.3cm" svg:y2="15cm">
            <text:p/>
          </draw:line>
        </draw:g>
        <draw:line draw:style-name="gr38" draw:text-style-name="P4" draw:layer="layout" svg:x1="72.001cm" svg:y1="15.001cm" svg:x2="73.001cm" svg:y2="15.001cm">
          <text:p/>
        </draw:line>
        <draw:frame draw:style-name="gr756" draw:text-style-name="P37" draw:layer="layout" svg:width="1.979cm" svg:height="0.569cm" svg:x="71.801cm" svg:y="14.501cm">
          <draw:text-box>
            <text:p><text:span text:style-name="T10">csr_mepc_r</text:span></text:p>
          </draw:text-box>
        </draw:frame>
        <draw:line draw:style-name="gr38" draw:text-style-name="P4" draw:layer="layout" svg:x1="54.001cm" svg:y1="14.5cm" svg:x2="55.001cm" svg:y2="14.5cm">
          <text:p/>
        </draw:line>
        <draw:line draw:style-name="gr38" draw:text-style-name="P4" draw:layer="layout" svg:x1="57.001cm" svg:y1="19cm" svg:x2="57.001cm" svg:y2="20cm">
          <text:p/>
        </draw:line>
        <draw:line draw:style-name="gr38" draw:text-style-name="P4" draw:layer="layout" svg:x1="70.001cm" svg:y1="19cm" svg:x2="70.001cm" svg:y2="20cm">
          <text:p/>
        </draw:line>
        <draw:frame draw:style-name="gr756" draw:text-style-name="P37" draw:layer="layout" svg:width="3.351cm" svg:height="0.569cm" svg:x="51.801cm" svg:y="14cm">
          <draw:text-box>
            <text:p><text:span text:style-name="T10">mem_wb_csr_wd</text:span><text:span text:style-name="T10">ata_r</text:span></text:p>
          </draw:text-box>
        </draw:frame>
        <draw:frame draw:style-name="gr756" draw:text-style-name="P37" draw:layer="layout" svg:width="2.598cm" svg:height="0.569cm" svg:x="54.601cm" svg:y="19cm">
          <draw:text-box>
            <text:p><text:span text:style-name="T10">mem_wb_instr_r</text:span></text:p>
          </draw:text-box>
        </draw:frame>
        <draw:frame draw:style-name="gr756" draw:text-style-name="P37" draw:layer="layout" svg:width="2.233cm" svg:height="0.569cm" svg:x="69.301cm" svg:y="19.001cm">
          <draw:text-box>
            <text:p><text:span text:style-name="T10">wb_commit_s</text:span></text:p>
          </draw:text-box>
        </draw:frame>
        <draw:frame draw:style-name="gr756" draw:text-style-name="P37" draw:layer="layout" svg:width="2.661cm" svg:height="0.569cm" svg:x="66.702cm" svg:y="19.302cm">
          <draw:text-box>
            <text:p><text:span text:style-name="T10">wb_trap_taken_s</text:span></text:p>
          </draw:text-box>
        </draw:frame>
        <draw:line draw:style-name="gr38" draw:text-style-name="P4" draw:layer="layout" svg:x1="68.001cm" svg:y1="19cm" svg:x2="68.001cm" svg:y2="20cm">
          <text:p/>
        </draw:line>
        <draw:line draw:style-name="gr38" draw:text-style-name="P4" draw:layer="layout" svg:x1="66.002cm" svg:y1="19cm" svg:x2="66.002cm" svg:y2="20cm">
          <text:p/>
        </draw:line>
        <draw:frame draw:style-name="gr756" draw:text-style-name="P37" draw:layer="layout" svg:width="2.691cm" svg:height="0.569cm" svg:x="64.602cm" svg:y="19.001cm">
          <draw:text-box>
            <text:p><text:span text:style-name="T10">wb_trap_illegal_s</text:span></text:p>
          </draw:text-box>
        </draw:frame>
        <draw:frame draw:style-name="gr756" draw:text-style-name="P37" draw:layer="layout" svg:width="3.321cm" svg:height="0.569cm" svg:x="62.703cm" svg:y="19.302cm">
          <draw:text-box>
            <text:p><text:span text:style-name="T10">wb_trap_misalign</text:span><text:span text:style-name="T10">ed_s</text:span></text:p>
          </draw:text-box>
        </draw:frame>
        <draw:line draw:style-name="gr38" draw:text-style-name="P4" draw:layer="layout" svg:x1="64.002cm" svg:y1="19cm" svg:x2="64.002cm" svg:y2="20cm">
          <text:p/>
        </draw:line>
        <draw:line draw:style-name="gr38" draw:text-style-name="P4" draw:layer="layout" svg:x1="54.002cm" svg:y1="16.001cm" svg:x2="55.002cm" svg:y2="16.001cm">
          <text:p/>
        </draw:line>
        <draw:frame draw:style-name="gr756" draw:text-style-name="P37" draw:layer="layout" svg:width="2.36cm" svg:height="0.569cm" svg:x="52.802cm" svg:y="15.501cm">
          <draw:text-box>
            <text:p><text:span text:style-name="T10">mem_wb_pc_r</text:span></text:p>
          </draw:text-box>
        </draw:frame>
        <draw:g draw:style-name="gr1">
          <draw:frame draw:style-name="gr670" draw:text-style-name="P37" draw:layer="layout" svg:width="2.327cm" svg:height="0.569cm" svg:x="69.808cm" svg:y="5.531cm">
            <draw:text-box>
              <text:p><text:span text:style-name="T10">csr_mstatus_s</text:span></text:p>
            </draw:text-box>
          </draw:frame>
          <draw:custom-shape draw:style-name="gr759" draw:text-style-name="P43" draw:layer="layout" svg:width="19.002cm" svg:height="7cm" svg:x="53cm" svg:y="2cm">
            <text:p/>
            <draw:enhanced-geometry svg:viewBox="0 0 21600 21600" draw:mirror-horizontal="false" draw:mirror-vertical="false" draw:type="rectangle" draw:enhanced-path="M 0 0 L 21600 0 21600 21600 0 21600 0 0 Z N"/>
          </draw:custom-shape>
          <draw:frame draw:style-name="gr760" draw:text-style-name="P44" draw:layer="layout" svg:width="2.698cm" svg:height="0.569cm" svg:x="68.702cm" svg:y="5.031cm">
            <draw:text-box>
              <text:p><text:span text:style-name="T12">CSR: MSTATUS</text:span></text:p>
            </draw:text-box>
          </draw:frame>
          <draw:frame draw:style-name="gr658" draw:text-style-name="P37" draw:layer="layout" svg:width="10.561cm" svg:height="2.159cm" svg:x="53.102cm" svg:y="2.213cm">
            <draw:text-box>
              <text:p><text:span text:style-name="T10">case </text:span><text:span text:style-name="T10">(mem_wb_instr_r</text:span><text:span text:style-name="T10">[14:12])</text:span></text:p>
              <text:p><text:span text:style-name="T10"><text:s text:c="8"/></text:span><text:span text:style-name="T10">3'b001, </text:span><text:span text:style-name="T10">3'b101: </text:span><text:span text:style-name="T10">csr_mstatus_r &lt;= </text:span><text:span text:style-name="T10">mem_wb_csr_wd</text:span><text:span text:style-name="T10">ata_r;</text:span></text:p>
              <text:p><text:span text:style-name="T10"><text:s text:c="8"/></text:span><text:span text:style-name="T10">3'b010, </text:span><text:span text:style-name="T10">3'b110: </text:span><text:span text:style-name="T10">csr_mstatus_r &lt;= </text:span><text:span text:style-name="T10">csr_mstatus_r | </text:span><text:span text:style-name="T10">mem_wb_csr_wd</text:span><text:span text:style-name="T10">ata_r;</text:span></text:p>
              <text:p><text:span text:style-name="T10"><text:s text:c="8"/></text:span><text:span text:style-name="T10">3'b011, </text:span><text:span text:style-name="T10">3'b111: </text:span><text:span text:style-name="T10">csr_mstatus_r &lt;= </text:span><text:span text:style-name="T10">csr_mstatus_r &amp; </text:span><text:span text:style-name="T10">~mem_wb_csr_w</text:span><text:span text:style-name="T10">data_r;</text:span></text:p>
              <text:p><text:span text:style-name="T10"><text:s text:c="8"/></text:span><text:span text:style-name="T10">default:;</text:span></text:p>
              <text:p><text:span text:style-name="T10"><text:s text:c="6"/></text:span><text:span text:style-name="T10">endcase</text:span></text:p>
            </draw:text-box>
          </draw:frame>
          <draw:g draw:style-name="gr1">
            <draw:custom-shape draw:style-name="gr550" draw:text-style-name="P48" draw:layer="layout" svg:width="0.5cm" svg:height="1cm" svg:x="69.502cm" svg:y="5.8cm">
              <text:p/>
              <draw:enhanced-geometry svg:viewBox="0 0 21600 21600" draw:mirror-horizontal="false" draw:mirror-vertical="false" draw:type="rectangle" draw:enhanced-path="M 0 0 L 21600 0 21600 21600 0 21600 0 0 Z N"/>
            </draw:custom-shape>
            <draw:line draw:style-name="gr60" draw:text-style-name="P11" draw:layer="layout" svg:x1="69.502cm" svg:y1="6.75cm" svg:x2="69.652cm" svg:y2="6.7cm">
              <text:p/>
            </draw:line>
            <draw:line draw:style-name="gr60" draw:text-style-name="P11" draw:layer="layout" svg:x1="69.502cm" svg:y1="6.65cm" svg:x2="69.652cm" svg:y2="6.7cm">
              <text:p/>
            </draw:line>
          </draw:g>
          <draw:line draw:style-name="gr38" draw:text-style-name="P4" draw:layer="layout" svg:x1="68.504cm" svg:y1="6cm" svg:x2="69.502cm" svg:y2="6cm">
            <text:p/>
          </draw:line>
          <draw:line draw:style-name="gr38" draw:text-style-name="P4" draw:layer="layout" svg:x1="70.002cm" svg:y1="6cm" svg:x2="72.002cm" svg:y2="6cm">
            <text:p/>
          </draw:line>
          <draw:frame draw:style-name="gr658" draw:text-style-name="P37" draw:layer="layout" svg:width="5.773cm" svg:height="1.523cm" svg:x="65.128cm" svg:y="7.4cm">
            <draw:text-box>
              <text:p><text:span text:style-name="T10">wb_commit_s &amp;&amp;</text:span></text:p>
              <text:p><text:span text:style-name="T10">!wb_trap_taken_s </text:span><text:span text:style-name="T10">&amp;&amp;</text:span></text:p>
              <text:p><text:span text:style-name="T10">(mem_wb_instr_r</text:span><text:span text:style-name="T10">[6:0] == </text:span><text:span text:style-name="T10">7'b1110011) &amp;&amp; </text:span></text:p>
              <text:p><text:span text:style-name="T10">(mem_wb_instr_r</text:span><text:span text:style-name="T10">[31:20] == </text:span><text:span text:style-name="T10">12'h300)</text:span></text:p>
            </draw:text-box>
          </draw:frame>
          <draw:polygon draw:style-name="gr58" draw:text-style-name="P1" draw:layer="layout" svg:width="0.499cm" svg:height="0.999cm" svg:x="68.001cm" svg:y="5.5cm" svg:viewBox="0 0 500 1000" draw:points="0,0 0,1000 500,850 500,150">
            <text:p/>
          </draw:polygon>
          <draw:line draw:style-name="gr38" draw:text-style-name="P4" draw:layer="layout" svg:x1="67.001cm" svg:y1="5.8cm" svg:x2="68.001cm" svg:y2="5.8cm">
            <text:p/>
          </draw:line>
          <draw:line draw:style-name="gr38" draw:text-style-name="P4" draw:layer="layout" svg:x1="67.001cm" svg:y1="6.2cm" svg:x2="68.001cm" svg:y2="6.2cm">
            <text:p/>
          </draw:line>
          <draw:line draw:style-name="gr146" draw:text-style-name="P4" draw:layer="layout" svg:x1="68.301cm" svg:y1="6.9cm" svg:x2="68.301cm" svg:y2="6.4cm">
            <text:p/>
          </draw:line>
          <draw:frame draw:style-name="gr564" draw:text-style-name="P37" draw:layer="layout" svg:width="2.661cm" svg:height="0.569cm" svg:x="67.501cm" svg:y="6.9cm">
            <draw:text-box>
              <text:p><text:span text:style-name="T10">wb_trap_taken_s</text:span></text:p>
            </draw:text-box>
          </draw:frame>
          <draw:polygon draw:style-name="gr58" draw:text-style-name="P1" draw:layer="layout" svg:width="0.499cm" svg:height="0.999cm" svg:x="66.001cm" svg:y="4.5cm" svg:viewBox="0 0 500 1000" draw:points="0,0 0,1000 500,850 500,150">
            <text:p/>
          </draw:polygon>
          <draw:line draw:style-name="gr38" draw:text-style-name="P4" draw:layer="layout" svg:x1="65cm" svg:y1="4.8cm" svg:x2="66.001cm" svg:y2="4.8cm">
            <text:p/>
          </draw:line>
          <draw:line draw:style-name="gr38" draw:text-style-name="P4" draw:layer="layout" svg:x1="65.501cm" svg:y1="5.2cm" svg:x2="66.001cm" svg:y2="5.2cm">
            <text:p/>
          </draw:line>
          <draw:line draw:style-name="gr146" draw:text-style-name="P4" draw:layer="layout" svg:x1="66.301cm" svg:y1="5.9cm" svg:x2="66.301cm" svg:y2="5.4cm">
            <text:p/>
          </draw:line>
          <draw:line draw:style-name="gr38" draw:text-style-name="P4" draw:layer="layout" svg:x1="66.501cm" svg:y1="7cm" svg:x2="67.001cm" svg:y2="7cm">
            <text:p/>
          </draw:line>
          <draw:line draw:style-name="gr38" draw:text-style-name="P4" draw:layer="layout" svg:x1="67.001cm" svg:y1="6.2cm" svg:x2="67.001cm" svg:y2="7cm">
            <text:p/>
          </draw:line>
          <draw:frame draw:style-name="gr564" draw:text-style-name="P37" draw:layer="layout" svg:width="1.886cm" svg:height="0.569cm" svg:x="64.814cm" svg:y="5.731cm">
            <draw:text-box>
              <text:p><text:span text:style-name="T10">wb_mret_s</text:span></text:p>
            </draw:text-box>
          </draw:frame>
          <draw:frame draw:style-name="gr761" draw:text-style-name="P37" draw:layer="layout" svg:width="5.463cm" svg:height="0.887cm" svg:x="60.2cm" svg:y="4.9cm">
            <draw:text-box>
              <text:p><text:span text:style-name="T10">csr_mstatus_r[3] </text:span><text:span text:style-name="T10">&lt;= </text:span><text:span text:style-name="T10">csr_mstatus_mpi</text:span><text:span text:style-name="T10">e;</text:span></text:p>
              <text:p><text:span text:style-name="T10">csr_mstatus_r[7] </text:span><text:span text:style-name="T10">&lt;= 1'b1;</text:span></text:p>
            </draw:text-box>
          </draw:frame>
          <draw:polygon draw:style-name="gr58" draw:text-style-name="P1" draw:layer="layout" svg:width="0.499cm" svg:height="0.999cm" svg:x="64.004cm" svg:y="2.505cm" svg:viewBox="0 0 500 1000" draw:points="0,0 0,1000 500,850 500,150">
            <text:p/>
          </draw:polygon>
          <draw:line draw:style-name="gr146" draw:text-style-name="P4" draw:layer="layout" svg:x1="64.301cm" svg:y1="4cm" svg:x2="64.304cm" svg:y2="3.405cm">
            <text:p/>
          </draw:line>
          <draw:line draw:style-name="gr38" draw:text-style-name="P4" draw:layer="layout" svg:x1="63.502cm" svg:y1="2.804cm" svg:x2="64.004cm" svg:y2="2.805cm">
            <text:p/>
          </draw:line>
          <draw:line draw:style-name="gr38" draw:text-style-name="P4" draw:layer="layout" svg:x1="63.502cm" svg:y1="3.205cm" svg:x2="64.004cm" svg:y2="3.205cm">
            <text:p/>
          </draw:line>
          <draw:frame draw:style-name="gr564" draw:text-style-name="P37" draw:layer="layout" svg:width="1.129cm" svg:height="0.569cm" svg:x="63.002cm" svg:y="2.336cm">
            <draw:text-box>
              <text:p><text:span text:style-name="T10">store</text:span></text:p>
            </draw:text-box>
          </draw:frame>
          <draw:line draw:style-name="gr38" draw:text-style-name="P4" draw:layer="layout" svg:x1="63.002cm" svg:y1="3.201cm" svg:x2="63.502cm" svg:y2="3.205cm">
            <text:p/>
          </draw:line>
          <draw:line draw:style-name="gr38" draw:text-style-name="P4" draw:layer="layout" svg:x1="66.504cm" svg:y1="5cm" svg:x2="67.001cm" svg:y2="5cm">
            <text:p/>
          </draw:line>
          <draw:line draw:style-name="gr38" draw:text-style-name="P4" draw:layer="layout" svg:x1="67.001cm" svg:y1="5cm" svg:x2="67.001cm" svg:y2="5.8cm">
            <text:p/>
          </draw:line>
          <draw:line draw:style-name="gr38" draw:text-style-name="P4" draw:layer="layout" svg:x1="64.504cm" svg:y1="3cm" svg:x2="65cm" svg:y2="3cm">
            <text:p/>
          </draw:line>
          <draw:line draw:style-name="gr38" draw:text-style-name="P4" draw:layer="layout" svg:x1="65cm" svg:y1="3cm" svg:x2="65cm" svg:y2="4.8cm">
            <text:p/>
          </draw:line>
          <draw:frame draw:style-name="gr761" draw:text-style-name="P37" draw:layer="layout" svg:width="5.307cm" svg:height="0.887cm" svg:x="61.393cm" svg:y="6.713cm">
            <draw:text-box>
              <text:p><text:span text:style-name="T10">csr_mstatus_r[7] </text:span><text:span text:style-name="T10">&lt;= </text:span><text:span text:style-name="T10">csr_mstatus_mie;</text:span></text:p>
              <text:p><text:span text:style-name="T10">csr_mstatus_r[3] </text:span><text:span text:style-name="T10">&lt;= 1'b0;</text:span></text:p>
            </draw:text-box>
          </draw:frame>
          <draw:line draw:style-name="gr38" draw:text-style-name="P4" draw:layer="layout" svg:x1="67.4cm" svg:y1="7.4cm" svg:x2="67.4cm" svg:y2="4cm">
            <text:p/>
          </draw:line>
          <draw:line draw:style-name="gr38" draw:text-style-name="P4" draw:layer="layout" svg:x1="67.4cm" svg:y1="4cm" svg:x2="64.301cm" svg:y2="4cm">
            <text:p/>
          </draw:line>
        </draw:g>
        <draw:line draw:style-name="gr38" draw:text-style-name="P4" draw:layer="layout" svg:x1="72.002cm" svg:y1="6.001cm" svg:x2="73.002cm" svg:y2="6.001cm">
          <text:p/>
        </draw:line>
        <draw:frame draw:style-name="gr756" draw:text-style-name="P37" draw:layer="layout" svg:width="2.28cm" svg:height="0.569cm" svg:x="71.802cm" svg:y="5.501cm">
          <draw:text-box>
            <text:p><text:span text:style-name="T10">csr_mstatus_r</text:span></text:p>
          </draw:text-box>
        </draw:frame>
        <draw:line draw:style-name="gr38" draw:text-style-name="P4" draw:layer="layout" svg:x1="52.002cm" svg:y1="3cm" svg:x2="53.002cm" svg:y2="3cm">
          <text:p/>
        </draw:line>
        <draw:line draw:style-name="gr38" draw:text-style-name="P4" draw:layer="layout" svg:x1="57.002cm" svg:y1="9cm" svg:x2="57.002cm" svg:y2="10cm">
          <text:p/>
        </draw:line>
        <draw:line draw:style-name="gr38" draw:text-style-name="P4" draw:layer="layout" svg:x1="70.002cm" svg:y1="9cm" svg:x2="70.002cm" svg:y2="10cm">
          <text:p/>
        </draw:line>
        <draw:frame draw:style-name="gr756" draw:text-style-name="P37" draw:layer="layout" svg:width="3.351cm" svg:height="0.569cm" svg:x="49.802cm" svg:y="2.5cm">
          <draw:text-box>
            <text:p><text:span text:style-name="T10">mem_wb_csr_wd</text:span><text:span text:style-name="T10">ata_r</text:span></text:p>
          </draw:text-box>
        </draw:frame>
        <draw:frame draw:style-name="gr756" draw:text-style-name="P37" draw:layer="layout" svg:width="2.598cm" svg:height="0.569cm" svg:x="54.602cm" svg:y="9cm">
          <draw:text-box>
            <text:p><text:span text:style-name="T10">mem_wb_instr_r</text:span></text:p>
          </draw:text-box>
        </draw:frame>
        <draw:frame draw:style-name="gr756" draw:text-style-name="P37" draw:layer="layout" svg:width="2.233cm" svg:height="0.569cm" svg:x="69.302cm" svg:y="9.001cm">
          <draw:text-box>
            <text:p><text:span text:style-name="T10">wb_commit_s</text:span></text:p>
          </draw:text-box>
        </draw:frame>
        <draw:frame draw:style-name="gr756" draw:text-style-name="P37" draw:layer="layout" svg:width="2.661cm" svg:height="0.569cm" svg:x="66.703cm" svg:y="9.302cm">
          <draw:text-box>
            <text:p><text:span text:style-name="T10">wb_trap_taken_s</text:span></text:p>
          </draw:text-box>
        </draw:frame>
        <draw:line draw:style-name="gr38" draw:text-style-name="P4" draw:layer="layout" svg:x1="68.002cm" svg:y1="9cm" svg:x2="68.002cm" svg:y2="10cm">
          <text:p/>
        </draw:line>
        <draw:line draw:style-name="gr38" draw:text-style-name="P4" draw:layer="layout" svg:x1="66.003cm" svg:y1="9cm" svg:x2="66.003cm" svg:y2="10cm">
          <text:p/>
        </draw:line>
        <draw:frame draw:style-name="gr756" draw:text-style-name="P37" draw:layer="layout" svg:width="1.886cm" svg:height="0.569cm" svg:x="64.603cm" svg:y="9.001cm">
          <draw:text-box>
            <text:p><text:span text:style-name="T10">wb_mret_s</text:span></text:p>
          </draw:text-box>
        </draw:frame>
        <draw:g draw:style-name="gr1">
          <draw:frame draw:style-name="gr670" draw:text-style-name="P37" draw:layer="layout" svg:width="2.094cm" svg:height="0.569cm" svg:x="48.807cm" svg:y="22.531cm">
            <draw:text-box>
              <text:p><text:span text:style-name="T10">csr_mie_s</text:span></text:p>
            </draw:text-box>
          </draw:frame>
          <draw:custom-shape draw:style-name="gr656" draw:text-style-name="P43" draw:layer="layout" svg:width="15cm" svg:height="4cm" svg:x="36.001cm" svg:y="22cm">
            <text:p/>
            <draw:enhanced-geometry svg:viewBox="0 0 21600 21600" draw:mirror-horizontal="false" draw:mirror-vertical="false" draw:type="rectangle" draw:enhanced-path="M 0 0 L 21600 0 21600 21600 0 21600 0 0 Z N"/>
          </draw:custom-shape>
          <draw:frame draw:style-name="gr662" draw:text-style-name="P44" draw:layer="layout" svg:width="2.3cm" svg:height="0.569cm" svg:x="47.701cm" svg:y="22.031cm">
            <draw:text-box>
              <text:p><text:span text:style-name="T12">CSR: MIE</text:span></text:p>
            </draw:text-box>
          </draw:frame>
          <draw:polygon draw:style-name="gr58" draw:text-style-name="P1" draw:layer="layout" svg:width="0.499cm" svg:height="0.999cm" svg:x="47.003cm" svg:y="22.504cm" svg:viewBox="0 0 500 1000" draw:points="0,0 0,1000 500,850 500,150">
            <text:p/>
          </draw:polygon>
          <draw:line draw:style-name="gr146" draw:text-style-name="P4" draw:layer="layout" svg:x1="47.303cm" svg:y1="23.904cm" svg:x2="47.303cm" svg:y2="23.404cm">
            <text:p/>
          </draw:line>
          <draw:line draw:style-name="gr38" draw:text-style-name="P4" draw:layer="layout" svg:x1="46.501cm" svg:y1="22.803cm" svg:x2="47.003cm" svg:y2="22.804cm">
            <text:p/>
          </draw:line>
          <draw:line draw:style-name="gr38" draw:text-style-name="P4" draw:layer="layout" svg:x1="46.501cm" svg:y1="23.204cm" svg:x2="47.003cm" svg:y2="23.204cm">
            <text:p/>
          </draw:line>
          <draw:frame draw:style-name="gr564" draw:text-style-name="P37" draw:layer="layout" svg:width="1.129cm" svg:height="0.569cm" svg:x="46.001cm" svg:y="22.335cm">
            <draw:text-box>
              <text:p><text:span text:style-name="T10">store</text:span></text:p>
            </draw:text-box>
          </draw:frame>
          <draw:frame draw:style-name="gr658" draw:text-style-name="P37" draw:layer="layout" svg:width="9.49cm" svg:height="2.159cm" svg:x="36.101cm" svg:y="22.313cm">
            <draw:text-box>
              <text:p><text:span text:style-name="T10">case </text:span><text:span text:style-name="T10">(mem_wb_instr_r</text:span><text:span text:style-name="T10">[14:12])</text:span></text:p>
              <text:p><text:span text:style-name="T10"><text:s text:c="8"/></text:span><text:span text:style-name="T10">3'b001, </text:span><text:span text:style-name="T10">3'b101: </text:span><text:span text:style-name="T10">csr_mie_r &lt;= </text:span><text:span text:style-name="T10">mem_wb_csr_wd</text:span><text:span text:style-name="T10">ata_r;</text:span></text:p>
              <text:p><text:span text:style-name="T10"><text:s text:c="8"/></text:span><text:span text:style-name="T10">3'b010, </text:span><text:span text:style-name="T10">3'b110: csr_mie_r </text:span><text:span text:style-name="T10">&lt;= csr_mie_r | </text:span><text:span text:style-name="T10">mem_wb_csr_wd</text:span><text:span text:style-name="T10">ata_r;</text:span></text:p>
              <text:p><text:span text:style-name="T10"><text:s text:c="8"/></text:span><text:span text:style-name="T10">3'b011, </text:span><text:span text:style-name="T10">3'b111: csr_mie_r </text:span><text:span text:style-name="T10">&lt;= csr_mie_r &amp; </text:span><text:span text:style-name="T10">~mem_wb_csr_w</text:span><text:span text:style-name="T10">data_r;</text:span></text:p>
              <text:p><text:span text:style-name="T10"><text:s text:c="8"/></text:span><text:span text:style-name="T10">default:;</text:span></text:p>
              <text:p><text:span text:style-name="T10"><text:s text:c="6"/></text:span><text:span text:style-name="T10">endcase</text:span></text:p>
            </draw:text-box>
          </draw:frame>
          <draw:g draw:style-name="gr1">
            <draw:custom-shape draw:style-name="gr550" draw:text-style-name="P48" draw:layer="layout" svg:width="0.5cm" svg:height="1cm" svg:x="48.501cm" svg:y="22.8cm">
              <text:p/>
              <draw:enhanced-geometry svg:viewBox="0 0 21600 21600" draw:mirror-horizontal="false" draw:mirror-vertical="false" draw:type="rectangle" draw:enhanced-path="M 0 0 L 21600 0 21600 21600 0 21600 0 0 Z N"/>
            </draw:custom-shape>
            <draw:line draw:style-name="gr60" draw:text-style-name="P11" draw:layer="layout" svg:x1="48.501cm" svg:y1="23.75cm" svg:x2="48.651cm" svg:y2="23.7cm">
              <text:p/>
            </draw:line>
            <draw:line draw:style-name="gr60" draw:text-style-name="P11" draw:layer="layout" svg:x1="48.501cm" svg:y1="23.65cm" svg:x2="48.651cm" svg:y2="23.7cm">
              <text:p/>
            </draw:line>
          </draw:g>
          <draw:line draw:style-name="gr38" draw:text-style-name="P4" draw:layer="layout" svg:x1="47.503cm" svg:y1="23cm" svg:x2="48.501cm" svg:y2="23cm">
            <text:p/>
          </draw:line>
          <draw:line draw:style-name="gr38" draw:text-style-name="P4" draw:layer="layout" svg:x1="49.001cm" svg:y1="23cm" svg:x2="51.001cm" svg:y2="23cm">
            <text:p/>
          </draw:line>
          <draw:frame draw:style-name="gr658" draw:text-style-name="P37" draw:layer="layout" svg:width="5.773cm" svg:height="1.523cm" svg:x="45.114cm" svg:y="24cm">
            <draw:text-box>
              <text:p><text:span text:style-name="T10">wb_commit_s &amp;&amp;</text:span></text:p>
              <text:p><text:span text:style-name="T10">!wb_trap_taken_s </text:span><text:span text:style-name="T10">&amp;&amp;</text:span></text:p>
              <text:p><text:span text:style-name="T10">(mem_wb_instr_r</text:span><text:span text:style-name="T10">[6:0] == </text:span><text:span text:style-name="T10">7'b1110011) &amp;&amp; </text:span></text:p>
              <text:p><text:span text:style-name="T10">(mem_wb_instr_r</text:span><text:span text:style-name="T10">[31:20] == </text:span><text:span text:style-name="T10">12'h304)</text:span></text:p>
            </draw:text-box>
          </draw:frame>
          <draw:line draw:style-name="gr38" draw:text-style-name="P4" draw:layer="layout" svg:x1="46.001cm" svg:y1="23.2cm" svg:x2="46.501cm" svg:y2="23.204cm">
            <text:p/>
          </draw:line>
        </draw:g>
        <draw:line draw:style-name="gr38" draw:text-style-name="P4" draw:layer="layout" svg:x1="51.001cm" svg:y1="23.001cm" svg:x2="52.001cm" svg:y2="23.001cm">
          <text:p/>
        </draw:line>
        <draw:frame draw:style-name="gr756" draw:text-style-name="P37" draw:layer="layout" svg:width="1.747cm" svg:height="0.569cm" svg:x="50.801cm" svg:y="22.501cm">
          <draw:text-box>
            <text:p><text:span text:style-name="T10">csr_mie_r</text:span></text:p>
          </draw:text-box>
        </draw:frame>
        <draw:line draw:style-name="gr38" draw:text-style-name="P4" draw:layer="layout" svg:x1="35.001cm" svg:y1="22.5cm" svg:x2="36.001cm" svg:y2="22.5cm">
          <text:p/>
        </draw:line>
        <draw:line draw:style-name="gr38" draw:text-style-name="P4" draw:layer="layout" svg:x1="43.001cm" svg:y1="26cm" svg:x2="43.001cm" svg:y2="27cm">
          <text:p/>
        </draw:line>
        <draw:line draw:style-name="gr38" draw:text-style-name="P4" draw:layer="layout" svg:x1="49.001cm" svg:y1="26cm" svg:x2="49.001cm" svg:y2="27cm">
          <text:p/>
        </draw:line>
        <draw:frame draw:style-name="gr756" draw:text-style-name="P37" draw:layer="layout" svg:width="3.351cm" svg:height="0.569cm" svg:x="32.801cm" svg:y="22cm">
          <draw:text-box>
            <text:p><text:span text:style-name="T10">mem_wb_csr_wd</text:span><text:span text:style-name="T10">ata_r</text:span></text:p>
          </draw:text-box>
        </draw:frame>
        <draw:frame draw:style-name="gr756" draw:text-style-name="P37" draw:layer="layout" svg:width="2.598cm" svg:height="0.569cm" svg:x="40.601cm" svg:y="26cm">
          <draw:text-box>
            <text:p><text:span text:style-name="T10">mem_wb_instr_r</text:span></text:p>
          </draw:text-box>
        </draw:frame>
        <draw:frame draw:style-name="gr756" draw:text-style-name="P37" draw:layer="layout" svg:width="2.233cm" svg:height="0.569cm" svg:x="48.301cm" svg:y="26.001cm">
          <draw:text-box>
            <text:p><text:span text:style-name="T10">wb_commit_s</text:span></text:p>
          </draw:text-box>
        </draw:frame>
        <draw:frame draw:style-name="gr756" draw:text-style-name="P37" draw:layer="layout" svg:width="2.661cm" svg:height="0.569cm" svg:x="45.702cm" svg:y="26.302cm">
          <draw:text-box>
            <text:p><text:span text:style-name="T10">wb_trap_taken_s</text:span></text:p>
          </draw:text-box>
        </draw:frame>
        <draw:line draw:style-name="gr38" draw:text-style-name="P4" draw:layer="layout" svg:x1="47.001cm" svg:y1="26cm" svg:x2="47.001cm" svg:y2="27cm">
          <text:p/>
        </draw:line>
        <draw:g draw:style-name="gr1">
          <draw:frame draw:style-name="gr545" draw:text-style-name="P37" draw:layer="layout" svg:width="1.886cm" svg:height="0.569cm" svg:x="37.828cm" svg:y="15.175cm">
            <draw:text-box>
              <text:p><text:span text:style-name="T10">irq_ext_i[7]</text:span></text:p>
            </draw:text-box>
          </draw:frame>
          <draw:frame draw:style-name="gr558" draw:text-style-name="P37" draw:layer="layout" svg:width="1.81cm" svg:height="0.569cm" svg:x="40.1cm" svg:y="14.575cm">
            <draw:text-box>
              <text:p><text:span text:style-name="T10">irq_sync_r</text:span></text:p>
            </draw:text-box>
          </draw:frame>
          <draw:line draw:style-name="gr38" draw:text-style-name="P4" draw:layer="layout" svg:x1="39cm" svg:y1="15cm" svg:x2="40cm" svg:y2="15cm">
            <text:p/>
          </draw:line>
          <draw:line draw:style-name="gr38" draw:text-style-name="P4" draw:layer="layout" svg:x1="40cm" svg:y1="15cm" svg:x2="42cm" svg:y2="15cm">
            <text:p/>
          </draw:line>
          <draw:g draw:style-name="gr1">
            <draw:custom-shape draw:style-name="gr165" draw:text-style-name="P14" draw:layer="layout" svg:width="0.4cm" svg:height="0.4cm" svg:x="38.8cm" svg:y="14.8cm">
              <text:p/>
              <draw:enhanced-geometry svg:viewBox="0 0 21600 21600" draw:type="rectangle" draw:enhanced-path="M 0 0 L 21600 0 21600 21600 0 21600 0 0 Z N"/>
            </draw:custom-shape>
            <draw:line draw:style-name="gr547" draw:text-style-name="P47" draw:layer="layout" svg:x1="38.8cm" svg:y1="14.8cm" svg:x2="39.2cm" svg:y2="15.2cm">
              <text:p/>
            </draw:line>
            <draw:line draw:style-name="gr547" draw:text-style-name="P47" draw:layer="layout" svg:x1="38.8cm" svg:y1="15.2cm" svg:x2="39.2cm" svg:y2="14.8cm">
              <text:p/>
            </draw:line>
          </draw:g>
          <draw:custom-shape draw:style-name="gr551" draw:text-style-name="P43" draw:layer="layout" svg:width="4cm" svg:height="2cm" svg:x="38cm" svg:y="14cm">
            <text:p/>
            <draw:enhanced-geometry svg:viewBox="0 0 21600 21600" draw:type="rectangle" draw:enhanced-path="M 0 0 L 21600 0 21600 21600 0 21600 0 0 Z N"/>
          </draw:custom-shape>
          <draw:frame draw:style-name="gr549" draw:text-style-name="P44" draw:layer="layout" svg:width="1.857cm" svg:height="0.569cm" svg:x="39.9cm" svg:y="15.231cm">
            <draw:text-box>
              <text:p><text:span text:style-name="T12">IRQ: Sync</text:span></text:p>
            </draw:text-box>
          </draw:frame>
          <draw:g draw:style-name="gr1">
            <draw:custom-shape draw:style-name="gr550" draw:text-style-name="P48" draw:layer="layout" svg:width="0.5cm" svg:height="1cm" svg:x="39.5cm" svg:y="14.5cm">
              <text:p/>
              <draw:enhanced-geometry svg:viewBox="0 0 21600 21600" draw:mirror-horizontal="false" draw:mirror-vertical="false" draw:type="rectangle" draw:enhanced-path="M 0 0 L 21600 0 21600 21600 0 21600 0 0 Z N"/>
            </draw:custom-shape>
            <draw:line draw:style-name="gr60" draw:text-style-name="P11" draw:layer="layout" svg:x1="39.5cm" svg:y1="15.45cm" svg:x2="39.65cm" svg:y2="15.4cm">
              <text:p/>
            </draw:line>
            <draw:line draw:style-name="gr60" draw:text-style-name="P11" draw:layer="layout" svg:x1="39.5cm" svg:y1="15.35cm" svg:x2="39.65cm" svg:y2="15.4cm">
              <text:p/>
            </draw:line>
          </draw:g>
        </draw:g>
        <draw:g draw:style-name="gr1">
          <draw:frame draw:style-name="gr541" draw:text-style-name="P37" draw:layer="layout" svg:width="2.246cm" svg:height="0.569cm" svg:x="43.3cm" svg:y="14.5cm">
            <draw:text-box>
              <text:p><text:span text:style-name="T10">csr_mip_r[11]</text:span></text:p>
            </draw:text-box>
          </draw:frame>
          <draw:line draw:style-name="gr38" draw:text-style-name="P4" draw:layer="layout" svg:x1="43.5cm" svg:y1="15cm" svg:x2="46cm" svg:y2="15cm">
            <text:p/>
          </draw:line>
          <draw:custom-shape draw:style-name="gr551" draw:text-style-name="P43" draw:layer="layout" svg:width="4cm" svg:height="2cm" svg:x="42cm" svg:y="14cm">
            <text:p/>
            <draw:enhanced-geometry svg:viewBox="0 0 21600 21600" draw:type="rectangle" draw:enhanced-path="M 0 0 L 21600 0 21600 21600 0 21600 0 0 Z N"/>
          </draw:custom-shape>
          <draw:frame draw:style-name="gr552" draw:text-style-name="P44" draw:layer="layout" svg:width="1.776cm" svg:height="0.569cm" svg:x="44.194cm" svg:y="14.031cm">
            <draw:text-box>
              <text:p><text:span text:style-name="T12">CSR: MIP</text:span></text:p>
            </draw:text-box>
          </draw:frame>
          <draw:g draw:style-name="gr1">
            <draw:custom-shape draw:style-name="gr550" draw:text-style-name="P48" draw:layer="layout" svg:width="0.5cm" svg:height="1cm" svg:x="43cm" svg:y="14.5cm">
              <text:p/>
              <draw:enhanced-geometry svg:viewBox="0 0 21600 21600" draw:mirror-horizontal="false" draw:mirror-vertical="false" draw:type="rectangle" draw:enhanced-path="M 0 0 L 21600 0 21600 21600 0 21600 0 0 Z N"/>
            </draw:custom-shape>
            <draw:line draw:style-name="gr60" draw:text-style-name="P11" draw:layer="layout" svg:x1="43cm" svg:y1="15.45cm" svg:x2="43.15cm" svg:y2="15.4cm">
              <text:p/>
            </draw:line>
            <draw:line draw:style-name="gr60" draw:text-style-name="P11" draw:layer="layout" svg:x1="43cm" svg:y1="15.35cm" svg:x2="43.15cm" svg:y2="15.4cm">
              <text:p/>
            </draw:line>
          </draw:g>
          <draw:line draw:style-name="gr38" draw:text-style-name="P4" draw:layer="layout" svg:x1="42cm" svg:y1="15cm" svg:x2="43cm" svg:y2="15cm">
            <text:p/>
          </draw:line>
        </draw:g>
        <draw:g draw:style-name="gr1">
          <draw:g draw:style-name="gr1">
            <draw:custom-shape draw:style-name="gr762" draw:text-style-name="P36" draw:layer="layout" svg:width="2.007cm" svg:height="3cm" svg:x="77.993cm" svg:y="30cm">
              <text:p text:style-name="P35"><text:span text:style-name="T10">m</text:span><text:span text:style-name="T10">c</text:span><text:span text:style-name="T10">a</text:span><text:span text:style-name="T10">u</text:span><text:span text:style-name="T10">s</text:span><text:span text:style-name="T10">e</text:span></text:p>
              <draw:enhanced-geometry svg:viewBox="0 0 21600 21600" draw:type="rectangle" draw:enhanced-path="M 0 0 L 21600 0 21600 21600 0 21600 0 0 Z N"/>
            </draw:custom-shape>
            <draw:g draw:style-name="gr66">
              <draw:line draw:style-name="gr60" draw:text-style-name="P11" draw:layer="layout" svg:x1="77.993cm" svg:y1="32.95cm" svg:x2="78.143cm" svg:y2="32.9cm">
                <text:p/>
              </draw:line>
              <draw:line draw:style-name="gr60" draw:text-style-name="P11" draw:layer="layout" svg:x1="77.993cm" svg:y1="32.85cm" svg:x2="78.143cm" svg:y2="32.9cm">
                <text:p/>
              </draw:line>
            </draw:g>
          </draw:g>
        </draw:g>
        <draw:line draw:style-name="gr38" draw:text-style-name="P4" draw:layer="layout" svg:x1="80cm" svg:y1="31.501cm" svg:x2="81cm" svg:y2="31.501cm">
          <text:p/>
        </draw:line>
        <draw:frame draw:style-name="gr756" draw:text-style-name="P37" draw:layer="layout" svg:width="2.28cm" svg:height="0.569cm" svg:x="79.8cm" svg:y="31.001cm">
          <draw:text-box>
            <text:p><text:span text:style-name="T10">csr_mcause_r</text:span></text:p>
          </draw:text-box>
        </draw:frame>
        <draw:line draw:style-name="gr38" draw:text-style-name="P4" draw:layer="layout" svg:x1="77cm" svg:y1="30.7cm" svg:x2="78cm" svg:y2="30.7cm">
          <text:p/>
        </draw:line>
        <draw:line draw:style-name="gr38" draw:text-style-name="P4" draw:layer="layout" svg:x1="77cm" svg:y1="31.1cm" svg:x2="78cm" svg:y2="31.1cm">
          <text:p/>
        </draw:line>
        <draw:line draw:style-name="gr38" draw:text-style-name="P4" draw:layer="layout" svg:x1="77cm" svg:y1="31.5cm" svg:x2="78cm" svg:y2="31.5cm">
          <text:p/>
        </draw:line>
        <draw:line draw:style-name="gr38" draw:text-style-name="P4" draw:layer="layout" svg:x1="77cm" svg:y1="31.9cm" svg:x2="78cm" svg:y2="31.9cm">
          <text:p/>
        </draw:line>
        <draw:line draw:style-name="gr38" draw:text-style-name="P4" draw:layer="layout" svg:x1="77cm" svg:y1="32.3cm" svg:x2="78cm" svg:y2="32.3cm">
          <text:p/>
        </draw:line>
        <draw:line draw:style-name="gr38" draw:text-style-name="P4" draw:layer="layout" svg:x1="77cm" svg:y1="32.7cm" svg:x2="78cm" svg:y2="32.7cm">
          <text:p/>
        </draw:line>
        <draw:frame draw:style-name="gr756" draw:text-style-name="P37" draw:layer="layout" svg:width="2.801cm" svg:height="0.569cm" svg:x="75.356cm" svg:y="30.2cm">
          <draw:text-box>
            <text:p><text:span text:style-name="T10">wb_irq_pending_</text:span><text:span text:style-name="T10">s</text:span></text:p>
          </draw:text-box>
        </draw:frame>
        <draw:frame draw:style-name="gr756" draw:text-style-name="P37" draw:layer="layout" svg:width="3.457cm" svg:height="0.569cm" svg:x="74.7cm" svg:y="30.6cm">
          <draw:text-box>
            <text:p><text:span text:style-name="T10">mem_wb_inst_r </text:span><text:span text:style-name="T10">= store</text:span></text:p>
          </draw:text-box>
        </draw:frame>
        <draw:frame draw:style-name="gr756" draw:text-style-name="P37" draw:layer="layout" svg:width="3.36cm" svg:height="0.569cm" svg:x="74.797cm" svg:y="31cm">
          <draw:text-box>
            <text:p><text:span text:style-name="T10">mem_wb_inst_r </text:span><text:span text:style-name="T10">= load</text:span></text:p>
          </draw:text-box>
        </draw:frame>
        <draw:frame draw:style-name="gr756" draw:text-style-name="P37" draw:layer="layout" svg:width="3.321cm" svg:height="0.569cm" svg:x="74.836cm" svg:y="31.4cm">
          <draw:text-box>
            <text:p><text:span text:style-name="T10">wb_trap_misalign</text:span><text:span text:style-name="T10">ed_s</text:span></text:p>
          </draw:text-box>
        </draw:frame>
        <draw:frame draw:style-name="gr756" draw:text-style-name="P37" draw:layer="layout" svg:width="2.691cm" svg:height="0.569cm" svg:x="75.466cm" svg:y="31.8cm">
          <draw:text-box>
            <text:p><text:span text:style-name="T10">wb_trap_illegal_s</text:span></text:p>
          </draw:text-box>
        </draw:frame>
        <draw:frame draw:style-name="gr756" draw:text-style-name="P37" draw:layer="layout" svg:width="2.661cm" svg:height="0.569cm" svg:x="75.496cm" svg:y="32.2cm">
          <draw:text-box>
            <text:p><text:span text:style-name="T10">wb_trap_taken_s</text:span></text:p>
          </draw:text-box>
        </draw:frame>
        <draw:g draw:style-name="gr1">
          <draw:g draw:style-name="gr1">
            <draw:custom-shape draw:style-name="gr763" draw:text-style-name="P36" draw:layer="layout" svg:width="2.007cm" svg:height="2cm" svg:x="77.993cm" svg:y="23cm">
              <text:p text:style-name="P35"><text:span text:style-name="T10">mtvec</text:span></text:p>
              <draw:enhanced-geometry svg:viewBox="0 0 21600 21600" draw:type="rectangle" draw:enhanced-path="M 0 0 L 21600 0 21600 21600 0 21600 0 0 Z N"/>
            </draw:custom-shape>
            <draw:g draw:style-name="gr66">
              <draw:line draw:style-name="gr60" draw:text-style-name="P11" draw:layer="layout" svg:x1="77.993cm" svg:y1="24.966cm" svg:x2="78.143cm" svg:y2="24.933cm">
                <text:p/>
              </draw:line>
              <draw:line draw:style-name="gr60" draw:text-style-name="P11" draw:layer="layout" svg:x1="77.993cm" svg:y1="24.9cm" svg:x2="78.143cm" svg:y2="24.933cm">
                <text:p/>
              </draw:line>
            </draw:g>
          </draw:g>
        </draw:g>
        <draw:line draw:style-name="gr38" draw:text-style-name="P4" draw:layer="layout" svg:x1="80cm" svg:y1="24.001cm" svg:x2="81cm" svg:y2="24.001cm">
          <text:p/>
        </draw:line>
        <draw:frame draw:style-name="gr756" draw:text-style-name="P37" draw:layer="layout" svg:width="2.043cm" svg:height="0.569cm" svg:x="79.8cm" svg:y="23.501cm">
          <draw:text-box>
            <text:p><text:span text:style-name="T10">csr_mtvec_r</text:span></text:p>
          </draw:text-box>
        </draw:frame>
        <draw:line draw:style-name="gr38" draw:text-style-name="P4" draw:layer="layout" svg:x1="77cm" svg:y1="23.7cm" svg:x2="78cm" svg:y2="23.7cm">
          <text:p/>
        </draw:line>
        <draw:line draw:style-name="gr38" draw:text-style-name="P4" draw:layer="layout" svg:x1="77cm" svg:y1="24.1cm" svg:x2="78cm" svg:y2="24.1cm">
          <text:p/>
        </draw:line>
        <draw:line draw:style-name="gr38" draw:text-style-name="P4" draw:layer="layout" svg:x1="77cm" svg:y1="24.5cm" svg:x2="78cm" svg:y2="24.5cm">
          <text:p/>
        </draw:line>
        <draw:line draw:style-name="gr38" draw:text-style-name="P4" draw:layer="layout" svg:x1="77cm" svg:y1="24.9cm" svg:x2="78cm" svg:y2="24.9cm">
          <text:p/>
        </draw:line>
        <draw:frame draw:style-name="gr764" draw:text-style-name="P62" draw:layer="layout" svg:width="3.351cm" svg:height="0.569cm" svg:x="74.746cm" svg:y="23.2cm">
          <draw:text-box>
            <text:p text:style-name="P6"><text:span text:style-name="T10">mem_wb_csr_wd</text:span><text:span text:style-name="T10">ata_r</text:span></text:p>
          </draw:text-box>
        </draw:frame>
        <draw:frame draw:style-name="gr756" draw:text-style-name="P37" draw:layer="layout" svg:width="2.5cm" svg:height="0.569cm" svg:x="75.597cm" svg:y="23.6cm">
          <draw:text-box>
            <text:p><text:span text:style-name="T10">mem_wb_inst_r</text:span></text:p>
          </draw:text-box>
        </draw:frame>
        <draw:frame draw:style-name="gr756" draw:text-style-name="P37" draw:layer="layout" svg:width="2.233cm" svg:height="0.569cm" svg:x="75.864cm" svg:y="24cm">
          <draw:text-box>
            <text:p text:style-name="P6"><text:span text:style-name="T10">wb_commit_s</text:span></text:p>
          </draw:text-box>
        </draw:frame>
        <draw:frame draw:style-name="gr756" draw:text-style-name="P37" draw:layer="layout" svg:width="2.661cm" svg:height="0.569cm" svg:x="75.436cm" svg:y="24.4cm">
          <draw:text-box>
            <text:p text:style-name="P6"><text:span text:style-name="T10">wb_trap_taken_s</text:span></text:p>
          </draw:text-box>
        </draw:frame>
        <draw:g draw:style-name="gr1">
          <draw:g draw:style-name="gr1">
            <draw:custom-shape draw:style-name="gr765" draw:text-style-name="P36" draw:layer="layout" svg:width="2.007cm" svg:height="3.5cm" svg:x="77.994cm" svg:y="14cm">
              <text:p text:style-name="P35"><text:span text:style-name="T10">mepc</text:span></text:p>
              <draw:enhanced-geometry svg:viewBox="0 0 21600 21600" draw:type="rectangle" draw:enhanced-path="M 0 0 L 21600 0 21600 21600 0 21600 0 0 Z N"/>
            </draw:custom-shape>
            <draw:g draw:style-name="gr66">
              <draw:line draw:style-name="gr60" draw:text-style-name="P11" draw:layer="layout" svg:x1="77.994cm" svg:y1="17.441cm" svg:x2="78.144cm" svg:y2="17.383cm">
                <text:p/>
              </draw:line>
              <draw:line draw:style-name="gr60" draw:text-style-name="P11" draw:layer="layout" svg:x1="77.994cm" svg:y1="17.325cm" svg:x2="78.144cm" svg:y2="17.383cm">
                <text:p/>
              </draw:line>
            </draw:g>
          </draw:g>
        </draw:g>
        <draw:line draw:style-name="gr38" draw:text-style-name="P4" draw:layer="layout" svg:x1="80.001cm" svg:y1="15.001cm" svg:x2="81.001cm" svg:y2="15.001cm">
          <text:p/>
        </draw:line>
        <draw:frame draw:style-name="gr756" draw:text-style-name="P37" draw:layer="layout" svg:width="1.979cm" svg:height="0.569cm" svg:x="79.801cm" svg:y="14.501cm">
          <draw:text-box>
            <text:p><text:span text:style-name="T10">csr_mepc_r</text:span></text:p>
          </draw:text-box>
        </draw:frame>
        <draw:line draw:style-name="gr38" draw:text-style-name="P4" draw:layer="layout" svg:x1="76.999cm" svg:y1="14.7cm" svg:x2="77.999cm" svg:y2="14.7cm">
          <text:p/>
        </draw:line>
        <draw:line draw:style-name="gr38" draw:text-style-name="P4" draw:layer="layout" svg:x1="76.999cm" svg:y1="15.1cm" svg:x2="77.999cm" svg:y2="15.1cm">
          <text:p/>
        </draw:line>
        <draw:line draw:style-name="gr38" draw:text-style-name="P4" draw:layer="layout" svg:x1="76.999cm" svg:y1="15.5cm" svg:x2="77.999cm" svg:y2="15.5cm">
          <text:p/>
        </draw:line>
        <draw:line draw:style-name="gr38" draw:text-style-name="P4" draw:layer="layout" svg:x1="76.999cm" svg:y1="15.9cm" svg:x2="77.999cm" svg:y2="15.9cm">
          <text:p/>
        </draw:line>
        <draw:frame draw:style-name="gr766" draw:text-style-name="P62" draw:layer="layout" svg:width="3.351cm" svg:height="0.569cm" svg:x="74.648cm" svg:y="14.2cm">
          <draw:text-box>
            <text:p text:style-name="P6"><text:span text:style-name="T10">mem_wb_csr_wd</text:span><text:span text:style-name="T10">ata_r</text:span></text:p>
          </draw:text-box>
        </draw:frame>
        <draw:frame draw:style-name="gr756" draw:text-style-name="P37" draw:layer="layout" svg:width="2.5cm" svg:height="0.569cm" svg:x="75.499cm" svg:y="14.6cm">
          <draw:text-box>
            <text:p><text:span text:style-name="T10">mem_wb_inst_r</text:span></text:p>
          </draw:text-box>
        </draw:frame>
        <draw:frame draw:style-name="gr767" draw:text-style-name="P62" draw:layer="layout" svg:width="2.36cm" svg:height="0.569cm" svg:x="75.639cm" svg:y="15cm">
          <draw:text-box>
            <text:p text:style-name="P6"><text:span text:style-name="T10">mem_wb_pc_r</text:span></text:p>
          </draw:text-box>
        </draw:frame>
        <draw:frame draw:style-name="gr768" draw:text-style-name="P62" draw:layer="layout" svg:width="3.321cm" svg:height="0.569cm" svg:x="74.678cm" svg:y="15.4cm">
          <draw:text-box>
            <text:p text:style-name="P6"><text:span text:style-name="T10">wb_trap_misalign</text:span><text:span text:style-name="T10">ed_s</text:span></text:p>
          </draw:text-box>
        </draw:frame>
        <draw:line draw:style-name="gr38" draw:text-style-name="P4" draw:layer="layout" svg:x1="76.999cm" svg:y1="16.301cm" svg:x2="77.999cm" svg:y2="16.301cm">
          <text:p/>
        </draw:line>
        <draw:line draw:style-name="gr38" draw:text-style-name="P4" draw:layer="layout" svg:x1="76.999cm" svg:y1="16.701cm" svg:x2="77.999cm" svg:y2="16.701cm">
          <text:p/>
        </draw:line>
        <draw:line draw:style-name="gr38" draw:text-style-name="P4" draw:layer="layout" svg:x1="76.999cm" svg:y1="17.101cm" svg:x2="77.999cm" svg:y2="17.101cm">
          <text:p/>
        </draw:line>
        <draw:frame draw:style-name="gr756" draw:text-style-name="P37" draw:layer="layout" svg:width="2.233cm" svg:height="0.569cm" svg:x="75.766cm" svg:y="16.201cm">
          <draw:text-box>
            <text:p text:style-name="P6"><text:span text:style-name="T10">wb_commit_s</text:span></text:p>
          </draw:text-box>
        </draw:frame>
        <draw:frame draw:style-name="gr756" draw:text-style-name="P37" draw:layer="layout" svg:width="2.661cm" svg:height="0.569cm" svg:x="75.338cm" svg:y="16.601cm">
          <draw:text-box>
            <text:p text:style-name="P6"><text:span text:style-name="T10">wb_trap_taken_s</text:span></text:p>
          </draw:text-box>
        </draw:frame>
        <draw:frame draw:style-name="gr769" draw:text-style-name="P62" draw:layer="layout" svg:width="2.691cm" svg:height="0.569cm" svg:x="75.308cm" svg:y="15.801cm">
          <draw:text-box>
            <text:p text:style-name="P6"><text:span text:style-name="T10">wb_trap_illegal_s</text:span></text:p>
          </draw:text-box>
        </draw:frame>
        <draw:g draw:style-name="gr1">
          <draw:g draw:style-name="gr1">
            <draw:custom-shape draw:style-name="gr770" draw:text-style-name="P36" draw:layer="layout" svg:width="2.007cm" svg:height="2.5cm" svg:x="77.994cm" svg:y="5cm">
              <text:p text:style-name="P35"><text:span text:style-name="T10">mstatus</text:span></text:p>
              <draw:enhanced-geometry svg:viewBox="0 0 21600 21600" draw:type="rectangle" draw:enhanced-path="M 0 0 L 21600 0 21600 21600 0 21600 0 0 Z N"/>
            </draw:custom-shape>
            <draw:g draw:style-name="gr66">
              <draw:line draw:style-name="gr60" draw:text-style-name="P11" draw:layer="layout" svg:x1="77.994cm" svg:y1="7.459cm" svg:x2="78.144cm" svg:y2="7.417cm">
                <text:p/>
              </draw:line>
              <draw:line draw:style-name="gr60" draw:text-style-name="P11" draw:layer="layout" svg:x1="77.994cm" svg:y1="7.375cm" svg:x2="78.144cm" svg:y2="7.417cm">
                <text:p/>
              </draw:line>
            </draw:g>
          </draw:g>
        </draw:g>
        <draw:line draw:style-name="gr38" draw:text-style-name="P4" draw:layer="layout" svg:x1="80.001cm" svg:y1="6.001cm" svg:x2="81.001cm" svg:y2="6.001cm">
          <text:p/>
        </draw:line>
        <draw:frame draw:style-name="gr756" draw:text-style-name="P37" draw:layer="layout" svg:width="2.28cm" svg:height="0.569cm" svg:x="79.801cm" svg:y="5.501cm">
          <draw:text-box>
            <text:p><text:span text:style-name="T10">csr_mstatus_r</text:span></text:p>
          </draw:text-box>
        </draw:frame>
        <draw:line draw:style-name="gr38" draw:text-style-name="P4" draw:layer="layout" svg:x1="76.999cm" svg:y1="5.7cm" svg:x2="77.999cm" svg:y2="5.7cm">
          <text:p/>
        </draw:line>
        <draw:line draw:style-name="gr38" draw:text-style-name="P4" draw:layer="layout" svg:x1="76.999cm" svg:y1="6.1cm" svg:x2="77.999cm" svg:y2="6.1cm">
          <text:p/>
        </draw:line>
        <draw:frame draw:style-name="gr756" draw:text-style-name="P37" draw:layer="layout" svg:width="2.5cm" svg:height="0.569cm" svg:x="75.499cm" svg:y="5.6cm">
          <draw:text-box>
            <text:p><text:span text:style-name="T10">mem_wb_inst_r</text:span></text:p>
          </draw:text-box>
        </draw:frame>
        <draw:line draw:style-name="gr38" draw:text-style-name="P4" draw:layer="layout" svg:x1="76.999cm" svg:y1="6.501cm" svg:x2="77.999cm" svg:y2="6.501cm">
          <text:p/>
        </draw:line>
        <draw:line draw:style-name="gr38" draw:text-style-name="P4" draw:layer="layout" svg:x1="76.999cm" svg:y1="6.901cm" svg:x2="77.999cm" svg:y2="6.901cm">
          <text:p/>
        </draw:line>
        <draw:line draw:style-name="gr38" draw:text-style-name="P4" draw:layer="layout" svg:x1="76.999cm" svg:y1="7.301cm" svg:x2="77.999cm" svg:y2="7.301cm">
          <text:p/>
        </draw:line>
        <draw:frame draw:style-name="gr756" draw:text-style-name="P37" draw:layer="layout" svg:width="2.233cm" svg:height="0.569cm" svg:x="75.766cm" svg:y="6.401cm">
          <draw:text-box>
            <text:p text:style-name="P6"><text:span text:style-name="T10">wb_commit_s</text:span></text:p>
          </draw:text-box>
        </draw:frame>
        <draw:frame draw:style-name="gr756" draw:text-style-name="P37" draw:layer="layout" svg:width="2.661cm" svg:height="0.569cm" svg:x="75.338cm" svg:y="6.801cm">
          <draw:text-box>
            <text:p text:style-name="P6"><text:span text:style-name="T10">wb_trap_taken_s</text:span></text:p>
          </draw:text-box>
        </draw:frame>
        <draw:frame draw:style-name="gr771" draw:text-style-name="P62" draw:layer="layout" svg:width="1.886cm" svg:height="0.569cm" svg:x="76.108cm" svg:y="6.001cm">
          <draw:text-box>
            <text:p text:style-name="P6"><text:span text:style-name="T10">wb_mret_s</text:span></text:p>
          </draw:text-box>
        </draw:frame>
        <draw:frame draw:style-name="gr772" draw:text-style-name="P62" draw:layer="layout" svg:width="3.351cm" svg:height="0.569cm" svg:x="74.649cm" svg:y="5.201cm">
          <draw:text-box>
            <text:p text:style-name="P6"><text:span text:style-name="T10">mem_wb_csr_wd</text:span><text:span text:style-name="T10">ata_r</text:span></text:p>
          </draw:text-box>
        </draw:frame>
        <draw:g draw:style-name="gr1">
          <draw:g draw:style-name="gr1">
            <draw:custom-shape draw:style-name="gr763" draw:text-style-name="P36" draw:layer="layout" svg:width="2.007cm" svg:height="2cm" svg:x="29.993cm" svg:y="23cm">
              <text:p text:style-name="P35"><text:span text:style-name="T10">mtvec</text:span></text:p>
              <draw:enhanced-geometry svg:viewBox="0 0 21600 21600" draw:type="rectangle" draw:enhanced-path="M 0 0 L 21600 0 21600 21600 0 21600 0 0 Z N"/>
            </draw:custom-shape>
            <draw:g draw:style-name="gr66">
              <draw:line draw:style-name="gr60" draw:text-style-name="P11" draw:layer="layout" svg:x1="29.993cm" svg:y1="24.966cm" svg:x2="30.143cm" svg:y2="24.933cm">
                <text:p/>
              </draw:line>
              <draw:line draw:style-name="gr60" draw:text-style-name="P11" draw:layer="layout" svg:x1="29.993cm" svg:y1="24.9cm" svg:x2="30.143cm" svg:y2="24.933cm">
                <text:p/>
              </draw:line>
            </draw:g>
          </draw:g>
        </draw:g>
        <draw:line draw:style-name="gr38" draw:text-style-name="P4" draw:layer="layout" svg:x1="32cm" svg:y1="24.001cm" svg:x2="33cm" svg:y2="24.001cm">
          <text:p/>
        </draw:line>
        <draw:frame draw:style-name="gr756" draw:text-style-name="P37" draw:layer="layout" svg:width="1.747cm" svg:height="0.569cm" svg:x="31.854cm" svg:y="23.501cm">
          <draw:text-box>
            <text:p><text:span text:style-name="T10">csr_mie_r</text:span></text:p>
          </draw:text-box>
        </draw:frame>
        <draw:line draw:style-name="gr38" draw:text-style-name="P4" draw:layer="layout" svg:x1="29cm" svg:y1="23.7cm" svg:x2="30cm" svg:y2="23.7cm">
          <text:p/>
        </draw:line>
        <draw:line draw:style-name="gr38" draw:text-style-name="P4" draw:layer="layout" svg:x1="29cm" svg:y1="24.1cm" svg:x2="30cm" svg:y2="24.1cm">
          <text:p/>
        </draw:line>
        <draw:line draw:style-name="gr38" draw:text-style-name="P4" draw:layer="layout" svg:x1="29cm" svg:y1="24.5cm" svg:x2="30cm" svg:y2="24.5cm">
          <text:p/>
        </draw:line>
        <draw:line draw:style-name="gr38" draw:text-style-name="P4" draw:layer="layout" svg:x1="29cm" svg:y1="24.9cm" svg:x2="30cm" svg:y2="24.9cm">
          <text:p/>
        </draw:line>
        <draw:frame draw:style-name="gr773" draw:text-style-name="P62" draw:layer="layout" svg:width="3.351cm" svg:height="0.569cm" svg:x="26.746cm" svg:y="23.2cm">
          <draw:text-box>
            <text:p text:style-name="P6"><text:span text:style-name="T10">mem_wb_csr_wd</text:span><text:span text:style-name="T10">ata_r</text:span></text:p>
          </draw:text-box>
        </draw:frame>
        <draw:frame draw:style-name="gr756" draw:text-style-name="P37" draw:layer="layout" svg:width="2.5cm" svg:height="0.569cm" svg:x="27.597cm" svg:y="23.6cm">
          <draw:text-box>
            <text:p><text:span text:style-name="T10">mem_wb_inst_r</text:span></text:p>
          </draw:text-box>
        </draw:frame>
        <draw:frame draw:style-name="gr756" draw:text-style-name="P37" draw:layer="layout" svg:width="2.233cm" svg:height="0.569cm" svg:x="27.864cm" svg:y="24cm">
          <draw:text-box>
            <text:p text:style-name="P6"><text:span text:style-name="T10">wb_commit_s</text:span></text:p>
          </draw:text-box>
        </draw:frame>
        <draw:frame draw:style-name="gr756" draw:text-style-name="P37" draw:layer="layout" svg:width="2.661cm" svg:height="0.569cm" svg:x="27.436cm" svg:y="24.4cm">
          <draw:text-box>
            <text:p text:style-name="P6"><text:span text:style-name="T10">wb_trap_taken_s</text:span></text:p>
          </draw:text-box>
        </draw:frame>
        <draw:g draw:style-name="gr1">
          <draw:frame draw:style-name="gr670" draw:text-style-name="P37" draw:layer="layout" svg:width="2.581cm" svg:height="0.569cm" svg:x="23.806cm" svg:y="16.531cm">
            <draw:text-box>
              <text:p><text:span text:style-name="T10">wb_committed_r</text:span></text:p>
            </draw:text-box>
          </draw:frame>
          <draw:custom-shape draw:style-name="gr774" draw:text-style-name="P43" draw:layer="layout" svg:width="8.5cm" svg:height="3.9cm" svg:x="18.5cm" svg:y="14.6cm">
            <text:p/>
            <draw:enhanced-geometry svg:viewBox="0 0 21600 21600" draw:mirror-horizontal="false" draw:mirror-vertical="false" draw:type="rectangle" draw:enhanced-path="M 0 0 L 21600 0 21600 21600 0 21600 0 0 Z N"/>
          </draw:custom-shape>
          <draw:frame draw:style-name="gr775" draw:text-style-name="P44" draw:layer="layout" svg:width="3cm" svg:height="0.569cm" svg:x="22.7cm" svg:y="16.031cm">
            <draw:text-box>
              <text:p><text:span text:style-name="T12">One-Shot-</text:span><text:span text:style-name="T12">Commit</text:span></text:p>
            </draw:text-box>
          </draw:frame>
          <draw:polygon draw:style-name="gr58" draw:text-style-name="P1" draw:layer="layout" svg:width="0.499cm" svg:height="0.999cm" svg:x="22.002cm" svg:y="16.504cm" svg:viewBox="0 0 500 1000" draw:points="0,0 0,1000 500,850 500,150">
            <text:p/>
          </draw:polygon>
          <draw:line draw:style-name="gr146" draw:text-style-name="P4" draw:layer="layout" svg:x1="22.302cm" svg:y1="17.904cm" svg:x2="22.302cm" svg:y2="17.404cm">
            <text:p/>
          </draw:line>
          <draw:line draw:style-name="gr38" draw:text-style-name="P4" draw:layer="layout" svg:x1="21cm" svg:y1="16.805cm" svg:x2="22.002cm" svg:y2="16.804cm">
            <text:p/>
          </draw:line>
          <draw:line draw:style-name="gr38" draw:text-style-name="P4" draw:layer="layout" svg:x1="21.5cm" svg:y1="17.204cm" svg:x2="22.002cm" svg:y2="17.204cm">
            <text:p/>
          </draw:line>
          <draw:g draw:style-name="gr1">
            <draw:custom-shape draw:style-name="gr550" draw:text-style-name="P48" draw:layer="layout" svg:width="0.5cm" svg:height="1cm" svg:x="23.5cm" svg:y="16.8cm">
              <text:p/>
              <draw:enhanced-geometry svg:viewBox="0 0 21600 21600" draw:mirror-horizontal="false" draw:mirror-vertical="false" draw:type="rectangle" draw:enhanced-path="M 0 0 L 21600 0 21600 21600 0 21600 0 0 Z N"/>
            </draw:custom-shape>
            <draw:line draw:style-name="gr60" draw:text-style-name="P11" draw:layer="layout" svg:x1="23.5cm" svg:y1="17.75cm" svg:x2="23.65cm" svg:y2="17.7cm">
              <text:p/>
            </draw:line>
            <draw:line draw:style-name="gr60" draw:text-style-name="P11" draw:layer="layout" svg:x1="23.5cm" svg:y1="17.65cm" svg:x2="23.65cm" svg:y2="17.7cm">
              <text:p/>
            </draw:line>
          </draw:g>
          <draw:line draw:style-name="gr38" draw:text-style-name="P4" draw:layer="layout" svg:x1="22.502cm" svg:y1="17cm" svg:x2="23.5cm" svg:y2="17cm">
            <text:p/>
          </draw:line>
          <draw:line draw:style-name="gr38" draw:text-style-name="P4" draw:layer="layout" svg:x1="24cm" svg:y1="17cm" svg:x2="27cm" svg:y2="17cm">
            <text:p/>
          </draw:line>
          <draw:frame draw:style-name="gr564" draw:text-style-name="P37" draw:layer="layout" svg:width="2.297cm" svg:height="0.569cm" svg:x="21.001cm" svg:y="17.736cm">
            <draw:text-box>
              <text:p><text:span text:style-name="T10">!global_stall_s</text:span></text:p>
            </draw:text-box>
          </draw:frame>
          <draw:frame draw:style-name="gr757" draw:text-style-name="P37" draw:layer="layout" svg:width="0.659cm" svg:height="0.569cm" svg:x="20.971cm" svg:y="16.9cm">
            <draw:text-box>
              <text:p><text:span text:style-name="T10">0</text:span></text:p>
            </draw:text-box>
          </draw:frame>
          <draw:polygon draw:style-name="gr58" draw:text-style-name="P1" draw:layer="layout" svg:width="0.499cm" svg:height="0.999cm" svg:x="20.003cm" svg:y="15.004cm" svg:viewBox="0 0 500 1000" draw:points="0,0 0,1000 500,850 500,150">
            <text:p/>
          </draw:polygon>
          <draw:line draw:style-name="gr146" draw:text-style-name="P4" draw:layer="layout" svg:x1="20.303cm" svg:y1="16.404cm" svg:x2="20.303cm" svg:y2="15.904cm">
            <text:p/>
          </draw:line>
          <draw:line draw:style-name="gr38" draw:text-style-name="P4" draw:layer="layout" svg:x1="19.501cm" svg:y1="15.303cm" svg:x2="20.003cm" svg:y2="15.304cm">
            <text:p/>
          </draw:line>
          <draw:line draw:style-name="gr38" draw:text-style-name="P4" draw:layer="layout" svg:x1="19.501cm" svg:y1="15.704cm" svg:x2="20.003cm" svg:y2="15.704cm">
            <text:p/>
          </draw:line>
          <draw:frame draw:style-name="gr564" draw:text-style-name="P37" draw:layer="layout" svg:width="1.129cm" svg:height="0.569cm" svg:x="19.001cm" svg:y="14.835cm">
            <draw:text-box>
              <text:p><text:span text:style-name="T10">store</text:span></text:p>
            </draw:text-box>
          </draw:frame>
          <draw:frame draw:style-name="gr564" draw:text-style-name="P37" draw:layer="layout" svg:width="2.233cm" svg:height="0.569cm" svg:x="18.902cm" svg:y="16.236cm">
            <draw:text-box>
              <text:p><text:span text:style-name="T10">wb_commit_s</text:span></text:p>
            </draw:text-box>
          </draw:frame>
          <draw:frame draw:style-name="gr757" draw:text-style-name="P37" draw:layer="layout" svg:width="0.659cm" svg:height="0.569cm" svg:x="18.972cm" svg:y="15.4cm">
            <draw:text-box>
              <text:p><text:span text:style-name="T10">1</text:span></text:p>
            </draw:text-box>
          </draw:frame>
          <draw:line draw:style-name="gr38" draw:text-style-name="P4" draw:layer="layout" svg:x1="20.503cm" svg:y1="15.5cm" svg:x2="21cm" svg:y2="15.5cm">
            <text:p/>
          </draw:line>
          <draw:line draw:style-name="gr38" draw:text-style-name="P4" draw:layer="layout" svg:x1="21cm" svg:y1="15.5cm" svg:x2="21cm" svg:y2="16.805cm">
            <text:p/>
          </draw:line>
        </draw:g>
        <draw:line draw:style-name="gr38" draw:text-style-name="P4" draw:layer="layout" svg:x1="17cm" svg:y1="15.5cm" svg:x2="18.5cm" svg:y2="15.5cm">
          <text:p/>
        </draw:line>
        <draw:frame draw:style-name="gr776" draw:text-style-name="P37" draw:layer="layout" svg:width="2.217cm" svg:height="0.569cm" svg:x="16.4cm" svg:y="16.031cm">
          <draw:text-box>
            <text:p><text:span text:style-name="T10">global_stall_s</text:span></text:p>
          </draw:text-box>
        </draw:frame>
        <draw:frame draw:style-name="gr776" draw:text-style-name="P37" draw:layer="layout" svg:width="2.233cm" svg:height="0.569cm" svg:x="16.401cm" svg:y="15.032cm">
          <draw:text-box>
            <text:p><text:span text:style-name="T10">wb_commit_s</text:span></text:p>
          </draw:text-box>
        </draw:frame>
        <draw:line draw:style-name="gr38" draw:text-style-name="P4" draw:layer="layout" svg:x1="17cm" svg:y1="16.5cm" svg:x2="18.5cm" svg:y2="16.5cm">
          <text:p/>
        </draw:line>
        <draw:line draw:style-name="gr38" draw:text-style-name="P4" draw:layer="layout" svg:x1="27cm" svg:y1="17cm" svg:x2="28cm" svg:y2="17cm">
          <text:p/>
        </draw:line>
        <draw:frame draw:style-name="gr670" draw:text-style-name="P37" draw:layer="layout" svg:width="2.581cm" svg:height="0.569cm" svg:x="26.807cm" svg:y="16.532cm">
          <draw:text-box>
            <text:p><text:span text:style-name="T10">wb_committed_r</text:span></text:p>
          </draw:text-box>
        </draw:frame>
        <draw:g draw:style-name="gr1">
          <draw:g draw:style-name="gr1">
            <draw:custom-shape draw:style-name="gr763" draw:text-style-name="P36" draw:layer="layout" svg:width="2.007cm" svg:height="2cm" svg:x="29.993cm" svg:y="13cm">
              <text:p text:style-name="P35"><text:span text:style-name="T10">Commit</text:span></text:p>
              <draw:enhanced-geometry svg:viewBox="0 0 21600 21600" draw:type="rectangle" draw:enhanced-path="M 0 0 L 21600 0 21600 21600 0 21600 0 0 Z N"/>
            </draw:custom-shape>
            <draw:g draw:style-name="gr66">
              <draw:line draw:style-name="gr60" draw:text-style-name="P11" draw:layer="layout" svg:x1="29.993cm" svg:y1="14.966cm" svg:x2="30.143cm" svg:y2="14.933cm">
                <text:p/>
              </draw:line>
              <draw:line draw:style-name="gr60" draw:text-style-name="P11" draw:layer="layout" svg:x1="29.993cm" svg:y1="14.9cm" svg:x2="30.143cm" svg:y2="14.933cm">
                <text:p/>
              </draw:line>
            </draw:g>
          </draw:g>
        </draw:g>
        <draw:line draw:style-name="gr38" draw:text-style-name="P4" draw:layer="layout" svg:x1="32.001cm" svg:y1="14.001cm" svg:x2="33.001cm" svg:y2="14.001cm">
          <text:p/>
        </draw:line>
        <draw:frame draw:style-name="gr670" draw:text-style-name="P37" draw:layer="layout" svg:width="2.581cm" svg:height="0.569cm" svg:x="31.808cm" svg:y="13.533cm">
          <draw:text-box>
            <text:p><text:span text:style-name="T10">wb_committed_r</text:span></text:p>
          </draw:text-box>
        </draw:frame>
        <draw:line draw:style-name="gr38" draw:text-style-name="P4" draw:layer="layout" svg:x1="28.5cm" svg:y1="13.5cm" svg:x2="30cm" svg:y2="13.5cm">
          <text:p/>
        </draw:line>
        <draw:frame draw:style-name="gr776" draw:text-style-name="P37" draw:layer="layout" svg:width="2.217cm" svg:height="0.569cm" svg:x="27.9cm" svg:y="14.031cm">
          <draw:text-box>
            <text:p><text:span text:style-name="T10">global_stall_s</text:span></text:p>
          </draw:text-box>
        </draw:frame>
        <draw:frame draw:style-name="gr776" draw:text-style-name="P37" draw:layer="layout" svg:width="2.233cm" svg:height="0.569cm" svg:x="27.901cm" svg:y="13.032cm">
          <draw:text-box>
            <text:p><text:span text:style-name="T10">wb_commit_s</text:span></text:p>
          </draw:text-box>
        </draw:frame>
        <draw:line draw:style-name="gr38" draw:text-style-name="P4" draw:layer="layout" svg:x1="28.5cm" svg:y1="14.5cm" svg:x2="30cm" svg:y2="14.5cm">
          <text:p/>
        </draw:line>
      </draw:page>
      <draw:page draw:name="page13" draw:style-name="dp1" draw:master-page-name="Standard">
        <draw:g draw:style-name="gr1">
          <draw:g draw:style-name="gr1">
            <draw:g draw:style-name="gr1">
              <draw:custom-shape draw:style-name="gr703" draw:text-style-name="P36" draw:layer="layout" svg:width="3cm" svg:height="2.031cm" svg:x="57cm" svg:y="49.501cm">
                <text:p text:style-name="P35"><text:span text:style-name="T10">alu</text:span><text:span text:style-name="T10">b</text:span></text:p>
                <draw:enhanced-geometry svg:viewBox="0 0 21600 21600" draw:type="rectangle" draw:enhanced-path="M 0 0 L 21600 0 21600 21600 0 21600 0 0 Z N"/>
              </draw:custom-shape>
              <draw:frame draw:style-name="gr704" draw:text-style-name="P37" draw:layer="layout" svg:width="1.37cm" svg:height="0.569cm" svg:x="57cm" svg:y="49.532cm">
                <draw:text-box>
                  <text:p><text:span text:style-name="T10">data01</text:span></text:p>
                </draw:text-box>
              </draw:frame>
              <draw:frame draw:style-name="gr704" draw:text-style-name="P37" draw:layer="layout" svg:width="1.37cm" svg:height="0.569cm" svg:x="57cm" svg:y="50.001cm">
                <draw:text-box>
                  <text:p><text:span text:style-name="T10">data02</text:span></text:p>
                </draw:text-box>
              </draw:frame>
              <draw:frame draw:style-name="gr632" draw:text-style-name="P37" draw:layer="layout" svg:width="1.446cm" svg:height="0.569cm" svg:x="58.054cm" svg:y="50.963cm">
                <draw:text-box>
                  <text:p><text:span text:style-name="T10">aluSelb</text:span></text:p>
                </draw:text-box>
              </draw:frame>
              <draw:frame draw:style-name="gr559" draw:text-style-name="P37" draw:layer="layout" svg:width="1.035cm" svg:height="0.569cm" svg:x="58.9cm" svg:y="50.401cm">
                <draw:text-box>
                  <text:p><text:span text:style-name="T10">take</text:span></text:p>
                </draw:text-box>
              </draw:frame>
            </draw:g>
            <draw:frame draw:style-name="gr644" draw:text-style-name="P37" draw:layer="layout" svg:width="1.336cm" svg:height="0.569cm" svg:x="59.817cm" svg:y="50.032cm">
              <draw:text-box>
                <text:p><text:span text:style-name="T10">take_s</text:span></text:p>
              </draw:text-box>
            </draw:frame>
            <draw:frame draw:style-name="gr634" draw:text-style-name="P37" draw:layer="layout" svg:width="1.747cm" svg:height="0.569cm" svg:x="58.264cm" svg:y="51.401cm">
              <draw:text-box>
                <text:p><text:span text:style-name="T10">aluSelb_s</text:span></text:p>
              </draw:text-box>
            </draw:frame>
            <draw:line draw:style-name="gr38" draw:text-style-name="P4" draw:layer="layout" svg:x1="56cm" svg:y1="49.801cm" svg:x2="57cm" svg:y2="49.801cm">
              <text:p/>
            </draw:line>
            <draw:line draw:style-name="gr38" draw:text-style-name="P4" draw:layer="layout" svg:x1="56cm" svg:y1="50.301cm" svg:x2="57cm" svg:y2="50.301cm">
              <text:p/>
            </draw:line>
            <draw:line draw:style-name="gr38" draw:text-style-name="P4" draw:layer="layout" svg:x1="58.5cm" svg:y1="51.533cm" svg:x2="58.5cm" svg:y2="52.002cm">
              <text:p/>
            </draw:line>
            <draw:line draw:style-name="gr38" draw:text-style-name="P4" draw:layer="layout" svg:x1="60cm" svg:y1="50.501cm" svg:x2="61.5cm" svg:y2="50.501cm">
              <text:p/>
            </draw:line>
          </draw:g>
          <draw:custom-shape draw:style-name="gr636" draw:text-style-name="P43" draw:layer="layout" svg:width="5.5cm" svg:height="3cm" svg:x="56cm" svg:y="49.001cm">
            <text:p/>
            <draw:enhanced-geometry svg:viewBox="0 0 21600 21600" draw:type="rectangle" draw:enhanced-path="M 0 0 L 21600 0 21600 21600 0 21600 0 0 Z N"/>
          </draw:custom-shape>
          <draw:frame draw:style-name="gr707" draw:text-style-name="P44" draw:layer="layout" svg:width="2.233cm" svg:height="0.569cm" svg:x="57.5cm" svg:y="49.032cm">
            <draw:text-box>
              <text:p><text:span text:style-name="T12">ALU: Branch</text:span></text:p>
            </draw:text-box>
          </draw:frame>
        </draw:g>
        <draw:g draw:style-name="gr1">
          <draw:g draw:style-name="gr1">
            <draw:g draw:style-name="gr1">
              <draw:custom-shape draw:style-name="gr703" draw:text-style-name="P36" draw:layer="layout" svg:width="3cm" svg:height="2.031cm" svg:x="57.001cm" svg:y="43.5cm">
                <text:p text:style-name="P35"><text:span text:style-name="T10">alua</text:span></text:p>
                <draw:enhanced-geometry svg:viewBox="0 0 21600 21600" draw:type="rectangle" draw:enhanced-path="M 0 0 L 21600 0 21600 21600 0 21600 0 0 Z N"/>
              </draw:custom-shape>
              <draw:frame draw:style-name="gr704" draw:text-style-name="P37" draw:layer="layout" svg:width="1.37cm" svg:height="0.569cm" svg:x="57.001cm" svg:y="43.531cm">
                <draw:text-box>
                  <text:p><text:span text:style-name="T10">data01</text:span></text:p>
                </draw:text-box>
              </draw:frame>
              <draw:frame draw:style-name="gr704" draw:text-style-name="P37" draw:layer="layout" svg:width="1.37cm" svg:height="0.569cm" svg:x="57.001cm" svg:y="44cm">
                <draw:text-box>
                  <text:p><text:span text:style-name="T10">data02</text:span></text:p>
                </draw:text-box>
              </draw:frame>
              <draw:frame draw:style-name="gr632" draw:text-style-name="P37" draw:layer="layout" svg:width="1.446cm" svg:height="0.569cm" svg:x="58.055cm" svg:y="44.962cm">
                <draw:text-box>
                  <text:p><text:span text:style-name="T10">aluSela</text:span></text:p>
                </draw:text-box>
              </draw:frame>
              <draw:frame draw:style-name="gr705" draw:text-style-name="P37" draw:layer="layout" svg:width="1.683cm" svg:height="0.569cm" svg:x="58.301cm" svg:y="44.4cm">
                <draw:text-box>
                  <text:p><text:span text:style-name="T10">aluResult</text:span></text:p>
                </draw:text-box>
              </draw:frame>
            </draw:g>
            <draw:frame draw:style-name="gr705" draw:text-style-name="P37" draw:layer="layout" svg:width="1.683cm" svg:height="0.569cm" svg:x="59.818cm" svg:y="44.031cm">
              <draw:text-box>
                <text:p><text:span text:style-name="T10">aluRes_s</text:span></text:p>
              </draw:text-box>
            </draw:frame>
            <draw:frame draw:style-name="gr634" draw:text-style-name="P37" draw:layer="layout" svg:width="1.747cm" svg:height="0.569cm" svg:x="58.384cm" svg:y="45.431cm">
              <draw:text-box>
                <text:p><text:span text:style-name="T10">aluSela_s</text:span></text:p>
              </draw:text-box>
            </draw:frame>
            <draw:line draw:style-name="gr38" draw:text-style-name="P4" draw:layer="layout" svg:x1="55.984cm" svg:y1="43.8cm" svg:x2="56.984cm" svg:y2="43.8cm">
              <text:p/>
            </draw:line>
            <draw:line draw:style-name="gr38" draw:text-style-name="P4" draw:layer="layout" svg:x1="55.984cm" svg:y1="44.3cm" svg:x2="56.984cm" svg:y2="44.3cm">
              <text:p/>
            </draw:line>
            <draw:line draw:style-name="gr38" draw:text-style-name="P4" draw:layer="layout" svg:x1="58.501cm" svg:y1="45.531cm" svg:x2="58.501cm" svg:y2="46cm">
              <text:p/>
            </draw:line>
            <draw:line draw:style-name="gr38" draw:text-style-name="P4" draw:layer="layout" svg:x1="59.984cm" svg:y1="44.5cm" svg:x2="61.501cm" svg:y2="44.5cm">
              <text:p/>
            </draw:line>
          </draw:g>
          <draw:custom-shape draw:style-name="gr636" draw:text-style-name="P43" draw:layer="layout" svg:width="5.5cm" svg:height="3cm" svg:x="55.984cm" svg:y="43cm">
            <text:p/>
            <draw:enhanced-geometry svg:viewBox="0 0 21600 21600" draw:type="rectangle" draw:enhanced-path="M 0 0 L 21600 0 21600 21600 0 21600 0 0 Z N"/>
          </draw:custom-shape>
          <draw:frame draw:style-name="gr706" draw:text-style-name="P44" draw:layer="layout" svg:width="1.874cm" svg:height="0.569cm" svg:x="57.51cm" svg:y="43.031cm">
            <draw:text-box>
              <text:p><text:span text:style-name="T12">ALU: Algo</text:span></text:p>
            </draw:text-box>
          </draw:frame>
        </draw:g>
        <draw:frame draw:style-name="gr756" draw:text-style-name="P37" draw:layer="layout" svg:width="1.793cm" svg:height="0.569cm" svg:x="61.3cm" svg:y="50.031cm">
          <draw:text-box>
            <text:p><text:span text:style-name="T10">ex_take_s</text:span></text:p>
          </draw:text-box>
        </draw:frame>
        <draw:line draw:style-name="gr38" draw:text-style-name="P4" draw:layer="layout" svg:x1="61.5cm" svg:y1="50.501cm" svg:x2="63cm" svg:y2="50.5cm">
          <text:p/>
        </draw:line>
        <draw:frame draw:style-name="gr756" draw:text-style-name="P37" draw:layer="layout" svg:width="2.344cm" svg:height="0.569cm" svg:x="56.303cm" svg:y="46.003cm">
          <draw:text-box>
            <text:p><text:span text:style-name="T10">id_ex_aluOp_r</text:span></text:p>
          </draw:text-box>
        </draw:frame>
        <draw:frame draw:style-name="gr756" draw:text-style-name="P37" draw:layer="layout" svg:width="1.823cm" svg:height="0.569cm" svg:x="54.4cm" svg:y="43.3cm">
          <draw:text-box>
            <text:p><text:span text:style-name="T10">ex_srcA_s</text:span></text:p>
          </draw:text-box>
        </draw:frame>
        <draw:frame draw:style-name="gr756" draw:text-style-name="P37" draw:layer="layout" svg:width="1.823cm" svg:height="0.569cm" svg:x="54.405cm" svg:y="43.805cm">
          <draw:text-box>
            <text:p><text:span text:style-name="T10">ex_srcB_s</text:span></text:p>
          </draw:text-box>
        </draw:frame>
        <draw:frame draw:style-name="gr756" draw:text-style-name="P37" draw:layer="layout" svg:width="2.14cm" svg:height="0.569cm" svg:x="61.306cm" svg:y="44.006cm">
          <draw:text-box>
            <text:p><text:span text:style-name="T10">ex_aluRes_s</text:span></text:p>
          </draw:text-box>
        </draw:frame>
        <draw:line draw:style-name="gr38" draw:text-style-name="P4" draw:layer="layout" svg:x1="61.501cm" svg:y1="44.5cm" svg:x2="63cm" svg:y2="44.5cm">
          <text:p/>
        </draw:line>
        <draw:frame draw:style-name="gr756" draw:text-style-name="P37" draw:layer="layout" svg:width="1.823cm" svg:height="0.569cm" svg:x="54.404cm" svg:y="49.304cm">
          <draw:text-box>
            <text:p><text:span text:style-name="T10">ex_srcA_s</text:span></text:p>
          </draw:text-box>
        </draw:frame>
        <draw:frame draw:style-name="gr756" draw:text-style-name="P37" draw:layer="layout" svg:width="1.823cm" svg:height="0.569cm" svg:x="54.405cm" svg:y="49.805cm">
          <draw:text-box>
            <text:p><text:span text:style-name="T10">ex_srcB_s</text:span></text:p>
          </draw:text-box>
        </draw:frame>
        <draw:frame draw:style-name="gr756" draw:text-style-name="P37" draw:layer="layout" svg:width="2.217cm" svg:height="0.569cm" svg:x="56.503cm" svg:y="52.004cm">
          <draw:text-box>
            <text:p><text:span text:style-name="T10">id_ex_brOp_r</text:span></text:p>
          </draw:text-box>
        </draw:frame>
        <draw:line draw:style-name="gr38" draw:text-style-name="P4" draw:layer="layout" svg:x1="56cm" svg:y1="43.8cm" svg:x2="55cm" svg:y2="43.8cm">
          <text:p/>
        </draw:line>
        <draw:line draw:style-name="gr38" draw:text-style-name="P4" draw:layer="layout" svg:x1="56cm" svg:y1="44.3cm" svg:x2="55cm" svg:y2="44.3cm">
          <text:p/>
        </draw:line>
        <draw:line draw:style-name="gr38" draw:text-style-name="P4" draw:layer="layout" svg:x1="56cm" svg:y1="49.8cm" svg:x2="55cm" svg:y2="49.8cm">
          <text:p/>
        </draw:line>
        <draw:line draw:style-name="gr38" draw:text-style-name="P4" draw:layer="layout" svg:x1="56cm" svg:y1="50.3cm" svg:x2="55cm" svg:y2="50.3cm">
          <text:p/>
        </draw:line>
        <draw:line draw:style-name="gr38" draw:text-style-name="P4" draw:layer="layout" svg:x1="58.501cm" svg:y1="46cm" svg:x2="58.5cm" svg:y2="47cm">
          <text:p/>
        </draw:line>
        <draw:line draw:style-name="gr38" draw:text-style-name="P4" draw:layer="layout" svg:x1="58.5cm" svg:y1="52.002cm" svg:x2="58.5cm" svg:y2="53cm">
          <text:p/>
        </draw:line>
        <draw:g draw:style-name="gr1">
          <draw:g draw:style-name="gr1">
            <draw:g draw:style-name="gr1">
              <draw:g draw:style-name="gr1">
                <draw:custom-shape draw:style-name="gr708" draw:text-style-name="P36" draw:layer="layout" svg:width="4cm" svg:height="5cm" svg:x="25cm" svg:y="16.501cm">
                  <text:p text:style-name="P35"><text:span text:style-name="T10">control</text:span></text:p>
                  <draw:enhanced-geometry svg:viewBox="0 0 21600 21600" draw:type="rectangle" draw:enhanced-path="M 0 0 L 21600 0 21600 21600 0 21600 0 0 Z N"/>
                </draw:custom-shape>
                <draw:frame draw:style-name="gr709" draw:text-style-name="P37" draw:layer="layout" svg:width="1.429cm" svg:height="0.569cm" svg:x="25cm" svg:y="16.501cm">
                  <draw:text-box>
                    <text:p><text:span text:style-name="T10">opcode</text:span></text:p>
                  </draw:text-box>
                </draw:frame>
                <draw:frame draw:style-name="gr710" draw:text-style-name="P37" draw:layer="layout" svg:width="1.192cm" svg:height="0.569cm" svg:x="25cm" svg:y="16.932cm">
                  <draw:text-box>
                    <text:p><text:span text:style-name="T10">func3</text:span></text:p>
                  </draw:text-box>
                </draw:frame>
                <draw:frame draw:style-name="gr702" draw:text-style-name="P37" draw:layer="layout" svg:width="1.51cm" svg:height="0.569cm" svg:x="25cm" svg:y="17.332cm">
                  <draw:text-box>
                    <text:p><text:span text:style-name="T10">func7b5</text:span></text:p>
                  </draw:text-box>
                </draw:frame>
                <draw:frame draw:style-name="gr711" draw:text-style-name="P37" draw:layer="layout" svg:width="1.054cm" svg:height="0.569cm" svg:x="25cm" svg:y="17.732cm">
                  <draw:text-box>
                    <text:p><text:span text:style-name="T10">take</text:span></text:p>
                  </draw:text-box>
                </draw:frame>
                <draw:frame draw:style-name="gr712" draw:text-style-name="P37" draw:layer="layout" svg:width="1.62cm" svg:height="0.569cm" svg:x="27.326cm" svg:y="16.532cm">
                  <draw:text-box>
                    <text:p><text:span text:style-name="T10">resultSrc</text:span></text:p>
                  </draw:text-box>
                </draw:frame>
                <draw:frame draw:style-name="gr713" draw:text-style-name="P37" draw:layer="layout" svg:width="1.645cm" svg:height="0.569cm" svg:x="27.301cm" svg:y="16.932cm">
                  <draw:text-box>
                    <text:p><text:span text:style-name="T10">dMemWr</text:span></text:p>
                  </draw:text-box>
                </draw:frame>
                <draw:frame draw:style-name="gr714" draw:text-style-name="P37" draw:layer="layout" svg:width="1.649cm" svg:height="0.569cm" svg:x="27.297cm" svg:y="17.332cm">
                  <draw:text-box>
                    <text:p><text:span text:style-name="T10">dMemRd</text:span></text:p>
                  </draw:text-box>
                </draw:frame>
                <draw:frame draw:style-name="gr715" draw:text-style-name="P37" draw:layer="layout" svg:width="1.493cm" svg:height="0.569cm" svg:x="27.453cm" svg:y="17.732cm">
                  <draw:text-box>
                    <text:p><text:span text:style-name="T10">aluSrcB</text:span></text:p>
                  </draw:text-box>
                </draw:frame>
                <draw:frame draw:style-name="gr715" draw:text-style-name="P37" draw:layer="layout" svg:width="1.493cm" svg:height="0.569cm" svg:x="27.453cm" svg:y="18.132cm">
                  <draw:text-box>
                    <text:p><text:span text:style-name="T10">aluSrcA</text:span></text:p>
                  </draw:text-box>
                </draw:frame>
                <draw:frame draw:style-name="gr716" draw:text-style-name="P37" draw:layer="layout" svg:width="1.268cm" svg:height="0.569cm" svg:x="27.678cm" svg:y="18.532cm">
                  <draw:text-box>
                    <text:p><text:span text:style-name="T10">regWr</text:span></text:p>
                  </draw:text-box>
                </draw:frame>
                <draw:frame draw:style-name="gr717" draw:text-style-name="P37" draw:layer="layout" svg:width="1.117cm" svg:height="0.569cm" svg:x="27.829cm" svg:y="18.932cm">
                  <draw:text-box>
                    <text:p><text:span text:style-name="T10">jump</text:span></text:p>
                  </draw:text-box>
                </draw:frame>
                <draw:frame draw:style-name="gr463" draw:text-style-name="P37" draw:layer="layout" svg:width="1.463cm" svg:height="0.569cm" svg:x="27.483cm" svg:y="19.332cm">
                  <draw:text-box>
                    <text:p><text:span text:style-name="T10">immSrc</text:span></text:p>
                  </draw:text-box>
                </draw:frame>
                <draw:frame draw:style-name="gr718" draw:text-style-name="P37" draw:layer="layout" svg:width="1.446cm" svg:height="0.569cm" svg:x="27.5cm" svg:y="19.701cm">
                  <draw:text-box>
                    <text:p><text:span text:style-name="T10">aluSela</text:span></text:p>
                  </draw:text-box>
                </draw:frame>
                <draw:frame draw:style-name="gr719" draw:text-style-name="P37" draw:layer="layout" svg:width="2.708cm" svg:height="0.569cm" svg:x="26.238cm" svg:y="20.501cm">
                  <draw:text-box>
                    <text:p><text:span text:style-name="T10">trap_illegal_instrx</text:span></text:p>
                  </draw:text-box>
                </draw:frame>
                <draw:frame draw:style-name="gr718" draw:text-style-name="P37" draw:layer="layout" svg:width="1.446cm" svg:height="0.569cm" svg:x="27.5cm" svg:y="20.101cm">
                  <draw:text-box>
                    <text:p><text:span text:style-name="T10">aluSelb</text:span></text:p>
                  </draw:text-box>
                </draw:frame>
              </draw:g>
              <draw:frame draw:style-name="gr617" draw:text-style-name="P37" draw:layer="layout" svg:width="1.51cm" svg:height="0.569cm" svg:x="23.7cm" svg:y="16.332cm">
                <draw:text-box>
                  <text:p><text:span text:style-name="T10">ir_s[6:0]</text:span></text:p>
                </draw:text-box>
              </draw:frame>
              <draw:frame draw:style-name="gr696" draw:text-style-name="P37" draw:layer="layout" svg:width="1.823cm" svg:height="0.569cm" svg:x="23.4cm" svg:y="16.732cm">
                <draw:text-box>
                  <text:p><text:span text:style-name="T10">ir_s[14:12]</text:span></text:p>
                </draw:text-box>
              </draw:frame>
              <draw:frame draw:style-name="gr639" draw:text-style-name="P37" draw:layer="layout" svg:width="1.429cm" svg:height="0.569cm" svg:x="23.771cm" svg:y="17.132cm">
                <draw:text-box>
                  <text:p><text:span text:style-name="T10">ir_s[30]</text:span></text:p>
                </draw:text-box>
              </draw:frame>
              <draw:frame draw:style-name="gr644" draw:text-style-name="P37" draw:layer="layout" svg:width="1.336cm" svg:height="0.569cm" svg:x="23.9cm" svg:y="17.532cm">
                <draw:text-box>
                  <text:p><text:span text:style-name="T10">take_s</text:span></text:p>
                </draw:text-box>
              </draw:frame>
              <draw:line draw:style-name="gr38" draw:text-style-name="P4" draw:layer="layout" svg:x1="23cm" svg:y1="16.8cm" svg:x2="25cm" svg:y2="16.801cm">
                <text:p/>
              </draw:line>
              <draw:line draw:style-name="gr38" draw:text-style-name="P4" draw:layer="layout" svg:x1="23cm" svg:y1="17.2cm" svg:x2="25cm" svg:y2="17.201cm">
                <text:p/>
              </draw:line>
              <draw:line draw:style-name="gr38" draw:text-style-name="P4" draw:layer="layout" svg:x1="23cm" svg:y1="17.6cm" svg:x2="25cm" svg:y2="17.601cm">
                <text:p/>
              </draw:line>
              <draw:line draw:style-name="gr38" draw:text-style-name="P4" draw:layer="layout" svg:x1="23cm" svg:y1="18cm" svg:x2="25cm" svg:y2="18.001cm">
                <text:p/>
              </draw:line>
              <draw:line draw:style-name="gr38" draw:text-style-name="P4" draw:layer="layout" svg:x1="29cm" svg:y1="16.801cm" svg:x2="32cm" svg:y2="16.8cm">
                <text:p/>
              </draw:line>
              <draw:line draw:style-name="gr38" draw:text-style-name="P4" draw:layer="layout" svg:x1="29cm" svg:y1="17.201cm" svg:x2="32cm" svg:y2="17.201cm">
                <text:p/>
              </draw:line>
              <draw:line draw:style-name="gr38" draw:text-style-name="P4" draw:layer="layout" svg:x1="29cm" svg:y1="17.601cm" svg:x2="32.002cm" svg:y2="17.6cm">
                <text:p/>
              </draw:line>
              <draw:line draw:style-name="gr38" draw:text-style-name="P4" draw:layer="layout" svg:x1="29cm" svg:y1="18.001cm" svg:x2="32cm" svg:y2="18cm">
                <text:p/>
              </draw:line>
              <draw:line draw:style-name="gr38" draw:text-style-name="P4" draw:layer="layout" svg:x1="29cm" svg:y1="18.401cm" svg:x2="32cm" svg:y2="18.401cm">
                <text:p/>
              </draw:line>
              <draw:line draw:style-name="gr38" draw:text-style-name="P4" draw:layer="layout" svg:x1="29cm" svg:y1="18.801cm" svg:x2="32cm" svg:y2="18.801cm">
                <text:p/>
              </draw:line>
              <draw:line draw:style-name="gr38" draw:text-style-name="P4" draw:layer="layout" svg:x1="29cm" svg:y1="19.201cm" svg:x2="32cm" svg:y2="19.2cm">
                <text:p/>
              </draw:line>
              <draw:line draw:style-name="gr38" draw:text-style-name="P4" draw:layer="layout" svg:x1="29cm" svg:y1="19.601cm" svg:x2="32cm" svg:y2="19.602cm">
                <text:p/>
              </draw:line>
              <draw:line draw:style-name="gr38" draw:text-style-name="P4" draw:layer="layout" svg:x1="29cm" svg:y1="20.001cm" svg:x2="32cm" svg:y2="20cm">
                <text:p/>
              </draw:line>
              <draw:line draw:style-name="gr38" draw:text-style-name="P4" draw:layer="layout" svg:x1="29cm" svg:y1="20.401cm" svg:x2="32cm" svg:y2="20.401cm">
                <text:p/>
              </draw:line>
              <draw:line draw:style-name="gr38" draw:text-style-name="P4" draw:layer="layout" svg:x1="29cm" svg:y1="20.801cm" svg:x2="32cm" svg:y2="20.8cm">
                <text:p/>
              </draw:line>
              <draw:frame draw:style-name="gr720" draw:text-style-name="P37" draw:layer="layout" svg:width="2.06cm" svg:height="0.569cm" svg:x="28.8cm" svg:y="16.333cm">
                <draw:text-box>
                  <text:p><text:span text:style-name="T10">resultSrcx_s</text:span></text:p>
                </draw:text-box>
              </draw:frame>
              <draw:frame draw:style-name="gr676" draw:text-style-name="P37" draw:layer="layout" svg:width="1.946cm" svg:height="0.569cm" svg:x="28.8cm" svg:y="16.734cm">
                <draw:text-box>
                  <text:p><text:span text:style-name="T10">dMemWr_s</text:span></text:p>
                </draw:text-box>
              </draw:frame>
              <draw:frame draw:style-name="gr675" draw:text-style-name="P37" draw:layer="layout" svg:width="1.95cm" svg:height="0.569cm" svg:x="28.8cm" svg:y="17.135cm">
                <draw:text-box>
                  <text:p><text:span text:style-name="T10">dMemRd_s</text:span></text:p>
                </draw:text-box>
              </draw:frame>
              <draw:frame draw:style-name="gr655" draw:text-style-name="P37" draw:layer="layout" svg:width="1.793cm" svg:height="0.569cm" svg:x="28.8cm" svg:y="17.536cm">
                <draw:text-box>
                  <text:p><text:span text:style-name="T10">aluSrcB_s</text:span></text:p>
                </draw:text-box>
              </draw:frame>
              <draw:frame draw:style-name="gr655" draw:text-style-name="P37" draw:layer="layout" svg:width="1.793cm" svg:height="0.569cm" svg:x="28.801cm" svg:y="17.937cm">
                <draw:text-box>
                  <text:p><text:span text:style-name="T10">aluSrcA_s</text:span></text:p>
                </draw:text-box>
              </draw:frame>
              <draw:frame draw:style-name="gr540" draw:text-style-name="P37" draw:layer="layout" svg:width="1.565cm" svg:height="0.569cm" svg:x="28.802cm" svg:y="18.338cm">
                <draw:text-box>
                  <text:p><text:span text:style-name="T10">regWr_s</text:span></text:p>
                </draw:text-box>
              </draw:frame>
              <draw:frame draw:style-name="gr721" draw:text-style-name="P37" draw:layer="layout" svg:width="1.412cm" svg:height="0.569cm" svg:x="28.803cm" svg:y="18.739cm">
                <draw:text-box>
                  <text:p><text:span text:style-name="T10">jump_s</text:span></text:p>
                </draw:text-box>
              </draw:frame>
              <draw:frame draw:style-name="gr633" draw:text-style-name="P37" draw:layer="layout" svg:width="1.903cm" svg:height="0.569cm" svg:x="28.803cm" svg:y="19.14cm">
                <draw:text-box>
                  <text:p><text:span text:style-name="T10">immSrcx_s</text:span></text:p>
                </draw:text-box>
              </draw:frame>
              <draw:frame draw:style-name="gr634" draw:text-style-name="P37" draw:layer="layout" svg:width="1.747cm" svg:height="0.569cm" svg:x="28.804cm" svg:y="19.541cm">
                <draw:text-box>
                  <text:p><text:span text:style-name="T10">aluSela_s</text:span></text:p>
                </draw:text-box>
              </draw:frame>
              <draw:frame draw:style-name="gr634" draw:text-style-name="P37" draw:layer="layout" svg:width="1.747cm" svg:height="0.569cm" svg:x="28.805cm" svg:y="19.942cm">
                <draw:text-box>
                  <text:p><text:span text:style-name="T10">aluSelb_s</text:span></text:p>
                </draw:text-box>
              </draw:frame>
              <draw:frame draw:style-name="gr722" draw:text-style-name="P37" draw:layer="layout" svg:width="3.008cm" svg:height="0.569cm" svg:x="28.806cm" svg:y="20.343cm">
                <draw:text-box>
                  <text:p><text:span text:style-name="T10">trap_illegal_instrx</text:span><text:span text:style-name="T10">_s</text:span></text:p>
                </draw:text-box>
              </draw:frame>
            </draw:g>
            <draw:custom-shape draw:style-name="gr723" draw:text-style-name="P43" draw:layer="layout" svg:width="9cm" svg:height="6cm" svg:x="23cm" svg:y="16cm">
              <text:p/>
              <draw:enhanced-geometry svg:viewBox="0 0 21600 21600" draw:type="rectangle" draw:enhanced-path="M 0 0 L 21600 0 21600 21600 0 21600 0 0 Z N"/>
            </draw:custom-shape>
            <draw:frame draw:style-name="gr683" draw:text-style-name="P44" draw:layer="layout" svg:width="2.297cm" svg:height="0.569cm" svg:x="25.603cm" svg:y="16.031cm">
              <draw:text-box>
                <text:p><text:span text:style-name="T12">Instr.-Decode</text:span></text:p>
              </draw:text-box>
            </draw:frame>
          </draw:g>
          <draw:frame draw:style-name="gr756" draw:text-style-name="P37" draw:layer="layout" svg:width="2.297cm" svg:height="0.569cm" svg:x="31.8cm" svg:y="16.4cm">
            <draw:text-box>
              <text:p><text:span text:style-name="T10">id_resultSrc_s</text:span></text:p>
            </draw:text-box>
          </draw:frame>
          <draw:line draw:style-name="gr38" draw:text-style-name="P4" draw:layer="layout" svg:x1="32cm" svg:y1="16.8cm" svg:x2="33cm" svg:y2="16.8cm">
            <text:p/>
          </draw:line>
          <draw:line draw:style-name="gr38" draw:text-style-name="P4" draw:layer="layout" svg:x1="22.503cm" svg:y1="16.8cm" svg:x2="23cm" svg:y2="16.8cm">
            <text:p/>
          </draw:line>
          <draw:line draw:style-name="gr38" draw:text-style-name="P4" draw:layer="layout" svg:x1="22.503cm" svg:y1="17.2cm" svg:x2="23cm" svg:y2="17.2cm">
            <text:p/>
          </draw:line>
          <draw:line draw:style-name="gr38" draw:text-style-name="P4" draw:layer="layout" svg:x1="22.503cm" svg:y1="17.6cm" svg:x2="23cm" svg:y2="17.6cm">
            <text:p/>
          </draw:line>
          <draw:line draw:style-name="gr38" draw:text-style-name="P4" draw:layer="layout" svg:x1="22cm" svg:y1="18cm" svg:x2="23cm" svg:y2="18cm">
            <text:p/>
          </draw:line>
          <draw:frame draw:style-name="gr756" draw:text-style-name="P37" draw:layer="layout" svg:width="1.967cm" svg:height="0.569cm" svg:x="21.2cm" svg:y="16.3cm">
            <draw:text-box>
              <text:p><text:span text:style-name="T10">if_id_instr_r</text:span></text:p>
            </draw:text-box>
          </draw:frame>
          <draw:frame draw:style-name="gr756" draw:text-style-name="P37" draw:layer="layout" svg:width="1.967cm" svg:height="0.569cm" svg:x="21.201cm" svg:y="16.701cm">
            <draw:text-box>
              <text:p><text:span text:style-name="T10">if_id_instr_r</text:span></text:p>
            </draw:text-box>
          </draw:frame>
          <draw:frame draw:style-name="gr756" draw:text-style-name="P37" draw:layer="layout" svg:width="1.967cm" svg:height="0.569cm" svg:x="21.202cm" svg:y="17.102cm">
            <draw:text-box>
              <text:p><text:span text:style-name="T10">if_id_instr_r</text:span></text:p>
            </draw:text-box>
          </draw:frame>
          <draw:frame draw:style-name="gr757" draw:text-style-name="P37" draw:layer="layout" svg:width="0.659cm" svg:height="0.569cm" svg:x="22.503cm" svg:y="17.503cm">
            <draw:text-box>
              <text:p><text:span text:style-name="T10">0</text:span></text:p>
            </draw:text-box>
          </draw:frame>
          <draw:line draw:style-name="gr38" draw:text-style-name="P4" draw:layer="layout" svg:x1="32cm" svg:y1="17.2cm" svg:x2="33cm" svg:y2="17.2cm">
            <text:p/>
          </draw:line>
          <draw:line draw:style-name="gr38" draw:text-style-name="P4" draw:layer="layout" svg:x1="32cm" svg:y1="17.6cm" svg:x2="33cm" svg:y2="17.6cm">
            <text:p/>
          </draw:line>
          <draw:line draw:style-name="gr38" draw:text-style-name="P4" draw:layer="layout" svg:x1="32cm" svg:y1="18cm" svg:x2="33cm" svg:y2="18cm">
            <text:p/>
          </draw:line>
          <draw:line draw:style-name="gr38" draw:text-style-name="P4" draw:layer="layout" svg:x1="32cm" svg:y1="18.4cm" svg:x2="33cm" svg:y2="18.4cm">
            <text:p/>
          </draw:line>
          <draw:line draw:style-name="gr38" draw:text-style-name="P4" draw:layer="layout" svg:x1="32cm" svg:y1="18.8cm" svg:x2="33cm" svg:y2="18.8cm">
            <text:p/>
          </draw:line>
          <draw:line draw:style-name="gr38" draw:text-style-name="P4" draw:layer="layout" svg:x1="32cm" svg:y1="19.2cm" svg:x2="33cm" svg:y2="19.2cm">
            <text:p/>
          </draw:line>
          <draw:line draw:style-name="gr38" draw:text-style-name="P4" draw:layer="layout" svg:x1="32cm" svg:y1="19.6cm" svg:x2="33cm" svg:y2="19.6cm">
            <text:p/>
          </draw:line>
          <draw:line draw:style-name="gr38" draw:text-style-name="P4" draw:layer="layout" svg:x1="32cm" svg:y1="20cm" svg:x2="33cm" svg:y2="20cm">
            <text:p/>
          </draw:line>
          <draw:line draw:style-name="gr38" draw:text-style-name="P4" draw:layer="layout" svg:x1="32cm" svg:y1="20.4cm" svg:x2="33cm" svg:y2="20.4cm">
            <text:p/>
          </draw:line>
          <draw:line draw:style-name="gr38" draw:text-style-name="P4" draw:layer="layout" svg:x1="32cm" svg:y1="20.8cm" svg:x2="33cm" svg:y2="20.8cm">
            <text:p/>
          </draw:line>
          <draw:frame draw:style-name="gr756" draw:text-style-name="P37" draw:layer="layout" svg:width="2.322cm" svg:height="0.569cm" svg:x="31.801cm" svg:y="16.801cm">
            <draw:text-box>
              <text:p><text:span text:style-name="T10">id_dMemWr_s</text:span></text:p>
            </draw:text-box>
          </draw:frame>
          <draw:frame draw:style-name="gr756" draw:text-style-name="P37" draw:layer="layout" svg:width="2.327cm" svg:height="0.569cm" svg:x="31.801cm" svg:y="17.202cm">
            <draw:text-box>
              <text:p><text:span text:style-name="T10">id_dMemRd_s</text:span></text:p>
            </draw:text-box>
          </draw:frame>
          <draw:frame draw:style-name="gr756" draw:text-style-name="P37" draw:layer="layout" svg:width="2.17cm" svg:height="0.569cm" svg:x="31.802cm" svg:y="17.603cm">
            <draw:text-box>
              <text:p><text:span text:style-name="T10">id_aluSrcB_s</text:span></text:p>
            </draw:text-box>
          </draw:frame>
          <draw:frame draw:style-name="gr756" draw:text-style-name="P37" draw:layer="layout" svg:width="2.17cm" svg:height="0.569cm" svg:x="31.802cm" svg:y="18.004cm">
            <draw:text-box>
              <text:p><text:span text:style-name="T10">id_aluSrcA_s</text:span></text:p>
            </draw:text-box>
          </draw:frame>
          <draw:frame draw:style-name="gr756" draw:text-style-name="P37" draw:layer="layout" svg:width="1.946cm" svg:height="0.569cm" svg:x="31.802cm" svg:y="18.405cm">
            <draw:text-box>
              <text:p><text:span text:style-name="T10">id_regWr_s</text:span></text:p>
            </draw:text-box>
          </draw:frame>
          <draw:frame draw:style-name="gr756" draw:text-style-name="P37" draw:layer="layout" svg:width="1.793cm" svg:height="0.569cm" svg:x="31.802cm" svg:y="18.806cm">
            <draw:text-box>
              <text:p><text:span text:style-name="T10">id_jump_s</text:span></text:p>
            </draw:text-box>
          </draw:frame>
          <draw:frame draw:style-name="gr756" draw:text-style-name="P37" draw:layer="layout" svg:width="2.14cm" svg:height="0.569cm" svg:x="31.803cm" svg:y="19.207cm">
            <draw:text-box>
              <text:p><text:span text:style-name="T10">id_immSrc_s</text:span></text:p>
            </draw:text-box>
          </draw:frame>
          <draw:frame draw:style-name="gr756" draw:text-style-name="P37" draw:layer="layout" svg:width="1.933cm" svg:height="0.569cm" svg:x="31.803cm" svg:y="19.608cm">
            <draw:text-box>
              <text:p><text:span text:style-name="T10">id_aluOp_s</text:span></text:p>
            </draw:text-box>
          </draw:frame>
          <draw:frame draw:style-name="gr756" draw:text-style-name="P37" draw:layer="layout" svg:width="1.81cm" svg:height="0.569cm" svg:x="31.804cm" svg:y="20.009cm">
            <draw:text-box>
              <text:p><text:span text:style-name="T10">id_brOp_s</text:span></text:p>
            </draw:text-box>
          </draw:frame>
          <draw:frame draw:style-name="gr756" draw:text-style-name="P64" draw:layer="layout" svg:width="2.551cm" svg:height="0.569cm" svg:x="31.804cm" svg:y="20.41cm">
            <draw:text-box>
              <text:p text:style-name="P63"><text:span text:style-name="T19">id_trap_illegal_s</text:span></text:p>
            </draw:text-box>
          </draw:frame>
        </draw:g>
        <draw:g draw:style-name="gr1">
          <draw:g draw:style-name="gr1">
            <draw:custom-shape draw:style-name="gr691" draw:text-style-name="P36" draw:layer="layout" svg:width="4.507cm" svg:height="3cm" svg:x="37.993cm" svg:y="52.501cm">
              <text:p text:style-name="P35"><text:span text:style-name="T10">RegFile</text:span></text:p>
              <draw:enhanced-geometry svg:viewBox="0 0 21600 21600" draw:type="rectangle" draw:enhanced-path="M 0 0 L 21600 0 21600 21600 0 21600 0 0 Z N"/>
            </draw:custom-shape>
            <draw:g draw:style-name="gr66">
              <draw:line draw:style-name="gr60" draw:text-style-name="P11" draw:layer="layout" svg:x1="37.993cm" svg:y1="55.451cm" svg:x2="38.143cm" svg:y2="55.401cm">
                <text:p/>
              </draw:line>
              <draw:line draw:style-name="gr60" draw:text-style-name="P11" draw:layer="layout" svg:x1="37.993cm" svg:y1="55.351cm" svg:x2="38.143cm" svg:y2="55.401cm">
                <text:p/>
              </draw:line>
            </draw:g>
            <draw:frame draw:style-name="gr692" draw:text-style-name="P37" draw:layer="layout" svg:width="3.576cm" svg:height="0.569cm" svg:x="37.995cm" svg:y="53.201cm">
              <draw:text-box>
                <text:p><text:span text:style-name="T10">instr(19:15):raddr</text:span><text:span text:style-name="T10">01(4:0)</text:span></text:p>
              </draw:text-box>
            </draw:frame>
            <draw:frame draw:style-name="gr692" draw:text-style-name="P37" draw:layer="layout" svg:width="3.576cm" svg:height="0.569cm" svg:x="37.993cm" svg:y="53.632cm">
              <draw:text-box>
                <text:p><text:span text:style-name="T10">instr(24:20):raddr</text:span><text:span text:style-name="T10">02(4:0)</text:span></text:p>
              </draw:text-box>
            </draw:frame>
            <draw:frame draw:style-name="gr693" draw:text-style-name="P37" draw:layer="layout" svg:width="3.508cm" svg:height="0.569cm" svg:x="37.987cm" svg:y="54.101cm">
              <draw:text-box>
                <text:p><text:span text:style-name="T10">instr(11:7):waddr</text:span><text:span text:style-name="T10">01(4:0)</text:span></text:p>
              </draw:text-box>
            </draw:frame>
            <draw:frame draw:style-name="gr694" draw:text-style-name="P37" draw:layer="layout" svg:width="2.315cm" svg:height="0.569cm" svg:x="37.981cm" svg:y="52.832cm">
              <draw:text-box>
                <text:p><text:span text:style-name="T10">wdata01(63:0)</text:span></text:p>
              </draw:text-box>
            </draw:frame>
            <draw:frame draw:style-name="gr381" draw:text-style-name="P37" draw:layer="layout" svg:width="2.204cm" svg:height="0.569cm" svg:x="40.291cm" svg:y="52.601cm">
              <draw:text-box>
                <text:p><text:span text:style-name="T10">rdata01(63:0)</text:span></text:p>
              </draw:text-box>
            </draw:frame>
            <draw:frame draw:style-name="gr381" draw:text-style-name="P37" draw:layer="layout" svg:width="2.204cm" svg:height="0.569cm" svg:x="40.295cm" svg:y="54.632cm">
              <draw:text-box>
                <text:p><text:span text:style-name="T10">rdata02(63:0)</text:span></text:p>
              </draw:text-box>
            </draw:frame>
            <draw:frame draw:style-name="gr695" draw:text-style-name="P37" draw:layer="layout" svg:width="0.865cm" svg:height="0.569cm" svg:x="39.537cm" svg:y="54.932cm">
              <draw:text-box>
                <text:p><text:span text:style-name="T10">we</text:span></text:p>
              </draw:text-box>
            </draw:frame>
          </draw:g>
          <draw:line draw:style-name="gr38" draw:text-style-name="P4" draw:layer="layout" svg:x1="35cm" svg:y1="53.5cm" svg:x2="37.993cm" svg:y2="53.501cm">
            <text:p/>
          </draw:line>
          <draw:line draw:style-name="gr38" draw:text-style-name="P4" draw:layer="layout" svg:x1="35cm" svg:y1="53.9cm" svg:x2="37.994cm" svg:y2="53.901cm">
            <text:p/>
          </draw:line>
          <draw:line draw:style-name="gr38" draw:text-style-name="P4" draw:layer="layout" svg:x1="35cm" svg:y1="54.4cm" svg:x2="37.995cm" svg:y2="54.401cm">
            <text:p/>
          </draw:line>
          <draw:line draw:style-name="gr38" draw:text-style-name="P4" draw:layer="layout" svg:x1="35cm" svg:y1="53.1cm" svg:x2="37.996cm" svg:y2="53.101cm">
            <text:p/>
          </draw:line>
          <draw:line draw:style-name="gr38" draw:text-style-name="P4" draw:layer="layout" svg:x1="42.5cm" svg:y1="52.801cm" svg:x2="45cm" svg:y2="52.8cm">
            <text:p/>
          </draw:line>
          <draw:line draw:style-name="gr38" draw:text-style-name="P4" draw:layer="layout" svg:x1="42.499cm" svg:y1="55.001cm" svg:x2="45cm" svg:y2="55.001cm">
            <text:p/>
          </draw:line>
          <draw:frame draw:style-name="gr628" draw:text-style-name="P37" draw:layer="layout" svg:width="2.644cm" svg:height="0.569cm" svg:x="35.5cm" svg:y="52.632cm">
            <draw:text-box>
              <text:p><text:span text:style-name="T10">regfile_data_w_s</text:span></text:p>
            </draw:text-box>
          </draw:frame>
          <draw:frame draw:style-name="gr679" draw:text-style-name="P37" draw:layer="layout" svg:width="1.493cm" svg:height="0.569cm" svg:x="36.6cm" svg:y="52.333cm">
            <draw:text-box>
              <text:p><text:span text:style-name="T10">result_s</text:span></text:p>
            </draw:text-box>
          </draw:frame>
          <draw:line draw:style-name="gr38" draw:text-style-name="P4" draw:layer="layout" svg:x1="40cm" svg:y1="56cm" svg:x2="40cm" svg:y2="55.501cm">
            <text:p/>
          </draw:line>
          <draw:frame draw:style-name="gr696" draw:text-style-name="P37" draw:layer="layout" svg:width="1.823cm" svg:height="0.569cm" svg:x="36.358cm" svg:y="53.063cm">
            <draw:text-box>
              <text:p><text:span text:style-name="T10">ir_s[19:15]</text:span></text:p>
            </draw:text-box>
          </draw:frame>
          <draw:frame draw:style-name="gr696" draw:text-style-name="P37" draw:layer="layout" svg:width="1.823cm" svg:height="0.569cm" svg:x="36.277cm" svg:y="53.432cm">
            <draw:text-box>
              <text:p><text:span text:style-name="T10">ir_s[24:20]</text:span></text:p>
            </draw:text-box>
          </draw:frame>
          <draw:frame draw:style-name="gr697" draw:text-style-name="P37" draw:layer="layout" svg:width="1.645cm" svg:height="0.569cm" svg:x="36.558cm" svg:y="54.001cm">
            <draw:text-box>
              <text:p><text:span text:style-name="T10">ir_s[11:7]</text:span></text:p>
            </draw:text-box>
          </draw:frame>
          <draw:frame draw:style-name="gr640" draw:text-style-name="P37" draw:layer="layout" svg:width="1.399cm" svg:height="0.569cm" svg:x="42.307cm" svg:y="52.401cm">
            <draw:text-box>
              <text:p><text:span text:style-name="T10">regA_s</text:span></text:p>
            </draw:text-box>
          </draw:frame>
          <draw:frame draw:style-name="gr698" draw:text-style-name="P37" draw:layer="layout" svg:width="2.403cm" svg:height="0.569cm" svg:x="42.297cm" svg:y="54.532cm">
            <draw:text-box>
              <text:p><text:span text:style-name="T10">dBusDataWr_s</text:span></text:p>
            </draw:text-box>
          </draw:frame>
          <draw:custom-shape draw:style-name="gr586" draw:text-style-name="P43" draw:layer="layout" svg:width="10cm" svg:height="4cm" svg:x="35cm" svg:y="52cm">
            <text:p/>
            <draw:enhanced-geometry svg:viewBox="0 0 21600 21600" draw:type="rectangle" draw:enhanced-path="M 0 0 L 21600 0 21600 21600 0 21600 0 0 Z N"/>
          </draw:custom-shape>
          <draw:frame draw:style-name="gr699" draw:text-style-name="P44" draw:layer="layout" svg:width="1.522cm" svg:height="0.569cm" svg:x="39.078cm" svg:y="52.032cm">
            <draw:text-box>
              <text:p><text:span text:style-name="T12">RegFile</text:span></text:p>
            </draw:text-box>
          </draw:frame>
        </draw:g>
        <draw:frame draw:style-name="gr756" draw:text-style-name="P37" draw:layer="layout" svg:width="1.933cm" svg:height="0.569cm" svg:x="44.8cm" svg:y="52.331cm">
          <draw:text-box>
            <text:p><text:span text:style-name="T10">rf_rdata1_s</text:span></text:p>
          </draw:text-box>
        </draw:frame>
        <draw:line draw:style-name="gr38" draw:text-style-name="P4" draw:layer="layout" svg:x1="45cm" svg:y1="52.8cm" svg:x2="46cm" svg:y2="52.8cm">
          <text:p/>
        </draw:line>
        <draw:line draw:style-name="gr38" draw:text-style-name="P4" draw:layer="layout" svg:x1="45cm" svg:y1="55cm" svg:x2="46cm" svg:y2="55cm">
          <text:p/>
        </draw:line>
        <draw:line draw:style-name="gr38" draw:text-style-name="P4" draw:layer="layout" svg:x1="34cm" svg:y1="53.1cm" svg:x2="35cm" svg:y2="53.1cm">
          <text:p/>
        </draw:line>
        <draw:line draw:style-name="gr38" draw:text-style-name="P4" draw:layer="layout" svg:x1="34cm" svg:y1="53.5cm" svg:x2="35cm" svg:y2="53.5cm">
          <text:p/>
        </draw:line>
        <draw:line draw:style-name="gr38" draw:text-style-name="P4" draw:layer="layout" svg:x1="34cm" svg:y1="53.9cm" svg:x2="35cm" svg:y2="53.9cm">
          <text:p/>
        </draw:line>
        <draw:line draw:style-name="gr38" draw:text-style-name="P4" draw:layer="layout" svg:x1="34cm" svg:y1="54.4cm" svg:x2="35cm" svg:y2="54.4cm">
          <text:p/>
        </draw:line>
        <draw:line draw:style-name="gr38" draw:text-style-name="P4" draw:layer="layout" svg:x1="40cm" svg:y1="56cm" svg:x2="40cm" svg:y2="57.5cm">
          <text:p/>
        </draw:line>
        <draw:frame draw:style-name="gr756" draw:text-style-name="P37" draw:layer="layout" svg:width="1.933cm" svg:height="0.569cm" svg:x="44.801cm" svg:y="54.532cm">
          <draw:text-box>
            <text:p><text:span text:style-name="T10">rf_rdata2_s</text:span></text:p>
          </draw:text-box>
        </draw:frame>
        <draw:frame draw:style-name="gr756" draw:text-style-name="P37" draw:layer="layout" svg:width="2.767cm" svg:height="0.569cm" svg:x="37.402cm" svg:y="56.033cm">
          <draw:text-box>
            <text:p><text:span text:style-name="T10">wb_regWr_final_</text:span><text:span text:style-name="T10">s</text:span></text:p>
          </draw:text-box>
        </draw:frame>
        <draw:frame draw:style-name="gr756" draw:text-style-name="P37" draw:layer="layout" svg:width="1.967cm" svg:height="0.569cm" svg:x="33.201cm" svg:y="53.001cm">
          <draw:text-box>
            <text:p><text:span text:style-name="T10">if_id_instr_r</text:span></text:p>
          </draw:text-box>
        </draw:frame>
        <draw:frame draw:style-name="gr756" draw:text-style-name="P37" draw:layer="layout" svg:width="1.967cm" svg:height="0.569cm" svg:x="33.202cm" svg:y="53.402cm">
          <draw:text-box>
            <text:p><text:span text:style-name="T10">if_id_instr_r</text:span></text:p>
          </draw:text-box>
        </draw:frame>
        <draw:frame draw:style-name="gr756" draw:text-style-name="P37" draw:layer="layout" svg:width="2.598cm" svg:height="0.569cm" svg:x="32.603cm" svg:y="53.903cm">
          <draw:text-box>
            <text:p><text:span text:style-name="T10">mem_wb_instr_r</text:span></text:p>
          </draw:text-box>
        </draw:frame>
        <draw:frame draw:style-name="gr756" draw:text-style-name="P37" draw:layer="layout" svg:width="2.013cm" svg:height="0.569cm" svg:x="33.202cm" svg:y="52.602cm">
          <draw:text-box>
            <text:p><text:span text:style-name="T10">wb_result_s</text:span></text:p>
          </draw:text-box>
        </draw:frame>
        <draw:g draw:style-name="gr1">
          <draw:frame draw:style-name="gr545" draw:text-style-name="P37" draw:layer="layout" svg:width="1.886cm" svg:height="0.569cm" svg:x="63.828cm" svg:y="39.175cm">
            <draw:text-box>
              <text:p><text:span text:style-name="T10">irq_ext_i[7]</text:span></text:p>
            </draw:text-box>
          </draw:frame>
          <draw:frame draw:style-name="gr558" draw:text-style-name="P37" draw:layer="layout" svg:width="1.81cm" svg:height="0.569cm" svg:x="66.1cm" svg:y="38.575cm">
            <draw:text-box>
              <text:p><text:span text:style-name="T10">irq_sync_r</text:span></text:p>
            </draw:text-box>
          </draw:frame>
          <draw:line draw:style-name="gr38" draw:text-style-name="P4" draw:layer="layout" svg:x1="65cm" svg:y1="39cm" svg:x2="66cm" svg:y2="39cm">
            <text:p/>
          </draw:line>
          <draw:line draw:style-name="gr38" draw:text-style-name="P4" draw:layer="layout" svg:x1="66cm" svg:y1="39cm" svg:x2="68cm" svg:y2="39cm">
            <text:p/>
          </draw:line>
          <draw:g draw:style-name="gr1">
            <draw:custom-shape draw:style-name="gr165" draw:text-style-name="P14" draw:layer="layout" svg:width="0.4cm" svg:height="0.4cm" svg:x="64.8cm" svg:y="38.8cm">
              <text:p/>
              <draw:enhanced-geometry svg:viewBox="0 0 21600 21600" draw:type="rectangle" draw:enhanced-path="M 0 0 L 21600 0 21600 21600 0 21600 0 0 Z N"/>
            </draw:custom-shape>
            <draw:line draw:style-name="gr547" draw:text-style-name="P47" draw:layer="layout" svg:x1="64.8cm" svg:y1="38.8cm" svg:x2="65.2cm" svg:y2="39.2cm">
              <text:p/>
            </draw:line>
            <draw:line draw:style-name="gr547" draw:text-style-name="P47" draw:layer="layout" svg:x1="64.8cm" svg:y1="39.2cm" svg:x2="65.2cm" svg:y2="38.8cm">
              <text:p/>
            </draw:line>
          </draw:g>
          <draw:custom-shape draw:style-name="gr551" draw:text-style-name="P43" draw:layer="layout" svg:width="4cm" svg:height="2cm" svg:x="64cm" svg:y="38cm">
            <text:p/>
            <draw:enhanced-geometry svg:viewBox="0 0 21600 21600" draw:type="rectangle" draw:enhanced-path="M 0 0 L 21600 0 21600 21600 0 21600 0 0 Z N"/>
          </draw:custom-shape>
          <draw:frame draw:style-name="gr549" draw:text-style-name="P44" draw:layer="layout" svg:width="1.857cm" svg:height="0.569cm" svg:x="65.9cm" svg:y="39.231cm">
            <draw:text-box>
              <text:p><text:span text:style-name="T12">IRQ: Sync</text:span></text:p>
            </draw:text-box>
          </draw:frame>
          <draw:g draw:style-name="gr1">
            <draw:custom-shape draw:style-name="gr550" draw:text-style-name="P48" draw:layer="layout" svg:width="0.5cm" svg:height="1cm" svg:x="65.5cm" svg:y="38.5cm">
              <text:p/>
              <draw:enhanced-geometry svg:viewBox="0 0 21600 21600" draw:mirror-horizontal="false" draw:mirror-vertical="false" draw:type="rectangle" draw:enhanced-path="M 0 0 L 21600 0 21600 21600 0 21600 0 0 Z N"/>
            </draw:custom-shape>
            <draw:line draw:style-name="gr60" draw:text-style-name="P11" draw:layer="layout" svg:x1="65.5cm" svg:y1="39.45cm" svg:x2="65.65cm" svg:y2="39.4cm">
              <text:p/>
            </draw:line>
            <draw:line draw:style-name="gr60" draw:text-style-name="P11" draw:layer="layout" svg:x1="65.5cm" svg:y1="39.35cm" svg:x2="65.65cm" svg:y2="39.4cm">
              <text:p/>
            </draw:line>
          </draw:g>
        </draw:g>
        <draw:g draw:style-name="gr1">
          <draw:frame draw:style-name="gr541" draw:text-style-name="P37" draw:layer="layout" svg:width="2.246cm" svg:height="0.569cm" svg:x="69.3cm" svg:y="38.5cm">
            <draw:text-box>
              <text:p><text:span text:style-name="T10">csr_mip_r[11]</text:span></text:p>
            </draw:text-box>
          </draw:frame>
          <draw:line draw:style-name="gr38" draw:text-style-name="P4" draw:layer="layout" svg:x1="69.5cm" svg:y1="39cm" svg:x2="72cm" svg:y2="39cm">
            <text:p/>
          </draw:line>
          <draw:custom-shape draw:style-name="gr551" draw:text-style-name="P43" draw:layer="layout" svg:width="4cm" svg:height="2cm" svg:x="68cm" svg:y="38cm">
            <text:p/>
            <draw:enhanced-geometry svg:viewBox="0 0 21600 21600" draw:type="rectangle" draw:enhanced-path="M 0 0 L 21600 0 21600 21600 0 21600 0 0 Z N"/>
          </draw:custom-shape>
          <draw:frame draw:style-name="gr552" draw:text-style-name="P44" draw:layer="layout" svg:width="1.776cm" svg:height="0.569cm" svg:x="70.194cm" svg:y="38.031cm">
            <draw:text-box>
              <text:p><text:span text:style-name="T12">CSR: MIP</text:span></text:p>
            </draw:text-box>
          </draw:frame>
          <draw:g draw:style-name="gr1">
            <draw:custom-shape draw:style-name="gr550" draw:text-style-name="P48" draw:layer="layout" svg:width="0.5cm" svg:height="1cm" svg:x="69cm" svg:y="38.5cm">
              <text:p/>
              <draw:enhanced-geometry svg:viewBox="0 0 21600 21600" draw:mirror-horizontal="false" draw:mirror-vertical="false" draw:type="rectangle" draw:enhanced-path="M 0 0 L 21600 0 21600 21600 0 21600 0 0 Z N"/>
            </draw:custom-shape>
            <draw:line draw:style-name="gr60" draw:text-style-name="P11" draw:layer="layout" svg:x1="69cm" svg:y1="39.45cm" svg:x2="69.15cm" svg:y2="39.4cm">
              <text:p/>
            </draw:line>
            <draw:line draw:style-name="gr60" draw:text-style-name="P11" draw:layer="layout" svg:x1="69cm" svg:y1="39.35cm" svg:x2="69.15cm" svg:y2="39.4cm">
              <text:p/>
            </draw:line>
          </draw:g>
          <draw:line draw:style-name="gr38" draw:text-style-name="P4" draw:layer="layout" svg:x1="68cm" svg:y1="39cm" svg:x2="69cm" svg:y2="39cm">
            <text:p/>
          </draw:line>
        </draw:g>
        <draw:g draw:style-name="gr1">
          <draw:g draw:style-name="gr1">
            <draw:custom-shape draw:style-name="gr762" draw:text-style-name="P36" draw:layer="layout" svg:width="2.007cm" svg:height="3cm" svg:x="69.993cm" svg:y="54cm">
              <text:p text:style-name="P35"><text:span text:style-name="T10">mcause</text:span></text:p>
              <draw:enhanced-geometry svg:viewBox="0 0 21600 21600" draw:type="rectangle" draw:enhanced-path="M 0 0 L 21600 0 21600 21600 0 21600 0 0 Z N"/>
            </draw:custom-shape>
            <draw:g draw:style-name="gr66">
              <draw:line draw:style-name="gr60" draw:text-style-name="P11" draw:layer="layout" svg:x1="69.993cm" svg:y1="56.95cm" svg:x2="70.143cm" svg:y2="56.9cm">
                <text:p/>
              </draw:line>
              <draw:line draw:style-name="gr60" draw:text-style-name="P11" draw:layer="layout" svg:x1="69.993cm" svg:y1="56.85cm" svg:x2="70.143cm" svg:y2="56.9cm">
                <text:p/>
              </draw:line>
            </draw:g>
          </draw:g>
        </draw:g>
        <draw:line draw:style-name="gr38" draw:text-style-name="P4" draw:layer="layout" svg:x1="72cm" svg:y1="55.501cm" svg:x2="73cm" svg:y2="55.501cm">
          <text:p/>
        </draw:line>
        <draw:frame draw:style-name="gr756" draw:text-style-name="P37" draw:layer="layout" svg:width="2.28cm" svg:height="0.569cm" svg:x="71.8cm" svg:y="55.001cm">
          <draw:text-box>
            <text:p><text:span text:style-name="T10">csr_mcause_r</text:span></text:p>
          </draw:text-box>
        </draw:frame>
        <draw:line draw:style-name="gr38" draw:text-style-name="P4" draw:layer="layout" svg:x1="69cm" svg:y1="54.7cm" svg:x2="70cm" svg:y2="54.7cm">
          <text:p/>
        </draw:line>
        <draw:line draw:style-name="gr38" draw:text-style-name="P4" draw:layer="layout" svg:x1="69cm" svg:y1="55.1cm" svg:x2="70cm" svg:y2="55.1cm">
          <text:p/>
        </draw:line>
        <draw:line draw:style-name="gr38" draw:text-style-name="P4" draw:layer="layout" svg:x1="69cm" svg:y1="55.5cm" svg:x2="70cm" svg:y2="55.5cm">
          <text:p/>
        </draw:line>
        <draw:line draw:style-name="gr38" draw:text-style-name="P4" draw:layer="layout" svg:x1="69cm" svg:y1="55.9cm" svg:x2="70cm" svg:y2="55.9cm">
          <text:p/>
        </draw:line>
        <draw:line draw:style-name="gr38" draw:text-style-name="P4" draw:layer="layout" svg:x1="69cm" svg:y1="56.3cm" svg:x2="70cm" svg:y2="56.3cm">
          <text:p/>
        </draw:line>
        <draw:line draw:style-name="gr38" draw:text-style-name="P4" draw:layer="layout" svg:x1="69cm" svg:y1="56.7cm" svg:x2="70cm" svg:y2="56.7cm">
          <text:p/>
        </draw:line>
        <draw:frame draw:style-name="gr756" draw:text-style-name="P64" draw:layer="layout" svg:width="2.801cm" svg:height="0.569cm" svg:x="67.356cm" svg:y="54.2cm">
          <draw:text-box>
            <text:p text:style-name="P63"><text:span text:style-name="T19">wb_irq_pending_</text:span><text:span text:style-name="T19">s</text:span></text:p>
          </draw:text-box>
        </draw:frame>
        <draw:frame draw:style-name="gr756" draw:text-style-name="P37" draw:layer="layout" svg:width="3.457cm" svg:height="0.569cm" svg:x="66.7cm" svg:y="54.6cm">
          <draw:text-box>
            <text:p><text:span text:style-name="T10">mem_wb_inst_r </text:span><text:span text:style-name="T10">= store</text:span></text:p>
          </draw:text-box>
        </draw:frame>
        <draw:frame draw:style-name="gr756" draw:text-style-name="P37" draw:layer="layout" svg:width="3.36cm" svg:height="0.569cm" svg:x="66.797cm" svg:y="55cm">
          <draw:text-box>
            <text:p><text:span text:style-name="T10">mem_wb_inst_r </text:span><text:span text:style-name="T10">= load</text:span></text:p>
          </draw:text-box>
        </draw:frame>
        <draw:frame draw:style-name="gr756" draw:text-style-name="P64" draw:layer="layout" svg:width="3.321cm" svg:height="0.569cm" svg:x="66.836cm" svg:y="55.4cm">
          <draw:text-box>
            <text:p text:style-name="P63"><text:span text:style-name="T19">wb_trap_misalign</text:span><text:span text:style-name="T19">ed_s</text:span></text:p>
          </draw:text-box>
        </draw:frame>
        <draw:frame draw:style-name="gr756" draw:text-style-name="P64" draw:layer="layout" svg:width="2.691cm" svg:height="0.569cm" svg:x="67.466cm" svg:y="55.8cm">
          <draw:text-box>
            <text:p text:style-name="P63"><text:span text:style-name="T19">wb_trap_illegal_s</text:span></text:p>
          </draw:text-box>
        </draw:frame>
        <draw:frame draw:style-name="gr756" draw:text-style-name="P64" draw:layer="layout" svg:width="2.661cm" svg:height="0.569cm" svg:x="67.496cm" svg:y="56.2cm">
          <draw:text-box>
            <text:p text:style-name="P63"><text:span text:style-name="T19">wb_trap_taken_s</text:span></text:p>
          </draw:text-box>
        </draw:frame>
        <draw:g draw:style-name="gr1">
          <draw:g draw:style-name="gr1">
            <draw:custom-shape draw:style-name="gr763" draw:text-style-name="P36" draw:layer="layout" svg:width="2.007cm" svg:height="2cm" svg:x="69.993cm" svg:y="51cm">
              <text:p text:style-name="P35"><text:span text:style-name="T10">mtvec</text:span></text:p>
              <draw:enhanced-geometry svg:viewBox="0 0 21600 21600" draw:type="rectangle" draw:enhanced-path="M 0 0 L 21600 0 21600 21600 0 21600 0 0 Z N"/>
            </draw:custom-shape>
            <draw:g draw:style-name="gr66">
              <draw:line draw:style-name="gr60" draw:text-style-name="P11" draw:layer="layout" svg:x1="69.993cm" svg:y1="52.966cm" svg:x2="70.143cm" svg:y2="52.933cm">
                <text:p/>
              </draw:line>
              <draw:line draw:style-name="gr60" draw:text-style-name="P11" draw:layer="layout" svg:x1="69.993cm" svg:y1="52.9cm" svg:x2="70.143cm" svg:y2="52.933cm">
                <text:p/>
              </draw:line>
            </draw:g>
          </draw:g>
        </draw:g>
        <draw:line draw:style-name="gr38" draw:text-style-name="P4" draw:layer="layout" svg:x1="72cm" svg:y1="52.001cm" svg:x2="73cm" svg:y2="52.001cm">
          <text:p/>
        </draw:line>
        <draw:frame draw:style-name="gr756" draw:text-style-name="P37" draw:layer="layout" svg:width="2.043cm" svg:height="0.569cm" svg:x="71.8cm" svg:y="51.501cm">
          <draw:text-box>
            <text:p><text:span text:style-name="T10">csr_mtvec_r</text:span></text:p>
          </draw:text-box>
        </draw:frame>
        <draw:line draw:style-name="gr38" draw:text-style-name="P4" draw:layer="layout" svg:x1="69cm" svg:y1="51.7cm" svg:x2="70cm" svg:y2="51.7cm">
          <text:p/>
        </draw:line>
        <draw:line draw:style-name="gr38" draw:text-style-name="P4" draw:layer="layout" svg:x1="69cm" svg:y1="52.1cm" svg:x2="70cm" svg:y2="52.1cm">
          <text:p/>
        </draw:line>
        <draw:line draw:style-name="gr38" draw:text-style-name="P4" draw:layer="layout" svg:x1="69cm" svg:y1="52.5cm" svg:x2="70cm" svg:y2="52.5cm">
          <text:p/>
        </draw:line>
        <draw:line draw:style-name="gr38" draw:text-style-name="P4" draw:layer="layout" svg:x1="69cm" svg:y1="52.9cm" svg:x2="70cm" svg:y2="52.9cm">
          <text:p/>
        </draw:line>
        <draw:frame draw:style-name="gr777" draw:text-style-name="P62" draw:layer="layout" svg:width="3.351cm" svg:height="0.569cm" svg:x="66.746cm" svg:y="51.2cm">
          <draw:text-box>
            <text:p text:style-name="P6"><text:span text:style-name="T10">mem_wb_csr_wd</text:span><text:span text:style-name="T10">ata_r</text:span></text:p>
          </draw:text-box>
        </draw:frame>
        <draw:frame draw:style-name="gr756" draw:text-style-name="P37" draw:layer="layout" svg:width="2.5cm" svg:height="0.569cm" svg:x="67.597cm" svg:y="51.6cm">
          <draw:text-box>
            <text:p><text:span text:style-name="T10">mem_wb_inst_r</text:span></text:p>
          </draw:text-box>
        </draw:frame>
        <draw:frame draw:style-name="gr756" draw:text-style-name="P64" draw:layer="layout" svg:width="2.233cm" svg:height="0.569cm" svg:x="67.864cm" svg:y="52cm">
          <draw:text-box>
            <text:p text:style-name="P65"><text:span text:style-name="T19">wb_commit_s</text:span></text:p>
          </draw:text-box>
        </draw:frame>
        <draw:frame draw:style-name="gr756" draw:text-style-name="P64" draw:layer="layout" svg:width="2.661cm" svg:height="0.569cm" svg:x="67.436cm" svg:y="52.4cm">
          <draw:text-box>
            <text:p text:style-name="P65"><text:span text:style-name="T19">wb_trap_taken_s</text:span></text:p>
          </draw:text-box>
        </draw:frame>
        <draw:g draw:style-name="gr1">
          <draw:g draw:style-name="gr1">
            <draw:custom-shape draw:style-name="gr765" draw:text-style-name="P36" draw:layer="layout" svg:width="2.007cm" svg:height="3.5cm" svg:x="69.994cm" svg:y="46.5cm">
              <text:p text:style-name="P35"><text:span text:style-name="T10">mepc</text:span></text:p>
              <draw:enhanced-geometry svg:viewBox="0 0 21600 21600" draw:type="rectangle" draw:enhanced-path="M 0 0 L 21600 0 21600 21600 0 21600 0 0 Z N"/>
            </draw:custom-shape>
            <draw:g draw:style-name="gr66">
              <draw:line draw:style-name="gr60" draw:text-style-name="P11" draw:layer="layout" svg:x1="69.994cm" svg:y1="49.941cm" svg:x2="70.144cm" svg:y2="49.883cm">
                <text:p/>
              </draw:line>
              <draw:line draw:style-name="gr60" draw:text-style-name="P11" draw:layer="layout" svg:x1="69.994cm" svg:y1="49.825cm" svg:x2="70.144cm" svg:y2="49.883cm">
                <text:p/>
              </draw:line>
            </draw:g>
          </draw:g>
        </draw:g>
        <draw:line draw:style-name="gr38" draw:text-style-name="P4" draw:layer="layout" svg:x1="72.001cm" svg:y1="47.501cm" svg:x2="73.001cm" svg:y2="47.501cm">
          <text:p/>
        </draw:line>
        <draw:frame draw:style-name="gr756" draw:text-style-name="P37" draw:layer="layout" svg:width="1.979cm" svg:height="0.569cm" svg:x="71.801cm" svg:y="47.001cm">
          <draw:text-box>
            <text:p><text:span text:style-name="T10">csr_mepc_r</text:span></text:p>
          </draw:text-box>
        </draw:frame>
        <draw:line draw:style-name="gr38" draw:text-style-name="P4" draw:layer="layout" svg:x1="68.999cm" svg:y1="47.2cm" svg:x2="69.999cm" svg:y2="47.2cm">
          <text:p/>
        </draw:line>
        <draw:line draw:style-name="gr38" draw:text-style-name="P4" draw:layer="layout" svg:x1="68.999cm" svg:y1="47.6cm" svg:x2="69.999cm" svg:y2="47.6cm">
          <text:p/>
        </draw:line>
        <draw:line draw:style-name="gr38" draw:text-style-name="P4" draw:layer="layout" svg:x1="68.999cm" svg:y1="48cm" svg:x2="69.999cm" svg:y2="48cm">
          <text:p/>
        </draw:line>
        <draw:line draw:style-name="gr38" draw:text-style-name="P4" draw:layer="layout" svg:x1="68.999cm" svg:y1="48.4cm" svg:x2="69.999cm" svg:y2="48.4cm">
          <text:p/>
        </draw:line>
        <draw:frame draw:style-name="gr778" draw:text-style-name="P62" draw:layer="layout" svg:width="3.351cm" svg:height="0.569cm" svg:x="66.648cm" svg:y="46.7cm">
          <draw:text-box>
            <text:p text:style-name="P6"><text:span text:style-name="T10">mem_wb_csr_wd</text:span><text:span text:style-name="T10">ata_r</text:span></text:p>
          </draw:text-box>
        </draw:frame>
        <draw:frame draw:style-name="gr756" draw:text-style-name="P37" draw:layer="layout" svg:width="2.5cm" svg:height="0.569cm" svg:x="67.499cm" svg:y="47.1cm">
          <draw:text-box>
            <text:p><text:span text:style-name="T10">mem_wb_inst_r</text:span></text:p>
          </draw:text-box>
        </draw:frame>
        <draw:frame draw:style-name="gr779" draw:text-style-name="P62" draw:layer="layout" svg:width="2.36cm" svg:height="0.569cm" svg:x="67.639cm" svg:y="47.5cm">
          <draw:text-box>
            <text:p text:style-name="P6"><text:span text:style-name="T10">mem_wb_pc_r</text:span></text:p>
          </draw:text-box>
        </draw:frame>
        <draw:frame draw:style-name="gr780" draw:text-style-name="P66" draw:layer="layout" svg:width="3.321cm" svg:height="0.569cm" svg:x="66.678cm" svg:y="47.9cm">
          <draw:text-box>
            <text:p text:style-name="P65"><text:span text:style-name="T19">wb_trap_misalign</text:span><text:span text:style-name="T19">ed_s</text:span></text:p>
          </draw:text-box>
        </draw:frame>
        <draw:line draw:style-name="gr38" draw:text-style-name="P4" draw:layer="layout" svg:x1="68.999cm" svg:y1="48.801cm" svg:x2="69.999cm" svg:y2="48.801cm">
          <text:p/>
        </draw:line>
        <draw:line draw:style-name="gr38" draw:text-style-name="P4" draw:layer="layout" svg:x1="68.999cm" svg:y1="49.201cm" svg:x2="69.999cm" svg:y2="49.201cm">
          <text:p/>
        </draw:line>
        <draw:line draw:style-name="gr38" draw:text-style-name="P4" draw:layer="layout" svg:x1="68.999cm" svg:y1="49.601cm" svg:x2="69.999cm" svg:y2="49.601cm">
          <text:p/>
        </draw:line>
        <draw:frame draw:style-name="gr756" draw:text-style-name="P64" draw:layer="layout" svg:width="2.233cm" svg:height="0.569cm" svg:x="67.766cm" svg:y="48.701cm">
          <draw:text-box>
            <text:p text:style-name="P65"><text:span text:style-name="T19">wb_commit_s</text:span></text:p>
          </draw:text-box>
        </draw:frame>
        <draw:frame draw:style-name="gr756" draw:text-style-name="P64" draw:layer="layout" svg:width="2.661cm" svg:height="0.569cm" svg:x="67.338cm" svg:y="49.101cm">
          <draw:text-box>
            <text:p text:style-name="P65"><text:span text:style-name="T19">wb_trap_taken_s</text:span></text:p>
          </draw:text-box>
        </draw:frame>
        <draw:frame draw:style-name="gr781" draw:text-style-name="P66" draw:layer="layout" svg:width="2.691cm" svg:height="0.569cm" svg:x="67.308cm" svg:y="48.301cm">
          <draw:text-box>
            <text:p text:style-name="P65"><text:span text:style-name="T19">wb_trap_illegal_s</text:span></text:p>
          </draw:text-box>
        </draw:frame>
        <draw:g draw:style-name="gr1">
          <draw:g draw:style-name="gr1">
            <draw:custom-shape draw:style-name="gr770" draw:text-style-name="P36" draw:layer="layout" svg:width="2.007cm" svg:height="2.5cm" svg:x="69.994cm" svg:y="40.5cm">
              <text:p text:style-name="P35"><text:span text:style-name="T10">mstatus</text:span></text:p>
              <draw:enhanced-geometry svg:viewBox="0 0 21600 21600" draw:type="rectangle" draw:enhanced-path="M 0 0 L 21600 0 21600 21600 0 21600 0 0 Z N"/>
            </draw:custom-shape>
            <draw:g draw:style-name="gr66">
              <draw:line draw:style-name="gr60" draw:text-style-name="P11" draw:layer="layout" svg:x1="69.994cm" svg:y1="42.959cm" svg:x2="70.144cm" svg:y2="42.917cm">
                <text:p/>
              </draw:line>
              <draw:line draw:style-name="gr60" draw:text-style-name="P11" draw:layer="layout" svg:x1="69.994cm" svg:y1="42.875cm" svg:x2="70.144cm" svg:y2="42.917cm">
                <text:p/>
              </draw:line>
            </draw:g>
          </draw:g>
        </draw:g>
        <draw:line draw:style-name="gr38" draw:text-style-name="P4" draw:layer="layout" svg:x1="72.001cm" svg:y1="41.501cm" svg:x2="73.001cm" svg:y2="41.501cm">
          <text:p/>
        </draw:line>
        <draw:frame draw:style-name="gr756" draw:text-style-name="P37" draw:layer="layout" svg:width="2.28cm" svg:height="0.569cm" svg:x="71.801cm" svg:y="41.001cm">
          <draw:text-box>
            <text:p><text:span text:style-name="T10">csr_mstatus_r</text:span></text:p>
          </draw:text-box>
        </draw:frame>
        <draw:line draw:style-name="gr38" draw:text-style-name="P4" draw:layer="layout" svg:x1="68.999cm" svg:y1="41.2cm" svg:x2="69.999cm" svg:y2="41.2cm">
          <text:p/>
        </draw:line>
        <draw:line draw:style-name="gr38" draw:text-style-name="P4" draw:layer="layout" svg:x1="68.999cm" svg:y1="41.6cm" svg:x2="69.999cm" svg:y2="41.6cm">
          <text:p/>
        </draw:line>
        <draw:frame draw:style-name="gr756" draw:text-style-name="P37" draw:layer="layout" svg:width="2.5cm" svg:height="0.569cm" svg:x="67.499cm" svg:y="41.1cm">
          <draw:text-box>
            <text:p><text:span text:style-name="T10">mem_wb_inst_r</text:span></text:p>
          </draw:text-box>
        </draw:frame>
        <draw:line draw:style-name="gr38" draw:text-style-name="P4" draw:layer="layout" svg:x1="68.999cm" svg:y1="42.001cm" svg:x2="69.999cm" svg:y2="42.001cm">
          <text:p/>
        </draw:line>
        <draw:line draw:style-name="gr38" draw:text-style-name="P4" draw:layer="layout" svg:x1="68.999cm" svg:y1="42.401cm" svg:x2="69.999cm" svg:y2="42.401cm">
          <text:p/>
        </draw:line>
        <draw:line draw:style-name="gr38" draw:text-style-name="P4" draw:layer="layout" svg:x1="68.999cm" svg:y1="42.801cm" svg:x2="69.999cm" svg:y2="42.801cm">
          <text:p/>
        </draw:line>
        <draw:frame draw:style-name="gr756" draw:text-style-name="P64" draw:layer="layout" svg:width="2.233cm" svg:height="0.569cm" svg:x="67.766cm" svg:y="41.901cm">
          <draw:text-box>
            <text:p text:style-name="P65"><text:span text:style-name="T19">wb_commit_s</text:span></text:p>
          </draw:text-box>
        </draw:frame>
        <draw:frame draw:style-name="gr756" draw:text-style-name="P64" draw:layer="layout" svg:width="2.661cm" svg:height="0.569cm" svg:x="67.338cm" svg:y="42.301cm">
          <draw:text-box>
            <text:p text:style-name="P65"><text:span text:style-name="T19">wb_trap_taken_s</text:span></text:p>
          </draw:text-box>
        </draw:frame>
        <draw:frame draw:style-name="gr782" draw:text-style-name="P66" draw:layer="layout" svg:width="1.886cm" svg:height="0.569cm" svg:x="68.108cm" svg:y="41.501cm">
          <draw:text-box>
            <text:p text:style-name="P65"><text:span text:style-name="T19">wb_mret_s</text:span></text:p>
          </draw:text-box>
        </draw:frame>
        <draw:frame draw:style-name="gr783" draw:text-style-name="P62" draw:layer="layout" svg:width="3.351cm" svg:height="0.569cm" svg:x="66.649cm" svg:y="40.701cm">
          <draw:text-box>
            <text:p text:style-name="P6"><text:span text:style-name="T10">mem_wb_csr_wd</text:span><text:span text:style-name="T10">ata_r</text:span></text:p>
          </draw:text-box>
        </draw:frame>
        <draw:g draw:style-name="gr1">
          <draw:g draw:style-name="gr1">
            <draw:custom-shape draw:style-name="gr763" draw:text-style-name="P36" draw:layer="layout" svg:width="2.007cm" svg:height="2cm" svg:x="69.993cm" svg:y="44cm">
              <text:p text:style-name="P35"><text:span text:style-name="T10">mie</text:span></text:p>
              <draw:enhanced-geometry svg:viewBox="0 0 21600 21600" draw:type="rectangle" draw:enhanced-path="M 0 0 L 21600 0 21600 21600 0 21600 0 0 Z N"/>
            </draw:custom-shape>
            <draw:g draw:style-name="gr66">
              <draw:line draw:style-name="gr60" draw:text-style-name="P11" draw:layer="layout" svg:x1="69.993cm" svg:y1="45.966cm" svg:x2="70.143cm" svg:y2="45.933cm">
                <text:p/>
              </draw:line>
              <draw:line draw:style-name="gr60" draw:text-style-name="P11" draw:layer="layout" svg:x1="69.993cm" svg:y1="45.9cm" svg:x2="70.143cm" svg:y2="45.933cm">
                <text:p/>
              </draw:line>
            </draw:g>
          </draw:g>
        </draw:g>
        <draw:line draw:style-name="gr38" draw:text-style-name="P4" draw:layer="layout" svg:x1="72cm" svg:y1="45.001cm" svg:x2="73cm" svg:y2="45.001cm">
          <text:p/>
        </draw:line>
        <draw:frame draw:style-name="gr756" draw:text-style-name="P37" draw:layer="layout" svg:width="1.747cm" svg:height="0.569cm" svg:x="71.854cm" svg:y="44.501cm">
          <draw:text-box>
            <text:p><text:span text:style-name="T10">csr_mie_r</text:span></text:p>
          </draw:text-box>
        </draw:frame>
        <draw:line draw:style-name="gr38" draw:text-style-name="P4" draw:layer="layout" svg:x1="69cm" svg:y1="44.7cm" svg:x2="70cm" svg:y2="44.7cm">
          <text:p/>
        </draw:line>
        <draw:line draw:style-name="gr38" draw:text-style-name="P4" draw:layer="layout" svg:x1="69cm" svg:y1="45.1cm" svg:x2="70cm" svg:y2="45.1cm">
          <text:p/>
        </draw:line>
        <draw:line draw:style-name="gr38" draw:text-style-name="P4" draw:layer="layout" svg:x1="69cm" svg:y1="45.5cm" svg:x2="70cm" svg:y2="45.5cm">
          <text:p/>
        </draw:line>
        <draw:line draw:style-name="gr38" draw:text-style-name="P4" draw:layer="layout" svg:x1="69cm" svg:y1="45.9cm" svg:x2="70cm" svg:y2="45.9cm">
          <text:p/>
        </draw:line>
        <draw:frame draw:style-name="gr784" draw:text-style-name="P62" draw:layer="layout" svg:width="3.351cm" svg:height="0.569cm" svg:x="66.746cm" svg:y="44.2cm">
          <draw:text-box>
            <text:p text:style-name="P6"><text:span text:style-name="T10">mem_wb_csr_wd</text:span><text:span text:style-name="T10">ata_r</text:span></text:p>
          </draw:text-box>
        </draw:frame>
        <draw:frame draw:style-name="gr756" draw:text-style-name="P37" draw:layer="layout" svg:width="2.5cm" svg:height="0.569cm" svg:x="67.597cm" svg:y="44.6cm">
          <draw:text-box>
            <text:p><text:span text:style-name="T10">mem_wb_inst_r</text:span></text:p>
          </draw:text-box>
        </draw:frame>
        <draw:frame draw:style-name="gr756" draw:text-style-name="P64" draw:layer="layout" svg:width="2.233cm" svg:height="0.569cm" svg:x="67.864cm" svg:y="45cm">
          <draw:text-box>
            <text:p text:style-name="P65"><text:span text:style-name="T19">wb_commit_s</text:span></text:p>
          </draw:text-box>
        </draw:frame>
        <draw:frame draw:style-name="gr756" draw:text-style-name="P64" draw:layer="layout" svg:width="2.661cm" svg:height="0.569cm" svg:x="67.436cm" svg:y="45.4cm">
          <draw:text-box>
            <text:p text:style-name="P65"><text:span text:style-name="T19">wb_trap_taken_s</text:span></text:p>
          </draw:text-box>
        </draw:frame>
        <draw:g draw:style-name="gr1">
          <draw:g draw:style-name="gr1">
            <draw:custom-shape draw:style-name="gr763" draw:text-style-name="P36" draw:layer="layout" svg:width="2.007cm" svg:height="2cm" svg:x="60.004cm" svg:y="56cm">
              <text:p text:style-name="P35"><text:span text:style-name="T10">Commit</text:span></text:p>
              <text:p text:style-name="P35"><text:span text:style-name="T10">One-Shot</text:span></text:p>
              <draw:enhanced-geometry svg:viewBox="0 0 21600 21600" draw:type="rectangle" draw:enhanced-path="M 0 0 L 21600 0 21600 21600 0 21600 0 0 Z N"/>
            </draw:custom-shape>
            <draw:g draw:style-name="gr66">
              <draw:line draw:style-name="gr60" draw:text-style-name="P11" draw:layer="layout" svg:x1="60.004cm" svg:y1="57.966cm" svg:x2="60.154cm" svg:y2="57.933cm">
                <text:p/>
              </draw:line>
              <draw:line draw:style-name="gr60" draw:text-style-name="P11" draw:layer="layout" svg:x1="60.004cm" svg:y1="57.9cm" svg:x2="60.154cm" svg:y2="57.933cm">
                <text:p/>
              </draw:line>
            </draw:g>
          </draw:g>
        </draw:g>
        <draw:line draw:style-name="gr38" draw:text-style-name="P4" draw:layer="layout" svg:x1="62.012cm" svg:y1="57.001cm" svg:x2="63.012cm" svg:y2="57.001cm">
          <text:p/>
        </draw:line>
        <draw:frame draw:style-name="gr670" draw:text-style-name="P37" draw:layer="layout" svg:width="2.581cm" svg:height="0.569cm" svg:x="61.819cm" svg:y="56.533cm">
          <draw:text-box>
            <text:p><text:span text:style-name="T10">wb_committed_r</text:span></text:p>
          </draw:text-box>
        </draw:frame>
        <draw:line draw:style-name="gr38" draw:text-style-name="P4" draw:layer="layout" svg:x1="58.511cm" svg:y1="56.5cm" svg:x2="60.011cm" svg:y2="56.5cm">
          <text:p/>
        </draw:line>
        <draw:frame draw:style-name="gr776" draw:text-style-name="P68" draw:layer="layout" svg:width="2.217cm" svg:height="0.569cm" svg:x="57.911cm" svg:y="57.031cm">
          <draw:text-box>
            <text:p text:style-name="P67"><text:span text:style-name="T20">global_stall_s</text:span></text:p>
          </draw:text-box>
        </draw:frame>
        <draw:frame draw:style-name="gr776" draw:text-style-name="P64" draw:layer="layout" svg:width="2.233cm" svg:height="0.569cm" svg:x="57.912cm" svg:y="56.032cm">
          <draw:text-box>
            <text:p text:style-name="P63"><text:span text:style-name="T19">wb_commit_s</text:span></text:p>
          </draw:text-box>
        </draw:frame>
        <draw:line draw:style-name="gr38" draw:text-style-name="P4" draw:layer="layout" svg:x1="58.511cm" svg:y1="57.5cm" svg:x2="60.011cm" svg:y2="57.5cm">
          <text:p/>
        </draw:line>
        <draw:g draw:style-name="gr1">
          <draw:g draw:style-name="gr1">
            <draw:g draw:style-name="gr1">
              <draw:custom-shape draw:style-name="gr785" draw:text-style-name="P39" draw:layer="layout" svg:width="2cm" svg:height="5cm" svg:x="75cm" svg:y="8cm">
                <text:p text:style-name="P35"><text:span text:style-name="T10">MEM/WB</text:span></text:p>
                <draw:enhanced-geometry svg:viewBox="0 0 21600 21600" draw:type="rectangle" draw:enhanced-path="M 0 0 L 21600 0 21600 21600 0 21600 0 0 Z N"/>
              </draw:custom-shape>
              <draw:g draw:style-name="gr66">
                <draw:line draw:style-name="gr786" draw:text-style-name="P69" draw:layer="layout" svg:x1="75cm" svg:y1="12.916cm" svg:x2="75.149cm" svg:y2="12.833cm">
                  <text:p/>
                </draw:line>
                <draw:line draw:style-name="gr786" draw:text-style-name="P69" draw:layer="layout" svg:x1="75cm" svg:y1="12.75cm" svg:x2="75.149cm" svg:y2="12.833cm">
                  <text:p/>
                </draw:line>
              </draw:g>
            </draw:g>
          </draw:g>
          <draw:line draw:style-name="gr38" draw:text-style-name="P4" draw:layer="layout" svg:x1="74cm" svg:y1="8.7cm" svg:x2="75cm" svg:y2="8.7cm">
            <text:p/>
          </draw:line>
          <draw:frame draw:style-name="gr776" draw:text-style-name="P37" draw:layer="layout" svg:width="2.581cm" svg:height="0.569cm" svg:x="72.626cm" svg:y="8.233cm">
            <draw:text-box>
              <text:p><text:span text:style-name="T10">ex_mem_valid_r</text:span></text:p>
            </draw:text-box>
          </draw:frame>
          <draw:frame draw:style-name="gr776" draw:text-style-name="P37" draw:layer="layout" svg:width="2.534cm" svg:height="0.569cm" svg:x="72.673cm" svg:y="8.634cm">
            <draw:text-box>
              <text:p><text:span text:style-name="T10">ex_mem_instr_r</text:span></text:p>
            </draw:text-box>
          </draw:frame>
          <draw:frame draw:style-name="gr776" draw:text-style-name="P37" draw:layer="layout" svg:width="2.297cm" svg:height="0.569cm" svg:x="72.91cm" svg:y="9.035cm">
            <draw:text-box>
              <text:p><text:span text:style-name="T10">ex_mem_pc_r</text:span></text:p>
            </draw:text-box>
          </draw:frame>
          <draw:frame draw:style-name="gr776" draw:text-style-name="P37" draw:layer="layout" svg:width="2.763cm" svg:height="0.569cm" svg:x="72.444cm" svg:y="9.436cm">
            <draw:text-box>
              <text:p><text:span text:style-name="T10">ex_mem_regWr_</text:span><text:span text:style-name="T10">r</text:span></text:p>
            </draw:text-box>
          </draw:frame>
          <draw:frame draw:style-name="gr776" draw:text-style-name="P37" draw:layer="layout" svg:width="3.118cm" svg:height="0.569cm" svg:x="72.089cm" svg:y="9.837cm">
            <draw:text-box>
              <text:p><text:span text:style-name="T10">ex_mem_resultSr</text:span><text:span text:style-name="T10">c_r</text:span></text:p>
            </draw:text-box>
          </draw:frame>
          <draw:frame draw:style-name="gr776" draw:text-style-name="P37" draw:layer="layout" svg:width="3.368cm" svg:height="0.569cm" svg:x="71.839cm" svg:y="10.238cm">
            <draw:text-box>
              <text:p><text:span text:style-name="T10">ex_mem_trap_ille</text:span><text:span text:style-name="T10">gal_r</text:span></text:p>
            </draw:text-box>
          </draw:frame>
          <draw:frame draw:style-name="gr776" draw:text-style-name="P37" draw:layer="layout" svg:width="2.881cm" svg:height="0.569cm" svg:x="72.326cm" svg:y="10.639cm">
            <draw:text-box>
              <text:p><text:span text:style-name="T10">ex_mem_aluRes</text:span><text:span text:style-name="T10">_r</text:span></text:p>
            </draw:text-box>
          </draw:frame>
          <draw:frame draw:style-name="gr776" draw:text-style-name="P37" draw:layer="layout" svg:width="3.182cm" svg:height="0.569cm" svg:x="72.025cm" svg:y="11.441cm">
            <draw:text-box>
              <text:p><text:span text:style-name="T10">ex_mem_csr_rda</text:span><text:span text:style-name="T10">ta_r</text:span></text:p>
            </draw:text-box>
          </draw:frame>
          <draw:frame draw:style-name="gr776" draw:text-style-name="P37" draw:layer="layout" svg:width="3.292cm" svg:height="0.569cm" svg:x="71.915cm" svg:y="11.842cm">
            <draw:text-box>
              <text:p><text:span text:style-name="T10">ex_mem_csr_</text:span><text:span text:style-name="T10">wdata_r</text:span></text:p>
            </draw:text-box>
          </draw:frame>
          <draw:frame draw:style-name="gr776" draw:text-style-name="P37" draw:layer="layout" svg:width="2.644cm" svg:height="0.569cm" svg:x="76.903cm" svg:y="8.233cm">
            <draw:text-box>
              <text:p><text:span text:style-name="T10">mem_wb_valid_r</text:span></text:p>
            </draw:text-box>
          </draw:frame>
          <draw:frame draw:style-name="gr776" draw:text-style-name="P37" draw:layer="layout" svg:width="2.598cm" svg:height="0.569cm" svg:x="76.904cm" svg:y="8.634cm">
            <draw:text-box>
              <text:p><text:span text:style-name="T10">mem_wb_instr_r</text:span></text:p>
            </draw:text-box>
          </draw:frame>
          <draw:frame draw:style-name="gr776" draw:text-style-name="P37" draw:layer="layout" svg:width="2.36cm" svg:height="0.569cm" svg:x="76.904cm" svg:y="9.035cm">
            <draw:text-box>
              <text:p><text:span text:style-name="T10">mem_wb_pc_r</text:span></text:p>
            </draw:text-box>
          </draw:frame>
          <draw:frame draw:style-name="gr776" draw:text-style-name="P37" draw:layer="layout" svg:width="2.826cm" svg:height="0.569cm" svg:x="76.905cm" svg:y="9.436cm">
            <draw:text-box>
              <text:p><text:span text:style-name="T10">mem_wb_regWr_</text:span><text:span text:style-name="T10">r</text:span></text:p>
            </draw:text-box>
          </draw:frame>
          <draw:frame draw:style-name="gr776" draw:text-style-name="P37" draw:layer="layout" svg:width="3.177cm" svg:height="0.569cm" svg:x="76.906cm" svg:y="9.837cm">
            <draw:text-box>
              <text:p><text:span text:style-name="T10">mem_wb_resultS</text:span><text:span text:style-name="T10">rc_r</text:span></text:p>
            </draw:text-box>
          </draw:frame>
          <draw:frame draw:style-name="gr776" draw:text-style-name="P37" draw:layer="layout" svg:width="3.431cm" svg:height="0.569cm" svg:x="76.906cm" svg:y="10.238cm">
            <draw:text-box>
              <text:p><text:span text:style-name="T10">mem_wb_trap_ill</text:span><text:span text:style-name="T10">egal_r</text:span></text:p>
            </draw:text-box>
          </draw:frame>
          <draw:frame draw:style-name="gr776" draw:text-style-name="P37" draw:layer="layout" svg:width="2.945cm" svg:height="0.569cm" svg:x="76.906cm" svg:y="10.639cm">
            <draw:text-box>
              <text:p><text:span text:style-name="T10">mem_wb_aluRes</text:span><text:span text:style-name="T10">_r</text:span></text:p>
            </draw:text-box>
          </draw:frame>
          <draw:frame draw:style-name="gr776" draw:text-style-name="P37" draw:layer="layout" svg:width="3.292cm" svg:height="0.569cm" svg:x="76.907cm" svg:y="11.04cm">
            <draw:text-box>
              <text:p><text:span text:style-name="T10">mem_wb_memD</text:span><text:span text:style-name="T10">ata_r</text:span></text:p>
            </draw:text-box>
          </draw:frame>
          <draw:frame draw:style-name="gr776" draw:text-style-name="P37" draw:layer="layout" svg:width="3.241cm" svg:height="0.569cm" svg:x="76.907cm" svg:y="11.441cm">
            <draw:text-box>
              <text:p><text:span text:style-name="T10">mem_wb_csr_rd</text:span><text:span text:style-name="T10">ata_r</text:span></text:p>
            </draw:text-box>
          </draw:frame>
          <draw:frame draw:style-name="gr776" draw:text-style-name="P37" draw:layer="layout" svg:width="3.351cm" svg:height="0.569cm" svg:x="76.907cm" svg:y="11.842cm">
            <draw:text-box>
              <text:p><text:span text:style-name="T10">mem_wb_cs</text:span><text:span text:style-name="T10">r_wdata_r</text:span></text:p>
            </draw:text-box>
          </draw:frame>
          <draw:frame draw:style-name="gr776" draw:text-style-name="P68" draw:layer="layout" svg:width="2.217cm" svg:height="0.569cm" svg:x="72.99cm" svg:y="12.242cm">
            <draw:text-box>
              <text:p text:style-name="P67"><text:span text:style-name="T20">global_stall_s</text:span></text:p>
            </draw:text-box>
          </draw:frame>
          <draw:line draw:style-name="gr38" draw:text-style-name="P4" draw:layer="layout" svg:x1="74cm" svg:y1="9.1cm" svg:x2="75cm" svg:y2="9.1cm">
            <text:p/>
          </draw:line>
          <draw:line draw:style-name="gr38" draw:text-style-name="P4" draw:layer="layout" svg:x1="74cm" svg:y1="9.5cm" svg:x2="75cm" svg:y2="9.5cm">
            <text:p/>
          </draw:line>
          <draw:line draw:style-name="gr38" draw:text-style-name="P4" draw:layer="layout" svg:x1="74cm" svg:y1="9.9cm" svg:x2="75cm" svg:y2="9.9cm">
            <text:p/>
          </draw:line>
          <draw:line draw:style-name="gr38" draw:text-style-name="P4" draw:layer="layout" svg:x1="74cm" svg:y1="10.3cm" svg:x2="75cm" svg:y2="10.3cm">
            <text:p/>
          </draw:line>
          <draw:line draw:style-name="gr38" draw:text-style-name="P4" draw:layer="layout" svg:x1="74cm" svg:y1="10.7cm" svg:x2="75cm" svg:y2="10.7cm">
            <text:p/>
          </draw:line>
          <draw:line draw:style-name="gr38" draw:text-style-name="P4" draw:layer="layout" svg:x1="74cm" svg:y1="11.1cm" svg:x2="75cm" svg:y2="11.1cm">
            <text:p/>
          </draw:line>
          <draw:line draw:style-name="gr38" draw:text-style-name="P4" draw:layer="layout" svg:x1="74cm" svg:y1="11.5cm" svg:x2="75cm" svg:y2="11.5cm">
            <text:p/>
          </draw:line>
          <draw:line draw:style-name="gr38" draw:text-style-name="P4" draw:layer="layout" svg:x1="74cm" svg:y1="11.9cm" svg:x2="75cm" svg:y2="11.9cm">
            <text:p/>
          </draw:line>
          <draw:line draw:style-name="gr38" draw:text-style-name="P4" draw:layer="layout" svg:x1="74cm" svg:y1="12.3cm" svg:x2="75cm" svg:y2="12.3cm">
            <text:p/>
          </draw:line>
          <draw:line draw:style-name="gr38" draw:text-style-name="P4" draw:layer="layout" svg:x1="74cm" svg:y1="12.7cm" svg:x2="75cm" svg:y2="12.7cm">
            <text:p/>
          </draw:line>
          <draw:line draw:style-name="gr38" draw:text-style-name="P4" draw:layer="layout" svg:x1="77cm" svg:y1="8.7cm" svg:x2="78cm" svg:y2="8.7cm">
            <text:p/>
          </draw:line>
          <draw:line draw:style-name="gr38" draw:text-style-name="P4" draw:layer="layout" svg:x1="77cm" svg:y1="9.1cm" svg:x2="78cm" svg:y2="9.1cm">
            <text:p/>
          </draw:line>
          <draw:line draw:style-name="gr38" draw:text-style-name="P4" draw:layer="layout" svg:x1="77cm" svg:y1="9.5cm" svg:x2="78cm" svg:y2="9.5cm">
            <text:p/>
          </draw:line>
          <draw:line draw:style-name="gr38" draw:text-style-name="P4" draw:layer="layout" svg:x1="77cm" svg:y1="9.9cm" svg:x2="78cm" svg:y2="9.9cm">
            <text:p/>
          </draw:line>
          <draw:line draw:style-name="gr38" draw:text-style-name="P4" draw:layer="layout" svg:x1="77cm" svg:y1="10.3cm" svg:x2="78cm" svg:y2="10.3cm">
            <text:p/>
          </draw:line>
          <draw:line draw:style-name="gr38" draw:text-style-name="P4" draw:layer="layout" svg:x1="77cm" svg:y1="10.7cm" svg:x2="78cm" svg:y2="10.7cm">
            <text:p/>
          </draw:line>
          <draw:line draw:style-name="gr38" draw:text-style-name="P4" draw:layer="layout" svg:x1="77cm" svg:y1="11.1cm" svg:x2="78cm" svg:y2="11.1cm">
            <text:p/>
          </draw:line>
          <draw:line draw:style-name="gr38" draw:text-style-name="P4" draw:layer="layout" svg:x1="77cm" svg:y1="11.5cm" svg:x2="78cm" svg:y2="11.5cm">
            <text:p/>
          </draw:line>
          <draw:line draw:style-name="gr38" draw:text-style-name="P4" draw:layer="layout" svg:x1="77cm" svg:y1="11.9cm" svg:x2="78cm" svg:y2="11.9cm">
            <text:p/>
          </draw:line>
          <draw:line draw:style-name="gr38" draw:text-style-name="P4" draw:layer="layout" svg:x1="77cm" svg:y1="12.3cm" svg:x2="78cm" svg:y2="12.3cm">
            <text:p/>
          </draw:line>
          <draw:frame draw:style-name="gr787" draw:text-style-name="P68" draw:layer="layout" svg:width="1.302cm" svg:height="0.569cm" svg:x="75.8cm" svg:y="8.631cm">
            <draw:text-box>
              <text:p text:style-name="P67"><text:span text:style-name="T20">(NOP)</text:span></text:p>
            </draw:text-box>
          </draw:frame>
          <draw:frame draw:style-name="gr787" draw:text-style-name="P68" draw:layer="layout" svg:width="1.239cm" svg:height="0.569cm" svg:x="75.8cm" svg:y="9.832cm">
            <draw:text-box>
              <text:p text:style-name="P67"><text:span text:style-name="T20">(ALU)</text:span></text:p>
            </draw:text-box>
          </draw:frame>
        </draw:g>
        <draw:g draw:style-name="gr1">
          <draw:g draw:style-name="gr1">
            <draw:custom-shape draw:style-name="gr788" draw:text-style-name="P36" draw:layer="layout" svg:width="2cm" svg:height="3cm" svg:x="75.993cm" svg:y="32cm">
              <text:p text:style-name="P35"><text:span text:style-name="T10">DCacheRdBuf</text:span></text:p>
              <draw:enhanced-geometry svg:viewBox="0 0 21600 21600" draw:type="rectangle" draw:enhanced-path="M 0 0 L 21600 0 21600 21600 0 21600 0 0 Z N"/>
            </draw:custom-shape>
            <draw:g draw:style-name="gr66">
              <draw:line draw:style-name="gr60" draw:text-style-name="P11" draw:layer="layout" svg:x1="75.993cm" svg:y1="34.95cm" svg:x2="76.142cm" svg:y2="34.9cm">
                <text:p/>
              </draw:line>
              <draw:line draw:style-name="gr60" draw:text-style-name="P11" draw:layer="layout" svg:x1="75.993cm" svg:y1="34.85cm" svg:x2="76.142cm" svg:y2="34.9cm">
                <text:p/>
              </draw:line>
            </draw:g>
          </draw:g>
        </draw:g>
        <draw:frame draw:style-name="gr776" draw:text-style-name="P37" draw:layer="layout" svg:width="3.148cm" svg:height="0.569cm" svg:x="77.852cm" svg:y="32.1cm">
          <draw:text-box>
            <text:p><text:span text:style-name="T10">dc_rdata_buf_vali</text:span><text:span text:style-name="T10">d_r</text:span></text:p>
          </draw:text-box>
        </draw:frame>
        <draw:frame draw:style-name="gr776" draw:text-style-name="P37" draw:layer="layout" svg:width="2.407cm" svg:height="0.569cm" svg:x="77.852cm" svg:y="32.501cm">
          <draw:text-box>
            <text:p><text:span text:style-name="T10">dc_rdata_buf_r</text:span></text:p>
          </draw:text-box>
        </draw:frame>
        <draw:frame draw:style-name="gr776" draw:text-style-name="P68" draw:layer="layout" svg:width="2.217cm" svg:height="0.569cm" svg:x="73.7cm" svg:y="34.1cm">
          <draw:text-box>
            <text:p text:style-name="P67"><text:span text:style-name="T20">global_stall_s</text:span></text:p>
          </draw:text-box>
        </draw:frame>
        <draw:frame draw:style-name="gr776" draw:text-style-name="P71" draw:layer="layout" svg:width="2.598cm" svg:height="0.569cm" svg:x="73.319cm" svg:y="33.7cm">
          <draw:text-box>
            <text:p text:style-name="P70"><text:span text:style-name="T21">dcpu_if.dc_rdata</text:span></text:p>
          </draw:text-box>
        </draw:frame>
        <draw:frame draw:style-name="gr776" draw:text-style-name="P71" draw:layer="layout" svg:width="2.627cm" svg:height="0.569cm" svg:x="73.29cm" svg:y="33.301cm">
          <draw:text-box>
            <text:p text:style-name="P70"><text:span text:style-name="T21">dcpu_if.dc_rvalid</text:span></text:p>
          </draw:text-box>
        </draw:frame>
        <draw:frame draw:style-name="gr776" draw:text-style-name="P37" draw:layer="layout" svg:width="2.581cm" svg:height="0.569cm" svg:x="73.336cm" svg:y="32.902cm">
          <draw:text-box>
            <text:p><text:span text:style-name="T10">ex_mem_valid_r</text:span></text:p>
          </draw:text-box>
        </draw:frame>
        <draw:frame draw:style-name="gr776" draw:text-style-name="P37" draw:layer="layout" svg:width="3.148cm" svg:height="0.569cm" svg:x="72.769cm" svg:y="32.503cm">
          <draw:text-box>
            <text:p><text:span text:style-name="T10">ex_mem_dMemR</text:span><text:span text:style-name="T10">d_r</text:span></text:p>
          </draw:text-box>
        </draw:frame>
        <draw:frame draw:style-name="gr776" draw:text-style-name="P37" draw:layer="layout" svg:width="3.148cm" svg:height="0.569cm" svg:x="72.769cm" svg:y="32.104cm">
          <draw:text-box>
            <text:p><text:span text:style-name="T10">dc_rdata_buf_vali</text:span><text:span text:style-name="T10">d_r</text:span></text:p>
          </draw:text-box>
        </draw:frame>
        <draw:line draw:style-name="gr38" draw:text-style-name="P4" draw:layer="layout" svg:x1="75cm" svg:y1="32.6cm" svg:x2="76cm" svg:y2="32.6cm">
          <text:p/>
        </draw:line>
        <draw:line draw:style-name="gr38" draw:text-style-name="P4" draw:layer="layout" svg:x1="75cm" svg:y1="33cm" svg:x2="76cm" svg:y2="33cm">
          <text:p/>
        </draw:line>
        <draw:line draw:style-name="gr38" draw:text-style-name="P4" draw:layer="layout" svg:x1="75cm" svg:y1="33.4cm" svg:x2="76cm" svg:y2="33.4cm">
          <text:p/>
        </draw:line>
        <draw:line draw:style-name="gr38" draw:text-style-name="P4" draw:layer="layout" svg:x1="75cm" svg:y1="33.8cm" svg:x2="76cm" svg:y2="33.8cm">
          <text:p/>
        </draw:line>
        <draw:line draw:style-name="gr38" draw:text-style-name="P4" draw:layer="layout" svg:x1="75cm" svg:y1="34.2cm" svg:x2="76cm" svg:y2="34.2cm">
          <text:p/>
        </draw:line>
        <draw:line draw:style-name="gr38" draw:text-style-name="P4" draw:layer="layout" svg:x1="75cm" svg:y1="34.6cm" svg:x2="76cm" svg:y2="34.6cm">
          <text:p/>
        </draw:line>
        <draw:line draw:style-name="gr38" draw:text-style-name="P4" draw:layer="layout" svg:x1="78cm" svg:y1="32.6cm" svg:x2="79cm" svg:y2="32.6cm">
          <text:p/>
        </draw:line>
        <draw:line draw:style-name="gr38" draw:text-style-name="P4" draw:layer="layout" svg:x1="78cm" svg:y1="33cm" svg:x2="79cm" svg:y2="33cm">
          <text:p/>
        </draw:line>
        <draw:g draw:style-name="gr1">
          <draw:g draw:style-name="gr1">
            <draw:custom-shape draw:style-name="gr763" draw:text-style-name="P36" draw:layer="layout" svg:width="2.007cm" svg:height="2cm" svg:x="60.005cm" svg:y="53cm">
              <text:p text:style-name="P35"><text:span text:style-name="T10">Dcache req</text:span></text:p>
              <text:p text:style-name="P35"><text:span text:style-name="T10">One-Shot</text:span></text:p>
              <draw:enhanced-geometry svg:viewBox="0 0 21600 21600" draw:type="rectangle" draw:enhanced-path="M 0 0 L 21600 0 21600 21600 0 21600 0 0 Z N"/>
            </draw:custom-shape>
            <draw:g draw:style-name="gr66">
              <draw:line draw:style-name="gr60" draw:text-style-name="P11" draw:layer="layout" svg:x1="60.005cm" svg:y1="54.966cm" svg:x2="60.155cm" svg:y2="54.933cm">
                <text:p/>
              </draw:line>
              <draw:line draw:style-name="gr60" draw:text-style-name="P11" draw:layer="layout" svg:x1="60.005cm" svg:y1="54.9cm" svg:x2="60.155cm" svg:y2="54.933cm">
                <text:p/>
              </draw:line>
            </draw:g>
          </draw:g>
        </draw:g>
        <draw:line draw:style-name="gr38" draw:text-style-name="P4" draw:layer="layout" svg:x1="62.013cm" svg:y1="54.001cm" svg:x2="63.013cm" svg:y2="54.001cm">
          <text:p/>
        </draw:line>
        <draw:frame draw:style-name="gr670" draw:text-style-name="P37" draw:layer="layout" svg:width="2.314cm" svg:height="0.569cm" svg:x="61.82cm" svg:y="53.533cm">
          <draw:text-box>
            <text:p><text:span text:style-name="T10">dc_req_sent_r</text:span></text:p>
          </draw:text-box>
        </draw:frame>
        <draw:line draw:style-name="gr38" draw:text-style-name="P4" draw:layer="layout" svg:x1="58.512cm" svg:y1="53.5cm" svg:x2="60.012cm" svg:y2="53.5cm">
          <text:p/>
        </draw:line>
        <draw:frame draw:style-name="gr776" draw:text-style-name="P68" draw:layer="layout" svg:width="2.217cm" svg:height="0.569cm" svg:x="57.912cm" svg:y="54.031cm">
          <draw:text-box>
            <text:p text:style-name="P67"><text:span text:style-name="T20">global_stall_s</text:span></text:p>
          </draw:text-box>
        </draw:frame>
        <draw:frame draw:style-name="gr776" draw:text-style-name="P71" draw:layer="layout" svg:width="2.36cm" svg:height="0.569cm" svg:x="57.813cm" svg:y="53.032cm">
          <draw:text-box>
            <text:p text:style-name="P70"><text:span text:style-name="T21">dcpu_if.dc_req</text:span></text:p>
          </draw:text-box>
        </draw:frame>
        <draw:line draw:style-name="gr38" draw:text-style-name="P4" draw:layer="layout" svg:x1="58.512cm" svg:y1="54.5cm" svg:x2="60.012cm" svg:y2="54.5cm">
          <text:p/>
        </draw:line>
        <draw:g draw:style-name="gr1">
          <draw:g draw:style-name="gr1">
            <draw:g draw:style-name="gr1">
              <draw:custom-shape draw:style-name="gr789" draw:text-style-name="P39" draw:layer="layout" svg:width="2cm" svg:height="7cm" svg:x="58cm" svg:y="8cm">
                <text:p text:style-name="P35"><text:span text:style-name="T10">EX/MEM</text:span></text:p>
                <draw:enhanced-geometry svg:viewBox="0 0 21600 21600" draw:type="rectangle" draw:enhanced-path="M 0 0 L 21600 0 21600 21600 0 21600 0 0 Z N"/>
              </draw:custom-shape>
              <draw:g draw:style-name="gr66">
                <draw:line draw:style-name="gr786" draw:text-style-name="P69" draw:layer="layout" svg:x1="58cm" svg:y1="14.884cm" svg:x2="58.149cm" svg:y2="14.767cm">
                  <text:p/>
                </draw:line>
                <draw:line draw:style-name="gr786" draw:text-style-name="P69" draw:layer="layout" svg:x1="58cm" svg:y1="14.65cm" svg:x2="58.149cm" svg:y2="14.767cm">
                  <text:p/>
                </draw:line>
              </draw:g>
            </draw:g>
          </draw:g>
          <draw:line draw:style-name="gr38" draw:text-style-name="P4" draw:layer="layout" svg:x1="57cm" svg:y1="8.7cm" svg:x2="58cm" svg:y2="8.7cm">
            <text:p/>
          </draw:line>
          <draw:frame draw:style-name="gr776" draw:text-style-name="P37" draw:layer="layout" svg:width="2.17cm" svg:height="0.569cm" svg:x="55.94cm" svg:y="8.233cm">
            <draw:text-box>
              <text:p><text:span text:style-name="T10">id_ex_valid_r</text:span></text:p>
            </draw:text-box>
          </draw:frame>
          <draw:frame draw:style-name="gr776" draw:text-style-name="P37" draw:layer="layout" svg:width="2.123cm" svg:height="0.569cm" svg:x="55.987cm" svg:y="8.634cm">
            <draw:text-box>
              <text:p><text:span text:style-name="T10">id_ex_instr_r</text:span></text:p>
            </draw:text-box>
          </draw:frame>
          <draw:frame draw:style-name="gr776" draw:text-style-name="P37" draw:layer="layout" svg:width="2cm" svg:height="0.569cm" svg:x="56.11cm" svg:y="9.035cm">
            <draw:text-box>
              <text:p><text:span text:style-name="T10">id_ex_pc_r</text:span></text:p>
            </draw:text-box>
          </draw:frame>
          <draw:frame draw:style-name="gr776" draw:text-style-name="P37" draw:layer="layout" svg:width="2.356cm" svg:height="0.569cm" svg:x="55.754cm" svg:y="9.436cm">
            <draw:text-box>
              <text:p><text:span text:style-name="T10">id_ex_regWr_r</text:span></text:p>
            </draw:text-box>
          </draw:frame>
          <draw:frame draw:style-name="gr776" draw:text-style-name="P37" draw:layer="layout" svg:width="2.708cm" svg:height="0.569cm" svg:x="55.402cm" svg:y="10.637cm">
            <draw:text-box>
              <text:p><text:span text:style-name="T10">id_ex_resultSrc_r</text:span></text:p>
            </draw:text-box>
          </draw:frame>
          <draw:frame draw:style-name="gr776" draw:text-style-name="P37" draw:layer="layout" svg:width="2.962cm" svg:height="0.569cm" svg:x="55.148cm" svg:y="11.038cm">
            <draw:text-box>
              <text:p><text:span text:style-name="T10">id_ex_trap_illegal</text:span><text:span text:style-name="T10">_r</text:span></text:p>
            </draw:text-box>
          </draw:frame>
          <draw:frame draw:style-name="gr776" draw:text-style-name="P37" draw:layer="layout" svg:width="2.094cm" svg:height="0.569cm" svg:x="56.016cm" svg:y="11.439cm">
            <draw:text-box>
              <text:p><text:span text:style-name="T10">ex_aluRes_r</text:span></text:p>
            </draw:text-box>
          </draw:frame>
          <draw:frame draw:style-name="gr776" draw:text-style-name="P37" draw:layer="layout" svg:width="2.39cm" svg:height="0.569cm" svg:x="55.72cm" svg:y="11.841cm">
            <draw:text-box>
              <text:p><text:span text:style-name="T10">ex_csr_rdat</text:span><text:span text:style-name="T10">a_r</text:span></text:p>
            </draw:text-box>
          </draw:frame>
          <draw:frame draw:style-name="gr776" draw:text-style-name="P37" draw:layer="layout" svg:width="2.5cm" svg:height="0.569cm" svg:x="55.61cm" svg:y="12.242cm">
            <draw:text-box>
              <text:p><text:span text:style-name="T10">ex_csr_w</text:span><text:span text:style-name="T10">data_r</text:span></text:p>
            </draw:text-box>
          </draw:frame>
          <draw:frame draw:style-name="gr776" draw:text-style-name="P37" draw:layer="layout" svg:width="2.581cm" svg:height="0.569cm" svg:x="59.903cm" svg:y="8.233cm">
            <draw:text-box>
              <text:p><text:span text:style-name="T10">ex_mem_valid_r</text:span></text:p>
            </draw:text-box>
          </draw:frame>
          <draw:frame draw:style-name="gr776" draw:text-style-name="P37" draw:layer="layout" svg:width="2.534cm" svg:height="0.569cm" svg:x="59.904cm" svg:y="8.634cm">
            <draw:text-box>
              <text:p><text:span text:style-name="T10">ex_mem_instr_r</text:span></text:p>
            </draw:text-box>
          </draw:frame>
          <draw:frame draw:style-name="gr776" draw:text-style-name="P37" draw:layer="layout" svg:width="2.297cm" svg:height="0.569cm" svg:x="59.904cm" svg:y="9.035cm">
            <draw:text-box>
              <text:p><text:span text:style-name="T10">ex_mem_pc_r</text:span></text:p>
            </draw:text-box>
          </draw:frame>
          <draw:frame draw:style-name="gr776" draw:text-style-name="P37" draw:layer="layout" svg:width="2.763cm" svg:height="0.569cm" svg:x="59.905cm" svg:y="9.436cm">
            <draw:text-box>
              <text:p><text:span text:style-name="T10">ex_mem_regWr_</text:span><text:span text:style-name="T10">r</text:span></text:p>
            </draw:text-box>
          </draw:frame>
          <draw:frame draw:style-name="gr776" draw:text-style-name="P37" draw:layer="layout" svg:width="3.118cm" svg:height="0.569cm" svg:x="59.906cm" svg:y="10.637cm">
            <draw:text-box>
              <text:p><text:span text:style-name="T10">ex_mem_resultSr</text:span><text:span text:style-name="T10">c_r</text:span></text:p>
            </draw:text-box>
          </draw:frame>
          <draw:frame draw:style-name="gr776" draw:text-style-name="P37" draw:layer="layout" svg:width="3.368cm" svg:height="0.569cm" svg:x="59.906cm" svg:y="11.038cm">
            <draw:text-box>
              <text:p><text:span text:style-name="T10">ex_mem_trap_ille</text:span><text:span text:style-name="T10">gal_r</text:span></text:p>
            </draw:text-box>
          </draw:frame>
          <draw:frame draw:style-name="gr776" draw:text-style-name="P37" draw:layer="layout" svg:width="2.881cm" svg:height="0.569cm" svg:x="59.906cm" svg:y="11.439cm">
            <draw:text-box>
              <text:p><text:span text:style-name="T10">ex_mem_aluRes</text:span><text:span text:style-name="T10">_r</text:span></text:p>
            </draw:text-box>
          </draw:frame>
          <draw:frame draw:style-name="gr776" draw:text-style-name="P37" draw:layer="layout" svg:width="3.182cm" svg:height="0.569cm" svg:x="59.907cm" svg:y="11.841cm">
            <draw:text-box>
              <text:p><text:span text:style-name="T10">ex_mem_csr_rd</text:span><text:span text:style-name="T10">ata_r</text:span></text:p>
            </draw:text-box>
          </draw:frame>
          <draw:frame draw:style-name="gr776" draw:text-style-name="P37" draw:layer="layout" svg:width="3.292cm" svg:height="0.569cm" svg:x="59.907cm" svg:y="12.242cm">
            <draw:text-box>
              <text:p><text:span text:style-name="T10">ex_mem_csr_wda</text:span><text:span text:style-name="T10">ta_r</text:span></text:p>
            </draw:text-box>
          </draw:frame>
          <draw:frame draw:style-name="gr776" draw:text-style-name="P68" draw:layer="layout" svg:width="2.217cm" svg:height="0.569cm" svg:x="55.893cm" svg:y="14.242cm">
            <draw:text-box>
              <text:p text:style-name="P67"><text:span text:style-name="T20">global</text:span><text:span text:style-name="T20">_stall</text:span><text:span text:style-name="T20">_s</text:span></text:p>
            </draw:text-box>
          </draw:frame>
          <draw:line draw:style-name="gr38" draw:text-style-name="P4" draw:layer="layout" svg:x1="57cm" svg:y1="9.1cm" svg:x2="58cm" svg:y2="9.1cm">
            <text:p/>
          </draw:line>
          <draw:line draw:style-name="gr38" draw:text-style-name="P4" draw:layer="layout" svg:x1="57cm" svg:y1="9.5cm" svg:x2="58cm" svg:y2="9.5cm">
            <text:p/>
          </draw:line>
          <draw:line draw:style-name="gr38" draw:text-style-name="P4" draw:layer="layout" svg:x1="57cm" svg:y1="9.9cm" svg:x2="58cm" svg:y2="9.9cm">
            <text:p/>
          </draw:line>
          <draw:line draw:style-name="gr38" draw:text-style-name="P4" draw:layer="layout" svg:x1="57cm" svg:y1="11.5cm" svg:x2="58cm" svg:y2="11.5cm">
            <text:p/>
          </draw:line>
          <draw:line draw:style-name="gr38" draw:text-style-name="P4" draw:layer="layout" svg:x1="57cm" svg:y1="11.9cm" svg:x2="58cm" svg:y2="11.9cm">
            <text:p/>
          </draw:line>
          <draw:line draw:style-name="gr38" draw:text-style-name="P4" draw:layer="layout" svg:x1="57cm" svg:y1="12.3cm" svg:x2="58cm" svg:y2="12.3cm">
            <text:p/>
          </draw:line>
          <draw:line draw:style-name="gr38" draw:text-style-name="P4" draw:layer="layout" svg:x1="57cm" svg:y1="12.7cm" svg:x2="58cm" svg:y2="12.7cm">
            <text:p/>
          </draw:line>
          <draw:line draw:style-name="gr38" draw:text-style-name="P4" draw:layer="layout" svg:x1="57cm" svg:y1="13.1cm" svg:x2="58cm" svg:y2="13.1cm">
            <text:p/>
          </draw:line>
          <draw:line draw:style-name="gr38" draw:text-style-name="P4" draw:layer="layout" svg:x1="57cm" svg:y1="13.5cm" svg:x2="58cm" svg:y2="13.5cm">
            <text:p/>
          </draw:line>
          <draw:line draw:style-name="gr38" draw:text-style-name="P4" draw:layer="layout" svg:x1="57cm" svg:y1="13.9cm" svg:x2="58cm" svg:y2="13.9cm">
            <text:p/>
          </draw:line>
          <draw:line draw:style-name="gr38" draw:text-style-name="P4" draw:layer="layout" svg:x1="60cm" svg:y1="8.7cm" svg:x2="61cm" svg:y2="8.7cm">
            <text:p/>
          </draw:line>
          <draw:line draw:style-name="gr38" draw:text-style-name="P4" draw:layer="layout" svg:x1="60cm" svg:y1="9.1cm" svg:x2="61cm" svg:y2="9.1cm">
            <text:p/>
          </draw:line>
          <draw:line draw:style-name="gr38" draw:text-style-name="P4" draw:layer="layout" svg:x1="60cm" svg:y1="9.5cm" svg:x2="61cm" svg:y2="9.5cm">
            <text:p/>
          </draw:line>
          <draw:line draw:style-name="gr38" draw:text-style-name="P4" draw:layer="layout" svg:x1="60cm" svg:y1="9.9cm" svg:x2="61cm" svg:y2="9.9cm">
            <text:p/>
          </draw:line>
          <draw:line draw:style-name="gr38" draw:text-style-name="P4" draw:layer="layout" svg:x1="60cm" svg:y1="10.3cm" svg:x2="61cm" svg:y2="10.3cm">
            <text:p/>
          </draw:line>
          <draw:line draw:style-name="gr38" draw:text-style-name="P4" draw:layer="layout" svg:x1="60cm" svg:y1="10.7cm" svg:x2="61cm" svg:y2="10.7cm">
            <text:p/>
          </draw:line>
          <draw:line draw:style-name="gr38" draw:text-style-name="P4" draw:layer="layout" svg:x1="60cm" svg:y1="11.1cm" svg:x2="61cm" svg:y2="11.1cm">
            <text:p/>
          </draw:line>
          <draw:line draw:style-name="gr38" draw:text-style-name="P4" draw:layer="layout" svg:x1="60cm" svg:y1="11.5cm" svg:x2="61cm" svg:y2="11.5cm">
            <text:p/>
          </draw:line>
          <draw:line draw:style-name="gr38" draw:text-style-name="P4" draw:layer="layout" svg:x1="60cm" svg:y1="11.9cm" svg:x2="61cm" svg:y2="11.9cm">
            <text:p/>
          </draw:line>
          <draw:line draw:style-name="gr38" draw:text-style-name="P4" draw:layer="layout" svg:x1="60cm" svg:y1="12.3cm" svg:x2="61cm" svg:y2="12.3cm">
            <text:p/>
          </draw:line>
          <draw:frame draw:style-name="gr787" draw:text-style-name="P68" draw:layer="layout" svg:width="1.302cm" svg:height="0.569cm" svg:x="58.8cm" svg:y="8.631cm">
            <draw:text-box>
              <text:p text:style-name="P67"><text:span text:style-name="T20">(NOP)</text:span></text:p>
            </draw:text-box>
          </draw:frame>
          <draw:frame draw:style-name="gr787" draw:text-style-name="P68" draw:layer="layout" svg:width="1.239cm" svg:height="0.569cm" svg:x="58.8cm" svg:y="10.632cm">
            <draw:text-box>
              <text:p text:style-name="P67"><text:span text:style-name="T20">(ALU)</text:span></text:p>
            </draw:text-box>
          </draw:frame>
          <draw:line draw:style-name="gr38" draw:text-style-name="P4" draw:layer="layout" svg:x1="60cm" svg:y1="12.7cm" svg:x2="61cm" svg:y2="12.7cm">
            <text:p/>
          </draw:line>
          <draw:line draw:style-name="gr38" draw:text-style-name="P4" draw:layer="layout" svg:x1="60cm" svg:y1="13.1cm" svg:x2="61cm" svg:y2="13.1cm">
            <text:p/>
          </draw:line>
          <draw:line draw:style-name="gr38" draw:text-style-name="P4" draw:layer="layout" svg:x1="60cm" svg:y1="13.5cm" svg:x2="61cm" svg:y2="13.5cm">
            <text:p/>
          </draw:line>
          <draw:frame draw:style-name="gr776" draw:text-style-name="P37" draw:layer="layout" svg:width="3.131cm" svg:height="0.569cm" svg:x="59.908cm" svg:y="13.043cm">
            <draw:text-box>
              <text:p><text:span text:style-name="T10">e</text:span><text:span text:style-name="T10">x</text:span><text:span text:style-name="T10">_</text:span><text:span text:style-name="T10">m</text:span><text:span text:style-name="T10">e</text:span><text:span text:style-name="T10">m</text:span><text:span text:style-name="T10">_</text:span><text:span text:style-name="T10">d</text:span><text:span text:style-name="T10">c</text:span><text:span text:style-name="T10">_</text:span><text:span text:style-name="T10">w</text:span><text:span text:style-name="T10">st</text:span><text:span text:style-name="T10">r</text:span><text:span text:style-name="T10">b</text:span><text:span text:style-name="T10">_</text:span><text:span text:style-name="T10">r</text:span></text:p>
            </draw:text-box>
          </draw:frame>
          <draw:frame draw:style-name="gr776" draw:text-style-name="P37" draw:layer="layout" svg:width="3.211cm" svg:height="0.569cm" svg:x="59.909cm" svg:y="12.644cm">
            <draw:text-box>
              <text:p><text:span text:style-name="T10">ex_m</text:span><text:span text:style-name="T10">em_d</text:span><text:span text:style-name="T10">c_wd</text:span><text:span text:style-name="T10">ata_r</text:span></text:p>
            </draw:text-box>
          </draw:frame>
          <draw:frame draw:style-name="gr776" draw:text-style-name="P37" draw:layer="layout" svg:width="3.144cm" svg:height="0.569cm" svg:x="59.906cm" svg:y="10.238cm">
            <draw:text-box>
              <text:p><text:span text:style-name="T10">ex_mem_dMem</text:span><text:span text:style-name="T10">Wr_r</text:span></text:p>
            </draw:text-box>
          </draw:frame>
          <draw:frame draw:style-name="gr776" draw:text-style-name="P37" draw:layer="layout" svg:width="3.148cm" svg:height="0.569cm" svg:x="59.906cm" svg:y="9.839cm">
            <draw:text-box>
              <text:p><text:span text:style-name="T10">ex_mem_dMemR</text:span><text:span text:style-name="T10">d_r</text:span></text:p>
            </draw:text-box>
          </draw:frame>
          <draw:frame draw:style-name="gr776" draw:text-style-name="P37" draw:layer="layout" svg:width="2.733cm" svg:height="0.569cm" svg:x="55.377cm" svg:y="10.238cm">
            <draw:text-box>
              <text:p><text:span text:style-name="T10">id_ex_dMemWr_r</text:span></text:p>
            </draw:text-box>
          </draw:frame>
          <draw:frame draw:style-name="gr776" draw:text-style-name="P37" draw:layer="layout" svg:width="2.737cm" svg:height="0.569cm" svg:x="55.373cm" svg:y="9.839cm">
            <draw:text-box>
              <text:p><text:span text:style-name="T10">id_ex_dMemRd_r</text:span></text:p>
            </draw:text-box>
          </draw:frame>
          <draw:line draw:style-name="gr38" draw:text-style-name="P4" draw:layer="layout" svg:x1="57cm" svg:y1="10.3cm" svg:x2="58cm" svg:y2="10.3cm">
            <text:p/>
          </draw:line>
          <draw:line draw:style-name="gr38" draw:text-style-name="P4" draw:layer="layout" svg:x1="57cm" svg:y1="10.7cm" svg:x2="58cm" svg:y2="10.7cm">
            <text:p/>
          </draw:line>
          <draw:line draw:style-name="gr38" draw:text-style-name="P4" draw:layer="layout" svg:x1="57cm" svg:y1="11.1cm" svg:x2="58cm" svg:y2="11.1cm">
            <text:p/>
          </draw:line>
          <draw:frame draw:style-name="gr776" draw:text-style-name="P37" draw:layer="layout" svg:width="2.344cm" svg:height="0.569cm" svg:x="55.766cm" svg:y="13.043cm">
            <draw:text-box>
              <text:p><text:span text:style-name="T10">ex_d</text:span><text:span text:style-name="T10">c_ws</text:span><text:span text:style-name="T10">trb_r</text:span></text:p>
            </draw:text-box>
          </draw:frame>
          <draw:frame draw:style-name="gr776" draw:text-style-name="P37" draw:layer="layout" svg:width="2.424cm" svg:height="0.569cm" svg:x="55.686cm" svg:y="12.644cm">
            <draw:text-box>
              <text:p><text:span text:style-name="T10">ex_dc_wdata_r</text:span></text:p>
            </draw:text-box>
          </draw:frame>
          <draw:line draw:style-name="gr38" draw:text-style-name="P4" draw:layer="layout" svg:x1="57cm" svg:y1="14.3cm" svg:x2="58cm" svg:y2="14.3cm">
            <text:p/>
          </draw:line>
          <draw:line draw:style-name="gr38" draw:text-style-name="P4" draw:layer="layout" svg:x1="57cm" svg:y1="14.7cm" svg:x2="58cm" svg:y2="14.7cm">
            <text:p/>
          </draw:line>
          <draw:frame draw:style-name="gr776" draw:text-style-name="P64" draw:layer="layout" svg:width="2.661cm" svg:height="0.569cm" svg:x="55.449cm" svg:y="13.444cm">
            <draw:text-box>
              <text:p text:style-name="P63"><text:span text:style-name="T19">wb_trap_t</text:span><text:span text:style-name="T19">aken_s</text:span></text:p>
            </draw:text-box>
          </draw:frame>
          <draw:frame draw:style-name="gr776" draw:text-style-name="P64" draw:layer="layout" svg:width="2cm" svg:height="0.569cm" svg:x="56.11cm" svg:y="13.845cm">
            <draw:text-box>
              <text:p text:style-name="P63"><text:span text:style-name="T19">wb_mret_s</text:span></text:p>
            </draw:text-box>
          </draw:frame>
        </draw:g>
        <draw:g draw:style-name="gr1">
          <draw:g draw:style-name="gr1">
            <draw:g draw:style-name="gr1">
              <draw:custom-shape draw:style-name="gr790" draw:text-style-name="P39" draw:layer="layout" svg:width="2cm" svg:height="8cm" svg:x="41cm" svg:y="8cm">
                <text:p text:style-name="P35"><text:span text:style-name="T10">ID/EX</text:span></text:p>
                <draw:enhanced-geometry svg:viewBox="0 0 21600 21600" draw:type="rectangle" draw:enhanced-path="M 0 0 L 21600 0 21600 21600 0 21600 0 0 Z N"/>
              </draw:custom-shape>
              <draw:g draw:style-name="gr66">
                <draw:line draw:style-name="gr786" draw:text-style-name="P69" draw:layer="layout" svg:x1="41cm" svg:y1="15.866cm" svg:x2="41.149cm" svg:y2="15.733cm">
                  <text:p/>
                </draw:line>
                <draw:line draw:style-name="gr786" draw:text-style-name="P69" draw:layer="layout" svg:x1="41cm" svg:y1="15.6cm" svg:x2="41.149cm" svg:y2="15.733cm">
                  <text:p/>
                </draw:line>
              </draw:g>
            </draw:g>
          </draw:g>
          <draw:line draw:style-name="gr38" draw:text-style-name="P4" draw:layer="layout" svg:x1="40cm" svg:y1="8.7cm" svg:x2="41cm" svg:y2="8.7cm">
            <text:p/>
          </draw:line>
          <draw:frame draw:style-name="gr776" draw:text-style-name="P37" draw:layer="layout" svg:width="2.013cm" svg:height="0.569cm" svg:x="38.997cm" svg:y="8.233cm">
            <draw:text-box>
              <text:p><text:span text:style-name="T10">if_id_valid_r</text:span></text:p>
            </draw:text-box>
          </draw:frame>
          <draw:frame draw:style-name="gr791" draw:text-style-name="P37" draw:layer="layout" svg:width="1.967cm" svg:height="0.569cm" svg:x="39.043cm" svg:y="8.634cm">
            <draw:text-box>
              <text:p><text:span text:style-name="T10">if_id_instr_r</text:span></text:p>
            </draw:text-box>
          </draw:frame>
          <draw:frame draw:style-name="gr792" draw:text-style-name="P37" draw:layer="layout" svg:width="1.73cm" svg:height="0.569cm" svg:x="39.28cm" svg:y="9.035cm">
            <draw:text-box>
              <text:p><text:span text:style-name="T10">if_id_pc_r</text:span></text:p>
            </draw:text-box>
          </draw:frame>
          <draw:frame draw:style-name="gr776" draw:text-style-name="P37" draw:layer="layout" svg:width="2.17cm" svg:height="0.569cm" svg:x="42.903cm" svg:y="8.233cm">
            <draw:text-box>
              <text:p><text:span text:style-name="T10">id_ex_valid_r</text:span></text:p>
            </draw:text-box>
          </draw:frame>
          <draw:frame draw:style-name="gr776" draw:text-style-name="P37" draw:layer="layout" svg:width="2.123cm" svg:height="0.569cm" svg:x="42.904cm" svg:y="8.634cm">
            <draw:text-box>
              <text:p><text:span text:style-name="T10">id_ex_instr_r</text:span></text:p>
            </draw:text-box>
          </draw:frame>
          <draw:frame draw:style-name="gr776" draw:text-style-name="P37" draw:layer="layout" svg:width="2cm" svg:height="0.569cm" svg:x="42.904cm" svg:y="9.035cm">
            <draw:text-box>
              <text:p><text:span text:style-name="T10">id_ex_pc_r</text:span></text:p>
            </draw:text-box>
          </draw:frame>
          <draw:frame draw:style-name="gr776" draw:text-style-name="P37" draw:layer="layout" svg:width="2.356cm" svg:height="0.569cm" svg:x="42.905cm" svg:y="9.436cm">
            <draw:text-box>
              <text:p><text:span text:style-name="T10">id_ex_regWr_r</text:span></text:p>
            </draw:text-box>
          </draw:frame>
          <draw:frame draw:style-name="gr776" draw:text-style-name="P37" draw:layer="layout" svg:width="2.708cm" svg:height="0.569cm" svg:x="42.906cm" svg:y="11.437cm">
            <draw:text-box>
              <text:p><text:span text:style-name="T10">id_ex_resultSrc_r</text:span></text:p>
            </draw:text-box>
          </draw:frame>
          <draw:frame draw:style-name="gr776" draw:text-style-name="P37" draw:layer="layout" svg:width="2.962cm" svg:height="0.569cm" svg:x="42.906cm" svg:y="13.038cm">
            <draw:text-box>
              <text:p><text:span text:style-name="T10">id_ex_trap_illegal</text:span><text:span text:style-name="T10">_r</text:span></text:p>
            </draw:text-box>
          </draw:frame>
          <draw:frame draw:style-name="gr776" draw:text-style-name="P68" draw:layer="layout" svg:width="2.217cm" svg:height="0.569cm" svg:x="38.793cm" svg:y="15.442cm">
            <draw:text-box>
              <text:p text:style-name="P67"><text:span text:style-name="T20">global_stall_s</text:span></text:p>
            </draw:text-box>
          </draw:frame>
          <draw:line draw:style-name="gr38" draw:text-style-name="P4" draw:layer="layout" svg:x1="40cm" svg:y1="9.1cm" svg:x2="41cm" svg:y2="9.1cm">
            <text:p/>
          </draw:line>
          <draw:line draw:style-name="gr38" draw:text-style-name="P4" draw:layer="layout" svg:x1="40cm" svg:y1="9.5cm" svg:x2="41cm" svg:y2="9.5cm">
            <text:p/>
          </draw:line>
          <draw:line draw:style-name="gr38" draw:text-style-name="P4" draw:layer="layout" svg:x1="40cm" svg:y1="9.9cm" svg:x2="41cm" svg:y2="9.9cm">
            <text:p/>
          </draw:line>
          <draw:line draw:style-name="gr38" draw:text-style-name="P4" draw:layer="layout" svg:x1="40cm" svg:y1="11.5cm" svg:x2="41cm" svg:y2="11.5cm">
            <text:p/>
          </draw:line>
          <draw:line draw:style-name="gr38" draw:text-style-name="P4" draw:layer="layout" svg:x1="40cm" svg:y1="11.9cm" svg:x2="41cm" svg:y2="11.9cm">
            <text:p/>
          </draw:line>
          <draw:line draw:style-name="gr38" draw:text-style-name="P4" draw:layer="layout" svg:x1="40cm" svg:y1="12.3cm" svg:x2="41cm" svg:y2="12.3cm">
            <text:p/>
          </draw:line>
          <draw:line draw:style-name="gr38" draw:text-style-name="P4" draw:layer="layout" svg:x1="40cm" svg:y1="12.7cm" svg:x2="41cm" svg:y2="12.7cm">
            <text:p/>
          </draw:line>
          <draw:line draw:style-name="gr38" draw:text-style-name="P4" draw:layer="layout" svg:x1="40cm" svg:y1="13.1cm" svg:x2="41cm" svg:y2="13.1cm">
            <text:p/>
          </draw:line>
          <draw:line draw:style-name="gr38" draw:text-style-name="P4" draw:layer="layout" svg:x1="40cm" svg:y1="13.5cm" svg:x2="41cm" svg:y2="13.5cm">
            <text:p/>
          </draw:line>
          <draw:line draw:style-name="gr38" draw:text-style-name="P4" draw:layer="layout" svg:x1="40cm" svg:y1="15.1cm" svg:x2="41cm" svg:y2="15.1cm">
            <text:p/>
          </draw:line>
          <draw:line draw:style-name="gr38" draw:text-style-name="P4" draw:layer="layout" svg:x1="43cm" svg:y1="8.7cm" svg:x2="44cm" svg:y2="8.7cm">
            <text:p/>
          </draw:line>
          <draw:line draw:style-name="gr38" draw:text-style-name="P4" draw:layer="layout" svg:x1="43cm" svg:y1="9.1cm" svg:x2="44cm" svg:y2="9.1cm">
            <text:p/>
          </draw:line>
          <draw:line draw:style-name="gr38" draw:text-style-name="P4" draw:layer="layout" svg:x1="43cm" svg:y1="9.5cm" svg:x2="44cm" svg:y2="9.5cm">
            <text:p/>
          </draw:line>
          <draw:line draw:style-name="gr38" draw:text-style-name="P4" draw:layer="layout" svg:x1="43cm" svg:y1="9.9cm" svg:x2="44cm" svg:y2="9.9cm">
            <text:p/>
          </draw:line>
          <draw:line draw:style-name="gr38" draw:text-style-name="P4" draw:layer="layout" svg:x1="43cm" svg:y1="10.3cm" svg:x2="44cm" svg:y2="10.3cm">
            <text:p/>
          </draw:line>
          <draw:line draw:style-name="gr38" draw:text-style-name="P4" draw:layer="layout" svg:x1="43cm" svg:y1="10.7cm" svg:x2="44cm" svg:y2="10.7cm">
            <text:p/>
          </draw:line>
          <draw:line draw:style-name="gr38" draw:text-style-name="P4" draw:layer="layout" svg:x1="43cm" svg:y1="11.1cm" svg:x2="44cm" svg:y2="11.1cm">
            <text:p/>
          </draw:line>
          <draw:line draw:style-name="gr38" draw:text-style-name="P4" draw:layer="layout" svg:x1="43cm" svg:y1="11.5cm" svg:x2="44cm" svg:y2="11.5cm">
            <text:p/>
          </draw:line>
          <draw:line draw:style-name="gr38" draw:text-style-name="P4" draw:layer="layout" svg:x1="43cm" svg:y1="11.9cm" svg:x2="44cm" svg:y2="11.9cm">
            <text:p/>
          </draw:line>
          <draw:line draw:style-name="gr38" draw:text-style-name="P4" draw:layer="layout" svg:x1="43cm" svg:y1="12.3cm" svg:x2="44cm" svg:y2="12.3cm">
            <text:p/>
          </draw:line>
          <draw:frame draw:style-name="gr787" draw:text-style-name="P68" draw:layer="layout" svg:width="1.302cm" svg:height="0.569cm" svg:x="41.8cm" svg:y="8.631cm">
            <draw:text-box>
              <text:p text:style-name="P67"><text:span text:style-name="T20">(NOP)</text:span></text:p>
            </draw:text-box>
          </draw:frame>
          <draw:frame draw:style-name="gr787" draw:text-style-name="P68" draw:layer="layout" svg:width="1.239cm" svg:height="0.569cm" svg:x="41.8cm" svg:y="11.432cm">
            <draw:text-box>
              <text:p text:style-name="P67"><text:span text:style-name="T20">(ALU)</text:span></text:p>
            </draw:text-box>
          </draw:frame>
          <draw:line draw:style-name="gr38" draw:text-style-name="P4" draw:layer="layout" svg:x1="43cm" svg:y1="12.7cm" svg:x2="44cm" svg:y2="12.7cm">
            <text:p/>
          </draw:line>
          <draw:line draw:style-name="gr38" draw:text-style-name="P4" draw:layer="layout" svg:x1="43cm" svg:y1="13.1cm" svg:x2="44cm" svg:y2="13.1cm">
            <text:p/>
          </draw:line>
          <draw:line draw:style-name="gr38" draw:text-style-name="P4" draw:layer="layout" svg:x1="43cm" svg:y1="13.5cm" svg:x2="44cm" svg:y2="13.5cm">
            <text:p/>
          </draw:line>
          <draw:frame draw:style-name="gr776" draw:text-style-name="P37" draw:layer="layout" svg:width="2.733cm" svg:height="0.569cm" svg:x="42.906cm" svg:y="10.238cm">
            <draw:text-box>
              <text:p><text:span text:style-name="T10">id_ex_dMemWr_r</text:span></text:p>
            </draw:text-box>
          </draw:frame>
          <draw:frame draw:style-name="gr776" draw:text-style-name="P37" draw:layer="layout" svg:width="2.737cm" svg:height="0.569cm" svg:x="42.906cm" svg:y="9.839cm">
            <draw:text-box>
              <text:p><text:span text:style-name="T10">id_ex_dMemRd_r</text:span></text:p>
            </draw:text-box>
          </draw:frame>
          <draw:line draw:style-name="gr38" draw:text-style-name="P4" draw:layer="layout" svg:x1="40cm" svg:y1="10.3cm" svg:x2="41cm" svg:y2="10.3cm">
            <text:p/>
          </draw:line>
          <draw:line draw:style-name="gr38" draw:text-style-name="P4" draw:layer="layout" svg:x1="40cm" svg:y1="10.7cm" svg:x2="41cm" svg:y2="10.7cm">
            <text:p/>
          </draw:line>
          <draw:line draw:style-name="gr38" draw:text-style-name="P4" draw:layer="layout" svg:x1="40cm" svg:y1="11.1cm" svg:x2="41cm" svg:y2="11.1cm">
            <text:p/>
          </draw:line>
          <draw:line draw:style-name="gr38" draw:text-style-name="P4" draw:layer="layout" svg:x1="40cm" svg:y1="15.5cm" svg:x2="41cm" svg:y2="15.5cm">
            <text:p/>
          </draw:line>
          <draw:line draw:style-name="gr38" draw:text-style-name="P4" draw:layer="layout" svg:x1="40cm" svg:y1="15.9cm" svg:x2="41cm" svg:y2="15.9cm">
            <text:p/>
          </draw:line>
          <draw:frame draw:style-name="gr793" draw:text-style-name="P64" draw:layer="layout" svg:width="1.399cm" svg:height="0.569cm" svg:x="39.611cm" svg:y="14.644cm">
            <draw:text-box>
              <text:p text:style-name="P63"><text:span text:style-name="T19">flush_s</text:span></text:p>
            </draw:text-box>
          </draw:frame>
          <draw:frame draw:style-name="gr794" draw:text-style-name="P64" draw:layer="layout" svg:width="2.013cm" svg:height="0.569cm" svg:x="38.997cm" svg:y="15.045cm">
            <draw:text-box>
              <text:p text:style-name="P63"><text:span text:style-name="T19">data_stall_s</text:span></text:p>
            </draw:text-box>
          </draw:frame>
          <draw:line draw:style-name="gr38" draw:text-style-name="P4" draw:layer="layout" svg:x1="43cm" svg:y1="13.9cm" svg:x2="44cm" svg:y2="13.9cm">
            <text:p/>
          </draw:line>
          <draw:line draw:style-name="gr38" draw:text-style-name="P4" draw:layer="layout" svg:x1="43cm" svg:y1="14.3cm" svg:x2="44cm" svg:y2="14.3cm">
            <text:p/>
          </draw:line>
          <draw:line draw:style-name="gr38" draw:text-style-name="P4" draw:layer="layout" svg:x1="43cm" svg:y1="14.7cm" svg:x2="44cm" svg:y2="14.7cm">
            <text:p/>
          </draw:line>
          <draw:line draw:style-name="gr38" draw:text-style-name="P4" draw:layer="layout" svg:x1="40cm" svg:y1="13.9cm" svg:x2="41cm" svg:y2="13.9cm">
            <text:p/>
          </draw:line>
          <draw:line draw:style-name="gr38" draw:text-style-name="P4" draw:layer="layout" svg:x1="40cm" svg:y1="14.3cm" svg:x2="41cm" svg:y2="14.3cm">
            <text:p/>
          </draw:line>
          <draw:line draw:style-name="gr38" draw:text-style-name="P4" draw:layer="layout" svg:x1="40cm" svg:y1="14.7cm" svg:x2="41cm" svg:y2="14.7cm">
            <text:p/>
          </draw:line>
          <draw:frame draw:style-name="gr776" draw:text-style-name="P37" draw:layer="layout" svg:width="2.581cm" svg:height="0.569cm" svg:x="42.907cm" svg:y="10.639cm">
            <draw:text-box>
              <text:p><text:span text:style-name="T10">id_ex_aluSrcB_r</text:span></text:p>
            </draw:text-box>
          </draw:frame>
          <draw:frame draw:style-name="gr776" draw:text-style-name="P37" draw:layer="layout" svg:width="2.581cm" svg:height="0.569cm" svg:x="42.908cm" svg:y="11.04cm">
            <draw:text-box>
              <text:p><text:span text:style-name="T10">id_ex_aluSrcA_r</text:span></text:p>
            </draw:text-box>
          </draw:frame>
          <draw:frame draw:style-name="gr776" draw:text-style-name="P37" draw:layer="layout" svg:width="2.344cm" svg:height="0.569cm" svg:x="42.906cm" svg:y="11.838cm">
            <draw:text-box>
              <text:p><text:span text:style-name="T10">id_ex_aluOp_r</text:span></text:p>
            </draw:text-box>
          </draw:frame>
          <draw:frame draw:style-name="gr776" draw:text-style-name="P37" draw:layer="layout" svg:width="2.217cm" svg:height="0.569cm" svg:x="42.906cm" svg:y="12.239cm">
            <draw:text-box>
              <text:p><text:span text:style-name="T10">id_ex_brOp_r</text:span></text:p>
            </draw:text-box>
          </draw:frame>
          <draw:frame draw:style-name="gr776" draw:text-style-name="P37" draw:layer="layout" svg:width="2.204cm" svg:height="0.569cm" svg:x="42.907cm" svg:y="12.64cm">
            <draw:text-box>
              <text:p><text:span text:style-name="T10">id_ex_jump_r</text:span></text:p>
            </draw:text-box>
          </draw:frame>
          <draw:frame draw:style-name="gr776" draw:text-style-name="P37" draw:layer="layout" svg:width="2.187cm" svg:height="0.569cm" svg:x="42.906cm" svg:y="13.439cm">
            <draw:text-box>
              <text:p><text:span text:style-name="T10">id_ex_regA_r</text:span></text:p>
            </draw:text-box>
          </draw:frame>
          <draw:frame draw:style-name="gr776" draw:text-style-name="P37" draw:layer="layout" svg:width="2.187cm" svg:height="0.569cm" svg:x="42.907cm" svg:y="13.84cm">
            <draw:text-box>
              <text:p><text:span text:style-name="T10">id_ex_regB_r</text:span></text:p>
            </draw:text-box>
          </draw:frame>
          <draw:frame draw:style-name="gr776" draw:text-style-name="P37" draw:layer="layout" svg:width="2.534cm" svg:height="0.569cm" svg:x="42.908cm" svg:y="14.241cm">
            <draw:text-box>
              <text:p><text:span text:style-name="T10">id_ex_immExt_r</text:span></text:p>
            </draw:text-box>
          </draw:frame>
          <draw:frame draw:style-name="gr776" draw:text-style-name="P37" draw:layer="layout" svg:width="2.17cm" svg:height="0.569cm" svg:x="38.887cm" svg:y="10.639cm">
            <draw:text-box>
              <text:p><text:span text:style-name="T10">id_aluSrcB_s</text:span></text:p>
            </draw:text-box>
          </draw:frame>
          <draw:frame draw:style-name="gr795" draw:text-style-name="P37" draw:layer="layout" svg:width="2.17cm" svg:height="0.569cm" svg:x="38.887cm" svg:y="11.04cm">
            <draw:text-box>
              <text:p><text:span text:style-name="T10">id_aluSrcA_s</text:span></text:p>
            </draw:text-box>
          </draw:frame>
          <draw:frame draw:style-name="gr796" draw:text-style-name="P37" draw:layer="layout" svg:width="2.297cm" svg:height="0.569cm" svg:x="38.76cm" svg:y="11.438cm">
            <draw:text-box>
              <text:p><text:span text:style-name="T10">id_resultSrc_s</text:span></text:p>
            </draw:text-box>
          </draw:frame>
          <draw:frame draw:style-name="gr797" draw:text-style-name="P37" draw:layer="layout" svg:width="1.933cm" svg:height="0.569cm" svg:x="39.124cm" svg:y="11.839cm">
            <draw:text-box>
              <text:p><text:span text:style-name="T10">id_aluOp_s</text:span></text:p>
            </draw:text-box>
          </draw:frame>
          <draw:frame draw:style-name="gr797" draw:text-style-name="P37" draw:layer="layout" svg:width="1.81cm" svg:height="0.569cm" svg:x="39.251cm" svg:y="12.24cm">
            <draw:text-box>
              <text:p><text:span text:style-name="T10">id_brOp_s</text:span></text:p>
            </draw:text-box>
          </draw:frame>
          <draw:frame draw:style-name="gr792" draw:text-style-name="P37" draw:layer="layout" svg:width="1.793cm" svg:height="0.569cm" svg:x="39.263cm" svg:y="12.641cm">
            <draw:text-box>
              <text:p><text:span text:style-name="T10">id_jump_s</text:span></text:p>
            </draw:text-box>
          </draw:frame>
          <draw:frame draw:style-name="gr792" draw:text-style-name="P37" draw:layer="layout" svg:width="1.776cm" svg:height="0.569cm" svg:x="39.28cm" svg:y="13.44cm">
            <draw:text-box>
              <text:p><text:span text:style-name="T10">id_regA_s</text:span></text:p>
            </draw:text-box>
          </draw:frame>
          <draw:frame draw:style-name="gr797" draw:text-style-name="P37" draw:layer="layout" svg:width="1.776cm" svg:height="0.569cm" svg:x="39.28cm" svg:y="13.841cm">
            <draw:text-box>
              <text:p><text:span text:style-name="T10">id_regB_s</text:span></text:p>
            </draw:text-box>
          </draw:frame>
          <draw:frame draw:style-name="gr798" draw:text-style-name="P37" draw:layer="layout" svg:width="2.123cm" svg:height="0.569cm" svg:x="38.933cm" svg:y="14.242cm">
            <draw:text-box>
              <text:p><text:span text:style-name="T10">id_immExt_s</text:span></text:p>
            </draw:text-box>
          </draw:frame>
        </draw:g>
        <draw:g draw:style-name="gr1">
          <draw:g draw:style-name="gr1">
            <draw:g draw:style-name="gr1">
              <draw:custom-shape draw:style-name="gr799" draw:text-style-name="P39" draw:layer="layout" svg:width="2cm" svg:height="4cm" svg:x="19.001cm" svg:y="8cm">
                <text:p text:style-name="P35"><text:span text:style-name="T10">IF/</text:span><text:span text:style-name="T10">ID</text:span></text:p>
                <draw:enhanced-geometry svg:viewBox="0 0 21600 21600" draw:type="rectangle" draw:enhanced-path="M 0 0 L 21600 0 21600 21600 0 21600 0 0 Z N"/>
              </draw:custom-shape>
              <draw:g draw:style-name="gr66">
                <draw:line draw:style-name="gr786" draw:text-style-name="P69" draw:layer="layout" svg:x1="19.001cm" svg:y1="11.934cm" svg:x2="19.15cm" svg:y2="11.867cm">
                  <text:p/>
                </draw:line>
                <draw:line draw:style-name="gr786" draw:text-style-name="P69" draw:layer="layout" svg:x1="19.001cm" svg:y1="11.8cm" svg:x2="19.15cm" svg:y2="11.867cm">
                  <text:p/>
                </draw:line>
              </draw:g>
            </draw:g>
          </draw:g>
          <draw:line draw:style-name="gr38" draw:text-style-name="P4" draw:layer="layout" svg:x1="18.001cm" svg:y1="8.7cm" svg:x2="19.001cm" svg:y2="8.7cm">
            <text:p/>
          </draw:line>
          <draw:frame draw:style-name="gr776" draw:text-style-name="P37" draw:layer="layout" svg:width="2cm" svg:height="0.569cm" svg:x="16.951cm" svg:y="8.633cm">
            <draw:text-box>
              <text:p><text:span text:style-name="T10">fetch_pc_r</text:span></text:p>
            </draw:text-box>
          </draw:frame>
          <draw:frame draw:style-name="gr791" draw:text-style-name="P71" draw:layer="layout" svg:width="2.407cm" svg:height="0.569cm" svg:x="16.544cm" svg:y="9.434cm">
            <draw:text-box>
              <text:p text:style-name="P70"><text:span text:style-name="T21">icpu_if.ic_rdata</text:span></text:p>
            </draw:text-box>
          </draw:frame>
          <draw:frame draw:style-name="gr792" draw:text-style-name="P37" draw:layer="layout" svg:width="1.666cm" svg:height="0.569cm" svg:x="17.285cm" svg:y="9.035cm">
            <draw:text-box>
              <text:p><text:span text:style-name="T10">ibuf_pc_r</text:span></text:p>
            </draw:text-box>
          </draw:frame>
          <draw:frame draw:style-name="gr776" draw:text-style-name="P37" draw:layer="layout" svg:width="2cm" svg:height="0.569cm" svg:x="16.951cm" svg:y="8.236cm">
            <draw:text-box>
              <text:p><text:span text:style-name="T10">ibuf_instr_r</text:span></text:p>
            </draw:text-box>
          </draw:frame>
          <draw:frame draw:style-name="gr776" draw:text-style-name="P37" draw:layer="layout" svg:width="2cm" svg:height="0.569cm" svg:x="20.905cm" svg:y="8.634cm">
            <draw:text-box>
              <text:p><text:span text:style-name="T10">if_id_instr_r</text:span></text:p>
            </draw:text-box>
          </draw:frame>
          <draw:frame draw:style-name="gr776" draw:text-style-name="P37" draw:layer="layout" svg:width="2cm" svg:height="0.569cm" svg:x="20.905cm" svg:y="9.035cm">
            <draw:text-box>
              <text:p><text:span text:style-name="T10">if_id_pc_r</text:span></text:p>
            </draw:text-box>
          </draw:frame>
          <draw:line draw:style-name="gr38" draw:text-style-name="P4" draw:layer="layout" svg:x1="18.001cm" svg:y1="9.1cm" svg:x2="19.001cm" svg:y2="9.1cm">
            <text:p/>
          </draw:line>
          <draw:line draw:style-name="gr38" draw:text-style-name="P4" draw:layer="layout" svg:x1="18.001cm" svg:y1="9.5cm" svg:x2="19.001cm" svg:y2="9.5cm">
            <text:p/>
          </draw:line>
          <draw:line draw:style-name="gr38" draw:text-style-name="P4" draw:layer="layout" svg:x1="18.001cm" svg:y1="9.9cm" svg:x2="19.001cm" svg:y2="9.9cm">
            <text:p/>
          </draw:line>
          <draw:line draw:style-name="gr38" draw:text-style-name="P4" draw:layer="layout" svg:x1="21.001cm" svg:y1="9.1cm" svg:x2="22.001cm" svg:y2="9.1cm">
            <text:p/>
          </draw:line>
          <draw:line draw:style-name="gr38" draw:text-style-name="P4" draw:layer="layout" svg:x1="21.001cm" svg:y1="9.5cm" svg:x2="22.001cm" svg:y2="9.5cm">
            <text:p/>
          </draw:line>
          <draw:line draw:style-name="gr38" draw:text-style-name="P4" draw:layer="layout" svg:x1="18.001cm" svg:y1="10.3cm" svg:x2="19.001cm" svg:y2="10.3cm">
            <text:p/>
          </draw:line>
          <draw:line draw:style-name="gr38" draw:text-style-name="P4" draw:layer="layout" svg:x1="18.001cm" svg:y1="10.7cm" svg:x2="19.001cm" svg:y2="10.7cm">
            <text:p/>
          </draw:line>
          <draw:line draw:style-name="gr38" draw:text-style-name="P4" draw:layer="layout" svg:x1="18.001cm" svg:y1="11.1cm" svg:x2="19.001cm" svg:y2="11.1cm">
            <text:p/>
          </draw:line>
          <draw:frame draw:style-name="gr793" draw:text-style-name="P64" draw:layer="layout" svg:width="1.399cm" svg:height="0.569cm" svg:x="17.552cm" svg:y="9.844cm">
            <draw:text-box>
              <text:p text:style-name="P63"><text:span text:style-name="T19">flush_s</text:span></text:p>
            </draw:text-box>
          </draw:frame>
          <draw:frame draw:style-name="gr794" draw:text-style-name="P64" draw:layer="layout" svg:width="2.551cm" svg:height="0.569cm" svg:x="16.4cm" svg:y="10.245cm">
            <draw:text-box>
              <text:p text:style-name="P63"><text:span text:style-name="T19">if_id_advance_s</text:span></text:p>
            </draw:text-box>
          </draw:frame>
          <draw:line draw:style-name="gr38" draw:text-style-name="P4" draw:layer="layout" svg:x1="21.002cm" svg:y1="8.701cm" svg:x2="22.002cm" svg:y2="8.701cm">
            <text:p/>
          </draw:line>
          <draw:frame draw:style-name="gr776" draw:text-style-name="P37" draw:layer="layout" svg:width="2.013cm" svg:height="0.569cm" svg:x="20.899cm" svg:y="8.234cm">
            <draw:text-box>
              <text:p><text:span text:style-name="T10">if_id_valid_r</text:span></text:p>
            </draw:text-box>
          </draw:frame>
          <draw:frame draw:style-name="gr794" draw:text-style-name="P64" draw:layer="layout" svg:width="1.95cm" svg:height="0.569cm" svg:x="17.001cm" svg:y="10.646cm">
            <draw:text-box>
              <text:p text:style-name="P63"><text:span text:style-name="T19">ibuf_valid_r</text:span></text:p>
            </draw:text-box>
          </draw:frame>
        </draw:g>
        <draw:g draw:style-name="gr1">
          <draw:g draw:style-name="gr1">
            <draw:g draw:style-name="gr1">
              <draw:custom-shape draw:style-name="gr800" draw:text-style-name="P36" draw:layer="layout" svg:width="2cm" svg:height="4cm" svg:x="18cm" svg:y="2cm">
                <text:p text:style-name="P35"><text:span text:style-name="T10">InstrBuf</text:span></text:p>
                <draw:enhanced-geometry svg:viewBox="0 0 21600 21600" draw:type="rectangle" draw:enhanced-path="M 0 0 L 21600 0 21600 21600 0 21600 0 0 Z N"/>
              </draw:custom-shape>
              <draw:g draw:style-name="gr66">
                <draw:line draw:style-name="gr60" draw:text-style-name="P11" draw:layer="layout" svg:x1="18cm" svg:y1="5.934cm" svg:x2="18.149cm" svg:y2="5.867cm">
                  <text:p/>
                </draw:line>
                <draw:line draw:style-name="gr60" draw:text-style-name="P11" draw:layer="layout" svg:x1="18cm" svg:y1="5.8cm" svg:x2="18.149cm" svg:y2="5.867cm">
                  <text:p/>
                </draw:line>
              </draw:g>
            </draw:g>
          </draw:g>
          <draw:frame draw:style-name="gr801" draw:text-style-name="P62" draw:layer="layout" svg:width="1.903cm" svg:height="0.569cm" svg:x="19.852cm" svg:y="2.1cm">
            <draw:text-box>
              <text:p text:style-name="P6"><text:span text:style-name="T10">ibuf_instr_r</text:span></text:p>
            </draw:text-box>
          </draw:frame>
          <draw:frame draw:style-name="gr802" draw:text-style-name="P62" draw:layer="layout" svg:width="1.666cm" svg:height="0.569cm" svg:x="19.852cm" svg:y="2.501cm">
            <draw:text-box>
              <text:p text:style-name="P6"><text:span text:style-name="T10">ibuf_pc_r</text:span></text:p>
            </draw:text-box>
          </draw:frame>
          <draw:line draw:style-name="gr38" draw:text-style-name="P4" draw:layer="layout" svg:x1="17cm" svg:y1="3.4cm" svg:x2="18cm" svg:y2="3.4cm">
            <text:p/>
          </draw:line>
          <draw:line draw:style-name="gr38" draw:text-style-name="P4" draw:layer="layout" svg:x1="17cm" svg:y1="3.8cm" svg:x2="18cm" svg:y2="3.8cm">
            <text:p/>
          </draw:line>
          <draw:line draw:style-name="gr38" draw:text-style-name="P4" draw:layer="layout" svg:x1="17cm" svg:y1="4.2cm" svg:x2="18cm" svg:y2="4.2cm">
            <text:p/>
          </draw:line>
          <draw:line draw:style-name="gr38" draw:text-style-name="P4" draw:layer="layout" svg:x1="17cm" svg:y1="4.6cm" svg:x2="18cm" svg:y2="4.6cm">
            <text:p/>
          </draw:line>
          <draw:line draw:style-name="gr38" draw:text-style-name="P4" draw:layer="layout" svg:x1="17cm" svg:y1="5cm" svg:x2="18cm" svg:y2="5cm">
            <text:p/>
          </draw:line>
          <draw:line draw:style-name="gr38" draw:text-style-name="P4" draw:layer="layout" svg:x1="17cm" svg:y1="5.4cm" svg:x2="18cm" svg:y2="5.4cm">
            <text:p/>
          </draw:line>
          <draw:line draw:style-name="gr38" draw:text-style-name="P4" draw:layer="layout" svg:x1="20cm" svg:y1="2.6cm" svg:x2="21cm" svg:y2="2.6cm">
            <text:p/>
          </draw:line>
          <draw:line draw:style-name="gr38" draw:text-style-name="P4" draw:layer="layout" svg:x1="20cm" svg:y1="3cm" svg:x2="21cm" svg:y2="3cm">
            <text:p/>
          </draw:line>
          <draw:line draw:style-name="gr38" draw:text-style-name="P4" draw:layer="layout" svg:x1="20cm" svg:y1="3.4cm" svg:x2="21cm" svg:y2="3.4cm">
            <text:p/>
          </draw:line>
          <draw:frame draw:style-name="gr803" draw:text-style-name="P62" draw:layer="layout" svg:width="1.95cm" svg:height="0.569cm" svg:x="19.852cm" svg:y="2.902cm">
            <draw:text-box>
              <text:p text:style-name="P6"><text:span text:style-name="T10">ibuf_valid_r</text:span></text:p>
            </draw:text-box>
          </draw:frame>
          <draw:frame draw:style-name="gr793" draw:text-style-name="P64" draw:layer="layout" svg:width="1.399cm" svg:height="0.569cm" svg:x="16.652cm" svg:y="4.945cm">
            <draw:text-box>
              <text:p text:style-name="P63"><text:span text:style-name="T19">flush_s</text:span></text:p>
            </draw:text-box>
          </draw:frame>
          <draw:frame draw:style-name="gr791" draw:text-style-name="P71" draw:layer="layout" svg:width="2.407cm" svg:height="0.569cm" svg:x="15.644cm" svg:y="2.935cm">
            <draw:text-box>
              <text:p text:style-name="P70"><text:span text:style-name="T21">icpu_if.ic_rdata</text:span></text:p>
            </draw:text-box>
          </draw:frame>
          <draw:frame draw:style-name="gr794" draw:text-style-name="P64" draw:layer="layout" svg:width="2.551cm" svg:height="0.569cm" svg:x="15.5cm" svg:y="4.546cm">
            <draw:text-box>
              <text:p text:style-name="P63"><text:span text:style-name="T19">if_id_advance_s</text:span></text:p>
            </draw:text-box>
          </draw:frame>
          <draw:frame draw:style-name="gr791" draw:text-style-name="P71" draw:layer="layout" svg:width="2.441cm" svg:height="0.569cm" svg:x="15.61cm" svg:y="2.536cm">
            <draw:text-box>
              <text:p text:style-name="P70"><text:span text:style-name="T21">icpu_if.ic_rvalid</text:span></text:p>
            </draw:text-box>
          </draw:frame>
          <draw:frame draw:style-name="gr794" draw:text-style-name="P64" draw:layer="layout" svg:width="2.03cm" svg:height="0.569cm" svg:x="16.021cm" svg:y="4.147cm">
            <draw:text-box>
              <text:p text:style-name="P63"><text:span text:style-name="T19">discard_ic_r</text:span></text:p>
            </draw:text-box>
          </draw:frame>
          <draw:frame draw:style-name="gr794" draw:text-style-name="P64" draw:layer="layout" svg:width="2.013cm" svg:height="0.569cm" svg:x="16.038cm" svg:y="3.748cm">
            <draw:text-box>
              <text:p text:style-name="P63"><text:span text:style-name="T19">data_stall_s</text:span></text:p>
            </draw:text-box>
          </draw:frame>
          <draw:frame draw:style-name="gr794" draw:text-style-name="P64" draw:layer="layout" svg:width="2.377cm" svg:height="0.569cm" svg:x="15.674cm" svg:y="3.349cm">
            <draw:text-box>
              <text:p text:style-name="P63"><text:span text:style-name="T19">dcache_stall_s</text:span></text:p>
            </draw:text-box>
          </draw:frame>
          <draw:frame draw:style-name="gr804" draw:text-style-name="P37" draw:layer="layout" svg:width="1.823cm" svg:height="0.569cm" svg:x="16.228cm" svg:y="2.137cm">
            <draw:text-box>
              <text:p><text:span text:style-name="T10">fetch_pc_r</text:span></text:p>
            </draw:text-box>
          </draw:frame>
          <draw:line draw:style-name="gr38" draw:text-style-name="P4" draw:layer="layout" svg:x1="17cm" svg:y1="2.6cm" svg:x2="18cm" svg:y2="2.6cm">
            <text:p/>
          </draw:line>
          <draw:line draw:style-name="gr38" draw:text-style-name="P4" draw:layer="layout" svg:x1="17cm" svg:y1="3cm" svg:x2="18cm" svg:y2="3cm">
            <text:p/>
          </draw:line>
        </draw:g>
        <draw:g draw:style-name="gr1">
          <draw:g draw:style-name="gr1">
            <draw:custom-shape draw:style-name="gr805" draw:text-style-name="P36" draw:layer="layout" svg:width="2cm" svg:height="2cm" svg:x="6.994cm" svg:y="29cm">
              <text:p text:style-name="P35"><text:span text:style-name="T10">Discard</text:span></text:p>
              <text:p text:style-name="P35"><text:span text:style-name="T10">Flag</text:span></text:p>
              <draw:enhanced-geometry svg:viewBox="0 0 21600 21600" draw:type="rectangle" draw:enhanced-path="M 0 0 L 21600 0 21600 21600 0 21600 0 0 Z N"/>
            </draw:custom-shape>
            <draw:g draw:style-name="gr66">
              <draw:line draw:style-name="gr60" draw:text-style-name="P11" draw:layer="layout" svg:x1="6.994cm" svg:y1="30.966cm" svg:x2="7.143cm" svg:y2="30.933cm">
                <text:p/>
              </draw:line>
              <draw:line draw:style-name="gr60" draw:text-style-name="P11" draw:layer="layout" svg:x1="6.994cm" svg:y1="30.9cm" svg:x2="7.143cm" svg:y2="30.933cm">
                <text:p/>
              </draw:line>
            </draw:g>
          </draw:g>
        </draw:g>
        <draw:frame draw:style-name="gr806" draw:text-style-name="P62" draw:layer="layout" svg:width="2.03cm" svg:height="0.569cm" svg:x="8.853cm" svg:y="29.1cm">
          <draw:text-box>
            <text:p text:style-name="P6"><text:span text:style-name="T10">discard_ic_r</text:span></text:p>
          </draw:text-box>
        </draw:frame>
        <draw:line draw:style-name="gr38" draw:text-style-name="P4" draw:layer="layout" svg:x1="6.001cm" svg:y1="30.4cm" svg:x2="7.001cm" svg:y2="30.4cm">
          <text:p/>
        </draw:line>
        <draw:line draw:style-name="gr38" draw:text-style-name="P4" draw:layer="layout" svg:x1="9.001cm" svg:y1="29.6cm" svg:x2="10.001cm" svg:y2="29.6cm">
          <text:p/>
        </draw:line>
        <draw:frame draw:style-name="gr793" draw:text-style-name="P64" draw:layer="layout" svg:width="1.399cm" svg:height="0.569cm" svg:x="5.753cm" svg:y="29.945cm">
          <draw:text-box>
            <text:p text:style-name="P63"><text:span text:style-name="T19">flush_s</text:span></text:p>
          </draw:text-box>
        </draw:frame>
        <draw:frame draw:style-name="gr794" draw:text-style-name="P64" draw:layer="layout" svg:width="2.504cm" svg:height="0.569cm" svg:x="4.648cm" svg:y="29.546cm">
          <draw:text-box>
            <text:p text:style-name="P63"><text:span text:style-name="T19">fetch_in_flight_r</text:span></text:p>
          </draw:text-box>
        </draw:frame>
        <draw:frame draw:style-name="gr791" draw:text-style-name="P71" draw:layer="layout" svg:width="2.441cm" svg:height="0.569cm" svg:x="4.711cm" svg:y="29.136cm">
          <draw:text-box>
            <text:p text:style-name="P70"><text:span text:style-name="T21">icpu_if.ic_rvalid</text:span></text:p>
          </draw:text-box>
        </draw:frame>
        <draw:line draw:style-name="gr38" draw:text-style-name="P4" draw:layer="layout" svg:x1="6.001cm" svg:y1="29.6cm" svg:x2="7.001cm" svg:y2="29.6cm">
          <text:p/>
        </draw:line>
        <draw:line draw:style-name="gr38" draw:text-style-name="P4" draw:layer="layout" svg:x1="6.001cm" svg:y1="30cm" svg:x2="7.001cm" svg:y2="30cm">
          <text:p/>
        </draw:line>
        <draw:g draw:style-name="gr1">
          <draw:g draw:style-name="gr1">
            <draw:custom-shape draw:style-name="gr805" draw:text-style-name="P36" draw:layer="layout" svg:width="2cm" svg:height="2cm" svg:x="6.995cm" svg:y="32cm">
              <text:p text:style-name="P35"><text:span text:style-name="T10">Fet</text:span><text:span text:style-name="T10">ch</text:span></text:p>
              <text:p text:style-name="P35"><text:span text:style-name="T10">InFl</text:span><text:span text:style-name="T10">ight</text:span></text:p>
              <draw:enhanced-geometry svg:viewBox="0 0 21600 21600" draw:type="rectangle" draw:enhanced-path="M 0 0 L 21600 0 21600 21600 0 21600 0 0 Z N"/>
            </draw:custom-shape>
            <draw:g draw:style-name="gr66">
              <draw:line draw:style-name="gr60" draw:text-style-name="P11" draw:layer="layout" svg:x1="6.995cm" svg:y1="33.966cm" svg:x2="7.144cm" svg:y2="33.933cm">
                <text:p/>
              </draw:line>
              <draw:line draw:style-name="gr60" draw:text-style-name="P11" draw:layer="layout" svg:x1="6.995cm" svg:y1="33.9cm" svg:x2="7.144cm" svg:y2="33.933cm">
                <text:p/>
              </draw:line>
            </draw:g>
          </draw:g>
        </draw:g>
        <draw:frame draw:style-name="gr807" draw:text-style-name="P62" draw:layer="layout" svg:width="2.504cm" svg:height="0.569cm" svg:x="8.854cm" svg:y="32.1cm">
          <draw:text-box>
            <text:p text:style-name="P6"><text:span text:style-name="T22">fetch_in_flight_r</text:span></text:p>
          </draw:text-box>
        </draw:frame>
        <draw:line draw:style-name="gr38" draw:text-style-name="P4" draw:layer="layout" svg:x1="6.002cm" svg:y1="33.4cm" svg:x2="7.002cm" svg:y2="33.4cm">
          <text:p/>
        </draw:line>
        <draw:line draw:style-name="gr38" draw:text-style-name="P4" draw:layer="layout" svg:x1="9.002cm" svg:y1="32.6cm" svg:x2="10.002cm" svg:y2="32.6cm">
          <text:p/>
        </draw:line>
        <draw:frame draw:style-name="gr793" draw:text-style-name="P64" draw:layer="layout" svg:width="1.399cm" svg:height="0.569cm" svg:x="5.754cm" svg:y="32.945cm">
          <draw:text-box>
            <text:p text:style-name="P63"><text:span text:style-name="T19">flush_s</text:span></text:p>
          </draw:text-box>
        </draw:frame>
        <draw:frame draw:style-name="gr794" draw:text-style-name="P64" draw:layer="layout" svg:width="2.123cm" svg:height="0.569cm" svg:x="5.03cm" svg:y="32.546cm">
          <draw:text-box>
            <text:p text:style-name="P63"><text:span text:style-name="T19">start_fetch_s</text:span></text:p>
          </draw:text-box>
        </draw:frame>
        <draw:frame draw:style-name="gr791" draw:text-style-name="P71" draw:layer="layout" svg:width="2.441cm" svg:height="0.569cm" svg:x="4.712cm" svg:y="32.136cm">
          <draw:text-box>
            <text:p text:style-name="P70"><text:span text:style-name="T21">icpu_if.ic_rvalid</text:span></text:p>
          </draw:text-box>
        </draw:frame>
        <draw:line draw:style-name="gr38" draw:text-style-name="P4" draw:layer="layout" svg:x1="6.002cm" svg:y1="32.6cm" svg:x2="7.002cm" svg:y2="32.6cm">
          <text:p/>
        </draw:line>
        <draw:line draw:style-name="gr38" draw:text-style-name="P4" draw:layer="layout" svg:x1="6.002cm" svg:y1="33cm" svg:x2="7.002cm" svg:y2="33cm">
          <text:p/>
        </draw:line>
        <draw:g draw:style-name="gr1">
          <draw:g draw:style-name="gr1">
            <draw:custom-shape draw:style-name="gr368" draw:text-style-name="P36" draw:layer="layout" svg:width="2cm" svg:height="1.5cm" svg:x="11.995cm" svg:y="2cm">
              <text:p text:style-name="P35"><text:span text:style-name="T10">PC</text:span></text:p>
              <text:p text:style-name="P35"><text:span text:style-name="T10">Lat</text:span><text:span text:style-name="T10">ch</text:span></text:p>
              <draw:enhanced-geometry svg:viewBox="0 0 21600 21600" draw:type="rectangle" draw:enhanced-path="M 0 0 L 21600 0 21600 21600 0 21600 0 0 Z N"/>
            </draw:custom-shape>
            <draw:g draw:style-name="gr66">
              <draw:line draw:style-name="gr60" draw:text-style-name="P11" draw:layer="layout" svg:x1="11.995cm" svg:y1="3.475cm" svg:x2="12.144cm" svg:y2="3.45cm">
                <text:p/>
              </draw:line>
              <draw:line draw:style-name="gr60" draw:text-style-name="P11" draw:layer="layout" svg:x1="11.995cm" svg:y1="3.425cm" svg:x2="12.144cm" svg:y2="3.45cm">
                <text:p/>
              </draw:line>
            </draw:g>
          </draw:g>
        </draw:g>
        <draw:frame draw:style-name="gr808" draw:text-style-name="P73" draw:layer="layout" svg:width="1.823cm" svg:height="0.569cm" svg:x="13.854cm" svg:y="2.1cm">
          <draw:text-box>
            <text:p text:style-name="P72"><text:span text:style-name="T23">fetch_pc_r</text:span></text:p>
          </draw:text-box>
        </draw:frame>
        <draw:line draw:style-name="gr38" draw:text-style-name="P4" draw:layer="layout" svg:x1="14.002cm" svg:y1="2.6cm" svg:x2="15.002cm" svg:y2="2.6cm">
          <text:p/>
        </draw:line>
        <draw:frame draw:style-name="gr794" draw:text-style-name="P64" draw:layer="layout" svg:width="2.123cm" svg:height="0.569cm" svg:x="10.03cm" svg:y="2.546cm">
          <draw:text-box>
            <text:p text:style-name="P63"><text:span text:style-name="T19">start_fetch_s</text:span></text:p>
          </draw:text-box>
        </draw:frame>
        <draw:frame draw:style-name="gr809" draw:text-style-name="P75" draw:layer="layout" svg:width="1.145cm" svg:height="0.569cm" svg:x="11.008cm" svg:y="2.136cm">
          <draw:text-box>
            <text:p text:style-name="P74"><text:span text:style-name="T23">PC_r</text:span></text:p>
          </draw:text-box>
        </draw:frame>
        <draw:line draw:style-name="gr38" draw:text-style-name="P4" draw:layer="layout" svg:x1="11.002cm" svg:y1="2.6cm" svg:x2="12.002cm" svg:y2="2.6cm">
          <text:p/>
        </draw:line>
        <draw:line draw:style-name="gr38" draw:text-style-name="P4" draw:layer="layout" svg:x1="11.002cm" svg:y1="3cm" svg:x2="12.002cm" svg:y2="3cm">
          <text:p/>
        </draw:line>
        <draw:g draw:style-name="gr1">
          <draw:g draw:style-name="gr1">
            <draw:custom-shape draw:style-name="gr800" draw:text-style-name="P36" draw:layer="layout" svg:width="2cm" svg:height="4cm" svg:x="7.996cm" svg:y="2cm">
              <text:p text:style-name="P35"><text:span text:style-name="T10">PC</text:span></text:p>
              <draw:enhanced-geometry svg:viewBox="0 0 21600 21600" draw:type="rectangle" draw:enhanced-path="M 0 0 L 21600 0 21600 21600 0 21600 0 0 Z N"/>
            </draw:custom-shape>
            <draw:g draw:style-name="gr66">
              <draw:line draw:style-name="gr60" draw:text-style-name="P11" draw:layer="layout" svg:x1="7.996cm" svg:y1="5.934cm" svg:x2="8.145cm" svg:y2="5.867cm">
                <text:p/>
              </draw:line>
              <draw:line draw:style-name="gr60" draw:text-style-name="P11" draw:layer="layout" svg:x1="7.996cm" svg:y1="5.8cm" svg:x2="8.145cm" svg:y2="5.867cm">
                <text:p/>
              </draw:line>
            </draw:g>
          </draw:g>
        </draw:g>
        <draw:frame draw:style-name="gr810" draw:text-style-name="P73" draw:layer="layout" svg:width="1.145cm" svg:height="0.569cm" svg:x="9.855cm" svg:y="2.1cm">
          <draw:text-box>
            <text:p text:style-name="P72"><text:span text:style-name="T23">PC_r</text:span></text:p>
          </draw:text-box>
        </draw:frame>
        <draw:line draw:style-name="gr38" draw:text-style-name="P4" draw:layer="layout" svg:x1="10.003cm" svg:y1="2.6cm" svg:x2="11.003cm" svg:y2="2.6cm">
          <text:p/>
        </draw:line>
        <draw:frame draw:style-name="gr794" draw:text-style-name="P64" draw:layer="layout" svg:width="2.974cm" svg:height="0.569cm" svg:x="5.12cm" svg:y="3.746cm">
          <draw:text-box>
            <text:p text:style-name="P63"><text:span text:style-name="T19">ex_branch_taken</text:span><text:span text:style-name="T19">_s</text:span></text:p>
          </draw:text-box>
        </draw:frame>
        <draw:frame draw:style-name="gr809" draw:text-style-name="P75" draw:layer="layout" svg:width="1.628cm" svg:height="0.569cm" svg:x="6.466cm" svg:y="2.136cm">
          <draw:text-box>
            <text:p text:style-name="P74"><text:span text:style-name="T23">PC_r + 4</text:span></text:p>
          </draw:text-box>
        </draw:frame>
        <draw:line draw:style-name="gr38" draw:text-style-name="P4" draw:layer="layout" svg:x1="7.003cm" svg:y1="2.6cm" svg:x2="8.003cm" svg:y2="2.6cm">
          <text:p/>
        </draw:line>
        <draw:line draw:style-name="gr38" draw:text-style-name="P4" draw:layer="layout" svg:x1="7.003cm" svg:y1="4.2cm" svg:x2="8.003cm" svg:y2="4.2cm">
          <text:p/>
        </draw:line>
        <draw:frame draw:style-name="gr809" draw:text-style-name="P75" draw:layer="layout" svg:width="2.043cm" svg:height="0.569cm" svg:x="6.051cm" svg:y="2.537cm">
          <draw:text-box>
            <text:p text:style-name="P74"><text:span text:style-name="T23">csr_mtvec_r</text:span></text:p>
          </draw:text-box>
        </draw:frame>
        <draw:line draw:style-name="gr38" draw:text-style-name="P4" draw:layer="layout" svg:x1="7.004cm" svg:y1="3.001cm" svg:x2="8.004cm" svg:y2="3.001cm">
          <text:p/>
        </draw:line>
        <draw:frame draw:style-name="gr809" draw:text-style-name="P75" draw:layer="layout" svg:width="1.979cm" svg:height="0.569cm" svg:x="6.115cm" svg:y="2.938cm">
          <draw:text-box>
            <text:p text:style-name="P74"><text:span text:style-name="T23">csr_mepc_r</text:span></text:p>
          </draw:text-box>
        </draw:frame>
        <draw:line draw:style-name="gr38" draw:text-style-name="P4" draw:layer="layout" svg:x1="7.005cm" svg:y1="3.402cm" svg:x2="8.005cm" svg:y2="3.402cm">
          <text:p/>
        </draw:line>
        <draw:frame draw:style-name="gr809" draw:text-style-name="P75" draw:layer="layout" svg:width="1.903cm" svg:height="0.569cm" svg:x="6.191cm" svg:y="3.339cm">
          <draw:text-box>
            <text:p text:style-name="P74"><text:span text:style-name="T23">ex_PCbr_s</text:span></text:p>
          </draw:text-box>
        </draw:frame>
        <draw:line draw:style-name="gr38" draw:text-style-name="P4" draw:layer="layout" svg:x1="7.006cm" svg:y1="3.803cm" svg:x2="8.006cm" svg:y2="3.803cm">
          <text:p/>
        </draw:line>
        <draw:frame draw:style-name="gr794" draw:text-style-name="P64" draw:layer="layout" svg:width="1.886cm" svg:height="0.569cm" svg:x="6.208cm" svg:y="4.147cm">
          <draw:text-box>
            <text:p text:style-name="P63"><text:span text:style-name="T19">wb_mret_s</text:span></text:p>
          </draw:text-box>
        </draw:frame>
        <draw:line draw:style-name="gr38" draw:text-style-name="P4" draw:layer="layout" svg:x1="7.004cm" svg:y1="4.601cm" svg:x2="8.004cm" svg:y2="4.601cm">
          <text:p/>
        </draw:line>
        <draw:frame draw:style-name="gr794" draw:text-style-name="P64" draw:layer="layout" svg:width="2.661cm" svg:height="0.569cm" svg:x="5.433cm" svg:y="4.548cm">
          <draw:text-box>
            <text:p text:style-name="P63"><text:span text:style-name="T19">wb_trap_taken_s</text:span></text:p>
          </draw:text-box>
        </draw:frame>
        <draw:line draw:style-name="gr38" draw:text-style-name="P4" draw:layer="layout" svg:x1="7.005cm" svg:y1="5.002cm" svg:x2="8.005cm" svg:y2="5.002cm">
          <text:p/>
        </draw:line>
        <draw:frame draw:style-name="gr794" draw:text-style-name="P64" draw:layer="layout" svg:width="2.123cm" svg:height="0.569cm" svg:x="5.971cm" svg:y="4.949cm">
          <draw:text-box>
            <text:p text:style-name="P63"><text:span text:style-name="T19">start_fetch_s</text:span></text:p>
          </draw:text-box>
        </draw:frame>
        <draw:line draw:style-name="gr38" draw:text-style-name="P4" draw:layer="layout" svg:x1="7.006cm" svg:y1="5.403cm" svg:x2="8.006cm" svg:y2="5.403cm">
          <text:p/>
        </draw:line>
        <draw:g draw:style-name="gr1">
          <draw:g draw:style-name="gr1">
            <draw:custom-shape draw:style-name="gr368" draw:text-style-name="P36" draw:layer="layout" svg:width="2cm" svg:height="1.5cm" svg:x="6.997cm" svg:y="36cm">
              <text:p text:style-name="P35"><text:span text:style-name="T10">Trap</text:span></text:p>
              <text:p text:style-name="P35"><text:span text:style-name="T10">Misaligned</text:span></text:p>
              <draw:enhanced-geometry svg:viewBox="0 0 21600 21600" draw:type="rectangle" draw:enhanced-path="M 0 0 L 21600 0 21600 21600 0 21600 0 0 Z N"/>
            </draw:custom-shape>
          </draw:g>
        </draw:g>
        <draw:frame draw:style-name="gr811" draw:text-style-name="P73" draw:layer="layout" svg:width="3.321cm" svg:height="0.569cm" svg:x="8.856cm" svg:y="36.1cm">
          <draw:text-box>
            <text:p text:style-name="P72"><text:span text:style-name="T23">wb_trap_misalign</text:span><text:span text:style-name="T23">ed_s</text:span></text:p>
          </draw:text-box>
        </draw:frame>
        <draw:line draw:style-name="gr38" draw:text-style-name="P4" draw:layer="layout" svg:x1="9.004cm" svg:y1="36.6cm" svg:x2="10.004cm" svg:y2="36.6cm">
          <text:p/>
        </draw:line>
        <draw:frame draw:style-name="gr809" draw:text-style-name="P75" draw:layer="layout" svg:width="2.598cm" svg:height="0.569cm" svg:x="4.567cm" svg:y="36.136cm">
          <draw:text-box>
            <text:p text:style-name="P74"><text:span text:style-name="T23">mem_wb_instr_r</text:span></text:p>
          </draw:text-box>
        </draw:frame>
        <draw:line draw:style-name="gr38" draw:text-style-name="P4" draw:layer="layout" svg:x1="6.004cm" svg:y1="36.6cm" svg:x2="7.004cm" svg:y2="36.6cm">
          <text:p/>
        </draw:line>
        <draw:frame draw:style-name="gr809" draw:text-style-name="P75" draw:layer="layout" svg:width="2.945cm" svg:height="0.569cm" svg:x="4.22cm" svg:y="36.537cm">
          <draw:text-box>
            <text:p text:style-name="P74"><text:span text:style-name="T23">mem_wb_aluRes</text:span><text:span text:style-name="T23">_r</text:span></text:p>
          </draw:text-box>
        </draw:frame>
        <draw:line draw:style-name="gr38" draw:text-style-name="P4" draw:layer="layout" svg:x1="6.005cm" svg:y1="37.001cm" svg:x2="7.005cm" svg:y2="37.001cm">
          <text:p/>
        </draw:line>
        <draw:g draw:style-name="gr1">
          <draw:g draw:style-name="gr1">
            <draw:custom-shape draw:style-name="gr382" draw:text-style-name="P36" draw:layer="layout" svg:width="2cm" svg:height="2.5cm" svg:x="6.998cm" svg:y="39.5cm">
              <text:p text:style-name="P35"><text:span text:style-name="T10">Result</text:span></text:p>
              <text:p text:style-name="P35"><text:span text:style-name="T10">Mux</text:span></text:p>
              <draw:enhanced-geometry svg:viewBox="0 0 21600 21600" draw:type="rectangle" draw:enhanced-path="M 0 0 L 21600 0 21600 21600 0 21600 0 0 Z N"/>
            </draw:custom-shape>
          </draw:g>
        </draw:g>
        <draw:frame draw:style-name="gr812" draw:text-style-name="P73" draw:layer="layout" svg:width="2.013cm" svg:height="0.569cm" svg:x="8.857cm" svg:y="39.6cm">
          <draw:text-box>
            <text:p text:style-name="P72"><text:span text:style-name="T23">wb_result_s</text:span></text:p>
          </draw:text-box>
        </draw:frame>
        <draw:line draw:style-name="gr38" draw:text-style-name="P4" draw:layer="layout" svg:x1="9.005cm" svg:y1="40.1cm" svg:x2="10.005cm" svg:y2="40.1cm">
          <text:p/>
        </draw:line>
        <draw:frame draw:style-name="gr809" draw:text-style-name="P75" draw:layer="layout" svg:width="3.292cm" svg:height="0.569cm" svg:x="3.772cm" svg:y="39.636cm">
          <draw:text-box>
            <text:p text:style-name="P74"><text:span text:style-name="T23">mem_wb_memD</text:span><text:span text:style-name="T23">ata_r</text:span></text:p>
          </draw:text-box>
        </draw:frame>
        <draw:line draw:style-name="gr38" draw:text-style-name="P4" draw:layer="layout" svg:x1="6.005cm" svg:y1="40.1cm" svg:x2="7.005cm" svg:y2="40.1cm">
          <text:p/>
        </draw:line>
        <draw:frame draw:style-name="gr809" draw:text-style-name="P75" draw:layer="layout" svg:width="2.945cm" svg:height="0.569cm" svg:x="4.119cm" svg:y="40.037cm">
          <draw:text-box>
            <text:p text:style-name="P74"><text:span text:style-name="T23">mem_wb_aluRes</text:span><text:span text:style-name="T23">_r</text:span></text:p>
          </draw:text-box>
        </draw:frame>
        <draw:line draw:style-name="gr38" draw:text-style-name="P4" draw:layer="layout" svg:x1="6.006cm" svg:y1="40.501cm" svg:x2="7.006cm" svg:y2="40.501cm">
          <text:p/>
        </draw:line>
        <draw:frame draw:style-name="gr809" draw:text-style-name="P75" draw:layer="layout" svg:width="2.843cm" svg:height="0.569cm" svg:x="4.221cm" svg:y="40.438cm">
          <draw:text-box>
            <text:p text:style-name="P74"><text:span text:style-name="T23">mem_wb_pc_r + </text:span><text:span text:style-name="T23">4</text:span></text:p>
          </draw:text-box>
        </draw:frame>
        <draw:frame draw:style-name="gr809" draw:text-style-name="P75" draw:layer="layout" svg:width="3.241cm" svg:height="0.569cm" svg:x="3.823cm" svg:y="40.839cm">
          <draw:text-box>
            <text:p text:style-name="P74"><text:span text:style-name="T23">mem_wb_csr_rd</text:span><text:span text:style-name="T23">ata_r</text:span></text:p>
          </draw:text-box>
        </draw:frame>
        <draw:frame draw:style-name="gr776" draw:text-style-name="P37" draw:layer="layout" svg:width="3.177cm" svg:height="0.569cm" svg:x="3.887cm" svg:y="41.238cm">
          <draw:text-box>
            <text:p><text:span text:style-name="T10">mem_wb_resultS</text:span><text:span text:style-name="T10">rc_r</text:span></text:p>
          </draw:text-box>
        </draw:frame>
        <draw:line draw:style-name="gr38" draw:text-style-name="P4" draw:layer="layout" svg:x1="6.006cm" svg:y1="40.901cm" svg:x2="7.006cm" svg:y2="40.901cm">
          <text:p/>
        </draw:line>
        <draw:line draw:style-name="gr38" draw:text-style-name="P4" draw:layer="layout" svg:x1="6.006cm" svg:y1="41.301cm" svg:x2="7.006cm" svg:y2="41.301cm">
          <text:p/>
        </draw:line>
        <draw:line draw:style-name="gr38" draw:text-style-name="P4" draw:layer="layout" svg:x1="6.006cm" svg:y1="41.701cm" svg:x2="7.006cm" svg:y2="41.701cm">
          <text:p/>
        </draw:line>
        <draw:g draw:style-name="gr1">
          <draw:g draw:style-name="gr1">
            <draw:custom-shape draw:style-name="gr382" draw:text-style-name="P36" draw:layer="layout" svg:width="2cm" svg:height="2.5cm" svg:x="6.998cm" svg:y="44.5cm">
              <text:p text:style-name="P35"><text:span text:style-name="T10">Sto</text:span><text:span text:style-name="T10">re</text:span></text:p>
              <text:p text:style-name="P35"><text:span text:style-name="T10">Byt</text:span><text:span text:style-name="T10">eWi</text:span><text:span text:style-name="T10">se</text:span></text:p>
              <draw:enhanced-geometry svg:viewBox="0 0 21600 21600" draw:type="rectangle" draw:enhanced-path="M 0 0 L 21600 0 21600 21600 0 21600 0 0 Z N"/>
            </draw:custom-shape>
          </draw:g>
        </draw:g>
        <draw:frame draw:style-name="gr813" draw:text-style-name="P73" draw:layer="layout" svg:width="2.471cm" svg:height="0.569cm" svg:x="8.857cm" svg:y="44.6cm">
          <draw:text-box>
            <text:p text:style-name="P72"><text:span text:style-name="T23">ex_dc_wdata_s</text:span></text:p>
          </draw:text-box>
        </draw:frame>
        <draw:line draw:style-name="gr38" draw:text-style-name="P4" draw:layer="layout" svg:x1="9.005cm" svg:y1="45.1cm" svg:x2="10.005cm" svg:y2="45.1cm">
          <text:p/>
        </draw:line>
        <draw:frame draw:style-name="gr814" draw:text-style-name="P75" draw:layer="layout" svg:width="1.967cm" svg:height="0.569cm" svg:x="5.187cm" svg:y="44.636cm">
          <draw:text-box>
            <text:p text:style-name="P74"><text:span text:style-name="T23">fwd_srcB_s</text:span></text:p>
          </draw:text-box>
        </draw:frame>
        <draw:line draw:style-name="gr38" draw:text-style-name="P4" draw:layer="layout" svg:x1="6.005cm" svg:y1="45.1cm" svg:x2="7.005cm" svg:y2="45.1cm">
          <text:p/>
        </draw:line>
        <draw:frame draw:style-name="gr809" draw:text-style-name="P75" draw:layer="layout" svg:width="2.123cm" svg:height="0.569cm" svg:x="5.031cm" svg:y="45.037cm">
          <draw:text-box>
            <text:p text:style-name="P74"><text:span text:style-name="T23">id_ex_instr_r</text:span></text:p>
          </draw:text-box>
        </draw:frame>
        <draw:line draw:style-name="gr38" draw:text-style-name="P4" draw:layer="layout" svg:x1="6.006cm" svg:y1="45.501cm" svg:x2="7.006cm" svg:y2="45.501cm">
          <text:p/>
        </draw:line>
        <draw:frame draw:style-name="gr809" draw:text-style-name="P75" draw:layer="layout" svg:width="2.733cm" svg:height="0.569cm" svg:x="4.421cm" svg:y="45.438cm">
          <draw:text-box>
            <text:p text:style-name="P74"><text:span text:style-name="T23">id_ex_dMemWr_r</text:span></text:p>
          </draw:text-box>
        </draw:frame>
        <draw:frame draw:style-name="gr809" draw:text-style-name="P75" draw:layer="layout" svg:width="2.14cm" svg:height="0.569cm" svg:x="5.014cm" svg:y="45.839cm">
          <draw:text-box>
            <text:p text:style-name="P74"><text:span text:style-name="T23">ex_aluRes_s</text:span></text:p>
          </draw:text-box>
        </draw:frame>
        <draw:line draw:style-name="gr38" draw:text-style-name="P4" draw:layer="layout" svg:x1="6.006cm" svg:y1="45.901cm" svg:x2="7.006cm" svg:y2="45.901cm">
          <text:p/>
        </draw:line>
        <draw:line draw:style-name="gr38" draw:text-style-name="P4" draw:layer="layout" svg:x1="6.006cm" svg:y1="46.301cm" svg:x2="7.006cm" svg:y2="46.301cm">
          <text:p/>
        </draw:line>
        <draw:frame draw:style-name="gr815" draw:text-style-name="P73" draw:layer="layout" svg:width="2.39cm" svg:height="0.569cm" svg:x="8.858cm" svg:y="45.001cm">
          <draw:text-box>
            <text:p text:style-name="P72"><text:span text:style-name="T23">ex_dc_wstrb_s</text:span></text:p>
          </draw:text-box>
        </draw:frame>
        <draw:line draw:style-name="gr38" draw:text-style-name="P4" draw:layer="layout" svg:x1="9.006cm" svg:y1="45.501cm" svg:x2="10.006cm" svg:y2="45.501cm">
          <text:p/>
        </draw:line>
        <draw:polygon draw:style-name="gr58" draw:text-style-name="P1" draw:layer="layout" svg:width="0.499cm" svg:height="0.999cm" svg:x="7cm" svg:y="49cm" svg:viewBox="0 0 500 1000" draw:points="0,0 0,1000 500,850 500,150">
          <text:p/>
        </draw:polygon>
        <draw:line draw:style-name="gr146" draw:text-style-name="P4" draw:layer="layout" svg:x1="7.3cm" svg:y1="50.5cm" svg:x2="7.3cm" svg:y2="49.9cm">
          <text:p/>
        </draw:line>
        <draw:frame draw:style-name="gr816" draw:text-style-name="P73" draw:layer="layout" svg:width="2.598cm" svg:height="0.569cm" svg:x="6.41cm" svg:y="50.4cm">
          <draw:text-box>
            <text:p text:style-name="P72"><text:span text:style-name="T23">id_ex_instr_r[14]</text:span></text:p>
          </draw:text-box>
        </draw:frame>
        <draw:line draw:style-name="gr38" draw:text-style-name="P4" draw:layer="layout" svg:x1="6cm" svg:y1="49.3cm" svg:x2="7cm" svg:y2="49.3cm">
          <text:p/>
        </draw:line>
        <draw:line draw:style-name="gr38" draw:text-style-name="P4" draw:layer="layout" svg:x1="6cm" svg:y1="49.7cm" svg:x2="7cm" svg:y2="49.7cm">
          <text:p/>
        </draw:line>
        <draw:line draw:style-name="gr38" draw:text-style-name="P4" draw:layer="layout" svg:x1="7.5cm" svg:y1="49.5cm" svg:x2="9cm" svg:y2="49.5cm">
          <text:p/>
        </draw:line>
        <draw:frame draw:style-name="gr817" draw:text-style-name="P73" draw:layer="layout" svg:width="2.551cm" svg:height="0.569cm" svg:x="7.3cm" svg:y="49cm">
          <draw:text-box>
            <text:p text:style-name="P72"><text:span text:style-name="T23">ex_csr_wdata_s</text:span></text:p>
          </draw:text-box>
        </draw:frame>
        <draw:frame draw:style-name="gr809" draw:text-style-name="P75" draw:layer="layout" svg:width="1.967cm" svg:height="0.569cm" svg:x="5.173cm" svg:y="48.84cm">
          <draw:text-box>
            <text:p text:style-name="P74"><text:span text:style-name="T23">fwd_srcA_s</text:span></text:p>
          </draw:text-box>
        </draw:frame>
        <draw:frame draw:style-name="gr818" draw:text-style-name="P75" draw:layer="layout" svg:width="5.425cm" svg:height="0.569cm" svg:x="1.715cm" svg:y="49.241cm">
          <draw:text-box>
            <text:p text:style-name="P74"><text:span text:style-name="T23">{{(XLEN-5)</text:span><text:span text:style-name="T23">{1'b0}}, </text:span><text:span text:style-name="T23">id_ex_instr_r[19:</text:span><text:span text:style-name="T23">15]}</text:span></text:p>
          </draw:text-box>
        </draw:frame>
        <draw:g draw:style-name="gr1">
          <draw:g draw:style-name="gr1">
            <draw:custom-shape draw:style-name="gr819" draw:text-style-name="P36" draw:layer="layout" svg:width="2cm" svg:height="3.5cm" svg:x="6.998cm" svg:y="52cm">
              <text:p text:style-name="P35"><text:span text:style-name="T10">CSR</text:span></text:p>
              <text:p text:style-name="P35"><text:span text:style-name="T10">Mux</text:span></text:p>
              <draw:enhanced-geometry svg:viewBox="0 0 21600 21600" draw:type="rectangle" draw:enhanced-path="M 0 0 L 21600 0 21600 21600 0 21600 0 0 Z N"/>
            </draw:custom-shape>
          </draw:g>
        </draw:g>
        <draw:frame draw:style-name="gr820" draw:text-style-name="P73" draw:layer="layout" svg:width="2.441cm" svg:height="0.569cm" svg:x="8.857cm" svg:y="52.1cm">
          <draw:text-box>
            <text:p text:style-name="P72"><text:span text:style-name="T23">ex_csr_rdata_s</text:span></text:p>
          </draw:text-box>
        </draw:frame>
        <draw:line draw:style-name="gr38" draw:text-style-name="P4" draw:layer="layout" svg:x1="9.005cm" svg:y1="52.6cm" svg:x2="10.005cm" svg:y2="52.6cm">
          <text:p/>
        </draw:line>
        <draw:frame draw:style-name="gr809" draw:text-style-name="P75" draw:layer="layout" svg:width="2.28cm" svg:height="0.569cm" svg:x="4.784cm" svg:y="52.136cm">
          <draw:text-box>
            <text:p text:style-name="P74"><text:span text:style-name="T23">csr_mstatus_r</text:span></text:p>
          </draw:text-box>
        </draw:frame>
        <draw:line draw:style-name="gr38" draw:text-style-name="P4" draw:layer="layout" svg:x1="6.005cm" svg:y1="52.6cm" svg:x2="7.005cm" svg:y2="52.6cm">
          <text:p/>
        </draw:line>
        <draw:frame draw:style-name="gr809" draw:text-style-name="P75" draw:layer="layout" svg:width="1.747cm" svg:height="0.569cm" svg:x="5.317cm" svg:y="52.537cm">
          <draw:text-box>
            <text:p text:style-name="P74"><text:span text:style-name="T23">csr_mie_r</text:span></text:p>
          </draw:text-box>
        </draw:frame>
        <draw:line draw:style-name="gr38" draw:text-style-name="P4" draw:layer="layout" svg:x1="6.006cm" svg:y1="53.001cm" svg:x2="7.006cm" svg:y2="53.001cm">
          <text:p/>
        </draw:line>
        <draw:frame draw:style-name="gr809" draw:text-style-name="P75" draw:layer="layout" svg:width="2.043cm" svg:height="0.569cm" svg:x="5.021cm" svg:y="52.938cm">
          <draw:text-box>
            <text:p text:style-name="P74"><text:span text:style-name="T23">csr_mtvec_r</text:span></text:p>
          </draw:text-box>
        </draw:frame>
        <draw:frame draw:style-name="gr809" draw:text-style-name="P75" draw:layer="layout" svg:width="1.979cm" svg:height="0.569cm" svg:x="5.085cm" svg:y="53.339cm">
          <draw:text-box>
            <text:p text:style-name="P74"><text:span text:style-name="T23">csr_mepc_r</text:span></text:p>
          </draw:text-box>
        </draw:frame>
        <draw:frame draw:style-name="gr776" draw:text-style-name="P37" draw:layer="layout" svg:width="2.123cm" svg:height="0.569cm" svg:x="4.941cm" svg:y="54.538cm">
          <draw:text-box>
            <text:p><text:span text:style-name="T10">id_ex_instr_r</text:span></text:p>
          </draw:text-box>
        </draw:frame>
        <draw:line draw:style-name="gr38" draw:text-style-name="P4" draw:layer="layout" svg:x1="6.006cm" svg:y1="53.401cm" svg:x2="7.006cm" svg:y2="53.401cm">
          <text:p/>
        </draw:line>
        <draw:line draw:style-name="gr38" draw:text-style-name="P4" draw:layer="layout" svg:x1="6.006cm" svg:y1="53.801cm" svg:x2="7.006cm" svg:y2="53.801cm">
          <text:p/>
        </draw:line>
        <draw:line draw:style-name="gr38" draw:text-style-name="P4" draw:layer="layout" svg:x1="6.006cm" svg:y1="54.201cm" svg:x2="7.006cm" svg:y2="54.201cm">
          <text:p/>
        </draw:line>
        <draw:line draw:style-name="gr38" draw:text-style-name="P4" draw:layer="layout" svg:x1="6.006cm" svg:y1="54.601cm" svg:x2="7.006cm" svg:y2="54.601cm">
          <text:p/>
        </draw:line>
        <draw:line draw:style-name="gr38" draw:text-style-name="P4" draw:layer="layout" svg:x1="6.006cm" svg:y1="55.001cm" svg:x2="7.006cm" svg:y2="55.001cm">
          <text:p/>
        </draw:line>
        <draw:frame draw:style-name="gr809" draw:text-style-name="P75" draw:layer="layout" svg:width="2.28cm" svg:height="0.569cm" svg:x="4.784cm" svg:y="53.74cm">
          <draw:text-box>
            <text:p text:style-name="P74"><text:span text:style-name="T23">csr_mcause_r</text:span></text:p>
          </draw:text-box>
        </draw:frame>
        <draw:frame draw:style-name="gr809" draw:text-style-name="P75" draw:layer="layout" svg:width="1.747cm" svg:height="0.569cm" svg:x="5.317cm" svg:y="54.141cm">
          <draw:text-box>
            <text:p text:style-name="P74"><text:span text:style-name="T23">csr_mip_r</text:span></text:p>
          </draw:text-box>
        </draw:frame>
        <draw:g draw:style-name="gr1">
          <draw:g draw:style-name="gr1">
            <draw:custom-shape draw:style-name="gr630" draw:text-style-name="P36" draw:layer="layout" svg:width="3cm" svg:height="1cm" svg:x="50.5cm" svg:y="55cm">
              <text:p text:style-name="P35"><text:span text:style-name="T10">ImmGen</text:span></text:p>
              <draw:enhanced-geometry svg:viewBox="0 0 21600 21600" draw:type="rectangle" draw:enhanced-path="M 0 0 L 21600 0 21600 21600 0 21600 0 0 Z N"/>
            </draw:custom-shape>
            <draw:frame draw:style-name="gr559" draw:text-style-name="P37" draw:layer="layout" svg:width="1.035cm" svg:height="0.569cm" svg:x="50.5cm" svg:y="55cm">
              <draw:text-box>
                <text:p><text:span text:style-name="T10">instr</text:span></text:p>
              </draw:text-box>
            </draw:frame>
            <draw:frame draw:style-name="gr631" draw:text-style-name="P37" draw:layer="layout" svg:width="1.603cm" svg:height="0.569cm" svg:x="51.697cm" svg:y="55.4cm">
              <draw:text-box>
                <text:p><text:span text:style-name="T10">immSrcx</text:span></text:p>
              </draw:text-box>
            </draw:frame>
            <draw:frame draw:style-name="gr632" draw:text-style-name="P37" draw:layer="layout" svg:width="1.446cm" svg:height="0.569cm" svg:x="52.054cm" svg:y="55.031cm">
              <draw:text-box>
                <text:p><text:span text:style-name="T10">immExt</text:span></text:p>
              </draw:text-box>
            </draw:frame>
          </draw:g>
          <draw:line draw:style-name="gr38" draw:text-style-name="P4" draw:layer="layout" svg:x1="49.5cm" svg:y1="55.3cm" svg:x2="50.5cm" svg:y2="55.3cm">
            <text:p/>
          </draw:line>
          <draw:line draw:style-name="gr38" draw:text-style-name="P4" draw:layer="layout" svg:x1="53.5cm" svg:y1="55.3cm" svg:x2="55cm" svg:y2="55.3cm">
            <text:p/>
          </draw:line>
          <draw:line draw:style-name="gr146" draw:text-style-name="P4" draw:layer="layout" svg:x1="52.5cm" svg:y1="57cm" svg:x2="52.5cm" svg:y2="56cm">
            <text:p/>
          </draw:line>
          <draw:frame draw:style-name="gr633" draw:text-style-name="P37" draw:layer="layout" svg:width="1.903cm" svg:height="0.569cm" svg:x="52.3cm" svg:y="56.2cm">
            <draw:text-box>
              <text:p><text:span text:style-name="T10">immSrcx_s</text:span></text:p>
            </draw:text-box>
          </draw:frame>
          <draw:frame draw:style-name="gr634" draw:text-style-name="P37" draw:layer="layout" svg:width="1.747cm" svg:height="0.569cm" svg:x="53.301cm" svg:y="54.832cm">
            <draw:text-box>
              <text:p><text:span text:style-name="T10">immExt_s</text:span></text:p>
            </draw:text-box>
          </draw:frame>
          <draw:frame draw:style-name="gr635" draw:text-style-name="P44" draw:layer="layout" svg:width="1.683cm" svg:height="0.569cm" svg:x="51.217cm" svg:y="54.331cm">
            <draw:text-box>
              <text:p><text:span text:style-name="T12">Imm-gen</text:span></text:p>
            </draw:text-box>
          </draw:frame>
          <draw:custom-shape draw:style-name="gr636" draw:text-style-name="P43" draw:layer="layout" svg:width="5.5cm" svg:height="3cm" svg:x="49.5cm" svg:y="54cm">
            <text:p/>
            <draw:enhanced-geometry svg:viewBox="0 0 21600 21600" draw:type="rectangle" draw:enhanced-path="M 0 0 L 21600 0 21600 21600 0 21600 0 0 Z N"/>
          </draw:custom-shape>
        </draw:g>
        <draw:line draw:style-name="gr38" draw:text-style-name="P4" draw:layer="layout" svg:x1="52.5cm" svg:y1="58cm" svg:x2="52.5cm" svg:y2="57cm">
          <text:p/>
        </draw:line>
        <draw:frame draw:style-name="gr756" draw:text-style-name="P37" draw:layer="layout" svg:width="2.14cm" svg:height="0.569cm" svg:x="50.504cm" svg:y="57.005cm">
          <draw:text-box>
            <text:p><text:span text:style-name="T10">id_immSrc_s</text:span></text:p>
          </draw:text-box>
        </draw:frame>
        <draw:line draw:style-name="gr38" draw:text-style-name="P4" draw:layer="layout" svg:x1="55cm" svg:y1="55.3cm" svg:x2="56cm" svg:y2="55.3cm">
          <text:p/>
        </draw:line>
        <draw:frame draw:style-name="gr756" draw:text-style-name="P37" draw:layer="layout" svg:width="2.123cm" svg:height="0.569cm" svg:x="54.804cm" svg:y="54.806cm">
          <draw:text-box>
            <text:p><text:span text:style-name="T10">id_immExt_s</text:span></text:p>
          </draw:text-box>
        </draw:frame>
        <draw:line draw:style-name="gr38" draw:text-style-name="P4" draw:layer="layout" svg:x1="48cm" svg:y1="55.3cm" svg:x2="49.5cm" svg:y2="55.3cm">
          <text:p/>
        </draw:line>
        <draw:frame draw:style-name="gr756" draw:text-style-name="P37" draw:layer="layout" svg:width="1.967cm" svg:height="0.569cm" svg:x="47.705cm" svg:y="54.807cm">
          <draw:text-box>
            <text:p><text:span text:style-name="T10">if_id_instr_r</text:span></text:p>
          </draw:text-box>
        </draw:frame>
        <draw:g draw:style-name="gr1">
          <draw:g draw:style-name="gr1">
            <draw:custom-shape draw:style-name="gr805" draw:text-style-name="P36" draw:layer="layout" svg:width="2cm" svg:height="2cm" svg:x="14.998cm" svg:y="52cm">
              <text:p text:style-name="P35"><text:span text:style-name="T10">SRCA</text:span></text:p>
              <text:p text:style-name="P35"><text:span text:style-name="T10">Mux</text:span></text:p>
              <draw:enhanced-geometry svg:viewBox="0 0 21600 21600" draw:type="rectangle" draw:enhanced-path="M 0 0 L 21600 0 21600 21600 0 21600 0 0 Z N"/>
            </draw:custom-shape>
          </draw:g>
        </draw:g>
        <draw:frame draw:style-name="gr821" draw:text-style-name="P73" draw:layer="layout" svg:width="1.823cm" svg:height="0.569cm" svg:x="16.857cm" svg:y="52.1cm">
          <draw:text-box>
            <text:p text:style-name="P72"><text:span text:style-name="T23">ex_srcA_s</text:span></text:p>
          </draw:text-box>
        </draw:frame>
        <draw:line draw:style-name="gr38" draw:text-style-name="P4" draw:layer="layout" svg:x1="17.005cm" svg:y1="52.6cm" svg:x2="18.005cm" svg:y2="52.6cm">
          <text:p/>
        </draw:line>
        <draw:frame draw:style-name="gr809" draw:text-style-name="P75" draw:layer="layout" svg:width="1.967cm" svg:height="0.569cm" svg:x="13.155cm" svg:y="52.136cm">
          <draw:text-box>
            <text:p text:style-name="P74"><text:span text:style-name="T23">fwd_srcA_s</text:span></text:p>
          </draw:text-box>
        </draw:frame>
        <draw:line draw:style-name="gr38" draw:text-style-name="P4" draw:layer="layout" svg:x1="14.005cm" svg:y1="52.6cm" svg:x2="15.005cm" svg:y2="52.6cm">
          <text:p/>
        </draw:line>
        <draw:frame draw:style-name="gr809" draw:text-style-name="P75" draw:layer="layout" svg:width="1.886cm" svg:height="0.569cm" svg:x="13.236cm" svg:y="52.537cm">
          <draw:text-box>
            <text:p text:style-name="P74"><text:span text:style-name="T23">id_ex_pc_r</text:span></text:p>
          </draw:text-box>
        </draw:frame>
        <draw:line draw:style-name="gr38" draw:text-style-name="P4" draw:layer="layout" svg:x1="14.006cm" svg:y1="53.001cm" svg:x2="15.006cm" svg:y2="53.001cm">
          <text:p/>
        </draw:line>
        <draw:frame draw:style-name="gr822" draw:text-style-name="P75" draw:layer="layout" svg:width="0.679cm" svg:height="0.569cm" svg:x="14.443cm" svg:y="52.938cm">
          <draw:text-box>
            <text:p text:style-name="P74"><text:span text:style-name="T23">0</text:span></text:p>
          </draw:text-box>
        </draw:frame>
        <draw:frame draw:style-name="gr776" draw:text-style-name="P37" draw:layer="layout" svg:width="2.581cm" svg:height="0.569cm" svg:x="12.541cm" svg:y="53.338cm">
          <draw:text-box>
            <text:p><text:span text:style-name="T10">id_ex_aluSrcA_r</text:span></text:p>
          </draw:text-box>
        </draw:frame>
        <draw:line draw:style-name="gr38" draw:text-style-name="P4" draw:layer="layout" svg:x1="14.006cm" svg:y1="53.401cm" svg:x2="15.006cm" svg:y2="53.401cm">
          <text:p/>
        </draw:line>
        <draw:line draw:style-name="gr38" draw:text-style-name="P4" draw:layer="layout" svg:x1="14.006cm" svg:y1="53.801cm" svg:x2="15.006cm" svg:y2="53.801cm">
          <text:p/>
        </draw:line>
        <draw:g draw:style-name="gr1">
          <draw:g draw:style-name="gr1">
            <draw:custom-shape draw:style-name="gr800" draw:text-style-name="P36" draw:layer="layout" svg:width="2cm" svg:height="4cm" svg:x="14.999cm" svg:y="47cm">
              <text:p text:style-name="P35"><text:span text:style-name="T10">Fwd</text:span></text:p>
              <text:p text:style-name="P35"><text:span text:style-name="T10">rs2</text:span></text:p>
              <draw:enhanced-geometry svg:viewBox="0 0 21600 21600" draw:type="rectangle" draw:enhanced-path="M 0 0 L 21600 0 21600 21600 0 21600 0 0 Z N"/>
            </draw:custom-shape>
          </draw:g>
        </draw:g>
        <draw:frame draw:style-name="gr823" draw:text-style-name="P73" draw:layer="layout" svg:width="1.967cm" svg:height="0.569cm" svg:x="16.858cm" svg:y="47.1cm">
          <draw:text-box>
            <text:p text:style-name="P72"><text:span text:style-name="T23">fwd_srcB_s</text:span></text:p>
          </draw:text-box>
        </draw:frame>
        <draw:line draw:style-name="gr38" draw:text-style-name="P4" draw:layer="layout" svg:x1="17.006cm" svg:y1="47.6cm" svg:x2="18.006cm" svg:y2="47.6cm">
          <text:p/>
        </draw:line>
        <draw:frame draw:style-name="gr809" draw:text-style-name="P75" draw:layer="layout" svg:width="1.649cm" svg:height="0.569cm" svg:x="13.345cm" svg:y="47.136cm">
          <draw:text-box>
            <text:p text:style-name="P74"><text:span text:style-name="T23">ex_rs2_s</text:span></text:p>
          </draw:text-box>
        </draw:frame>
        <draw:line draw:style-name="gr38" draw:text-style-name="P4" draw:layer="layout" svg:x1="14.006cm" svg:y1="47.6cm" svg:x2="15.006cm" svg:y2="47.6cm">
          <text:p/>
        </draw:line>
        <draw:frame draw:style-name="gr809" draw:text-style-name="P75" draw:layer="layout" svg:width="1.84cm" svg:height="0.569cm" svg:x="13.154cm" svg:y="47.537cm">
          <draw:text-box>
            <text:p text:style-name="P74"><text:span text:style-name="T23">mem_rd_s</text:span></text:p>
          </draw:text-box>
        </draw:frame>
        <draw:line draw:style-name="gr38" draw:text-style-name="P4" draw:layer="layout" svg:x1="14.007cm" svg:y1="48.001cm" svg:x2="15.007cm" svg:y2="48.001cm">
          <text:p/>
        </draw:line>
        <draw:frame draw:style-name="gr822" draw:text-style-name="P75" draw:layer="layout" svg:width="1.573cm" svg:height="0.569cm" svg:x="13.421cm" svg:y="47.938cm">
          <draw:text-box>
            <text:p text:style-name="P74"><text:span text:style-name="T23">wb_rd_s</text:span></text:p>
          </draw:text-box>
        </draw:frame>
        <draw:frame draw:style-name="gr776" draw:text-style-name="P37" draw:layer="layout" svg:width="2.737cm" svg:height="0.569cm" svg:x="12.257cm" svg:y="48.338cm">
          <draw:text-box>
            <text:p><text:span text:style-name="T10">ex_mem_result_s</text:span></text:p>
          </draw:text-box>
        </draw:frame>
        <draw:line draw:style-name="gr38" draw:text-style-name="P4" draw:layer="layout" svg:x1="14.007cm" svg:y1="48.401cm" svg:x2="15.007cm" svg:y2="48.401cm">
          <text:p/>
        </draw:line>
        <draw:line draw:style-name="gr38" draw:text-style-name="P4" draw:layer="layout" svg:x1="14.007cm" svg:y1="48.801cm" svg:x2="15.007cm" svg:y2="48.801cm">
          <text:p/>
        </draw:line>
        <draw:frame draw:style-name="gr776" draw:text-style-name="P37" draw:layer="layout" svg:width="2.013cm" svg:height="0.569cm" svg:x="12.981cm" svg:y="48.739cm">
          <draw:text-box>
            <text:p><text:span text:style-name="T10">wb_result_s</text:span></text:p>
          </draw:text-box>
        </draw:frame>
        <draw:frame draw:style-name="gr776" draw:text-style-name="P37" draw:layer="layout" svg:width="2.187cm" svg:height="0.569cm" svg:x="12.807cm" svg:y="49.14cm">
          <draw:text-box>
            <text:p><text:span text:style-name="T10">id_ex_regB_r</text:span></text:p>
          </draw:text-box>
        </draw:frame>
        <draw:frame draw:style-name="gr776" draw:text-style-name="P37" draw:layer="layout" svg:width="2.826cm" svg:height="0.569cm" svg:x="12.168cm" svg:y="49.541cm">
          <draw:text-box>
            <text:p><text:span text:style-name="T10">mem_wb_regWr_</text:span><text:span text:style-name="T10">r</text:span></text:p>
          </draw:text-box>
        </draw:frame>
        <draw:frame draw:style-name="gr776" draw:text-style-name="P37" draw:layer="layout" svg:width="2.763cm" svg:height="0.569cm" svg:x="12.231cm" svg:y="49.942cm">
          <draw:text-box>
            <text:p><text:span text:style-name="T10">ex_mem_regWr_</text:span><text:span text:style-name="T10">r</text:span></text:p>
          </draw:text-box>
        </draw:frame>
        <draw:frame draw:style-name="gr776" draw:text-style-name="P37" draw:layer="layout" svg:width="3.148cm" svg:height="0.569cm" svg:x="11.846cm" svg:y="50.343cm">
          <draw:text-box>
            <text:p><text:span text:style-name="T10">ex_mem_dMemR</text:span><text:span text:style-name="T10">d_r</text:span></text:p>
          </draw:text-box>
        </draw:frame>
        <draw:line draw:style-name="gr38" draw:text-style-name="P4" draw:layer="layout" svg:x1="14.007cm" svg:y1="49.201cm" svg:x2="15.007cm" svg:y2="49.201cm">
          <text:p/>
        </draw:line>
        <draw:line draw:style-name="gr38" draw:text-style-name="P4" draw:layer="layout" svg:x1="14.008cm" svg:y1="49.602cm" svg:x2="15.008cm" svg:y2="49.602cm">
          <text:p/>
        </draw:line>
        <draw:line draw:style-name="gr38" draw:text-style-name="P4" draw:layer="layout" svg:x1="14.008cm" svg:y1="50.002cm" svg:x2="15.008cm" svg:y2="50.002cm">
          <text:p/>
        </draw:line>
        <draw:line draw:style-name="gr38" draw:text-style-name="P4" draw:layer="layout" svg:x1="14.008cm" svg:y1="50.402cm" svg:x2="15.008cm" svg:y2="50.402cm">
          <text:p/>
        </draw:line>
        <draw:line draw:style-name="gr38" draw:text-style-name="P4" draw:layer="layout" svg:x1="14.008cm" svg:y1="50.802cm" svg:x2="15.008cm" svg:y2="50.802cm">
          <text:p/>
        </draw:line>
        <draw:g draw:style-name="gr1">
          <draw:g draw:style-name="gr1">
            <draw:custom-shape draw:style-name="gr800" draw:text-style-name="P36" draw:layer="layout" svg:width="2cm" svg:height="4cm" svg:x="15cm" svg:y="42cm">
              <text:p text:style-name="P35"><text:span text:style-name="T10">Fwd</text:span></text:p>
              <text:p text:style-name="P35"><text:span text:style-name="T10">rs1</text:span></text:p>
              <draw:enhanced-geometry svg:viewBox="0 0 21600 21600" draw:type="rectangle" draw:enhanced-path="M 0 0 L 21600 0 21600 21600 0 21600 0 0 Z N"/>
            </draw:custom-shape>
          </draw:g>
        </draw:g>
        <draw:frame draw:style-name="gr824" draw:text-style-name="P73" draw:layer="layout" svg:width="1.967cm" svg:height="0.569cm" svg:x="16.859cm" svg:y="42.1cm">
          <draw:text-box>
            <text:p text:style-name="P72"><text:span text:style-name="T23">fwd_srcA_s</text:span></text:p>
          </draw:text-box>
        </draw:frame>
        <draw:line draw:style-name="gr38" draw:text-style-name="P4" draw:layer="layout" svg:x1="17.007cm" svg:y1="42.6cm" svg:x2="18.007cm" svg:y2="42.6cm">
          <text:p/>
        </draw:line>
        <draw:frame draw:style-name="gr809" draw:text-style-name="P75" draw:layer="layout" svg:width="1.649cm" svg:height="0.569cm" svg:x="13.346cm" svg:y="42.136cm">
          <draw:text-box>
            <text:p text:style-name="P74"><text:span text:style-name="T23">ex_rs1_s</text:span></text:p>
          </draw:text-box>
        </draw:frame>
        <draw:line draw:style-name="gr38" draw:text-style-name="P4" draw:layer="layout" svg:x1="14.007cm" svg:y1="42.6cm" svg:x2="15.007cm" svg:y2="42.6cm">
          <text:p/>
        </draw:line>
        <draw:frame draw:style-name="gr809" draw:text-style-name="P75" draw:layer="layout" svg:width="1.84cm" svg:height="0.569cm" svg:x="13.155cm" svg:y="42.537cm">
          <draw:text-box>
            <text:p text:style-name="P74"><text:span text:style-name="T23">mem_rd_s</text:span></text:p>
          </draw:text-box>
        </draw:frame>
        <draw:line draw:style-name="gr38" draw:text-style-name="P4" draw:layer="layout" svg:x1="14.008cm" svg:y1="43.001cm" svg:x2="15.008cm" svg:y2="43.001cm">
          <text:p/>
        </draw:line>
        <draw:frame draw:style-name="gr822" draw:text-style-name="P75" draw:layer="layout" svg:width="1.573cm" svg:height="0.569cm" svg:x="13.422cm" svg:y="42.938cm">
          <draw:text-box>
            <text:p text:style-name="P74"><text:span text:style-name="T23">wb_rd_s</text:span></text:p>
          </draw:text-box>
        </draw:frame>
        <draw:frame draw:style-name="gr776" draw:text-style-name="P37" draw:layer="layout" svg:width="2.737cm" svg:height="0.569cm" svg:x="12.258cm" svg:y="43.338cm">
          <draw:text-box>
            <text:p><text:span text:style-name="T10">ex_mem_result_s</text:span></text:p>
          </draw:text-box>
        </draw:frame>
        <draw:line draw:style-name="gr38" draw:text-style-name="P4" draw:layer="layout" svg:x1="14.008cm" svg:y1="43.401cm" svg:x2="15.008cm" svg:y2="43.401cm">
          <text:p/>
        </draw:line>
        <draw:line draw:style-name="gr38" draw:text-style-name="P4" draw:layer="layout" svg:x1="14.008cm" svg:y1="43.801cm" svg:x2="15.008cm" svg:y2="43.801cm">
          <text:p/>
        </draw:line>
        <draw:frame draw:style-name="gr776" draw:text-style-name="P37" draw:layer="layout" svg:width="2.013cm" svg:height="0.569cm" svg:x="12.982cm" svg:y="43.739cm">
          <draw:text-box>
            <text:p><text:span text:style-name="T10">wb_result_s</text:span></text:p>
          </draw:text-box>
        </draw:frame>
        <draw:frame draw:style-name="gr776" draw:text-style-name="P37" draw:layer="layout" svg:width="2.187cm" svg:height="0.569cm" svg:x="12.808cm" svg:y="44.14cm">
          <draw:text-box>
            <text:p><text:span text:style-name="T10">id_ex_regA_r</text:span></text:p>
          </draw:text-box>
        </draw:frame>
        <draw:frame draw:style-name="gr776" draw:text-style-name="P37" draw:layer="layout" svg:width="2.826cm" svg:height="0.569cm" svg:x="12.169cm" svg:y="44.541cm">
          <draw:text-box>
            <text:p><text:span text:style-name="T10">mem_wb_regWr_</text:span><text:span text:style-name="T10">r</text:span></text:p>
          </draw:text-box>
        </draw:frame>
        <draw:frame draw:style-name="gr776" draw:text-style-name="P37" draw:layer="layout" svg:width="2.763cm" svg:height="0.569cm" svg:x="12.232cm" svg:y="44.942cm">
          <draw:text-box>
            <text:p><text:span text:style-name="T10">ex_mem_regWr_</text:span><text:span text:style-name="T10">r</text:span></text:p>
          </draw:text-box>
        </draw:frame>
        <draw:frame draw:style-name="gr776" draw:text-style-name="P37" draw:layer="layout" svg:width="3.148cm" svg:height="0.569cm" svg:x="11.847cm" svg:y="45.343cm">
          <draw:text-box>
            <text:p><text:span text:style-name="T10">ex_mem_dMemR</text:span><text:span text:style-name="T10">d_r</text:span></text:p>
          </draw:text-box>
        </draw:frame>
        <draw:line draw:style-name="gr38" draw:text-style-name="P4" draw:layer="layout" svg:x1="14.008cm" svg:y1="44.201cm" svg:x2="15.008cm" svg:y2="44.201cm">
          <text:p/>
        </draw:line>
        <draw:line draw:style-name="gr38" draw:text-style-name="P4" draw:layer="layout" svg:x1="14.009cm" svg:y1="44.602cm" svg:x2="15.009cm" svg:y2="44.602cm">
          <text:p/>
        </draw:line>
        <draw:line draw:style-name="gr38" draw:text-style-name="P4" draw:layer="layout" svg:x1="14.009cm" svg:y1="45.002cm" svg:x2="15.009cm" svg:y2="45.002cm">
          <text:p/>
        </draw:line>
        <draw:line draw:style-name="gr38" draw:text-style-name="P4" draw:layer="layout" svg:x1="14.009cm" svg:y1="45.402cm" svg:x2="15.009cm" svg:y2="45.402cm">
          <text:p/>
        </draw:line>
        <draw:line draw:style-name="gr38" draw:text-style-name="P4" draw:layer="layout" svg:x1="14.009cm" svg:y1="45.802cm" svg:x2="15.009cm" svg:y2="45.802cm">
          <text:p/>
        </draw:line>
        <draw:g draw:style-name="gr1">
          <draw:g draw:style-name="gr1">
            <draw:custom-shape draw:style-name="gr800" draw:text-style-name="P36" draw:layer="layout" svg:width="2cm" svg:height="4cm" svg:x="15.001cm" svg:y="37cm">
              <text:p text:style-name="P35"><text:span text:style-name="T10">Stall</text:span></text:p>
              <draw:enhanced-geometry svg:viewBox="0 0 21600 21600" draw:type="rectangle" draw:enhanced-path="M 0 0 L 21600 0 21600 21600 0 21600 0 0 Z N"/>
            </draw:custom-shape>
          </draw:g>
        </draw:g>
        <draw:frame draw:style-name="gr825" draw:text-style-name="P73" draw:layer="layout" svg:width="2.013cm" svg:height="0.569cm" svg:x="16.86cm" svg:y="37.1cm">
          <draw:text-box>
            <text:p text:style-name="P72"><text:span text:style-name="T23">data_stall_s</text:span></text:p>
          </draw:text-box>
        </draw:frame>
        <draw:line draw:style-name="gr38" draw:text-style-name="P4" draw:layer="layout" svg:x1="17.008cm" svg:y1="37.6cm" svg:x2="18.008cm" svg:y2="37.6cm">
          <text:p/>
        </draw:line>
        <draw:frame draw:style-name="gr809" draw:text-style-name="P75" draw:layer="layout" svg:width="1.353cm" svg:height="0.569cm" svg:x="13.776cm" svg:y="37.136cm">
          <draw:text-box>
            <text:p text:style-name="P74"><text:span text:style-name="T23">ex_r_s</text:span></text:p>
          </draw:text-box>
        </draw:frame>
        <draw:line draw:style-name="gr38" draw:text-style-name="P4" draw:layer="layout" svg:x1="14.008cm" svg:y1="37.6cm" svg:x2="15.008cm" svg:y2="37.6cm">
          <text:p/>
        </draw:line>
        <draw:frame draw:style-name="gr809" draw:text-style-name="P75" draw:layer="layout" svg:width="1.573cm" svg:height="0.569cm" svg:x="13.556cm" svg:y="37.537cm">
          <draw:text-box>
            <text:p text:style-name="P74"><text:span text:style-name="T23">id_rs1_s</text:span></text:p>
          </draw:text-box>
        </draw:frame>
        <draw:line draw:style-name="gr38" draw:text-style-name="P4" draw:layer="layout" svg:x1="14.009cm" svg:y1="38.001cm" svg:x2="15.009cm" svg:y2="38.001cm">
          <text:p/>
        </draw:line>
        <draw:frame draw:style-name="gr826" draw:text-style-name="P75" draw:layer="layout" svg:width="1.573cm" svg:height="0.569cm" svg:x="13.556cm" svg:y="37.938cm">
          <draw:text-box>
            <text:p text:style-name="P74"><text:span text:style-name="T23">id_rs2_s</text:span></text:p>
          </draw:text-box>
        </draw:frame>
        <draw:frame draw:style-name="gr776" draw:text-style-name="P37" draw:layer="layout" svg:width="2cm" svg:height="0.569cm" svg:x="13.129cm" svg:y="38.338cm">
          <draw:text-box>
            <text:p><text:span text:style-name="T10">id_is_csr_s</text:span></text:p>
          </draw:text-box>
        </draw:frame>
        <draw:line draw:style-name="gr38" draw:text-style-name="P4" draw:layer="layout" svg:x1="14.009cm" svg:y1="38.401cm" svg:x2="15.009cm" svg:y2="38.401cm">
          <text:p/>
        </draw:line>
        <draw:line draw:style-name="gr38" draw:text-style-name="P4" draw:layer="layout" svg:x1="14.009cm" svg:y1="38.801cm" svg:x2="15.009cm" svg:y2="38.801cm">
          <text:p/>
        </draw:line>
        <draw:frame draw:style-name="gr776" draw:text-style-name="P37" draw:layer="layout" svg:width="2cm" svg:height="0.569cm" svg:x="13.129cm" svg:y="38.739cm">
          <draw:text-box>
            <text:p><text:span text:style-name="T10">ex_is_csr_s</text:span></text:p>
          </draw:text-box>
        </draw:frame>
        <draw:frame draw:style-name="gr776" draw:text-style-name="P37" draw:layer="layout" svg:width="2.327cm" svg:height="0.569cm" svg:x="12.802cm" svg:y="39.14cm">
          <draw:text-box>
            <text:p><text:span text:style-name="T10">mem_is_csr_s</text:span></text:p>
          </draw:text-box>
        </draw:frame>
        <draw:frame draw:style-name="gr776" draw:text-style-name="P37" draw:layer="layout" svg:width="2.06cm" svg:height="0.569cm" svg:x="13.069cm" svg:y="39.541cm">
          <draw:text-box>
            <text:p><text:span text:style-name="T10">wb_is_csr_s</text:span></text:p>
          </draw:text-box>
        </draw:frame>
        <draw:frame draw:style-name="gr776" draw:text-style-name="P37" draw:layer="layout" svg:width="2.013cm" svg:height="0.569cm" svg:x="13.116cm" svg:y="39.943cm">
          <draw:text-box>
            <text:p><text:span text:style-name="T10">if_id_valid_r</text:span></text:p>
          </draw:text-box>
        </draw:frame>
        <draw:line draw:style-name="gr38" draw:text-style-name="P4" draw:layer="layout" svg:x1="14.009cm" svg:y1="39.201cm" svg:x2="15.009cm" svg:y2="39.201cm">
          <text:p/>
        </draw:line>
        <draw:line draw:style-name="gr38" draw:text-style-name="P4" draw:layer="layout" svg:x1="14.01cm" svg:y1="39.602cm" svg:x2="15.01cm" svg:y2="39.602cm">
          <text:p/>
        </draw:line>
        <draw:line draw:style-name="gr38" draw:text-style-name="P4" draw:layer="layout" svg:x1="14.01cm" svg:y1="40.002cm" svg:x2="15.01cm" svg:y2="40.002cm">
          <text:p/>
        </draw:line>
        <draw:line draw:style-name="gr38" draw:text-style-name="P4" draw:layer="layout" svg:x1="14.01cm" svg:y1="40.402cm" svg:x2="15.01cm" svg:y2="40.402cm">
          <text:p/>
        </draw:line>
        <draw:polygon draw:style-name="gr58" draw:text-style-name="P1" draw:layer="layout" svg:width="0.499cm" svg:height="1.399cm" svg:x="15cm" svg:y="55.8cm" svg:viewBox="0 0 500 1400" draw:points="0,0 0,1400 500,1051 500,351">
          <text:p/>
        </draw:polygon>
        <draw:line draw:style-name="gr146" draw:text-style-name="P4" draw:layer="layout" svg:x1="15.3cm" svg:y1="57.601cm" svg:x2="15.3cm" svg:y2="57.001cm">
          <text:p/>
        </draw:line>
        <draw:frame draw:style-name="gr827" draw:text-style-name="P73" draw:layer="layout" svg:width="3.118cm" svg:height="0.569cm" svg:x="14.41cm" svg:y="57.501cm">
          <draw:text-box>
            <text:p text:style-name="P72"><text:span text:style-name="T23">ex_mem_resultSr</text:span><text:span text:style-name="T23">c_r</text:span></text:p>
          </draw:text-box>
        </draw:frame>
        <draw:line draw:style-name="gr38" draw:text-style-name="P4" draw:layer="layout" svg:x1="14cm" svg:y1="56.301cm" svg:x2="15cm" svg:y2="56.301cm">
          <text:p/>
        </draw:line>
        <draw:line draw:style-name="gr38" draw:text-style-name="P4" draw:layer="layout" svg:x1="14cm" svg:y1="56.701cm" svg:x2="15cm" svg:y2="56.701cm">
          <text:p/>
        </draw:line>
        <draw:line draw:style-name="gr38" draw:text-style-name="P4" draw:layer="layout" svg:x1="15.5cm" svg:y1="56.501cm" svg:x2="17cm" svg:y2="56.501cm">
          <text:p/>
        </draw:line>
        <draw:frame draw:style-name="gr828" draw:text-style-name="P73" draw:layer="layout" svg:width="2.737cm" svg:height="0.569cm" svg:x="15.3cm" svg:y="56.001cm">
          <draw:text-box>
            <text:p text:style-name="P72"><text:span text:style-name="T23">ex_mem_result_s</text:span></text:p>
          </draw:text-box>
        </draw:frame>
        <draw:frame draw:style-name="gr809" draw:text-style-name="P75" draw:layer="layout" svg:width="2.78cm" svg:height="0.569cm" svg:x="12.473cm" svg:y="55.841cm">
          <draw:text-box>
            <text:p text:style-name="P74"><text:span text:style-name="T23">ex_mem_pc_r + </text:span><text:span text:style-name="T23">4</text:span></text:p>
          </draw:text-box>
        </draw:frame>
        <draw:frame draw:style-name="gr829" draw:text-style-name="P75" draw:layer="layout" svg:width="3.182cm" svg:height="0.569cm" svg:x="11.971cm" svg:y="56.242cm">
          <draw:text-box>
            <text:p text:style-name="P74"><text:span text:style-name="T23">ex_mem_csr_rda</text:span><text:span text:style-name="T23">ta_r</text:span></text:p>
          </draw:text-box>
        </draw:frame>
        <draw:frame draw:style-name="gr830" draw:text-style-name="P75" draw:layer="layout" svg:width="2.881cm" svg:height="0.569cm" svg:x="12.168cm" svg:y="56.643cm">
          <draw:text-box>
            <text:p text:style-name="P74"><text:span text:style-name="T23">ex_mem_aluRes</text:span><text:span text:style-name="T23">_r</text:span></text:p>
          </draw:text-box>
        </draw:frame>
        <draw:line draw:style-name="gr38" draw:text-style-name="P4" draw:layer="layout" svg:x1="14cm" svg:y1="57.101cm" svg:x2="15cm" svg:y2="57.101cm">
          <text:p/>
        </draw:line>
        <draw:polygon draw:style-name="gr58" draw:text-style-name="P1" draw:layer="layout" svg:width="0.499cm" svg:height="0.999cm" svg:x="25cm" svg:y="55.001cm" svg:viewBox="0 0 500 1000" draw:points="0,0 0,1000 500,850 500,150">
          <text:p/>
        </draw:polygon>
        <draw:line draw:style-name="gr146" draw:text-style-name="P4" draw:layer="layout" svg:x1="25.3cm" svg:y1="56.501cm" svg:x2="25.3cm" svg:y2="55.901cm">
          <text:p/>
        </draw:line>
        <draw:frame draw:style-name="gr831" draw:text-style-name="P73" draw:layer="layout" svg:width="2.581cm" svg:height="0.569cm" svg:x="24.41cm" svg:y="56.401cm">
          <draw:text-box>
            <text:p text:style-name="P72"><text:span text:style-name="T23">id_ex_aluSrcB_r</text:span></text:p>
          </draw:text-box>
        </draw:frame>
        <draw:line draw:style-name="gr38" draw:text-style-name="P4" draw:layer="layout" svg:x1="24cm" svg:y1="55.301cm" svg:x2="25cm" svg:y2="55.301cm">
          <text:p/>
        </draw:line>
        <draw:line draw:style-name="gr38" draw:text-style-name="P4" draw:layer="layout" svg:x1="24cm" svg:y1="55.701cm" svg:x2="25cm" svg:y2="55.701cm">
          <text:p/>
        </draw:line>
        <draw:line draw:style-name="gr38" draw:text-style-name="P4" draw:layer="layout" svg:x1="25.5cm" svg:y1="55.501cm" svg:x2="27cm" svg:y2="55.501cm">
          <text:p/>
        </draw:line>
        <draw:frame draw:style-name="gr832" draw:text-style-name="P73" draw:layer="layout" svg:width="1.823cm" svg:height="0.569cm" svg:x="25.3cm" svg:y="55.001cm">
          <draw:text-box>
            <text:p text:style-name="P72"><text:span text:style-name="T23">ex_srcB_s</text:span></text:p>
          </draw:text-box>
        </draw:frame>
        <draw:frame draw:style-name="gr833" draw:text-style-name="P75" draw:layer="layout" svg:width="1.967cm" svg:height="0.569cm" svg:x="23.173cm" svg:y="54.841cm">
          <draw:text-box>
            <text:p text:style-name="P74"><text:span text:style-name="T23">fwd_srcB_s</text:span></text:p>
          </draw:text-box>
        </draw:frame>
        <draw:frame draw:style-name="gr834" draw:text-style-name="P75" draw:layer="layout" svg:width="2.534cm" svg:height="0.569cm" svg:x="22.606cm" svg:y="55.242cm">
          <draw:text-box>
            <text:p text:style-name="P74"><text:span text:style-name="T23">id_ex_immExt_r</text:span></text:p>
          </draw:text-box>
        </draw:frame>
        <draw:polygon draw:style-name="gr58" draw:text-style-name="P1" draw:layer="layout" svg:width="0.499cm" svg:height="0.999cm" svg:x="25.001cm" svg:y="52.002cm" svg:viewBox="0 0 500 1000" draw:points="0,0 0,1000 500,850 500,150">
          <text:p/>
        </draw:polygon>
        <draw:line draw:style-name="gr146" draw:text-style-name="P4" draw:layer="layout" svg:x1="25.301cm" svg:y1="53.502cm" svg:x2="25.301cm" svg:y2="52.902cm">
          <text:p/>
        </draw:line>
        <draw:frame draw:style-name="gr835" draw:text-style-name="P73" draw:layer="layout" svg:width="2.204cm" svg:height="0.569cm" svg:x="24.411cm" svg:y="53.402cm">
          <draw:text-box>
            <text:p text:style-name="P72"><text:span text:style-name="T23">id_ex_jump_r</text:span></text:p>
          </draw:text-box>
        </draw:frame>
        <draw:line draw:style-name="gr38" draw:text-style-name="P4" draw:layer="layout" svg:x1="24.001cm" svg:y1="52.302cm" svg:x2="25.001cm" svg:y2="52.302cm">
          <text:p/>
        </draw:line>
        <draw:line draw:style-name="gr38" draw:text-style-name="P4" draw:layer="layout" svg:x1="24.001cm" svg:y1="52.702cm" svg:x2="25.001cm" svg:y2="52.702cm">
          <text:p/>
        </draw:line>
        <draw:line draw:style-name="gr38" draw:text-style-name="P4" draw:layer="layout" svg:x1="25.501cm" svg:y1="52.502cm" svg:x2="27.001cm" svg:y2="52.502cm">
          <text:p/>
        </draw:line>
        <draw:frame draw:style-name="gr836" draw:text-style-name="P73" draw:layer="layout" svg:width="2.454cm" svg:height="0.569cm" svg:x="25.301cm" svg:y="52.002cm">
          <draw:text-box>
            <text:p text:style-name="P72"><text:span text:style-name="T23">ex_PCorRS1_s</text:span></text:p>
          </draw:text-box>
        </draw:frame>
        <draw:frame draw:style-name="gr833" draw:text-style-name="P75" draw:layer="layout" svg:width="1.967cm" svg:height="0.569cm" svg:x="23.174cm" svg:y="52.242cm">
          <draw:text-box>
            <text:p text:style-name="P74"><text:span text:style-name="T23">fwd_srcA_s</text:span></text:p>
          </draw:text-box>
        </draw:frame>
        <draw:frame draw:style-name="gr679" draw:text-style-name="P75" draw:layer="layout" svg:width="1.886cm" svg:height="0.569cm" svg:x="23.255cm" svg:y="51.843cm">
          <draw:text-box>
            <text:p text:style-name="P74"><text:span text:style-name="T23">id_ex_pc_r</text:span></text:p>
          </draw:text-box>
        </draw:frame>
        <draw:custom-shape draw:style-name="gr688" draw:text-style-name="P59" draw:layer="layout" svg:width="1cm" svg:height="1cm" svg:x="25cm" svg:y="49cm">
          <text:p text:style-name="P35"><text:span text:style-name="T10">+</text:span></text:p>
          <draw:enhanced-geometry svg:viewBox="0 0 21600 21600" draw:type="rectangle" draw:enhanced-path="M 0 0 L 21600 0 21600 21600 0 21600 0 0 Z N"/>
        </draw:custom-shape>
        <draw:line draw:style-name="gr38" draw:text-style-name="P4" draw:layer="layout" svg:x1="26cm" svg:y1="49.5cm" svg:x2="27cm" svg:y2="49.5cm">
          <text:p/>
        </draw:line>
        <draw:line draw:style-name="gr38" draw:text-style-name="P4" draw:layer="layout" svg:x1="24cm" svg:y1="49.3cm" svg:x2="25cm" svg:y2="49.3cm">
          <text:p/>
        </draw:line>
        <draw:line draw:style-name="gr38" draw:text-style-name="P4" draw:layer="layout" svg:x1="24cm" svg:y1="49.7cm" svg:x2="25cm" svg:y2="49.7cm">
          <text:p/>
        </draw:line>
        <draw:frame draw:style-name="gr837" draw:text-style-name="P73" draw:layer="layout" svg:width="1.903cm" svg:height="0.569cm" svg:x="25.801cm" svg:y="49.003cm">
          <draw:text-box>
            <text:p text:style-name="P72"><text:span text:style-name="T23">ex_PCbr_s</text:span></text:p>
          </draw:text-box>
        </draw:frame>
        <draw:frame draw:style-name="gr838" draw:text-style-name="P73" draw:layer="layout" svg:width="2.454cm" svg:height="0.569cm" svg:x="22.686cm" svg:y="48.803cm">
          <draw:text-box>
            <text:p text:style-name="P72"><text:span text:style-name="T23">ex_PCorRS1_s</text:span></text:p>
          </draw:text-box>
        </draw:frame>
        <draw:frame draw:style-name="gr834" draw:text-style-name="P75" draw:layer="layout" svg:width="2.534cm" svg:height="0.569cm" svg:x="22.606cm" svg:y="49.243cm">
          <draw:text-box>
            <text:p text:style-name="P74"><text:span text:style-name="T23">id_ex_immExt_r</text:span></text:p>
          </draw:text-box>
        </draw:frame>
        <draw:line draw:style-name="gr38" draw:text-style-name="P4" draw:layer="layout" svg:x1="24cm" svg:y1="47cm" svg:x2="26cm" svg:y2="47cm">
          <text:p/>
        </draw:line>
        <draw:frame draw:style-name="gr839" draw:text-style-name="P73" draw:layer="layout" svg:width="3.533cm" svg:height="0.569cm" svg:x="22.686cm" svg:y="46.504cm">
          <draw:text-box>
            <text:p text:style-name="P72"><text:span text:style-name="T23">rf_rdata1_s = </text:span><text:span text:style-name="T23">id_regA_s</text:span></text:p>
          </draw:text-box>
        </draw:frame>
        <draw:line draw:style-name="gr38" draw:text-style-name="P4" draw:layer="layout" svg:x1="24.001cm" svg:y1="46.001cm" svg:x2="26.001cm" svg:y2="46.001cm">
          <text:p/>
        </draw:line>
        <draw:frame draw:style-name="gr840" draw:text-style-name="P73" draw:layer="layout" svg:width="3.533cm" svg:height="0.569cm" svg:x="22.687cm" svg:y="45.505cm">
          <draw:text-box>
            <text:p text:style-name="P72"><text:span text:style-name="T23">rf_rdata2_s = </text:span><text:span text:style-name="T23">id_regB_s</text:span></text:p>
          </draw:text-box>
        </draw:frame>
        <draw:g draw:style-name="gr1">
          <draw:g draw:style-name="gr66">
            <draw:glue-point draw:id="4" svg:x="-5cm" svg:y="-2.5cm"/>
            <draw:glue-point draw:id="5" svg:x="-5cm" svg:y="2.5cm"/>
            <draw:rect draw:style-name="gr841" draw:text-style-name="P45" draw:layer="layout" svg:width="1cm" svg:height="1cm" svg:x="27.006cm" svg:y="44.022cm">
              <text:p text:style-name="P15"><text:span text:style-name="T11">&amp;</text:span></text:p>
            </draw:rect>
            <draw:line draw:style-name="gr842" draw:text-style-name="P17" draw:layer="layout" svg:x1="26.506cm" svg:y1="44.272cm" svg:x2="27.006cm" svg:y2="44.272cm">
              <text:p/>
            </draw:line>
            <draw:line draw:style-name="gr843" draw:text-style-name="P17" draw:layer="layout" svg:x1="26.506cm" svg:y1="44.772cm" svg:x2="27.006cm" svg:y2="44.772cm">
              <text:p/>
            </draw:line>
            <draw:line draw:style-name="gr844" draw:text-style-name="P17" draw:layer="layout" svg:x1="28.006cm" svg:y1="44.522cm" svg:x2="28.506cm" svg:y2="44.522cm">
              <text:p/>
            </draw:line>
            <draw:line draw:style-name="gr845" draw:text-style-name="P21" draw:layer="layout" svg:x1="26.506cm" svg:y1="44.522cm" svg:x2="27.006cm" svg:y2="44.522cm">
              <text:p/>
            </draw:line>
          </draw:g>
          <draw:g draw:style-name="gr66">
            <draw:rect draw:style-name="gr846" draw:text-style-name="P16" draw:layer="layout" svg:width="1cm" svg:height="1cm" svg:x="25.004cm" svg:y="43.012cm">
              <text:p text:style-name="P15"><text:span text:style-name="T5">1</text:span></text:p>
            </draw:rect>
            <draw:line draw:style-name="gr847" draw:text-style-name="P17" draw:layer="layout" svg:x1="24.504cm" svg:y1="43.512cm" svg:x2="25.004cm" svg:y2="43.512cm">
              <text:p/>
            </draw:line>
            <draw:circle draw:style-name="gr848" draw:text-style-name="P21" draw:layer="layout" svg:width="0.125cm" svg:height="0.126cm" svg:x="26.004cm" svg:y="43.449cm">
              <text:p/>
            </draw:circle>
            <draw:line draw:style-name="gr849" draw:text-style-name="P21" draw:layer="layout" svg:x1="26.129cm" svg:y1="43.512cm" svg:x2="26.504cm" svg:y2="43.512cm">
              <text:p/>
            </draw:line>
          </draw:g>
          <draw:frame draw:style-name="gr850" draw:text-style-name="P73" draw:layer="layout" svg:width="2.767cm" svg:height="0.569cm" svg:x="27.802cm" svg:y="44.004cm">
            <draw:text-box>
              <text:p text:style-name="P72"><text:span text:style-name="T23">wb_regWr_final_</text:span><text:span text:style-name="T23">s</text:span></text:p>
            </draw:text-box>
          </draw:frame>
          <draw:frame draw:style-name="gr851" draw:text-style-name="P73" draw:layer="layout" svg:width="2.826cm" svg:height="0.569cm" svg:x="23.8cm" svg:y="44.531cm">
            <draw:text-box>
              <text:p text:style-name="P72"><text:span text:style-name="T23">mem_wb_regWr_</text:span><text:span text:style-name="T23">r</text:span></text:p>
            </draw:text-box>
          </draw:frame>
          <draw:frame draw:style-name="gr852" draw:text-style-name="P66" draw:layer="layout" svg:width="2.233cm" svg:height="0.569cm" svg:x="24.4cm" svg:y="44.132cm">
            <draw:text-box>
              <text:p text:style-name="P65"><text:span text:style-name="T19">wb_commit_s</text:span></text:p>
            </draw:text-box>
          </draw:frame>
          <draw:frame draw:style-name="gr853" draw:text-style-name="P66" draw:layer="layout" svg:width="2.661cm" svg:height="0.569cm" svg:x="22.501cm" svg:y="43.033cm">
            <draw:text-box>
              <text:p text:style-name="P65"><text:span text:style-name="T19">wb_trap_taken_s</text:span></text:p>
            </draw:text-box>
          </draw:frame>
          <draw:line draw:style-name="gr38" draw:text-style-name="P4" draw:layer="layout" svg:x1="25.5cm" svg:y1="44.6cm" svg:x2="26.5cm" svg:y2="44.6cm">
            <text:p/>
          </draw:line>
          <draw:line draw:style-name="gr38" draw:text-style-name="P4" draw:layer="layout" svg:x1="25.5cm" svg:y1="45cm" svg:x2="26.5cm" svg:y2="45cm">
            <text:p/>
          </draw:line>
          <draw:line draw:style-name="gr38" draw:text-style-name="P4" draw:layer="layout" svg:x1="26.504cm" svg:y1="43.512cm" svg:x2="26.506cm" svg:y2="44.272cm">
            <text:p/>
          </draw:line>
          <draw:line draw:style-name="gr38" draw:text-style-name="P4" draw:layer="layout" svg:x1="26.5cm" svg:y1="45cm" svg:x2="26.506cm" svg:y2="44.772cm">
            <text:p/>
          </draw:line>
          <draw:line draw:style-name="gr38" draw:text-style-name="P4" draw:layer="layout" svg:x1="26.5cm" svg:y1="44.6cm" svg:x2="26.5cm" svg:y2="44.522cm">
            <text:p/>
          </draw:line>
        </draw:g>
        <draw:g draw:style-name="gr1">
          <draw:g draw:style-name="gr66">
            <draw:glue-point draw:id="4" svg:x="5cm" svg:y="0cm"/>
            <draw:glue-point draw:id="5" svg:x="-5cm" svg:y="-2.5cm"/>
            <draw:glue-point draw:id="6" svg:x="-5.005cm" svg:y="2.5cm"/>
            <draw:rect draw:style-name="gr854" draw:text-style-name="P16" draw:layer="layout" svg:width="1cm" svg:height="1cm" svg:x="25cm" svg:y="41cm">
              <text:p text:style-name="P15"><text:span text:style-name="T4">&amp;</text:span></text:p>
            </draw:rect>
            <draw:line draw:style-name="gr855" draw:text-style-name="P17" draw:layer="layout" svg:x1="24.5cm" svg:y1="41.25cm" svg:x2="25cm" svg:y2="41.25cm">
              <text:p/>
            </draw:line>
            <draw:line draw:style-name="gr856" draw:text-style-name="P17" draw:layer="layout" svg:x1="24.5cm" svg:y1="41.75cm" svg:x2="25cm" svg:y2="41.75cm">
              <text:p/>
            </draw:line>
            <draw:line draw:style-name="gr857" draw:text-style-name="P17" draw:layer="layout" svg:x1="26cm" svg:y1="41.5cm" svg:x2="26.5cm" svg:y2="41.5cm">
              <text:p/>
            </draw:line>
          </draw:g>
          <draw:frame draw:style-name="gr858" draw:text-style-name="P66" draw:layer="layout" svg:width="1.886cm" svg:height="0.569cm" svg:x="25.802cm" svg:y="41.004cm">
            <draw:text-box>
              <text:p text:style-name="P65"><text:span text:style-name="T19">wb_mret_s</text:span></text:p>
            </draw:text-box>
          </draw:frame>
          <draw:line draw:style-name="gr38" draw:text-style-name="P4" draw:layer="layout" svg:x1="24cm" svg:y1="41cm" svg:x2="24.5cm" svg:y2="41cm">
            <text:p/>
          </draw:line>
          <draw:line draw:style-name="gr38" draw:text-style-name="P4" draw:layer="layout" svg:x1="24.5cm" svg:y1="41cm" svg:x2="24.5cm" svg:y2="41.25cm">
            <text:p/>
          </draw:line>
          <draw:line draw:style-name="gr38" draw:text-style-name="P4" draw:layer="layout" svg:x1="24cm" svg:y1="42cm" svg:x2="24.5cm" svg:y2="42cm">
            <text:p/>
          </draw:line>
          <draw:line draw:style-name="gr38" draw:text-style-name="P4" draw:layer="layout" svg:x1="24.5cm" svg:y1="42cm" svg:x2="24.5cm" svg:y2="41.75cm">
            <text:p/>
          </draw:line>
          <draw:frame draw:style-name="gr859" draw:text-style-name="P66" draw:layer="layout" svg:width="2.25cm" svg:height="0.569cm" svg:x="22.446cm" svg:y="40.531cm">
            <draw:text-box>
              <text:p text:style-name="P65"><text:span text:style-name="T19">wb_is_mret_s</text:span></text:p>
            </draw:text-box>
          </draw:frame>
          <draw:frame draw:style-name="gr860" draw:text-style-name="P66" draw:layer="layout" svg:width="2.233cm" svg:height="0.569cm" svg:x="22.446cm" svg:y="41.532cm">
            <draw:text-box>
              <text:p text:style-name="P65"><text:span text:style-name="T19">wb_commit_s</text:span></text:p>
            </draw:text-box>
          </draw:frame>
        </draw:g>
        <draw:g draw:style-name="gr1">
          <draw:g draw:style-name="gr66">
            <draw:glue-point draw:id="4" svg:x="-5cm" svg:y="-2.5cm"/>
            <draw:glue-point draw:id="5" svg:x="-5cm" svg:y="2.5cm"/>
            <draw:rect draw:style-name="gr861" draw:text-style-name="P45" draw:layer="layout" svg:width="1cm" svg:height="1cm" svg:x="84cm" svg:y="37.5cm">
              <text:p text:style-name="P15"><text:span text:style-name="T11">&amp;</text:span></text:p>
            </draw:rect>
            <draw:line draw:style-name="gr862" draw:text-style-name="P17" draw:layer="layout" svg:x1="83.5cm" svg:y1="37.75cm" svg:x2="84cm" svg:y2="37.75cm">
              <text:p/>
            </draw:line>
            <draw:line draw:style-name="gr863" draw:text-style-name="P17" draw:layer="layout" svg:x1="83.5cm" svg:y1="38.25cm" svg:x2="84cm" svg:y2="38.25cm">
              <text:p/>
            </draw:line>
            <draw:line draw:style-name="gr864" draw:text-style-name="P17" draw:layer="layout" svg:x1="85cm" svg:y1="38cm" svg:x2="85.5cm" svg:y2="38cm">
              <text:p/>
            </draw:line>
            <draw:line draw:style-name="gr865" draw:text-style-name="P21" draw:layer="layout" svg:x1="83.5cm" svg:y1="38cm" svg:x2="84cm" svg:y2="38cm">
              <text:p/>
            </draw:line>
          </draw:g>
          <draw:g draw:style-name="gr66">
            <draw:glue-point draw:id="4" svg:x="-5cm" svg:y="-2.5cm"/>
            <draw:glue-point draw:id="5" svg:x="-5cm" svg:y="2.5cm"/>
            <draw:rect draw:style-name="gr866" draw:text-style-name="P45" draw:layer="layout" svg:width="1cm" svg:height="1cm" svg:x="82cm" svg:y="38.5cm">
              <text:p text:style-name="P15"><text:span text:style-name="T11">≥</text:span><text:span text:style-name="T11">1</text:span></text:p>
            </draw:rect>
            <draw:line draw:style-name="gr867" draw:text-style-name="P17" draw:layer="layout" svg:x1="81.5cm" svg:y1="38.75cm" svg:x2="82cm" svg:y2="38.75cm">
              <text:p/>
            </draw:line>
            <draw:line draw:style-name="gr868" draw:text-style-name="P17" draw:layer="layout" svg:x1="81.5cm" svg:y1="39.25cm" svg:x2="82cm" svg:y2="39.25cm">
              <text:p/>
            </draw:line>
            <draw:line draw:style-name="gr869" draw:text-style-name="P17" draw:layer="layout" svg:x1="83cm" svg:y1="39cm" svg:x2="83.5cm" svg:y2="39cm">
              <text:p/>
            </draw:line>
            <draw:line draw:style-name="gr870" draw:text-style-name="P21" draw:layer="layout" svg:x1="81.5cm" svg:y1="39cm" svg:x2="82cm" svg:y2="39cm">
              <text:p/>
            </draw:line>
          </draw:g>
          <draw:g draw:style-name="gr66">
            <draw:rect draw:style-name="gr871" draw:text-style-name="P16" draw:layer="layout" svg:width="1cm" svg:height="1cm" svg:x="82cm" svg:y="36.5cm">
              <text:p text:style-name="P15"><text:span text:style-name="T5">1</text:span></text:p>
            </draw:rect>
            <draw:line draw:style-name="gr872" draw:text-style-name="P17" draw:layer="layout" svg:x1="81.5cm" svg:y1="37cm" svg:x2="82cm" svg:y2="37cm">
              <text:p/>
            </draw:line>
            <draw:circle draw:style-name="gr873" draw:text-style-name="P21" draw:layer="layout" svg:width="0.125cm" svg:height="0.126cm" svg:x="83cm" svg:y="36.937cm">
              <text:p/>
            </draw:circle>
            <draw:line draw:style-name="gr874" draw:text-style-name="P21" draw:layer="layout" svg:x1="83.125cm" svg:y1="37cm" svg:x2="83.5cm" svg:y2="37cm">
              <text:p/>
            </draw:line>
          </draw:g>
          <draw:frame draw:style-name="gr875" draw:text-style-name="P66" draw:layer="layout" svg:width="2.25cm" svg:height="0.569cm" svg:x="79.95cm" svg:y="36.531cm">
            <draw:text-box>
              <text:p text:style-name="P65"><text:span text:style-name="T19">wb_is_mret_s</text:span></text:p>
            </draw:text-box>
          </draw:frame>
          <draw:frame draw:style-name="gr876" draw:text-style-name="P66" draw:layer="layout" svg:width="2.233cm" svg:height="0.569cm" svg:x="79.9cm" svg:y="37.531cm">
            <draw:text-box>
              <text:p text:style-name="P65"><text:span text:style-name="T19">wb_commit_s</text:span></text:p>
            </draw:text-box>
          </draw:frame>
          <draw:frame draw:style-name="gr877" draw:text-style-name="P66" draw:layer="layout" svg:width="2.661cm" svg:height="0.569cm" svg:x="84.8cm" svg:y="37.531cm">
            <draw:text-box>
              <text:p text:style-name="P65"><text:span text:style-name="T19">wb_trap_taken_s</text:span></text:p>
            </draw:text-box>
          </draw:frame>
          <draw:frame draw:style-name="gr878" draw:text-style-name="P66" draw:layer="layout" svg:width="2.691cm" svg:height="0.569cm" svg:x="79.439cm" svg:y="38.031cm">
            <draw:text-box>
              <text:p text:style-name="P65"><text:span text:style-name="T19">wb_trap_illegal_s</text:span></text:p>
            </draw:text-box>
          </draw:frame>
          <draw:frame draw:style-name="gr879" draw:text-style-name="P66" draw:layer="layout" svg:width="3.321cm" svg:height="0.569cm" svg:x="78.74cm" svg:y="38.532cm">
            <draw:text-box>
              <text:p text:style-name="P65"><text:span text:style-name="T19">wb_trap_misalign</text:span><text:span text:style-name="T19">ed_s</text:span></text:p>
            </draw:text-box>
          </draw:frame>
          <draw:frame draw:style-name="gr880" draw:text-style-name="P66" draw:layer="layout" svg:width="2.801cm" svg:height="0.569cm" svg:x="78.941cm" svg:y="39.033cm">
            <draw:text-box>
              <text:p text:style-name="P65"><text:span text:style-name="T19">wb_irq_pending_</text:span><text:span text:style-name="T19">s</text:span></text:p>
            </draw:text-box>
          </draw:frame>
          <draw:line draw:style-name="gr38" draw:text-style-name="P4" draw:layer="layout" svg:x1="83.5cm" svg:y1="37cm" svg:x2="83.5cm" svg:y2="37.75cm">
            <text:p/>
          </draw:line>
          <draw:line draw:style-name="gr38" draw:text-style-name="P4" draw:layer="layout" svg:x1="83.5cm" svg:y1="39cm" svg:x2="83.5cm" svg:y2="38.25cm">
            <text:p/>
          </draw:line>
          <draw:line draw:style-name="gr38" draw:text-style-name="P4" draw:layer="layout" svg:x1="81cm" svg:y1="38cm" svg:x2="83.5cm" svg:y2="38cm">
            <text:p/>
          </draw:line>
          <draw:line draw:style-name="gr38" draw:text-style-name="P4" draw:layer="layout" svg:x1="81cm" svg:y1="38.5cm" svg:x2="81.5cm" svg:y2="38.5cm">
            <text:p/>
          </draw:line>
          <draw:line draw:style-name="gr38" draw:text-style-name="P4" draw:layer="layout" svg:x1="81.5cm" svg:y1="38.5cm" svg:x2="81.5cm" svg:y2="38.75cm">
            <text:p/>
          </draw:line>
          <draw:line draw:style-name="gr38" draw:text-style-name="P4" draw:layer="layout" svg:x1="81cm" svg:y1="39.5cm" svg:x2="81.5cm" svg:y2="39.5cm">
            <text:p/>
          </draw:line>
          <draw:line draw:style-name="gr38" draw:text-style-name="P4" draw:layer="layout" svg:x1="81.5cm" svg:y1="39.5cm" svg:x2="81.5cm" svg:y2="39.25cm">
            <text:p/>
          </draw:line>
          <draw:line draw:style-name="gr38" draw:text-style-name="P4" draw:layer="layout" svg:x1="81cm" svg:y1="39cm" svg:x2="81.5cm" svg:y2="39cm">
            <text:p/>
          </draw:line>
          <draw:line draw:style-name="gr38" draw:text-style-name="P4" draw:layer="layout" svg:x1="81cm" svg:y1="37cm" svg:x2="81.5cm" svg:y2="37cm">
            <text:p/>
          </draw:line>
        </draw:g>
        <draw:line draw:style-name="gr38" draw:text-style-name="P4" draw:layer="layout" svg:x1="79cm" svg:y1="38.5cm" svg:x2="81cm" svg:y2="38.5cm">
          <text:p/>
        </draw:line>
        <draw:frame draw:style-name="gr881" draw:text-style-name="P66" draw:layer="layout" svg:width="3.431cm" svg:height="0.569cm" svg:x="76.3cm" svg:y="38.031cm">
          <draw:text-box>
            <text:p text:style-name="P65"><text:span text:style-name="T19">mem_wb_trap_ill</text:span><text:span text:style-name="T19">egal_r</text:span></text:p>
          </draw:text-box>
        </draw:frame>
        <draw:g draw:style-name="gr1">
          <draw:g draw:style-name="gr66">
            <draw:glue-point draw:id="4" svg:x="-5cm" svg:y="-2.5cm"/>
            <draw:glue-point draw:id="5" svg:x="-5cm" svg:y="2.5cm"/>
            <draw:rect draw:style-name="gr882" draw:text-style-name="P45" draw:layer="layout" svg:width="1cm" svg:height="1cm" svg:x="75cm" svg:y="39cm">
              <text:p text:style-name="P15"><text:span text:style-name="T11">&amp;</text:span></text:p>
            </draw:rect>
            <draw:line draw:style-name="gr883" draw:text-style-name="P17" draw:layer="layout" svg:x1="74.5cm" svg:y1="39.25cm" svg:x2="75cm" svg:y2="39.25cm">
              <text:p/>
            </draw:line>
            <draw:line draw:style-name="gr884" draw:text-style-name="P17" draw:layer="layout" svg:x1="74.5cm" svg:y1="39.75cm" svg:x2="75cm" svg:y2="39.75cm">
              <text:p/>
            </draw:line>
            <draw:line draw:style-name="gr885" draw:text-style-name="P17" draw:layer="layout" svg:x1="76cm" svg:y1="39.5cm" svg:x2="76.5cm" svg:y2="39.5cm">
              <text:p/>
            </draw:line>
            <draw:line draw:style-name="gr886" draw:text-style-name="P21" draw:layer="layout" svg:x1="74.5cm" svg:y1="39.5cm" svg:x2="75cm" svg:y2="39.5cm">
              <text:p/>
            </draw:line>
          </draw:g>
          <draw:line draw:style-name="gr38" draw:text-style-name="P4" draw:layer="layout" svg:x1="74cm" svg:y1="39cm" svg:x2="74.5cm" svg:y2="39cm">
            <text:p/>
          </draw:line>
          <draw:line draw:style-name="gr38" draw:text-style-name="P4" draw:layer="layout" svg:x1="74.5cm" svg:y1="39cm" svg:x2="74.5cm" svg:y2="39.25cm">
            <text:p/>
          </draw:line>
          <draw:line draw:style-name="gr38" draw:text-style-name="P4" draw:layer="layout" svg:x1="74cm" svg:y1="40cm" svg:x2="74.5cm" svg:y2="40cm">
            <text:p/>
          </draw:line>
          <draw:line draw:style-name="gr38" draw:text-style-name="P4" draw:layer="layout" svg:x1="74.5cm" svg:y1="40cm" svg:x2="74.5cm" svg:y2="39.75cm">
            <text:p/>
          </draw:line>
          <draw:line draw:style-name="gr38" draw:text-style-name="P4" draw:layer="layout" svg:x1="74cm" svg:y1="39.5cm" svg:x2="74.5cm" svg:y2="39.5cm">
            <text:p/>
          </draw:line>
          <draw:frame draw:style-name="gr887" draw:text-style-name="P66" draw:layer="layout" svg:width="2.801cm" svg:height="0.569cm" svg:x="75.8cm" svg:y="39cm">
            <draw:text-box>
              <text:p text:style-name="P65"><text:span text:style-name="T19">wb_irq_pending_</text:span><text:span text:style-name="T19">s</text:span></text:p>
            </draw:text-box>
          </draw:frame>
          <draw:frame draw:style-name="gr888" draw:text-style-name="P73" draw:layer="layout" svg:width="2.195cm" svg:height="0.569cm" svg:x="72.552cm" svg:y="38.501cm">
            <draw:text-box>
              <text:p text:style-name="P72"><text:span text:style-name="T23">csr_mip_r[11]</text:span></text:p>
            </draw:text-box>
          </draw:frame>
          <draw:frame draw:style-name="gr889" draw:text-style-name="P73" draw:layer="layout" svg:width="2.195cm" svg:height="0.569cm" svg:x="72.552cm" svg:y="39.002cm">
            <draw:text-box>
              <text:p text:style-name="P72"><text:span text:style-name="T23">csr_mie_r[11]</text:span></text:p>
            </draw:text-box>
          </draw:frame>
          <draw:frame draw:style-name="gr890" draw:text-style-name="P73" draw:layer="layout" svg:width="2.644cm" svg:height="0.569cm" svg:x="72.103cm" svg:y="39.503cm">
            <draw:text-box>
              <text:p text:style-name="P72"><text:span text:style-name="T23">csr_mstatus_mie</text:span></text:p>
            </draw:text-box>
          </draw:frame>
        </draw:g>
        <draw:line draw:style-name="gr38" draw:text-style-name="P4" draw:layer="layout" svg:x1="75.002cm" svg:y1="41.903cm" svg:x2="77.002cm" svg:y2="41.903cm">
          <text:p/>
        </draw:line>
        <draw:frame draw:style-name="gr891" draw:text-style-name="P73" draw:layer="layout" svg:width="5.222cm" svg:height="0.569cm" svg:x="73.688cm" svg:y="41.407cm">
          <draw:text-box>
            <text:p text:style-name="P72"><text:span text:style-name="T23">csr_mstatus_r[7] </text:span><text:span text:style-name="T23">= </text:span><text:span text:style-name="T23">csr_mstatus_mpi</text:span><text:span text:style-name="T23">e</text:span></text:p>
          </draw:text-box>
        </draw:frame>
        <draw:line draw:style-name="gr38" draw:text-style-name="P4" draw:layer="layout" svg:x1="75.002cm" svg:y1="41.504cm" svg:x2="77.002cm" svg:y2="41.504cm">
          <text:p/>
        </draw:line>
        <draw:frame draw:style-name="gr892" draw:text-style-name="P73" draw:layer="layout" svg:width="5.061cm" svg:height="0.569cm" svg:x="73.688cm" svg:y="41.008cm">
          <draw:text-box>
            <text:p text:style-name="P72"><text:span text:style-name="T23">csr_mstatus_r[3] </text:span><text:span text:style-name="T23">= </text:span><text:span text:style-name="T23">csr_mstatus_mie</text:span></text:p>
          </draw:text-box>
        </draw:frame>
        <draw:g draw:style-name="gr1">
          <draw:g draw:style-name="gr66">
            <draw:rect draw:style-name="gr893" draw:text-style-name="P16" draw:layer="layout" svg:width="1cm" svg:height="1cm" svg:x="24.001cm" svg:y="28cm">
              <text:p text:style-name="P15"><text:span text:style-name="T5">1</text:span></text:p>
            </draw:rect>
            <draw:line draw:style-name="gr894" draw:text-style-name="P17" draw:layer="layout" svg:x1="23.501cm" svg:y1="28.5cm" svg:x2="24.001cm" svg:y2="28.5cm">
              <text:p/>
            </draw:line>
            <draw:circle draw:style-name="gr895" draw:text-style-name="P21" draw:layer="layout" svg:width="0.125cm" svg:height="0.126cm" svg:x="25.001cm" svg:y="28.437cm">
              <text:p/>
            </draw:circle>
            <draw:line draw:style-name="gr896" draw:text-style-name="P21" draw:layer="layout" svg:x1="25.126cm" svg:y1="28.5cm" svg:x2="25.501cm" svg:y2="28.5cm">
              <text:p/>
            </draw:line>
          </draw:g>
          <draw:frame draw:style-name="gr897" draw:text-style-name="P66" draw:layer="layout" svg:width="2.581cm" svg:height="0.569cm" svg:x="21.551cm" svg:y="28.031cm">
            <draw:text-box>
              <text:p text:style-name="P65"><text:span text:style-name="T19">wb_committed_r</text:span></text:p>
            </draw:text-box>
          </draw:frame>
          <draw:frame draw:style-name="gr898" draw:text-style-name="P66" draw:layer="layout" svg:width="2.233cm" svg:height="0.569cm" svg:x="26.801cm" svg:y="29.031cm">
            <draw:text-box>
              <text:p text:style-name="P65"><text:span text:style-name="T19">wb_commit_s</text:span></text:p>
            </draw:text-box>
          </draw:frame>
          <draw:frame draw:style-name="gr899" draw:text-style-name="P66" draw:layer="layout" svg:width="2.644cm" svg:height="0.569cm" svg:x="22.04cm" svg:y="29.431cm">
            <draw:text-box>
              <text:p text:style-name="P65"><text:span text:style-name="T19">mem_wb_valid_r</text:span></text:p>
            </draw:text-box>
          </draw:frame>
          <draw:line draw:style-name="gr38" draw:text-style-name="P4" draw:layer="layout" svg:x1="25.501cm" svg:y1="28.5cm" svg:x2="25.501cm" svg:y2="29.25cm">
            <text:p/>
          </draw:line>
          <draw:line draw:style-name="gr38" draw:text-style-name="P4" draw:layer="layout" svg:x1="23.001cm" svg:y1="29.9cm" svg:x2="25.501cm" svg:y2="29.9cm">
            <text:p/>
          </draw:line>
          <draw:line draw:style-name="gr38" draw:text-style-name="P4" draw:layer="layout" svg:x1="23.001cm" svg:y1="28.5cm" svg:x2="23.501cm" svg:y2="28.5cm">
            <text:p/>
          </draw:line>
          <draw:g draw:style-name="gr66">
            <draw:glue-point draw:id="4" svg:x="5cm" svg:y="0cm"/>
            <draw:glue-point draw:id="5" svg:x="-5cm" svg:y="-2.5cm"/>
            <draw:glue-point draw:id="6" svg:x="-5.005cm" svg:y="2.5cm"/>
            <draw:rect draw:style-name="gr900" draw:text-style-name="P16" draw:layer="layout" svg:width="1cm" svg:height="1cm" svg:x="26cm" svg:y="29cm">
              <text:p text:style-name="P15"><text:span text:style-name="T4">&amp;</text:span></text:p>
            </draw:rect>
            <draw:line draw:style-name="gr901" draw:text-style-name="P17" draw:layer="layout" svg:x1="25.5cm" svg:y1="29.25cm" svg:x2="26cm" svg:y2="29.25cm">
              <text:p/>
            </draw:line>
            <draw:line draw:style-name="gr902" draw:text-style-name="P17" draw:layer="layout" svg:x1="25.5cm" svg:y1="29.75cm" svg:x2="26cm" svg:y2="29.75cm">
              <text:p/>
            </draw:line>
            <draw:line draw:style-name="gr903" draw:text-style-name="P17" draw:layer="layout" svg:x1="27cm" svg:y1="29.5cm" svg:x2="27.5cm" svg:y2="29.5cm">
              <text:p/>
            </draw:line>
          </draw:g>
          <draw:line draw:style-name="gr38" draw:text-style-name="P4" draw:layer="layout" svg:x1="25.501cm" svg:y1="29.9cm" svg:x2="25.501cm" svg:y2="29.75cm">
            <text:p/>
          </draw:line>
        </draw:g>
        <draw:custom-shape draw:style-name="gr688" draw:text-style-name="P59" draw:layer="layout" svg:width="1cm" svg:height="1cm" svg:x="25cm" svg:y="39cm">
          <text:p text:style-name="P35"><text:span text:style-name="T10">Dec</text:span></text:p>
          <draw:enhanced-geometry svg:viewBox="0 0 21600 21600" draw:type="rectangle" draw:enhanced-path="M 0 0 L 21600 0 21600 21600 0 21600 0 0 Z N"/>
        </draw:custom-shape>
        <draw:line draw:style-name="gr38" draw:text-style-name="P4" draw:layer="layout" svg:x1="24cm" svg:y1="39.5cm" svg:x2="25cm" svg:y2="39.5cm">
          <text:p/>
        </draw:line>
        <draw:line draw:style-name="gr38" draw:text-style-name="P4" draw:layer="layout" svg:x1="26cm" svg:y1="39.5cm" svg:x2="27cm" svg:y2="39.5cm">
          <text:p/>
        </draw:line>
        <draw:frame draw:style-name="gr904" draw:text-style-name="P66" draw:layer="layout" svg:width="2.25cm" svg:height="0.569cm" svg:x="25.9cm" svg:y="39.031cm">
          <draw:text-box>
            <text:p text:style-name="P65"><text:span text:style-name="T19">wb_is_mret_s</text:span></text:p>
          </draw:text-box>
        </draw:frame>
        <draw:frame draw:style-name="gr905" draw:text-style-name="P73" draw:layer="layout" svg:width="2.598cm" svg:height="0.569cm" svg:x="22.6cm" svg:y="39.032cm">
          <draw:text-box>
            <text:p text:style-name="P72"><text:span text:style-name="T23">mem_wb_instr_r</text:span></text:p>
          </draw:text-box>
        </draw:frame>
        <draw:line draw:style-name="gr38" draw:text-style-name="P4" draw:layer="layout" svg:x1="16.902cm" svg:y1="30.904cm" svg:x2="18.902cm" svg:y2="30.904cm">
          <text:p/>
        </draw:line>
        <draw:frame draw:style-name="gr906" draw:text-style-name="P73" draw:layer="layout" svg:width="3.393cm" svg:height="0.569cm" svg:x="15.588cm" svg:y="30.408cm">
          <draw:text-box>
            <text:p text:style-name="P72"><text:span text:style-name="T23">mem_wb_instr_r </text:span><text:span text:style-name="T23">= ir_o</text:span></text:p>
          </draw:text-box>
        </draw:frame>
        <draw:g draw:style-name="gr1">
          <draw:custom-shape draw:style-name="gr165" draw:text-style-name="P14" draw:layer="layout" svg:width="0.4cm" svg:height="0.4cm" svg:x="18.9cm" svg:y="30.6cm">
            <text:p/>
            <draw:enhanced-geometry svg:viewBox="0 0 21600 21600" draw:type="rectangle" draw:enhanced-path="M 0 0 L 21600 0 21600 21600 0 21600 0 0 Z N"/>
          </draw:custom-shape>
          <draw:line draw:style-name="gr547" draw:text-style-name="P47" draw:layer="layout" svg:x1="18.9cm" svg:y1="30.6cm" svg:x2="19.3cm" svg:y2="31cm">
            <text:p/>
          </draw:line>
          <draw:line draw:style-name="gr547" draw:text-style-name="P47" draw:layer="layout" svg:x1="18.9cm" svg:y1="31cm" svg:x2="19.3cm" svg:y2="30.6cm">
            <text:p/>
          </draw:line>
        </draw:g>
        <draw:line draw:style-name="gr38" draw:text-style-name="P4" draw:layer="layout" svg:x1="68cm" svg:y1="17.5cm" svg:x2="70cm" svg:y2="17.5cm">
          <text:p/>
        </draw:line>
        <draw:line draw:style-name="gr38" draw:text-style-name="P4" draw:layer="layout" svg:x1="68cm" svg:y1="18cm" svg:x2="70cm" svg:y2="18cm">
          <text:p/>
        </draw:line>
        <draw:line draw:style-name="gr38" draw:text-style-name="P4" draw:layer="layout" svg:x1="68cm" svg:y1="18.5cm" svg:x2="70cm" svg:y2="18.5cm">
          <text:p/>
        </draw:line>
        <draw:line draw:style-name="gr38" draw:text-style-name="P4" draw:layer="layout" svg:x1="68cm" svg:y1="19cm" svg:x2="70cm" svg:y2="19cm">
          <text:p/>
        </draw:line>
        <draw:line draw:style-name="gr38" draw:text-style-name="P4" draw:layer="layout" svg:x1="68cm" svg:y1="19.5cm" svg:x2="70cm" svg:y2="19.5cm">
          <text:p/>
        </draw:line>
        <draw:line draw:style-name="gr38" draw:text-style-name="P4" draw:layer="layout" svg:x1="68cm" svg:y1="20.5cm" svg:x2="70cm" svg:y2="20.5cm">
          <text:p/>
        </draw:line>
        <draw:frame draw:style-name="gr756" draw:text-style-name="P37" draw:layer="layout" svg:width="2.881cm" svg:height="0.569cm" svg:x="66.722cm" svg:y="17.031cm">
          <draw:text-box>
            <text:p><text:span text:style-name="T10">ex_mem_aluRe</text:span><text:span text:style-name="T10">s_r</text:span></text:p>
          </draw:text-box>
        </draw:frame>
        <draw:frame draw:style-name="gr756" draw:text-style-name="P37" draw:layer="layout" svg:width="3.144cm" svg:height="0.569cm" svg:x="66.459cm" svg:y="17.532cm">
          <draw:text-box>
            <text:p><text:span text:style-name="T10">ex_</text:span><text:span text:style-name="T10">me</text:span><text:span text:style-name="T10">m_d</text:span><text:span text:style-name="T10">Me</text:span><text:span text:style-name="T10">mW</text:span><text:span text:style-name="T10">r_r</text:span></text:p>
          </draw:text-box>
        </draw:frame>
        <draw:frame draw:style-name="gr756" draw:text-style-name="P37" draw:layer="layout" svg:width="3.402cm" svg:height="0.569cm" svg:x="66.201cm" svg:y="18.033cm">
          <draw:text-box>
            <text:p><text:span text:style-name="T10">e</text:span><text:span text:style-name="T10">x</text:span><text:span text:style-name="T10">_</text:span><text:span text:style-name="T10">m</text:span><text:span text:style-name="T10">e</text:span><text:span text:style-name="T10">m</text:span><text:span text:style-name="T10">_</text:span><text:span text:style-name="T10">i</text:span><text:span text:style-name="T10">n</text:span><text:span text:style-name="T10">s</text:span><text:span text:style-name="T10">tr</text:span><text:span text:style-name="T10">_</text:span><text:span text:style-name="T10">r[</text:span><text:span text:style-name="T10">1</text:span><text:span text:style-name="T10">4</text:span><text:span text:style-name="T10">:</text:span><text:span text:style-name="T10">1</text:span><text:span text:style-name="T10">2</text:span><text:span text:style-name="T10">]</text:span></text:p>
          </draw:text-box>
        </draw:frame>
        <draw:frame draw:style-name="gr756" draw:text-style-name="P37" draw:layer="layout" svg:width="3.211cm" svg:height="0.569cm" svg:x="66.392cm" svg:y="18.534cm">
          <draw:text-box>
            <text:p><text:span text:style-name="T10">ex_mem_dc_wdata</text:span><text:span text:style-name="T10">_r</text:span></text:p>
          </draw:text-box>
        </draw:frame>
        <draw:frame draw:style-name="gr756" draw:text-style-name="P37" draw:layer="layout" svg:width="3.131cm" svg:height="0.569cm" svg:x="66.472cm" svg:y="19.035cm">
          <draw:text-box>
            <text:p><text:span text:style-name="T10">ex_mem_</text:span><text:span text:style-name="T10">dc_wstrb_</text:span><text:span text:style-name="T10">r</text:span></text:p>
          </draw:text-box>
        </draw:frame>
        <draw:g draw:style-name="gr1">
          <draw:g draw:style-name="gr66">
            <draw:glue-point draw:id="4" svg:x="-5cm" svg:y="-2.5cm"/>
            <draw:glue-point draw:id="5" svg:x="-5cm" svg:y="2.5cm"/>
            <draw:rect draw:style-name="gr907" draw:text-style-name="P45" draw:layer="layout" svg:width="1cm" svg:height="1cm" svg:x="66.5cm" svg:y="21.5cm">
              <text:p text:style-name="P15"><text:span text:style-name="T11">&amp;</text:span></text:p>
            </draw:rect>
            <draw:line draw:style-name="gr908" draw:text-style-name="P17" draw:layer="layout" svg:x1="66cm" svg:y1="21.75cm" svg:x2="66.5cm" svg:y2="21.75cm">
              <text:p/>
            </draw:line>
            <draw:line draw:style-name="gr909" draw:text-style-name="P17" draw:layer="layout" svg:x1="66cm" svg:y1="22.25cm" svg:x2="66.5cm" svg:y2="22.25cm">
              <text:p/>
            </draw:line>
            <draw:line draw:style-name="gr910" draw:text-style-name="P17" draw:layer="layout" svg:x1="67.5cm" svg:y1="22cm" svg:x2="68cm" svg:y2="22cm">
              <text:p/>
            </draw:line>
            <draw:line draw:style-name="gr911" draw:text-style-name="P21" draw:layer="layout" svg:x1="66cm" svg:y1="22cm" svg:x2="66.5cm" svg:y2="22cm">
              <text:p/>
            </draw:line>
          </draw:g>
          <draw:g draw:style-name="gr66">
            <draw:glue-point draw:id="4" svg:x="-5cm" svg:y="-2.5cm"/>
            <draw:glue-point draw:id="5" svg:x="-5cm" svg:y="2.5cm"/>
            <draw:glue-point draw:id="6" svg:x="5cm" svg:y="0cm"/>
            <draw:rect draw:style-name="gr912" draw:text-style-name="P16" draw:layer="layout" svg:width="1cm" svg:height="1cm" svg:x="64.5cm" svg:y="22.5cm">
              <text:p text:style-name="P15"><text:span text:style-name="T8">≥</text:span><text:span text:style-name="T5">1</text:span></text:p>
            </draw:rect>
            <draw:line draw:style-name="gr913" draw:text-style-name="P17" draw:layer="layout" svg:x1="64cm" svg:y1="22.75cm" svg:x2="64.5cm" svg:y2="22.75cm">
              <text:p/>
            </draw:line>
            <draw:line draw:style-name="gr914" draw:text-style-name="P17" draw:layer="layout" svg:x1="64cm" svg:y1="23.25cm" svg:x2="64.5cm" svg:y2="23.25cm">
              <text:p/>
            </draw:line>
            <draw:line draw:style-name="gr915" draw:text-style-name="P17" draw:layer="layout" svg:x1="65.5cm" svg:y1="23cm" svg:x2="66cm" svg:y2="23cm">
              <text:p/>
            </draw:line>
          </draw:g>
          <draw:g draw:style-name="gr66">
            <draw:rect draw:style-name="gr916" draw:text-style-name="P16" draw:layer="layout" svg:width="1cm" svg:height="1cm" svg:x="64.5cm" svg:y="20.5cm">
              <text:p text:style-name="P15"><text:span text:style-name="T5">1</text:span></text:p>
            </draw:rect>
            <draw:line draw:style-name="gr917" draw:text-style-name="P17" draw:layer="layout" svg:x1="64cm" svg:y1="21cm" svg:x2="64.5cm" svg:y2="21cm">
              <text:p/>
            </draw:line>
            <draw:circle draw:style-name="gr918" draw:text-style-name="P21" draw:layer="layout" svg:width="0.125cm" svg:height="0.126cm" svg:x="65.5cm" svg:y="20.937cm">
              <text:p/>
            </draw:circle>
            <draw:line draw:style-name="gr919" draw:text-style-name="P21" draw:layer="layout" svg:x1="65.625cm" svg:y1="21cm" svg:x2="66cm" svg:y2="21cm">
              <text:p/>
            </draw:line>
          </draw:g>
          <draw:frame draw:style-name="gr756" draw:text-style-name="P37" draw:layer="layout" svg:width="2.314cm" svg:height="0.569cm" svg:x="62.034cm" svg:y="20.531cm">
            <draw:text-box>
              <text:p><text:span text:style-name="T10">dc_req_sent_r</text:span></text:p>
            </draw:text-box>
          </draw:frame>
          <draw:frame draw:style-name="gr756" draw:text-style-name="P37" draw:layer="layout" svg:width="2.581cm" svg:height="0.569cm" svg:x="61.967cm" svg:y="21.5cm">
            <draw:text-box>
              <text:p><text:span text:style-name="T10">ex_mem_valid_r</text:span></text:p>
            </draw:text-box>
          </draw:frame>
          <draw:frame draw:style-name="gr756" draw:text-style-name="P37" draw:layer="layout" svg:width="3.148cm" svg:height="0.569cm" svg:x="62cm" svg:y="22cm">
            <draw:text-box>
              <text:p><text:span text:style-name="T10">ex_mem_dMemR</text:span><text:span text:style-name="T10">d_r</text:span></text:p>
            </draw:text-box>
          </draw:frame>
          <draw:frame draw:style-name="gr756" draw:text-style-name="P37" draw:layer="layout" svg:width="3.144cm" svg:height="0.569cm" svg:x="60.904cm" svg:y="23.001cm">
            <draw:text-box>
              <text:p><text:span text:style-name="T10">ex_mem_dMem</text:span><text:span text:style-name="T10">Wr_r</text:span></text:p>
            </draw:text-box>
          </draw:frame>
          <draw:line draw:style-name="gr38" draw:text-style-name="P4" draw:layer="layout" svg:x1="66cm" svg:y1="21cm" svg:x2="66cm" svg:y2="21.75cm">
            <text:p/>
          </draw:line>
          <draw:line draw:style-name="gr38" draw:text-style-name="P4" draw:layer="layout" svg:x1="66cm" svg:y1="23cm" svg:x2="66cm" svg:y2="22.25cm">
            <text:p/>
          </draw:line>
          <draw:line draw:style-name="gr38" draw:text-style-name="P4" draw:layer="layout" svg:x1="63.5cm" svg:y1="21cm" svg:x2="64cm" svg:y2="21cm">
            <text:p/>
          </draw:line>
          <draw:line draw:style-name="gr38" draw:text-style-name="P4" draw:layer="layout" svg:x1="63.5cm" svg:y1="22.5cm" svg:x2="64cm" svg:y2="22.5cm">
            <text:p/>
          </draw:line>
          <draw:line draw:style-name="gr38" draw:text-style-name="P4" draw:layer="layout" svg:x1="63.5cm" svg:y1="23.5cm" svg:x2="64cm" svg:y2="23.5cm">
            <text:p/>
          </draw:line>
          <draw:line draw:style-name="gr38" draw:text-style-name="P4" draw:layer="layout" svg:x1="64cm" svg:y1="22.5cm" svg:x2="64cm" svg:y2="22.75cm">
            <text:p/>
          </draw:line>
          <draw:line draw:style-name="gr38" draw:text-style-name="P4" draw:layer="layout" svg:x1="64cm" svg:y1="23.5cm" svg:x2="64cm" svg:y2="23.25cm">
            <text:p/>
          </draw:line>
          <draw:line draw:style-name="gr38" draw:text-style-name="P4" draw:layer="layout" svg:x1="63.5cm" svg:y1="22cm" svg:x2="66cm" svg:y2="22cm">
            <text:p/>
          </draw:line>
        </draw:g>
        <draw:line draw:style-name="gr38" draw:text-style-name="P4" draw:layer="layout" svg:x1="68cm" svg:y1="22cm" svg:x2="68cm" svg:y2="20.5cm">
          <text:p/>
        </draw:line>
        <draw:line draw:style-name="gr38" draw:text-style-name="P4" draw:layer="layout" svg:x1="68cm" svg:y1="20.001cm" svg:x2="70cm" svg:y2="20.001cm">
          <text:p/>
        </draw:line>
        <draw:g draw:style-name="gr1">
          <draw:g draw:style-name="gr1">
            <draw:custom-shape draw:style-name="gr165" draw:text-style-name="P14" draw:layer="layout" svg:width="0.4cm" svg:height="0.4cm" svg:x="69.792cm" svg:y="17.3cm">
              <text:p/>
              <draw:enhanced-geometry svg:viewBox="0 0 21600 21600" draw:type="rectangle" draw:enhanced-path="M 0 0 L 21600 0 21600 21600 0 21600 0 0 Z N"/>
            </draw:custom-shape>
            <draw:line draw:style-name="gr547" draw:text-style-name="P47" draw:layer="layout" svg:x1="69.792cm" svg:y1="17.3cm" svg:x2="70.192cm" svg:y2="17.7cm">
              <text:p/>
            </draw:line>
            <draw:line draw:style-name="gr547" draw:text-style-name="P47" draw:layer="layout" svg:x1="69.792cm" svg:y1="17.7cm" svg:x2="70.192cm" svg:y2="17.3cm">
              <text:p/>
            </draw:line>
          </draw:g>
          <draw:frame draw:style-name="gr670" draw:text-style-name="P71" draw:layer="layout" svg:width="2.517cm" svg:height="0.569cm" svg:x="70.092cm" svg:y="17.2cm">
            <draw:text-box>
              <text:p text:style-name="P70"><text:span text:style-name="T21">dcpu_if.dc_addr</text:span></text:p>
            </draw:text-box>
          </draw:frame>
          <draw:g draw:style-name="gr1">
            <draw:custom-shape draw:style-name="gr165" draw:text-style-name="P14" draw:layer="layout" svg:width="0.4cm" svg:height="0.4cm" svg:x="69.792cm" svg:y="17.801cm">
              <text:p/>
              <draw:enhanced-geometry svg:viewBox="0 0 21600 21600" draw:type="rectangle" draw:enhanced-path="M 0 0 L 21600 0 21600 21600 0 21600 0 0 Z N"/>
            </draw:custom-shape>
            <draw:line draw:style-name="gr547" draw:text-style-name="P47" draw:layer="layout" svg:x1="69.792cm" svg:y1="17.801cm" svg:x2="70.192cm" svg:y2="18.201cm">
              <text:p/>
            </draw:line>
            <draw:line draw:style-name="gr547" draw:text-style-name="P47" draw:layer="layout" svg:x1="69.792cm" svg:y1="18.201cm" svg:x2="70.192cm" svg:y2="17.801cm">
              <text:p/>
            </draw:line>
          </draw:g>
          <draw:frame draw:style-name="gr670" draw:text-style-name="P71" draw:layer="layout" svg:width="2.25cm" svg:height="0.569cm" svg:x="70.092cm" svg:y="17.701cm">
            <draw:text-box>
              <text:p text:style-name="P70"><text:span text:style-name="T21">dcpu_if.dc_wr</text:span></text:p>
            </draw:text-box>
          </draw:frame>
          <draw:g draw:style-name="gr1">
            <draw:custom-shape draw:style-name="gr165" draw:text-style-name="P14" draw:layer="layout" svg:width="0.4cm" svg:height="0.4cm" svg:x="69.792cm" svg:y="18.301cm">
              <text:p/>
              <draw:enhanced-geometry svg:viewBox="0 0 21600 21600" draw:type="rectangle" draw:enhanced-path="M 0 0 L 21600 0 21600 21600 0 21600 0 0 Z N"/>
            </draw:custom-shape>
            <draw:line draw:style-name="gr547" draw:text-style-name="P47" draw:layer="layout" svg:x1="69.792cm" svg:y1="18.301cm" svg:x2="70.192cm" svg:y2="18.701cm">
              <text:p/>
            </draw:line>
            <draw:line draw:style-name="gr547" draw:text-style-name="P47" draw:layer="layout" svg:x1="69.792cm" svg:y1="18.701cm" svg:x2="70.192cm" svg:y2="18.301cm">
              <text:p/>
            </draw:line>
          </draw:g>
          <draw:frame draw:style-name="gr670" draw:text-style-name="P71" draw:layer="layout" svg:width="2.454cm" svg:height="0.569cm" svg:x="70.092cm" svg:y="18.201cm">
            <draw:text-box>
              <text:p text:style-name="P70"><text:span text:style-name="T21">dcpu_if.d</text:span><text:span text:style-name="T21">c_size</text:span></text:p>
            </draw:text-box>
          </draw:frame>
          <draw:g draw:style-name="gr1">
            <draw:custom-shape draw:style-name="gr165" draw:text-style-name="P14" draw:layer="layout" svg:width="0.4cm" svg:height="0.4cm" svg:x="69.792cm" svg:y="18.801cm">
              <text:p/>
              <draw:enhanced-geometry svg:viewBox="0 0 21600 21600" draw:type="rectangle" draw:enhanced-path="M 0 0 L 21600 0 21600 21600 0 21600 0 0 Z N"/>
            </draw:custom-shape>
            <draw:line draw:style-name="gr547" draw:text-style-name="P47" draw:layer="layout" svg:x1="69.792cm" svg:y1="18.801cm" svg:x2="70.192cm" svg:y2="19.201cm">
              <text:p/>
            </draw:line>
            <draw:line draw:style-name="gr547" draw:text-style-name="P47" draw:layer="layout" svg:x1="69.792cm" svg:y1="19.201cm" svg:x2="70.192cm" svg:y2="18.801cm">
              <text:p/>
            </draw:line>
          </draw:g>
          <draw:frame draw:style-name="gr670" draw:text-style-name="P71" draw:layer="layout" svg:width="2.708cm" svg:height="0.569cm" svg:x="70.092cm" svg:y="18.701cm">
            <draw:text-box>
              <text:p text:style-name="P70"><text:span text:style-name="T21">dcpu_if.d</text:span><text:span text:style-name="T21">c_wdata</text:span></text:p>
            </draw:text-box>
          </draw:frame>
          <draw:g draw:style-name="gr1">
            <draw:custom-shape draw:style-name="gr165" draw:text-style-name="P14" draw:layer="layout" svg:width="0.4cm" svg:height="0.4cm" svg:x="69.792cm" svg:y="19.302cm">
              <text:p/>
              <draw:enhanced-geometry svg:viewBox="0 0 21600 21600" draw:type="rectangle" draw:enhanced-path="M 0 0 L 21600 0 21600 21600 0 21600 0 0 Z N"/>
            </draw:custom-shape>
            <draw:line draw:style-name="gr547" draw:text-style-name="P47" draw:layer="layout" svg:x1="69.792cm" svg:y1="19.302cm" svg:x2="70.192cm" svg:y2="19.702cm">
              <text:p/>
            </draw:line>
            <draw:line draw:style-name="gr547" draw:text-style-name="P47" draw:layer="layout" svg:x1="69.792cm" svg:y1="19.702cm" svg:x2="70.192cm" svg:y2="19.302cm">
              <text:p/>
            </draw:line>
          </draw:g>
          <draw:frame draw:style-name="gr670" draw:text-style-name="P71" draw:layer="layout" svg:width="2.627cm" svg:height="0.569cm" svg:x="70.092cm" svg:y="19.202cm">
            <draw:text-box>
              <text:p text:style-name="P70"><text:span text:style-name="T21">dcpu_if.dc_</text:span><text:span text:style-name="T21">wstrb</text:span></text:p>
            </draw:text-box>
          </draw:frame>
          <draw:g draw:style-name="gr1">
            <draw:custom-shape draw:style-name="gr165" draw:text-style-name="P14" draw:layer="layout" svg:width="0.4cm" svg:height="0.4cm" svg:x="69.792cm" svg:y="20.303cm">
              <text:p/>
              <draw:enhanced-geometry svg:viewBox="0 0 21600 21600" draw:type="rectangle" draw:enhanced-path="M 0 0 L 21600 0 21600 21600 0 21600 0 0 Z N"/>
            </draw:custom-shape>
            <draw:line draw:style-name="gr547" draw:text-style-name="P47" draw:layer="layout" svg:x1="69.792cm" svg:y1="20.303cm" svg:x2="70.192cm" svg:y2="20.703cm">
              <text:p/>
            </draw:line>
            <draw:line draw:style-name="gr547" draw:text-style-name="P47" draw:layer="layout" svg:x1="69.792cm" svg:y1="20.703cm" svg:x2="70.192cm" svg:y2="20.303cm">
              <text:p/>
            </draw:line>
          </draw:g>
          <draw:frame draw:style-name="gr670" draw:text-style-name="P71" draw:layer="layout" svg:width="2.36cm" svg:height="0.569cm" svg:x="70.092cm" svg:y="20.203cm">
            <draw:text-box>
              <text:p text:style-name="P70"><text:span text:style-name="T21">d</text:span><text:span text:style-name="T21">c</text:span><text:span text:style-name="T21">p</text:span><text:span text:style-name="T21">u</text:span><text:span text:style-name="T21">_</text:span><text:span text:style-name="T21">if</text:span><text:span text:style-name="T21">.</text:span><text:span text:style-name="T21">d</text:span><text:span text:style-name="T21">c</text:span><text:span text:style-name="T21">_</text:span><text:span text:style-name="T21">r</text:span><text:span text:style-name="T21">e</text:span><text:span text:style-name="T21">q</text:span></text:p>
            </draw:text-box>
          </draw:frame>
          <draw:g draw:style-name="gr1">
            <draw:custom-shape draw:style-name="gr165" draw:text-style-name="P14" draw:layer="layout" svg:width="0.4cm" svg:height="0.4cm" svg:x="69.792cm" svg:y="19.803cm">
              <text:p/>
              <draw:enhanced-geometry svg:viewBox="0 0 21600 21600" draw:type="rectangle" draw:enhanced-path="M 0 0 L 21600 0 21600 21600 0 21600 0 0 Z N"/>
            </draw:custom-shape>
            <draw:line draw:style-name="gr547" draw:text-style-name="P47" draw:layer="layout" svg:x1="69.792cm" svg:y1="19.803cm" svg:x2="70.192cm" svg:y2="20.203cm">
              <text:p/>
            </draw:line>
            <draw:line draw:style-name="gr547" draw:text-style-name="P47" draw:layer="layout" svg:x1="69.792cm" svg:y1="20.203cm" svg:x2="70.192cm" svg:y2="19.803cm">
              <text:p/>
            </draw:line>
          </draw:g>
          <draw:frame draw:style-name="gr670" draw:text-style-name="P71" draw:layer="layout" svg:width="2.551cm" svg:height="0.569cm" svg:x="70.092cm" svg:y="19.703cm">
            <draw:text-box>
              <text:p text:style-name="P70"><text:span text:style-name="T21">dcpu_if.dc</text:span><text:span text:style-name="T21">_flush</text:span></text:p>
            </draw:text-box>
          </draw:frame>
          <draw:g draw:style-name="gr1">
            <draw:custom-shape draw:style-name="gr165" draw:text-style-name="P14" draw:layer="layout" svg:width="0.4cm" svg:height="0.4cm" svg:x="76.792cm" svg:y="17.301cm">
              <text:p/>
              <draw:enhanced-geometry svg:viewBox="0 0 21600 21600" draw:type="rectangle" draw:enhanced-path="M 0 0 L 21600 0 21600 21600 0 21600 0 0 Z N"/>
            </draw:custom-shape>
            <draw:line draw:style-name="gr547" draw:text-style-name="P47" draw:layer="layout" svg:x1="76.792cm" svg:y1="17.301cm" svg:x2="77.192cm" svg:y2="17.701cm">
              <text:p/>
            </draw:line>
            <draw:line draw:style-name="gr547" draw:text-style-name="P47" draw:layer="layout" svg:x1="76.792cm" svg:y1="17.701cm" svg:x2="77.192cm" svg:y2="17.301cm">
              <text:p/>
            </draw:line>
          </draw:g>
          <draw:frame draw:style-name="gr670" draw:text-style-name="P71" draw:layer="layout" svg:width="2.454cm" svg:height="0.569cm" svg:x="74.476cm" svg:y="17.201cm">
            <draw:text-box>
              <text:p text:style-name="P70"><text:span text:style-name="T21">dcpu_if.dc_stall</text:span></text:p>
            </draw:text-box>
          </draw:frame>
          <draw:g draw:style-name="gr1">
            <draw:custom-shape draw:style-name="gr165" draw:text-style-name="P14" draw:layer="layout" svg:width="0.4cm" svg:height="0.4cm" svg:x="76.792cm" svg:y="17.802cm">
              <text:p/>
              <draw:enhanced-geometry svg:viewBox="0 0 21600 21600" draw:type="rectangle" draw:enhanced-path="M 0 0 L 21600 0 21600 21600 0 21600 0 0 Z N"/>
            </draw:custom-shape>
            <draw:line draw:style-name="gr547" draw:text-style-name="P47" draw:layer="layout" svg:x1="76.792cm" svg:y1="17.802cm" svg:x2="77.192cm" svg:y2="18.202cm">
              <text:p/>
            </draw:line>
            <draw:line draw:style-name="gr547" draw:text-style-name="P47" draw:layer="layout" svg:x1="76.792cm" svg:y1="18.202cm" svg:x2="77.192cm" svg:y2="17.802cm">
              <text:p/>
            </draw:line>
          </draw:g>
          <draw:frame draw:style-name="gr670" draw:text-style-name="P71" draw:layer="layout" svg:width="3.338cm" svg:height="0.569cm" svg:x="73.592cm" svg:y="17.702cm">
            <draw:text-box>
              <text:p text:style-name="P70"><text:span text:style-name="T21">dcpu_if.dc_flush_</text:span><text:span text:style-name="T21">done</text:span></text:p>
            </draw:text-box>
          </draw:frame>
          <draw:g draw:style-name="gr1">
            <draw:custom-shape draw:style-name="gr165" draw:text-style-name="P14" draw:layer="layout" svg:width="0.4cm" svg:height="0.4cm" svg:x="76.792cm" svg:y="18.302cm">
              <text:p/>
              <draw:enhanced-geometry svg:viewBox="0 0 21600 21600" draw:type="rectangle" draw:enhanced-path="M 0 0 L 21600 0 21600 21600 0 21600 0 0 Z N"/>
            </draw:custom-shape>
            <draw:line draw:style-name="gr547" draw:text-style-name="P47" draw:layer="layout" svg:x1="76.792cm" svg:y1="18.302cm" svg:x2="77.192cm" svg:y2="18.702cm">
              <text:p/>
            </draw:line>
            <draw:line draw:style-name="gr547" draw:text-style-name="P47" draw:layer="layout" svg:x1="76.792cm" svg:y1="18.702cm" svg:x2="77.192cm" svg:y2="18.302cm">
              <text:p/>
            </draw:line>
          </draw:g>
          <draw:frame draw:style-name="gr670" draw:text-style-name="P71" draw:layer="layout" svg:width="2.297cm" svg:height="0.569cm" svg:x="74.633cm" svg:y="18.202cm">
            <draw:text-box>
              <text:p text:style-name="P70"><text:span text:style-name="T21">dcpu_if.dc_</text:span><text:span text:style-name="T21">err</text:span></text:p>
            </draw:text-box>
          </draw:frame>
          <draw:g draw:style-name="gr1">
            <draw:custom-shape draw:style-name="gr165" draw:text-style-name="P14" draw:layer="layout" svg:width="0.4cm" svg:height="0.4cm" svg:x="76.792cm" svg:y="18.802cm">
              <text:p/>
              <draw:enhanced-geometry svg:viewBox="0 0 21600 21600" draw:type="rectangle" draw:enhanced-path="M 0 0 L 21600 0 21600 21600 0 21600 0 0 Z N"/>
            </draw:custom-shape>
            <draw:line draw:style-name="gr547" draw:text-style-name="P47" draw:layer="layout" svg:x1="76.792cm" svg:y1="18.802cm" svg:x2="77.192cm" svg:y2="19.202cm">
              <text:p/>
            </draw:line>
            <draw:line draw:style-name="gr547" draw:text-style-name="P47" draw:layer="layout" svg:x1="76.792cm" svg:y1="19.202cm" svg:x2="77.192cm" svg:y2="18.802cm">
              <text:p/>
            </draw:line>
          </draw:g>
          <draw:frame draw:style-name="gr670" draw:text-style-name="P71" draw:layer="layout" svg:width="2.598cm" svg:height="0.569cm" svg:x="74.332cm" svg:y="18.702cm">
            <draw:text-box>
              <text:p text:style-name="P70"><text:span text:style-name="T21">dcp</text:span><text:span text:style-name="T21">u_if</text:span><text:span text:style-name="T21">.dc</text:span><text:span text:style-name="T21">_rd</text:span><text:span text:style-name="T21">ata</text:span></text:p>
            </draw:text-box>
          </draw:frame>
          <draw:g draw:style-name="gr1">
            <draw:custom-shape draw:style-name="gr165" draw:text-style-name="P14" draw:layer="layout" svg:width="0.4cm" svg:height="0.4cm" svg:x="76.792cm" svg:y="19.303cm">
              <text:p/>
              <draw:enhanced-geometry svg:viewBox="0 0 21600 21600" draw:type="rectangle" draw:enhanced-path="M 0 0 L 21600 0 21600 21600 0 21600 0 0 Z N"/>
            </draw:custom-shape>
            <draw:line draw:style-name="gr547" draw:text-style-name="P47" draw:layer="layout" svg:x1="76.792cm" svg:y1="19.303cm" svg:x2="77.192cm" svg:y2="19.703cm">
              <text:p/>
            </draw:line>
            <draw:line draw:style-name="gr547" draw:text-style-name="P47" draw:layer="layout" svg:x1="76.792cm" svg:y1="19.703cm" svg:x2="77.192cm" svg:y2="19.303cm">
              <text:p/>
            </draw:line>
          </draw:g>
          <draw:frame draw:style-name="gr670" draw:text-style-name="P71" draw:layer="layout" svg:width="2.627cm" svg:height="0.569cm" svg:x="74.303cm" svg:y="19.203cm">
            <draw:text-box>
              <text:p text:style-name="P70"><text:span text:style-name="T21">dcpu_if.d</text:span><text:span text:style-name="T21">c_rvalid</text:span></text:p>
            </draw:text-box>
          </draw:frame>
          <draw:custom-shape draw:style-name="gr920" draw:text-style-name="P43" draw:layer="layout" svg:width="7cm" svg:height="4cm" svg:x="70cm" svg:y="17cm">
            <text:p/>
            <draw:enhanced-geometry svg:viewBox="0 0 21600 21600" draw:type="rectangle" draw:enhanced-path="M 0 0 L 21600 0 21600 21600 0 21600 0 0 Z N"/>
          </draw:custom-shape>
          <draw:frame draw:style-name="gr552" draw:text-style-name="P44" draw:layer="layout" svg:width="2.14cm" svg:height="0.569cm" svg:x="73cm" svg:y="20cm">
            <draw:text-box>
              <text:p><text:span text:style-name="T12">Cache: </text:span><text:span text:style-name="T12">Data</text:span></text:p>
            </draw:text-box>
          </draw:frame>
        </draw:g>
        <draw:g draw:style-name="gr1">
          <draw:g draw:style-name="gr1">
            <draw:custom-shape draw:style-name="gr165" draw:text-style-name="P14" draw:layer="layout" svg:width="0.4cm" svg:height="0.4cm" svg:x="4.692cm" svg:y="9.3cm">
              <text:p/>
              <draw:enhanced-geometry svg:viewBox="0 0 21600 21600" draw:type="rectangle" draw:enhanced-path="M 0 0 L 21600 0 21600 21600 0 21600 0 0 Z N"/>
            </draw:custom-shape>
            <draw:line draw:style-name="gr547" draw:text-style-name="P47" draw:layer="layout" svg:x1="4.692cm" svg:y1="9.3cm" svg:x2="5.092cm" svg:y2="9.7cm">
              <text:p/>
            </draw:line>
            <draw:line draw:style-name="gr547" draw:text-style-name="P47" draw:layer="layout" svg:x1="4.692cm" svg:y1="9.7cm" svg:x2="5.092cm" svg:y2="9.3cm">
              <text:p/>
            </draw:line>
          </draw:g>
          <draw:frame draw:style-name="gr670" draw:text-style-name="P71" draw:layer="layout" svg:width="2.331cm" svg:height="0.569cm" svg:x="4.992cm" svg:y="9.2cm">
            <draw:text-box>
              <text:p text:style-name="P70"><text:span text:style-name="T21">icpu_if.ic_addr</text:span></text:p>
            </draw:text-box>
          </draw:frame>
          <draw:g draw:style-name="gr1">
            <draw:custom-shape draw:style-name="gr165" draw:text-style-name="P14" draw:layer="layout" svg:width="0.4cm" svg:height="0.4cm" svg:x="4.692cm" svg:y="10.303cm">
              <text:p/>
              <draw:enhanced-geometry svg:viewBox="0 0 21600 21600" draw:type="rectangle" draw:enhanced-path="M 0 0 L 21600 0 21600 21600 0 21600 0 0 Z N"/>
            </draw:custom-shape>
            <draw:line draw:style-name="gr547" draw:text-style-name="P47" draw:layer="layout" svg:x1="4.692cm" svg:y1="10.303cm" svg:x2="5.092cm" svg:y2="10.703cm">
              <text:p/>
            </draw:line>
            <draw:line draw:style-name="gr547" draw:text-style-name="P47" draw:layer="layout" svg:x1="4.692cm" svg:y1="10.703cm" svg:x2="5.092cm" svg:y2="10.303cm">
              <text:p/>
            </draw:line>
          </draw:g>
          <draw:frame draw:style-name="gr670" draw:text-style-name="P71" draw:layer="layout" svg:width="2.17cm" svg:height="0.569cm" svg:x="4.992cm" svg:y="10.203cm">
            <draw:text-box>
              <text:p text:style-name="P70"><text:span text:style-name="T21">icpu_if.ic_req</text:span></text:p>
            </draw:text-box>
          </draw:frame>
          <draw:g draw:style-name="gr1">
            <draw:custom-shape draw:style-name="gr165" draw:text-style-name="P14" draw:layer="layout" svg:width="0.4cm" svg:height="0.4cm" svg:x="4.692cm" svg:y="9.803cm">
              <text:p/>
              <draw:enhanced-geometry svg:viewBox="0 0 21600 21600" draw:type="rectangle" draw:enhanced-path="M 0 0 L 21600 0 21600 21600 0 21600 0 0 Z N"/>
            </draw:custom-shape>
            <draw:line draw:style-name="gr547" draw:text-style-name="P47" draw:layer="layout" svg:x1="4.692cm" svg:y1="9.803cm" svg:x2="5.092cm" svg:y2="10.203cm">
              <text:p/>
            </draw:line>
            <draw:line draw:style-name="gr547" draw:text-style-name="P47" draw:layer="layout" svg:x1="4.692cm" svg:y1="10.203cm" svg:x2="5.092cm" svg:y2="9.803cm">
              <text:p/>
            </draw:line>
          </draw:g>
          <draw:frame draw:style-name="gr670" draw:text-style-name="P71" draw:layer="layout" svg:width="2.36cm" svg:height="0.569cm" svg:x="4.992cm" svg:y="9.703cm">
            <draw:text-box>
              <text:p text:style-name="P70"><text:span text:style-name="T21">icpu_if.ic_flush</text:span></text:p>
            </draw:text-box>
          </draw:frame>
          <draw:g draw:style-name="gr1">
            <draw:custom-shape draw:style-name="gr165" draw:text-style-name="P14" draw:layer="layout" svg:width="0.4cm" svg:height="0.4cm" svg:x="11.792cm" svg:y="9.301cm">
              <text:p/>
              <draw:enhanced-geometry svg:viewBox="0 0 21600 21600" draw:type="rectangle" draw:enhanced-path="M 0 0 L 21600 0 21600 21600 0 21600 0 0 Z N"/>
            </draw:custom-shape>
            <draw:line draw:style-name="gr547" draw:text-style-name="P47" draw:layer="layout" svg:x1="11.792cm" svg:y1="9.301cm" svg:x2="12.192cm" svg:y2="9.701cm">
              <text:p/>
            </draw:line>
            <draw:line draw:style-name="gr547" draw:text-style-name="P47" draw:layer="layout" svg:x1="11.792cm" svg:y1="9.701cm" svg:x2="12.192cm" svg:y2="9.301cm">
              <text:p/>
            </draw:line>
          </draw:g>
          <draw:frame draw:style-name="gr670" draw:text-style-name="P71" draw:layer="layout" svg:width="2.267cm" svg:height="0.569cm" svg:x="9.476cm" svg:y="9.201cm">
            <draw:text-box>
              <text:p text:style-name="P70"><text:span text:style-name="T21">icpu_if.ic_stall</text:span></text:p>
            </draw:text-box>
          </draw:frame>
          <draw:g draw:style-name="gr1">
            <draw:custom-shape draw:style-name="gr165" draw:text-style-name="P14" draw:layer="layout" svg:width="0.4cm" svg:height="0.4cm" svg:x="11.792cm" svg:y="9.802cm">
              <text:p/>
              <draw:enhanced-geometry svg:viewBox="0 0 21600 21600" draw:type="rectangle" draw:enhanced-path="M 0 0 L 21600 0 21600 21600 0 21600 0 0 Z N"/>
            </draw:custom-shape>
            <draw:line draw:style-name="gr547" draw:text-style-name="P47" draw:layer="layout" svg:x1="11.792cm" svg:y1="9.802cm" svg:x2="12.192cm" svg:y2="10.202cm">
              <text:p/>
            </draw:line>
            <draw:line draw:style-name="gr547" draw:text-style-name="P47" draw:layer="layout" svg:x1="11.792cm" svg:y1="10.202cm" svg:x2="12.192cm" svg:y2="9.802cm">
              <text:p/>
            </draw:line>
          </draw:g>
          <draw:frame draw:style-name="gr670" draw:text-style-name="P71" draw:layer="layout" svg:width="3.148cm" svg:height="0.569cm" svg:x="8.592cm" svg:y="9.702cm">
            <draw:text-box>
              <text:p text:style-name="P70"><text:span text:style-name="T21">icpu_if.ic_flush_d</text:span><text:span text:style-name="T21">one</text:span></text:p>
            </draw:text-box>
          </draw:frame>
          <draw:g draw:style-name="gr1">
            <draw:custom-shape draw:style-name="gr165" draw:text-style-name="P14" draw:layer="layout" svg:width="0.4cm" svg:height="0.4cm" svg:x="11.792cm" svg:y="10.302cm">
              <text:p/>
              <draw:enhanced-geometry svg:viewBox="0 0 21600 21600" draw:type="rectangle" draw:enhanced-path="M 0 0 L 21600 0 21600 21600 0 21600 0 0 Z N"/>
            </draw:custom-shape>
            <draw:line draw:style-name="gr547" draw:text-style-name="P47" draw:layer="layout" svg:x1="11.792cm" svg:y1="10.302cm" svg:x2="12.192cm" svg:y2="10.702cm">
              <text:p/>
            </draw:line>
            <draw:line draw:style-name="gr547" draw:text-style-name="P47" draw:layer="layout" svg:x1="11.792cm" svg:y1="10.702cm" svg:x2="12.192cm" svg:y2="10.302cm">
              <text:p/>
            </draw:line>
          </draw:g>
          <draw:frame draw:style-name="gr670" draw:text-style-name="P71" draw:layer="layout" svg:width="2.106cm" svg:height="0.569cm" svg:x="9.633cm" svg:y="10.202cm">
            <draw:text-box>
              <text:p text:style-name="P70"><text:span text:style-name="T21">icpu_if.ic_err</text:span></text:p>
            </draw:text-box>
          </draw:frame>
          <draw:g draw:style-name="gr1">
            <draw:custom-shape draw:style-name="gr165" draw:text-style-name="P14" draw:layer="layout" svg:width="0.4cm" svg:height="0.4cm" svg:x="11.792cm" svg:y="10.802cm">
              <text:p/>
              <draw:enhanced-geometry svg:viewBox="0 0 21600 21600" draw:type="rectangle" draw:enhanced-path="M 0 0 L 21600 0 21600 21600 0 21600 0 0 Z N"/>
            </draw:custom-shape>
            <draw:line draw:style-name="gr547" draw:text-style-name="P47" draw:layer="layout" svg:x1="11.792cm" svg:y1="10.802cm" svg:x2="12.192cm" svg:y2="11.202cm">
              <text:p/>
            </draw:line>
            <draw:line draw:style-name="gr547" draw:text-style-name="P47" draw:layer="layout" svg:x1="11.792cm" svg:y1="11.202cm" svg:x2="12.192cm" svg:y2="10.802cm">
              <text:p/>
            </draw:line>
          </draw:g>
          <draw:frame draw:style-name="gr670" draw:text-style-name="P71" draw:layer="layout" svg:width="2.407cm" svg:height="0.569cm" svg:x="9.332cm" svg:y="10.702cm">
            <draw:text-box>
              <text:p text:style-name="P70"><text:span text:style-name="T21">icpu_if.ic_rdata</text:span></text:p>
            </draw:text-box>
          </draw:frame>
          <draw:g draw:style-name="gr1">
            <draw:custom-shape draw:style-name="gr165" draw:text-style-name="P14" draw:layer="layout" svg:width="0.4cm" svg:height="0.4cm" svg:x="11.792cm" svg:y="11.303cm">
              <text:p/>
              <draw:enhanced-geometry svg:viewBox="0 0 21600 21600" draw:type="rectangle" draw:enhanced-path="M 0 0 L 21600 0 21600 21600 0 21600 0 0 Z N"/>
            </draw:custom-shape>
            <draw:line draw:style-name="gr547" draw:text-style-name="P47" draw:layer="layout" svg:x1="11.792cm" svg:y1="11.303cm" svg:x2="12.192cm" svg:y2="11.703cm">
              <text:p/>
            </draw:line>
            <draw:line draw:style-name="gr547" draw:text-style-name="P47" draw:layer="layout" svg:x1="11.792cm" svg:y1="11.703cm" svg:x2="12.192cm" svg:y2="11.303cm">
              <text:p/>
            </draw:line>
          </draw:g>
          <draw:frame draw:style-name="gr670" draw:text-style-name="P71" draw:layer="layout" svg:width="2.441cm" svg:height="0.569cm" svg:x="9.303cm" svg:y="11.203cm">
            <draw:text-box>
              <text:p text:style-name="P70"><text:span text:style-name="T21">icpu_if.ic_rvalid</text:span></text:p>
            </draw:text-box>
          </draw:frame>
          <draw:custom-shape draw:style-name="gr921" draw:text-style-name="P43" draw:layer="layout" svg:width="7.1cm" svg:height="3cm" svg:x="4.9cm" svg:y="9cm">
            <text:p/>
            <draw:enhanced-geometry svg:viewBox="0 0 21600 21600" draw:type="rectangle" draw:enhanced-path="M 0 0 L 21600 0 21600 21600 0 21600 0 0 Z N"/>
          </draw:custom-shape>
          <draw:frame draw:style-name="gr552" draw:text-style-name="P44" draw:layer="layout" svg:width="2.991cm" svg:height="0.569cm" svg:x="6cm" svg:y="10.9cm">
            <draw:text-box>
              <text:p><text:span text:style-name="T12">Cache: </text:span><text:span text:style-name="T12">Instruction</text:span></text:p>
            </draw:text-box>
          </draw:frame>
        </draw:g>
        <draw:g draw:style-name="gr1">
          <draw:g draw:style-name="gr66">
            <draw:glue-point draw:id="4" svg:x="-5cm" svg:y="-2.5cm"/>
            <draw:glue-point draw:id="5" svg:x="-5cm" svg:y="2.5cm"/>
            <draw:rect draw:style-name="gr922" draw:text-style-name="P45" draw:layer="layout" svg:width="1cm" svg:height="1cm" svg:x="40cm" svg:y="40cm">
              <text:p text:style-name="P15"><text:span text:style-name="T11">&amp;</text:span></text:p>
            </draw:rect>
            <draw:line draw:style-name="gr923" draw:text-style-name="P17" draw:layer="layout" svg:x1="39.5cm" svg:y1="40.25cm" svg:x2="40cm" svg:y2="40.25cm">
              <text:p/>
            </draw:line>
            <draw:line draw:style-name="gr924" draw:text-style-name="P17" draw:layer="layout" svg:x1="39.5cm" svg:y1="40.75cm" svg:x2="40cm" svg:y2="40.75cm">
              <text:p/>
            </draw:line>
            <draw:line draw:style-name="gr925" draw:text-style-name="P17" draw:layer="layout" svg:x1="41cm" svg:y1="40.5cm" svg:x2="41.5cm" svg:y2="40.5cm">
              <text:p/>
            </draw:line>
            <draw:line draw:style-name="gr926" draw:text-style-name="P21" draw:layer="layout" svg:x1="39.5cm" svg:y1="40.5cm" svg:x2="40cm" svg:y2="40.5cm">
              <text:p/>
            </draw:line>
          </draw:g>
          <draw:frame draw:style-name="gr756" draw:text-style-name="P37" draw:layer="layout" svg:width="1.92cm" svg:height="0.569cm" svg:x="40.9cm" svg:y="40cm">
            <draw:text-box>
              <text:p><text:span text:style-name="T10">id_is_csr_s</text:span></text:p>
            </draw:text-box>
          </draw:frame>
          <draw:line draw:style-name="gr38" draw:text-style-name="P4" draw:layer="layout" svg:x1="39cm" svg:y1="40cm" svg:x2="39.5cm" svg:y2="40cm">
            <text:p/>
          </draw:line>
          <draw:line draw:style-name="gr38" draw:text-style-name="P4" draw:layer="layout" svg:x1="39cm" svg:y1="41cm" svg:x2="39.5cm" svg:y2="41cm">
            <text:p/>
          </draw:line>
          <draw:line draw:style-name="gr38" draw:text-style-name="P4" draw:layer="layout" svg:x1="39.5cm" svg:y1="40cm" svg:x2="39.5cm" svg:y2="40.25cm">
            <text:p/>
          </draw:line>
          <draw:line draw:style-name="gr38" draw:text-style-name="P4" draw:layer="layout" svg:x1="39.5cm" svg:y1="41cm" svg:x2="39.5cm" svg:y2="40.75cm">
            <text:p/>
          </draw:line>
          <draw:line draw:style-name="gr38" draw:text-style-name="P4" draw:layer="layout" svg:x1="39cm" svg:y1="40.5cm" svg:x2="39.5cm" svg:y2="40.5cm">
            <text:p/>
          </draw:line>
          <draw:frame draw:style-name="gr756" draw:text-style-name="P37" draw:layer="layout" svg:width="2.013cm" svg:height="0.569cm" svg:x="37.6cm" svg:y="39.501cm">
            <draw:text-box>
              <text:p><text:span text:style-name="T10">if_id_valid_r</text:span></text:p>
            </draw:text-box>
          </draw:frame>
          <draw:frame draw:style-name="gr756" draw:text-style-name="P37" draw:layer="layout" svg:width="4.05cm" svg:height="0.569cm" svg:x="35.601cm" svg:y="40.002cm">
            <draw:text-box>
              <text:p><text:span text:style-name="T10">if_id_instr_r[6:0] </text:span><text:span text:style-name="T10">== 1110011</text:span></text:p>
            </draw:text-box>
          </draw:frame>
          <draw:frame draw:style-name="gr756" draw:text-style-name="P37" draw:layer="layout" svg:width="3.796cm" svg:height="0.569cm" svg:x="35.801cm" svg:y="40.503cm">
            <draw:text-box>
              <text:p><text:span text:style-name="T10">if_id_instr_r[14:1</text:span><text:span text:style-name="T10">2] == 000</text:span></text:p>
            </draw:text-box>
          </draw:frame>
        </draw:g>
        <draw:g draw:style-name="gr1">
          <draw:g draw:style-name="gr66">
            <draw:glue-point draw:id="4" svg:x="-5cm" svg:y="-2.5cm"/>
            <draw:glue-point draw:id="5" svg:x="-5cm" svg:y="2.5cm"/>
            <draw:rect draw:style-name="gr927" draw:text-style-name="P45" draw:layer="layout" svg:width="1cm" svg:height="1cm" svg:x="40.001cm" svg:y="42.001cm">
              <text:p text:style-name="P15"><text:span text:style-name="T11">&amp;</text:span></text:p>
            </draw:rect>
            <draw:line draw:style-name="gr928" draw:text-style-name="P17" draw:layer="layout" svg:x1="39.501cm" svg:y1="42.251cm" svg:x2="40.001cm" svg:y2="42.251cm">
              <text:p/>
            </draw:line>
            <draw:line draw:style-name="gr929" draw:text-style-name="P17" draw:layer="layout" svg:x1="39.501cm" svg:y1="42.751cm" svg:x2="40.001cm" svg:y2="42.751cm">
              <text:p/>
            </draw:line>
            <draw:line draw:style-name="gr930" draw:text-style-name="P17" draw:layer="layout" svg:x1="41.001cm" svg:y1="42.501cm" svg:x2="41.501cm" svg:y2="42.501cm">
              <text:p/>
            </draw:line>
            <draw:line draw:style-name="gr931" draw:text-style-name="P21" draw:layer="layout" svg:x1="39.501cm" svg:y1="42.501cm" svg:x2="40.001cm" svg:y2="42.501cm">
              <text:p/>
            </draw:line>
          </draw:g>
          <draw:frame draw:style-name="gr756" draw:text-style-name="P37" draw:layer="layout" svg:width="1.996cm" svg:height="0.569cm" svg:x="40.901cm" svg:y="42.001cm">
            <draw:text-box>
              <text:p><text:span text:style-name="T10">ex_is_csr_s</text:span></text:p>
            </draw:text-box>
          </draw:frame>
          <draw:line draw:style-name="gr38" draw:text-style-name="P4" draw:layer="layout" svg:x1="39.001cm" svg:y1="42.001cm" svg:x2="39.501cm" svg:y2="42.001cm">
            <text:p/>
          </draw:line>
          <draw:line draw:style-name="gr38" draw:text-style-name="P4" draw:layer="layout" svg:x1="39.001cm" svg:y1="43.001cm" svg:x2="39.501cm" svg:y2="43.001cm">
            <text:p/>
          </draw:line>
          <draw:line draw:style-name="gr38" draw:text-style-name="P4" draw:layer="layout" svg:x1="39.501cm" svg:y1="42.001cm" svg:x2="39.501cm" svg:y2="42.251cm">
            <text:p/>
          </draw:line>
          <draw:line draw:style-name="gr38" draw:text-style-name="P4" draw:layer="layout" svg:x1="39.501cm" svg:y1="43.001cm" svg:x2="39.501cm" svg:y2="42.751cm">
            <text:p/>
          </draw:line>
          <draw:line draw:style-name="gr38" draw:text-style-name="P4" draw:layer="layout" svg:x1="39.001cm" svg:y1="42.501cm" svg:x2="39.501cm" svg:y2="42.501cm">
            <text:p/>
          </draw:line>
          <draw:frame draw:style-name="gr756" draw:text-style-name="P37" draw:layer="layout" svg:width="2.17cm" svg:height="0.569cm" svg:x="37.601cm" svg:y="41.502cm">
            <draw:text-box>
              <text:p><text:span text:style-name="T10">id_ex_valid_r</text:span></text:p>
            </draw:text-box>
          </draw:frame>
          <draw:frame draw:style-name="gr756" draw:text-style-name="P37" draw:layer="layout" svg:width="4.206cm" svg:height="0.569cm" svg:x="35.602cm" svg:y="42.003cm">
            <draw:text-box>
              <text:p><text:span text:style-name="T10">id_ex_instr_r[6:0] </text:span><text:span text:style-name="T10">== 1110011</text:span></text:p>
            </draw:text-box>
          </draw:frame>
          <draw:frame draw:style-name="gr756" draw:text-style-name="P37" draw:layer="layout" svg:width="3.952cm" svg:height="0.569cm" svg:x="35.802cm" svg:y="42.504cm">
            <draw:text-box>
              <text:p><text:span text:style-name="T10">id_ex_instr_r[14:</text:span><text:span text:style-name="T10">12] == 000</text:span></text:p>
            </draw:text-box>
          </draw:frame>
        </draw:g>
        <draw:g draw:style-name="gr1">
          <draw:g draw:style-name="gr66">
            <draw:glue-point draw:id="4" svg:x="-5cm" svg:y="-2.5cm"/>
            <draw:glue-point draw:id="5" svg:x="-5cm" svg:y="2.5cm"/>
            <draw:rect draw:style-name="gr932" draw:text-style-name="P45" draw:layer="layout" svg:width="1cm" svg:height="1cm" svg:x="40.002cm" svg:y="44.002cm">
              <text:p text:style-name="P15"><text:span text:style-name="T11">&amp;</text:span></text:p>
            </draw:rect>
            <draw:line draw:style-name="gr933" draw:text-style-name="P17" draw:layer="layout" svg:x1="39.502cm" svg:y1="44.252cm" svg:x2="40.002cm" svg:y2="44.252cm">
              <text:p/>
            </draw:line>
            <draw:line draw:style-name="gr934" draw:text-style-name="P17" draw:layer="layout" svg:x1="39.502cm" svg:y1="44.752cm" svg:x2="40.002cm" svg:y2="44.752cm">
              <text:p/>
            </draw:line>
            <draw:line draw:style-name="gr935" draw:text-style-name="P17" draw:layer="layout" svg:x1="41.002cm" svg:y1="44.502cm" svg:x2="41.502cm" svg:y2="44.502cm">
              <text:p/>
            </draw:line>
            <draw:line draw:style-name="gr936" draw:text-style-name="P21" draw:layer="layout" svg:x1="39.502cm" svg:y1="44.502cm" svg:x2="40.002cm" svg:y2="44.502cm">
              <text:p/>
            </draw:line>
          </draw:g>
          <draw:frame draw:style-name="gr756" draw:text-style-name="P37" draw:layer="layout" svg:width="2.327cm" svg:height="0.569cm" svg:x="40.902cm" svg:y="44.002cm">
            <draw:text-box>
              <text:p><text:span text:style-name="T10">mem_is_csr_s</text:span></text:p>
            </draw:text-box>
          </draw:frame>
          <draw:line draw:style-name="gr38" draw:text-style-name="P4" draw:layer="layout" svg:x1="39.002cm" svg:y1="44.002cm" svg:x2="39.502cm" svg:y2="44.002cm">
            <text:p/>
          </draw:line>
          <draw:line draw:style-name="gr38" draw:text-style-name="P4" draw:layer="layout" svg:x1="39.002cm" svg:y1="45.002cm" svg:x2="39.502cm" svg:y2="45.002cm">
            <text:p/>
          </draw:line>
          <draw:line draw:style-name="gr38" draw:text-style-name="P4" draw:layer="layout" svg:x1="39.502cm" svg:y1="44.002cm" svg:x2="39.502cm" svg:y2="44.252cm">
            <text:p/>
          </draw:line>
          <draw:line draw:style-name="gr38" draw:text-style-name="P4" draw:layer="layout" svg:x1="39.502cm" svg:y1="45.002cm" svg:x2="39.502cm" svg:y2="44.752cm">
            <text:p/>
          </draw:line>
          <draw:line draw:style-name="gr38" draw:text-style-name="P4" draw:layer="layout" svg:x1="39.002cm" svg:y1="44.502cm" svg:x2="39.502cm" svg:y2="44.502cm">
            <text:p/>
          </draw:line>
          <draw:frame draw:style-name="gr756" draw:text-style-name="P37" draw:layer="layout" svg:width="2.581cm" svg:height="0.569cm" svg:x="37.402cm" svg:y="43.503cm">
            <draw:text-box>
              <text:p><text:span text:style-name="T10">ex_mem_valid_r</text:span></text:p>
            </draw:text-box>
          </draw:frame>
          <draw:frame draw:style-name="gr756" draw:text-style-name="P37" draw:layer="layout" svg:width="4.617cm" svg:height="0.569cm" svg:x="35.403cm" svg:y="44.004cm">
            <draw:text-box>
              <text:p><text:span text:style-name="T10">ex_mem_instr_r[</text:span><text:span text:style-name="T10">6:0] == 1110011</text:span></text:p>
            </draw:text-box>
          </draw:frame>
          <draw:frame draw:style-name="gr756" draw:text-style-name="P37" draw:layer="layout" svg:width="4.363cm" svg:height="0.569cm" svg:x="35.603cm" svg:y="44.505cm">
            <draw:text-box>
              <text:p><text:span text:style-name="T10">ex_mem_instr_r[</text:span><text:span text:style-name="T10">14:12] == 000</text:span></text:p>
            </draw:text-box>
          </draw:frame>
        </draw:g>
        <draw:g draw:style-name="gr1">
          <draw:g draw:style-name="gr66">
            <draw:glue-point draw:id="4" svg:x="-5cm" svg:y="-2.5cm"/>
            <draw:glue-point draw:id="5" svg:x="-5cm" svg:y="2.5cm"/>
            <draw:rect draw:style-name="gr937" draw:text-style-name="P45" draw:layer="layout" svg:width="1cm" svg:height="1cm" svg:x="40.002cm" svg:y="46.003cm">
              <text:p text:style-name="P15"><text:span text:style-name="T11">&amp;</text:span></text:p>
            </draw:rect>
            <draw:line draw:style-name="gr938" draw:text-style-name="P17" draw:layer="layout" svg:x1="39.502cm" svg:y1="46.253cm" svg:x2="40.002cm" svg:y2="46.253cm">
              <text:p/>
            </draw:line>
            <draw:line draw:style-name="gr939" draw:text-style-name="P17" draw:layer="layout" svg:x1="39.502cm" svg:y1="46.753cm" svg:x2="40.002cm" svg:y2="46.753cm">
              <text:p/>
            </draw:line>
            <draw:line draw:style-name="gr940" draw:text-style-name="P17" draw:layer="layout" svg:x1="41.002cm" svg:y1="46.503cm" svg:x2="41.502cm" svg:y2="46.503cm">
              <text:p/>
            </draw:line>
            <draw:line draw:style-name="gr941" draw:text-style-name="P21" draw:layer="layout" svg:x1="39.502cm" svg:y1="46.503cm" svg:x2="40.002cm" svg:y2="46.503cm">
              <text:p/>
            </draw:line>
          </draw:g>
          <draw:frame draw:style-name="gr756" draw:text-style-name="P37" draw:layer="layout" svg:width="2.06cm" svg:height="0.569cm" svg:x="40.902cm" svg:y="46.003cm">
            <draw:text-box>
              <text:p><text:span text:style-name="T10">wb_is_csr_s</text:span></text:p>
            </draw:text-box>
          </draw:frame>
          <draw:line draw:style-name="gr38" draw:text-style-name="P4" draw:layer="layout" svg:x1="39.002cm" svg:y1="46.003cm" svg:x2="39.502cm" svg:y2="46.003cm">
            <text:p/>
          </draw:line>
          <draw:line draw:style-name="gr38" draw:text-style-name="P4" draw:layer="layout" svg:x1="39.002cm" svg:y1="47.003cm" svg:x2="39.502cm" svg:y2="47.003cm">
            <text:p/>
          </draw:line>
          <draw:line draw:style-name="gr38" draw:text-style-name="P4" draw:layer="layout" svg:x1="39.502cm" svg:y1="46.003cm" svg:x2="39.502cm" svg:y2="46.253cm">
            <text:p/>
          </draw:line>
          <draw:line draw:style-name="gr38" draw:text-style-name="P4" draw:layer="layout" svg:x1="39.502cm" svg:y1="47.003cm" svg:x2="39.502cm" svg:y2="46.753cm">
            <text:p/>
          </draw:line>
          <draw:line draw:style-name="gr38" draw:text-style-name="P4" draw:layer="layout" svg:x1="39.002cm" svg:y1="46.503cm" svg:x2="39.502cm" svg:y2="46.503cm">
            <text:p/>
          </draw:line>
          <draw:frame draw:style-name="gr756" draw:text-style-name="P37" draw:layer="layout" svg:width="2.644cm" svg:height="0.569cm" svg:x="37.202cm" svg:y="45.504cm">
            <draw:text-box>
              <text:p><text:span text:style-name="T10">mem_wb_valid_r</text:span></text:p>
            </draw:text-box>
          </draw:frame>
          <draw:frame draw:style-name="gr756" draw:text-style-name="P37" draw:layer="layout" svg:width="4.676cm" svg:height="0.569cm" svg:x="35.403cm" svg:y="46.005cm">
            <draw:text-box>
              <text:p><text:span text:style-name="T10">mem_wb_instr_r[</text:span><text:span text:style-name="T10">6:0] == 1110011</text:span></text:p>
            </draw:text-box>
          </draw:frame>
          <draw:frame draw:style-name="gr756" draw:text-style-name="P37" draw:layer="layout" svg:width="4.426cm" svg:height="0.569cm" svg:x="35.603cm" svg:y="46.506cm">
            <draw:text-box>
              <text:p><text:span text:style-name="T10">mem_wb_instr_r[</text:span><text:span text:style-name="T10">14:12] == 000</text:span></text:p>
            </draw:text-box>
          </draw:frame>
        </draw:g>
        <draw:line draw:style-name="gr38" draw:text-style-name="P4" draw:layer="layout" svg:x1="38cm" svg:y1="48cm" svg:x2="40cm" svg:y2="48cm">
          <text:p/>
        </draw:line>
        <draw:frame draw:style-name="gr756" draw:text-style-name="P37" draw:layer="layout" svg:width="4.227cm" svg:height="0.569cm" svg:x="37cm" svg:y="47.531cm">
          <draw:text-box>
            <text:p><text:span text:style-name="T10">if_id_instr_r[19:1</text:span><text:span text:style-name="T10">5] = id_rs1_s</text:span></text:p>
          </draw:text-box>
        </draw:frame>
        <draw:line draw:style-name="gr38" draw:text-style-name="P4" draw:layer="layout" svg:x1="38.001cm" svg:y1="49.001cm" svg:x2="40.001cm" svg:y2="49.001cm">
          <text:p/>
        </draw:line>
        <draw:frame draw:style-name="gr756" draw:text-style-name="P37" draw:layer="layout" svg:width="4.227cm" svg:height="0.569cm" svg:x="37.001cm" svg:y="48.532cm">
          <draw:text-box>
            <text:p><text:span text:style-name="T10">if_id_instr_r[24:2</text:span><text:span text:style-name="T10">0] = id_rs2_s</text:span></text:p>
          </draw:text-box>
        </draw:frame>
        <draw:line draw:style-name="gr38" draw:text-style-name="P4" draw:layer="layout" svg:x1="38cm" svg:y1="50cm" svg:x2="40cm" svg:y2="50cm">
          <text:p/>
        </draw:line>
        <draw:frame draw:style-name="gr756" draw:text-style-name="P37" draw:layer="layout" svg:width="4.464cm" svg:height="0.569cm" svg:x="37cm" svg:y="49.531cm">
          <draw:text-box>
            <text:p><text:span text:style-name="T10">id_ex_instr_r[19:</text:span><text:span text:style-name="T10">15] = ex_rs1_s</text:span></text:p>
          </draw:text-box>
        </draw:frame>
        <draw:line draw:style-name="gr38" draw:text-style-name="P4" draw:layer="layout" svg:x1="38.001cm" svg:y1="51.001cm" svg:x2="40.001cm" svg:y2="51.001cm">
          <text:p/>
        </draw:line>
        <draw:frame draw:style-name="gr756" draw:text-style-name="P37" draw:layer="layout" svg:width="4.464cm" svg:height="0.569cm" svg:x="37.001cm" svg:y="50.532cm">
          <draw:text-box>
            <text:p><text:span text:style-name="T10">id_ex_instr_r[24:</text:span><text:span text:style-name="T10">20] = ex_rs2_s</text:span></text:p>
          </draw:text-box>
        </draw:frame>
        <draw:line draw:style-name="gr38" draw:text-style-name="P4" draw:layer="layout" svg:x1="46.001cm" svg:y1="48.002cm" svg:x2="48.001cm" svg:y2="48.002cm">
          <text:p/>
        </draw:line>
        <draw:frame draw:style-name="gr756" draw:text-style-name="P37" draw:layer="layout" svg:width="4.143cm" svg:height="0.569cm" svg:x="45.001cm" svg:y="47.533cm">
          <draw:text-box>
            <text:p><text:span text:style-name="T10">id_ex_instr_r[11:7</text:span><text:span text:style-name="T10">] = ex_rd_s</text:span></text:p>
          </draw:text-box>
        </draw:frame>
        <draw:line draw:style-name="gr38" draw:text-style-name="P4" draw:layer="layout" svg:x1="46.002cm" svg:y1="49.003cm" svg:x2="48.002cm" svg:y2="49.003cm">
          <text:p/>
        </draw:line>
        <draw:frame draw:style-name="gr756" draw:text-style-name="P37" draw:layer="layout" svg:width="4.884cm" svg:height="0.569cm" svg:x="45.002cm" svg:y="48.534cm">
          <draw:text-box>
            <text:p><text:span text:style-name="T10">ex_mem_instr_r[</text:span><text:span text:style-name="T10">11:7] = </text:span><text:span text:style-name="T10">mem_rd_s</text:span></text:p>
          </draw:text-box>
        </draw:frame>
        <draw:line draw:style-name="gr38" draw:text-style-name="P4" draw:layer="layout" svg:x1="46cm" svg:y1="50cm" svg:x2="48cm" svg:y2="50cm">
          <text:p/>
        </draw:line>
        <draw:frame draw:style-name="gr756" draw:text-style-name="P37" draw:layer="layout" svg:width="4.68cm" svg:height="0.569cm" svg:x="45.002cm" svg:y="49.535cm">
          <draw:text-box>
            <text:p><text:span text:style-name="T10">mem_wb_instr_r[</text:span><text:span text:style-name="T10">11:7] = wb_rd_s</text:span></text:p>
          </draw:text-box>
        </draw:frame>
        <draw:g draw:style-name="gr1">
          <draw:g draw:style-name="gr66">
            <draw:glue-point draw:id="4" svg:x="-5cm" svg:y="-2.5cm"/>
            <draw:glue-point draw:id="5" svg:x="-5cm" svg:y="2.5cm"/>
            <draw:rect draw:style-name="gr942" draw:text-style-name="P45" draw:layer="layout" svg:width="1cm" svg:height="1cm" svg:x="55cm" svg:y="33cm">
              <text:p text:style-name="P15"><text:span text:style-name="T11">≥</text:span><text:span text:style-name="T11">1</text:span></text:p>
            </draw:rect>
            <draw:line draw:style-name="gr943" draw:text-style-name="P17" draw:layer="layout" svg:x1="54.5cm" svg:y1="33.25cm" svg:x2="55cm" svg:y2="33.25cm">
              <text:p/>
            </draw:line>
            <draw:line draw:style-name="gr944" draw:text-style-name="P17" draw:layer="layout" svg:x1="54.5cm" svg:y1="33.75cm" svg:x2="55cm" svg:y2="33.75cm">
              <text:p/>
            </draw:line>
            <draw:line draw:style-name="gr945" draw:text-style-name="P17" draw:layer="layout" svg:x1="56cm" svg:y1="33.5cm" svg:x2="56.5cm" svg:y2="33.5cm">
              <text:p/>
            </draw:line>
            <draw:line draw:style-name="gr946" draw:text-style-name="P21" draw:layer="layout" svg:x1="54.5cm" svg:y1="33.5cm" svg:x2="55cm" svg:y2="33.5cm">
              <text:p/>
            </draw:line>
          </draw:g>
          <draw:line draw:style-name="gr38" draw:text-style-name="P4" draw:layer="layout" svg:x1="54.001cm" svg:y1="33.001cm" svg:x2="54.501cm" svg:y2="33.001cm">
            <text:p/>
          </draw:line>
          <draw:line draw:style-name="gr38" draw:text-style-name="P4" draw:layer="layout" svg:x1="54.001cm" svg:y1="34.001cm" svg:x2="54.501cm" svg:y2="34.001cm">
            <text:p/>
          </draw:line>
          <draw:line draw:style-name="gr38" draw:text-style-name="P4" draw:layer="layout" svg:x1="54.501cm" svg:y1="33.001cm" svg:x2="54.501cm" svg:y2="33.251cm">
            <text:p/>
          </draw:line>
          <draw:line draw:style-name="gr38" draw:text-style-name="P4" draw:layer="layout" svg:x1="54.501cm" svg:y1="34.001cm" svg:x2="54.501cm" svg:y2="33.751cm">
            <text:p/>
          </draw:line>
          <draw:line draw:style-name="gr38" draw:text-style-name="P4" draw:layer="layout" svg:x1="54.001cm" svg:y1="33.501cm" svg:x2="54.501cm" svg:y2="33.501cm">
            <text:p/>
          </draw:line>
          <draw:frame draw:style-name="gr947" draw:text-style-name="P64" draw:layer="layout" svg:width="1.399cm" svg:height="0.569cm" svg:x="55.9cm" svg:y="33.031cm">
            <draw:text-box>
              <text:p text:style-name="P63"><text:span text:style-name="T19">flush_s</text:span></text:p>
            </draw:text-box>
          </draw:frame>
          <draw:frame draw:style-name="gr756" draw:text-style-name="P64" draw:layer="layout" svg:width="2.974cm" svg:height="0.569cm" svg:x="51.657cm" svg:y="32.5cm">
            <draw:text-box>
              <text:p text:style-name="P63"><text:span text:style-name="T19">ex_branch_taken</text:span><text:span text:style-name="T19">_s</text:span></text:p>
            </draw:text-box>
          </draw:frame>
          <draw:frame draw:style-name="gr756" draw:text-style-name="P64" draw:layer="layout" svg:width="2.661cm" svg:height="0.569cm" svg:x="51.97cm" svg:y="33.001cm">
            <draw:text-box>
              <text:p text:style-name="P63"><text:span text:style-name="T19">wb_trap_taken_s</text:span></text:p>
            </draw:text-box>
          </draw:frame>
          <draw:frame draw:style-name="gr756" draw:text-style-name="P64" draw:layer="layout" svg:width="1.886cm" svg:height="0.569cm" svg:x="52.745cm" svg:y="33.502cm">
            <draw:text-box>
              <text:p text:style-name="P63"><text:span text:style-name="T19">wb_mret_s</text:span></text:p>
            </draw:text-box>
          </draw:frame>
        </draw:g>
        <draw:g draw:style-name="gr1">
          <draw:g draw:style-name="gr66">
            <draw:glue-point draw:id="4" svg:x="-5cm" svg:y="-2.5cm"/>
            <draw:glue-point draw:id="5" svg:x="-5cm" svg:y="2.5cm"/>
            <draw:rect draw:style-name="gr948" draw:text-style-name="P45" draw:layer="layout" svg:width="1cm" svg:height="1cm" svg:x="53.999cm" svg:y="34.999cm">
              <text:p text:style-name="P15"><text:span text:style-name="T11">&amp;</text:span></text:p>
            </draw:rect>
            <draw:line draw:style-name="gr949" draw:text-style-name="P17" draw:layer="layout" svg:x1="53.499cm" svg:y1="35.249cm" svg:x2="53.999cm" svg:y2="35.249cm">
              <text:p/>
            </draw:line>
            <draw:line draw:style-name="gr950" draw:text-style-name="P17" draw:layer="layout" svg:x1="53.499cm" svg:y1="35.749cm" svg:x2="53.999cm" svg:y2="35.749cm">
              <text:p/>
            </draw:line>
            <draw:line draw:style-name="gr951" draw:text-style-name="P17" draw:layer="layout" svg:x1="54.999cm" svg:y1="35.499cm" svg:x2="55.499cm" svg:y2="35.499cm">
              <text:p/>
            </draw:line>
            <draw:line draw:style-name="gr952" draw:text-style-name="P21" draw:layer="layout" svg:x1="53.499cm" svg:y1="35.499cm" svg:x2="53.999cm" svg:y2="35.499cm">
              <text:p/>
            </draw:line>
          </draw:g>
          <draw:frame draw:style-name="gr756" draw:text-style-name="P64" draw:layer="layout" svg:width="2.974cm" svg:height="0.569cm" svg:x="54.899cm" svg:y="34.999cm">
            <draw:text-box>
              <text:p text:style-name="P63"><text:span text:style-name="T19">ex_branch_taken</text:span><text:span text:style-name="T19">_s</text:span></text:p>
            </draw:text-box>
          </draw:frame>
          <draw:line draw:style-name="gr38" draw:text-style-name="P4" draw:layer="layout" svg:x1="52.999cm" svg:y1="34.999cm" svg:x2="53.499cm" svg:y2="34.999cm">
            <text:p/>
          </draw:line>
          <draw:line draw:style-name="gr38" draw:text-style-name="P4" draw:layer="layout" svg:x1="52.999cm" svg:y1="35.999cm" svg:x2="53.499cm" svg:y2="35.999cm">
            <text:p/>
          </draw:line>
          <draw:line draw:style-name="gr38" draw:text-style-name="P4" draw:layer="layout" svg:x1="53.499cm" svg:y1="34.999cm" svg:x2="53.499cm" svg:y2="35.249cm">
            <text:p/>
          </draw:line>
          <draw:line draw:style-name="gr38" draw:text-style-name="P4" draw:layer="layout" svg:x1="53.499cm" svg:y1="35.999cm" svg:x2="53.499cm" svg:y2="35.749cm">
            <text:p/>
          </draw:line>
          <draw:line draw:style-name="gr38" draw:text-style-name="P4" draw:layer="layout" svg:x1="52.999cm" svg:y1="35.499cm" svg:x2="53.499cm" svg:y2="35.499cm">
            <text:p/>
          </draw:line>
          <draw:frame draw:style-name="gr756" draw:text-style-name="P37" draw:layer="layout" svg:width="2.17cm" svg:height="0.569cm" svg:x="51.399cm" svg:y="34.5cm">
            <draw:text-box>
              <text:p><text:span text:style-name="T10">id_ex_valid_r</text:span></text:p>
            </draw:text-box>
          </draw:frame>
          <draw:frame draw:style-name="gr756" draw:text-style-name="P37" draw:layer="layout" svg:width="1.793cm" svg:height="0.569cm" svg:x="51.776cm" svg:y="35.001cm">
            <draw:text-box>
              <text:p><text:span text:style-name="T10">ex_take_s</text:span></text:p>
            </draw:text-box>
          </draw:frame>
          <draw:frame draw:style-name="gr756" draw:text-style-name="P68" draw:layer="layout" svg:width="2.297cm" svg:height="0.569cm" svg:x="51.272cm" svg:y="35.502cm">
            <draw:text-box>
              <text:p text:style-name="P67"><text:span text:style-name="T20">!global_stall_s</text:span></text:p>
            </draw:text-box>
          </draw:frame>
        </draw:g>
        <draw:g draw:style-name="gr1">
          <draw:g draw:style-name="gr66">
            <draw:rect draw:style-name="gr953" draw:text-style-name="P16" draw:layer="layout" svg:width="1cm" svg:height="1cm" svg:x="62cm" svg:y="37cm">
              <text:p text:style-name="P15"><text:span text:style-name="T5">1</text:span></text:p>
            </draw:rect>
            <draw:line draw:style-name="gr954" draw:text-style-name="P17" draw:layer="layout" svg:x1="61.5cm" svg:y1="37.5cm" svg:x2="62cm" svg:y2="37.5cm">
              <text:p/>
            </draw:line>
            <draw:circle draw:style-name="gr955" draw:text-style-name="P21" draw:layer="layout" svg:width="0.125cm" svg:height="0.126cm" svg:x="63cm" svg:y="37.437cm">
              <text:p/>
            </draw:circle>
            <draw:line draw:style-name="gr956" draw:text-style-name="P21" draw:layer="layout" svg:x1="63.125cm" svg:y1="37.5cm" svg:x2="63.5cm" svg:y2="37.5cm">
              <text:p/>
            </draw:line>
          </draw:g>
          <draw:g draw:style-name="gr66">
            <draw:rect draw:style-name="gr957" draw:text-style-name="P16" draw:layer="layout" svg:width="1cm" svg:height="1cm" svg:x="60cm" svg:y="33cm">
              <text:p text:style-name="P15"><text:span text:style-name="T5">1</text:span></text:p>
            </draw:rect>
            <draw:line draw:style-name="gr958" draw:text-style-name="P17" draw:layer="layout" svg:x1="59.5cm" svg:y1="33.5cm" svg:x2="60cm" svg:y2="33.5cm">
              <text:p/>
            </draw:line>
            <draw:circle draw:style-name="gr959" draw:text-style-name="P21" draw:layer="layout" svg:width="0.125cm" svg:height="0.126cm" svg:x="61cm" svg:y="33.437cm">
              <text:p/>
            </draw:circle>
            <draw:line draw:style-name="gr960" draw:text-style-name="P21" draw:layer="layout" svg:x1="61.125cm" svg:y1="33.5cm" svg:x2="61.5cm" svg:y2="33.5cm">
              <text:p/>
            </draw:line>
          </draw:g>
          <draw:g draw:style-name="gr66">
            <draw:rect draw:style-name="gr961" draw:text-style-name="P16" draw:layer="layout" svg:width="1cm" svg:height="1cm" svg:x="62cm" svg:y="36cm">
              <text:p text:style-name="P15"><text:span text:style-name="T5">1</text:span></text:p>
            </draw:rect>
            <draw:line draw:style-name="gr962" draw:text-style-name="P17" draw:layer="layout" svg:x1="61.5cm" svg:y1="36.5cm" svg:x2="62cm" svg:y2="36.5cm">
              <text:p/>
            </draw:line>
            <draw:circle draw:style-name="gr963" draw:text-style-name="P21" draw:layer="layout" svg:width="0.125cm" svg:height="0.126cm" svg:x="63cm" svg:y="36.437cm">
              <text:p/>
            </draw:circle>
            <draw:line draw:style-name="gr964" draw:text-style-name="P21" draw:layer="layout" svg:x1="63.125cm" svg:y1="36.5cm" svg:x2="63.5cm" svg:y2="36.5cm">
              <text:p/>
            </draw:line>
          </draw:g>
          <draw:g draw:style-name="gr66">
            <draw:glue-point draw:id="4" svg:x="5cm" svg:y="0cm"/>
            <draw:glue-point draw:id="5" svg:x="-5cm" svg:y="-2.5cm"/>
            <draw:glue-point draw:id="6" svg:x="-5.005cm" svg:y="2.5cm"/>
            <draw:rect draw:style-name="gr965" draw:text-style-name="P16" draw:layer="layout" svg:width="1cm" svg:height="1cm" svg:x="62cm" svg:y="34cm">
              <text:p text:style-name="P15"><text:span text:style-name="T4">&amp;</text:span></text:p>
            </draw:rect>
            <draw:line draw:style-name="gr966" draw:text-style-name="P17" draw:layer="layout" svg:x1="61.5cm" svg:y1="34.25cm" svg:x2="62cm" svg:y2="34.25cm">
              <text:p/>
            </draw:line>
            <draw:line draw:style-name="gr967" draw:text-style-name="P17" draw:layer="layout" svg:x1="61.5cm" svg:y1="34.75cm" svg:x2="62cm" svg:y2="34.75cm">
              <text:p/>
            </draw:line>
            <draw:line draw:style-name="gr968" draw:text-style-name="P17" draw:layer="layout" svg:x1="63cm" svg:y1="34.5cm" svg:x2="63.5cm" svg:y2="34.5cm">
              <text:p/>
            </draw:line>
          </draw:g>
          <draw:g draw:style-name="gr66">
            <draw:glue-point draw:id="4" svg:x="-5cm" svg:y="-2.5cm"/>
            <draw:glue-point draw:id="5" svg:x="-5cm" svg:y="2.5cm"/>
            <draw:rect draw:style-name="gr969" draw:text-style-name="P45" draw:layer="layout" svg:width="1cm" svg:height="1cm" svg:x="66cm" svg:y="36cm">
              <text:p text:style-name="P15"><text:span text:style-name="T11">&amp;</text:span></text:p>
            </draw:rect>
            <draw:line draw:style-name="gr970" draw:text-style-name="P17" draw:layer="layout" svg:x1="65.5cm" svg:y1="36.25cm" svg:x2="66cm" svg:y2="36.25cm">
              <text:p/>
            </draw:line>
            <draw:line draw:style-name="gr971" draw:text-style-name="P17" draw:layer="layout" svg:x1="65.5cm" svg:y1="36.75cm" svg:x2="66cm" svg:y2="36.75cm">
              <text:p/>
            </draw:line>
            <draw:line draw:style-name="gr972" draw:text-style-name="P17" draw:layer="layout" svg:x1="67cm" svg:y1="36.5cm" svg:x2="67.5cm" svg:y2="36.5cm">
              <text:p/>
            </draw:line>
            <draw:line draw:style-name="gr973" draw:text-style-name="P21" draw:layer="layout" svg:x1="65.5cm" svg:y1="36.5cm" svg:x2="66cm" svg:y2="36.5cm">
              <text:p/>
            </draw:line>
          </draw:g>
          <draw:g draw:style-name="gr66">
            <draw:glue-point draw:id="4" svg:x="-5cm" svg:y="-2.5cm"/>
            <draw:glue-point draw:id="5" svg:x="-5cm" svg:y="2.5cm"/>
            <draw:glue-point draw:id="6" svg:x="5cm" svg:y="0cm"/>
            <draw:rect draw:style-name="gr974" draw:text-style-name="P16" draw:layer="layout" svg:width="1cm" svg:height="1cm" svg:x="64cm" svg:y="35cm">
              <text:p text:style-name="P15"><text:span text:style-name="T8">≥</text:span><text:span text:style-name="T5">1</text:span></text:p>
            </draw:rect>
            <draw:line draw:style-name="gr975" draw:text-style-name="P17" draw:layer="layout" svg:x1="63.5cm" svg:y1="35.25cm" svg:x2="64cm" svg:y2="35.25cm">
              <text:p/>
            </draw:line>
            <draw:line draw:style-name="gr976" draw:text-style-name="P17" draw:layer="layout" svg:x1="63.5cm" svg:y1="35.75cm" svg:x2="64cm" svg:y2="35.75cm">
              <text:p/>
            </draw:line>
            <draw:line draw:style-name="gr977" draw:text-style-name="P17" draw:layer="layout" svg:x1="65cm" svg:y1="35.5cm" svg:x2="65.5cm" svg:y2="35.5cm">
              <text:p/>
            </draw:line>
          </draw:g>
          <draw:frame draw:style-name="gr756" draw:text-style-name="P37" draw:layer="layout" svg:width="2.03cm" svg:height="0.569cm" svg:x="58.1cm" svg:y="33.031cm">
            <draw:text-box>
              <text:p><text:span text:style-name="T10">discard_ic_r</text:span></text:p>
            </draw:text-box>
          </draw:frame>
          <draw:line draw:style-name="gr38" draw:text-style-name="P4" draw:layer="layout" svg:x1="61.5cm" svg:y1="33.5cm" svg:x2="61.5cm" svg:y2="34.25cm">
            <text:p/>
          </draw:line>
          <draw:line draw:style-name="gr38" draw:text-style-name="P4" draw:layer="layout" svg:x1="59cm" svg:y1="34.7cm" svg:x2="61.5cm" svg:y2="34.7cm">
            <text:p/>
          </draw:line>
          <draw:line draw:style-name="gr38" draw:text-style-name="P4" draw:layer="layout" svg:x1="61.5cm" svg:y1="34.7cm" svg:x2="61.5cm" svg:y2="34.75cm">
            <text:p/>
          </draw:line>
          <draw:frame draw:style-name="gr756" draw:text-style-name="P71" draw:layer="layout" svg:width="2.441cm" svg:height="0.569cm" svg:x="59.1cm" svg:y="34.232cm">
            <draw:text-box>
              <text:p text:style-name="P70"><text:span text:style-name="T21">icpu_if.ic_rvalid</text:span></text:p>
            </draw:text-box>
          </draw:frame>
          <draw:line draw:style-name="gr38" draw:text-style-name="P4" draw:layer="layout" svg:x1="63.5cm" svg:y1="34.5cm" svg:x2="63.5cm" svg:y2="35.25cm">
            <text:p/>
          </draw:line>
          <draw:line draw:style-name="gr38" draw:text-style-name="P4" draw:layer="layout" svg:x1="59cm" svg:y1="35.7cm" svg:x2="63.5cm" svg:y2="35.7cm">
            <text:p/>
          </draw:line>
          <draw:line draw:style-name="gr38" draw:text-style-name="P4" draw:layer="layout" svg:x1="63.5cm" svg:y1="35.7cm" svg:x2="63.5cm" svg:y2="35.75cm">
            <text:p/>
          </draw:line>
          <draw:frame draw:style-name="gr756" draw:text-style-name="P37" draw:layer="layout" svg:width="1.95cm" svg:height="0.569cm" svg:x="59.1cm" svg:y="35.232cm">
            <draw:text-box>
              <text:p><text:span text:style-name="T10">ibuf_valid_r</text:span></text:p>
            </draw:text-box>
          </draw:frame>
          <draw:line draw:style-name="gr38" draw:text-style-name="P4" draw:layer="layout" svg:x1="65.5cm" svg:y1="35.5cm" svg:x2="65.5cm" svg:y2="36.25cm">
            <text:p/>
          </draw:line>
          <draw:frame draw:style-name="gr756" draw:text-style-name="P37" draw:layer="layout" svg:width="2.013cm" svg:height="0.569cm" svg:x="59.1cm" svg:y="36.031cm">
            <draw:text-box>
              <text:p><text:span text:style-name="T10">data_stall_s</text:span></text:p>
            </draw:text-box>
          </draw:frame>
          <draw:frame draw:style-name="gr756" draw:text-style-name="P37" draw:layer="layout" svg:width="2.377cm" svg:height="0.569cm" svg:x="59.123cm" svg:y="37.031cm">
            <draw:text-box>
              <text:p><text:span text:style-name="T10">dcache_stall_s</text:span></text:p>
            </draw:text-box>
          </draw:frame>
          <draw:line draw:style-name="gr38" draw:text-style-name="P4" draw:layer="layout" svg:x1="59cm" svg:y1="36.5cm" svg:x2="61.5cm" svg:y2="36.5cm">
            <text:p/>
          </draw:line>
          <draw:line draw:style-name="gr38" draw:text-style-name="P4" draw:layer="layout" svg:x1="59cm" svg:y1="37.5cm" svg:x2="61.5cm" svg:y2="37.5cm">
            <text:p/>
          </draw:line>
          <draw:line draw:style-name="gr38" draw:text-style-name="P4" draw:layer="layout" svg:x1="63.5cm" svg:y1="36.5cm" svg:x2="65.5cm" svg:y2="36.5cm">
            <text:p/>
          </draw:line>
          <draw:line draw:style-name="gr38" draw:text-style-name="P4" draw:layer="layout" svg:x1="63.5cm" svg:y1="37.5cm" svg:x2="65.5cm" svg:y2="37.5cm">
            <text:p/>
          </draw:line>
          <draw:line draw:style-name="gr38" draw:text-style-name="P4" draw:layer="layout" svg:x1="65.5cm" svg:y1="37.5cm" svg:x2="65.5cm" svg:y2="36.75cm">
            <text:p/>
          </draw:line>
          <draw:frame draw:style-name="gr756" draw:text-style-name="P37" draw:layer="layout" svg:width="2.551cm" svg:height="0.569cm" svg:x="66.824cm" svg:y="36.032cm">
            <draw:text-box>
              <text:p><text:span text:style-name="T10">if_id_advance_s</text:span></text:p>
            </draw:text-box>
          </draw:frame>
        </draw:g>
        <draw:line draw:style-name="gr38" draw:text-style-name="P4" draw:layer="layout" svg:x1="4cm" svg:y1="9.5cm" svg:x2="4.9cm" svg:y2="9.5cm">
          <text:p/>
        </draw:line>
        <draw:frame draw:style-name="gr978" draw:text-style-name="P37" draw:layer="layout" svg:width="1.145cm" svg:height="0.569cm" svg:x="3.569cm" svg:y="9cm">
          <draw:text-box>
            <text:p><text:span text:style-name="T10">PC_r</text:span></text:p>
          </draw:text-box>
        </draw:frame>
        <draw:line draw:style-name="gr38" draw:text-style-name="P4" draw:layer="layout" svg:x1="4cm" svg:y1="10.001cm" svg:x2="4.9cm" svg:y2="10cm">
          <text:p/>
        </draw:line>
        <draw:line draw:style-name="gr38" draw:text-style-name="P4" draw:layer="layout" svg:x1="3cm" svg:y1="10.5cm" svg:x2="4.9cm" svg:y2="10.5cm">
          <text:p/>
        </draw:line>
        <draw:frame draw:style-name="gr978" draw:text-style-name="P64" draw:layer="layout" svg:width="2.123cm" svg:height="0.569cm" svg:x="2.57cm" svg:y="10.001cm">
          <draw:text-box>
            <text:p text:style-name="P63"><text:span text:style-name="T10">start_fetch_s</text:span></text:p>
          </draw:text-box>
        </draw:frame>
        <draw:custom-shape draw:style-name="gr979" draw:text-style-name="P76" draw:layer="layout" svg:width="2cm" svg:height="3.5cm" svg:x="63cm" svg:y="28.5cm">
          <text:p text:style-name="P1"><text:span text:style-name="T10">CLC</text:span></text:p>
          <draw:enhanced-geometry svg:viewBox="0 0 21600 21600" draw:type="rectangle" draw:enhanced-path="M 0 0 L 21600 0 21600 21600 0 21600 0 0 Z N"/>
        </draw:custom-shape>
        <draw:frame draw:style-name="gr978" draw:text-style-name="P37" draw:layer="layout" svg:width="2.504cm" svg:height="0.569cm" svg:x="60.496cm" svg:y="28.5cm">
          <draw:text-box>
            <text:p><text:span text:style-name="T10">fetch_in_flight_r</text:span></text:p>
          </draw:text-box>
        </draw:frame>
        <draw:frame draw:style-name="gr978" draw:text-style-name="P37" draw:layer="layout" svg:width="1.95cm" svg:height="0.569cm" svg:x="61.05cm" svg:y="28.901cm">
          <draw:text-box>
            <text:p><text:span text:style-name="T10">ibuf_valid_r</text:span></text:p>
          </draw:text-box>
        </draw:frame>
        <draw:frame draw:style-name="gr978" draw:text-style-name="P37" draw:layer="layout" svg:width="1.399cm" svg:height="0.569cm" svg:x="61.601cm" svg:y="29.302cm">
          <draw:text-box>
            <text:p><text:span text:style-name="T10">flush_s</text:span></text:p>
          </draw:text-box>
        </draw:frame>
        <draw:frame draw:style-name="gr978" draw:text-style-name="P37" draw:layer="layout" svg:width="1.035cm" svg:height="0.569cm" svg:x="61.965cm" svg:y="29.703cm">
          <draw:text-box>
            <text:p><text:span text:style-name="T10">rst_i</text:span></text:p>
          </draw:text-box>
        </draw:frame>
        <draw:frame draw:style-name="gr978" draw:text-style-name="P71" draw:layer="layout" svg:width="2.441cm" svg:height="0.569cm" svg:x="60.559cm" svg:y="30.104cm">
          <draw:text-box>
            <text:p text:style-name="P70"><text:span text:style-name="T21">icpu_if.ic_rvalid</text:span></text:p>
          </draw:text-box>
        </draw:frame>
        <draw:frame draw:style-name="gr978" draw:text-style-name="P37" draw:layer="layout" svg:width="2.03cm" svg:height="0.569cm" svg:x="60.97cm" svg:y="30.504cm">
          <draw:text-box>
            <text:p><text:span text:style-name="T10">discard_ic_r</text:span></text:p>
          </draw:text-box>
        </draw:frame>
        <draw:frame draw:style-name="gr978" draw:text-style-name="P37" draw:layer="layout" svg:width="2.013cm" svg:height="0.569cm" svg:x="60.987cm" svg:y="30.905cm">
          <draw:text-box>
            <text:p><text:span text:style-name="T10">data_stall_s</text:span></text:p>
          </draw:text-box>
        </draw:frame>
        <draw:frame draw:style-name="gr978" draw:text-style-name="P37" draw:layer="layout" svg:width="2.377cm" svg:height="0.569cm" svg:x="60.623cm" svg:y="31.306cm">
          <draw:text-box>
            <text:p><text:span text:style-name="T10">dcache_stall_s</text:span></text:p>
          </draw:text-box>
        </draw:frame>
        <draw:line draw:style-name="gr38" draw:text-style-name="P4" draw:layer="layout" svg:x1="62cm" svg:y1="29cm" svg:x2="63cm" svg:y2="29cm">
          <text:p/>
        </draw:line>
        <draw:line draw:style-name="gr38" draw:text-style-name="P4" draw:layer="layout" svg:x1="62cm" svg:y1="29.4cm" svg:x2="63cm" svg:y2="29.4cm">
          <text:p/>
        </draw:line>
        <draw:line draw:style-name="gr38" draw:text-style-name="P4" draw:layer="layout" svg:x1="62cm" svg:y1="29.8cm" svg:x2="63cm" svg:y2="29.8cm">
          <text:p/>
        </draw:line>
        <draw:line draw:style-name="gr38" draw:text-style-name="P4" draw:layer="layout" svg:x1="62cm" svg:y1="30.2cm" svg:x2="63cm" svg:y2="30.2cm">
          <text:p/>
        </draw:line>
        <draw:line draw:style-name="gr38" draw:text-style-name="P4" draw:layer="layout" svg:x1="62cm" svg:y1="30.6cm" svg:x2="63cm" svg:y2="30.6cm">
          <text:p/>
        </draw:line>
        <draw:line draw:style-name="gr38" draw:text-style-name="P4" draw:layer="layout" svg:x1="62cm" svg:y1="31cm" svg:x2="63cm" svg:y2="31cm">
          <text:p/>
        </draw:line>
        <draw:line draw:style-name="gr38" draw:text-style-name="P4" draw:layer="layout" svg:x1="62cm" svg:y1="31.4cm" svg:x2="63cm" svg:y2="31.4cm">
          <text:p/>
        </draw:line>
        <draw:line draw:style-name="gr38" draw:text-style-name="P4" draw:layer="layout" svg:x1="62cm" svg:y1="31.8cm" svg:x2="63cm" svg:y2="31.8cm">
          <text:p/>
        </draw:line>
        <draw:line draw:style-name="gr38" draw:text-style-name="P4" draw:layer="layout" svg:x1="65cm" svg:y1="30cm" svg:x2="66cm" svg:y2="30cm">
          <text:p/>
        </draw:line>
        <draw:frame draw:style-name="gr978" draw:text-style-name="P37" draw:layer="layout" svg:width="2.123cm" svg:height="0.569cm" svg:x="64.8cm" svg:y="29.531cm">
          <draw:text-box>
            <text:p><text:span text:style-name="T10">start_fetch_s</text:span></text:p>
          </draw:text-box>
        </draw:frame>
        <draw:custom-shape draw:style-name="gr980" draw:text-style-name="P76" draw:layer="layout" svg:width="2cm" svg:height="1cm" svg:x="44.001cm" svg:y="35cm">
          <text:p text:style-name="P1"><text:span text:style-name="T10">CLC</text:span></text:p>
          <draw:enhanced-geometry svg:viewBox="0 0 21600 21600" draw:type="rectangle" draw:enhanced-path="M 0 0 L 21600 0 21600 21600 0 21600 0 0 Z N"/>
        </draw:custom-shape>
        <draw:frame draw:style-name="gr978" draw:text-style-name="P37" draw:layer="layout" svg:width="2.28cm" svg:height="0.569cm" svg:x="41.797cm" svg:y="34.8cm">
          <draw:text-box>
            <text:p><text:span text:style-name="T10">icache_stall_s</text:span></text:p>
          </draw:text-box>
        </draw:frame>
        <draw:frame draw:style-name="gr978" draw:text-style-name="P37" draw:layer="layout" svg:width="2.377cm" svg:height="0.569cm" svg:x="41.7cm" svg:y="35.201cm">
          <draw:text-box>
            <text:p><text:span text:style-name="T10">dcache_stall_s</text:span></text:p>
          </draw:text-box>
        </draw:frame>
        <draw:line draw:style-name="gr38" draw:text-style-name="P4" draw:layer="layout" svg:x1="43.001cm" svg:y1="35.3cm" svg:x2="44.001cm" svg:y2="35.3cm">
          <text:p/>
        </draw:line>
        <draw:line draw:style-name="gr38" draw:text-style-name="P4" draw:layer="layout" svg:x1="46.001cm" svg:y1="35.5cm" svg:x2="47.001cm" svg:y2="35.5cm">
          <text:p/>
        </draw:line>
        <draw:frame draw:style-name="gr978" draw:text-style-name="P68" draw:layer="layout" svg:width="2.217cm" svg:height="0.569cm" svg:x="45.801cm" svg:y="35.031cm">
          <draw:text-box>
            <text:p text:style-name="P67"><text:span text:style-name="T20">global_stall_s</text:span></text:p>
          </draw:text-box>
        </draw:frame>
        <draw:line draw:style-name="gr38" draw:text-style-name="P4" draw:layer="layout" svg:x1="43.001cm" svg:y1="35.7cm" svg:x2="44.001cm" svg:y2="35.7cm">
          <text:p/>
        </draw:line>
        <draw:custom-shape draw:style-name="gr980" draw:text-style-name="P76" draw:layer="layout" svg:width="2cm" svg:height="1cm" svg:x="39.001cm" svg:y="34.001cm">
          <text:p text:style-name="P1"><text:span text:style-name="T10">CLC</text:span></text:p>
          <draw:enhanced-geometry svg:viewBox="0 0 21600 21600" draw:type="rectangle" draw:enhanced-path="M 0 0 L 21600 0 21600 21600 0 21600 0 0 Z N"/>
        </draw:custom-shape>
        <draw:frame draw:style-name="gr978" draw:text-style-name="P37" draw:layer="layout" svg:width="1.95cm" svg:height="0.569cm" svg:x="37.197cm" svg:y="33.801cm">
          <draw:text-box>
            <text:p><text:span text:style-name="T10">ibuf_valid_r</text:span></text:p>
          </draw:text-box>
        </draw:frame>
        <draw:frame draw:style-name="gr981" draw:text-style-name="P62" draw:layer="layout" svg:width="2.441cm" svg:height="0.569cm" svg:x="36.706cm" svg:y="34.202cm">
          <draw:text-box>
            <text:p text:style-name="P6"><text:span text:style-name="T24">icpu_if.ic_rvalid</text:span></text:p>
          </draw:text-box>
        </draw:frame>
        <draw:line draw:style-name="gr38" draw:text-style-name="P4" draw:layer="layout" svg:x1="38.001cm" svg:y1="34.301cm" svg:x2="39.001cm" svg:y2="34.301cm">
          <text:p/>
        </draw:line>
        <draw:line draw:style-name="gr38" draw:text-style-name="P4" draw:layer="layout" svg:x1="41.001cm" svg:y1="34.501cm" svg:x2="42.001cm" svg:y2="34.501cm">
          <text:p/>
        </draw:line>
        <draw:frame draw:style-name="gr982" draw:text-style-name="P62" draw:layer="layout" svg:width="2.28cm" svg:height="0.569cm" svg:x="40.801cm" svg:y="34.032cm">
          <draw:text-box>
            <text:p text:style-name="P6"><text:span text:style-name="T10">icache_stall_s</text:span></text:p>
          </draw:text-box>
        </draw:frame>
        <draw:line draw:style-name="gr38" draw:text-style-name="P4" draw:layer="layout" svg:x1="38.001cm" svg:y1="34.701cm" svg:x2="39.001cm" svg:y2="34.701cm">
          <text:p/>
        </draw:line>
        <draw:custom-shape draw:style-name="gr983" draw:text-style-name="P76" draw:layer="layout" svg:width="2cm" svg:height="2.002cm" svg:x="39.002cm" svg:y="36cm">
          <text:p text:style-name="P1"><text:span text:style-name="T10">CLC</text:span></text:p>
          <draw:enhanced-geometry svg:viewBox="0 0 21600 21600" draw:type="rectangle" draw:enhanced-path="M 0 0 L 21600 0 21600 21600 0 21600 0 0 Z N"/>
        </draw:custom-shape>
        <draw:frame draw:style-name="gr978" draw:text-style-name="P37" draw:layer="layout" svg:width="3.148cm" svg:height="0.569cm" svg:x="35.899cm" svg:y="36.802cm">
          <draw:text-box>
            <text:p><text:span text:style-name="T10">ex_mem_dMemR</text:span><text:span text:style-name="T10">d_r</text:span></text:p>
          </draw:text-box>
        </draw:frame>
        <draw:frame draw:style-name="gr984" draw:text-style-name="P62" draw:layer="layout" svg:width="2.627cm" svg:height="0.569cm" svg:x="36.42cm" svg:y="37.203cm">
          <draw:text-box>
            <text:p text:style-name="P6"><text:span text:style-name="T24">dcpu_if.dc_rvalid</text:span></text:p>
          </draw:text-box>
        </draw:frame>
        <draw:line draw:style-name="gr38" draw:text-style-name="P4" draw:layer="layout" svg:x1="38.002cm" svg:y1="37.302cm" svg:x2="39.002cm" svg:y2="37.302cm">
          <text:p/>
        </draw:line>
        <draw:line draw:style-name="gr38" draw:text-style-name="P4" draw:layer="layout" svg:x1="41.002cm" svg:y1="37.002cm" svg:x2="42.002cm" svg:y2="37.002cm">
          <text:p/>
        </draw:line>
        <draw:frame draw:style-name="gr985" draw:text-style-name="P62" draw:layer="layout" svg:width="2.377cm" svg:height="0.569cm" svg:x="40.802cm" svg:y="36.533cm">
          <draw:text-box>
            <text:p text:style-name="P6"><text:span text:style-name="T10">dcache_stall_s</text:span></text:p>
          </draw:text-box>
        </draw:frame>
        <draw:line draw:style-name="gr38" draw:text-style-name="P4" draw:layer="layout" svg:x1="38.002cm" svg:y1="37.702cm" svg:x2="39.002cm" svg:y2="37.702cm">
          <text:p/>
        </draw:line>
        <draw:frame draw:style-name="gr978" draw:text-style-name="P37" draw:layer="layout" svg:width="2.581cm" svg:height="0.569cm" svg:x="36.466cm" svg:y="36.403cm">
          <draw:text-box>
            <text:p><text:span text:style-name="T10">ex_mem_valid_r</text:span></text:p>
          </draw:text-box>
        </draw:frame>
        <draw:frame draw:style-name="gr978" draw:text-style-name="P37" draw:layer="layout" svg:width="3.148cm" svg:height="0.569cm" svg:x="35.899cm" svg:y="36.004cm">
          <draw:text-box>
            <text:p><text:span text:style-name="T10">dc_rdata_buf_vali</text:span><text:span text:style-name="T10">d_r</text:span></text:p>
          </draw:text-box>
        </draw:frame>
        <draw:line draw:style-name="gr38" draw:text-style-name="P4" draw:layer="layout" svg:x1="38.002cm" svg:y1="36.902cm" svg:x2="39.002cm" svg:y2="36.902cm">
          <text:p/>
        </draw:line>
        <draw:line draw:style-name="gr38" draw:text-style-name="P4" draw:layer="layout" svg:x1="38.002cm" svg:y1="36.502cm" svg:x2="39.002cm" svg:y2="36.502cm">
          <text:p/>
        </draw:line>
        <draw:frame draw:style-name="gr986" draw:text-style-name="P37" draw:layer="layout" svg:width="0.659cm" svg:height="0.569cm" svg:x="4.07cm" svg:y="9.501cm">
          <draw:text-box>
            <text:p><text:span text:style-name="T10">0</text:span></text:p>
          </draw:text-box>
        </draw:frame>
        <draw:frame draw:style-name="gr757" draw:text-style-name="P37" draw:layer="layout" svg:width="0.659cm" svg:height="0.569cm" svg:x="68.973cm" svg:y="19.536cm">
          <draw:text-box>
            <text:p><text:span text:style-name="T10">0</text:span></text:p>
          </draw:text-box>
        </draw:frame>
        <draw:line draw:style-name="gr38" draw:text-style-name="P4" draw:layer="layout" svg:x1="22.002cm" svg:y1="8.7cm" svg:x2="40cm" svg:y2="8.7cm">
          <text:p/>
        </draw:line>
        <draw:line draw:style-name="gr38" draw:text-style-name="P4" draw:layer="layout" svg:x1="22.002cm" svg:y1="9.1cm" svg:x2="40cm" svg:y2="9.1cm">
          <text:p/>
        </draw:line>
        <draw:line draw:style-name="gr38" draw:text-style-name="P4" draw:layer="layout" svg:x1="22.002cm" svg:y1="9.5cm" svg:x2="40cm" svg:y2="9.5cm">
          <text:p/>
        </draw:line>
        <draw:g draw:style-name="gr66">
          <draw:glue-point draw:id="4" svg:x="5cm" svg:y="0cm"/>
          <draw:glue-point draw:id="5" svg:x="-5cm" svg:y="-2.5cm"/>
          <draw:glue-point draw:id="6" svg:x="-5.005cm" svg:y="2.5cm"/>
          <draw:rect draw:style-name="gr987" draw:text-style-name="P16" draw:layer="layout" svg:width="1cm" svg:height="1cm" svg:x="29cm" svg:y="10cm">
            <text:p text:style-name="P15"><text:span text:style-name="T4">&amp;</text:span></text:p>
          </draw:rect>
          <draw:line draw:style-name="gr988" draw:text-style-name="P17" draw:layer="layout" svg:x1="28.5cm" svg:y1="10.25cm" svg:x2="29cm" svg:y2="10.25cm">
            <text:p/>
          </draw:line>
          <draw:line draw:style-name="gr989" draw:text-style-name="P17" draw:layer="layout" svg:x1="28.5cm" svg:y1="10.75cm" svg:x2="29cm" svg:y2="10.75cm">
            <text:p/>
          </draw:line>
          <draw:line draw:style-name="gr990" draw:text-style-name="P17" draw:layer="layout" svg:x1="30cm" svg:y1="10.5cm" svg:x2="30.5cm" svg:y2="10.5cm">
            <text:p/>
          </draw:line>
        </draw:g>
        <draw:g draw:style-name="gr66">
          <draw:glue-point draw:id="4" svg:x="5cm" svg:y="0cm"/>
          <draw:glue-point draw:id="5" svg:x="-5cm" svg:y="-2.5cm"/>
          <draw:glue-point draw:id="6" svg:x="-5.005cm" svg:y="2.5cm"/>
          <draw:rect draw:style-name="gr991" draw:text-style-name="P16" draw:layer="layout" svg:width="1cm" svg:height="1cm" svg:x="28cm" svg:y="11cm">
            <text:p text:style-name="P15"><text:span text:style-name="T4">&amp;</text:span></text:p>
          </draw:rect>
          <draw:line draw:style-name="gr992" draw:text-style-name="P17" draw:layer="layout" svg:x1="27.5cm" svg:y1="11.25cm" svg:x2="28cm" svg:y2="11.25cm">
            <text:p/>
          </draw:line>
          <draw:line draw:style-name="gr993" draw:text-style-name="P17" draw:layer="layout" svg:x1="27.5cm" svg:y1="11.75cm" svg:x2="28cm" svg:y2="11.75cm">
            <text:p/>
          </draw:line>
          <draw:line draw:style-name="gr994" draw:text-style-name="P17" draw:layer="layout" svg:x1="29cm" svg:y1="11.5cm" svg:x2="29.5cm" svg:y2="11.5cm">
            <text:p/>
          </draw:line>
        </draw:g>
        <draw:g draw:style-name="gr66">
          <draw:glue-point draw:id="4" svg:x="5cm" svg:y="0cm"/>
          <draw:glue-point draw:id="5" svg:x="-5cm" svg:y="-2.5cm"/>
          <draw:glue-point draw:id="6" svg:x="-5.005cm" svg:y="2.5cm"/>
          <draw:rect draw:style-name="gr995" draw:text-style-name="P16" draw:layer="layout" svg:width="1cm" svg:height="1cm" svg:x="27cm" svg:y="12cm">
            <text:p text:style-name="P15"><text:span text:style-name="T4">&amp;</text:span></text:p>
          </draw:rect>
          <draw:line draw:style-name="gr996" draw:text-style-name="P17" draw:layer="layout" svg:x1="26.5cm" svg:y1="12.25cm" svg:x2="27cm" svg:y2="12.25cm">
            <text:p/>
          </draw:line>
          <draw:line draw:style-name="gr997" draw:text-style-name="P17" draw:layer="layout" svg:x1="26.5cm" svg:y1="12.75cm" svg:x2="27cm" svg:y2="12.75cm">
            <text:p/>
          </draw:line>
          <draw:line draw:style-name="gr998" draw:text-style-name="P17" draw:layer="layout" svg:x1="28cm" svg:y1="12.5cm" svg:x2="28.5cm" svg:y2="12.5cm">
            <text:p/>
          </draw:line>
        </draw:g>
        <draw:g draw:style-name="gr66">
          <draw:glue-point draw:id="4" svg:x="5cm" svg:y="0cm"/>
          <draw:glue-point draw:id="5" svg:x="-5cm" svg:y="-2.5cm"/>
          <draw:glue-point draw:id="6" svg:x="-5.005cm" svg:y="2.5cm"/>
          <draw:rect draw:style-name="gr999" draw:text-style-name="P16" draw:layer="layout" svg:width="1cm" svg:height="1cm" svg:x="26cm" svg:y="13cm">
            <text:p text:style-name="P15"><text:span text:style-name="T4">&amp;</text:span></text:p>
          </draw:rect>
          <draw:line draw:style-name="gr1000" draw:text-style-name="P17" draw:layer="layout" svg:x1="25.5cm" svg:y1="13.25cm" svg:x2="26cm" svg:y2="13.25cm">
            <text:p/>
          </draw:line>
          <draw:line draw:style-name="gr1001" draw:text-style-name="P17" draw:layer="layout" svg:x1="25.5cm" svg:y1="13.75cm" svg:x2="26cm" svg:y2="13.75cm">
            <text:p/>
          </draw:line>
          <draw:line draw:style-name="gr1002" draw:text-style-name="P17" draw:layer="layout" svg:x1="27cm" svg:y1="13.5cm" svg:x2="27.5cm" svg:y2="13.5cm">
            <text:p/>
          </draw:line>
        </draw:g>
        <draw:custom-shape draw:style-name="gr461" draw:text-style-name="P5" draw:layer="layout" svg:width="0.2cm" svg:height="0.2cm" svg:x="28.402cm" svg:y="8.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8.5cm" svg:y1="10.25cm" svg:x2="28.5cm" svg:y2="8.7cm">
          <text:p/>
        </draw:line>
        <draw:line draw:style-name="gr38" draw:text-style-name="P4" draw:layer="layout" svg:x1="27.5cm" svg:y1="11.25cm" svg:x2="27.5cm" svg:y2="8.7cm">
          <text:p/>
        </draw:line>
        <draw:custom-shape draw:style-name="gr461" draw:text-style-name="P5" draw:layer="layout" svg:width="0.2cm" svg:height="0.2cm" svg:x="27.403cm" svg:y="8.6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6.5cm" svg:y1="12.25cm" svg:x2="26.501cm" svg:y2="8.701cm">
          <text:p/>
        </draw:line>
        <draw:custom-shape draw:style-name="gr461" draw:text-style-name="P5" draw:layer="layout" svg:width="0.2cm" svg:height="0.2cm" svg:x="26.404cm" svg:y="8.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5.5cm" svg:y1="13.25cm" svg:x2="25.502cm" svg:y2="8.701cm">
          <text:p/>
        </draw:line>
        <draw:custom-shape draw:style-name="gr461" draw:text-style-name="P5" draw:layer="layout" svg:width="0.2cm" svg:height="0.2cm" svg:x="25.405cm" svg:y="8.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2.503cm" svg:y1="17.6cm" svg:x2="22.503cm" svg:y2="9.101cm">
          <text:p/>
        </draw:line>
        <draw:custom-shape draw:style-name="gr461" draw:text-style-name="P5" draw:layer="layout" svg:width="0.2cm" svg:height="0.2cm" svg:x="22.406cm" svg:y="9.0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22.407cm" svg:y="16.7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22.408cm" svg:y="1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3cm" svg:y1="20.8cm" svg:x2="35cm" svg:y2="20.8cm">
          <text:p/>
        </draw:line>
        <draw:line draw:style-name="gr38" draw:text-style-name="P4" draw:layer="layout" svg:x1="35cm" svg:y1="20.8cm" svg:x2="35cm" svg:y2="15.849cm">
          <text:p/>
        </draw:line>
        <draw:line draw:style-name="gr38" draw:text-style-name="P4" draw:layer="layout" svg:x1="25.5cm" svg:y1="15.849cm" svg:x2="35cm" svg:y2="15.849cm">
          <text:p/>
        </draw:line>
        <draw:line draw:style-name="gr38" draw:text-style-name="P4" draw:layer="layout" svg:x1="25.5cm" svg:y1="13.75cm" svg:x2="25.5cm" svg:y2="15.849cm">
          <text:p/>
        </draw:line>
        <draw:frame draw:style-name="gr1003" draw:text-style-name="P64" draw:layer="layout" svg:width="2.551cm" svg:height="0.569cm" svg:x="23.6cm" svg:y="13.231cm">
          <draw:text-box>
            <text:p text:style-name="P63"><text:span text:style-name="T19">id_trap_illegal_s</text:span></text:p>
          </draw:text-box>
        </draw:frame>
        <draw:line draw:style-name="gr38" draw:text-style-name="P4" draw:layer="layout" svg:x1="27.5cm" svg:y1="13.5cm" svg:x2="40cm" svg:y2="13.5cm">
          <text:p/>
        </draw:line>
        <draw:frame draw:style-name="gr776" draw:text-style-name="P37" draw:layer="layout" svg:width="2cm" svg:height="0.569cm" svg:x="27.3cm" svg:y="10.3cm">
          <draw:text-box>
            <text:p><text:span text:style-name="T10">id_regWr_s</text:span></text:p>
          </draw:text-box>
        </draw:frame>
        <draw:line draw:style-name="gr38" draw:text-style-name="P4" draw:layer="layout" svg:x1="24cm" svg:y1="10.8cm" svg:x2="28.5cm" svg:y2="10.8cm">
          <text:p/>
        </draw:line>
        <draw:line draw:style-name="gr38" draw:text-style-name="P4" draw:layer="layout" svg:x1="28.5cm" svg:y1="10.8cm" svg:x2="28.5cm" svg:y2="10.75cm">
          <text:p/>
        </draw:line>
        <draw:line draw:style-name="gr38" draw:text-style-name="P4" draw:layer="layout" svg:x1="24.5cm" svg:y1="11.8cm" svg:x2="27.5cm" svg:y2="11.8cm">
          <text:p/>
        </draw:line>
        <draw:line draw:style-name="gr38" draw:text-style-name="P4" draw:layer="layout" svg:x1="27.5cm" svg:y1="11.8cm" svg:x2="27.5cm" svg:y2="11.75cm">
          <text:p/>
        </draw:line>
        <draw:line draw:style-name="gr38" draw:text-style-name="P4" draw:layer="layout" svg:x1="25cm" svg:y1="12.8cm" svg:x2="26.5cm" svg:y2="12.8cm">
          <text:p/>
        </draw:line>
        <draw:line draw:style-name="gr38" draw:text-style-name="P4" draw:layer="layout" svg:x1="26.5cm" svg:y1="12.8cm" svg:x2="26.5cm" svg:y2="12.75cm">
          <text:p/>
        </draw:line>
        <draw:line draw:style-name="gr38" draw:text-style-name="P4" draw:layer="layout" svg:x1="30.5cm" svg:y1="9.9cm" svg:x2="40cm" svg:y2="9.9cm">
          <text:p/>
        </draw:line>
        <draw:line draw:style-name="gr38" draw:text-style-name="P4" draw:layer="layout" svg:x1="30.5cm" svg:y1="10.5cm" svg:x2="30.5cm" svg:y2="9.9cm">
          <text:p/>
        </draw:line>
        <draw:frame draw:style-name="gr776" draw:text-style-name="P37" draw:layer="layout" svg:width="2.327cm" svg:height="0.569cm" svg:x="25.9cm" svg:y="11.3cm">
          <draw:text-box>
            <text:p><text:span text:style-name="T10">id_dMemRd_s</text:span></text:p>
          </draw:text-box>
        </draw:frame>
        <draw:line draw:style-name="gr38" draw:text-style-name="P4" draw:layer="layout" svg:x1="31cm" svg:y1="10.3cm" svg:x2="40cm" svg:y2="10.3cm">
          <text:p/>
        </draw:line>
        <draw:line draw:style-name="gr38" draw:text-style-name="P4" draw:layer="layout" svg:x1="29.5cm" svg:y1="11.5cm" svg:x2="31cm" svg:y2="11.5cm">
          <text:p/>
        </draw:line>
        <draw:line draw:style-name="gr38" draw:text-style-name="P4" draw:layer="layout" svg:x1="31cm" svg:y1="11.5cm" svg:x2="31cm" svg:y2="10.3cm">
          <text:p/>
        </draw:line>
        <draw:frame draw:style-name="gr776" draw:text-style-name="P37" draw:layer="layout" svg:width="2.322cm" svg:height="0.569cm" svg:x="24.878cm" svg:y="12.3cm">
          <draw:text-box>
            <text:p><text:span text:style-name="T10">id_dMemWr_s</text:span></text:p>
          </draw:text-box>
        </draw:frame>
        <draw:line draw:style-name="gr38" draw:text-style-name="P4" draw:layer="layout" svg:x1="31.5cm" svg:y1="10.7cm" svg:x2="40cm" svg:y2="10.7cm">
          <text:p/>
        </draw:line>
        <draw:line draw:style-name="gr38" draw:text-style-name="P4" draw:layer="layout" svg:x1="31.5cm" svg:y1="12.5cm" svg:x2="31.5cm" svg:y2="10.7cm">
          <text:p/>
        </draw:line>
        <draw:line draw:style-name="gr38" draw:text-style-name="P4" draw:layer="layout" svg:x1="28.5cm" svg:y1="12.5cm" svg:x2="31.5cm" svg:y2="12.5cm">
          <text:p/>
        </draw:line>
        <draw:line draw:style-name="gr38" draw:text-style-name="P4" draw:layer="layout" svg:x1="25cm" svg:y1="12.8cm" svg:x2="25cm" svg:y2="15.3cm">
          <text:p/>
        </draw:line>
        <draw:line draw:style-name="gr38" draw:text-style-name="P4" draw:layer="layout" svg:x1="24.5cm" svg:y1="11.8cm" svg:x2="24.5cm" svg:y2="14.8cm">
          <text:p/>
        </draw:line>
        <draw:line draw:style-name="gr38" draw:text-style-name="P4" draw:layer="layout" svg:x1="24cm" svg:y1="10.8cm" svg:x2="24cm" svg:y2="14.3cm">
          <text:p/>
        </draw:line>
        <draw:line draw:style-name="gr38" draw:text-style-name="P4" draw:layer="layout" svg:x1="25cm" svg:y1="15.3cm" svg:x2="35.2cm" svg:y2="15.3cm">
          <text:p/>
        </draw:line>
        <draw:line draw:style-name="gr38" draw:text-style-name="P4" draw:layer="layout" svg:x1="35.2cm" svg:y1="17.2cm" svg:x2="35.2cm" svg:y2="15.3cm">
          <text:p/>
        </draw:line>
        <draw:line draw:style-name="gr38" draw:text-style-name="P4" draw:layer="layout" svg:x1="35.4cm" svg:y1="17.6cm" svg:x2="35.4cm" svg:y2="14.8cm">
          <text:p/>
        </draw:line>
        <draw:line draw:style-name="gr38" draw:text-style-name="P4" draw:layer="layout" svg:x1="35.6cm" svg:y1="18.8cm" svg:x2="35.6cm" svg:y2="14.3cm">
          <text:p/>
        </draw:line>
        <draw:line draw:style-name="gr38" draw:text-style-name="P4" draw:layer="layout" svg:x1="24.5cm" svg:y1="14.8cm" svg:x2="35.4cm" svg:y2="14.8cm">
          <text:p/>
        </draw:line>
        <draw:line draw:style-name="gr38" draw:text-style-name="P4" draw:layer="layout" svg:x1="24cm" svg:y1="14.3cm" svg:x2="35.6cm" svg:y2="14.3cm">
          <text:p/>
        </draw:line>
        <draw:line draw:style-name="gr38" draw:text-style-name="P4" draw:layer="layout" svg:x1="33cm" svg:y1="17.6cm" svg:x2="35.4cm" svg:y2="17.6cm">
          <text:p/>
        </draw:line>
        <draw:line draw:style-name="gr38" draw:text-style-name="P4" draw:layer="layout" svg:x1="33cm" svg:y1="17.2cm" svg:x2="35.2cm" svg:y2="17.2cm">
          <text:p/>
        </draw:line>
        <draw:line draw:style-name="gr38" draw:text-style-name="P4" draw:layer="layout" svg:x1="33cm" svg:y1="18.8cm" svg:x2="35.6cm" svg:y2="18.8cm">
          <text:p/>
        </draw:line>
        <draw:line draw:style-name="gr38" draw:text-style-name="P4" draw:layer="layout" svg:x1="35.8cm" svg:y1="11.1cm" svg:x2="40cm" svg:y2="11.1cm">
          <text:p/>
        </draw:line>
        <draw:line draw:style-name="gr38" draw:text-style-name="P4" draw:layer="layout" svg:x1="36cm" svg:y1="11.5cm" svg:x2="40cm" svg:y2="11.5cm">
          <text:p/>
        </draw:line>
        <draw:line draw:style-name="gr38" draw:text-style-name="P4" draw:layer="layout" svg:x1="36.2cm" svg:y1="11.9cm" svg:x2="40cm" svg:y2="11.9cm">
          <text:p/>
        </draw:line>
        <draw:line draw:style-name="gr38" draw:text-style-name="P4" draw:layer="layout" svg:x1="36.4cm" svg:y1="12.3cm" svg:x2="40cm" svg:y2="12.3cm">
          <text:p/>
        </draw:line>
        <draw:line draw:style-name="gr38" draw:text-style-name="P4" draw:layer="layout" svg:x1="36.6cm" svg:y1="12.7cm" svg:x2="40cm" svg:y2="12.7cm">
          <text:p/>
        </draw:line>
        <draw:line draw:style-name="gr38" draw:text-style-name="P4" draw:layer="layout" svg:x1="36.8cm" svg:y1="13.1cm" svg:x2="40cm" svg:y2="13.1cm">
          <text:p/>
        </draw:line>
        <draw:line draw:style-name="gr38" draw:text-style-name="P4" draw:layer="layout" svg:x1="35.8cm" svg:y1="18cm" svg:x2="35.8cm" svg:y2="11.1cm">
          <text:p/>
        </draw:line>
        <draw:line draw:style-name="gr38" draw:text-style-name="P4" draw:layer="layout" svg:x1="36cm" svg:y1="18.4cm" svg:x2="36cm" svg:y2="11.5cm">
          <text:p/>
        </draw:line>
        <draw:line draw:style-name="gr38" draw:text-style-name="P4" draw:layer="layout" svg:x1="33cm" svg:y1="18cm" svg:x2="35.8cm" svg:y2="18cm">
          <text:p/>
        </draw:line>
        <draw:line draw:style-name="gr38" draw:text-style-name="P4" draw:layer="layout" svg:x1="33cm" svg:y1="18.4cm" svg:x2="36cm" svg:y2="18.4cm">
          <text:p/>
        </draw:line>
        <draw:line draw:style-name="gr38" draw:text-style-name="P4" draw:layer="layout" svg:x1="36.2cm" svg:y1="16.8cm" svg:x2="36.2cm" svg:y2="11.9cm">
          <text:p/>
        </draw:line>
        <draw:line draw:style-name="gr38" draw:text-style-name="P4" draw:layer="layout" svg:x1="33cm" svg:y1="16.8cm" svg:x2="36.2cm" svg:y2="16.8cm">
          <text:p/>
        </draw:line>
        <draw:line draw:style-name="gr38" draw:text-style-name="P4" draw:layer="layout" svg:x1="36.4cm" svg:y1="20cm" svg:x2="36.4cm" svg:y2="12.3cm">
          <text:p/>
        </draw:line>
        <draw:line draw:style-name="gr38" draw:text-style-name="P4" draw:layer="layout" svg:x1="33cm" svg:y1="20cm" svg:x2="36.4cm" svg:y2="20cm">
          <text:p/>
        </draw:line>
        <draw:line draw:style-name="gr38" draw:text-style-name="P4" draw:layer="layout" svg:x1="36.6cm" svg:y1="20.4cm" svg:x2="36.6cm" svg:y2="12.7cm">
          <text:p/>
        </draw:line>
        <draw:line draw:style-name="gr38" draw:text-style-name="P4" draw:layer="layout" svg:x1="33cm" svg:y1="20.4cm" svg:x2="36.6cm" svg:y2="20.4cm">
          <text:p/>
        </draw:line>
        <draw:line draw:style-name="gr38" draw:text-style-name="P4" draw:layer="layout" svg:x1="36.8cm" svg:y1="19.2cm" svg:x2="36.8cm" svg:y2="13.1cm">
          <text:p/>
        </draw:line>
        <draw:line draw:style-name="gr38" draw:text-style-name="P4" draw:layer="layout" svg:x1="33cm" svg:y1="19.2cm" svg:x2="36.8cm" svg:y2="19.2cm">
          <text:p/>
        </draw:line>
        <draw:line draw:style-name="gr38" draw:text-style-name="P4" draw:layer="layout" svg:x1="15.002cm" svg:y1="2.6cm" svg:x2="17cm" svg:y2="2.6cm">
          <text:p/>
        </draw:line>
        <draw:line draw:style-name="gr38" draw:text-style-name="P4" draw:layer="layout" svg:x1="21cm" svg:y1="2.6cm" svg:x2="22.2cm" svg:y2="2.6cm">
          <text:p/>
        </draw:line>
        <draw:line draw:style-name="gr38" draw:text-style-name="P4" draw:layer="layout" svg:x1="17cm" svg:y1="8.7cm" svg:x2="18.001cm" svg:y2="8.7cm">
          <text:p/>
        </draw:line>
        <draw:line draw:style-name="gr38" draw:text-style-name="P4" draw:layer="layout" svg:x1="16.5cm" svg:y1="9.5cm" svg:x2="18.002cm" svg:y2="9.5cm">
          <text:p/>
        </draw:line>
        <draw:line draw:style-name="gr38" draw:text-style-name="P4" draw:layer="layout" svg:x1="21cm" svg:y1="3.4cm" svg:x2="22cm" svg:y2="3.4cm">
          <text:p/>
        </draw:line>
        <draw:line draw:style-name="gr38" draw:text-style-name="P4" draw:layer="layout" svg:x1="17cm" svg:y1="8.7cm" svg:x2="17cm" svg:y2="7.6cm">
          <text:p/>
        </draw:line>
        <draw:line draw:style-name="gr38" draw:text-style-name="P4" draw:layer="layout" svg:x1="17cm" svg:y1="7.6cm" svg:x2="22.2cm" svg:y2="7.6cm">
          <text:p/>
        </draw:line>
        <draw:line draw:style-name="gr38" draw:text-style-name="P4" draw:layer="layout" svg:x1="16.5cm" svg:y1="7.4cm" svg:x2="22cm" svg:y2="7.4cm">
          <text:p/>
        </draw:line>
        <draw:line draw:style-name="gr38" draw:text-style-name="P4" draw:layer="layout" svg:x1="16.5cm" svg:y1="9.5cm" svg:x2="16.5cm" svg:y2="7.4cm">
          <text:p/>
        </draw:line>
        <draw:line draw:style-name="gr38" draw:text-style-name="P4" draw:layer="layout" svg:x1="22cm" svg:y1="3.4cm" svg:x2="22cm" svg:y2="7.4cm">
          <text:p/>
        </draw:line>
        <draw:line draw:style-name="gr38" draw:text-style-name="P4" draw:layer="layout" svg:x1="22.2cm" svg:y1="2.6cm" svg:x2="22.2cm" svg:y2="7.6cm">
          <text:p/>
        </draw:line>
        <draw:line draw:style-name="gr38" draw:text-style-name="P4" draw:layer="layout" svg:x1="42.001cm" svg:y1="34.501cm" svg:x2="42cm" svg:y2="35.3cm">
          <text:p/>
        </draw:line>
        <draw:line draw:style-name="gr38" draw:text-style-name="P4" draw:layer="layout" svg:x1="42cm" svg:y1="35.3cm" svg:x2="43cm" svg:y2="35.3cm">
          <text:p/>
        </draw:line>
        <draw:line draw:style-name="gr38" draw:text-style-name="P4" draw:layer="layout" svg:x1="42cm" svg:y1="35.7cm" svg:x2="43cm" svg:y2="35.7cm">
          <text:p/>
        </draw:line>
        <draw:line draw:style-name="gr38" draw:text-style-name="P4" draw:layer="layout" svg:x1="42.002cm" svg:y1="35.702cm" svg:x2="42.002cm" svg:y2="37.002cm">
          <text:p/>
        </draw:line>
        <draw:custom-shape draw:style-name="gr688" draw:text-style-name="P59" draw:layer="layout" svg:width="1cm" svg:height="1cm" svg:x="2cm" svg:y="1cm">
          <text:p text:style-name="P35"><text:span text:style-name="T10">+4</text:span></text:p>
          <draw:enhanced-geometry svg:viewBox="0 0 21600 21600" draw:type="rectangle" draw:enhanced-path="M 0 0 L 21600 0 21600 21600 0 21600 0 0 Z N"/>
        </draw:custom-shape>
        <draw:custom-shape draw:style-name="gr461" draw:text-style-name="P5" draw:layer="layout" svg:width="0.2cm" svg:height="0.2cm" svg:x="10.907cm" svg:y="2.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1.008cm" svg:y1="2.546cm" svg:x2="11cm" svg:y2="1.5cm">
          <text:p/>
        </draw:line>
        <draw:line draw:style-name="gr38" draw:text-style-name="P4" draw:layer="layout" svg:x1="3cm" svg:y1="1.5cm" svg:x2="11cm" svg:y2="1.5cm">
          <text:p/>
        </draw:line>
        <draw:line draw:style-name="gr38" draw:text-style-name="P4" draw:layer="layout" svg:x1="2.5cm" svg:y1="2cm" svg:x2="2.5cm" svg:y2="2.6cm">
          <text:p/>
        </draw:line>
        <draw:line draw:style-name="gr38" draw:text-style-name="P4" draw:layer="layout" svg:x1="2.5cm" svg:y1="2.6cm" svg:x2="7.003cm" svg:y2="2.6cm">
          <text:p/>
        </draw:line>
        <draw:line draw:style-name="gr38" draw:text-style-name="P4" draw:layer="layout" svg:x1="15cm" svg:y1="3cm" svg:x2="17cm" svg:y2="3cm">
          <text:p/>
        </draw:line>
        <draw:line draw:style-name="gr38" draw:text-style-name="P4" draw:layer="layout" svg:x1="12cm" svg:y1="11.5cm" svg:x2="15cm" svg:y2="11.5cm">
          <text:p/>
        </draw:line>
        <draw:line draw:style-name="gr38" draw:text-style-name="P4" draw:layer="layout" svg:x1="15cm" svg:y1="11.5cm" svg:x2="15cm" svg:y2="3cm">
          <text:p/>
        </draw:line>
        <draw:line draw:style-name="gr38" draw:text-style-name="P4" draw:layer="layout" svg:x1="12cm" svg:y1="11cm" svg:x2="15.5cm" svg:y2="11cm">
          <text:p/>
        </draw:line>
        <draw:line draw:style-name="gr38" draw:text-style-name="P4" draw:layer="layout" svg:x1="15.5cm" svg:y1="11cm" svg:x2="15.5cm" svg:y2="3.4cm">
          <text:p/>
        </draw:line>
        <draw:line draw:style-name="gr38" draw:text-style-name="P4" draw:layer="layout" svg:x1="15.5cm" svg:y1="3.4cm" svg:x2="17cm" svg:y2="3.4cm">
          <text:p/>
        </draw:line>
        <draw:line draw:style-name="gr38" draw:text-style-name="P4" draw:layer="layout" svg:x1="15.5cm" svg:y1="9.9cm" svg:x2="18.001cm" svg:y2="9.9cm">
          <text:p/>
        </draw:line>
        <draw:custom-shape draw:style-name="gr461" draw:text-style-name="P5" draw:layer="layout" svg:width="0.2cm" svg:height="0.2cm" svg:x="15.408cm" svg:y="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cm" svg:y1="9.5cm" svg:x2="4cm" svg:y2="1.5cm">
          <text:p/>
        </draw:line>
        <draw:custom-shape draw:style-name="gr461" draw:text-style-name="P5" draw:layer="layout" svg:width="0.2cm" svg:height="0.2cm" svg:x="3.908cm" svg:y="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77.002cm" svg:y1="41.504cm" svg:x2="78.7cm" svg:y2="41.5cm">
          <text:p/>
        </draw:line>
        <draw:line draw:style-name="gr38" draw:text-style-name="P4" draw:layer="layout" svg:x1="78.7cm" svg:y1="41.5cm" svg:x2="78.7cm" svg:y2="40.5cm">
          <text:p/>
        </draw:line>
        <draw:line draw:style-name="gr38" draw:text-style-name="P4" draw:layer="layout" svg:x1="74cm" svg:y1="40.5cm" svg:x2="78.7cm" svg:y2="40.5cm">
          <text:p/>
        </draw:line>
        <draw:line draw:style-name="gr38" draw:text-style-name="P4" draw:layer="layout" svg:x1="74cm" svg:y1="40.5cm" svg:x2="74cm" svg:y2="40cm">
          <text:p/>
        </draw:line>
        <draw:line draw:style-name="gr38" draw:text-style-name="P4" draw:layer="layout" svg:x1="72cm" svg:y1="39cm" svg:x2="74cm" svg:y2="39cm">
          <text:p/>
        </draw:line>
        <draw:line draw:style-name="gr38" draw:text-style-name="P4" draw:layer="layout" svg:x1="73.5cm" svg:y1="45cm" svg:x2="73.5cm" svg:y2="39.503cm">
          <text:p/>
        </draw:line>
        <draw:line draw:style-name="gr38" draw:text-style-name="P4" draw:layer="layout" svg:x1="73.5cm" svg:y1="39.503cm" svg:x2="74cm" svg:y2="39.503cm">
          <text:p/>
        </draw:line>
        <draw:line draw:style-name="gr38" draw:text-style-name="P4" draw:layer="layout" svg:x1="76.5cm" svg:y1="39.5cm" svg:x2="81cm" svg:y2="39.5cm">
          <text:p/>
        </draw:line>
        <draw:line draw:style-name="gr38" draw:text-style-name="P4" draw:layer="layout" svg:x1="67cm" svg:y1="54.7cm" svg:x2="69cm" svg:y2="54.7cm">
          <text:p/>
        </draw:line>
        <draw:line draw:style-name="gr38" draw:text-style-name="P4" draw:layer="layout" svg:x1="67cm" svg:y1="53.7cm" svg:x2="79cm" svg:y2="53.7cm">
          <text:p/>
        </draw:line>
        <draw:line draw:style-name="gr38" draw:text-style-name="P4" draw:layer="layout" svg:x1="67cm" svg:y1="53.7cm" svg:x2="67cm" svg:y2="54.7cm">
          <text:p/>
        </draw:line>
        <draw:line draw:style-name="gr38" draw:text-style-name="P4" draw:layer="layout" svg:x1="79cm" svg:y1="39.5cm" svg:x2="79cm" svg:y2="53.7cm">
          <text:p/>
        </draw:line>
        <draw:custom-shape draw:style-name="gr461" draw:text-style-name="P5" draw:layer="layout" svg:width="0.2cm" svg:height="0.2cm" svg:x="78.909cm" svg:y="39.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4cm" svg:y1="8.7cm" svg:x2="57cm" svg:y2="8.7cm">
          <text:p/>
        </draw:line>
        <draw:line draw:style-name="gr38" draw:text-style-name="P4" draw:layer="layout" svg:x1="44cm" svg:y1="9.1cm" svg:x2="57cm" svg:y2="9.1cm">
          <text:p/>
        </draw:line>
        <draw:line draw:style-name="gr38" draw:text-style-name="P4" draw:layer="layout" svg:x1="44cm" svg:y1="9.5cm" svg:x2="57cm" svg:y2="9.5cm">
          <text:p/>
        </draw:line>
        <draw:line draw:style-name="gr38" draw:text-style-name="P4" draw:layer="layout" svg:x1="44cm" svg:y1="9.9cm" svg:x2="57cm" svg:y2="9.9cm">
          <text:p/>
        </draw:line>
        <draw:line draw:style-name="gr38" draw:text-style-name="P4" draw:layer="layout" svg:x1="44cm" svg:y1="10.3cm" svg:x2="57cm" svg:y2="10.3cm">
          <text:p/>
        </draw:line>
        <draw:line draw:style-name="gr38" draw:text-style-name="P4" draw:layer="layout" svg:x1="44cm" svg:y1="10.7cm" svg:x2="57cm" svg:y2="10.7cm">
          <text:p/>
        </draw:line>
        <draw:line draw:style-name="gr38" draw:text-style-name="P4" draw:layer="layout" svg:x1="44cm" svg:y1="11.1cm" svg:x2="46cm" svg:y2="11.1cm">
          <text:p/>
        </draw:line>
        <draw:line draw:style-name="gr38" draw:text-style-name="P4" draw:layer="layout" svg:x1="44cm" svg:y1="11.5cm" svg:x2="46cm" svg:y2="11.5cm">
          <text:p/>
        </draw:line>
        <draw:line draw:style-name="gr38" draw:text-style-name="P4" draw:layer="layout" svg:x1="44cm" svg:y1="11.9cm" svg:x2="51.5cm" svg:y2="11.9cm">
          <text:p/>
        </draw:line>
        <draw:line draw:style-name="gr38" draw:text-style-name="P4" draw:layer="layout" svg:x1="44cm" svg:y1="12.3cm" svg:x2="46cm" svg:y2="12.3cm">
          <text:p/>
        </draw:line>
        <draw:line draw:style-name="gr38" draw:text-style-name="P4" draw:layer="layout" svg:x1="44cm" svg:y1="12.7cm" svg:x2="46cm" svg:y2="12.7cm">
          <text:p/>
        </draw:line>
        <draw:line draw:style-name="gr38" draw:text-style-name="P4" draw:layer="layout" svg:x1="44cm" svg:y1="13.1cm" svg:x2="46cm" svg:y2="13.1cm">
          <text:p/>
        </draw:line>
        <draw:line draw:style-name="gr38" draw:text-style-name="P4" draw:layer="layout" svg:x1="44cm" svg:y1="13.5cm" svg:x2="52cm" svg:y2="13.5cm">
          <text:p/>
        </draw:line>
        <draw:line draw:style-name="gr38" draw:text-style-name="P4" draw:layer="layout" svg:x1="44cm" svg:y1="13.9cm" svg:x2="46cm" svg:y2="13.9cm">
          <text:p/>
        </draw:line>
        <draw:line draw:style-name="gr38" draw:text-style-name="P4" draw:layer="layout" svg:x1="44cm" svg:y1="14.3cm" svg:x2="46cm" svg:y2="14.3cm">
          <text:p/>
        </draw:line>
        <draw:line draw:style-name="gr38" draw:text-style-name="P4" draw:layer="layout" svg:x1="44cm" svg:y1="14.7cm" svg:x2="46cm" svg:y2="14.7cm">
          <text:p/>
        </draw:line>
        <draw:line draw:style-name="gr38" draw:text-style-name="P4" draw:layer="layout" svg:x1="51.5cm" svg:y1="11.1cm" svg:x2="57cm" svg:y2="11.1cm">
          <text:p/>
        </draw:line>
        <draw:line draw:style-name="gr38" draw:text-style-name="P4" draw:layer="layout" svg:x1="52cm" svg:y1="11.5cm" svg:x2="57cm" svg:y2="11.5cm">
          <text:p/>
        </draw:line>
        <draw:line draw:style-name="gr38" draw:text-style-name="P4" draw:layer="layout" svg:x1="52cm" svg:y1="13.5cm" svg:x2="52cm" svg:y2="11.5cm">
          <text:p/>
        </draw:line>
        <draw:line draw:style-name="gr38" draw:text-style-name="P4" draw:layer="layout" svg:x1="51.5cm" svg:y1="11.9cm" svg:x2="51.5cm" svg:y2="11.1cm">
          <text:p/>
        </draw:line>
        <draw:line draw:style-name="gr38" draw:text-style-name="P4" draw:layer="layout" svg:x1="61cm" svg:y1="8.7cm" svg:x2="74cm" svg:y2="8.7cm">
          <text:p/>
        </draw:line>
        <draw:line draw:style-name="gr38" draw:text-style-name="P4" draw:layer="layout" svg:x1="61cm" svg:y1="9.1cm" svg:x2="74cm" svg:y2="9.1cm">
          <text:p/>
        </draw:line>
        <draw:line draw:style-name="gr38" draw:text-style-name="P4" draw:layer="layout" svg:x1="61cm" svg:y1="9.5cm" svg:x2="74cm" svg:y2="9.5cm">
          <text:p/>
        </draw:line>
        <draw:line draw:style-name="gr38" draw:text-style-name="P4" draw:layer="layout" svg:x1="61cm" svg:y1="9.9cm" svg:x2="74cm" svg:y2="9.9cm">
          <text:p/>
        </draw:line>
        <draw:polygon draw:style-name="gr58" draw:text-style-name="P1" draw:layer="layout" svg:width="0.499cm" svg:height="0.999cm" svg:x="68.001cm" svg:y="11.002cm" svg:viewBox="0 0 500 1000" draw:points="0,0 0,1000 500,850 500,150">
          <text:p/>
        </draw:polygon>
        <draw:line draw:style-name="gr146" draw:text-style-name="P4" draw:layer="layout" svg:x1="68.301cm" svg:y1="12.502cm" svg:x2="68.301cm" svg:y2="11.902cm">
          <text:p/>
        </draw:line>
        <draw:frame draw:style-name="gr1004" draw:text-style-name="P73" draw:layer="layout" svg:width="3.148cm" svg:height="0.569cm" svg:x="66.511cm" svg:y="12.402cm">
          <draw:text-box>
            <text:p text:style-name="P72"><text:span text:style-name="T23">dc_rdata_buf_v</text:span><text:span text:style-name="T23">alid_r</text:span></text:p>
          </draw:text-box>
        </draw:frame>
        <draw:line draw:style-name="gr38" draw:text-style-name="P4" draw:layer="layout" svg:x1="67.001cm" svg:y1="11.302cm" svg:x2="68.001cm" svg:y2="11.302cm">
          <text:p/>
        </draw:line>
        <draw:line draw:style-name="gr38" draw:text-style-name="P4" draw:layer="layout" svg:x1="67.001cm" svg:y1="11.702cm" svg:x2="68.001cm" svg:y2="11.702cm">
          <text:p/>
        </draw:line>
        <draw:line draw:style-name="gr38" draw:text-style-name="P4" draw:layer="layout" svg:x1="68.501cm" svg:y1="11.502cm" svg:x2="74cm" svg:y2="11.5cm">
          <text:p/>
        </draw:line>
        <draw:frame draw:style-name="gr1005" draw:text-style-name="P73" draw:layer="layout" svg:width="2.598cm" svg:height="0.569cm" svg:x="65.523cm" svg:y="10.842cm">
          <draw:text-box>
            <text:p text:style-name="P72"><text:span text:style-name="T25">dcpu_if.dc</text:span><text:span text:style-name="T25">_rdata</text:span></text:p>
          </draw:text-box>
        </draw:frame>
        <draw:frame draw:style-name="gr834" draw:text-style-name="P75" draw:layer="layout" svg:width="2.314cm" svg:height="0.569cm" svg:x="65.807cm" svg:y="11.243cm">
          <draw:text-box>
            <text:p text:style-name="P72"><text:span text:style-name="T23">dc_data_b</text:span><text:span text:style-name="T23">uf_r</text:span></text:p>
          </draw:text-box>
        </draw:frame>
        <draw:line draw:style-name="gr38" draw:text-style-name="P4" draw:layer="layout" svg:x1="64cm" svg:y1="10.3cm" svg:x2="74cm" svg:y2="10.3cm">
          <text:p/>
        </draw:line>
        <draw:line draw:style-name="gr38" draw:text-style-name="P4" draw:layer="layout" svg:x1="64.2cm" svg:y1="10.7cm" svg:x2="74cm" svg:y2="10.7cm">
          <text:p/>
        </draw:line>
        <draw:line draw:style-name="gr38" draw:text-style-name="P4" draw:layer="layout" svg:x1="70.4cm" svg:y1="11.1cm" svg:x2="74cm" svg:y2="11.1cm">
          <text:p/>
        </draw:line>
        <draw:line draw:style-name="gr38" draw:text-style-name="P4" draw:layer="layout" svg:x1="70.8cm" svg:y1="11.9cm" svg:x2="74cm" svg:y2="11.9cm">
          <text:p/>
        </draw:line>
        <draw:line draw:style-name="gr38" draw:text-style-name="P4" draw:layer="layout" svg:x1="71cm" svg:y1="12.3cm" svg:x2="74cm" svg:y2="12.3cm">
          <text:p/>
        </draw:line>
        <draw:line draw:style-name="gr38" draw:text-style-name="P4" draw:layer="layout" svg:x1="61cm" svg:y1="11.1cm" svg:x2="64cm" svg:y2="11.1cm">
          <text:p/>
        </draw:line>
        <draw:line draw:style-name="gr38" draw:text-style-name="P4" draw:layer="layout" svg:x1="64cm" svg:y1="11.1cm" svg:x2="64cm" svg:y2="10.3cm">
          <text:p/>
        </draw:line>
        <draw:line draw:style-name="gr38" draw:text-style-name="P4" draw:layer="layout" svg:x1="61cm" svg:y1="11.5cm" svg:x2="64.2cm" svg:y2="11.5cm">
          <text:p/>
        </draw:line>
        <draw:line draw:style-name="gr38" draw:text-style-name="P4" draw:layer="layout" svg:x1="64.2cm" svg:y1="11.5cm" svg:x2="64.2cm" svg:y2="10.7cm">
          <text:p/>
        </draw:line>
        <draw:line draw:style-name="gr38" draw:text-style-name="P4" draw:layer="layout" svg:x1="61cm" svg:y1="11.9cm" svg:x2="64.4cm" svg:y2="11.9cm">
          <text:p/>
        </draw:line>
        <draw:line draw:style-name="gr38" draw:text-style-name="P4" draw:layer="layout" svg:x1="64.4cm" svg:y1="17.5cm" svg:x2="64.4cm" svg:y2="10.9cm">
          <text:p/>
        </draw:line>
        <draw:line draw:style-name="gr38" draw:text-style-name="P4" draw:layer="layout" svg:x1="64.4cm" svg:y1="10.9cm" svg:x2="70.4cm" svg:y2="10.9cm">
          <text:p/>
        </draw:line>
        <draw:line draw:style-name="gr38" draw:text-style-name="P4" draw:layer="layout" svg:x1="70.4cm" svg:y1="11.1cm" svg:x2="70.4cm" svg:y2="10.9cm">
          <text:p/>
        </draw:line>
        <draw:line draw:style-name="gr38" draw:text-style-name="P4" draw:layer="layout" svg:x1="61cm" svg:y1="12.3cm" svg:x2="64.2cm" svg:y2="12.3cm">
          <text:p/>
        </draw:line>
        <draw:line draw:style-name="gr38" draw:text-style-name="P4" draw:layer="layout" svg:x1="61cm" svg:y1="12.7cm" svg:x2="64cm" svg:y2="12.7cm">
          <text:p/>
        </draw:line>
        <draw:line draw:style-name="gr38" draw:text-style-name="P4" draw:layer="layout" svg:x1="64cm" svg:y1="14cm" svg:x2="64cm" svg:y2="12.7cm">
          <text:p/>
        </draw:line>
        <draw:line draw:style-name="gr38" draw:text-style-name="P4" draw:layer="layout" svg:x1="64cm" svg:y1="14cm" svg:x2="71cm" svg:y2="14cm">
          <text:p/>
        </draw:line>
        <draw:line draw:style-name="gr38" draw:text-style-name="P4" draw:layer="layout" svg:x1="71cm" svg:y1="14cm" svg:x2="71cm" svg:y2="12.3cm">
          <text:p/>
        </draw:line>
        <draw:line draw:style-name="gr38" draw:text-style-name="P4" draw:layer="layout" svg:x1="64.2cm" svg:y1="13.8cm" svg:x2="64.2cm" svg:y2="12.3cm">
          <text:p/>
        </draw:line>
        <draw:line draw:style-name="gr38" draw:text-style-name="P4" draw:layer="layout" svg:x1="64.2cm" svg:y1="13.8cm" svg:x2="70.8cm" svg:y2="13.8cm">
          <text:p/>
        </draw:line>
        <draw:line draw:style-name="gr38" draw:text-style-name="P4" draw:layer="layout" svg:x1="70.8cm" svg:y1="13.8cm" svg:x2="70.8cm" svg:y2="11.9cm">
          <text:p/>
        </draw:line>
        <draw:custom-shape draw:style-name="gr461" draw:text-style-name="P5" draw:layer="layout" svg:width="0.2cm" svg:height="0.2cm" svg:x="64.3cm" svg:y="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64.4cm" svg:y1="17.5cm" svg:x2="68cm" svg:y2="17.5cm">
          <text:p/>
        </draw:line>
        <draw:line draw:style-name="gr38" draw:text-style-name="P4" draw:layer="layout" svg:x1="63.6cm" svg:y1="18.5cm" svg:x2="63.6cm" svg:y2="9.1cm">
          <text:p/>
        </draw:line>
        <draw:custom-shape draw:style-name="gr461" draw:text-style-name="P5" draw:layer="layout" svg:width="0.2cm" svg:height="0.2cm" svg:x="63.501cm" svg:y="9.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63.6cm" svg:y1="18.5cm" svg:x2="68cm" svg:y2="18.5cm">
          <text:p/>
        </draw:line>
        <draw:line draw:style-name="gr38" draw:text-style-name="P4" draw:layer="layout" svg:x1="61cm" svg:y1="10.7cm" svg:x2="63.8cm" svg:y2="10.7cm">
          <text:p/>
        </draw:line>
        <draw:line draw:style-name="gr38" draw:text-style-name="P4" draw:layer="layout" svg:x1="63.8cm" svg:y1="18cm" svg:x2="63.8cm" svg:y2="10.7cm">
          <text:p/>
        </draw:line>
        <draw:line draw:style-name="gr38" draw:text-style-name="P4" draw:layer="layout" svg:x1="62.8cm" svg:y1="18cm" svg:x2="68cm" svg:y2="18cm">
          <text:p/>
        </draw:line>
        <draw:line draw:style-name="gr38" draw:text-style-name="P4" draw:layer="layout" svg:x1="63.4cm" svg:y1="19cm" svg:x2="68cm" svg:y2="19cm">
          <text:p/>
        </draw:line>
        <draw:line draw:style-name="gr38" draw:text-style-name="P4" draw:layer="layout" svg:x1="63.2cm" svg:y1="19.5cm" svg:x2="68cm" svg:y2="19.5cm">
          <text:p/>
        </draw:line>
        <draw:line draw:style-name="gr38" draw:text-style-name="P4" draw:layer="layout" svg:x1="63.4cm" svg:y1="19cm" svg:x2="63.4cm" svg:y2="13.1cm">
          <text:p/>
        </draw:line>
        <draw:line draw:style-name="gr38" draw:text-style-name="P4" draw:layer="layout" svg:x1="63.2cm" svg:y1="19.5cm" svg:x2="63.2cm" svg:y2="13.5cm">
          <text:p/>
        </draw:line>
        <draw:line draw:style-name="gr38" draw:text-style-name="P4" draw:layer="layout" svg:x1="61cm" svg:y1="13.5cm" svg:x2="63.2cm" svg:y2="13.5cm">
          <text:p/>
        </draw:line>
        <draw:line draw:style-name="gr38" draw:text-style-name="P4" draw:layer="layout" svg:x1="61cm" svg:y1="13.1cm" svg:x2="63.4cm" svg:y2="13.1cm">
          <text:p/>
        </draw:line>
        <draw:line draw:style-name="gr38" draw:text-style-name="P4" draw:layer="layout" svg:x1="61cm" svg:y1="22.5cm" svg:x2="61cm" svg:y2="20cm">
          <text:p/>
        </draw:line>
        <draw:line draw:style-name="gr38" draw:text-style-name="P4" draw:layer="layout" svg:x1="61cm" svg:y1="22.5cm" svg:x2="63.5cm" svg:y2="22.5cm">
          <text:p/>
        </draw:line>
        <draw:line draw:style-name="gr38" draw:text-style-name="P4" draw:layer="layout" svg:x1="61cm" svg:y1="10.3cm" svg:x2="63cm" svg:y2="10.3cm">
          <text:p/>
        </draw:line>
        <draw:line draw:style-name="gr38" draw:text-style-name="P4" draw:layer="layout" svg:x1="63cm" svg:y1="20cm" svg:x2="63cm" svg:y2="10.3cm">
          <text:p/>
        </draw:line>
        <draw:line draw:style-name="gr38" draw:text-style-name="P4" draw:layer="layout" svg:x1="61cm" svg:y1="20cm" svg:x2="63cm" svg:y2="20cm">
          <text:p/>
        </draw:line>
        <draw:line draw:style-name="gr38" draw:text-style-name="P4" draw:layer="layout" svg:x1="60.8cm" svg:y1="23.5cm" svg:x2="63.5cm" svg:y2="23.5cm">
          <text:p/>
        </draw:line>
        <draw:line draw:style-name="gr38" draw:text-style-name="P4" draw:layer="layout" svg:x1="60.8cm" svg:y1="23.5cm" svg:x2="60.8cm" svg:y2="19.8cm">
          <text:p/>
        </draw:line>
        <draw:custom-shape draw:style-name="gr461" draw:text-style-name="P5" draw:layer="layout" svg:width="0.2cm" svg:height="0.2cm" svg:x="63.701cm" svg:y="17.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60.8cm" svg:y1="19.8cm" svg:x2="62.8cm" svg:y2="19.8cm">
          <text:p/>
        </draw:line>
        <draw:line draw:style-name="gr38" draw:text-style-name="P4" draw:layer="layout" svg:x1="62.8cm" svg:y1="19.8cm" svg:x2="62.8cm" svg:y2="18cm">
          <text:p/>
        </draw:line>
        <draw:line draw:style-name="gr38" draw:text-style-name="P4" draw:layer="layout" svg:x1="62cm" svg:y1="22cm" svg:x2="63.5cm" svg:y2="22cm">
          <text:p/>
        </draw:line>
        <draw:line draw:style-name="gr38" draw:text-style-name="P4" draw:layer="layout" svg:x1="62cm" svg:y1="22cm" svg:x2="62cm" svg:y2="8.7cm">
          <text:p/>
        </draw:line>
        <draw:custom-shape draw:style-name="gr461" draw:text-style-name="P5" draw:layer="layout" svg:width="0.2cm" svg:height="0.2cm" svg:x="61.902cm" svg:y="8.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14" draw:style-name="dp1" draw:master-page-name="Standard">
        <draw:line draw:style-name="gr1006" draw:text-style-name="P4" draw:layer="layout" svg:x1="22.5cm" svg:y1="15.9cm" svg:x2="23.5cm" svg:y2="15.9cm">
          <text:p/>
        </draw:line>
        <draw:line draw:style-name="gr1007" draw:text-style-name="P4" draw:layer="layout" svg:x1="14.4cm" svg:y1="19.6cm" svg:x2="14.4cm" svg:y2="18.3cm">
          <text:p/>
        </draw:line>
        <draw:line draw:style-name="gr1006" draw:text-style-name="P4" draw:layer="layout" svg:x1="13cm" svg:y1="20cm" svg:x2="16.5cm" svg:y2="20cm">
          <text:p/>
        </draw:line>
        <draw:line draw:style-name="gr1007" draw:text-style-name="P4" draw:layer="layout" svg:x1="33cm" svg:y1="20.6cm" svg:x2="33cm" svg:y2="17.8cm">
          <text:p/>
        </draw:line>
        <draw:line draw:style-name="gr1007" draw:text-style-name="P4" draw:layer="layout" svg:x1="33cm" svg:y1="15cm" svg:x2="33cm" svg:y2="15.8cm">
          <text:p/>
        </draw:line>
        <draw:line draw:style-name="gr1008" draw:text-style-name="P4" draw:layer="layout" svg:x1="30.5cm" svg:y1="16.4cm" svg:x2="32cm" svg:y2="16.4cm">
          <text:p/>
        </draw:line>
        <draw:line draw:style-name="gr1006" draw:text-style-name="P4" draw:layer="layout" svg:x1="25cm" svg:y1="17cm" svg:x2="27cm" svg:y2="17cm">
          <text:p/>
        </draw:line>
        <draw:line draw:style-name="gr1009" draw:text-style-name="P4" draw:layer="layout" svg:x1="28cm" svg:y1="17cm" svg:x2="30cm" svg:y2="17cm">
          <text:p/>
        </draw:line>
        <draw:line draw:style-name="gr1010" draw:text-style-name="P4" draw:layer="layout" svg:x1="19cm" svg:y1="17.7cm" svg:x2="21.6cm" svg:y2="17.7cm">
          <text:p/>
        </draw:line>
        <draw:line draw:style-name="gr1009" draw:text-style-name="P4" draw:layer="layout" svg:x1="21cm" svg:y1="20cm" svg:x2="21cm" svg:y2="12.5cm">
          <text:p/>
        </draw:line>
        <draw:line draw:style-name="gr1009" draw:text-style-name="P4" draw:layer="layout" svg:x1="21cm" svg:y1="18.3cm" svg:x2="21.6cm" svg:y2="18.3cm">
          <text:p/>
        </draw:line>
        <draw:custom-shape draw:style-name="gr461" draw:text-style-name="P5" draw:layer="layout" svg:width="0.2cm" svg:height="0.2cm" svg:x="19.3cm" svg:y="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9" draw:text-style-name="P4" draw:layer="layout" svg:x1="20.5cm" svg:y1="17.7cm" svg:x2="20.5cm" svg:y2="19cm">
          <text:p/>
        </draw:line>
        <draw:line draw:style-name="gr1007" draw:text-style-name="P4" draw:layer="layout" svg:x1="37.2cm" svg:y1="19cm" svg:x2="37.2cm" svg:y2="17.4cm">
          <text:p/>
        </draw:line>
        <draw:custom-shape draw:style-name="gr461" draw:text-style-name="P5" draw:layer="layout" svg:width="0.2cm" svg:height="0.2cm" svg:x="29.9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9" draw:text-style-name="P4" draw:layer="layout" svg:x1="30cm" svg:y1="17cm" svg:x2="30cm" svg:y2="21cm">
          <text:p/>
        </draw:line>
        <draw:line draw:style-name="gr1009" draw:text-style-name="P4" draw:layer="layout" svg:x1="36cm" svg:y1="21cm" svg:x2="36.4cm" svg:y2="21cm">
          <text:p/>
        </draw:line>
        <draw:line draw:style-name="gr1009" draw:text-style-name="P4" draw:layer="layout" svg:x1="36.4cm" svg:y1="21cm" svg:x2="36.4cm" svg:y2="17.3cm">
          <text:p/>
        </draw:line>
        <draw:line draw:style-name="gr1011" draw:text-style-name="P4" draw:layer="layout" svg:x1="13cm" svg:y1="16.2cm" svg:x2="13.512cm" svg:y2="16.2cm">
          <text:p/>
        </draw:line>
        <draw:line draw:style-name="gr1012" draw:text-style-name="P4" draw:layer="layout" svg:x1="13cm" svg:y1="8cm" svg:x2="37.5cm" svg:y2="8cm">
          <text:p/>
        </draw:line>
        <draw:line draw:style-name="gr1012" draw:text-style-name="P4" draw:layer="layout" svg:x1="13cm" svg:y1="8cm" svg:x2="13cm" svg:y2="16.2cm">
          <text:p/>
        </draw:line>
        <draw:line draw:style-name="gr1012" draw:text-style-name="P4" draw:layer="layout" svg:x1="37.5cm" svg:y1="17cm" svg:x2="37.5cm" svg:y2="8cm">
          <text:p/>
        </draw:line>
        <draw:line draw:style-name="gr1006" draw:text-style-name="P4" draw:layer="layout" svg:x1="22.5cm" svg:y1="12.5cm" svg:x2="24cm" svg:y2="12.5cm">
          <text:p/>
        </draw:line>
        <draw:line draw:style-name="gr1008" draw:text-style-name="P4" draw:layer="layout" svg:x1="9.5cm" svg:y1="10.5cm" svg:x2="18cm" svg:y2="10.5cm">
          <text:p/>
        </draw:line>
        <draw:line draw:style-name="gr1008" draw:text-style-name="P4" draw:layer="layout" svg:x1="4.5cm" svg:y1="11.5cm" svg:x2="6cm" svg:y2="11.5cm">
          <text:p/>
        </draw:line>
        <draw:line draw:style-name="gr1006" draw:text-style-name="P4" draw:layer="layout" svg:x1="5cm" svg:y1="10.9cm" svg:x2="6cm" svg:y2="10.9cm">
          <text:p/>
        </draw:line>
        <draw:frame draw:style-name="gr1013" draw:text-style-name="P34" draw:layer="layout" svg:width="0.855cm" svg:height="0.962cm" svg:x="4.4cm" svg:y="10.4cm">
          <draw:text-box>
            <text:p><text:span text:style-name="T9">4</text:span></text:p>
          </draw:text-box>
        </draw:frame>
        <draw:line draw:style-name="gr1014" draw:text-style-name="P4" draw:layer="layout" svg:x1="4.5cm" svg:y1="12.5cm" svg:x2="8cm" svg:y2="12.5cm">
          <text:p/>
        </draw:line>
        <draw:line draw:style-name="gr1014" draw:text-style-name="P4" draw:layer="layout" svg:x1="8cm" svg:y1="12.5cm" svg:x2="8cm" svg:y2="10.5cm">
          <text:p/>
        </draw:line>
        <draw:custom-shape draw:style-name="gr1015" draw:text-style-name="P77" draw:layer="layout" svg:width="0.2cm" svg:height="0.2cm" svg:x="4.403cm" svg:y="12.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14" draw:text-style-name="P4" draw:layer="layout" svg:x1="2cm" svg:y1="8cm" svg:x2="5.9cm" svg:y2="8cm">
          <text:p/>
        </draw:line>
        <draw:line draw:style-name="gr1014" draw:text-style-name="P4" draw:layer="layout" svg:x1="26cm" svg:y1="11.5cm" svg:x2="26cm" svg:y2="7.7cm">
          <text:p/>
        </draw:line>
        <draw:line draw:style-name="gr1016" draw:text-style-name="P4" draw:layer="layout" svg:x1="7.5cm" svg:y1="11.2cm" svg:x2="7.5cm" svg:y2="8.3cm">
          <text:p/>
        </draw:line>
        <draw:line draw:style-name="gr1014" draw:text-style-name="P4" draw:layer="layout" svg:x1="6.975cm" svg:y1="11.201cm" svg:x2="7.5cm" svg:y2="11.2cm">
          <text:p/>
        </draw:line>
        <draw:line draw:style-name="gr1014" draw:text-style-name="P4" draw:layer="layout" svg:x1="6.4cm" svg:y1="8.3cm" svg:x2="7.5cm" svg:y2="8.3cm">
          <text:p/>
        </draw:line>
        <draw:line draw:style-name="gr1014" draw:text-style-name="P4" draw:layer="layout" svg:x1="6.4cm" svg:y1="7.7cm" svg:x2="26cm" svg:y2="7.7cm">
          <text:p/>
        </draw:line>
        <draw:line draw:style-name="gr1008" draw:text-style-name="P4" draw:layer="layout" svg:x1="4cm" svg:y1="17.4cm" svg:x2="5cm" svg:y2="17.4cm">
          <text:p/>
        </draw:line>
        <draw:line draw:style-name="gr1006" draw:text-style-name="P4" draw:layer="layout" svg:x1="7.5cm" svg:y1="17cm" svg:x2="8.5cm" svg:y2="17cm">
          <text:p/>
        </draw:line>
        <draw:custom-shape draw:style-name="gr1017" draw:text-style-name="P4" draw:layer="layout" svg:width="0.2cm" svg:height="1.2cm" svg:x="10.302cm" svg:y="16.3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 draw:handle-range-y-minimum="0" draw:handle-range-y-maximum="21600" draw:handle-position="left $1"/>
          </draw:enhanced-geometry>
        </draw:custom-shape>
        <draw:custom-shape draw:style-name="gr461" draw:text-style-name="P5" draw:layer="layout" svg:width="0.2cm" svg:height="0.2cm" svg:x="9.9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5" draw:text-style-name="P77" draw:layer="layout" svg:width="0.2cm" svg:height="0.2cm" svg:x="4.4cm" svg:y="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8" draw:text-style-name="P4" draw:layer="layout" svg:x1="2cm" svg:y1="17.4cm" svg:x2="3.5cm" svg:y2="17.4cm">
          <text:p/>
        </draw:line>
        <draw:line draw:style-name="gr1009" draw:text-style-name="P4" draw:layer="layout" svg:x1="10cm" svg:y1="17cm" svg:x2="10cm" svg:y2="20cm">
          <text:p/>
        </draw:line>
        <draw:frame draw:style-name="gr1018" draw:text-style-name="P78" draw:layer="layout" svg:width="2.06cm" svg:height="0.725cm" svg:x="4.84cm" svg:y="16.6cm">
          <draw:text-box>
            <text:p><text:span text:style-name="T26">Address</text:span></text:p>
          </draw:text-box>
        </draw:frame>
        <draw:frame draw:style-name="gr1019" draw:text-style-name="P78" draw:layer="layout" svg:width="1.42cm" svg:height="0.725cm" svg:x="7.3cm" svg:y="16.9cm">
          <draw:text-box>
            <text:p><text:span text:style-name="T26">Instr.</text:span></text:p>
          </draw:text-box>
        </draw:frame>
        <draw:line draw:style-name="gr1014" draw:text-style-name="P4" draw:layer="layout" svg:x1="2cm" svg:y1="8cm" svg:x2="2cm" svg:y2="17.4cm">
          <text:p/>
        </draw:line>
        <draw:line draw:style-name="gr1016" draw:text-style-name="P4" draw:layer="layout" svg:x1="4.5cm" svg:y1="17.4cm" svg:x2="4.5cm" svg:y2="11.5cm">
          <text:p/>
        </draw:line>
        <draw:line draw:style-name="gr1009" draw:text-style-name="P4" draw:layer="layout" svg:x1="10cm" svg:y1="20cm" svg:x2="13cm" svg:y2="20cm">
          <text:p/>
        </draw:line>
        <draw:line draw:style-name="gr1008" draw:text-style-name="P4" draw:layer="layout" svg:x1="10.5cm" svg:y1="16.8cm" svg:x2="13.512cm" svg:y2="16.8cm">
          <text:p/>
        </draw:line>
        <draw:line draw:style-name="gr1008" draw:text-style-name="P4" draw:layer="layout" svg:x1="10.1cm" svg:y1="16.5cm" svg:x2="13.512cm" svg:y2="16.5cm">
          <text:p/>
        </draw:line>
        <draw:custom-shape draw:style-name="gr1020" draw:text-style-name="P80" draw:layer="layout" svg:width="1cm" svg:height="1.6cm" svg:x="21.5cm" svg:y="11.7cm">
          <text:p text:style-name="P79"><text:span text:style-name="T26">Shift</text:span></text:p>
          <text:p text:style-name="P79"><text:span text:style-name="T26">left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20.901cm" svg:y="18.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6" draw:text-style-name="P4" draw:layer="layout" svg:x1="21cm" svg:y1="12.5cm" svg:x2="21.5cm" svg:y2="12.5cm">
          <text:p/>
        </draw:line>
        <draw:frame draw:style-name="gr1021" draw:text-style-name="P78" draw:layer="layout" svg:width="3.787cm" svg:height="0.725cm" svg:x="10.2cm" svg:y="15.9cm">
          <draw:text-box>
            <text:p><text:span text:style-name="T26">Instr.[19-15]</text:span></text:p>
          </draw:text-box>
        </draw:frame>
        <draw:frame draw:style-name="gr1021" draw:text-style-name="P78" draw:layer="layout" svg:width="3.787cm" svg:height="0.725cm" svg:x="10.2cm" svg:y="16.4cm">
          <draw:text-box>
            <text:p><text:span text:style-name="T26">Instr.[24-20]</text:span></text:p>
          </draw:text-box>
        </draw:frame>
        <draw:frame draw:style-name="gr1022" draw:text-style-name="P78" draw:layer="layout" svg:width="8.545cm" svg:height="0.725cm" svg:x="28.8cm" svg:y="21.975cm">
          <draw:text-box>
            <text:p><text:span text:style-name="T26">Register </text:span><text:span text:style-name="T26">address: </text:span><text:span text:style-name="T26">delayed </text:span><text:span text:style-name="T26">instruction[1</text:span><text:span text:style-name="T26">1-7]</text:span></text:p>
          </draw:text-box>
        </draw:frame>
        <draw:line draw:style-name="gr1023" draw:text-style-name="P47" draw:layer="layout" svg:x1="10.704cm" svg:y1="19.806cm" svg:x2="11.104cm" svg:y2="20.206cm">
          <text:p/>
        </draw:line>
        <draw:frame draw:style-name="gr1024" draw:text-style-name="P78" draw:layer="layout" svg:width="0.976cm" svg:height="0.725cm" svg:x="10.3cm" svg:y="19.277cm">
          <draw:text-box>
            <text:p><text:span text:style-name="T26">32</text:span></text:p>
          </draw:text-box>
        </draw:frame>
        <draw:line draw:style-name="gr1007" draw:text-style-name="P4" draw:layer="layout" svg:x1="21.3cm" svg:y1="25.7cm" svg:x2="21.3cm" svg:y2="11.2cm">
          <text:p/>
        </draw:line>
        <draw:line draw:style-name="gr38" draw:text-style-name="P4" draw:layer="layout" svg:x1="36cm" svg:y1="17cm" svg:x2="36.8cm" svg:y2="17cm">
          <text:p/>
        </draw:line>
        <draw:g draw:style-name="gr1">
          <draw:custom-shape draw:style-name="gr1025" draw:text-style-name="P29" draw:layer="layout" svg:width="0.5cm" svg:height="13cm" svg:x="18cm" svg:y="9cm">
            <text:p/>
            <draw:enhanced-geometry svg:viewBox="0 0 21600 21600" draw:type="rectangle" draw:enhanced-path="M 0 0 L 21600 0 21600 21600 0 21600 0 0 Z N"/>
          </draw:custom-shape>
          <draw:custom-shape draw:style-name="gr1025" draw:text-style-name="P29" draw:layer="layout" svg:width="0.5cm" svg:height="13cm" svg:x="18.5cm" svg:y="9cm">
            <text:p/>
            <draw:enhanced-geometry svg:viewBox="0 0 21600 21600" draw:type="rectangle" draw:enhanced-path="M 0 0 L 21600 0 21600 21600 0 21600 0 0 Z N"/>
          </draw:custom-shape>
        </draw:g>
        <draw:frame draw:style-name="gr1026" draw:text-style-name="P81" draw:layer="layout" svg:width="1.797cm" svg:height="0.806cm" svg:x="17.7cm" svg:y="8.2cm">
          <draw:text-box>
            <text:p><text:span text:style-name="T27">ID/EX</text:span></text:p>
          </draw:text-box>
        </draw:frame>
        <draw:g draw:style-name="gr1">
          <draw:custom-shape draw:style-name="gr1025" draw:text-style-name="P29" draw:layer="layout" svg:width="0.5cm" svg:height="13cm" svg:x="8.5cm" svg:y="9.001cm">
            <text:p/>
            <draw:enhanced-geometry svg:viewBox="0 0 21600 21600" draw:type="rectangle" draw:enhanced-path="M 0 0 L 21600 0 21600 21600 0 21600 0 0 Z N"/>
          </draw:custom-shape>
          <draw:custom-shape draw:style-name="gr1025" draw:text-style-name="P29" draw:layer="layout" svg:width="0.5cm" svg:height="13cm" svg:x="9cm" svg:y="9.001cm">
            <text:p/>
            <draw:enhanced-geometry svg:viewBox="0 0 21600 21600" draw:type="rectangle" draw:enhanced-path="M 0 0 L 21600 0 21600 21600 0 21600 0 0 Z N"/>
          </draw:custom-shape>
        </draw:g>
        <draw:frame draw:style-name="gr1027" draw:text-style-name="P81" draw:layer="layout" svg:width="1.577cm" svg:height="0.806cm" svg:x="8.2cm" svg:y="8.201cm">
          <draw:text-box>
            <text:p><text:span text:style-name="T27">IF/ID</text:span></text:p>
          </draw:text-box>
        </draw:frame>
        <draw:g draw:style-name="gr1">
          <draw:custom-shape draw:style-name="gr1025" draw:text-style-name="P29" draw:layer="layout" svg:width="0.5cm" svg:height="13cm" svg:x="27cm" svg:y="9.002cm">
            <text:p/>
            <draw:enhanced-geometry svg:viewBox="0 0 21600 21600" draw:type="rectangle" draw:enhanced-path="M 0 0 L 21600 0 21600 21600 0 21600 0 0 Z N"/>
          </draw:custom-shape>
          <draw:custom-shape draw:style-name="gr1025" draw:text-style-name="P29" draw:layer="layout" svg:width="0.5cm" svg:height="13cm" svg:x="27.5cm" svg:y="9.002cm">
            <text:p/>
            <draw:enhanced-geometry svg:viewBox="0 0 21600 21600" draw:type="rectangle" draw:enhanced-path="M 0 0 L 21600 0 21600 21600 0 21600 0 0 Z N"/>
          </draw:custom-shape>
        </draw:g>
        <draw:frame draw:style-name="gr1028" draw:text-style-name="P81" draw:layer="layout" svg:width="2.456cm" svg:height="0.806cm" svg:x="26.6cm" svg:y="8.202cm">
          <draw:text-box>
            <text:p><text:span text:style-name="T27">EX/MEM</text:span></text:p>
          </draw:text-box>
        </draw:frame>
        <draw:g draw:style-name="gr1">
          <draw:custom-shape draw:style-name="gr1025" draw:text-style-name="P29" draw:layer="layout" svg:width="0.5cm" svg:height="13cm" svg:x="35.001cm" svg:y="9.003cm">
            <text:p/>
            <draw:enhanced-geometry svg:viewBox="0 0 21600 21600" draw:type="rectangle" draw:enhanced-path="M 0 0 L 21600 0 21600 21600 0 21600 0 0 Z N"/>
          </draw:custom-shape>
          <draw:custom-shape draw:style-name="gr1025" draw:text-style-name="P29" draw:layer="layout" svg:width="0.5cm" svg:height="13cm" svg:x="35.501cm" svg:y="9.003cm">
            <text:p/>
            <draw:enhanced-geometry svg:viewBox="0 0 21600 21600" draw:type="rectangle" draw:enhanced-path="M 0 0 L 21600 0 21600 21600 0 21600 0 0 Z N"/>
          </draw:custom-shape>
        </draw:g>
        <draw:frame draw:style-name="gr1029" draw:text-style-name="P81" draw:layer="layout" svg:width="2.593cm" svg:height="0.806cm" svg:x="34.101cm" svg:y="8.203cm">
          <draw:text-box>
            <text:p><text:span text:style-name="T27">MEM/WB</text:span></text:p>
          </draw:text-box>
        </draw:frame>
        <draw:line draw:style-name="gr1008" draw:text-style-name="P4" draw:layer="layout" svg:x1="8cm" svg:y1="10.5cm" svg:x2="8.5cm" svg:y2="10.5cm">
          <text:p/>
        </draw:line>
        <draw:line draw:style-name="gr1008" draw:text-style-name="P4" draw:layer="layout" svg:x1="19cm" svg:y1="10.5cm" svg:x2="21cm" svg:y2="10.5cm">
          <text:p/>
        </draw:line>
        <draw:line draw:style-name="gr1006" draw:text-style-name="P4" draw:layer="layout" svg:x1="17cm" svg:y1="16cm" svg:x2="18cm" svg:y2="16cm">
          <text:p/>
        </draw:line>
        <draw:line draw:style-name="gr1006" draw:text-style-name="P4" draw:layer="layout" svg:x1="17cm" svg:y1="17.7cm" svg:x2="18cm" svg:y2="17.7cm">
          <text:p/>
        </draw:line>
        <draw:line draw:style-name="gr1006" draw:text-style-name="P4" draw:layer="layout" svg:x1="17.5cm" svg:y1="20cm" svg:x2="18cm" svg:y2="20cm">
          <text:p/>
        </draw:line>
        <draw:line draw:style-name="gr1006" draw:text-style-name="P4" draw:layer="layout" svg:x1="20.5cm" svg:y1="19cm" svg:x2="27cm" svg:y2="19cm">
          <text:p/>
        </draw:line>
        <draw:line draw:style-name="gr1006" draw:text-style-name="P4" draw:layer="layout" svg:x1="34cm" svg:y1="17cm" svg:x2="35cm" svg:y2="17cm">
          <text:p/>
        </draw:line>
        <draw:line draw:style-name="gr1030" draw:text-style-name="P4" draw:layer="layout" svg:x1="30cm" svg:y1="21cm" svg:x2="35cm" svg:y2="21cm">
          <text:p/>
        </draw:line>
        <draw:line draw:style-name="gr38" draw:text-style-name="P4" draw:layer="layout" svg:x1="9.5cm" svg:y1="17cm" svg:x2="10.3cm" svg:y2="17cm">
          <text:p/>
        </draw:line>
        <draw:custom-shape draw:style-name="gr461" draw:text-style-name="P5" draw:layer="layout" svg:width="0.2cm" svg:height="0.2cm" svg:x="9.901cm" svg:y="19.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31" draw:text-style-name="P4" draw:layer="layout" svg:x1="10cm" svg:y1="20cm" svg:x2="10cm" svg:y2="24.2cm">
          <text:p/>
        </draw:line>
        <draw:line draw:style-name="gr1032" draw:text-style-name="P4" draw:layer="layout" svg:x1="10cm" svg:y1="21.9cm" svg:x2="18cm" svg:y2="21.9cm">
          <text:p/>
        </draw:line>
        <draw:line draw:style-name="gr1032" draw:text-style-name="P4" draw:layer="layout" svg:x1="19cm" svg:y1="21.9cm" svg:x2="27cm" svg:y2="21.9cm">
          <text:p/>
        </draw:line>
        <draw:line draw:style-name="gr1032" draw:text-style-name="P4" draw:layer="layout" svg:x1="28cm" svg:y1="21.9cm" svg:x2="35cm" svg:y2="21.9cm">
          <text:p/>
        </draw:line>
        <draw:line draw:style-name="gr1033" draw:text-style-name="P4" draw:layer="layout" svg:x1="36cm" svg:y1="21.9cm" svg:x2="37cm" svg:y2="21.9cm">
          <text:p/>
        </draw:line>
        <draw:line draw:style-name="gr1033" draw:text-style-name="P4" draw:layer="layout" svg:x1="37cm" svg:y1="21.9cm" svg:x2="37cm" svg:y2="22.5cm">
          <text:p/>
        </draw:line>
        <draw:line draw:style-name="gr1033" draw:text-style-name="P4" draw:layer="layout" svg:x1="37cm" svg:y1="22.5cm" svg:x2="9.7cm" svg:y2="22.5cm">
          <text:p/>
        </draw:line>
        <draw:line draw:style-name="gr1033" draw:text-style-name="P4" draw:layer="layout" svg:x1="9.7cm" svg:y1="17.2cm" svg:x2="9.7cm" svg:y2="22.5cm">
          <text:p/>
        </draw:line>
        <draw:line draw:style-name="gr1008" draw:text-style-name="P4" draw:layer="layout" svg:x1="9.7cm" svg:y1="17.2cm" svg:x2="13.512cm" svg:y2="17.2cm">
          <text:p/>
        </draw:line>
        <draw:frame draw:style-name="gr1034" draw:text-style-name="P82" draw:layer="layout" svg:width="1.725cm" svg:height="0.725cm" svg:x="6.701cm" svg:y="6.476cm">
          <draw:text-box>
            <text:p><text:span text:style-name="T28">PCSrc</text:span></text:p>
          </draw:text-box>
        </draw:frame>
        <draw:custom-shape draw:style-name="gr1035" draw:text-style-name="P83" draw:layer="layout" svg:width="1cm" svg:height="2cm" svg:x="23cm" svg:y="5.8cm">
          <text:p text:style-name="P32"><text:span text:style-name="T9">&amp;</text:span></text:p>
          <draw:enhanced-geometry svg:viewBox="0 0 21600 21600" draw:type="rectangle" draw:enhanced-path="M 0 0 L 21600 0 21600 21600 0 21600 0 0 Z N"/>
        </draw:custom-shape>
        <draw:line draw:style-name="gr1036" draw:text-style-name="P84" draw:layer="layout" svg:x1="26.4cm" svg:y1="6.3cm" svg:x2="24cm" svg:y2="6.3cm">
          <text:p/>
        </draw:line>
        <draw:line draw:style-name="gr1036" draw:text-style-name="P4" draw:layer="layout" svg:x1="26.2cm" svg:y1="7.3cm" svg:x2="24cm" svg:y2="7.301cm">
          <text:p/>
        </draw:line>
        <draw:frame draw:style-name="gr1037" draw:text-style-name="P82" draw:layer="layout" svg:width="2.243cm" svg:height="0.725cm" svg:x="24.001cm" svg:y="5.577cm">
          <draw:text-box>
            <text:p><text:span text:style-name="T28">branch_s</text:span></text:p>
          </draw:text-box>
        </draw:frame>
        <draw:line draw:style-name="gr1036" draw:text-style-name="P4" draw:layer="layout" svg:x1="26.2cm" svg:y1="16.7cm" svg:x2="26.2cm" svg:y2="7.3cm">
          <text:p/>
        </draw:line>
        <draw:line draw:style-name="gr1036" draw:text-style-name="P4" draw:layer="layout" svg:x1="26.2cm" svg:y1="16.7cm" svg:x2="25cm" svg:y2="16.7cm">
          <text:p/>
        </draw:line>
        <draw:line draw:style-name="gr1007" draw:text-style-name="P4" draw:layer="layout" svg:x1="24.5cm" svg:y1="26.3cm" svg:x2="24.5cm" svg:y2="17.7cm">
          <text:p/>
        </draw:line>
        <draw:line draw:style-name="gr1038" draw:text-style-name="P47" draw:layer="layout" svg:x1="24.3cm" svg:y1="18.4cm" svg:x2="24.7cm" svg:y2="18.8cm">
          <text:p/>
        </draw:line>
        <draw:line draw:style-name="gr1036" draw:text-style-name="P4" draw:layer="layout" svg:x1="19cm" svg:y1="26.3cm" svg:x2="24.5cm" svg:y2="26.3cm">
          <text:p/>
        </draw:line>
        <draw:custom-shape draw:style-name="gr1039" draw:text-style-name="P85" draw:layer="layout" svg:width="1cm" svg:height="3.5cm" svg:x="18cm" svg:y="23.5cm">
          <text:p/>
          <draw:enhanced-geometry svg:viewBox="0 0 21600 21600" draw:type="rectangle" draw:enhanced-path="M 0 0 L 21600 0 21600 21600 0 21600 0 0 Z N"/>
        </draw:custom-shape>
        <draw:custom-shape draw:style-name="gr1039" draw:text-style-name="P85" draw:layer="layout" svg:width="1cm" svg:height="3.5cm" svg:x="27cm" svg:y="23.5cm">
          <text:p/>
          <draw:enhanced-geometry svg:viewBox="0 0 21600 21600" draw:type="rectangle" draw:enhanced-path="M 0 0 L 21600 0 21600 21600 0 21600 0 0 Z N"/>
        </draw:custom-shape>
        <draw:custom-shape draw:style-name="gr1040" draw:text-style-name="P85" draw:layer="layout" svg:width="1cm" svg:height="4cm" svg:x="35cm" svg:y="23cm">
          <text:p/>
          <draw:enhanced-geometry svg:viewBox="0 0 21600 21600" draw:type="rectangle" draw:enhanced-path="M 0 0 L 21600 0 21600 21600 0 21600 0 0 Z N"/>
        </draw:custom-shape>
        <draw:line draw:style-name="gr1041" draw:text-style-name="P86" draw:layer="layout" svg:x1="19cm" svg:y1="25.4cm" svg:x2="27cm" svg:y2="25.4cm">
          <text:p/>
        </draw:line>
        <draw:line draw:style-name="gr1041" draw:text-style-name="P86" draw:layer="layout" svg:x1="28cm" svg:y1="25.4cm" svg:x2="35cm" svg:y2="25.4cm">
          <text:p/>
        </draw:line>
        <draw:line draw:style-name="gr1041" draw:text-style-name="P86" draw:layer="layout" svg:x1="28cm" svg:y1="23.7cm" svg:x2="35cm" svg:y2="23.7cm">
          <text:p/>
        </draw:line>
        <draw:line draw:style-name="gr1041" draw:text-style-name="P86" draw:layer="layout" svg:x1="15cm" svg:y1="26.6cm" svg:x2="18cm" svg:y2="26.6cm">
          <text:p/>
        </draw:line>
        <draw:line draw:style-name="gr1041" draw:text-style-name="P86" draw:layer="layout" svg:x1="15cm" svg:y1="26.9cm" svg:x2="18cm" svg:y2="26.9cm">
          <text:p/>
        </draw:line>
        <draw:line draw:style-name="gr1036" draw:text-style-name="P4" draw:layer="layout" svg:x1="26.4cm" svg:y1="26.6cm" svg:x2="26.4cm" svg:y2="6.3cm">
          <text:p/>
        </draw:line>
        <draw:line draw:style-name="gr1036" draw:text-style-name="P4" draw:layer="layout" svg:x1="34.4cm" svg:y1="20.3cm" svg:x2="34.4cm" svg:y2="15cm">
          <text:p/>
        </draw:line>
        <draw:line draw:style-name="gr1036" draw:text-style-name="P4" draw:layer="layout" svg:x1="33cm" svg:y1="15cm" svg:x2="34.4cm" svg:y2="15cm">
          <text:p/>
        </draw:line>
        <draw:line draw:style-name="gr1036" draw:text-style-name="P4" draw:layer="layout" svg:x1="33.2cm" svg:y1="20.3cm" svg:x2="34.4cm" svg:y2="20.3cm">
          <text:p/>
        </draw:line>
        <draw:line draw:style-name="gr1036" draw:text-style-name="P4" draw:layer="layout" svg:x1="33cm" svg:y1="24.3cm" svg:x2="33cm" svg:y2="20.6cm">
          <text:p/>
        </draw:line>
        <draw:line draw:style-name="gr1036" draw:text-style-name="P4" draw:layer="layout" svg:x1="33.2cm" svg:y1="24cm" svg:x2="33.2cm" svg:y2="20.3cm">
          <text:p/>
        </draw:line>
        <draw:line draw:style-name="gr1036" draw:text-style-name="P4" draw:layer="layout" svg:x1="28cm" svg:y1="24cm" svg:x2="33.2cm" svg:y2="24cm">
          <text:p/>
        </draw:line>
        <draw:frame draw:style-name="gr1042" draw:text-style-name="P82" draw:layer="layout" svg:width="1.4cm" svg:height="0.725cm" svg:x="24.9cm" svg:y="16.075cm">
          <draw:text-box>
            <text:p><text:span text:style-name="T28">Zero</text:span></text:p>
          </draw:text-box>
        </draw:frame>
        <draw:line draw:style-name="gr1036" draw:text-style-name="P4" draw:layer="layout" svg:x1="14.4cm" svg:y1="22.7cm" svg:x2="36.5cm" svg:y2="22.7cm">
          <text:p/>
        </draw:line>
        <draw:line draw:style-name="gr1036" draw:text-style-name="P4" draw:layer="layout" svg:x1="14.4cm" svg:y1="22.7cm" svg:x2="14.4cm" svg:y2="19.6cm">
          <text:p/>
        </draw:line>
        <draw:line draw:style-name="gr1036" draw:text-style-name="P4" draw:layer="layout" svg:x1="36cm" svg:y1="25.4cm" svg:x2="36.5cm" svg:y2="25.4cm">
          <text:p/>
        </draw:line>
        <draw:line draw:style-name="gr1036" draw:text-style-name="P4" draw:layer="layout" svg:x1="36cm" svg:y1="23.7cm" svg:x2="37.2cm" svg:y2="23.7cm">
          <text:p/>
        </draw:line>
        <draw:line draw:style-name="gr1036" draw:text-style-name="P4" draw:layer="layout" svg:x1="36.5cm" svg:y1="25.4cm" svg:x2="36.5cm" svg:y2="22.7cm">
          <text:p/>
        </draw:line>
        <draw:line draw:style-name="gr1036" draw:text-style-name="P4" draw:layer="layout" svg:x1="37.2cm" svg:y1="23.7cm" svg:x2="37.2cm" svg:y2="19cm">
          <text:p/>
        </draw:line>
        <draw:line draw:style-name="gr1006" draw:text-style-name="P4" draw:layer="layout" svg:x1="10cm" svg:y1="24cm" svg:x2="11cm" svg:y2="24cm">
          <text:p/>
        </draw:line>
        <draw:g draw:style-name="gr1">
          <draw:custom-shape draw:style-name="gr1043" draw:text-style-name="P36" draw:layer="layout" svg:width="2.5cm" svg:height="3cm" svg:x="5cm" svg:y="15.1cm">
            <text:p text:style-name="P35"><text:span text:style-name="T10">IMem</text:span></text:p>
            <draw:enhanced-geometry svg:viewBox="0 0 21600 21600" draw:mirror-horizontal="false" draw:mirror-vertical="false" draw:type="rectangle" draw:enhanced-path="M 0 0 L 21600 0 21600 21600 0 21600 0 0 Z N"/>
          </draw:custom-shape>
          <draw:frame draw:style-name="gr1044" draw:text-style-name="P37" draw:layer="layout" svg:width="2.378cm" svg:height="0.569cm" svg:x="4.8cm" svg:y="15.431cm">
            <draw:text-box>
              <text:p><text:span text:style-name="T10">loadData(31:0)</text:span></text:p>
            </draw:text-box>
          </draw:frame>
          <draw:frame draw:style-name="gr1044" draw:text-style-name="P37" draw:layer="layout" svg:width="2.378cm" svg:height="0.569cm" svg:x="4.812cm" svg:y="15.116cm">
            <draw:text-box>
              <text:p><text:span text:style-name="T10">loadAddr(63:0)</text:span></text:p>
            </draw:text-box>
          </draw:frame>
          <draw:frame draw:style-name="gr1045" draw:text-style-name="P37" draw:layer="layout" svg:width="1.148cm" svg:height="0.569cm" svg:x="4.85cm" svg:y="15.716cm">
            <draw:text-box>
              <text:p><text:span text:style-name="T10">wrEn</text:span></text:p>
            </draw:text-box>
          </draw:frame>
          <draw:frame draw:style-name="gr1046" draw:text-style-name="P37" draw:layer="layout" svg:width="2.41cm" svg:height="0.569cm" svg:x="4.82cm" svg:y="17.088cm">
            <draw:text-box>
              <text:p><text:span text:style-name="T10">readAddr(63:0)</text:span></text:p>
            </draw:text-box>
          </draw:frame>
          <draw:frame draw:style-name="gr1046" draw:text-style-name="P37" draw:layer="layout" svg:width="2.41cm" svg:height="0.569cm" svg:x="5.297cm" svg:y="16.7cm">
            <draw:text-box>
              <text:p><text:span text:style-name="T10">readData(31:0)</text:span></text:p>
            </draw:text-box>
          </draw:frame>
        </draw:g>
        <draw:g draw:style-name="gr1">
          <draw:custom-shape draw:style-name="gr1047" draw:text-style-name="P87" draw:layer="layout" svg:width="0.5cm" svg:height="1cm" svg:x="3.5cm" svg:y="16.9cm">
            <text:p text:style-name="P49"><text:span text:style-name="T10">PC</text:span></text:p>
            <draw:enhanced-geometry svg:viewBox="0 0 21600 21600" draw:mirror-horizontal="false" draw:mirror-vertical="false" draw:type="rectangle" draw:enhanced-path="M 0 0 L 21600 0 21600 21600 0 21600 0 0 Z N"/>
          </draw:custom-shape>
          <draw:line draw:style-name="gr60" draw:text-style-name="P11" draw:layer="layout" svg:x1="3.5cm" svg:y1="17.85cm" svg:x2="3.65cm" svg:y2="17.8cm">
            <text:p/>
          </draw:line>
          <draw:line draw:style-name="gr60" draw:text-style-name="P11" draw:layer="layout" svg:x1="3.5cm" svg:y1="17.75cm" svg:x2="3.65cm" svg:y2="17.8cm">
            <text:p/>
          </draw:line>
        </draw:g>
        <draw:frame draw:style-name="gr62" draw:text-style-name="P9" draw:layer="layout" svg:width="1.895cm" svg:height="0.725cm" svg:x="1.705cm" svg:y="17.375cm">
          <draw:text-box>
            <text:p><text:span text:style-name="T2">PCnext</text:span></text:p>
          </draw:text-box>
        </draw:frame>
        <draw:frame draw:style-name="gr61" draw:text-style-name="P9" draw:layer="layout" svg:width="1.09cm" svg:height="0.725cm" svg:x="3.9cm" svg:y="17.4cm">
          <draw:text-box>
            <text:p><text:span text:style-name="T2">PC</text:span></text:p>
          </draw:text-box>
        </draw:frame>
        <draw:custom-shape draw:style-name="gr688" draw:text-style-name="P59" draw:layer="layout" svg:width="1cm" svg:height="1cm" svg:x="6cm" svg:y="10.7cm">
          <text:p text:style-name="P35"><text:span text:style-name="T10">+</text:span></text:p>
          <draw:enhanced-geometry svg:viewBox="0 0 21600 21600" draw:type="rectangle" draw:enhanced-path="M 0 0 L 21600 0 21600 21600 0 21600 0 0 Z N"/>
        </draw:custom-shape>
        <draw:polygon draw:style-name="gr58" draw:text-style-name="P1" draw:layer="layout" svg:width="0.499cm" svg:height="0.999cm" svg:x="5.9cm" svg:y="7.5cm" svg:viewBox="0 0 500 1000" draw:points="500,0 500,1000 0,850 0,150">
          <text:p/>
        </draw:polygon>
        <draw:line draw:style-name="gr1007" draw:text-style-name="P4" draw:layer="layout" svg:x1="6.2cm" svg:y1="7cm" svg:x2="6.2cm" svg:y2="7.6cm">
          <text:p/>
        </draw:line>
        <draw:line draw:style-name="gr1036" draw:text-style-name="P4" draw:layer="layout" svg:x1="19.4cm" svg:y1="7cm" svg:x2="6.2cm" svg:y2="7cm">
          <text:p/>
        </draw:line>
        <draw:g draw:style-name="gr1">
          <draw:custom-shape draw:style-name="gr1048" draw:text-style-name="P36" draw:layer="layout" svg:width="3.506cm" svg:height="2.5cm" svg:x="13.512cm" svg:y="15.8cm">
            <text:p text:style-name="P35"><text:span text:style-name="T10">RegFile</text:span></text:p>
            <draw:enhanced-geometry svg:viewBox="0 0 21600 21600" draw:type="rectangle" draw:enhanced-path="M 0 0 L 21600 0 21600 21600 0 21600 0 0 Z N"/>
          </draw:custom-shape>
          <draw:g draw:style-name="gr66">
            <draw:line draw:style-name="gr60" draw:text-style-name="P11" draw:layer="layout" svg:x1="13.512cm" svg:y1="18.25cm" svg:x2="13.662cm" svg:y2="18.2cm">
              <text:p/>
            </draw:line>
            <draw:line draw:style-name="gr60" draw:text-style-name="P11" draw:layer="layout" svg:x1="13.512cm" svg:y1="18.15cm" svg:x2="13.662cm" svg:y2="18.2cm">
              <text:p/>
            </draw:line>
          </draw:g>
          <draw:frame draw:style-name="gr692" draw:text-style-name="P37" draw:layer="layout" svg:width="3.576cm" svg:height="0.569cm" svg:x="13.314cm" svg:y="16.2cm">
            <draw:text-box>
              <text:p><text:span text:style-name="T10">instr(19:15):raddr</text:span><text:span text:style-name="T10">01(4:0)</text:span></text:p>
            </draw:text-box>
          </draw:frame>
          <draw:frame draw:style-name="gr692" draw:text-style-name="P37" draw:layer="layout" svg:width="3.576cm" svg:height="0.569cm" svg:x="13.312cm" svg:y="16.531cm">
            <draw:text-box>
              <text:p><text:span text:style-name="T10">instr(24:20):raddr</text:span><text:span text:style-name="T10">02(4:0)</text:span></text:p>
            </draw:text-box>
          </draw:frame>
          <draw:frame draw:style-name="gr693" draw:text-style-name="P37" draw:layer="layout" svg:width="3.508cm" svg:height="0.569cm" svg:x="13.306cm" svg:y="16.9cm">
            <draw:text-box>
              <text:p><text:span text:style-name="T10">instr(11:7):waddr</text:span><text:span text:style-name="T10">01(4:0)</text:span></text:p>
            </draw:text-box>
          </draw:frame>
          <draw:frame draw:style-name="gr694" draw:text-style-name="P37" draw:layer="layout" svg:width="2.315cm" svg:height="0.569cm" svg:x="13.3cm" svg:y="15.931cm">
            <draw:text-box>
              <text:p><text:span text:style-name="T10">wdata01(63:0)</text:span></text:p>
            </draw:text-box>
          </draw:frame>
          <draw:frame draw:style-name="gr1049" draw:text-style-name="P37" draw:layer="layout" svg:width="2.205cm" svg:height="0.569cm" svg:x="15.01cm" svg:y="15.7cm">
            <draw:text-box>
              <text:p><text:span text:style-name="T10">rdata01(63:0)</text:span></text:p>
            </draw:text-box>
          </draw:frame>
          <draw:frame draw:style-name="gr1049" draw:text-style-name="P37" draw:layer="layout" svg:width="2.205cm" svg:height="0.569cm" svg:x="15.014cm" svg:y="17.431cm">
            <draw:text-box>
              <text:p><text:span text:style-name="T10">rdata02(63:0)</text:span></text:p>
            </draw:text-box>
          </draw:frame>
          <draw:frame draw:style-name="gr695" draw:text-style-name="P37" draw:layer="layout" svg:width="0.865cm" svg:height="0.569cm" svg:x="14.056cm" svg:y="17.831cm">
            <draw:text-box>
              <text:p><text:span text:style-name="T10">we</text:span></text:p>
            </draw:text-box>
          </draw:frame>
        </draw:g>
        <draw:g draw:style-name="gr1">
          <draw:custom-shape draw:style-name="gr1050" draw:text-style-name="P36" draw:layer="layout" svg:width="1.5cm" svg:height="2cm" svg:x="23.5cm" svg:y="15.7cm">
            <text:p text:style-name="P35"><text:span text:style-name="T10">alu</text:span></text:p>
            <draw:enhanced-geometry svg:viewBox="0 0 21600 21600" draw:type="rectangle" draw:enhanced-path="M 0 0 L 21600 0 21600 21600 0 21600 0 0 Z N"/>
          </draw:custom-shape>
          <draw:frame draw:style-name="gr704" draw:text-style-name="P37" draw:layer="layout" svg:width="1.37cm" svg:height="0.569cm" svg:x="23.282cm" svg:y="15.6cm">
            <draw:text-box>
              <text:p><text:span text:style-name="T10">data01</text:span></text:p>
            </draw:text-box>
          </draw:frame>
          <draw:frame draw:style-name="gr704" draw:text-style-name="P37" draw:layer="layout" svg:width="1.37cm" svg:height="0.569cm" svg:x="23.282cm" svg:y="15.869cm">
            <draw:text-box>
              <text:p><text:span text:style-name="T10">data02</text:span></text:p>
            </draw:text-box>
          </draw:frame>
          <draw:frame draw:style-name="gr1051" draw:text-style-name="P37" draw:layer="layout" svg:width="1.29cm" svg:height="0.569cm" svg:x="23.859cm" svg:y="17.3cm">
            <draw:text-box>
              <text:p><text:span text:style-name="T10">aluSel</text:span></text:p>
            </draw:text-box>
          </draw:frame>
          <draw:frame draw:style-name="gr1052" draw:text-style-name="P37" draw:layer="layout" svg:width="1.054cm" svg:height="0.569cm" svg:x="24.148cm" svg:y="16.4cm">
            <draw:text-box>
              <text:p><text:span text:style-name="T10">zero</text:span></text:p>
            </draw:text-box>
          </draw:frame>
          <draw:frame draw:style-name="gr1053" draw:text-style-name="P37" draw:layer="layout" svg:width="1.684cm" svg:height="0.569cm" svg:x="23.517cm" svg:y="16.7cm">
            <draw:text-box>
              <text:p><text:span text:style-name="T10">aluResult</text:span></text:p>
            </draw:text-box>
          </draw:frame>
        </draw:g>
        <draw:line draw:style-name="gr38" draw:text-style-name="P4" draw:layer="layout" svg:x1="19cm" svg:y1="16cm" svg:x2="21.4cm" svg:y2="16cm">
          <text:p/>
        </draw:line>
        <draw:line draw:style-name="gr38" draw:text-style-name="P4" draw:layer="layout" svg:x1="21.4cm" svg:y1="16cm" svg:x2="21.4cm" svg:y2="15.6cm">
          <text:p/>
        </draw:line>
        <draw:polygon draw:style-name="gr58" draw:text-style-name="P1" draw:layer="layout" svg:width="0.499cm" svg:height="0.999cm" svg:x="22cm" svg:y="15.4cm" svg:viewBox="0 0 500 1000" draw:points="0,0 0,1000 500,850 500,150">
          <text:p/>
        </draw:polygon>
        <draw:polygon draw:style-name="gr58" draw:text-style-name="P1" draw:layer="layout" svg:width="0.499cm" svg:height="0.999cm" svg:x="21.6cm" svg:y="17.5cm" svg:viewBox="0 0 500 1000" draw:points="0,0 0,1000 500,850 500,150">
          <text:p/>
        </draw:polygon>
        <draw:line draw:style-name="gr1006" draw:text-style-name="P4" draw:layer="layout" svg:x1="23cm" svg:y1="16.2cm" svg:x2="23.5cm" svg:y2="16.2cm">
          <text:p/>
        </draw:line>
        <draw:line draw:style-name="gr1009" draw:text-style-name="P4" draw:layer="layout" svg:x1="22.1cm" svg:y1="18cm" svg:x2="23cm" svg:y2="18cm">
          <text:p/>
        </draw:line>
        <draw:line draw:style-name="gr38" draw:text-style-name="P4" draw:layer="layout" svg:x1="23cm" svg:y1="18cm" svg:x2="23cm" svg:y2="16.2cm">
          <text:p/>
        </draw:line>
        <draw:line draw:style-name="gr1009" draw:text-style-name="P4" draw:layer="layout" svg:x1="21.4cm" svg:y1="15.6cm" svg:x2="22cm" svg:y2="15.6cm">
          <text:p/>
        </draw:line>
        <draw:line draw:style-name="gr1009" draw:text-style-name="P4" draw:layer="layout" svg:x1="20.2cm" svg:y1="16.2cm" svg:x2="22cm" svg:y2="16.2cm">
          <text:p/>
        </draw:line>
        <draw:g draw:style-name="gr1">
          <draw:custom-shape draw:style-name="gr1054" draw:text-style-name="P36" draw:layer="layout" svg:width="2.607cm" svg:height="1cm" svg:x="14.924cm" svg:y="19.6cm">
            <text:p text:style-name="P35"><text:span text:style-name="T10">extend</text:span></text:p>
            <draw:enhanced-geometry svg:viewBox="0 0 21600 21600" draw:type="rectangle" draw:enhanced-path="M 0 0 L 21600 0 21600 21600 0 21600 0 0 Z N"/>
          </draw:custom-shape>
          <draw:frame draw:style-name="gr1055" draw:text-style-name="P37" draw:layer="layout" svg:width="1.779cm" svg:height="0.569cm" svg:x="14.713cm" svg:y="19.7cm">
            <draw:text-box>
              <text:p><text:span text:style-name="T10">instr(31:0)</text:span></text:p>
            </draw:text-box>
          </draw:frame>
          <draw:frame draw:style-name="gr1056" draw:text-style-name="P37" draw:layer="layout" svg:width="1.448cm" svg:height="0.569cm" svg:x="16.114cm" svg:y="20.2cm">
            <draw:text-box>
              <text:p><text:span text:style-name="T10">sel(2:0)</text:span></text:p>
            </draw:text-box>
          </draw:frame>
          <draw:frame draw:style-name="gr1057" draw:text-style-name="P37" draw:layer="layout" svg:width="1.778cm" svg:height="0.569cm" svg:x="16.024cm" svg:y="19.667cm">
            <draw:text-box>
              <text:p><text:span text:style-name="T10">imm(63:0)</text:span></text:p>
            </draw:text-box>
          </draw:frame>
        </draw:g>
        <draw:frame draw:style-name="gr1058" draw:text-style-name="P9" draw:layer="layout" svg:width="3.302cm" svg:height="0.725cm" svg:x="20.9cm" svg:y="13.075cm">
          <draw:text-box>
            <text:p><text:span text:style-name="T2">Inside </text:span><text:span text:style-name="T2">„extend“</text:span></text:p>
          </draw:text-box>
        </draw:frame>
        <draw:line draw:style-name="gr1007" draw:text-style-name="P4" draw:layer="layout" svg:x1="16.8cm" svg:y1="25.932cm" svg:x2="16.8cm" svg:y2="20.6cm">
          <text:p/>
        </draw:line>
        <draw:custom-shape draw:style-name="gr688" draw:text-style-name="P59" draw:layer="layout" svg:width="1cm" svg:height="1cm" svg:x="24cm" svg:y="11.7cm">
          <text:p text:style-name="P35"><text:span text:style-name="T10">+</text:span></text:p>
          <draw:enhanced-geometry svg:viewBox="0 0 21600 21600" draw:type="rectangle" draw:enhanced-path="M 0 0 L 21600 0 21600 21600 0 21600 0 0 Z N"/>
        </draw:custom-shape>
        <draw:line draw:style-name="gr136" draw:text-style-name="P4" draw:layer="layout" svg:x1="23cm" svg:y1="11.9cm" svg:x2="24cm" svg:y2="11.9cm">
          <text:p/>
        </draw:line>
        <draw:polygon draw:style-name="gr58" draw:text-style-name="P1" draw:layer="layout" svg:width="0.499cm" svg:height="0.999cm" svg:x="21cm" svg:y="10.3cm" svg:viewBox="0 0 500 1000" draw:points="0,0 0,1000 500,850 500,150">
          <text:p/>
        </draw:polygon>
        <draw:line draw:style-name="gr1014" draw:text-style-name="P4" draw:layer="layout" svg:x1="24.975cm" svg:y1="12.201cm" svg:x2="26cm" svg:y2="12.2cm">
          <text:p/>
        </draw:line>
        <draw:line draw:style-name="gr1016" draw:text-style-name="P4" draw:layer="layout" svg:x1="26cm" svg:y1="12.2cm" svg:x2="26cm" svg:y2="11.5cm">
          <text:p/>
        </draw:line>
        <draw:line draw:style-name="gr1008" draw:text-style-name="P4" draw:layer="layout" svg:x1="20.5cm" svg:y1="11.1cm" svg:x2="21cm" svg:y2="11.1cm">
          <text:p/>
        </draw:line>
        <draw:line draw:style-name="gr38" draw:text-style-name="P4" draw:layer="layout" svg:x1="21.5cm" svg:y1="10.8cm" svg:x2="23cm" svg:y2="10.8cm">
          <text:p/>
        </draw:line>
        <draw:line draw:style-name="gr38" draw:text-style-name="P4" draw:layer="layout" svg:x1="23cm" svg:y1="10.8cm" svg:x2="23cm" svg:y2="11.9cm">
          <text:p/>
        </draw:line>
        <draw:frame draw:style-name="gr1059" draw:text-style-name="P9" draw:layer="layout" svg:width="1.678cm" svg:height="0.725cm" svg:x="19.4cm" svg:y="9.875cm">
          <draw:text-box>
            <text:p><text:span text:style-name="T2">for jalr</text:span></text:p>
          </draw:text-box>
        </draw:frame>
        <draw:custom-shape draw:style-name="gr461" draw:text-style-name="P5" draw:layer="layout" svg:width="0.2cm" svg:height="0.2cm" svg:x="20.401cm" svg:y="1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9" draw:text-style-name="P4" draw:layer="layout" svg:x1="20.5cm" svg:y1="11.1cm" svg:x2="20.5cm" svg:y2="16cm">
          <text:p/>
        </draw:line>
        <draw:line draw:style-name="gr1033" draw:text-style-name="P4" draw:layer="layout" svg:x1="20.2cm" svg:y1="10.475cm" svg:x2="20.2cm" svg:y2="16.2cm">
          <text:p/>
        </draw:line>
        <draw:frame draw:style-name="gr1060" draw:text-style-name="P9" draw:layer="layout" svg:width="2.126cm" svg:height="0.725cm" svg:x="18.577cm" svg:y="13.675cm">
          <draw:text-box>
            <text:p><text:span text:style-name="T2">for auipc</text:span></text:p>
          </draw:text-box>
        </draw:frame>
        <draw:polygon draw:style-name="gr58" draw:text-style-name="P1" draw:layer="layout" svg:width="0.499cm" svg:height="0.999cm" svg:x="36.8cm" svg:y="16.5cm" svg:viewBox="0 0 500 1000" draw:points="0,0 0,1000 500,850 500,150">
          <text:p/>
        </draw:polygon>
        <draw:line draw:style-name="gr1008" draw:text-style-name="P4" draw:layer="layout" svg:x1="7.5cm" svg:y1="10cm" svg:x2="8.5cm" svg:y2="10cm">
          <text:p/>
        </draw:line>
        <draw:custom-shape draw:style-name="gr1015" draw:text-style-name="P77" draw:layer="layout" svg:width="0.2cm" svg:height="0.2cm" svg:x="7.404cm" svg:y="9.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8" draw:text-style-name="P4" draw:layer="layout" svg:x1="9.5cm" svg:y1="10cm" svg:x2="18cm" svg:y2="10cm">
          <text:p/>
        </draw:line>
        <draw:line draw:style-name="gr1008" draw:text-style-name="P4" draw:layer="layout" svg:x1="19cm" svg:y1="10cm" svg:x2="27cm" svg:y2="10cm">
          <text:p/>
        </draw:line>
        <draw:frame draw:style-name="gr1061" draw:text-style-name="P9" draw:layer="layout" svg:width="3.843cm" svg:height="0.725cm" svg:x="13.7cm" svg:y="9.375cm">
          <draw:text-box>
            <text:p><text:span text:style-name="T2">for return </text:span><text:span text:style-name="T2">address</text:span></text:p>
          </draw:text-box>
        </draw:frame>
        <draw:line draw:style-name="gr1008" draw:text-style-name="P4" draw:layer="layout" svg:x1="28cm" svg:y1="10cm" svg:x2="35.001cm" svg:y2="10cm">
          <text:p/>
        </draw:line>
        <draw:line draw:style-name="gr1014" draw:text-style-name="P4" draw:layer="layout" svg:x1="36cm" svg:y1="10cm" svg:x2="36.5cm" svg:y2="10cm">
          <text:p/>
        </draw:line>
        <draw:line draw:style-name="gr1014" draw:text-style-name="P4" draw:layer="layout" svg:x1="36.5cm" svg:y1="16.7cm" svg:x2="36.5cm" svg:y2="10cm">
          <text:p/>
        </draw:line>
        <draw:line draw:style-name="gr1014" draw:text-style-name="P4" draw:layer="layout" svg:x1="36.5cm" svg:y1="16.7cm" svg:x2="36.8cm" svg:y2="16.7cm">
          <text:p/>
        </draw:line>
        <draw:line draw:style-name="gr38" draw:text-style-name="P4" draw:layer="layout" svg:x1="36.4cm" svg:y1="17.3cm" svg:x2="36.8cm" svg:y2="17.3cm">
          <text:p/>
        </draw:line>
        <draw:line draw:style-name="gr38" draw:text-style-name="P4" draw:layer="layout" svg:x1="37.3cm" svg:y1="17cm" svg:x2="37.5cm" svg:y2="17cm">
          <text:p/>
        </draw:line>
        <draw:line draw:style-name="gr1007" draw:text-style-name="P4" draw:layer="layout" svg:x1="22.3cm" svg:y1="25.1cm" svg:x2="22.3cm" svg:y2="16.301cm">
          <text:p/>
        </draw:line>
        <draw:line draw:style-name="gr1007" draw:text-style-name="P4" draw:layer="layout" svg:x1="21.9cm" svg:y1="24.8cm" svg:x2="21.9cm" svg:y2="18.402cm">
          <text:p/>
        </draw:line>
        <draw:g draw:style-name="gr1">
          <draw:custom-shape draw:style-name="gr805" draw:text-style-name="P36" draw:layer="layout" svg:width="2cm" svg:height="2cm" svg:x="32cm" svg:y="15.8cm">
            <text:p text:style-name="P35"><text:span text:style-name="T10">DMem</text:span></text:p>
            <draw:enhanced-geometry svg:viewBox="0 0 21600 21600" draw:type="rectangle" draw:enhanced-path="M 0 0 L 21600 0 21600 21600 0 21600 0 0 Z N"/>
          </draw:custom-shape>
          <draw:frame draw:style-name="gr1045" draw:text-style-name="P37" draw:layer="layout" svg:width="1.148cm" svg:height="0.569cm" svg:x="32.555cm" svg:y="15.7cm">
            <draw:text-box>
              <text:p><text:span text:style-name="T10">wrEn</text:span></text:p>
            </draw:text-box>
          </draw:frame>
          <draw:g draw:style-name="gr66">
            <draw:line draw:style-name="gr60" draw:text-style-name="P11" draw:layer="layout" svg:x1="32cm" svg:y1="17.7cm" svg:x2="32.29cm" svg:y2="17.6cm">
              <text:p/>
            </draw:line>
            <draw:line draw:style-name="gr60" draw:text-style-name="P11" draw:layer="layout" svg:x1="32cm" svg:y1="17.5cm" svg:x2="32.29cm" svg:y2="17.6cm">
              <text:p/>
            </draw:line>
          </draw:g>
          <draw:frame draw:style-name="gr1062" draw:text-style-name="P37" draw:layer="layout" svg:width="1.101cm" svg:height="0.569cm" svg:x="32.9cm" svg:y="17.331cm">
            <draw:text-box>
              <text:p><text:span text:style-name="T10">rdEn</text:span></text:p>
            </draw:text-box>
          </draw:frame>
          <draw:frame draw:style-name="gr1063" draw:text-style-name="P37" draw:layer="layout" svg:width="1.038cm" svg:height="0.569cm" svg:x="31.8cm" svg:y="16.7cm">
            <draw:text-box>
              <text:p><text:span text:style-name="T10">instr</text:span></text:p>
            </draw:text-box>
          </draw:frame>
          <draw:frame draw:style-name="gr1064" draw:text-style-name="P37" draw:layer="layout" svg:width="1.07cm" svg:height="0.569cm" svg:x="31.8cm" svg:y="16.1cm">
            <draw:text-box>
              <text:p><text:span text:style-name="T10">addr</text:span></text:p>
            </draw:text-box>
          </draw:frame>
          <draw:frame draw:style-name="gr1065" draw:text-style-name="P37" draw:layer="layout" svg:width="1.117cm" svg:height="0.569cm" svg:x="31.8cm" svg:y="16.4cm">
            <draw:text-box>
              <text:p><text:span text:style-name="T10">datai</text:span></text:p>
            </draw:text-box>
          </draw:frame>
          <draw:frame draw:style-name="gr1066" draw:text-style-name="P37" draw:layer="layout" svg:width="1.212cm" svg:height="0.569cm" svg:x="32.991cm" svg:y="16.7cm">
            <draw:text-box>
              <text:p><text:span text:style-name="T10">datao</text:span></text:p>
            </draw:text-box>
          </draw:frame>
        </draw:g>
        <draw:line draw:style-name="gr1006" draw:text-style-name="P4" draw:layer="layout" svg:x1="31cm" svg:y1="16.7cm" svg:x2="32cm" svg:y2="16.7cm">
          <text:p/>
        </draw:line>
        <draw:line draw:style-name="gr1006" draw:text-style-name="P4" draw:layer="layout" svg:x1="31.5cm" svg:y1="17cm" svg:x2="32cm" svg:y2="17cm">
          <text:p/>
        </draw:line>
        <draw:line draw:style-name="gr1014" draw:text-style-name="P4" draw:layer="layout" svg:x1="30cm" svg:y1="17cm" svg:x2="30.5cm" svg:y2="17cm">
          <text:p/>
        </draw:line>
        <draw:line draw:style-name="gr1016" draw:text-style-name="P4" draw:layer="layout" svg:x1="30.5cm" svg:y1="17cm" svg:x2="30.5cm" svg:y2="16.4cm">
          <text:p/>
        </draw:line>
        <draw:line draw:style-name="gr38" draw:text-style-name="P4" draw:layer="layout" svg:x1="28cm" svg:y1="19cm" svg:x2="31cm" svg:y2="19cm">
          <text:p/>
        </draw:line>
        <draw:line draw:style-name="gr38" draw:text-style-name="P4" draw:layer="layout" svg:x1="31cm" svg:y1="19cm" svg:x2="31cm" svg:y2="16.7cm">
          <text:p/>
        </draw:line>
        <draw:custom-shape draw:style-name="gr461" draw:text-style-name="P5" draw:layer="layout" svg:width="0.2cm" svg:height="0.2cm" svg:x="9.903cm" svg:y="21.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67" draw:text-style-name="P40" draw:layer="layout" svg:width="2.5cm" svg:height="0.726cm" svg:x="10.1cm" svg:y="21.402cm">
          <draw:text-box>
            <text:p><text:span text:style-name="T26">Instr.[11-7]</text:span></text:p>
          </draw:text-box>
        </draw:frame>
        <draw:frame draw:style-name="gr1068" draw:text-style-name="P78" draw:layer="layout" svg:width="3.585cm" svg:height="0.725cm" svg:x="10.102cm" svg:y="20.975cm">
          <draw:text-box>
            <text:p><text:span text:style-name="T26">Instr.[14-12, </text:span><text:span text:style-name="T26">6-0]</text:span></text:p>
          </draw:text-box>
        </draw:frame>
        <draw:line draw:style-name="gr1030" draw:text-style-name="P4" draw:layer="layout" svg:x1="10cm" svg:y1="21.5cm" svg:x2="18cm" svg:y2="21.5cm">
          <text:p/>
        </draw:line>
        <draw:custom-shape draw:style-name="gr461" draw:text-style-name="P5" draw:layer="layout" svg:width="0.2cm" svg:height="0.2cm" svg:x="9.904cm" svg:y="21.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30" draw:text-style-name="P4" draw:layer="layout" svg:x1="19cm" svg:y1="21.5cm" svg:x2="27cm" svg:y2="21.5cm">
          <text:p/>
        </draw:line>
        <draw:line draw:style-name="gr38" draw:text-style-name="P4" draw:layer="layout" svg:x1="28cm" svg:y1="21.5cm" svg:x2="31.5cm" svg:y2="21.5cm">
          <text:p/>
        </draw:line>
        <draw:line draw:style-name="gr38" draw:text-style-name="P4" draw:layer="layout" svg:x1="31.5cm" svg:y1="21.5cm" svg:x2="31.5cm" svg:y2="17cm">
          <text:p/>
        </draw:line>
        <draw:g draw:style-name="gr1">
          <draw:custom-shape draw:style-name="gr1069" draw:text-style-name="P36" draw:layer="layout" svg:width="4cm" svg:height="3.527cm" svg:x="11cm" svg:y="23.473cm">
            <text:p text:style-name="P35"><text:span text:style-name="T10">controllAll</text:span></text:p>
            <draw:enhanced-geometry svg:viewBox="0 0 21600 21600" draw:type="rectangle" draw:enhanced-path="M 0 0 L 21600 0 21600 21600 0 21600 0 0 Z N"/>
          </draw:custom-shape>
          <draw:frame draw:style-name="gr1070" draw:text-style-name="P37" draw:layer="layout" svg:width="2.016cm" svg:height="0.569cm" svg:x="10.8cm" svg:y="23.46cm">
            <draw:text-box>
              <text:p><text:span text:style-name="T10">opcode(6:0)</text:span></text:p>
            </draw:text-box>
          </draw:frame>
          <draw:frame draw:style-name="gr1071" draw:text-style-name="P37" draw:layer="layout" svg:width="1.779cm" svg:height="0.569cm" svg:x="10.824cm" svg:y="23.716cm">
            <draw:text-box>
              <text:p><text:span text:style-name="T10">func3(2:0)</text:span></text:p>
            </draw:text-box>
          </draw:frame>
          <draw:frame draw:style-name="gr1072" draw:text-style-name="P37" draw:layer="layout" svg:width="1.511cm" svg:height="0.569cm" svg:x="10.8cm" svg:y="23.973cm">
            <draw:text-box>
              <text:p><text:span text:style-name="T10">func7b5</text:span></text:p>
            </draw:text-box>
          </draw:frame>
          <draw:frame draw:style-name="gr711" draw:text-style-name="P37" draw:layer="layout" svg:width="1.054cm" svg:height="0.569cm" svg:x="10.872cm" svg:y="24.229cm">
            <draw:text-box>
              <text:p><text:span text:style-name="T10">zero</text:span></text:p>
            </draw:text-box>
          </draw:frame>
          <draw:frame draw:style-name="gr619" draw:text-style-name="P37" draw:layer="layout" svg:width="2.204cm" svg:height="0.569cm" svg:x="13.035cm" svg:y="23.373cm">
            <draw:text-box>
              <text:p><text:span text:style-name="T10">resultSrc(1:0)</text:span></text:p>
            </draw:text-box>
          </draw:frame>
          <draw:frame draw:style-name="gr1073" draw:text-style-name="P37" draw:layer="layout" svg:width="1.647cm" svg:height="0.569cm" svg:x="13.6cm" svg:y="23.657cm">
            <draw:text-box>
              <text:p><text:span text:style-name="T10">dMemWr</text:span></text:p>
            </draw:text-box>
          </draw:frame>
          <draw:frame draw:style-name="gr1074" draw:text-style-name="P37" draw:layer="layout" svg:width="1.653cm" svg:height="0.569cm" svg:x="13.6cm" svg:y="23.941cm">
            <draw:text-box>
              <text:p><text:span text:style-name="T10">dMemRd</text:span></text:p>
            </draw:text-box>
          </draw:frame>
          <draw:frame draw:style-name="gr1075" draw:text-style-name="P37" draw:layer="layout" svg:width="1.321cm" svg:height="0.569cm" svg:x="13.887cm" svg:y="24.226cm">
            <draw:text-box>
              <text:p><text:span text:style-name="T10">PCSrc</text:span></text:p>
            </draw:text-box>
          </draw:frame>
          <draw:frame draw:style-name="gr1076" draw:text-style-name="P37" draw:layer="layout" svg:width="1.495cm" svg:height="0.569cm" svg:x="13.724cm" svg:y="24.51cm">
            <draw:text-box>
              <text:p><text:span text:style-name="T10">aluSrcB</text:span></text:p>
            </draw:text-box>
          </draw:frame>
          <draw:frame draw:style-name="gr1076" draw:text-style-name="P37" draw:layer="layout" svg:width="1.495cm" svg:height="0.569cm" svg:x="13.724cm" svg:y="24.794cm">
            <draw:text-box>
              <text:p><text:span text:style-name="T10">aluSrcA</text:span></text:p>
            </draw:text-box>
          </draw:frame>
          <draw:frame draw:style-name="gr1077" draw:text-style-name="P37" draw:layer="layout" svg:width="1.269cm" svg:height="0.569cm" svg:x="13.963cm" svg:y="25.078cm">
            <draw:text-box>
              <text:p><text:span text:style-name="T10">regWr</text:span></text:p>
            </draw:text-box>
          </draw:frame>
          <draw:frame draw:style-name="gr717" draw:text-style-name="P37" draw:layer="layout" svg:width="1.117cm" svg:height="0.569cm" svg:x="14.091cm" svg:y="25.363cm">
            <draw:text-box>
              <text:p><text:span text:style-name="T10">jump</text:span></text:p>
            </draw:text-box>
          </draw:frame>
          <draw:frame draw:style-name="gr1078" draw:text-style-name="P37" draw:layer="layout" svg:width="2.046cm" svg:height="0.569cm" svg:x="13.207cm" svg:y="25.647cm">
            <draw:text-box>
              <text:p><text:span text:style-name="T10">immSrc(2:0)</text:span></text:p>
            </draw:text-box>
          </draw:frame>
          <draw:frame draw:style-name="gr706" draw:text-style-name="P37" draw:layer="layout" svg:width="1.874cm" svg:height="0.569cm" svg:x="13.357cm" svg:y="25.931cm">
            <draw:text-box>
              <text:p><text:span text:style-name="T10">aluSel(4:0)</text:span></text:p>
            </draw:text-box>
          </draw:frame>
          <draw:frame draw:style-name="gr1079" draw:text-style-name="P37" draw:layer="layout" svg:width="1.669cm" svg:height="0.569cm" svg:x="13.557cm" svg:y="26.232cm">
            <draw:text-box>
              <text:p><text:span text:style-name="T10">branch_s</text:span></text:p>
            </draw:text-box>
          </draw:frame>
          <draw:frame draw:style-name="gr1080" draw:text-style-name="P37" draw:layer="layout" svg:width="1.416cm" svg:height="0.569cm" svg:x="13.757cm" svg:y="26.533cm">
            <draw:text-box>
              <text:p><text:span text:style-name="T10">jump_s</text:span></text:p>
            </draw:text-box>
          </draw:frame>
        </draw:g>
        <draw:line draw:style-name="gr1006" draw:text-style-name="P4" draw:layer="layout" svg:x1="10cm" svg:y1="23.8cm" svg:x2="11cm" svg:y2="23.8cm">
          <text:p/>
        </draw:line>
        <draw:line draw:style-name="gr1006" draw:text-style-name="P4" draw:layer="layout" svg:x1="10cm" svg:y1="24.2cm" svg:x2="11cm" svg:y2="24.2cm">
          <text:p/>
        </draw:line>
        <draw:custom-shape draw:style-name="gr461" draw:text-style-name="P5" draw:layer="layout" svg:width="0.2cm" svg:height="0.2cm" svg:x="9.904cm" svg:y="23.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9.905cm" svg:y="23.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41" draw:text-style-name="P86" draw:layer="layout" svg:x1="10cm" svg:y1="24.5cm" svg:x2="11cm" svg:y2="24.5cm">
          <text:p/>
        </draw:line>
        <draw:frame draw:style-name="gr1081" draw:text-style-name="P9" draw:layer="layout" svg:width="10.573cm" svg:height="2.147cm" svg:x="4.527cm" svg:y="25.5cm">
          <draw:text-box>
            <text:p><text:span text:style-name="T2">In pipelined </text:span><text:span text:style-name="T2">version:</text:span></text:p>
            <text:p><text:span text:style-name="T2">- PCSrc not </text:span><text:span text:style-name="T2">connected</text:span></text:p>
            <text:p><text:span text:style-name="T2">- zero not </text:span><text:span text:style-name="T2">used</text:span></text:p>
            <text:p><text:span text:style-name="T2">- forward </text:span><text:span text:style-name="T2">branch_s </text:span><text:span text:style-name="T2">and jump_s </text:span><text:span text:style-name="T2">and </text:span><text:span text:style-name="T2">connect </text:span><text:span text:style-name="T2">with zero</text:span></text:p>
          </draw:text-box>
        </draw:frame>
        <draw:custom-shape draw:style-name="gr1035" draw:text-style-name="P83" draw:layer="layout" svg:width="1cm" svg:height="2cm" svg:x="20.4cm" svg:y="4.9cm">
          <text:p text:style-name="P32"><text:span text:style-name="T9">OR</text:span></text:p>
          <draw:enhanced-geometry svg:viewBox="0 0 21600 21600" draw:type="rectangle" draw:enhanced-path="M 0 0 L 21600 0 21600 21600 0 21600 0 0 Z N"/>
        </draw:custom-shape>
        <draw:frame draw:style-name="gr1082" draw:text-style-name="P82" draw:layer="layout" svg:width="1.867cm" svg:height="0.725cm" svg:x="21.301cm" svg:y="4.778cm">
          <draw:text-box>
            <text:p><text:span text:style-name="T28">jump_s</text:span></text:p>
          </draw:text-box>
        </draw:frame>
        <draw:line draw:style-name="gr1036" draw:text-style-name="P4" draw:layer="layout" svg:x1="23cm" svg:y1="6.4cm" svg:x2="21.4cm" svg:y2="6.402cm">
          <text:p/>
        </draw:line>
        <draw:line draw:style-name="gr1036" draw:text-style-name="P4" draw:layer="layout" svg:x1="26.6cm" svg:y1="5.403cm" svg:x2="21.4cm" svg:y2="5.403cm">
          <text:p/>
        </draw:line>
        <draw:line draw:style-name="gr1036" draw:text-style-name="P4" draw:layer="layout" svg:x1="20.4cm" svg:y1="5.802cm" svg:x2="19.4cm" svg:y2="5.803cm">
          <text:p/>
        </draw:line>
        <draw:line draw:style-name="gr1036" draw:text-style-name="P4" draw:layer="layout" svg:x1="19.4cm" svg:y1="7cm" svg:x2="19.4cm" svg:y2="5.8cm">
          <text:p/>
        </draw:line>
        <draw:frame draw:style-name="gr1083" draw:text-style-name="P9" draw:layer="layout" svg:width="1.444cm" svg:height="0.725cm" svg:x="8.758cm" svg:y="24.1cm">
          <draw:text-box>
            <text:p><text:span text:style-name="T2">open</text:span></text:p>
          </draw:text-box>
        </draw:frame>
        <draw:line draw:style-name="gr1036" draw:text-style-name="P4" draw:layer="layout" svg:x1="15cm" svg:y1="25.932cm" svg:x2="16.8cm" svg:y2="25.932cm">
          <text:p/>
        </draw:line>
        <draw:line draw:style-name="gr1041" draw:text-style-name="P86" draw:layer="layout" svg:x1="15cm" svg:y1="25.4cm" svg:x2="18cm" svg:y2="25.4cm">
          <text:p/>
        </draw:line>
        <draw:line draw:style-name="gr1036" draw:text-style-name="P4" draw:layer="layout" svg:x1="26.6cm" svg:y1="26.9cm" svg:x2="26.6cm" svg:y2="5.403cm">
          <text:p/>
        </draw:line>
        <draw:line draw:style-name="gr1036" draw:text-style-name="P4" draw:layer="layout" svg:x1="19cm" svg:y1="26.6cm" svg:x2="26.4cm" svg:y2="26.6cm">
          <text:p/>
        </draw:line>
        <draw:line draw:style-name="gr1041" draw:text-style-name="P86" draw:layer="layout" svg:x1="15cm" svg:y1="26.3cm" svg:x2="18cm" svg:y2="26.3cm">
          <text:p/>
        </draw:line>
        <draw:line draw:style-name="gr1041" draw:text-style-name="P86" draw:layer="layout" svg:x1="15cm" svg:y1="25.7cm" svg:x2="18cm" svg:y2="25.7cm">
          <text:p/>
        </draw:line>
        <draw:line draw:style-name="gr1036" draw:text-style-name="P4" draw:layer="layout" svg:x1="19cm" svg:y1="25.7cm" svg:x2="21.3cm" svg:y2="25.7cm">
          <text:p/>
        </draw:line>
        <draw:line draw:style-name="gr1041" draw:text-style-name="P86" draw:layer="layout" svg:x1="15cm" svg:y1="25.1cm" svg:x2="18cm" svg:y2="25.1cm">
          <text:p/>
        </draw:line>
        <draw:line draw:style-name="gr1041" draw:text-style-name="P86" draw:layer="layout" svg:x1="15cm" svg:y1="24.8cm" svg:x2="18cm" svg:y2="24.8cm">
          <text:p/>
        </draw:line>
        <draw:line draw:style-name="gr1036" draw:text-style-name="P4" draw:layer="layout" svg:x1="19cm" svg:y1="25.1cm" svg:x2="22.3cm" svg:y2="25.1cm">
          <text:p/>
        </draw:line>
        <draw:line draw:style-name="gr1036" draw:text-style-name="P4" draw:layer="layout" svg:x1="19cm" svg:y1="24.8cm" svg:x2="21.9cm" svg:y2="24.8cm">
          <text:p/>
        </draw:line>
        <draw:line draw:style-name="gr1036" draw:text-style-name="P4" draw:layer="layout" svg:x1="15cm" svg:y1="24.532cm" svg:x2="15.4cm" svg:y2="24.532cm">
          <text:p/>
        </draw:line>
        <draw:line draw:style-name="gr1041" draw:text-style-name="P86" draw:layer="layout" svg:x1="15cm" svg:y1="24.3cm" svg:x2="18cm" svg:y2="24.3cm">
          <text:p/>
        </draw:line>
        <draw:line draw:style-name="gr1041" draw:text-style-name="P86" draw:layer="layout" svg:x1="15cm" svg:y1="24cm" svg:x2="18cm" svg:y2="24cm">
          <text:p/>
        </draw:line>
        <draw:line draw:style-name="gr1041" draw:text-style-name="P86" draw:layer="layout" svg:x1="15cm" svg:y1="23.7cm" svg:x2="18cm" svg:y2="23.7cm">
          <text:p/>
        </draw:line>
        <draw:line draw:style-name="gr1041" draw:text-style-name="P86" draw:layer="layout" svg:x1="19cm" svg:y1="24.3cm" svg:x2="27cm" svg:y2="24.3cm">
          <text:p/>
        </draw:line>
        <draw:line draw:style-name="gr1041" draw:text-style-name="P86" draw:layer="layout" svg:x1="19cm" svg:y1="24cm" svg:x2="27cm" svg:y2="24cm">
          <text:p/>
        </draw:line>
        <draw:line draw:style-name="gr1041" draw:text-style-name="P86" draw:layer="layout" svg:x1="19cm" svg:y1="23.7cm" svg:x2="27cm" svg:y2="23.7cm">
          <text:p/>
        </draw:line>
        <draw:line draw:style-name="gr1036" draw:text-style-name="P4" draw:layer="layout" svg:x1="28cm" svg:y1="24.3cm" svg:x2="33cm" svg:y2="24.3cm">
          <text:p/>
        </draw:line>
        <draw:frame draw:style-name="gr1084" draw:text-style-name="P9" draw:layer="layout" svg:width="3.302cm" svg:height="1.673cm" svg:x="1cm" svg:y="18.1cm">
          <draw:text-box>
            <text:p><text:span text:style-name="T2">InstructionB</text:span><text:span text:style-name="T2">us:</text:span></text:p>
            <text:p><text:span text:style-name="T2">- Address</text:span></text:p>
            <text:p><text:span text:style-name="T2">- Data</text:span></text:p>
          </draw:text-box>
        </draw:frame>
        <draw:line draw:style-name="gr1085" draw:text-style-name="P4" draw:layer="layout" svg:x1="5.2cm" svg:y1="19.5cm" svg:x2="8cm" svg:y2="17.626cm">
          <text:p/>
        </draw:line>
        <draw:line draw:style-name="gr1085" draw:text-style-name="P4" draw:layer="layout" svg:x1="3.1cm" svg:y1="19cm" svg:x2="4.4cm" svg:y2="18cm">
          <text:p/>
        </draw:line>
        <draw:line draw:style-name="gr1086" draw:text-style-name="P4" draw:layer="layout" svg:x1="2.5cm" svg:y1="19.5cm" svg:x2="5.2cm" svg:y2="19.5cm">
          <text:p/>
        </draw:line>
        <draw:frame draw:style-name="gr1087" draw:text-style-name="P9" draw:layer="layout" svg:width="3.3cm" svg:height="2.147cm" svg:x="31cm" svg:y="10.853cm">
          <draw:text-box>
            <text:p><text:span text:style-name="T2">DataBus:</text:span></text:p>
            <text:p><text:span text:style-name="T2">- Address</text:span></text:p>
            <text:p><text:span text:style-name="T2">- Data write</text:span></text:p>
            <text:p><text:span text:style-name="T2">- Data read</text:span></text:p>
          </draw:text-box>
        </draw:frame>
        <draw:line draw:style-name="gr1088" draw:text-style-name="P4" draw:layer="layout" svg:x1="31.2cm" svg:y1="11.7cm" svg:x2="30.5cm" svg:y2="16.4cm">
          <text:p/>
        </draw:line>
        <draw:line draw:style-name="gr1089" draw:text-style-name="P4" draw:layer="layout" svg:x1="31.2cm" svg:y1="12.2cm" svg:x2="31.1cm" svg:y2="16.7cm">
          <text:p/>
        </draw:line>
        <draw:line draw:style-name="gr1090" draw:text-style-name="P4" draw:layer="layout" svg:x1="33.1cm" svg:y1="12.8cm" svg:x2="34.3cm" svg:y2="17cm">
          <text:p/>
        </draw:line>
        <draw:custom-shape draw:style-name="gr1015" draw:text-style-name="P77" draw:layer="layout" svg:width="0.2cm" svg:height="0.2cm" svg:x="20.105cm" svg:y="10.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36" draw:text-style-name="P4" draw:layer="layout" svg:x1="19cm" svg:y1="26.9cm" svg:x2="26.6cm" svg:y2="26.9cm">
          <text:p/>
        </draw:line>
        <draw:polygon draw:style-name="gr58" draw:text-style-name="P1" draw:layer="layout" svg:width="0.499cm" svg:height="0.999cm" svg:x="19.5cm" svg:y="15.8cm" svg:viewBox="0 0 500 1000" draw:points="0,0 0,1000 500,850 500,150">
          <text:p/>
        </draw:polygon>
        <draw:polygon draw:style-name="gr58" draw:text-style-name="P1" draw:layer="layout" svg:width="0.499cm" svg:height="0.999cm" svg:x="19.5cm" svg:y="17.5cm" svg:viewBox="0 0 500 1000" draw:points="0,0 0,1000 500,850 500,150">
          <text:p/>
        </draw:polygon>
        <draw:custom-shape draw:style-name="gr1091" draw:text-style-name="P36" draw:layer="layout" svg:width="1cm" svg:height="1cm" svg:x="19.7cm" svg:y="20.1cm">
          <text:p text:style-name="P35"><text:span text:style-name="T10">FW</text:span></text:p>
          <draw:enhanced-geometry svg:viewBox="0 0 21600 21600" draw:type="rectangle" draw:enhanced-path="M 0 0 L 21600 0 21600 21600 0 21600 0 0 Z N"/>
        </draw:custom-shape>
        <draw:line draw:style-name="gr1007" draw:text-style-name="P4" draw:layer="layout" svg:x1="19.8cm" svg:y1="20.1cm" svg:x2="19.8cm" svg:y2="18.402cm">
          <text:p/>
        </draw:line>
        <draw:line draw:style-name="gr1036" draw:text-style-name="P4" draw:layer="layout" svg:x1="20.2cm" svg:y1="20.1cm" svg:x2="20.2cm" svg:y2="17cm">
          <text:p/>
        </draw:line>
        <draw:line draw:style-name="gr1007" draw:text-style-name="P4" draw:layer="layout" svg:x1="20.2cm" svg:y1="17cm" svg:x2="19.8cm" svg:y2="16.7cm">
          <text:p/>
        </draw:line>
        <draw:line draw:style-name="gr38" draw:text-style-name="P4" draw:layer="layout" svg:x1="19.2cm" svg:y1="16.3cm" svg:x2="19.5cm" svg:y2="16.3cm">
          <text:p/>
        </draw:line>
        <draw:line draw:style-name="gr38" draw:text-style-name="P4" draw:layer="layout" svg:x1="19.4cm" svg:y1="16.6cm" svg:x2="19.5cm" svg:y2="16.6cm">
          <text:p/>
        </draw:line>
        <draw:line draw:style-name="gr38" draw:text-style-name="P4" draw:layer="layout" svg:x1="19.2cm" svg:y1="18cm" svg:x2="19.5cm" svg:y2="18cm">
          <text:p/>
        </draw:line>
        <draw:line draw:style-name="gr38" draw:text-style-name="P4" draw:layer="layout" svg:x1="19.4cm" svg:y1="18.3cm" svg:x2="19.5cm" svg:y2="18.3cm">
          <text:p/>
        </draw:line>
        <draw:line draw:style-name="gr1009" draw:text-style-name="P4" draw:layer="layout" svg:x1="19.2cm" svg:y1="8cm" svg:x2="19.2cm" svg:y2="18cm">
          <text:p/>
        </draw:line>
        <draw:custom-shape draw:style-name="gr461" draw:text-style-name="P5" draw:layer="layout" svg:width="0.2cm" svg:height="0.2cm" svg:x="19.102cm" svg:y="16.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19.103cm" svg:y="7.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9" draw:text-style-name="P4" draw:layer="layout" svg:x1="19.4cm" svg:y1="16.6cm" svg:x2="19.4cm" svg:y2="23cm">
          <text:p/>
        </draw:line>
        <draw:line draw:style-name="gr1009" draw:text-style-name="P4" draw:layer="layout" svg:x1="20.5cm" svg:y1="17.7cm" svg:x2="20.5cm" svg:y2="19cm">
          <text:p/>
        </draw:line>
        <draw:frame draw:style-name="gr1092" draw:text-style-name="P88" draw:layer="layout" svg:width="1.584cm" svg:height="0.725cm" svg:x="19.418cm" svg:y="16.775cm">
          <draw:text-box>
            <text:p><text:span text:style-name="T29">forwA</text:span></text:p>
          </draw:text-box>
        </draw:frame>
        <draw:frame draw:style-name="gr1092" draw:text-style-name="P88" draw:layer="layout" svg:width="1.584cm" svg:height="0.725cm" svg:x="19.4cm" svg:y="18.875cm">
          <draw:text-box>
            <text:p><text:span text:style-name="T29">forwB</text:span></text:p>
          </draw:text-box>
        </draw:frame>
        <draw:line draw:style-name="gr38" draw:text-style-name="P4" draw:layer="layout" svg:x1="19cm" svg:y1="20cm" svg:x2="21cm" svg:y2="20cm">
          <text:p/>
        </draw:line>
        <draw:line draw:style-name="gr1009" draw:text-style-name="P4" draw:layer="layout" svg:x1="28.3cm" svg:y1="17cm" svg:x2="28.3cm" svg:y2="23cm">
          <text:p/>
        </draw:line>
        <draw:custom-shape draw:style-name="gr461" draw:text-style-name="P5" draw:layer="layout" svg:width="0.2cm" svg:height="0.2cm" svg:x="28.201cm" svg:y="16.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9.4cm" svg:y1="23cm" svg:x2="28.3cm" svg:y2="23cm">
          <text:p/>
        </draw:line>
        <draw:line draw:style-name="gr1093" draw:text-style-name="P4" draw:layer="layout" svg:x1="20cm" svg:y1="21.5cm" svg:x2="20cm" svg:y2="21.1cm">
          <text:p/>
        </draw:line>
        <draw:line draw:style-name="gr1093" draw:text-style-name="P4" draw:layer="layout" svg:x1="20.4cm" svg:y1="21.501cm" svg:x2="20.4cm" svg:y2="21.101cm">
          <text:p/>
        </draw:line>
        <draw:custom-shape draw:style-name="gr461" draw:text-style-name="P5" draw:layer="layout" svg:width="0.2cm" svg:height="0.2cm" svg:x="19.9cm" svg:y="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20.3cm" svg:y="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94" draw:text-style-name="P37" draw:layer="layout" svg:width="1.006cm" svg:height="0.569cm" svg:x="19.394cm" svg:y="21.431cm">
          <draw:text-box>
            <text:p><text:span text:style-name="T10">Rs1</text:span></text:p>
          </draw:text-box>
        </draw:frame>
        <draw:frame draw:style-name="gr1094" draw:text-style-name="P37" draw:layer="layout" svg:width="1.006cm" svg:height="0.569cm" svg:x="19.9cm" svg:y="21.431cm">
          <draw:text-box>
            <text:p><text:span text:style-name="T10">Rs2</text:span></text:p>
          </draw:text-box>
        </draw:frame>
        <draw:line draw:style-name="gr1095" draw:text-style-name="P4" draw:layer="layout" svg:x1="23cm" svg:y1="20.4cm" svg:x2="20.7cm" svg:y2="20.4cm">
          <text:p/>
        </draw:line>
        <draw:line draw:style-name="gr1095" draw:text-style-name="P4" draw:layer="layout" svg:x1="22.601cm" svg:y1="20.8cm" svg:x2="20.701cm" svg:y2="20.8cm">
          <text:p/>
        </draw:line>
        <draw:frame draw:style-name="gr1096" draw:text-style-name="P37" draw:layer="layout" svg:width="2.583cm" svg:height="0.569cm" svg:x="22.119cm" svg:y="20cm">
          <draw:text-box>
            <text:p><text:span text:style-name="T10">EX/MEM.RegRd</text:span></text:p>
          </draw:text-box>
        </draw:frame>
        <draw:frame draw:style-name="gr1097" draw:text-style-name="P37" draw:layer="layout" svg:width="2.661cm" svg:height="0.569cm" svg:x="22.1cm" svg:y="22.131cm">
          <draw:text-box>
            <text:p><text:span text:style-name="T10">MEM/WB.RegRd</text:span></text:p>
          </draw:text-box>
        </draw:frame>
        <draw:line draw:style-name="gr38" draw:text-style-name="P4" draw:layer="layout" svg:x1="28.6cm" svg:y1="21.9cm" svg:x2="28.6cm" svg:y2="22.2cm">
          <text:p/>
        </draw:line>
        <draw:line draw:style-name="gr38" draw:text-style-name="P4" draw:layer="layout" svg:x1="28.6cm" svg:y1="22.2cm" svg:x2="23cm" svg:y2="22.2cm">
          <text:p/>
        </draw:line>
        <draw:line draw:style-name="gr38" draw:text-style-name="P4" draw:layer="layout" svg:x1="23cm" svg:y1="22.2cm" svg:x2="23cm" svg:y2="20.4cm">
          <text:p/>
        </draw:line>
        <draw:custom-shape draw:style-name="gr461" draw:text-style-name="P5" draw:layer="layout" svg:width="0.2cm" svg:height="0.2cm" svg:x="28.5cm" svg:y="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2.6cm" svg:y1="22.5cm" svg:x2="22.601cm" svg:y2="20.8cm">
          <text:p/>
        </draw:line>
        <draw:custom-shape draw:style-name="gr461" draw:text-style-name="P5" draw:layer="layout" svg:width="0.2cm" svg:height="0.2cm" svg:x="22.5cm" svg:y="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7" draw:text-style-name="P4" draw:layer="layout" svg:x1="20.7cm" svg:y1="22.7cm" svg:x2="20.7cm" svg:y2="21.1cm">
          <text:p/>
        </draw:line>
        <draw:custom-shape draw:style-name="gr1098" draw:text-style-name="P18" draw:layer="layout" svg:width="0.2cm" svg:height="0.2cm" svg:x="20.6cm" svg:y="2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36" draw:text-style-name="P4" draw:layer="layout" svg:x1="19.7cm" svg:y1="23.2cm" svg:x2="29cm" svg:y2="23.2cm">
          <text:p/>
        </draw:line>
        <draw:line draw:style-name="gr1007" draw:text-style-name="P4" draw:layer="layout" svg:x1="19.7cm" svg:y1="23.2cm" svg:x2="19.7cm" svg:y2="21.1cm">
          <text:p/>
        </draw:line>
        <draw:custom-shape draw:style-name="gr1098" draw:text-style-name="P18" draw:layer="layout" svg:width="0.2cm" svg:height="0.2cm" svg:x="28.9cm" svg:y="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36" draw:text-style-name="P4" draw:layer="layout" svg:x1="29cm" svg:y1="25.4cm" svg:x2="29cm" svg:y2="23.2cm">
          <text:p/>
        </draw:line>
        <draw:custom-shape draw:style-name="gr1099" draw:text-style-name="P36" draw:layer="layout" svg:width="2cm" svg:height="2cm" svg:x="10cm" svg:y="11cm">
          <text:p text:style-name="P35"><text:span text:style-name="T10">Hazard</text:span></text:p>
          <draw:enhanced-geometry svg:viewBox="0 0 21600 21600" draw:type="rectangle" draw:enhanced-path="M 0 0 L 21600 0 21600 21600 0 21600 0 0 Z N"/>
        </draw:custom-shape>
        <draw:line draw:style-name="gr1008" draw:text-style-name="P4" draw:layer="layout" svg:x1="10.302cm" svg:y1="16.5cm" svg:x2="10.3cm" svg:y2="13cm">
          <text:p/>
        </draw:line>
        <draw:custom-shape draw:style-name="gr1015" draw:text-style-name="P77" draw:layer="layout" svg:width="0.2cm" svg:height="0.2cm" svg:x="10.2cm" svg:y="16.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8" draw:text-style-name="P4" draw:layer="layout" svg:x1="10.7cm" svg:y1="16.8cm" svg:x2="10.7cm" svg:y2="13.001cm">
          <text:p/>
        </draw:line>
        <draw:custom-shape draw:style-name="gr1015" draw:text-style-name="P77" draw:layer="layout" svg:width="0.2cm" svg:height="0.2cm" svg:x="10.601cm" svg:y="16.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7" draw:text-style-name="P4" draw:layer="layout" svg:x1="11cm" svg:y1="23.4cm" svg:x2="11cm" svg:y2="13cm">
          <text:p/>
        </draw:line>
        <draw:custom-shape draw:style-name="gr1098" draw:text-style-name="P18" draw:layer="layout" svg:width="0.2cm" svg:height="0.2cm" svg:x="19.901cm" svg:y="24.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36" draw:text-style-name="P4" draw:layer="layout" svg:x1="20cm" svg:y1="24.3cm" svg:x2="20cm" svg:y2="23.4cm">
          <text:p/>
        </draw:line>
        <draw:line draw:style-name="gr1036" draw:text-style-name="P4" draw:layer="layout" svg:x1="11cm" svg:y1="23.4cm" svg:x2="20cm" svg:y2="23.4cm">
          <text:p/>
        </draw:line>
        <draw:line draw:style-name="gr1014" draw:text-style-name="P4" draw:layer="layout" svg:x1="11.3cm" svg:y1="23cm" svg:x2="19.2cm" svg:y2="23cm">
          <text:p/>
        </draw:line>
        <draw:line draw:style-name="gr1008" draw:text-style-name="P4" draw:layer="layout" svg:x1="11.3cm" svg:y1="23cm" svg:x2="11.3cm" svg:y2="13.002cm">
          <text:p/>
        </draw:line>
        <draw:line draw:style-name="gr1033" draw:text-style-name="P4" draw:layer="layout" svg:x1="19.2cm" svg:y1="21.9cm" svg:x2="19.2cm" svg:y2="23cm">
          <text:p/>
        </draw:line>
        <draw:custom-shape draw:style-name="gr1015" draw:text-style-name="P77" draw:layer="layout" svg:width="0.2cm" svg:height="0.2cm" svg:x="19.1cm" svg:y="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6" draw:text-style-name="P4" draw:layer="layout" svg:x1="12cm" svg:y1="12cm" svg:x2="14cm" svg:y2="12cm">
          <text:p/>
        </draw:line>
        <draw:frame draw:style-name="gr1100" draw:text-style-name="P9" draw:layer="layout" svg:width="1.255cm" svg:height="0.725cm" svg:x="13.777cm" svg:y="11.9cm">
          <draw:text-box>
            <text:p><text:span text:style-name="T2">stall</text:span></text:p>
          </draw:text-box>
        </draw:frame>
        <draw:line draw:style-name="gr1006" draw:text-style-name="P4" draw:layer="layout" svg:x1="10.3cm" svg:y1="8.4cm" svg:x2="9.5cm" svg:y2="9.007cm">
          <text:p/>
        </draw:line>
        <draw:frame draw:style-name="gr1100" draw:text-style-name="P9" draw:layer="layout" svg:width="1.255cm" svg:height="0.725cm" svg:x="10.1cm" svg:y="8cm">
          <draw:text-box>
            <text:p><text:span text:style-name="T2">stall</text:span></text:p>
          </draw:text-box>
        </draw:frame>
        <draw:line draw:style-name="gr1006" draw:text-style-name="P4" draw:layer="layout" svg:x1="3cm" svg:y1="15.593cm" svg:x2="3.5cm" svg:y2="16.9cm">
          <text:p/>
        </draw:line>
        <draw:frame draw:style-name="gr1100" draw:text-style-name="P9" draw:layer="layout" svg:width="1.255cm" svg:height="0.725cm" svg:x="2.349cm" svg:y="14.975cm">
          <draw:text-box>
            <text:p><text:span text:style-name="T2">stall</text:span></text:p>
          </draw:text-box>
        </draw:frame>
        <draw:polygon draw:style-name="gr58" draw:text-style-name="P1" draw:layer="layout" svg:width="0.499cm" svg:height="3.699cm" svg:x="17cm" svg:y="23.6cm" svg:viewBox="0 0 500 3700" draw:points="0,0 0,3700 500,3500 500,150">
          <text:p/>
        </draw:polygon>
        <draw:frame draw:style-name="gr1101" draw:text-style-name="P78" draw:layer="layout" svg:width="0.737cm" svg:height="0.725cm" svg:x="15.465cm" svg:y="26.9cm">
          <draw:text-box>
            <text:p><text:span text:style-name="T26">0</text:span></text:p>
          </draw:text-box>
        </draw:frame>
        <draw:line draw:style-name="gr1102" draw:text-style-name="P4" draw:layer="layout" svg:x1="16cm" svg:y1="27.2cm" svg:x2="17cm" svg:y2="27.1cm">
          <text:p/>
        </draw:line>
        <draw:frame draw:style-name="gr1100" draw:text-style-name="P9" draw:layer="layout" svg:width="1.255cm" svg:height="0.725cm" svg:x="17.749cm" svg:y="27.2cm">
          <draw:text-box>
            <text:p><text:span text:style-name="T2">stall</text:span></text:p>
          </draw:text-box>
        </draw:frame>
        <draw:line draw:style-name="gr1103" draw:text-style-name="P4" draw:layer="layout" svg:x1="17.9cm" svg:y1="27.6cm" svg:x2="17.3cm" svg:y2="27.2cm">
          <text:p/>
        </draw:line>
        <draw:line draw:style-name="gr1104" draw:text-style-name="P4" draw:layer="layout" svg:x1="35.001cm" svg:y1="21cm" svg:x2="36cm" svg:y2="21cm">
          <text:p/>
        </draw:line>
        <draw:line draw:style-name="gr1104" draw:text-style-name="P4" draw:layer="layout" svg:x1="35.002cm" svg:y1="21.9cm" svg:x2="36.001cm" svg:y2="21.9cm">
          <text:p/>
        </draw:line>
        <draw:line draw:style-name="gr1104" draw:text-style-name="P4" draw:layer="layout" svg:x1="35.002cm" svg:y1="17cm" svg:x2="36.001cm" svg:y2="17cm">
          <text:p/>
        </draw:line>
        <draw:line draw:style-name="gr1104" draw:text-style-name="P4" draw:layer="layout" svg:x1="35.003cm" svg:y1="10cm" svg:x2="36.002cm" svg:y2="10cm">
          <text:p/>
        </draw:line>
        <draw:line draw:style-name="gr1104" draw:text-style-name="P4" draw:layer="layout" svg:x1="35.004cm" svg:y1="23.7cm" svg:x2="36.003cm" svg:y2="23.7cm">
          <text:p/>
        </draw:line>
        <draw:line draw:style-name="gr1104" draw:text-style-name="P4" draw:layer="layout" svg:x1="35.005cm" svg:y1="25.4cm" svg:x2="36.004cm" svg:y2="25.4cm">
          <text:p/>
        </draw:line>
        <draw:frame draw:style-name="gr1105" draw:text-style-name="P81" draw:layer="layout" svg:width="10.193cm" svg:height="0.806cm" svg:x="27.5cm" svg:y="4.594cm">
          <draw:text-box>
            <text:p><text:span text:style-name="T27">Because </text:span><text:span text:style-name="T27">of the </text:span><text:span text:style-name="T27">write </text:span><text:span text:style-name="T27">clock of </text:span><text:span text:style-name="T27">the </text:span><text:span text:style-name="T27">register </text:span><text:span text:style-name="T27">file</text:span></text:p>
          </draw:text-box>
        </draw:frame>
        <draw:line draw:style-name="gr1106" draw:text-style-name="P4" draw:layer="layout" svg:x1="32.8cm" svg:y1="5.4cm" svg:x2="35.501cm" svg:y2="10cm">
          <text:p/>
        </draw:line>
        <draw:line draw:style-name="gr1104" draw:text-style-name="P4" draw:layer="layout" svg:x1="27.001cm" svg:y1="19cm" svg:x2="28cm" svg:y2="19cm">
          <text:p/>
        </draw:line>
        <draw:line draw:style-name="gr1104" draw:text-style-name="P4" draw:layer="layout" svg:x1="27.001cm" svg:y1="24cm" svg:x2="28cm" svg:y2="24cm">
          <text:p/>
        </draw:line>
        <draw:line draw:style-name="gr1107" draw:text-style-name="P4" draw:layer="layout" svg:x1="27cm" svg:y1="17cm" svg:x2="27.999cm" svg:y2="17cm">
          <text:p/>
        </draw:line>
        <draw:frame draw:style-name="gr1108" draw:text-style-name="P81" draw:layer="layout" svg:width="2.897cm" svg:height="1.361cm" svg:x="27.7cm" svg:y="13.3cm">
          <draw:text-box>
            <text:p><text:span text:style-name="T27">… </text:span><text:span text:style-name="T27">only for </text:span></text:p>
            <text:p><text:span text:style-name="T27">store</text:span></text:p>
          </draw:text-box>
        </draw:frame>
        <draw:line draw:style-name="gr1109" draw:text-style-name="P4" draw:layer="layout" svg:x1="28.6cm" svg:y1="14.5cm" svg:x2="27.5cm" svg:y2="17cm">
          <text:p/>
        </draw:line>
        <draw:frame draw:style-name="gr1110" draw:text-style-name="P81" draw:layer="layout" svg:width="10.99cm" svg:height="0.806cm" svg:x="28.008cm" svg:y="27.594cm">
          <draw:text-box>
            <text:p><text:span text:style-name="T27">Because </text:span><text:span text:style-name="T27">of the </text:span><text:span text:style-name="T27">write </text:span><text:span text:style-name="T27">clock of </text:span><text:span text:style-name="T27">the </text:span><text:span text:style-name="T27">d_mem </text:span><text:span text:style-name="T27">(store)</text:span></text:p>
          </draw:text-box>
        </draw:frame>
        <draw:line draw:style-name="gr1111" draw:text-style-name="P4" draw:layer="layout" svg:x1="29.4cm" svg:y1="27.594cm" svg:x2="27.5cm" svg:y2="24cm">
          <text:p/>
        </draw:line>
        <draw:custom-shape draw:style-name="gr1112" draw:text-style-name="P1" draw:layer="layout" svg:width="0.5cm" svg:height="1.2cm" svg:x="23.4cm" svg:y="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20.402cm" svg:y="17.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15" draw:style-name="dp1" draw:master-page-name="Standard">
        <draw:line draw:style-name="gr1006" draw:text-style-name="P4" draw:layer="layout" svg:x1="22.5cm" svg:y1="15.9cm" svg:x2="23.5cm" svg:y2="15.9cm">
          <text:p/>
        </draw:line>
        <draw:line draw:style-name="gr1007" draw:text-style-name="P4" draw:layer="layout" svg:x1="14.4cm" svg:y1="19.6cm" svg:x2="14.4cm" svg:y2="18.3cm">
          <text:p/>
        </draw:line>
        <draw:line draw:style-name="gr1006" draw:text-style-name="P4" draw:layer="layout" svg:x1="13cm" svg:y1="20cm" svg:x2="16.5cm" svg:y2="20cm">
          <text:p/>
        </draw:line>
        <draw:line draw:style-name="gr1007" draw:text-style-name="P4" draw:layer="layout" svg:x1="33cm" svg:y1="20.6cm" svg:x2="33cm" svg:y2="17.8cm">
          <text:p/>
        </draw:line>
        <draw:line draw:style-name="gr1007" draw:text-style-name="P4" draw:layer="layout" svg:x1="33cm" svg:y1="15cm" svg:x2="33cm" svg:y2="15.8cm">
          <text:p/>
        </draw:line>
        <draw:line draw:style-name="gr1008" draw:text-style-name="P4" draw:layer="layout" svg:x1="30.5cm" svg:y1="16.4cm" svg:x2="32cm" svg:y2="16.4cm">
          <text:p/>
        </draw:line>
        <draw:line draw:style-name="gr1006" draw:text-style-name="P4" draw:layer="layout" svg:x1="25cm" svg:y1="17cm" svg:x2="27cm" svg:y2="17cm">
          <text:p/>
        </draw:line>
        <draw:line draw:style-name="gr1009" draw:text-style-name="P4" draw:layer="layout" svg:x1="28cm" svg:y1="17cm" svg:x2="28.3cm" svg:y2="17cm">
          <text:p/>
        </draw:line>
        <draw:line draw:style-name="gr1010" draw:text-style-name="P4" draw:layer="layout" svg:x1="19cm" svg:y1="17.7cm" svg:x2="21.6cm" svg:y2="17.7cm">
          <text:p/>
        </draw:line>
        <draw:line draw:style-name="gr1009" draw:text-style-name="P4" draw:layer="layout" svg:x1="21cm" svg:y1="20cm" svg:x2="21cm" svg:y2="12.5cm">
          <text:p/>
        </draw:line>
        <draw:line draw:style-name="gr1009" draw:text-style-name="P4" draw:layer="layout" svg:x1="21cm" svg:y1="18.3cm" svg:x2="21.6cm" svg:y2="18.3cm">
          <text:p/>
        </draw:line>
        <draw:line draw:style-name="gr1009" draw:text-style-name="P4" draw:layer="layout" svg:x1="20.5cm" svg:y1="17.7cm" svg:x2="20.5cm" svg:y2="19cm">
          <text:p/>
        </draw:line>
        <draw:line draw:style-name="gr1007" draw:text-style-name="P4" draw:layer="layout" svg:x1="37.2cm" svg:y1="19cm" svg:x2="37.2cm" svg:y2="17.4cm">
          <text:p/>
        </draw:line>
        <draw:custom-shape draw:style-name="gr461" draw:text-style-name="P5" draw:layer="layout" svg:width="0.2cm" svg:height="0.2cm" svg:x="28.9cm" svg:y="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9" draw:text-style-name="P4" draw:layer="layout" svg:x1="30cm" svg:y1="17.5cm" svg:x2="30cm" svg:y2="21cm">
          <text:p/>
        </draw:line>
        <draw:line draw:style-name="gr1009" draw:text-style-name="P4" draw:layer="layout" svg:x1="36cm" svg:y1="21cm" svg:x2="36.4cm" svg:y2="21cm">
          <text:p/>
        </draw:line>
        <draw:line draw:style-name="gr1009" draw:text-style-name="P4" draw:layer="layout" svg:x1="36.4cm" svg:y1="21cm" svg:x2="36.4cm" svg:y2="17.3cm">
          <text:p/>
        </draw:line>
        <draw:line draw:style-name="gr1011" draw:text-style-name="P4" draw:layer="layout" svg:x1="13cm" svg:y1="16.2cm" svg:x2="13.512cm" svg:y2="16.2cm">
          <text:p/>
        </draw:line>
        <draw:line draw:style-name="gr1012" draw:text-style-name="P4" draw:layer="layout" svg:x1="13cm" svg:y1="8cm" svg:x2="37.5cm" svg:y2="8cm">
          <text:p/>
        </draw:line>
        <draw:line draw:style-name="gr1012" draw:text-style-name="P4" draw:layer="layout" svg:x1="13cm" svg:y1="8cm" svg:x2="13cm" svg:y2="16.2cm">
          <text:p/>
        </draw:line>
        <draw:line draw:style-name="gr1012" draw:text-style-name="P4" draw:layer="layout" svg:x1="37.5cm" svg:y1="17cm" svg:x2="37.5cm" svg:y2="8cm">
          <text:p/>
        </draw:line>
        <draw:line draw:style-name="gr1006" draw:text-style-name="P4" draw:layer="layout" svg:x1="22.5cm" svg:y1="12.5cm" svg:x2="24cm" svg:y2="12.5cm">
          <text:p/>
        </draw:line>
        <draw:line draw:style-name="gr1008" draw:text-style-name="P4" draw:layer="layout" svg:x1="9.5cm" svg:y1="10.5cm" svg:x2="18cm" svg:y2="10.5cm">
          <text:p/>
        </draw:line>
        <draw:line draw:style-name="gr1008" draw:text-style-name="P4" draw:layer="layout" svg:x1="4.5cm" svg:y1="11.5cm" svg:x2="6cm" svg:y2="11.5cm">
          <text:p/>
        </draw:line>
        <draw:line draw:style-name="gr1006" draw:text-style-name="P4" draw:layer="layout" svg:x1="5cm" svg:y1="10.9cm" svg:x2="6cm" svg:y2="10.9cm">
          <text:p/>
        </draw:line>
        <draw:frame draw:style-name="gr1013" draw:text-style-name="P34" draw:layer="layout" svg:width="0.855cm" svg:height="0.962cm" svg:x="4.4cm" svg:y="10.4cm">
          <draw:text-box>
            <text:p><text:span text:style-name="T9">4</text:span></text:p>
          </draw:text-box>
        </draw:frame>
        <draw:line draw:style-name="gr1014" draw:text-style-name="P4" draw:layer="layout" svg:x1="4.5cm" svg:y1="12.5cm" svg:x2="8cm" svg:y2="12.5cm">
          <text:p/>
        </draw:line>
        <draw:line draw:style-name="gr1014" draw:text-style-name="P4" draw:layer="layout" svg:x1="8cm" svg:y1="12.5cm" svg:x2="8cm" svg:y2="10.5cm">
          <text:p/>
        </draw:line>
        <draw:custom-shape draw:style-name="gr1015" draw:text-style-name="P77" draw:layer="layout" svg:width="0.2cm" svg:height="0.2cm" svg:x="4.403cm" svg:y="12.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14" draw:text-style-name="P4" draw:layer="layout" svg:x1="2cm" svg:y1="8cm" svg:x2="5.9cm" svg:y2="8cm">
          <text:p/>
        </draw:line>
        <draw:line draw:style-name="gr1014" draw:text-style-name="P4" draw:layer="layout" svg:x1="26cm" svg:y1="11.5cm" svg:x2="26cm" svg:y2="7.7cm">
          <text:p/>
        </draw:line>
        <draw:line draw:style-name="gr1016" draw:text-style-name="P4" draw:layer="layout" svg:x1="7.5cm" svg:y1="11.2cm" svg:x2="7.5cm" svg:y2="8.3cm">
          <text:p/>
        </draw:line>
        <draw:line draw:style-name="gr1014" draw:text-style-name="P4" draw:layer="layout" svg:x1="6.975cm" svg:y1="11.201cm" svg:x2="7.5cm" svg:y2="11.2cm">
          <text:p/>
        </draw:line>
        <draw:line draw:style-name="gr1014" draw:text-style-name="P4" draw:layer="layout" svg:x1="6.4cm" svg:y1="8.3cm" svg:x2="7.5cm" svg:y2="8.3cm">
          <text:p/>
        </draw:line>
        <draw:line draw:style-name="gr1014" draw:text-style-name="P4" draw:layer="layout" svg:x1="6.4cm" svg:y1="7.7cm" svg:x2="26cm" svg:y2="7.7cm">
          <text:p/>
        </draw:line>
        <draw:line draw:style-name="gr1008" draw:text-style-name="P4" draw:layer="layout" svg:x1="4cm" svg:y1="17.4cm" svg:x2="5cm" svg:y2="17.4cm">
          <text:p/>
        </draw:line>
        <draw:line draw:style-name="gr1006" draw:text-style-name="P4" draw:layer="layout" svg:x1="7.5cm" svg:y1="17cm" svg:x2="8.5cm" svg:y2="17cm">
          <text:p/>
        </draw:line>
        <draw:custom-shape draw:style-name="gr1017" draw:text-style-name="P4" draw:layer="layout" svg:width="0.2cm" svg:height="1.2cm" svg:x="10.302cm" svg:y="16.3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 draw:handle-range-y-minimum="0" draw:handle-range-y-maximum="21600" draw:handle-position="left $1"/>
          </draw:enhanced-geometry>
        </draw:custom-shape>
        <draw:custom-shape draw:style-name="gr461" draw:text-style-name="P5" draw:layer="layout" svg:width="0.2cm" svg:height="0.2cm" svg:x="9.9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5" draw:text-style-name="P77" draw:layer="layout" svg:width="0.2cm" svg:height="0.2cm" svg:x="4.4cm" svg:y="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8" draw:text-style-name="P4" draw:layer="layout" svg:x1="2cm" svg:y1="17.4cm" svg:x2="3.5cm" svg:y2="17.4cm">
          <text:p/>
        </draw:line>
        <draw:line draw:style-name="gr1009" draw:text-style-name="P4" draw:layer="layout" svg:x1="10cm" svg:y1="17cm" svg:x2="10cm" svg:y2="20cm">
          <text:p/>
        </draw:line>
        <draw:frame draw:style-name="gr1018" draw:text-style-name="P78" draw:layer="layout" svg:width="2.06cm" svg:height="0.725cm" svg:x="4.84cm" svg:y="16.6cm">
          <draw:text-box>
            <text:p><text:span text:style-name="T26">Address</text:span></text:p>
          </draw:text-box>
        </draw:frame>
        <draw:frame draw:style-name="gr1019" draw:text-style-name="P78" draw:layer="layout" svg:width="1.42cm" svg:height="0.725cm" svg:x="7.3cm" svg:y="16.9cm">
          <draw:text-box>
            <text:p><text:span text:style-name="T26">Instr.</text:span></text:p>
          </draw:text-box>
        </draw:frame>
        <draw:line draw:style-name="gr1014" draw:text-style-name="P4" draw:layer="layout" svg:x1="2cm" svg:y1="8cm" svg:x2="2cm" svg:y2="17.4cm">
          <text:p/>
        </draw:line>
        <draw:line draw:style-name="gr1016" draw:text-style-name="P4" draw:layer="layout" svg:x1="4.5cm" svg:y1="17.4cm" svg:x2="4.5cm" svg:y2="11.5cm">
          <text:p/>
        </draw:line>
        <draw:line draw:style-name="gr1009" draw:text-style-name="P4" draw:layer="layout" svg:x1="10cm" svg:y1="20cm" svg:x2="13cm" svg:y2="20cm">
          <text:p/>
        </draw:line>
        <draw:line draw:style-name="gr1008" draw:text-style-name="P4" draw:layer="layout" svg:x1="10.5cm" svg:y1="16.8cm" svg:x2="13.512cm" svg:y2="16.8cm">
          <text:p/>
        </draw:line>
        <draw:line draw:style-name="gr1008" draw:text-style-name="P4" draw:layer="layout" svg:x1="10.502cm" svg:y1="16.5cm" svg:x2="13.512cm" svg:y2="16.5cm">
          <text:p/>
        </draw:line>
        <draw:custom-shape draw:style-name="gr1020" draw:text-style-name="P80" draw:layer="layout" svg:width="1cm" svg:height="1.6cm" svg:x="21.5cm" svg:y="11.7cm">
          <text:p text:style-name="P79"><text:span text:style-name="T26">Shift</text:span></text:p>
          <text:p text:style-name="P79"><text:span text:style-name="T26">left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20.901cm" svg:y="18.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6" draw:text-style-name="P4" draw:layer="layout" svg:x1="21cm" svg:y1="12.5cm" svg:x2="21.5cm" svg:y2="12.5cm">
          <text:p/>
        </draw:line>
        <draw:frame draw:style-name="gr1021" draw:text-style-name="P78" draw:layer="layout" svg:width="3.787cm" svg:height="0.725cm" svg:x="10.2cm" svg:y="15.9cm">
          <draw:text-box>
            <text:p><text:span text:style-name="T26">Instr.[19-15]</text:span></text:p>
          </draw:text-box>
        </draw:frame>
        <draw:frame draw:style-name="gr1021" draw:text-style-name="P78" draw:layer="layout" svg:width="3.787cm" svg:height="0.725cm" svg:x="10.2cm" svg:y="16.4cm">
          <draw:text-box>
            <text:p><text:span text:style-name="T26">Instr.[24-20]</text:span></text:p>
          </draw:text-box>
        </draw:frame>
        <draw:frame draw:style-name="gr1022" draw:text-style-name="P78" draw:layer="layout" svg:width="8.545cm" svg:height="0.725cm" svg:x="28.8cm" svg:y="21.975cm">
          <draw:text-box>
            <text:p><text:span text:style-name="T26">Register </text:span><text:span text:style-name="T26">address: </text:span><text:span text:style-name="T26">delayed </text:span><text:span text:style-name="T26">instruction[1</text:span><text:span text:style-name="T26">1-7]</text:span></text:p>
          </draw:text-box>
        </draw:frame>
        <draw:line draw:style-name="gr1023" draw:text-style-name="P47" draw:layer="layout" svg:x1="10.704cm" svg:y1="19.806cm" svg:x2="11.104cm" svg:y2="20.206cm">
          <text:p/>
        </draw:line>
        <draw:frame draw:style-name="gr1024" draw:text-style-name="P78" draw:layer="layout" svg:width="0.976cm" svg:height="0.725cm" svg:x="10.3cm" svg:y="19.277cm">
          <draw:text-box>
            <text:p><text:span text:style-name="T26">32</text:span></text:p>
          </draw:text-box>
        </draw:frame>
        <draw:line draw:style-name="gr1007" draw:text-style-name="P4" draw:layer="layout" svg:x1="21.3cm" svg:y1="25.7cm" svg:x2="21.3cm" svg:y2="11.2cm">
          <text:p/>
        </draw:line>
        <draw:line draw:style-name="gr38" draw:text-style-name="P4" draw:layer="layout" svg:x1="36cm" svg:y1="17cm" svg:x2="36.8cm" svg:y2="17cm">
          <text:p/>
        </draw:line>
        <draw:g draw:style-name="gr1">
          <draw:custom-shape draw:style-name="gr1025" draw:text-style-name="P29" draw:layer="layout" svg:width="0.5cm" svg:height="13cm" svg:x="18cm" svg:y="9cm">
            <text:p/>
            <draw:enhanced-geometry svg:viewBox="0 0 21600 21600" draw:type="rectangle" draw:enhanced-path="M 0 0 L 21600 0 21600 21600 0 21600 0 0 Z N"/>
          </draw:custom-shape>
          <draw:custom-shape draw:style-name="gr1025" draw:text-style-name="P29" draw:layer="layout" svg:width="0.5cm" svg:height="13cm" svg:x="18.5cm" svg:y="9cm">
            <text:p/>
            <draw:enhanced-geometry svg:viewBox="0 0 21600 21600" draw:type="rectangle" draw:enhanced-path="M 0 0 L 21600 0 21600 21600 0 21600 0 0 Z N"/>
          </draw:custom-shape>
        </draw:g>
        <draw:frame draw:style-name="gr1026" draw:text-style-name="P81" draw:layer="layout" svg:width="1.797cm" svg:height="0.806cm" svg:x="17.7cm" svg:y="8.2cm">
          <draw:text-box>
            <text:p><text:span text:style-name="T27">ID/EX</text:span></text:p>
          </draw:text-box>
        </draw:frame>
        <draw:g draw:style-name="gr1">
          <draw:custom-shape draw:style-name="gr1025" draw:text-style-name="P29" draw:layer="layout" svg:width="0.5cm" svg:height="13cm" svg:x="8.5cm" svg:y="9.001cm">
            <text:p/>
            <draw:enhanced-geometry svg:viewBox="0 0 21600 21600" draw:type="rectangle" draw:enhanced-path="M 0 0 L 21600 0 21600 21600 0 21600 0 0 Z N"/>
          </draw:custom-shape>
          <draw:custom-shape draw:style-name="gr1025" draw:text-style-name="P29" draw:layer="layout" svg:width="0.5cm" svg:height="13cm" svg:x="9cm" svg:y="9.001cm">
            <text:p/>
            <draw:enhanced-geometry svg:viewBox="0 0 21600 21600" draw:type="rectangle" draw:enhanced-path="M 0 0 L 21600 0 21600 21600 0 21600 0 0 Z N"/>
          </draw:custom-shape>
        </draw:g>
        <draw:frame draw:style-name="gr1027" draw:text-style-name="P81" draw:layer="layout" svg:width="1.577cm" svg:height="0.806cm" svg:x="8.2cm" svg:y="8.201cm">
          <draw:text-box>
            <text:p><text:span text:style-name="T27">IF/ID</text:span></text:p>
          </draw:text-box>
        </draw:frame>
        <draw:g draw:style-name="gr1">
          <draw:custom-shape draw:style-name="gr1025" draw:text-style-name="P29" draw:layer="layout" svg:width="0.5cm" svg:height="13cm" svg:x="27cm" svg:y="9.002cm">
            <text:p/>
            <draw:enhanced-geometry svg:viewBox="0 0 21600 21600" draw:type="rectangle" draw:enhanced-path="M 0 0 L 21600 0 21600 21600 0 21600 0 0 Z N"/>
          </draw:custom-shape>
          <draw:custom-shape draw:style-name="gr1025" draw:text-style-name="P29" draw:layer="layout" svg:width="0.5cm" svg:height="13cm" svg:x="27.5cm" svg:y="9.002cm">
            <text:p/>
            <draw:enhanced-geometry svg:viewBox="0 0 21600 21600" draw:type="rectangle" draw:enhanced-path="M 0 0 L 21600 0 21600 21600 0 21600 0 0 Z N"/>
          </draw:custom-shape>
        </draw:g>
        <draw:frame draw:style-name="gr1028" draw:text-style-name="P81" draw:layer="layout" svg:width="2.456cm" svg:height="0.806cm" svg:x="26.6cm" svg:y="8.202cm">
          <draw:text-box>
            <text:p><text:span text:style-name="T27">EX/MEM</text:span></text:p>
          </draw:text-box>
        </draw:frame>
        <draw:g draw:style-name="gr1">
          <draw:custom-shape draw:style-name="gr1025" draw:text-style-name="P29" draw:layer="layout" svg:width="0.5cm" svg:height="13cm" svg:x="35.001cm" svg:y="9.003cm">
            <text:p/>
            <draw:enhanced-geometry svg:viewBox="0 0 21600 21600" draw:type="rectangle" draw:enhanced-path="M 0 0 L 21600 0 21600 21600 0 21600 0 0 Z N"/>
          </draw:custom-shape>
          <draw:custom-shape draw:style-name="gr1025" draw:text-style-name="P29" draw:layer="layout" svg:width="0.5cm" svg:height="13cm" svg:x="35.501cm" svg:y="9.003cm">
            <text:p/>
            <draw:enhanced-geometry svg:viewBox="0 0 21600 21600" draw:type="rectangle" draw:enhanced-path="M 0 0 L 21600 0 21600 21600 0 21600 0 0 Z N"/>
          </draw:custom-shape>
        </draw:g>
        <draw:frame draw:style-name="gr1029" draw:text-style-name="P81" draw:layer="layout" svg:width="2.593cm" svg:height="0.806cm" svg:x="34.101cm" svg:y="8.203cm">
          <draw:text-box>
            <text:p><text:span text:style-name="T27">MEM/WB</text:span></text:p>
          </draw:text-box>
        </draw:frame>
        <draw:line draw:style-name="gr1008" draw:text-style-name="P4" draw:layer="layout" svg:x1="8cm" svg:y1="10.5cm" svg:x2="8.5cm" svg:y2="10.5cm">
          <text:p/>
        </draw:line>
        <draw:line draw:style-name="gr1008" draw:text-style-name="P4" draw:layer="layout" svg:x1="19cm" svg:y1="10.5cm" svg:x2="21cm" svg:y2="10.5cm">
          <text:p/>
        </draw:line>
        <draw:line draw:style-name="gr1006" draw:text-style-name="P4" draw:layer="layout" svg:x1="17cm" svg:y1="16cm" svg:x2="18cm" svg:y2="16cm">
          <text:p/>
        </draw:line>
        <draw:line draw:style-name="gr1006" draw:text-style-name="P4" draw:layer="layout" svg:x1="17cm" svg:y1="17.7cm" svg:x2="18cm" svg:y2="17.7cm">
          <text:p/>
        </draw:line>
        <draw:line draw:style-name="gr1006" draw:text-style-name="P4" draw:layer="layout" svg:x1="17.5cm" svg:y1="20cm" svg:x2="18cm" svg:y2="20cm">
          <text:p/>
        </draw:line>
        <draw:line draw:style-name="gr1006" draw:text-style-name="P4" draw:layer="layout" svg:x1="20.5cm" svg:y1="19cm" svg:x2="27cm" svg:y2="19cm">
          <text:p/>
        </draw:line>
        <draw:line draw:style-name="gr1006" draw:text-style-name="P4" draw:layer="layout" svg:x1="34cm" svg:y1="17cm" svg:x2="35cm" svg:y2="17cm">
          <text:p/>
        </draw:line>
        <draw:line draw:style-name="gr1030" draw:text-style-name="P4" draw:layer="layout" svg:x1="30cm" svg:y1="21cm" svg:x2="35cm" svg:y2="21cm">
          <text:p/>
        </draw:line>
        <draw:line draw:style-name="gr38" draw:text-style-name="P4" draw:layer="layout" svg:x1="9.5cm" svg:y1="17cm" svg:x2="10.3cm" svg:y2="17cm">
          <text:p/>
        </draw:line>
        <draw:custom-shape draw:style-name="gr461" draw:text-style-name="P5" draw:layer="layout" svg:width="0.2cm" svg:height="0.2cm" svg:x="9.901cm" svg:y="19.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31" draw:text-style-name="P4" draw:layer="layout" svg:x1="10cm" svg:y1="20cm" svg:x2="10cm" svg:y2="24.2cm">
          <text:p/>
        </draw:line>
        <draw:line draw:style-name="gr1032" draw:text-style-name="P4" draw:layer="layout" svg:x1="10cm" svg:y1="21.9cm" svg:x2="18cm" svg:y2="21.9cm">
          <text:p/>
        </draw:line>
        <draw:line draw:style-name="gr1032" draw:text-style-name="P4" draw:layer="layout" svg:x1="19cm" svg:y1="21.9cm" svg:x2="27cm" svg:y2="21.9cm">
          <text:p/>
        </draw:line>
        <draw:line draw:style-name="gr1032" draw:text-style-name="P4" draw:layer="layout" svg:x1="28cm" svg:y1="21.9cm" svg:x2="35cm" svg:y2="21.9cm">
          <text:p/>
        </draw:line>
        <draw:line draw:style-name="gr1033" draw:text-style-name="P4" draw:layer="layout" svg:x1="36cm" svg:y1="21.9cm" svg:x2="37cm" svg:y2="21.9cm">
          <text:p/>
        </draw:line>
        <draw:line draw:style-name="gr1033" draw:text-style-name="P4" draw:layer="layout" svg:x1="37cm" svg:y1="21.9cm" svg:x2="37cm" svg:y2="22.5cm">
          <text:p/>
        </draw:line>
        <draw:line draw:style-name="gr1033" draw:text-style-name="P4" draw:layer="layout" svg:x1="37cm" svg:y1="22.5cm" svg:x2="9.7cm" svg:y2="22.5cm">
          <text:p/>
        </draw:line>
        <draw:line draw:style-name="gr1033" draw:text-style-name="P4" draw:layer="layout" svg:x1="9.7cm" svg:y1="17.2cm" svg:x2="9.7cm" svg:y2="22.5cm">
          <text:p/>
        </draw:line>
        <draw:line draw:style-name="gr1008" draw:text-style-name="P4" draw:layer="layout" svg:x1="9.7cm" svg:y1="17.2cm" svg:x2="13.512cm" svg:y2="17.2cm">
          <text:p/>
        </draw:line>
        <draw:frame draw:style-name="gr1034" draw:text-style-name="P82" draw:layer="layout" svg:width="1.725cm" svg:height="0.725cm" svg:x="6.701cm" svg:y="6.476cm">
          <draw:text-box>
            <text:p><text:span text:style-name="T28">PCSrc</text:span></text:p>
          </draw:text-box>
        </draw:frame>
        <draw:custom-shape draw:style-name="gr1035" draw:text-style-name="P83" draw:layer="layout" svg:width="1cm" svg:height="2cm" svg:x="23cm" svg:y="5.8cm">
          <text:p text:style-name="P32"><text:span text:style-name="T9">&amp;</text:span></text:p>
          <draw:enhanced-geometry svg:viewBox="0 0 21600 21600" draw:type="rectangle" draw:enhanced-path="M 0 0 L 21600 0 21600 21600 0 21600 0 0 Z N"/>
        </draw:custom-shape>
        <draw:line draw:style-name="gr1036" draw:text-style-name="P84" draw:layer="layout" svg:x1="26.4cm" svg:y1="6.3cm" svg:x2="24cm" svg:y2="6.3cm">
          <text:p/>
        </draw:line>
        <draw:line draw:style-name="gr1036" draw:text-style-name="P4" draw:layer="layout" svg:x1="26.2cm" svg:y1="7.3cm" svg:x2="24cm" svg:y2="7.301cm">
          <text:p/>
        </draw:line>
        <draw:frame draw:style-name="gr1037" draw:text-style-name="P82" draw:layer="layout" svg:width="2.243cm" svg:height="0.725cm" svg:x="24.001cm" svg:y="5.577cm">
          <draw:text-box>
            <text:p><text:span text:style-name="T28">branch_s</text:span></text:p>
          </draw:text-box>
        </draw:frame>
        <draw:line draw:style-name="gr1036" draw:text-style-name="P4" draw:layer="layout" svg:x1="26.2cm" svg:y1="16.7cm" svg:x2="26.2cm" svg:y2="7.3cm">
          <text:p/>
        </draw:line>
        <draw:line draw:style-name="gr1036" draw:text-style-name="P4" draw:layer="layout" svg:x1="26.2cm" svg:y1="16.7cm" svg:x2="25cm" svg:y2="16.7cm">
          <text:p/>
        </draw:line>
        <draw:line draw:style-name="gr1007" draw:text-style-name="P4" draw:layer="layout" svg:x1="24.5cm" svg:y1="26.3cm" svg:x2="24.5cm" svg:y2="17.7cm">
          <text:p/>
        </draw:line>
        <draw:line draw:style-name="gr1038" draw:text-style-name="P47" draw:layer="layout" svg:x1="24.3cm" svg:y1="18.4cm" svg:x2="24.7cm" svg:y2="18.8cm">
          <text:p/>
        </draw:line>
        <draw:line draw:style-name="gr1036" draw:text-style-name="P4" draw:layer="layout" svg:x1="19cm" svg:y1="26.3cm" svg:x2="24.5cm" svg:y2="26.3cm">
          <text:p/>
        </draw:line>
        <draw:custom-shape draw:style-name="gr1039" draw:text-style-name="P85" draw:layer="layout" svg:width="1cm" svg:height="3.5cm" svg:x="18cm" svg:y="23.5cm">
          <text:p/>
          <draw:enhanced-geometry svg:viewBox="0 0 21600 21600" draw:type="rectangle" draw:enhanced-path="M 0 0 L 21600 0 21600 21600 0 21600 0 0 Z N"/>
        </draw:custom-shape>
        <draw:custom-shape draw:style-name="gr1039" draw:text-style-name="P85" draw:layer="layout" svg:width="1cm" svg:height="3.5cm" svg:x="27cm" svg:y="23.5cm">
          <text:p/>
          <draw:enhanced-geometry svg:viewBox="0 0 21600 21600" draw:type="rectangle" draw:enhanced-path="M 0 0 L 21600 0 21600 21600 0 21600 0 0 Z N"/>
        </draw:custom-shape>
        <draw:custom-shape draw:style-name="gr1040" draw:text-style-name="P85" draw:layer="layout" svg:width="1cm" svg:height="4cm" svg:x="35cm" svg:y="23cm">
          <text:p/>
          <draw:enhanced-geometry svg:viewBox="0 0 21600 21600" draw:type="rectangle" draw:enhanced-path="M 0 0 L 21600 0 21600 21600 0 21600 0 0 Z N"/>
        </draw:custom-shape>
        <draw:line draw:style-name="gr1041" draw:text-style-name="P86" draw:layer="layout" svg:x1="19cm" svg:y1="25.4cm" svg:x2="27cm" svg:y2="25.4cm">
          <text:p/>
        </draw:line>
        <draw:line draw:style-name="gr1041" draw:text-style-name="P86" draw:layer="layout" svg:x1="28cm" svg:y1="25.4cm" svg:x2="35cm" svg:y2="25.4cm">
          <text:p/>
        </draw:line>
        <draw:line draw:style-name="gr1041" draw:text-style-name="P86" draw:layer="layout" svg:x1="28cm" svg:y1="23.7cm" svg:x2="35cm" svg:y2="23.7cm">
          <text:p/>
        </draw:line>
        <draw:line draw:style-name="gr1041" draw:text-style-name="P86" draw:layer="layout" svg:x1="15cm" svg:y1="26.6cm" svg:x2="18cm" svg:y2="26.6cm">
          <text:p/>
        </draw:line>
        <draw:line draw:style-name="gr1041" draw:text-style-name="P86" draw:layer="layout" svg:x1="15cm" svg:y1="26.9cm" svg:x2="18cm" svg:y2="26.9cm">
          <text:p/>
        </draw:line>
        <draw:line draw:style-name="gr1036" draw:text-style-name="P4" draw:layer="layout" svg:x1="26.4cm" svg:y1="26.6cm" svg:x2="26.4cm" svg:y2="6.3cm">
          <text:p/>
        </draw:line>
        <draw:line draw:style-name="gr1036" draw:text-style-name="P4" draw:layer="layout" svg:x1="34.4cm" svg:y1="20.3cm" svg:x2="34.4cm" svg:y2="15cm">
          <text:p/>
        </draw:line>
        <draw:line draw:style-name="gr1036" draw:text-style-name="P4" draw:layer="layout" svg:x1="33cm" svg:y1="15cm" svg:x2="34.4cm" svg:y2="15cm">
          <text:p/>
        </draw:line>
        <draw:line draw:style-name="gr1036" draw:text-style-name="P4" draw:layer="layout" svg:x1="33.2cm" svg:y1="20.3cm" svg:x2="34.4cm" svg:y2="20.3cm">
          <text:p/>
        </draw:line>
        <draw:line draw:style-name="gr1036" draw:text-style-name="P4" draw:layer="layout" svg:x1="33cm" svg:y1="24.3cm" svg:x2="33cm" svg:y2="20.6cm">
          <text:p/>
        </draw:line>
        <draw:line draw:style-name="gr1036" draw:text-style-name="P4" draw:layer="layout" svg:x1="33.2cm" svg:y1="24cm" svg:x2="33.2cm" svg:y2="20.3cm">
          <text:p/>
        </draw:line>
        <draw:line draw:style-name="gr1036" draw:text-style-name="P4" draw:layer="layout" svg:x1="28cm" svg:y1="24cm" svg:x2="33.2cm" svg:y2="24cm">
          <text:p/>
        </draw:line>
        <draw:frame draw:style-name="gr1042" draw:text-style-name="P82" draw:layer="layout" svg:width="1.4cm" svg:height="0.725cm" svg:x="24.9cm" svg:y="16.075cm">
          <draw:text-box>
            <text:p><text:span text:style-name="T28">Zero</text:span></text:p>
          </draw:text-box>
        </draw:frame>
        <draw:line draw:style-name="gr1036" draw:text-style-name="P4" draw:layer="layout" svg:x1="14.4cm" svg:y1="22.7cm" svg:x2="36.5cm" svg:y2="22.7cm">
          <text:p/>
        </draw:line>
        <draw:line draw:style-name="gr1036" draw:text-style-name="P4" draw:layer="layout" svg:x1="14.4cm" svg:y1="22.7cm" svg:x2="14.4cm" svg:y2="19.6cm">
          <text:p/>
        </draw:line>
        <draw:line draw:style-name="gr1036" draw:text-style-name="P4" draw:layer="layout" svg:x1="36cm" svg:y1="25.4cm" svg:x2="36.5cm" svg:y2="25.4cm">
          <text:p/>
        </draw:line>
        <draw:line draw:style-name="gr1036" draw:text-style-name="P4" draw:layer="layout" svg:x1="36cm" svg:y1="23.7cm" svg:x2="37.2cm" svg:y2="23.7cm">
          <text:p/>
        </draw:line>
        <draw:line draw:style-name="gr1036" draw:text-style-name="P4" draw:layer="layout" svg:x1="36.5cm" svg:y1="25.4cm" svg:x2="36.5cm" svg:y2="22.7cm">
          <text:p/>
        </draw:line>
        <draw:line draw:style-name="gr1036" draw:text-style-name="P4" draw:layer="layout" svg:x1="37.2cm" svg:y1="23.7cm" svg:x2="37.2cm" svg:y2="19cm">
          <text:p/>
        </draw:line>
        <draw:line draw:style-name="gr1006" draw:text-style-name="P4" draw:layer="layout" svg:x1="10cm" svg:y1="24cm" svg:x2="11cm" svg:y2="24cm">
          <text:p/>
        </draw:line>
        <draw:g draw:style-name="gr1">
          <draw:custom-shape draw:style-name="gr1043" draw:text-style-name="P36" draw:layer="layout" svg:width="2.5cm" svg:height="3cm" svg:x="5cm" svg:y="15.1cm">
            <text:p text:style-name="P35"><text:span text:style-name="T10">IMem</text:span></text:p>
            <draw:enhanced-geometry svg:viewBox="0 0 21600 21600" draw:mirror-horizontal="false" draw:mirror-vertical="false" draw:type="rectangle" draw:enhanced-path="M 0 0 L 21600 0 21600 21600 0 21600 0 0 Z N"/>
          </draw:custom-shape>
          <draw:frame draw:style-name="gr1044" draw:text-style-name="P37" draw:layer="layout" svg:width="2.378cm" svg:height="0.569cm" svg:x="4.8cm" svg:y="15.431cm">
            <draw:text-box>
              <text:p><text:span text:style-name="T10">loadData(31:0)</text:span></text:p>
            </draw:text-box>
          </draw:frame>
          <draw:frame draw:style-name="gr1044" draw:text-style-name="P37" draw:layer="layout" svg:width="2.378cm" svg:height="0.569cm" svg:x="4.812cm" svg:y="15.116cm">
            <draw:text-box>
              <text:p><text:span text:style-name="T10">loadAddr(63:0)</text:span></text:p>
            </draw:text-box>
          </draw:frame>
          <draw:frame draw:style-name="gr1045" draw:text-style-name="P37" draw:layer="layout" svg:width="1.148cm" svg:height="0.569cm" svg:x="4.85cm" svg:y="15.716cm">
            <draw:text-box>
              <text:p><text:span text:style-name="T10">wrEn</text:span></text:p>
            </draw:text-box>
          </draw:frame>
          <draw:frame draw:style-name="gr1046" draw:text-style-name="P37" draw:layer="layout" svg:width="2.41cm" svg:height="0.569cm" svg:x="4.82cm" svg:y="17.088cm">
            <draw:text-box>
              <text:p><text:span text:style-name="T10">readAddr(63:0)</text:span></text:p>
            </draw:text-box>
          </draw:frame>
          <draw:frame draw:style-name="gr1046" draw:text-style-name="P37" draw:layer="layout" svg:width="2.41cm" svg:height="0.569cm" svg:x="5.297cm" svg:y="16.7cm">
            <draw:text-box>
              <text:p><text:span text:style-name="T10">readData(31:0)</text:span></text:p>
            </draw:text-box>
          </draw:frame>
        </draw:g>
        <draw:g draw:style-name="gr1">
          <draw:custom-shape draw:style-name="gr1047" draw:text-style-name="P87" draw:layer="layout" svg:width="0.5cm" svg:height="1cm" svg:x="3.5cm" svg:y="16.9cm">
            <text:p text:style-name="P49"><text:span text:style-name="T10">PC</text:span></text:p>
            <draw:enhanced-geometry svg:viewBox="0 0 21600 21600" draw:mirror-horizontal="false" draw:mirror-vertical="false" draw:type="rectangle" draw:enhanced-path="M 0 0 L 21600 0 21600 21600 0 21600 0 0 Z N"/>
          </draw:custom-shape>
          <draw:line draw:style-name="gr60" draw:text-style-name="P11" draw:layer="layout" svg:x1="3.5cm" svg:y1="17.85cm" svg:x2="3.65cm" svg:y2="17.8cm">
            <text:p/>
          </draw:line>
          <draw:line draw:style-name="gr60" draw:text-style-name="P11" draw:layer="layout" svg:x1="3.5cm" svg:y1="17.75cm" svg:x2="3.65cm" svg:y2="17.8cm">
            <text:p/>
          </draw:line>
        </draw:g>
        <draw:frame draw:style-name="gr62" draw:text-style-name="P9" draw:layer="layout" svg:width="1.895cm" svg:height="0.725cm" svg:x="1.705cm" svg:y="17.375cm">
          <draw:text-box>
            <text:p><text:span text:style-name="T2">PCnext</text:span></text:p>
          </draw:text-box>
        </draw:frame>
        <draw:frame draw:style-name="gr61" draw:text-style-name="P9" draw:layer="layout" svg:width="1.09cm" svg:height="0.725cm" svg:x="3.9cm" svg:y="17.4cm">
          <draw:text-box>
            <text:p><text:span text:style-name="T2">PC</text:span></text:p>
          </draw:text-box>
        </draw:frame>
        <draw:custom-shape draw:style-name="gr688" draw:text-style-name="P59" draw:layer="layout" svg:width="1cm" svg:height="1cm" svg:x="6cm" svg:y="10.7cm">
          <text:p text:style-name="P35"><text:span text:style-name="T10">+</text:span></text:p>
          <draw:enhanced-geometry svg:viewBox="0 0 21600 21600" draw:type="rectangle" draw:enhanced-path="M 0 0 L 21600 0 21600 21600 0 21600 0 0 Z N"/>
        </draw:custom-shape>
        <draw:polygon draw:style-name="gr58" draw:text-style-name="P1" draw:layer="layout" svg:width="0.499cm" svg:height="0.999cm" svg:x="5.9cm" svg:y="7.5cm" svg:viewBox="0 0 500 1000" draw:points="500,0 500,1000 0,850 0,150">
          <text:p/>
        </draw:polygon>
        <draw:line draw:style-name="gr1007" draw:text-style-name="P4" draw:layer="layout" svg:x1="6.2cm" svg:y1="7cm" svg:x2="6.2cm" svg:y2="7.6cm">
          <text:p/>
        </draw:line>
        <draw:line draw:style-name="gr1036" draw:text-style-name="P4" draw:layer="layout" svg:x1="19.4cm" svg:y1="7cm" svg:x2="6.2cm" svg:y2="7cm">
          <text:p/>
        </draw:line>
        <draw:g draw:style-name="gr1">
          <draw:custom-shape draw:style-name="gr1048" draw:text-style-name="P36" draw:layer="layout" svg:width="3.506cm" svg:height="2.5cm" svg:x="13.512cm" svg:y="15.8cm">
            <text:p text:style-name="P35"><text:span text:style-name="T10">RegFile</text:span></text:p>
            <draw:enhanced-geometry svg:viewBox="0 0 21600 21600" draw:type="rectangle" draw:enhanced-path="M 0 0 L 21600 0 21600 21600 0 21600 0 0 Z N"/>
          </draw:custom-shape>
          <draw:g draw:style-name="gr66">
            <draw:line draw:style-name="gr60" draw:text-style-name="P11" draw:layer="layout" svg:x1="13.512cm" svg:y1="18.25cm" svg:x2="13.662cm" svg:y2="18.2cm">
              <text:p/>
            </draw:line>
            <draw:line draw:style-name="gr60" draw:text-style-name="P11" draw:layer="layout" svg:x1="13.512cm" svg:y1="18.15cm" svg:x2="13.662cm" svg:y2="18.2cm">
              <text:p/>
            </draw:line>
          </draw:g>
          <draw:frame draw:style-name="gr692" draw:text-style-name="P37" draw:layer="layout" svg:width="3.576cm" svg:height="0.569cm" svg:x="13.314cm" svg:y="16.2cm">
            <draw:text-box>
              <text:p><text:span text:style-name="T10">instr(19:15):raddr</text:span><text:span text:style-name="T10">01(4:0)</text:span></text:p>
            </draw:text-box>
          </draw:frame>
          <draw:frame draw:style-name="gr692" draw:text-style-name="P37" draw:layer="layout" svg:width="3.576cm" svg:height="0.569cm" svg:x="13.312cm" svg:y="16.531cm">
            <draw:text-box>
              <text:p><text:span text:style-name="T10">instr(24:20):raddr</text:span><text:span text:style-name="T10">02(4:0)</text:span></text:p>
            </draw:text-box>
          </draw:frame>
          <draw:frame draw:style-name="gr693" draw:text-style-name="P37" draw:layer="layout" svg:width="3.508cm" svg:height="0.569cm" svg:x="13.306cm" svg:y="16.9cm">
            <draw:text-box>
              <text:p><text:span text:style-name="T10">instr(11:7):waddr</text:span><text:span text:style-name="T10">01(4:0)</text:span></text:p>
            </draw:text-box>
          </draw:frame>
          <draw:frame draw:style-name="gr694" draw:text-style-name="P37" draw:layer="layout" svg:width="2.315cm" svg:height="0.569cm" svg:x="13.3cm" svg:y="15.931cm">
            <draw:text-box>
              <text:p><text:span text:style-name="T10">wdata01(63:0)</text:span></text:p>
            </draw:text-box>
          </draw:frame>
          <draw:frame draw:style-name="gr1049" draw:text-style-name="P37" draw:layer="layout" svg:width="2.205cm" svg:height="0.569cm" svg:x="15.01cm" svg:y="15.7cm">
            <draw:text-box>
              <text:p><text:span text:style-name="T10">rdata01(63:0)</text:span></text:p>
            </draw:text-box>
          </draw:frame>
          <draw:frame draw:style-name="gr1049" draw:text-style-name="P37" draw:layer="layout" svg:width="2.205cm" svg:height="0.569cm" svg:x="15.014cm" svg:y="17.431cm">
            <draw:text-box>
              <text:p><text:span text:style-name="T10">rdata02(63:0)</text:span></text:p>
            </draw:text-box>
          </draw:frame>
          <draw:frame draw:style-name="gr695" draw:text-style-name="P37" draw:layer="layout" svg:width="0.865cm" svg:height="0.569cm" svg:x="14.056cm" svg:y="17.831cm">
            <draw:text-box>
              <text:p><text:span text:style-name="T10">we</text:span></text:p>
            </draw:text-box>
          </draw:frame>
        </draw:g>
        <draw:g draw:style-name="gr1">
          <draw:custom-shape draw:style-name="gr1050" draw:text-style-name="P36" draw:layer="layout" svg:width="1.5cm" svg:height="2cm" svg:x="23.5cm" svg:y="15.7cm">
            <text:p text:style-name="P35"><text:span text:style-name="T10">alu</text:span></text:p>
            <draw:enhanced-geometry svg:viewBox="0 0 21600 21600" draw:type="rectangle" draw:enhanced-path="M 0 0 L 21600 0 21600 21600 0 21600 0 0 Z N"/>
          </draw:custom-shape>
          <draw:frame draw:style-name="gr704" draw:text-style-name="P37" draw:layer="layout" svg:width="1.37cm" svg:height="0.569cm" svg:x="23.282cm" svg:y="15.6cm">
            <draw:text-box>
              <text:p><text:span text:style-name="T10">data01</text:span></text:p>
            </draw:text-box>
          </draw:frame>
          <draw:frame draw:style-name="gr704" draw:text-style-name="P37" draw:layer="layout" svg:width="1.37cm" svg:height="0.569cm" svg:x="23.282cm" svg:y="15.869cm">
            <draw:text-box>
              <text:p><text:span text:style-name="T10">data02</text:span></text:p>
            </draw:text-box>
          </draw:frame>
          <draw:frame draw:style-name="gr1051" draw:text-style-name="P37" draw:layer="layout" svg:width="1.29cm" svg:height="0.569cm" svg:x="23.859cm" svg:y="17.3cm">
            <draw:text-box>
              <text:p><text:span text:style-name="T10">aluSel</text:span></text:p>
            </draw:text-box>
          </draw:frame>
          <draw:frame draw:style-name="gr1052" draw:text-style-name="P37" draw:layer="layout" svg:width="1.054cm" svg:height="0.569cm" svg:x="24.148cm" svg:y="16.4cm">
            <draw:text-box>
              <text:p><text:span text:style-name="T10">zero</text:span></text:p>
            </draw:text-box>
          </draw:frame>
          <draw:frame draw:style-name="gr1053" draw:text-style-name="P37" draw:layer="layout" svg:width="1.684cm" svg:height="0.569cm" svg:x="23.517cm" svg:y="16.7cm">
            <draw:text-box>
              <text:p><text:span text:style-name="T10">aluResult</text:span></text:p>
            </draw:text-box>
          </draw:frame>
        </draw:g>
        <draw:line draw:style-name="gr38" draw:text-style-name="P4" draw:layer="layout" svg:x1="19cm" svg:y1="16cm" svg:x2="21.4cm" svg:y2="16cm">
          <text:p/>
        </draw:line>
        <draw:line draw:style-name="gr38" draw:text-style-name="P4" draw:layer="layout" svg:x1="21.4cm" svg:y1="16cm" svg:x2="21.4cm" svg:y2="15.6cm">
          <text:p/>
        </draw:line>
        <draw:polygon draw:style-name="gr58" draw:text-style-name="P1" draw:layer="layout" svg:width="0.499cm" svg:height="0.999cm" svg:x="22cm" svg:y="15.4cm" svg:viewBox="0 0 500 1000" draw:points="0,0 0,1000 500,850 500,150">
          <text:p/>
        </draw:polygon>
        <draw:polygon draw:style-name="gr58" draw:text-style-name="P1" draw:layer="layout" svg:width="0.499cm" svg:height="0.999cm" svg:x="21.6cm" svg:y="17.5cm" svg:viewBox="0 0 500 1000" draw:points="0,0 0,1000 500,850 500,150">
          <text:p/>
        </draw:polygon>
        <draw:line draw:style-name="gr1006" draw:text-style-name="P4" draw:layer="layout" svg:x1="23cm" svg:y1="16.2cm" svg:x2="23.5cm" svg:y2="16.2cm">
          <text:p/>
        </draw:line>
        <draw:line draw:style-name="gr1009" draw:text-style-name="P4" draw:layer="layout" svg:x1="22.1cm" svg:y1="18cm" svg:x2="23cm" svg:y2="18cm">
          <text:p/>
        </draw:line>
        <draw:line draw:style-name="gr38" draw:text-style-name="P4" draw:layer="layout" svg:x1="23cm" svg:y1="18cm" svg:x2="23cm" svg:y2="16.2cm">
          <text:p/>
        </draw:line>
        <draw:line draw:style-name="gr1009" draw:text-style-name="P4" draw:layer="layout" svg:x1="21.4cm" svg:y1="15.6cm" svg:x2="22cm" svg:y2="15.6cm">
          <text:p/>
        </draw:line>
        <draw:line draw:style-name="gr1009" draw:text-style-name="P4" draw:layer="layout" svg:x1="20.2cm" svg:y1="16.2cm" svg:x2="22cm" svg:y2="16.2cm">
          <text:p/>
        </draw:line>
        <draw:g draw:style-name="gr1">
          <draw:custom-shape draw:style-name="gr1054" draw:text-style-name="P36" draw:layer="layout" svg:width="2.607cm" svg:height="1cm" svg:x="14.924cm" svg:y="19.6cm">
            <text:p text:style-name="P35"><text:span text:style-name="T10">extend</text:span></text:p>
            <draw:enhanced-geometry svg:viewBox="0 0 21600 21600" draw:type="rectangle" draw:enhanced-path="M 0 0 L 21600 0 21600 21600 0 21600 0 0 Z N"/>
          </draw:custom-shape>
          <draw:frame draw:style-name="gr1055" draw:text-style-name="P37" draw:layer="layout" svg:width="1.779cm" svg:height="0.569cm" svg:x="14.713cm" svg:y="19.7cm">
            <draw:text-box>
              <text:p><text:span text:style-name="T10">instr(31:0)</text:span></text:p>
            </draw:text-box>
          </draw:frame>
          <draw:frame draw:style-name="gr1056" draw:text-style-name="P37" draw:layer="layout" svg:width="1.448cm" svg:height="0.569cm" svg:x="16.114cm" svg:y="20.2cm">
            <draw:text-box>
              <text:p><text:span text:style-name="T10">sel(2:0)</text:span></text:p>
            </draw:text-box>
          </draw:frame>
          <draw:frame draw:style-name="gr1057" draw:text-style-name="P37" draw:layer="layout" svg:width="1.778cm" svg:height="0.569cm" svg:x="16.024cm" svg:y="19.667cm">
            <draw:text-box>
              <text:p><text:span text:style-name="T10">imm(63:0)</text:span></text:p>
            </draw:text-box>
          </draw:frame>
        </draw:g>
        <draw:frame draw:style-name="gr1058" draw:text-style-name="P9" draw:layer="layout" svg:width="3.302cm" svg:height="0.725cm" svg:x="20.9cm" svg:y="13.075cm">
          <draw:text-box>
            <text:p><text:span text:style-name="T2">Inside </text:span><text:span text:style-name="T2">„extend“</text:span></text:p>
          </draw:text-box>
        </draw:frame>
        <draw:line draw:style-name="gr1007" draw:text-style-name="P4" draw:layer="layout" svg:x1="16.8cm" svg:y1="25.932cm" svg:x2="16.8cm" svg:y2="20.6cm">
          <text:p/>
        </draw:line>
        <draw:custom-shape draw:style-name="gr688" draw:text-style-name="P59" draw:layer="layout" svg:width="1cm" svg:height="1cm" svg:x="24cm" svg:y="11.7cm">
          <text:p text:style-name="P35"><text:span text:style-name="T10">+</text:span></text:p>
          <draw:enhanced-geometry svg:viewBox="0 0 21600 21600" draw:type="rectangle" draw:enhanced-path="M 0 0 L 21600 0 21600 21600 0 21600 0 0 Z N"/>
        </draw:custom-shape>
        <draw:line draw:style-name="gr136" draw:text-style-name="P4" draw:layer="layout" svg:x1="23cm" svg:y1="11.9cm" svg:x2="24cm" svg:y2="11.9cm">
          <text:p/>
        </draw:line>
        <draw:polygon draw:style-name="gr58" draw:text-style-name="P1" draw:layer="layout" svg:width="0.499cm" svg:height="0.999cm" svg:x="21cm" svg:y="10.3cm" svg:viewBox="0 0 500 1000" draw:points="0,0 0,1000 500,850 500,150">
          <text:p/>
        </draw:polygon>
        <draw:line draw:style-name="gr1014" draw:text-style-name="P4" draw:layer="layout" svg:x1="24.975cm" svg:y1="12.201cm" svg:x2="26cm" svg:y2="12.2cm">
          <text:p/>
        </draw:line>
        <draw:line draw:style-name="gr1016" draw:text-style-name="P4" draw:layer="layout" svg:x1="26cm" svg:y1="12.2cm" svg:x2="26cm" svg:y2="11.5cm">
          <text:p/>
        </draw:line>
        <draw:line draw:style-name="gr1008" draw:text-style-name="P4" draw:layer="layout" svg:x1="20.5cm" svg:y1="11.1cm" svg:x2="21cm" svg:y2="11.1cm">
          <text:p/>
        </draw:line>
        <draw:line draw:style-name="gr38" draw:text-style-name="P4" draw:layer="layout" svg:x1="21.5cm" svg:y1="10.8cm" svg:x2="23cm" svg:y2="10.8cm">
          <text:p/>
        </draw:line>
        <draw:line draw:style-name="gr38" draw:text-style-name="P4" draw:layer="layout" svg:x1="23cm" svg:y1="10.8cm" svg:x2="23cm" svg:y2="11.9cm">
          <text:p/>
        </draw:line>
        <draw:frame draw:style-name="gr1059" draw:text-style-name="P9" draw:layer="layout" svg:width="1.678cm" svg:height="0.725cm" svg:x="19.4cm" svg:y="9.875cm">
          <draw:text-box>
            <text:p><text:span text:style-name="T2">for jalr</text:span></text:p>
          </draw:text-box>
        </draw:frame>
        <draw:custom-shape draw:style-name="gr461" draw:text-style-name="P5" draw:layer="layout" svg:width="0.2cm" svg:height="0.2cm" svg:x="20.401cm" svg:y="1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9" draw:text-style-name="P4" draw:layer="layout" svg:x1="20.5cm" svg:y1="11.1cm" svg:x2="20.5cm" svg:y2="16cm">
          <text:p/>
        </draw:line>
        <draw:line draw:style-name="gr1033" draw:text-style-name="P4" draw:layer="layout" svg:x1="20.2cm" svg:y1="10.475cm" svg:x2="20.2cm" svg:y2="16.2cm">
          <text:p/>
        </draw:line>
        <draw:frame draw:style-name="gr1060" draw:text-style-name="P9" draw:layer="layout" svg:width="2.126cm" svg:height="0.725cm" svg:x="18.577cm" svg:y="13.675cm">
          <draw:text-box>
            <text:p><text:span text:style-name="T2">for auipc</text:span></text:p>
          </draw:text-box>
        </draw:frame>
        <draw:polygon draw:style-name="gr58" draw:text-style-name="P1" draw:layer="layout" svg:width="0.499cm" svg:height="0.999cm" svg:x="36.8cm" svg:y="16.5cm" svg:viewBox="0 0 500 1000" draw:points="0,0 0,1000 500,850 500,150">
          <text:p/>
        </draw:polygon>
        <draw:line draw:style-name="gr1008" draw:text-style-name="P4" draw:layer="layout" svg:x1="7.5cm" svg:y1="10cm" svg:x2="8.5cm" svg:y2="10cm">
          <text:p/>
        </draw:line>
        <draw:custom-shape draw:style-name="gr1015" draw:text-style-name="P77" draw:layer="layout" svg:width="0.2cm" svg:height="0.2cm" svg:x="7.404cm" svg:y="9.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8" draw:text-style-name="P4" draw:layer="layout" svg:x1="9.5cm" svg:y1="10cm" svg:x2="18cm" svg:y2="10cm">
          <text:p/>
        </draw:line>
        <draw:line draw:style-name="gr1008" draw:text-style-name="P4" draw:layer="layout" svg:x1="19cm" svg:y1="10cm" svg:x2="27cm" svg:y2="10cm">
          <text:p/>
        </draw:line>
        <draw:frame draw:style-name="gr1061" draw:text-style-name="P9" draw:layer="layout" svg:width="3.843cm" svg:height="0.725cm" svg:x="13.7cm" svg:y="9.375cm">
          <draw:text-box>
            <text:p><text:span text:style-name="T2">for return </text:span><text:span text:style-name="T2">address</text:span></text:p>
          </draw:text-box>
        </draw:frame>
        <draw:line draw:style-name="gr1008" draw:text-style-name="P4" draw:layer="layout" svg:x1="28cm" svg:y1="10cm" svg:x2="35.001cm" svg:y2="10cm">
          <text:p/>
        </draw:line>
        <draw:line draw:style-name="gr1014" draw:text-style-name="P4" draw:layer="layout" svg:x1="36cm" svg:y1="10cm" svg:x2="36.5cm" svg:y2="10cm">
          <text:p/>
        </draw:line>
        <draw:line draw:style-name="gr1014" draw:text-style-name="P4" draw:layer="layout" svg:x1="36.5cm" svg:y1="16.7cm" svg:x2="36.5cm" svg:y2="10cm">
          <text:p/>
        </draw:line>
        <draw:line draw:style-name="gr1014" draw:text-style-name="P4" draw:layer="layout" svg:x1="36.5cm" svg:y1="16.7cm" svg:x2="36.8cm" svg:y2="16.7cm">
          <text:p/>
        </draw:line>
        <draw:line draw:style-name="gr38" draw:text-style-name="P4" draw:layer="layout" svg:x1="36.4cm" svg:y1="17.3cm" svg:x2="36.8cm" svg:y2="17.3cm">
          <text:p/>
        </draw:line>
        <draw:line draw:style-name="gr38" draw:text-style-name="P4" draw:layer="layout" svg:x1="37.3cm" svg:y1="17cm" svg:x2="37.5cm" svg:y2="17cm">
          <text:p/>
        </draw:line>
        <draw:line draw:style-name="gr1007" draw:text-style-name="P4" draw:layer="layout" svg:x1="22.3cm" svg:y1="25.1cm" svg:x2="22.3cm" svg:y2="16.301cm">
          <text:p/>
        </draw:line>
        <draw:line draw:style-name="gr1007" draw:text-style-name="P4" draw:layer="layout" svg:x1="21.9cm" svg:y1="24.8cm" svg:x2="21.9cm" svg:y2="18.402cm">
          <text:p/>
        </draw:line>
        <draw:g draw:style-name="gr1">
          <draw:custom-shape draw:style-name="gr805" draw:text-style-name="P36" draw:layer="layout" svg:width="2cm" svg:height="2cm" svg:x="32cm" svg:y="15.8cm">
            <text:p text:style-name="P35"><text:span text:style-name="T10">DMem</text:span></text:p>
            <draw:enhanced-geometry svg:viewBox="0 0 21600 21600" draw:type="rectangle" draw:enhanced-path="M 0 0 L 21600 0 21600 21600 0 21600 0 0 Z N"/>
          </draw:custom-shape>
          <draw:frame draw:style-name="gr1045" draw:text-style-name="P37" draw:layer="layout" svg:width="1.148cm" svg:height="0.569cm" svg:x="32.555cm" svg:y="15.7cm">
            <draw:text-box>
              <text:p><text:span text:style-name="T10">wrEn</text:span></text:p>
            </draw:text-box>
          </draw:frame>
          <draw:g draw:style-name="gr66">
            <draw:line draw:style-name="gr60" draw:text-style-name="P11" draw:layer="layout" svg:x1="32cm" svg:y1="17.7cm" svg:x2="32.29cm" svg:y2="17.6cm">
              <text:p/>
            </draw:line>
            <draw:line draw:style-name="gr60" draw:text-style-name="P11" draw:layer="layout" svg:x1="32cm" svg:y1="17.5cm" svg:x2="32.29cm" svg:y2="17.6cm">
              <text:p/>
            </draw:line>
          </draw:g>
          <draw:frame draw:style-name="gr1062" draw:text-style-name="P37" draw:layer="layout" svg:width="1.101cm" svg:height="0.569cm" svg:x="32.9cm" svg:y="17.331cm">
            <draw:text-box>
              <text:p><text:span text:style-name="T10">rdEn</text:span></text:p>
            </draw:text-box>
          </draw:frame>
          <draw:frame draw:style-name="gr1063" draw:text-style-name="P37" draw:layer="layout" svg:width="1.038cm" svg:height="0.569cm" svg:x="31.8cm" svg:y="16.7cm">
            <draw:text-box>
              <text:p><text:span text:style-name="T10">instr</text:span></text:p>
            </draw:text-box>
          </draw:frame>
          <draw:frame draw:style-name="gr1064" draw:text-style-name="P37" draw:layer="layout" svg:width="1.07cm" svg:height="0.569cm" svg:x="31.8cm" svg:y="16.1cm">
            <draw:text-box>
              <text:p><text:span text:style-name="T10">addr</text:span></text:p>
            </draw:text-box>
          </draw:frame>
          <draw:frame draw:style-name="gr1065" draw:text-style-name="P37" draw:layer="layout" svg:width="1.117cm" svg:height="0.569cm" svg:x="31.8cm" svg:y="16.4cm">
            <draw:text-box>
              <text:p><text:span text:style-name="T10">datai</text:span></text:p>
            </draw:text-box>
          </draw:frame>
          <draw:frame draw:style-name="gr1066" draw:text-style-name="P37" draw:layer="layout" svg:width="1.212cm" svg:height="0.569cm" svg:x="32.991cm" svg:y="16.7cm">
            <draw:text-box>
              <text:p><text:span text:style-name="T10">datao</text:span></text:p>
            </draw:text-box>
          </draw:frame>
        </draw:g>
        <draw:line draw:style-name="gr1006" draw:text-style-name="P4" draw:layer="layout" svg:x1="31cm" svg:y1="16.7cm" svg:x2="32cm" svg:y2="16.7cm">
          <text:p/>
        </draw:line>
        <draw:line draw:style-name="gr1006" draw:text-style-name="P4" draw:layer="layout" svg:x1="31.5cm" svg:y1="17cm" svg:x2="32cm" svg:y2="17cm">
          <text:p/>
        </draw:line>
        <draw:line draw:style-name="gr1016" draw:text-style-name="P4" draw:layer="layout" svg:x1="30.5cm" svg:y1="16.4cm" svg:x2="30.5cm" svg:y2="15.5cm">
          <text:p/>
        </draw:line>
        <draw:line draw:style-name="gr38" draw:text-style-name="P4" draw:layer="layout" svg:x1="28cm" svg:y1="19cm" svg:x2="31cm" svg:y2="19cm">
          <text:p/>
        </draw:line>
        <draw:line draw:style-name="gr38" draw:text-style-name="P4" draw:layer="layout" svg:x1="31cm" svg:y1="19cm" svg:x2="31cm" svg:y2="16.7cm">
          <text:p/>
        </draw:line>
        <draw:custom-shape draw:style-name="gr461" draw:text-style-name="P5" draw:layer="layout" svg:width="0.2cm" svg:height="0.2cm" svg:x="9.903cm" svg:y="21.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67" draw:text-style-name="P40" draw:layer="layout" svg:width="2.5cm" svg:height="0.726cm" svg:x="10.1cm" svg:y="21.402cm">
          <draw:text-box>
            <text:p><text:span text:style-name="T26">Instr.[11-7]</text:span></text:p>
          </draw:text-box>
        </draw:frame>
        <draw:frame draw:style-name="gr1068" draw:text-style-name="P78" draw:layer="layout" svg:width="3.585cm" svg:height="0.725cm" svg:x="10.102cm" svg:y="20.975cm">
          <draw:text-box>
            <text:p><text:span text:style-name="T26">Instr.[14-12, </text:span><text:span text:style-name="T26">6-0]</text:span></text:p>
          </draw:text-box>
        </draw:frame>
        <draw:line draw:style-name="gr1030" draw:text-style-name="P4" draw:layer="layout" svg:x1="10cm" svg:y1="21.5cm" svg:x2="18cm" svg:y2="21.5cm">
          <text:p/>
        </draw:line>
        <draw:custom-shape draw:style-name="gr461" draw:text-style-name="P5" draw:layer="layout" svg:width="0.2cm" svg:height="0.2cm" svg:x="9.904cm" svg:y="21.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30" draw:text-style-name="P4" draw:layer="layout" svg:x1="19cm" svg:y1="21.5cm" svg:x2="27cm" svg:y2="21.5cm">
          <text:p/>
        </draw:line>
        <draw:line draw:style-name="gr38" draw:text-style-name="P4" draw:layer="layout" svg:x1="28cm" svg:y1="21.5cm" svg:x2="31.5cm" svg:y2="21.5cm">
          <text:p/>
        </draw:line>
        <draw:line draw:style-name="gr38" draw:text-style-name="P4" draw:layer="layout" svg:x1="31.5cm" svg:y1="21.5cm" svg:x2="31.5cm" svg:y2="17cm">
          <text:p/>
        </draw:line>
        <draw:g draw:style-name="gr1">
          <draw:custom-shape draw:style-name="gr1069" draw:text-style-name="P36" draw:layer="layout" svg:width="4cm" svg:height="3.527cm" svg:x="11cm" svg:y="23.473cm">
            <text:p text:style-name="P35"><text:span text:style-name="T10">controllAll</text:span></text:p>
            <draw:enhanced-geometry svg:viewBox="0 0 21600 21600" draw:type="rectangle" draw:enhanced-path="M 0 0 L 21600 0 21600 21600 0 21600 0 0 Z N"/>
          </draw:custom-shape>
          <draw:frame draw:style-name="gr1070" draw:text-style-name="P37" draw:layer="layout" svg:width="2.016cm" svg:height="0.569cm" svg:x="10.8cm" svg:y="23.46cm">
            <draw:text-box>
              <text:p><text:span text:style-name="T10">opcode(6:0)</text:span></text:p>
            </draw:text-box>
          </draw:frame>
          <draw:frame draw:style-name="gr1071" draw:text-style-name="P37" draw:layer="layout" svg:width="1.779cm" svg:height="0.569cm" svg:x="10.824cm" svg:y="23.716cm">
            <draw:text-box>
              <text:p><text:span text:style-name="T10">func3(2:0)</text:span></text:p>
            </draw:text-box>
          </draw:frame>
          <draw:frame draw:style-name="gr1072" draw:text-style-name="P37" draw:layer="layout" svg:width="1.511cm" svg:height="0.569cm" svg:x="10.8cm" svg:y="23.973cm">
            <draw:text-box>
              <text:p><text:span text:style-name="T10">func7b5</text:span></text:p>
            </draw:text-box>
          </draw:frame>
          <draw:frame draw:style-name="gr711" draw:text-style-name="P37" draw:layer="layout" svg:width="1.054cm" svg:height="0.569cm" svg:x="10.872cm" svg:y="24.229cm">
            <draw:text-box>
              <text:p><text:span text:style-name="T10">zero</text:span></text:p>
            </draw:text-box>
          </draw:frame>
          <draw:frame draw:style-name="gr619" draw:text-style-name="P37" draw:layer="layout" svg:width="2.204cm" svg:height="0.569cm" svg:x="13.035cm" svg:y="23.373cm">
            <draw:text-box>
              <text:p><text:span text:style-name="T10">resultSrc(1:0)</text:span></text:p>
            </draw:text-box>
          </draw:frame>
          <draw:frame draw:style-name="gr1073" draw:text-style-name="P37" draw:layer="layout" svg:width="1.647cm" svg:height="0.569cm" svg:x="13.6cm" svg:y="23.657cm">
            <draw:text-box>
              <text:p><text:span text:style-name="T10">dMemWr</text:span></text:p>
            </draw:text-box>
          </draw:frame>
          <draw:frame draw:style-name="gr1074" draw:text-style-name="P37" draw:layer="layout" svg:width="1.653cm" svg:height="0.569cm" svg:x="13.6cm" svg:y="23.941cm">
            <draw:text-box>
              <text:p><text:span text:style-name="T10">dMemRd</text:span></text:p>
            </draw:text-box>
          </draw:frame>
          <draw:frame draw:style-name="gr1075" draw:text-style-name="P37" draw:layer="layout" svg:width="1.321cm" svg:height="0.569cm" svg:x="13.887cm" svg:y="24.226cm">
            <draw:text-box>
              <text:p><text:span text:style-name="T10">PCSrc</text:span></text:p>
            </draw:text-box>
          </draw:frame>
          <draw:frame draw:style-name="gr1076" draw:text-style-name="P37" draw:layer="layout" svg:width="1.495cm" svg:height="0.569cm" svg:x="13.724cm" svg:y="24.51cm">
            <draw:text-box>
              <text:p><text:span text:style-name="T10">aluSrcB</text:span></text:p>
            </draw:text-box>
          </draw:frame>
          <draw:frame draw:style-name="gr1076" draw:text-style-name="P37" draw:layer="layout" svg:width="1.495cm" svg:height="0.569cm" svg:x="13.724cm" svg:y="24.794cm">
            <draw:text-box>
              <text:p><text:span text:style-name="T10">aluSrcA</text:span></text:p>
            </draw:text-box>
          </draw:frame>
          <draw:frame draw:style-name="gr1077" draw:text-style-name="P37" draw:layer="layout" svg:width="1.269cm" svg:height="0.569cm" svg:x="13.963cm" svg:y="25.078cm">
            <draw:text-box>
              <text:p><text:span text:style-name="T10">regWr</text:span></text:p>
            </draw:text-box>
          </draw:frame>
          <draw:frame draw:style-name="gr717" draw:text-style-name="P37" draw:layer="layout" svg:width="1.117cm" svg:height="0.569cm" svg:x="14.091cm" svg:y="25.363cm">
            <draw:text-box>
              <text:p><text:span text:style-name="T10">jump</text:span></text:p>
            </draw:text-box>
          </draw:frame>
          <draw:frame draw:style-name="gr1078" draw:text-style-name="P37" draw:layer="layout" svg:width="2.046cm" svg:height="0.569cm" svg:x="13.207cm" svg:y="25.647cm">
            <draw:text-box>
              <text:p><text:span text:style-name="T10">immSrc(2:0)</text:span></text:p>
            </draw:text-box>
          </draw:frame>
          <draw:frame draw:style-name="gr706" draw:text-style-name="P37" draw:layer="layout" svg:width="1.874cm" svg:height="0.569cm" svg:x="13.357cm" svg:y="25.931cm">
            <draw:text-box>
              <text:p><text:span text:style-name="T10">aluSel(4:0)</text:span></text:p>
            </draw:text-box>
          </draw:frame>
          <draw:frame draw:style-name="gr1079" draw:text-style-name="P37" draw:layer="layout" svg:width="1.669cm" svg:height="0.569cm" svg:x="13.557cm" svg:y="26.232cm">
            <draw:text-box>
              <text:p><text:span text:style-name="T10">branch_s</text:span></text:p>
            </draw:text-box>
          </draw:frame>
          <draw:frame draw:style-name="gr1080" draw:text-style-name="P37" draw:layer="layout" svg:width="1.416cm" svg:height="0.569cm" svg:x="13.757cm" svg:y="26.533cm">
            <draw:text-box>
              <text:p><text:span text:style-name="T10">jump_s</text:span></text:p>
            </draw:text-box>
          </draw:frame>
        </draw:g>
        <draw:line draw:style-name="gr1006" draw:text-style-name="P4" draw:layer="layout" svg:x1="10cm" svg:y1="23.8cm" svg:x2="11cm" svg:y2="23.8cm">
          <text:p/>
        </draw:line>
        <draw:line draw:style-name="gr1006" draw:text-style-name="P4" draw:layer="layout" svg:x1="10cm" svg:y1="24.2cm" svg:x2="11cm" svg:y2="24.2cm">
          <text:p/>
        </draw:line>
        <draw:custom-shape draw:style-name="gr461" draw:text-style-name="P5" draw:layer="layout" svg:width="0.2cm" svg:height="0.2cm" svg:x="9.904cm" svg:y="23.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9.905cm" svg:y="23.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41" draw:text-style-name="P86" draw:layer="layout" svg:x1="10cm" svg:y1="24.5cm" svg:x2="11cm" svg:y2="24.5cm">
          <text:p/>
        </draw:line>
        <draw:frame draw:style-name="gr1081" draw:text-style-name="P9" draw:layer="layout" svg:width="10.573cm" svg:height="2.147cm" svg:x="4.527cm" svg:y="25.5cm">
          <draw:text-box>
            <text:p><text:span text:style-name="T2">In pipelined </text:span><text:span text:style-name="T2">version:</text:span></text:p>
            <text:p><text:span text:style-name="T2">- PCSrc not </text:span><text:span text:style-name="T2">connected</text:span></text:p>
            <text:p><text:span text:style-name="T2">- zero not </text:span><text:span text:style-name="T2">used</text:span></text:p>
            <text:p><text:span text:style-name="T2">- forward </text:span><text:span text:style-name="T2">branch_s </text:span><text:span text:style-name="T2">and jump_s </text:span><text:span text:style-name="T2">and </text:span><text:span text:style-name="T2">connect </text:span><text:span text:style-name="T2">with zero</text:span></text:p>
          </draw:text-box>
        </draw:frame>
        <draw:custom-shape draw:style-name="gr1035" draw:text-style-name="P83" draw:layer="layout" svg:width="1cm" svg:height="2cm" svg:x="20.4cm" svg:y="4.9cm">
          <text:p text:style-name="P32"><text:span text:style-name="T9">OR</text:span></text:p>
          <draw:enhanced-geometry svg:viewBox="0 0 21600 21600" draw:type="rectangle" draw:enhanced-path="M 0 0 L 21600 0 21600 21600 0 21600 0 0 Z N"/>
        </draw:custom-shape>
        <draw:frame draw:style-name="gr1082" draw:text-style-name="P82" draw:layer="layout" svg:width="1.867cm" svg:height="0.725cm" svg:x="21.301cm" svg:y="4.778cm">
          <draw:text-box>
            <text:p><text:span text:style-name="T28">jump_s</text:span></text:p>
          </draw:text-box>
        </draw:frame>
        <draw:line draw:style-name="gr1036" draw:text-style-name="P4" draw:layer="layout" svg:x1="23cm" svg:y1="6.4cm" svg:x2="21.4cm" svg:y2="6.402cm">
          <text:p/>
        </draw:line>
        <draw:line draw:style-name="gr1036" draw:text-style-name="P4" draw:layer="layout" svg:x1="26.6cm" svg:y1="5.403cm" svg:x2="21.4cm" svg:y2="5.403cm">
          <text:p/>
        </draw:line>
        <draw:line draw:style-name="gr1036" draw:text-style-name="P4" draw:layer="layout" svg:x1="20.4cm" svg:y1="5.802cm" svg:x2="19.4cm" svg:y2="5.803cm">
          <text:p/>
        </draw:line>
        <draw:line draw:style-name="gr1036" draw:text-style-name="P4" draw:layer="layout" svg:x1="19.4cm" svg:y1="7cm" svg:x2="19.4cm" svg:y2="5.8cm">
          <text:p/>
        </draw:line>
        <draw:frame draw:style-name="gr1083" draw:text-style-name="P9" draw:layer="layout" svg:width="1.444cm" svg:height="0.725cm" svg:x="8.758cm" svg:y="24.1cm">
          <draw:text-box>
            <text:p><text:span text:style-name="T2">open</text:span></text:p>
          </draw:text-box>
        </draw:frame>
        <draw:line draw:style-name="gr1036" draw:text-style-name="P4" draw:layer="layout" svg:x1="15cm" svg:y1="25.932cm" svg:x2="16.8cm" svg:y2="25.932cm">
          <text:p/>
        </draw:line>
        <draw:line draw:style-name="gr1041" draw:text-style-name="P86" draw:layer="layout" svg:x1="15cm" svg:y1="25.4cm" svg:x2="18cm" svg:y2="25.4cm">
          <text:p/>
        </draw:line>
        <draw:line draw:style-name="gr1036" draw:text-style-name="P4" draw:layer="layout" svg:x1="26.6cm" svg:y1="26.9cm" svg:x2="26.6cm" svg:y2="5.403cm">
          <text:p/>
        </draw:line>
        <draw:line draw:style-name="gr1036" draw:text-style-name="P4" draw:layer="layout" svg:x1="19cm" svg:y1="26.6cm" svg:x2="26.4cm" svg:y2="26.6cm">
          <text:p/>
        </draw:line>
        <draw:line draw:style-name="gr1041" draw:text-style-name="P86" draw:layer="layout" svg:x1="15cm" svg:y1="26.3cm" svg:x2="18cm" svg:y2="26.3cm">
          <text:p/>
        </draw:line>
        <draw:line draw:style-name="gr1041" draw:text-style-name="P86" draw:layer="layout" svg:x1="15cm" svg:y1="25.7cm" svg:x2="18cm" svg:y2="25.7cm">
          <text:p/>
        </draw:line>
        <draw:line draw:style-name="gr1036" draw:text-style-name="P4" draw:layer="layout" svg:x1="19cm" svg:y1="25.7cm" svg:x2="21.3cm" svg:y2="25.7cm">
          <text:p/>
        </draw:line>
        <draw:line draw:style-name="gr1041" draw:text-style-name="P86" draw:layer="layout" svg:x1="15cm" svg:y1="25.1cm" svg:x2="18cm" svg:y2="25.1cm">
          <text:p/>
        </draw:line>
        <draw:line draw:style-name="gr1041" draw:text-style-name="P86" draw:layer="layout" svg:x1="15cm" svg:y1="24.8cm" svg:x2="18cm" svg:y2="24.8cm">
          <text:p/>
        </draw:line>
        <draw:line draw:style-name="gr1036" draw:text-style-name="P4" draw:layer="layout" svg:x1="19cm" svg:y1="25.1cm" svg:x2="22.3cm" svg:y2="25.1cm">
          <text:p/>
        </draw:line>
        <draw:line draw:style-name="gr1036" draw:text-style-name="P4" draw:layer="layout" svg:x1="19cm" svg:y1="24.8cm" svg:x2="21.9cm" svg:y2="24.8cm">
          <text:p/>
        </draw:line>
        <draw:line draw:style-name="gr1036" draw:text-style-name="P4" draw:layer="layout" svg:x1="15cm" svg:y1="24.532cm" svg:x2="15.4cm" svg:y2="24.532cm">
          <text:p/>
        </draw:line>
        <draw:line draw:style-name="gr1041" draw:text-style-name="P86" draw:layer="layout" svg:x1="15cm" svg:y1="24.3cm" svg:x2="18cm" svg:y2="24.3cm">
          <text:p/>
        </draw:line>
        <draw:line draw:style-name="gr1041" draw:text-style-name="P86" draw:layer="layout" svg:x1="15cm" svg:y1="24cm" svg:x2="18cm" svg:y2="24cm">
          <text:p/>
        </draw:line>
        <draw:line draw:style-name="gr1041" draw:text-style-name="P86" draw:layer="layout" svg:x1="15cm" svg:y1="23.7cm" svg:x2="18cm" svg:y2="23.7cm">
          <text:p/>
        </draw:line>
        <draw:line draw:style-name="gr1041" draw:text-style-name="P86" draw:layer="layout" svg:x1="19cm" svg:y1="24.3cm" svg:x2="27cm" svg:y2="24.3cm">
          <text:p/>
        </draw:line>
        <draw:line draw:style-name="gr1041" draw:text-style-name="P86" draw:layer="layout" svg:x1="19cm" svg:y1="24cm" svg:x2="27cm" svg:y2="24cm">
          <text:p/>
        </draw:line>
        <draw:line draw:style-name="gr1041" draw:text-style-name="P86" draw:layer="layout" svg:x1="19cm" svg:y1="23.7cm" svg:x2="27cm" svg:y2="23.7cm">
          <text:p/>
        </draw:line>
        <draw:line draw:style-name="gr1036" draw:text-style-name="P4" draw:layer="layout" svg:x1="28cm" svg:y1="24.3cm" svg:x2="33cm" svg:y2="24.3cm">
          <text:p/>
        </draw:line>
        <draw:frame draw:style-name="gr1084" draw:text-style-name="P9" draw:layer="layout" svg:width="3.302cm" svg:height="1.673cm" svg:x="1cm" svg:y="18.1cm">
          <draw:text-box>
            <text:p><text:span text:style-name="T2">InstructionB</text:span><text:span text:style-name="T2">us:</text:span></text:p>
            <text:p><text:span text:style-name="T2">- Address</text:span></text:p>
            <text:p><text:span text:style-name="T2">- Data</text:span></text:p>
          </draw:text-box>
        </draw:frame>
        <draw:line draw:style-name="gr1085" draw:text-style-name="P4" draw:layer="layout" svg:x1="5.2cm" svg:y1="19.5cm" svg:x2="8cm" svg:y2="17.626cm">
          <text:p/>
        </draw:line>
        <draw:line draw:style-name="gr1085" draw:text-style-name="P4" draw:layer="layout" svg:x1="3.1cm" svg:y1="19cm" svg:x2="4.4cm" svg:y2="18cm">
          <text:p/>
        </draw:line>
        <draw:line draw:style-name="gr1086" draw:text-style-name="P4" draw:layer="layout" svg:x1="2.5cm" svg:y1="19.5cm" svg:x2="5.2cm" svg:y2="19.5cm">
          <text:p/>
        </draw:line>
        <draw:frame draw:style-name="gr1087" draw:text-style-name="P9" draw:layer="layout" svg:width="3.3cm" svg:height="2.147cm" svg:x="31cm" svg:y="10.853cm">
          <draw:text-box>
            <text:p><text:span text:style-name="T2">DataBus:</text:span></text:p>
            <text:p><text:span text:style-name="T2">- Address</text:span></text:p>
            <text:p><text:span text:style-name="T2">- Data write</text:span></text:p>
            <text:p><text:span text:style-name="T2">- Data read</text:span></text:p>
          </draw:text-box>
        </draw:frame>
        <draw:line draw:style-name="gr1088" draw:text-style-name="P4" draw:layer="layout" svg:x1="31.2cm" svg:y1="11.7cm" svg:x2="30.4cm" svg:y2="15.5cm">
          <text:p/>
        </draw:line>
        <draw:line draw:style-name="gr1089" draw:text-style-name="P4" draw:layer="layout" svg:x1="31.5cm" svg:y1="12.3cm" svg:x2="31.3cm" svg:y2="15.9cm">
          <text:p/>
        </draw:line>
        <draw:line draw:style-name="gr1090" draw:text-style-name="P4" draw:layer="layout" svg:x1="33.1cm" svg:y1="12.8cm" svg:x2="34.3cm" svg:y2="17cm">
          <text:p/>
        </draw:line>
        <draw:custom-shape draw:style-name="gr1015" draw:text-style-name="P77" draw:layer="layout" svg:width="0.2cm" svg:height="0.2cm" svg:x="20.105cm" svg:y="10.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36" draw:text-style-name="P4" draw:layer="layout" svg:x1="19cm" svg:y1="26.9cm" svg:x2="26.6cm" svg:y2="26.9cm">
          <text:p/>
        </draw:line>
        <draw:line draw:style-name="gr1009" draw:text-style-name="P4" draw:layer="layout" svg:x1="20.5cm" svg:y1="17.7cm" svg:x2="20.5cm" svg:y2="19cm">
          <text:p/>
        </draw:line>
        <draw:line draw:style-name="gr38" draw:text-style-name="P4" draw:layer="layout" svg:x1="19cm" svg:y1="20cm" svg:x2="21cm" svg:y2="20cm">
          <text:p/>
        </draw:line>
        <draw:line draw:style-name="gr1006" draw:text-style-name="P4" draw:layer="layout" svg:x1="3cm" svg:y1="15.593cm" svg:x2="3.5cm" svg:y2="16.9cm">
          <text:p/>
        </draw:line>
        <draw:frame draw:style-name="gr1100" draw:text-style-name="P9" draw:layer="layout" svg:width="1.255cm" svg:height="0.725cm" svg:x="2.349cm" svg:y="14.975cm">
          <draw:text-box>
            <text:p><text:span text:style-name="T2">stall</text:span></text:p>
          </draw:text-box>
        </draw:frame>
        <draw:line draw:style-name="gr1104" draw:text-style-name="P4" draw:layer="layout" svg:x1="35.001cm" svg:y1="21cm" svg:x2="36cm" svg:y2="21cm">
          <text:p/>
        </draw:line>
        <draw:line draw:style-name="gr1104" draw:text-style-name="P4" draw:layer="layout" svg:x1="35.002cm" svg:y1="21.9cm" svg:x2="36.001cm" svg:y2="21.9cm">
          <text:p/>
        </draw:line>
        <draw:line draw:style-name="gr1104" draw:text-style-name="P4" draw:layer="layout" svg:x1="35.002cm" svg:y1="17cm" svg:x2="36.001cm" svg:y2="17cm">
          <text:p/>
        </draw:line>
        <draw:line draw:style-name="gr1104" draw:text-style-name="P4" draw:layer="layout" svg:x1="35.003cm" svg:y1="10cm" svg:x2="36.002cm" svg:y2="10cm">
          <text:p/>
        </draw:line>
        <draw:line draw:style-name="gr1104" draw:text-style-name="P4" draw:layer="layout" svg:x1="35.004cm" svg:y1="23.7cm" svg:x2="36.003cm" svg:y2="23.7cm">
          <text:p/>
        </draw:line>
        <draw:line draw:style-name="gr1104" draw:text-style-name="P4" draw:layer="layout" svg:x1="35.005cm" svg:y1="25.4cm" svg:x2="36.004cm" svg:y2="25.4cm">
          <text:p/>
        </draw:line>
        <draw:frame draw:style-name="gr1105" draw:text-style-name="P81" draw:layer="layout" svg:width="10.193cm" svg:height="0.806cm" svg:x="27.5cm" svg:y="4.594cm">
          <draw:text-box>
            <text:p><text:span text:style-name="T27">Because </text:span><text:span text:style-name="T27">of the </text:span><text:span text:style-name="T27">write </text:span><text:span text:style-name="T27">clock of </text:span><text:span text:style-name="T27">the </text:span><text:span text:style-name="T27">register </text:span><text:span text:style-name="T27">file</text:span></text:p>
          </draw:text-box>
        </draw:frame>
        <draw:line draw:style-name="gr1106" draw:text-style-name="P4" draw:layer="layout" svg:x1="32.8cm" svg:y1="5.4cm" svg:x2="35.501cm" svg:y2="10cm">
          <text:p/>
        </draw:line>
        <draw:line draw:style-name="gr1104" draw:text-style-name="P4" draw:layer="layout" svg:x1="27.001cm" svg:y1="19cm" svg:x2="28cm" svg:y2="19cm">
          <text:p/>
        </draw:line>
        <draw:line draw:style-name="gr1104" draw:text-style-name="P4" draw:layer="layout" svg:x1="27.001cm" svg:y1="24cm" svg:x2="28cm" svg:y2="24cm">
          <text:p/>
        </draw:line>
        <draw:line draw:style-name="gr1107" draw:text-style-name="P4" draw:layer="layout" svg:x1="27cm" svg:y1="17cm" svg:x2="27.999cm" svg:y2="17cm">
          <text:p/>
        </draw:line>
        <draw:frame draw:style-name="gr1108" draw:text-style-name="P81" draw:layer="layout" svg:width="2.897cm" svg:height="1.361cm" svg:x="26.7cm" svg:y="11.4cm">
          <draw:text-box>
            <text:p><text:span text:style-name="T27">… </text:span><text:span text:style-name="T27">only for </text:span></text:p>
            <text:p><text:span text:style-name="T27">store</text:span></text:p>
          </draw:text-box>
        </draw:frame>
        <draw:line draw:style-name="gr1109" draw:text-style-name="P4" draw:layer="layout" svg:x1="27.7cm" svg:y1="12.8cm" svg:x2="27.5cm" svg:y2="17cm">
          <text:p/>
        </draw:line>
        <draw:frame draw:style-name="gr1110" draw:text-style-name="P81" draw:layer="layout" svg:width="10.99cm" svg:height="0.806cm" svg:x="28.008cm" svg:y="27.594cm">
          <draw:text-box>
            <text:p><text:span text:style-name="T27">Because </text:span><text:span text:style-name="T27">of the </text:span><text:span text:style-name="T27">write </text:span><text:span text:style-name="T27">clock of </text:span><text:span text:style-name="T27">the </text:span><text:span text:style-name="T27">d_mem </text:span><text:span text:style-name="T27">(store)</text:span></text:p>
          </draw:text-box>
        </draw:frame>
        <draw:line draw:style-name="gr1111" draw:text-style-name="P4" draw:layer="layout" svg:x1="29.4cm" svg:y1="27.594cm" svg:x2="27.5cm" svg:y2="24cm">
          <text:p/>
        </draw:line>
        <draw:custom-shape draw:style-name="gr461" draw:text-style-name="P5" draw:layer="layout" svg:width="0.2cm" svg:height="0.2cm" svg:x="20.402cm" svg:y="17.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13" draw:text-style-name="P78" draw:layer="layout" svg:width="4.008cm" svg:height="0.725cm" draw:transform="rotate (1.5707963267949) translate (37.3cm 12.6cm)">
          <draw:text-box>
            <text:p><text:span text:style-name="T26">result_write</text:span><text:span text:style-name="T26">back_s</text:span></text:p>
          </draw:text-box>
        </draw:frame>
        <draw:frame draw:style-name="gr1114" draw:text-style-name="P78" draw:layer="layout" svg:width="5.843cm" svg:height="0.725cm" draw:transform="rotate (1.5707963267949) translate (37cm 23.8cm)">
          <draw:text-box>
            <text:p><text:span text:style-name="T26">result_mux</text:span><text:span text:style-name="T26">_src_writeb</text:span><text:span text:style-name="T26">ack_s</text:span></text:p>
          </draw:text-box>
        </draw:frame>
        <draw:frame draw:style-name="gr1115" draw:text-style-name="P78" draw:layer="layout" svg:width="4cm" svg:height="0.725cm" draw:transform="rotate (1.5707963267949) translate (36.3cm 13.9cm)">
          <draw:text-box>
            <text:p><text:span text:style-name="T26">pc_4_writeb</text:span><text:span text:style-name="T26">ack_s</text:span></text:p>
          </draw:text-box>
        </draw:frame>
        <draw:frame draw:style-name="gr1116" draw:text-style-name="P78" draw:layer="layout" svg:width="6cm" svg:height="0.725cm" svg:x="36.6cm" svg:y="14.2cm">
          <draw:text-box>
            <text:p><text:span text:style-name="T26">dmem_data</text:span><text:span text:style-name="T26">_rd_writeba</text:span><text:span text:style-name="T26">ck_s</text:span></text:p>
          </draw:text-box>
        </draw:frame>
        <draw:frame draw:style-name="gr1117" draw:text-style-name="P78" draw:layer="layout" svg:width="4.808cm" svg:height="0.725cm" draw:transform="rotate (1.5707963267949) translate (36.175cm 21.9cm)">
          <draw:text-box>
            <text:p><text:span text:style-name="T26">alu_result_</text:span><text:span text:style-name="T26">writeback_s</text:span></text:p>
          </draw:text-box>
        </draw:frame>
        <draw:line draw:style-name="gr146" draw:text-style-name="P4" draw:layer="layout" svg:x1="37.1cm" svg:y1="14.8cm" svg:x2="36.3cm" svg:y2="17cm">
          <text:p/>
        </draw:line>
        <draw:frame draw:style-name="gr1118" draw:text-style-name="P37" draw:layer="layout" svg:width="3.845cm" svg:height="0.569cm" svg:x="28cm" svg:y="13.8cm">
          <draw:text-box>
            <text:p><text:span text:style-name="T10">instr_execute_s[6</text:span><text:span text:style-name="T10">:0] == 35</text:span></text:p>
          </draw:text-box>
        </draw:frame>
        <draw:frame draw:style-name="gr1119" draw:text-style-name="P37" draw:layer="layout" svg:width="1.992cm" svg:height="0.569cm" svg:x="28cm" svg:y="13.401cm">
          <draw:text-box>
            <text:p><text:span text:style-name="T10">instr = store</text:span></text:p>
          </draw:text-box>
        </draw:frame>
        <draw:line draw:style-name="gr1007" draw:text-style-name="P4" draw:layer="layout" svg:x1="29.718cm" svg:y1="14.3cm" svg:x2="29.718cm" svg:y2="15.1cm">
          <text:p/>
        </draw:line>
        <draw:polygon draw:style-name="gr1120" draw:text-style-name="P60" draw:layer="layout" svg:width="0.499cm" svg:height="0.999cm" svg:x="29.5cm" svg:y="15cm" svg:viewBox="0 0 500 1000" draw:points="0,0 0,1000 500,850 500,150">
          <text:p/>
        </draw:polygon>
        <draw:line draw:style-name="gr1033" draw:text-style-name="P4" draw:layer="layout" svg:x1="30cm" svg:y1="15.5cm" svg:x2="30.5cm" svg:y2="15.5cm">
          <text:p/>
        </draw:line>
        <draw:custom-shape draw:style-name="gr461" draw:text-style-name="P5" draw:layer="layout" svg:width="0.2cm" svg:height="0.2cm" svg:x="25.9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6cm" svg:y1="17cm" svg:x2="26cm" svg:y2="17.5cm">
          <text:p/>
        </draw:line>
        <draw:line draw:style-name="gr1121" draw:text-style-name="P4" draw:layer="layout" svg:x1="26cm" svg:y1="17.5cm" svg:x2="27cm" svg:y2="17.5cm">
          <text:p/>
        </draw:line>
        <draw:line draw:style-name="gr38" draw:text-style-name="P4" draw:layer="layout" svg:x1="28.3cm" svg:y1="17cm" svg:x2="28.3cm" svg:y2="15.3cm">
          <text:p/>
        </draw:line>
        <draw:line draw:style-name="gr38" draw:text-style-name="P4" draw:layer="layout" svg:x1="28.3cm" svg:y1="15.3cm" svg:x2="29.5cm" svg:y2="15.3cm">
          <text:p/>
        </draw:line>
        <draw:line draw:style-name="gr38" draw:text-style-name="P4" draw:layer="layout" svg:x1="29cm" svg:y1="15.7cm" svg:x2="29.5cm" svg:y2="15.7cm">
          <text:p/>
        </draw:line>
        <draw:line draw:style-name="gr38" draw:text-style-name="P4" draw:layer="layout" svg:x1="29cm" svg:y1="17.5cm" svg:x2="29cm" svg:y2="15.7cm">
          <text:p/>
        </draw:line>
        <draw:frame draw:style-name="gr1122" draw:text-style-name="P37" draw:layer="layout" svg:width="3.183cm" svg:height="0.569cm" svg:x="26.535cm" svg:y="14.831cm">
          <draw:text-box>
            <text:p><text:span text:style-name="T10">alu_result_execut</text:span><text:span text:style-name="T10">e_s</text:span></text:p>
          </draw:text-box>
        </draw:frame>
        <draw:line draw:style-name="gr38" draw:text-style-name="P4" draw:layer="layout" svg:x1="28cm" svg:y1="17.5cm" svg:x2="30cm" svg:y2="17.5cm">
          <text:p/>
        </draw:line>
        <draw:frame draw:style-name="gr1123" draw:text-style-name="P37" draw:layer="layout" svg:width="2.819cm" svg:height="0.569cm" svg:x="27.781cm" svg:y="17.031cm">
          <draw:text-box>
            <text:p><text:span text:style-name="T10">alu_result_mem_</text:span><text:span text:style-name="T10">s</text:span></text:p>
          </draw:text-box>
        </draw:frame>
        <draw:frame draw:style-name="gr1124" draw:text-style-name="P37" draw:layer="layout" svg:width="2.047cm" svg:height="0.569cm" svg:x="30.2cm" svg:y="15.9cm">
          <draw:text-box>
            <text:p><text:span text:style-name="T10">dBusAddr_s</text:span></text:p>
          </draw:text-box>
        </draw:frame>
        <draw:frame draw:style-name="gr1125" draw:text-style-name="P37" draw:layer="layout" svg:width="2.404cm" svg:height="0.569cm" svg:x="29.6cm" svg:y="16.331cm">
          <draw:text-box>
            <text:p><text:span text:style-name="T10">dBusDataWr_s</text:span></text:p>
          </draw:text-box>
        </draw:frame>
        <draw:frame draw:style-name="gr1126" draw:text-style-name="P37" draw:layer="layout" svg:width="2.141cm" svg:height="0.569cm" draw:transform="rotate (1.5707963267949) translate (31.291cm 20.24cm)">
          <draw:text-box>
            <text:p><text:span text:style-name="T10">instr_mem_o</text:span></text:p>
          </draw:text-box>
        </draw:frame>
        <draw:frame draw:style-name="gr1127" draw:text-style-name="P37" draw:layer="layout" svg:width="3.497cm" svg:height="0.569cm" svg:x="31.8cm" svg:y="13.031cm">
          <draw:text-box>
            <text:p><text:span text:style-name="T10">dmem_data_rd_</text:span><text:span text:style-name="T10">mem_s</text:span></text:p>
          </draw:text-box>
        </draw:frame>
        <draw:frame draw:style-name="gr1046" draw:text-style-name="P37" draw:layer="layout" svg:width="2.41cm" svg:height="0.569cm" svg:x="31.79cm" svg:y="13.331cm">
          <draw:text-box>
            <text:p><text:span text:style-name="T10">dBusDataRd_s</text:span></text:p>
          </draw:text-box>
        </draw:frame>
        <draw:frame draw:style-name="gr1128" draw:text-style-name="P37" draw:layer="layout" svg:width="2.788cm" svg:height="0.569cm" draw:transform="rotate (1.5707963267949) translate (32.84cm 20.38cm)">
          <draw:text-box>
            <text:p><text:span text:style-name="T10">dmem_rd_mem_</text:span><text:span text:style-name="T10">s</text:span></text:p>
          </draw:text-box>
        </draw:frame>
        <draw:frame draw:style-name="gr1129" draw:text-style-name="P37" draw:layer="layout" svg:width="2.835cm" svg:height="0.569cm" draw:transform="rotate (1.5707963267949) translate (34.24cm 20.24cm)">
          <draw:text-box>
            <text:p><text:span text:style-name="T10">dmem_wr_mem_</text:span><text:span text:style-name="T10">s</text:span></text:p>
          </draw:text-box>
        </draw:frame>
        <draw:frame draw:style-name="gr1130" draw:text-style-name="P37" draw:layer="layout" svg:width="3.513cm" svg:height="0.569cm" svg:x="28.3cm" svg:y="23.231cm">
          <draw:text-box>
            <text:p><text:span text:style-name="T10">result_mux_src_</text:span><text:span text:style-name="T10">mem_s</text:span></text:p>
          </draw:text-box>
        </draw:frame>
        <draw:frame draw:style-name="gr1131" draw:text-style-name="P37" draw:layer="layout" svg:width="2.457cm" svg:height="0.569cm" svg:x="28.6cm" svg:y="24.931cm">
          <draw:text-box>
            <text:p><text:span text:style-name="T10">reg_wr_mem_s</text:span></text:p>
          </draw:text-box>
        </draw:frame>
        <draw:frame draw:style-name="gr694" draw:text-style-name="P37" draw:layer="layout" svg:width="2.315cm" svg:height="0.569cm" svg:x="27.785cm" svg:y="18.531cm">
          <draw:text-box>
            <text:p><text:span text:style-name="T10">reg_b_mem_s</text:span></text:p>
          </draw:text-box>
        </draw:frame>
        <draw:polygon draw:style-name="gr1120" draw:text-style-name="P60" draw:layer="layout" svg:width="0.499cm" svg:height="0.999cm" draw:transform="rotate (1.5707963267949) translate (30.95cm 20.65cm)" svg:viewBox="0 0 500 1000" draw:points="0,0 0,1000 500,850 500,150">
          <text:p/>
        </draw:polygon>
        <draw:frame draw:style-name="gr1132" draw:text-style-name="P37" draw:layer="layout" svg:width="2.678cm" svg:height="0.569cm" svg:x="18.5cm" svg:y="17.3cm">
          <draw:text-box>
            <text:p><text:span text:style-name="T10">reg_b_execute_s</text:span></text:p>
          </draw:text-box>
        </draw:frame>
        <draw:frame draw:style-name="gr694" draw:text-style-name="P37" draw:layer="layout" svg:width="2.315cm" svg:height="0.569cm" svg:x="17.985cm" svg:y="10.3cm">
          <draw:text-box>
            <text:p><text:span text:style-name="T10">pc_execute_s</text:span></text:p>
          </draw:text-box>
        </draw:frame>
        <draw:frame draw:style-name="gr1132" draw:text-style-name="P37" draw:layer="layout" svg:width="2.678cm" svg:height="0.569cm" svg:x="17.6cm" svg:y="15.501cm">
          <draw:text-box>
            <text:p><text:span text:style-name="T10">reg_a_execute_s</text:span></text:p>
          </draw:text-box>
        </draw:frame>
        <draw:frame draw:style-name="gr1133" draw:text-style-name="P37" draw:layer="layout" svg:width="2.488cm" svg:height="0.569cm" svg:x="18.7cm" svg:y="19.501cm">
          <draw:text-box>
            <text:p><text:span text:style-name="T10">imm_execute_s</text:span></text:p>
          </draw:text-box>
        </draw:frame>
        <draw:frame draw:style-name="gr1134" draw:text-style-name="P3" draw:layer="layout" svg:width="15.09cm" svg:height="0.962cm" svg:x="6.5cm" svg:y="1.6cm">
          <draw:text-box>
            <text:p>RWU-RV64I with pipeline (without stall and forward)</text:p>
          </draw:text-box>
        </draw:frame>
      </draw:page>
      <draw:page draw:name="page16" draw:style-name="dp1" draw:master-page-name="Standard">
        <draw:line draw:style-name="gr1006" draw:text-style-name="P4" draw:layer="layout" svg:x1="17.5cm" svg:y1="10.9cm" svg:x2="21.5cm" svg:y2="10.9cm">
          <text:p/>
        </draw:line>
        <draw:line draw:style-name="gr1007" draw:text-style-name="P4" draw:layer="layout" svg:x1="5.9cm" svg:y1="14.6cm" svg:x2="5.9cm" svg:y2="13.3cm">
          <text:p/>
        </draw:line>
        <draw:line draw:style-name="gr1006" draw:text-style-name="P4" draw:layer="layout" svg:x1="4.5cm" svg:y1="15cm" svg:x2="8cm" svg:y2="15cm">
          <text:p/>
        </draw:line>
        <draw:line draw:style-name="gr1007" draw:text-style-name="P4" draw:layer="layout" svg:x1="32cm" svg:y1="15.6cm" svg:x2="32cm" svg:y2="12.8cm">
          <text:p/>
        </draw:line>
        <draw:line draw:style-name="gr1007" draw:text-style-name="P4" draw:layer="layout" svg:x1="32cm" svg:y1="10cm" svg:x2="32cm" svg:y2="10.8cm">
          <text:p/>
        </draw:line>
        <draw:line draw:style-name="gr1008" draw:text-style-name="P4" draw:layer="layout" svg:x1="28.5cm" svg:y1="11.4cm" svg:x2="31cm" svg:y2="11.4cm">
          <text:p/>
        </draw:line>
        <draw:line draw:style-name="gr1006" draw:text-style-name="P4" draw:layer="layout" svg:x1="23cm" svg:y1="12cm" svg:x2="25cm" svg:y2="12cm">
          <text:p/>
        </draw:line>
        <draw:line draw:style-name="gr1009" draw:text-style-name="P4" draw:layer="layout" svg:x1="26cm" svg:y1="12cm" svg:x2="27cm" svg:y2="12cm">
          <text:p/>
        </draw:line>
        <draw:line draw:style-name="gr1010" draw:text-style-name="P4" draw:layer="layout" svg:x1="10.5cm" svg:y1="12.7cm" svg:x2="16.6cm" svg:y2="12.7cm">
          <text:p/>
        </draw:line>
        <draw:line draw:style-name="gr1009" draw:text-style-name="P4" draw:layer="layout" svg:x1="16cm" svg:y1="15cm" svg:x2="16cm" svg:y2="7.5cm">
          <text:p/>
        </draw:line>
        <draw:line draw:style-name="gr1009" draw:text-style-name="P4" draw:layer="layout" svg:x1="16cm" svg:y1="13.3cm" svg:x2="16.6cm" svg:y2="13.3cm">
          <text:p/>
        </draw:line>
        <draw:custom-shape draw:style-name="gr461" draw:text-style-name="P5" draw:layer="layout" svg:width="0.2cm" svg:height="0.2cm" svg:x="11.6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9" draw:text-style-name="P4" draw:layer="layout" svg:x1="15.5cm" svg:y1="12.7cm" svg:x2="15.5cm" svg:y2="14cm">
          <text:p/>
        </draw:line>
        <draw:line draw:style-name="gr1007" draw:text-style-name="P4" draw:layer="layout" svg:x1="39.2cm" svg:y1="14cm" svg:x2="39.2cm" svg:y2="12.4cm">
          <text:p/>
        </draw:line>
        <draw:custom-shape draw:style-name="gr461" draw:text-style-name="P5" draw:layer="layout" svg:width="0.2cm" svg:height="0.2cm" svg:x="27.4cm" svg:y="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9" draw:text-style-name="P4" draw:layer="layout" svg:x1="28cm" svg:y1="13cm" svg:x2="28cm" svg:y2="16cm">
          <text:p/>
        </draw:line>
        <draw:line draw:style-name="gr1009" draw:text-style-name="P4" draw:layer="layout" svg:x1="37cm" svg:y1="16cm" svg:x2="38.4cm" svg:y2="16cm">
          <text:p/>
        </draw:line>
        <draw:line draw:style-name="gr1009" draw:text-style-name="P4" draw:layer="layout" svg:x1="38.4cm" svg:y1="16cm" svg:x2="38.4cm" svg:y2="12.3cm">
          <text:p/>
        </draw:line>
        <draw:line draw:style-name="gr1011" draw:text-style-name="P4" draw:layer="layout" svg:x1="4.5cm" svg:y1="11.2cm" svg:x2="5.012cm" svg:y2="11.2cm">
          <text:p/>
        </draw:line>
        <draw:line draw:style-name="gr1012" draw:text-style-name="P4" draw:layer="layout" svg:x1="4.5cm" svg:y1="3cm" svg:x2="39.5cm" svg:y2="3cm">
          <text:p/>
        </draw:line>
        <draw:line draw:style-name="gr1012" draw:text-style-name="P4" draw:layer="layout" svg:x1="4.5cm" svg:y1="3cm" svg:x2="4.5cm" svg:y2="11.2cm">
          <text:p/>
        </draw:line>
        <draw:line draw:style-name="gr1012" draw:text-style-name="P4" draw:layer="layout" svg:x1="39.5cm" svg:y1="12cm" svg:x2="39.5cm" svg:y2="3cm">
          <text:p/>
        </draw:line>
        <draw:line draw:style-name="gr1006" draw:text-style-name="P4" draw:layer="layout" svg:x1="17.5cm" svg:y1="7.5cm" svg:x2="22cm" svg:y2="7.5cm">
          <text:p/>
        </draw:line>
        <draw:line draw:style-name="gr1008" draw:text-style-name="P4" draw:layer="layout" svg:x1="1cm" svg:y1="5.5cm" svg:x2="9.5cm" svg:y2="5.5cm">
          <text:p/>
        </draw:line>
        <draw:line draw:style-name="gr1014" draw:text-style-name="P4" draw:layer="layout" svg:x1="24cm" svg:y1="6.5cm" svg:x2="24cm" svg:y2="2.7cm">
          <text:p/>
        </draw:line>
        <draw:line draw:style-name="gr1014" draw:text-style-name="P4" draw:layer="layout" svg:x1="23cm" svg:y1="2.7cm" svg:x2="24cm" svg:y2="2.7cm">
          <text:p/>
        </draw:line>
        <draw:custom-shape draw:style-name="gr1017" draw:text-style-name="P4" draw:layer="layout" svg:width="0.2cm" svg:height="1.2cm" svg:x="1.802cm" svg:y="11.3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 draw:handle-range-y-minimum="0" draw:handle-range-y-maximum="21600" draw:handle-position="left $1"/>
          </draw:enhanced-geometry>
        </draw:custom-shape>
        <draw:custom-shape draw:style-name="gr461" draw:text-style-name="P5" draw:layer="layout" svg:width="0.2cm" svg:height="0.2cm" svg:x="1.4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9" draw:text-style-name="P4" draw:layer="layout" svg:x1="1.5cm" svg:y1="12cm" svg:x2="1.5cm" svg:y2="15cm">
          <text:p/>
        </draw:line>
        <draw:line draw:style-name="gr1009" draw:text-style-name="P4" draw:layer="layout" svg:x1="1.5cm" svg:y1="15cm" svg:x2="4.5cm" svg:y2="15cm">
          <text:p/>
        </draw:line>
        <draw:line draw:style-name="gr1008" draw:text-style-name="P4" draw:layer="layout" svg:x1="2cm" svg:y1="11.8cm" svg:x2="5.012cm" svg:y2="11.8cm">
          <text:p/>
        </draw:line>
        <draw:line draw:style-name="gr1008" draw:text-style-name="P4" draw:layer="layout" svg:x1="1.6cm" svg:y1="11.5cm" svg:x2="5.012cm" svg:y2="11.5cm">
          <text:p/>
        </draw:line>
        <draw:custom-shape draw:style-name="gr1020" draw:text-style-name="P80" draw:layer="layout" svg:width="1cm" svg:height="1.6cm" svg:x="16.5cm" svg:y="6.7cm">
          <text:p text:style-name="P79"><text:span text:style-name="T26">Shift</text:span></text:p>
          <text:p text:style-name="P79"><text:span text:style-name="T26">left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15.901cm" svg:y="1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6" draw:text-style-name="P4" draw:layer="layout" svg:x1="16cm" svg:y1="7.5cm" svg:x2="16.5cm" svg:y2="7.5cm">
          <text:p/>
        </draw:line>
        <draw:frame draw:style-name="gr1021" draw:text-style-name="P78" draw:layer="layout" svg:width="3.787cm" svg:height="0.725cm" svg:x="1.7cm" svg:y="10.9cm">
          <draw:text-box>
            <text:p><text:span text:style-name="T26">Instr.[19-15]</text:span></text:p>
          </draw:text-box>
        </draw:frame>
        <draw:frame draw:style-name="gr1021" draw:text-style-name="P78" draw:layer="layout" svg:width="3.787cm" svg:height="0.725cm" svg:x="1.7cm" svg:y="11.4cm">
          <draw:text-box>
            <text:p><text:span text:style-name="T26">Instr.[24-20]</text:span></text:p>
          </draw:text-box>
        </draw:frame>
        <draw:line draw:style-name="gr1023" draw:text-style-name="P47" draw:layer="layout" svg:x1="2.204cm" svg:y1="14.806cm" svg:x2="2.604cm" svg:y2="15.206cm">
          <text:p/>
        </draw:line>
        <draw:frame draw:style-name="gr1024" draw:text-style-name="P78" draw:layer="layout" svg:width="0.976cm" svg:height="0.725cm" svg:x="1.8cm" svg:y="14.277cm">
          <draw:text-box>
            <text:p><text:span text:style-name="T26">32</text:span></text:p>
          </draw:text-box>
        </draw:frame>
        <draw:line draw:style-name="gr1007" draw:text-style-name="P4" draw:layer="layout" svg:x1="16.3cm" svg:y1="24.7cm" svg:x2="16.3cm" svg:y2="6.2cm">
          <text:p/>
        </draw:line>
        <draw:line draw:style-name="gr38" draw:text-style-name="P4" draw:layer="layout" svg:x1="37cm" svg:y1="12cm" svg:x2="38.8cm" svg:y2="12cm">
          <text:p/>
        </draw:line>
        <draw:g draw:style-name="gr1">
          <draw:custom-shape draw:style-name="gr1025" draw:text-style-name="P29" draw:layer="layout" svg:width="0.5cm" svg:height="13cm" svg:x="9.5cm" svg:y="4cm">
            <text:p/>
            <draw:enhanced-geometry svg:viewBox="0 0 21600 21600" draw:type="rectangle" draw:enhanced-path="M 0 0 L 21600 0 21600 21600 0 21600 0 0 Z N"/>
          </draw:custom-shape>
          <draw:custom-shape draw:style-name="gr1025" draw:text-style-name="P29" draw:layer="layout" svg:width="0.5cm" svg:height="13cm" svg:x="10cm" svg:y="4cm">
            <text:p/>
            <draw:enhanced-geometry svg:viewBox="0 0 21600 21600" draw:type="rectangle" draw:enhanced-path="M 0 0 L 21600 0 21600 21600 0 21600 0 0 Z N"/>
          </draw:custom-shape>
        </draw:g>
        <draw:frame draw:style-name="gr1026" draw:text-style-name="P81" draw:layer="layout" svg:width="1.797cm" svg:height="0.806cm" svg:x="9.1cm" svg:y="3.2cm">
          <draw:text-box>
            <text:p><text:span text:style-name="T27">ID/EX</text:span></text:p>
          </draw:text-box>
        </draw:frame>
        <draw:g draw:style-name="gr1">
          <draw:custom-shape draw:style-name="gr1025" draw:text-style-name="P29" draw:layer="layout" svg:width="0.5cm" svg:height="13cm" svg:x="0cm" svg:y="4.001cm">
            <text:p/>
            <draw:enhanced-geometry svg:viewBox="0 0 21600 21600" draw:type="rectangle" draw:enhanced-path="M 0 0 L 21600 0 21600 21600 0 21600 0 0 Z N"/>
          </draw:custom-shape>
          <draw:custom-shape draw:style-name="gr1025" draw:text-style-name="P29" draw:layer="layout" svg:width="0.5cm" svg:height="13cm" svg:x="0.5cm" svg:y="4.001cm">
            <text:p/>
            <draw:enhanced-geometry svg:viewBox="0 0 21600 21600" draw:type="rectangle" draw:enhanced-path="M 0 0 L 21600 0 21600 21600 0 21600 0 0 Z N"/>
          </draw:custom-shape>
        </draw:g>
        <draw:frame draw:style-name="gr1027" draw:text-style-name="P81" draw:layer="layout" svg:width="1.577cm" svg:height="0.806cm" svg:x="-0.3cm" svg:y="3.201cm">
          <draw:text-box>
            <text:p><text:span text:style-name="T27">IF/ID</text:span></text:p>
          </draw:text-box>
        </draw:frame>
        <draw:g draw:style-name="gr1">
          <draw:custom-shape draw:style-name="gr1025" draw:text-style-name="P29" draw:layer="layout" svg:width="0.5cm" svg:height="13cm" svg:x="25cm" svg:y="4.002cm">
            <text:p/>
            <draw:enhanced-geometry svg:viewBox="0 0 21600 21600" draw:type="rectangle" draw:enhanced-path="M 0 0 L 21600 0 21600 21600 0 21600 0 0 Z N"/>
          </draw:custom-shape>
          <draw:custom-shape draw:style-name="gr1025" draw:text-style-name="P29" draw:layer="layout" svg:width="0.5cm" svg:height="13cm" svg:x="25.5cm" svg:y="4.002cm">
            <text:p/>
            <draw:enhanced-geometry svg:viewBox="0 0 21600 21600" draw:type="rectangle" draw:enhanced-path="M 0 0 L 21600 0 21600 21600 0 21600 0 0 Z N"/>
          </draw:custom-shape>
        </draw:g>
        <draw:frame draw:style-name="gr1028" draw:text-style-name="P81" draw:layer="layout" svg:width="2.456cm" svg:height="0.806cm" svg:x="24.6cm" svg:y="3.202cm">
          <draw:text-box>
            <text:p><text:span text:style-name="T27">EX/MEM</text:span></text:p>
          </draw:text-box>
        </draw:frame>
        <draw:g draw:style-name="gr1">
          <draw:custom-shape draw:style-name="gr1135" draw:text-style-name="P29" draw:layer="layout" svg:width="0.5cm" svg:height="13.997cm" svg:x="36.001cm" svg:y="4.003cm">
            <text:p/>
            <draw:enhanced-geometry svg:viewBox="0 0 21600 21600" draw:type="rectangle" draw:enhanced-path="M 0 0 L 21600 0 21600 21600 0 21600 0 0 Z N"/>
          </draw:custom-shape>
          <draw:custom-shape draw:style-name="gr1135" draw:text-style-name="P29" draw:layer="layout" svg:width="0.5cm" svg:height="13.997cm" svg:x="36.501cm" svg:y="4.003cm">
            <text:p/>
            <draw:enhanced-geometry svg:viewBox="0 0 21600 21600" draw:type="rectangle" draw:enhanced-path="M 0 0 L 21600 0 21600 21600 0 21600 0 0 Z N"/>
          </draw:custom-shape>
        </draw:g>
        <draw:frame draw:style-name="gr1029" draw:text-style-name="P81" draw:layer="layout" svg:width="2.593cm" svg:height="0.806cm" svg:x="35.101cm" svg:y="3.203cm">
          <draw:text-box>
            <text:p><text:span text:style-name="T27">MEM/WB</text:span></text:p>
          </draw:text-box>
        </draw:frame>
        <draw:line draw:style-name="gr1008" draw:text-style-name="P4" draw:layer="layout" svg:x1="10.5cm" svg:y1="5.5cm" svg:x2="16cm" svg:y2="5.5cm">
          <text:p/>
        </draw:line>
        <draw:line draw:style-name="gr1006" draw:text-style-name="P4" draw:layer="layout" svg:x1="8.5cm" svg:y1="11cm" svg:x2="9.5cm" svg:y2="11cm">
          <text:p/>
        </draw:line>
        <draw:line draw:style-name="gr1006" draw:text-style-name="P4" draw:layer="layout" svg:x1="8.5cm" svg:y1="12.7cm" svg:x2="9.5cm" svg:y2="12.7cm">
          <text:p/>
        </draw:line>
        <draw:line draw:style-name="gr1006" draw:text-style-name="P4" draw:layer="layout" svg:x1="9cm" svg:y1="15cm" svg:x2="9.5cm" svg:y2="15cm">
          <text:p/>
        </draw:line>
        <draw:line draw:style-name="gr1006" draw:text-style-name="P4" draw:layer="layout" svg:x1="22.3cm" svg:y1="14cm" svg:x2="25cm" svg:y2="14cm">
          <text:p/>
        </draw:line>
        <draw:line draw:style-name="gr1006" draw:text-style-name="P4" draw:layer="layout" svg:x1="33cm" svg:y1="12cm" svg:x2="36.001cm" svg:y2="12cm">
          <text:p/>
        </draw:line>
        <draw:line draw:style-name="gr1030" draw:text-style-name="P4" draw:layer="layout" svg:x1="28cm" svg:y1="16cm" svg:x2="36.001cm" svg:y2="16cm">
          <text:p/>
        </draw:line>
        <draw:line draw:style-name="gr38" draw:text-style-name="P4" draw:layer="layout" svg:x1="1cm" svg:y1="12cm" svg:x2="1.8cm" svg:y2="12cm">
          <text:p/>
        </draw:line>
        <draw:custom-shape draw:style-name="gr461" draw:text-style-name="P5" draw:layer="layout" svg:width="0.2cm" svg:height="0.2cm" svg:x="1.401cm" svg:y="14.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31" draw:text-style-name="P4" draw:layer="layout" svg:x1="1.5cm" svg:y1="15cm" svg:x2="1.5cm" svg:y2="23cm">
          <text:p/>
        </draw:line>
        <draw:line draw:style-name="gr1032" draw:text-style-name="P4" draw:layer="layout" svg:x1="1.5cm" svg:y1="16.9cm" svg:x2="9.5cm" svg:y2="16.9cm">
          <text:p/>
        </draw:line>
        <draw:line draw:style-name="gr1136" draw:text-style-name="P4" draw:layer="layout" svg:x1="10.5cm" svg:y1="16.9cm" svg:x2="25cm" svg:y2="16.9cm">
          <text:p/>
        </draw:line>
        <draw:line draw:style-name="gr1136" draw:text-style-name="P4" draw:layer="layout" svg:x1="26cm" svg:y1="16.9cm" svg:x2="36.001cm" svg:y2="16.9cm">
          <text:p/>
        </draw:line>
        <draw:line draw:style-name="gr1012" draw:text-style-name="P4" draw:layer="layout" svg:x1="37cm" svg:y1="16.9cm" svg:x2="38cm" svg:y2="16.9cm">
          <text:p/>
        </draw:line>
        <draw:line draw:style-name="gr1012" draw:text-style-name="P4" draw:layer="layout" svg:x1="38cm" svg:y1="16.9cm" svg:x2="38cm" svg:y2="20.8cm">
          <text:p/>
        </draw:line>
        <draw:line draw:style-name="gr1012" draw:text-style-name="P4" draw:layer="layout" svg:x1="38cm" svg:y1="20.8cm" svg:x2="17.801cm" svg:y2="20.8cm">
          <text:p/>
        </draw:line>
        <draw:line draw:style-name="gr1033" draw:text-style-name="P4" draw:layer="layout" svg:x1="1.2cm" svg:y1="12.2cm" svg:x2="1.2cm" svg:y2="20.7cm">
          <text:p/>
        </draw:line>
        <draw:line draw:style-name="gr1008" draw:text-style-name="P4" draw:layer="layout" svg:x1="1.2cm" svg:y1="12.2cm" svg:x2="5.012cm" svg:y2="12.2cm">
          <text:p/>
        </draw:line>
        <draw:line draw:style-name="gr1036" draw:text-style-name="P4" draw:layer="layout" svg:x1="24.2cm" svg:y1="11.7cm" svg:x2="24.2cm" svg:y2="2.3cm">
          <text:p/>
        </draw:line>
        <draw:line draw:style-name="gr1036" draw:text-style-name="P4" draw:layer="layout" svg:x1="24.2cm" svg:y1="11.7cm" svg:x2="23cm" svg:y2="11.7cm">
          <text:p/>
        </draw:line>
        <draw:line draw:style-name="gr1007" draw:text-style-name="P4" draw:layer="layout" svg:x1="22.5cm" svg:y1="25.3cm" svg:x2="22.5cm" svg:y2="12.7cm">
          <text:p/>
        </draw:line>
        <draw:line draw:style-name="gr1038" draw:text-style-name="P47" draw:layer="layout" svg:x1="22.3cm" svg:y1="13.4cm" svg:x2="22.7cm" svg:y2="13.8cm">
          <text:p/>
        </draw:line>
        <draw:line draw:style-name="gr1036" draw:text-style-name="P4" draw:layer="layout" svg:x1="10.5cm" svg:y1="25.3cm" svg:x2="22.5cm" svg:y2="25.3cm">
          <text:p/>
        </draw:line>
        <draw:custom-shape draw:style-name="gr1039" draw:text-style-name="P85" draw:layer="layout" svg:width="1cm" svg:height="3.5cm" svg:x="9.5cm" svg:y="22.5cm">
          <text:p/>
          <draw:enhanced-geometry svg:viewBox="0 0 21600 21600" draw:type="rectangle" draw:enhanced-path="M 0 0 L 21600 0 21600 21600 0 21600 0 0 Z N"/>
        </draw:custom-shape>
        <draw:custom-shape draw:style-name="gr1039" draw:text-style-name="P85" draw:layer="layout" svg:width="1cm" svg:height="3.5cm" svg:x="25cm" svg:y="22.5cm">
          <text:p/>
          <draw:enhanced-geometry svg:viewBox="0 0 21600 21600" draw:type="rectangle" draw:enhanced-path="M 0 0 L 21600 0 21600 21600 0 21600 0 0 Z N"/>
        </draw:custom-shape>
        <draw:custom-shape draw:style-name="gr1040" draw:text-style-name="P85" draw:layer="layout" svg:width="1cm" svg:height="4cm" svg:x="36cm" svg:y="22cm">
          <text:p/>
          <draw:enhanced-geometry svg:viewBox="0 0 21600 21600" draw:type="rectangle" draw:enhanced-path="M 0 0 L 21600 0 21600 21600 0 21600 0 0 Z N"/>
        </draw:custom-shape>
        <draw:line draw:style-name="gr1041" draw:text-style-name="P86" draw:layer="layout" svg:x1="10.5cm" svg:y1="24.4cm" svg:x2="25cm" svg:y2="24.4cm">
          <text:p/>
        </draw:line>
        <draw:line draw:style-name="gr1041" draw:text-style-name="P86" draw:layer="layout" svg:x1="26cm" svg:y1="24.4cm" svg:x2="36cm" svg:y2="24.4cm">
          <text:p/>
        </draw:line>
        <draw:line draw:style-name="gr1041" draw:text-style-name="P86" draw:layer="layout" svg:x1="26cm" svg:y1="22.7cm" svg:x2="36.004cm" svg:y2="22.7cm">
          <text:p/>
        </draw:line>
        <draw:line draw:style-name="gr1041" draw:text-style-name="P86" draw:layer="layout" svg:x1="6.5cm" svg:y1="25.6cm" svg:x2="9.5cm" svg:y2="25.6cm">
          <text:p/>
        </draw:line>
        <draw:line draw:style-name="gr1041" draw:text-style-name="P86" draw:layer="layout" svg:x1="6.5cm" svg:y1="25.9cm" svg:x2="9.5cm" svg:y2="25.9cm">
          <text:p/>
        </draw:line>
        <draw:line draw:style-name="gr1036" draw:text-style-name="P4" draw:layer="layout" svg:x1="24.4cm" svg:y1="25.6cm" svg:x2="24.4cm" svg:y2="1.5cm">
          <text:p/>
        </draw:line>
        <draw:line draw:style-name="gr1036" draw:text-style-name="P4" draw:layer="layout" svg:x1="33.4cm" svg:y1="15.3cm" svg:x2="33.4cm" svg:y2="8cm">
          <text:p/>
        </draw:line>
        <draw:line draw:style-name="gr1036" draw:text-style-name="P4" draw:layer="layout" svg:x1="32cm" svg:y1="10cm" svg:x2="33.4cm" svg:y2="10cm">
          <text:p/>
        </draw:line>
        <draw:line draw:style-name="gr1036" draw:text-style-name="P4" draw:layer="layout" svg:x1="32.2cm" svg:y1="15.3cm" svg:x2="33.4cm" svg:y2="15.3cm">
          <text:p/>
        </draw:line>
        <draw:line draw:style-name="gr1036" draw:text-style-name="P4" draw:layer="layout" svg:x1="32cm" svg:y1="23.3cm" svg:x2="32cm" svg:y2="15.6cm">
          <text:p/>
        </draw:line>
        <draw:line draw:style-name="gr1036" draw:text-style-name="P4" draw:layer="layout" svg:x1="32.2cm" svg:y1="23cm" svg:x2="32.2cm" svg:y2="15.3cm">
          <text:p/>
        </draw:line>
        <draw:line draw:style-name="gr1036" draw:text-style-name="P4" draw:layer="layout" svg:x1="26cm" svg:y1="23cm" svg:x2="32.2cm" svg:y2="23cm">
          <text:p/>
        </draw:line>
        <draw:line draw:style-name="gr1036" draw:text-style-name="P4" draw:layer="layout" svg:x1="5.9cm" svg:y1="21.7cm" svg:x2="37.5cm" svg:y2="21.7cm">
          <text:p/>
        </draw:line>
        <draw:line draw:style-name="gr1036" draw:text-style-name="P4" draw:layer="layout" svg:x1="5.9cm" svg:y1="21.7cm" svg:x2="5.9cm" svg:y2="14.6cm">
          <text:p/>
        </draw:line>
        <draw:line draw:style-name="gr1036" draw:text-style-name="P4" draw:layer="layout" svg:x1="37cm" svg:y1="24.4cm" svg:x2="37.5cm" svg:y2="24.4cm">
          <text:p/>
        </draw:line>
        <draw:line draw:style-name="gr1036" draw:text-style-name="P4" draw:layer="layout" svg:x1="37cm" svg:y1="22.7cm" svg:x2="39.2cm" svg:y2="22.7cm">
          <text:p/>
        </draw:line>
        <draw:line draw:style-name="gr1036" draw:text-style-name="P4" draw:layer="layout" svg:x1="37.5cm" svg:y1="24.4cm" svg:x2="37.5cm" svg:y2="21.7cm">
          <text:p/>
        </draw:line>
        <draw:line draw:style-name="gr1036" draw:text-style-name="P4" draw:layer="layout" svg:x1="39.2cm" svg:y1="22.7cm" svg:x2="39.2cm" svg:y2="14cm">
          <text:p/>
        </draw:line>
        <draw:line draw:style-name="gr1006" draw:text-style-name="P4" draw:layer="layout" svg:x1="1.5cm" svg:y1="23cm" svg:x2="2.5cm" svg:y2="23cm">
          <text:p/>
        </draw:line>
        <draw:g draw:style-name="gr1">
          <draw:custom-shape draw:style-name="gr1048" draw:text-style-name="P36" draw:layer="layout" svg:width="3.506cm" svg:height="2.5cm" svg:x="5.012cm" svg:y="10.8cm">
            <text:p text:style-name="P35"><text:span text:style-name="T10">RegFile</text:span></text:p>
            <draw:enhanced-geometry svg:viewBox="0 0 21600 21600" draw:type="rectangle" draw:enhanced-path="M 0 0 L 21600 0 21600 21600 0 21600 0 0 Z N"/>
          </draw:custom-shape>
          <draw:g draw:style-name="gr66">
            <draw:line draw:style-name="gr60" draw:text-style-name="P11" draw:layer="layout" svg:x1="5.012cm" svg:y1="13.25cm" svg:x2="5.162cm" svg:y2="13.2cm">
              <text:p/>
            </draw:line>
            <draw:line draw:style-name="gr60" draw:text-style-name="P11" draw:layer="layout" svg:x1="5.012cm" svg:y1="13.15cm" svg:x2="5.162cm" svg:y2="13.2cm">
              <text:p/>
            </draw:line>
          </draw:g>
          <draw:frame draw:style-name="gr692" draw:text-style-name="P37" draw:layer="layout" svg:width="3.576cm" svg:height="0.569cm" svg:x="4.814cm" svg:y="11.2cm">
            <draw:text-box>
              <text:p><text:span text:style-name="T10">instr(19:15):raddr</text:span><text:span text:style-name="T10">01(4:0)</text:span></text:p>
            </draw:text-box>
          </draw:frame>
          <draw:frame draw:style-name="gr692" draw:text-style-name="P37" draw:layer="layout" svg:width="3.576cm" svg:height="0.569cm" svg:x="4.812cm" svg:y="11.531cm">
            <draw:text-box>
              <text:p><text:span text:style-name="T10">instr(24:20):raddr</text:span><text:span text:style-name="T10">02(4:0)</text:span></text:p>
            </draw:text-box>
          </draw:frame>
          <draw:frame draw:style-name="gr693" draw:text-style-name="P37" draw:layer="layout" svg:width="3.508cm" svg:height="0.569cm" svg:x="4.806cm" svg:y="11.9cm">
            <draw:text-box>
              <text:p><text:span text:style-name="T10">instr(11:7):waddr</text:span><text:span text:style-name="T10">01(4:0)</text:span></text:p>
            </draw:text-box>
          </draw:frame>
          <draw:frame draw:style-name="gr694" draw:text-style-name="P37" draw:layer="layout" svg:width="2.315cm" svg:height="0.569cm" svg:x="4.8cm" svg:y="10.931cm">
            <draw:text-box>
              <text:p><text:span text:style-name="T10">wdata01(63:0)</text:span></text:p>
            </draw:text-box>
          </draw:frame>
          <draw:frame draw:style-name="gr1049" draw:text-style-name="P37" draw:layer="layout" svg:width="2.205cm" svg:height="0.569cm" svg:x="6.51cm" svg:y="10.7cm">
            <draw:text-box>
              <text:p><text:span text:style-name="T10">rdata01(63:0)</text:span></text:p>
            </draw:text-box>
          </draw:frame>
          <draw:frame draw:style-name="gr1049" draw:text-style-name="P37" draw:layer="layout" svg:width="2.205cm" svg:height="0.569cm" svg:x="6.514cm" svg:y="12.431cm">
            <draw:text-box>
              <text:p><text:span text:style-name="T10">rdata02(63:0)</text:span></text:p>
            </draw:text-box>
          </draw:frame>
          <draw:frame draw:style-name="gr695" draw:text-style-name="P37" draw:layer="layout" svg:width="0.865cm" svg:height="0.569cm" svg:x="5.556cm" svg:y="12.831cm">
            <draw:text-box>
              <text:p><text:span text:style-name="T10">we</text:span></text:p>
            </draw:text-box>
          </draw:frame>
        </draw:g>
        <draw:g draw:style-name="gr1">
          <draw:custom-shape draw:style-name="gr1050" draw:text-style-name="P36" draw:layer="layout" svg:width="1.5cm" svg:height="2cm" svg:x="21.5cm" svg:y="10.7cm">
            <text:p text:style-name="P35"><text:span text:style-name="T10">alu</text:span></text:p>
            <draw:enhanced-geometry svg:viewBox="0 0 21600 21600" draw:type="rectangle" draw:enhanced-path="M 0 0 L 21600 0 21600 21600 0 21600 0 0 Z N"/>
          </draw:custom-shape>
          <draw:frame draw:style-name="gr704" draw:text-style-name="P37" draw:layer="layout" svg:width="1.37cm" svg:height="0.569cm" svg:x="21.282cm" svg:y="10.6cm">
            <draw:text-box>
              <text:p><text:span text:style-name="T10">data01</text:span></text:p>
            </draw:text-box>
          </draw:frame>
          <draw:frame draw:style-name="gr704" draw:text-style-name="P37" draw:layer="layout" svg:width="1.37cm" svg:height="0.569cm" svg:x="21.282cm" svg:y="10.869cm">
            <draw:text-box>
              <text:p><text:span text:style-name="T10">data02</text:span></text:p>
            </draw:text-box>
          </draw:frame>
          <draw:frame draw:style-name="gr1051" draw:text-style-name="P37" draw:layer="layout" svg:width="1.29cm" svg:height="0.569cm" svg:x="21.859cm" svg:y="12.3cm">
            <draw:text-box>
              <text:p><text:span text:style-name="T10">aluSel</text:span></text:p>
            </draw:text-box>
          </draw:frame>
          <draw:frame draw:style-name="gr1052" draw:text-style-name="P37" draw:layer="layout" svg:width="1.054cm" svg:height="0.569cm" svg:x="22.148cm" svg:y="11.4cm">
            <draw:text-box>
              <text:p><text:span text:style-name="T10">zero</text:span></text:p>
            </draw:text-box>
          </draw:frame>
          <draw:frame draw:style-name="gr1053" draw:text-style-name="P37" draw:layer="layout" svg:width="1.684cm" svg:height="0.569cm" svg:x="21.517cm" svg:y="11.7cm">
            <draw:text-box>
              <text:p><text:span text:style-name="T10">aluResult</text:span></text:p>
            </draw:text-box>
          </draw:frame>
        </draw:g>
        <draw:line draw:style-name="gr38" draw:text-style-name="P4" draw:layer="layout" svg:x1="10.5cm" svg:y1="11cm" svg:x2="16.4cm" svg:y2="11cm">
          <text:p/>
        </draw:line>
        <draw:line draw:style-name="gr38" draw:text-style-name="P4" draw:layer="layout" svg:x1="16.4cm" svg:y1="11cm" svg:x2="16.4cm" svg:y2="10.6cm">
          <text:p/>
        </draw:line>
        <draw:polygon draw:style-name="gr58" draw:text-style-name="P1" draw:layer="layout" svg:width="0.499cm" svg:height="0.999cm" svg:x="17cm" svg:y="10.4cm" svg:viewBox="0 0 500 1000" draw:points="0,0 0,1000 500,850 500,150">
          <text:p/>
        </draw:polygon>
        <draw:polygon draw:style-name="gr58" draw:text-style-name="P1" draw:layer="layout" svg:width="0.499cm" svg:height="0.999cm" svg:x="16.6cm" svg:y="12.5cm" svg:viewBox="0 0 500 1000" draw:points="0,0 0,1000 500,850 500,150">
          <text:p/>
        </draw:polygon>
        <draw:line draw:style-name="gr1006" draw:text-style-name="P4" draw:layer="layout" svg:x1="21cm" svg:y1="11.2cm" svg:x2="21.5cm" svg:y2="11.2cm">
          <text:p/>
        </draw:line>
        <draw:line draw:style-name="gr1009" draw:text-style-name="P4" draw:layer="layout" svg:x1="17.1cm" svg:y1="13cm" svg:x2="21cm" svg:y2="13cm">
          <text:p/>
        </draw:line>
        <draw:line draw:style-name="gr38" draw:text-style-name="P4" draw:layer="layout" svg:x1="21cm" svg:y1="13cm" svg:x2="21cm" svg:y2="11.2cm">
          <text:p/>
        </draw:line>
        <draw:line draw:style-name="gr1009" draw:text-style-name="P4" draw:layer="layout" svg:x1="16.4cm" svg:y1="10.6cm" svg:x2="17cm" svg:y2="10.6cm">
          <text:p/>
        </draw:line>
        <draw:line draw:style-name="gr1009" draw:text-style-name="P4" draw:layer="layout" svg:x1="15.2cm" svg:y1="11.2cm" svg:x2="17cm" svg:y2="11.2cm">
          <text:p/>
        </draw:line>
        <draw:g draw:style-name="gr1">
          <draw:custom-shape draw:style-name="gr1054" draw:text-style-name="P36" draw:layer="layout" svg:width="2.607cm" svg:height="1cm" svg:x="6.424cm" svg:y="14.6cm">
            <text:p text:style-name="P35"><text:span text:style-name="T10">extend</text:span></text:p>
            <draw:enhanced-geometry svg:viewBox="0 0 21600 21600" draw:type="rectangle" draw:enhanced-path="M 0 0 L 21600 0 21600 21600 0 21600 0 0 Z N"/>
          </draw:custom-shape>
          <draw:frame draw:style-name="gr1055" draw:text-style-name="P37" draw:layer="layout" svg:width="1.779cm" svg:height="0.569cm" svg:x="6.213cm" svg:y="14.7cm">
            <draw:text-box>
              <text:p><text:span text:style-name="T10">instr(31:0)</text:span></text:p>
            </draw:text-box>
          </draw:frame>
          <draw:frame draw:style-name="gr1056" draw:text-style-name="P37" draw:layer="layout" svg:width="1.448cm" svg:height="0.569cm" svg:x="7.614cm" svg:y="15.2cm">
            <draw:text-box>
              <text:p><text:span text:style-name="T10">sel(2:0)</text:span></text:p>
            </draw:text-box>
          </draw:frame>
          <draw:frame draw:style-name="gr1057" draw:text-style-name="P37" draw:layer="layout" svg:width="1.778cm" svg:height="0.569cm" svg:x="7.524cm" svg:y="14.667cm">
            <draw:text-box>
              <text:p><text:span text:style-name="T10">imm(63:0)</text:span></text:p>
            </draw:text-box>
          </draw:frame>
        </draw:g>
        <draw:line draw:style-name="gr1007" draw:text-style-name="P4" draw:layer="layout" svg:x1="8.3cm" svg:y1="24.932cm" svg:x2="8.3cm" svg:y2="15.6cm">
          <text:p/>
        </draw:line>
        <draw:custom-shape draw:style-name="gr688" draw:text-style-name="P59" draw:layer="layout" svg:width="1cm" svg:height="1cm" svg:x="22cm" svg:y="6.7cm">
          <text:p text:style-name="P35"><text:span text:style-name="T10">+</text:span></text:p>
          <draw:enhanced-geometry svg:viewBox="0 0 21600 21600" draw:type="rectangle" draw:enhanced-path="M 0 0 L 21600 0 21600 21600 0 21600 0 0 Z N"/>
        </draw:custom-shape>
        <draw:line draw:style-name="gr136" draw:text-style-name="P4" draw:layer="layout" svg:x1="21cm" svg:y1="6.9cm" svg:x2="22cm" svg:y2="6.9cm">
          <text:p/>
        </draw:line>
        <draw:polygon draw:style-name="gr58" draw:text-style-name="P1" draw:layer="layout" svg:width="0.499cm" svg:height="0.999cm" svg:x="16cm" svg:y="5.3cm" svg:viewBox="0 0 500 1000" draw:points="0,0 0,1000 500,850 500,150">
          <text:p/>
        </draw:polygon>
        <draw:line draw:style-name="gr1014" draw:text-style-name="P4" draw:layer="layout" svg:x1="22.975cm" svg:y1="7.201cm" svg:x2="24cm" svg:y2="7.2cm">
          <text:p/>
        </draw:line>
        <draw:line draw:style-name="gr1016" draw:text-style-name="P4" draw:layer="layout" svg:x1="24cm" svg:y1="7.2cm" svg:x2="24cm" svg:y2="6.5cm">
          <text:p/>
        </draw:line>
        <draw:line draw:style-name="gr1008" draw:text-style-name="P4" draw:layer="layout" svg:x1="15.5cm" svg:y1="6.1cm" svg:x2="16cm" svg:y2="6.1cm">
          <text:p/>
        </draw:line>
        <draw:line draw:style-name="gr38" draw:text-style-name="P4" draw:layer="layout" svg:x1="16.5cm" svg:y1="5.8cm" svg:x2="21cm" svg:y2="5.8cm">
          <text:p/>
        </draw:line>
        <draw:line draw:style-name="gr38" draw:text-style-name="P4" draw:layer="layout" svg:x1="21cm" svg:y1="5.8cm" svg:x2="21cm" svg:y2="6.9cm">
          <text:p/>
        </draw:line>
        <draw:custom-shape draw:style-name="gr461" draw:text-style-name="P5" draw:layer="layout" svg:width="0.2cm" svg:height="0.2cm" svg:x="15.401cm" svg:y="10.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9" draw:text-style-name="P4" draw:layer="layout" svg:x1="15.5cm" svg:y1="6.1cm" svg:x2="15.5cm" svg:y2="11cm">
          <text:p/>
        </draw:line>
        <draw:line draw:style-name="gr1033" draw:text-style-name="P4" draw:layer="layout" svg:x1="15.2cm" svg:y1="5.475cm" svg:x2="15.2cm" svg:y2="11.2cm">
          <text:p/>
        </draw:line>
        <draw:polygon draw:style-name="gr58" draw:text-style-name="P1" draw:layer="layout" svg:width="0.499cm" svg:height="0.999cm" svg:x="38.8cm" svg:y="11.5cm" svg:viewBox="0 0 500 1000" draw:points="0,0 0,1000 500,850 500,150">
          <text:p/>
        </draw:polygon>
        <draw:line draw:style-name="gr1008" draw:text-style-name="P4" draw:layer="layout" svg:x1="1cm" svg:y1="5cm" svg:x2="9.5cm" svg:y2="5cm">
          <text:p/>
        </draw:line>
        <draw:line draw:style-name="gr1008" draw:text-style-name="P4" draw:layer="layout" svg:x1="10.5cm" svg:y1="5cm" svg:x2="25cm" svg:y2="5cm">
          <text:p/>
        </draw:line>
        <draw:line draw:style-name="gr1008" draw:text-style-name="P4" draw:layer="layout" svg:x1="26cm" svg:y1="5cm" svg:x2="36.003cm" svg:y2="5cm">
          <text:p/>
        </draw:line>
        <draw:line draw:style-name="gr1014" draw:text-style-name="P4" draw:layer="layout" svg:x1="37cm" svg:y1="5cm" svg:x2="38.5cm" svg:y2="5cm">
          <text:p/>
        </draw:line>
        <draw:line draw:style-name="gr1014" draw:text-style-name="P4" draw:layer="layout" svg:x1="38.5cm" svg:y1="11.7cm" svg:x2="38.5cm" svg:y2="5cm">
          <text:p/>
        </draw:line>
        <draw:line draw:style-name="gr1014" draw:text-style-name="P4" draw:layer="layout" svg:x1="38.5cm" svg:y1="11.7cm" svg:x2="38.8cm" svg:y2="11.7cm">
          <text:p/>
        </draw:line>
        <draw:line draw:style-name="gr38" draw:text-style-name="P4" draw:layer="layout" svg:x1="38.4cm" svg:y1="12.3cm" svg:x2="38.8cm" svg:y2="12.3cm">
          <text:p/>
        </draw:line>
        <draw:line draw:style-name="gr38" draw:text-style-name="P4" draw:layer="layout" svg:x1="39.3cm" svg:y1="12cm" svg:x2="39.5cm" svg:y2="12cm">
          <text:p/>
        </draw:line>
        <draw:line draw:style-name="gr1007" draw:text-style-name="P4" draw:layer="layout" svg:x1="17.4cm" svg:y1="24.1cm" svg:x2="17.4cm" svg:y2="11.301cm">
          <text:p/>
        </draw:line>
        <draw:line draw:style-name="gr1007" draw:text-style-name="P4" draw:layer="layout" svg:x1="17cm" svg:y1="23.8cm" svg:x2="17cm" svg:y2="13.402cm">
          <text:p/>
        </draw:line>
        <draw:g draw:style-name="gr1">
          <draw:custom-shape draw:style-name="gr805" draw:text-style-name="P36" draw:layer="layout" svg:width="2cm" svg:height="2cm" svg:x="31cm" svg:y="10.8cm">
            <text:p text:style-name="P35"><text:span text:style-name="T10">DMem</text:span></text:p>
            <draw:enhanced-geometry svg:viewBox="0 0 21600 21600" draw:type="rectangle" draw:enhanced-path="M 0 0 L 21600 0 21600 21600 0 21600 0 0 Z N"/>
          </draw:custom-shape>
          <draw:frame draw:style-name="gr1045" draw:text-style-name="P37" draw:layer="layout" svg:width="1.148cm" svg:height="0.569cm" svg:x="31.555cm" svg:y="10.7cm">
            <draw:text-box>
              <text:p><text:span text:style-name="T10">wrEn</text:span></text:p>
            </draw:text-box>
          </draw:frame>
          <draw:g draw:style-name="gr66">
            <draw:line draw:style-name="gr60" draw:text-style-name="P11" draw:layer="layout" svg:x1="31cm" svg:y1="12.7cm" svg:x2="31.29cm" svg:y2="12.6cm">
              <text:p/>
            </draw:line>
            <draw:line draw:style-name="gr60" draw:text-style-name="P11" draw:layer="layout" svg:x1="31cm" svg:y1="12.5cm" svg:x2="31.29cm" svg:y2="12.6cm">
              <text:p/>
            </draw:line>
          </draw:g>
          <draw:frame draw:style-name="gr1062" draw:text-style-name="P37" draw:layer="layout" svg:width="1.101cm" svg:height="0.569cm" svg:x="31.9cm" svg:y="12.331cm">
            <draw:text-box>
              <text:p><text:span text:style-name="T10">rdEn</text:span></text:p>
            </draw:text-box>
          </draw:frame>
          <draw:frame draw:style-name="gr1063" draw:text-style-name="P37" draw:layer="layout" svg:width="1.038cm" svg:height="0.569cm" svg:x="30.8cm" svg:y="11.7cm">
            <draw:text-box>
              <text:p><text:span text:style-name="T10">instr</text:span></text:p>
            </draw:text-box>
          </draw:frame>
          <draw:frame draw:style-name="gr1064" draw:text-style-name="P37" draw:layer="layout" svg:width="1.07cm" svg:height="0.569cm" svg:x="30.8cm" svg:y="11.1cm">
            <draw:text-box>
              <text:p><text:span text:style-name="T10">addr</text:span></text:p>
            </draw:text-box>
          </draw:frame>
          <draw:frame draw:style-name="gr1065" draw:text-style-name="P37" draw:layer="layout" svg:width="1.117cm" svg:height="0.569cm" svg:x="30.8cm" svg:y="11.4cm">
            <draw:text-box>
              <text:p><text:span text:style-name="T10">datai</text:span></text:p>
            </draw:text-box>
          </draw:frame>
          <draw:frame draw:style-name="gr1066" draw:text-style-name="P37" draw:layer="layout" svg:width="1.212cm" svg:height="0.569cm" svg:x="31.991cm" svg:y="11.7cm">
            <draw:text-box>
              <text:p><text:span text:style-name="T10">datao</text:span></text:p>
            </draw:text-box>
          </draw:frame>
        </draw:g>
        <draw:line draw:style-name="gr1006" draw:text-style-name="P4" draw:layer="layout" svg:x1="29.2cm" svg:y1="11.7cm" svg:x2="31cm" svg:y2="11.7cm">
          <text:p/>
        </draw:line>
        <draw:line draw:style-name="gr1006" draw:text-style-name="P4" draw:layer="layout" svg:x1="29.5cm" svg:y1="12cm" svg:x2="31cm" svg:y2="12cm">
          <text:p/>
        </draw:line>
        <draw:line draw:style-name="gr38" draw:text-style-name="P4" draw:layer="layout" svg:x1="26cm" svg:y1="14cm" svg:x2="29.2cm" svg:y2="14cm">
          <text:p/>
        </draw:line>
        <draw:line draw:style-name="gr38" draw:text-style-name="P4" draw:layer="layout" svg:x1="29.2cm" svg:y1="14cm" svg:x2="29.2cm" svg:y2="11.7cm">
          <text:p/>
        </draw:line>
        <draw:custom-shape draw:style-name="gr461" draw:text-style-name="P5" draw:layer="layout" svg:width="0.2cm" svg:height="0.2cm" svg:x="1.403cm" svg:y="16.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67" draw:text-style-name="P40" draw:layer="layout" svg:width="2.5cm" svg:height="0.726cm" svg:x="1.6cm" svg:y="16.402cm">
          <draw:text-box>
            <text:p><text:span text:style-name="T26">Instr.[11-7]</text:span></text:p>
          </draw:text-box>
        </draw:frame>
        <draw:line draw:style-name="gr38" draw:text-style-name="P4" draw:layer="layout" svg:x1="29.5cm" svg:y1="16.9cm" svg:x2="29.5cm" svg:y2="12cm">
          <text:p/>
        </draw:line>
        <draw:g draw:style-name="gr1">
          <draw:custom-shape draw:style-name="gr1069" draw:text-style-name="P36" draw:layer="layout" svg:width="4cm" svg:height="3.527cm" svg:x="2.5cm" svg:y="22.473cm">
            <text:p text:style-name="P35"><text:span text:style-name="T10">controllAll</text:span></text:p>
            <draw:enhanced-geometry svg:viewBox="0 0 21600 21600" draw:type="rectangle" draw:enhanced-path="M 0 0 L 21600 0 21600 21600 0 21600 0 0 Z N"/>
          </draw:custom-shape>
          <draw:frame draw:style-name="gr1070" draw:text-style-name="P37" draw:layer="layout" svg:width="2.016cm" svg:height="0.569cm" svg:x="2.3cm" svg:y="22.46cm">
            <draw:text-box>
              <text:p><text:span text:style-name="T10">opcode(6:0)</text:span></text:p>
            </draw:text-box>
          </draw:frame>
          <draw:frame draw:style-name="gr1071" draw:text-style-name="P37" draw:layer="layout" svg:width="1.779cm" svg:height="0.569cm" svg:x="2.324cm" svg:y="22.716cm">
            <draw:text-box>
              <text:p><text:span text:style-name="T10">func3(2:0)</text:span></text:p>
            </draw:text-box>
          </draw:frame>
          <draw:frame draw:style-name="gr1072" draw:text-style-name="P37" draw:layer="layout" svg:width="1.511cm" svg:height="0.569cm" svg:x="2.3cm" svg:y="22.973cm">
            <draw:text-box>
              <text:p><text:span text:style-name="T10">func7b5</text:span></text:p>
            </draw:text-box>
          </draw:frame>
          <draw:frame draw:style-name="gr711" draw:text-style-name="P37" draw:layer="layout" svg:width="1.054cm" svg:height="0.569cm" svg:x="2.372cm" svg:y="23.229cm">
            <draw:text-box>
              <text:p><text:span text:style-name="T10">zero</text:span></text:p>
            </draw:text-box>
          </draw:frame>
          <draw:frame draw:style-name="gr619" draw:text-style-name="P37" draw:layer="layout" svg:width="2.204cm" svg:height="0.569cm" svg:x="4.535cm" svg:y="22.373cm">
            <draw:text-box>
              <text:p><text:span text:style-name="T10">resultSrc(1:0)</text:span></text:p>
            </draw:text-box>
          </draw:frame>
          <draw:frame draw:style-name="gr1073" draw:text-style-name="P37" draw:layer="layout" svg:width="1.647cm" svg:height="0.569cm" svg:x="5.1cm" svg:y="22.657cm">
            <draw:text-box>
              <text:p><text:span text:style-name="T10">dMemWr</text:span></text:p>
            </draw:text-box>
          </draw:frame>
          <draw:frame draw:style-name="gr1074" draw:text-style-name="P37" draw:layer="layout" svg:width="1.653cm" svg:height="0.569cm" svg:x="5.1cm" svg:y="22.941cm">
            <draw:text-box>
              <text:p><text:span text:style-name="T10">dMemRd</text:span></text:p>
            </draw:text-box>
          </draw:frame>
          <draw:frame draw:style-name="gr1075" draw:text-style-name="P37" draw:layer="layout" svg:width="1.321cm" svg:height="0.569cm" svg:x="5.387cm" svg:y="23.226cm">
            <draw:text-box>
              <text:p><text:span text:style-name="T10">PCSrc</text:span></text:p>
            </draw:text-box>
          </draw:frame>
          <draw:frame draw:style-name="gr1076" draw:text-style-name="P37" draw:layer="layout" svg:width="1.495cm" svg:height="0.569cm" svg:x="5.224cm" svg:y="23.51cm">
            <draw:text-box>
              <text:p><text:span text:style-name="T10">aluSrcB</text:span></text:p>
            </draw:text-box>
          </draw:frame>
          <draw:frame draw:style-name="gr1076" draw:text-style-name="P37" draw:layer="layout" svg:width="1.495cm" svg:height="0.569cm" svg:x="5.224cm" svg:y="23.794cm">
            <draw:text-box>
              <text:p><text:span text:style-name="T10">aluSrcA</text:span></text:p>
            </draw:text-box>
          </draw:frame>
          <draw:frame draw:style-name="gr1077" draw:text-style-name="P37" draw:layer="layout" svg:width="1.269cm" svg:height="0.569cm" svg:x="5.463cm" svg:y="24.078cm">
            <draw:text-box>
              <text:p><text:span text:style-name="T10">regWr</text:span></text:p>
            </draw:text-box>
          </draw:frame>
          <draw:frame draw:style-name="gr717" draw:text-style-name="P37" draw:layer="layout" svg:width="1.117cm" svg:height="0.569cm" svg:x="5.591cm" svg:y="24.363cm">
            <draw:text-box>
              <text:p><text:span text:style-name="T10">jump</text:span></text:p>
            </draw:text-box>
          </draw:frame>
          <draw:frame draw:style-name="gr1078" draw:text-style-name="P37" draw:layer="layout" svg:width="2.046cm" svg:height="0.569cm" svg:x="4.707cm" svg:y="24.647cm">
            <draw:text-box>
              <text:p><text:span text:style-name="T10">immSrc(2:0)</text:span></text:p>
            </draw:text-box>
          </draw:frame>
          <draw:frame draw:style-name="gr706" draw:text-style-name="P37" draw:layer="layout" svg:width="1.874cm" svg:height="0.569cm" svg:x="4.857cm" svg:y="24.931cm">
            <draw:text-box>
              <text:p><text:span text:style-name="T10">aluSel(4:0)</text:span></text:p>
            </draw:text-box>
          </draw:frame>
          <draw:frame draw:style-name="gr1079" draw:text-style-name="P37" draw:layer="layout" svg:width="1.669cm" svg:height="0.569cm" svg:x="5.057cm" svg:y="25.232cm">
            <draw:text-box>
              <text:p><text:span text:style-name="T10">branch_s</text:span></text:p>
            </draw:text-box>
          </draw:frame>
          <draw:frame draw:style-name="gr1080" draw:text-style-name="P37" draw:layer="layout" svg:width="1.416cm" svg:height="0.569cm" svg:x="5.257cm" svg:y="25.533cm">
            <draw:text-box>
              <text:p><text:span text:style-name="T10">jump_s</text:span></text:p>
            </draw:text-box>
          </draw:frame>
        </draw:g>
        <draw:line draw:style-name="gr1006" draw:text-style-name="P4" draw:layer="layout" svg:x1="1.5cm" svg:y1="22.8cm" svg:x2="2.5cm" svg:y2="22.8cm">
          <text:p/>
        </draw:line>
        <draw:line draw:style-name="gr1006" draw:text-style-name="P4" draw:layer="layout" svg:x1="1.5cm" svg:y1="23.2cm" svg:x2="2.5cm" svg:y2="23.2cm">
          <text:p/>
        </draw:line>
        <draw:custom-shape draw:style-name="gr461" draw:text-style-name="P5" draw:layer="layout" svg:width="0.2cm" svg:height="0.2cm" svg:x="1.404cm" svg:y="22.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1.405cm" svg:y="2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41" draw:text-style-name="P86" draw:layer="layout" svg:x1="1.5cm" svg:y1="23.5cm" svg:x2="2.5cm" svg:y2="23.5cm">
          <text:p/>
        </draw:line>
        <draw:frame draw:style-name="gr1083" draw:text-style-name="P9" draw:layer="layout" svg:width="1.444cm" svg:height="0.725cm" svg:x="0.258cm" svg:y="23.1cm">
          <draw:text-box>
            <text:p><text:span text:style-name="T2">open</text:span></text:p>
          </draw:text-box>
        </draw:frame>
        <draw:line draw:style-name="gr1036" draw:text-style-name="P4" draw:layer="layout" svg:x1="6.5cm" svg:y1="24.932cm" svg:x2="8.3cm" svg:y2="24.932cm">
          <text:p/>
        </draw:line>
        <draw:line draw:style-name="gr1041" draw:text-style-name="P86" draw:layer="layout" svg:x1="6.5cm" svg:y1="24.4cm" svg:x2="9.5cm" svg:y2="24.4cm">
          <text:p/>
        </draw:line>
        <draw:line draw:style-name="gr1036" draw:text-style-name="P4" draw:layer="layout" svg:x1="24.6cm" svg:y1="25.9cm" svg:x2="24.6cm" svg:y2="0.403cm">
          <text:p/>
        </draw:line>
        <draw:line draw:style-name="gr1036" draw:text-style-name="P4" draw:layer="layout" svg:x1="10.5cm" svg:y1="25.6cm" svg:x2="24.4cm" svg:y2="25.6cm">
          <text:p/>
        </draw:line>
        <draw:line draw:style-name="gr1041" draw:text-style-name="P86" draw:layer="layout" svg:x1="6.5cm" svg:y1="25.3cm" svg:x2="9.5cm" svg:y2="25.3cm">
          <text:p/>
        </draw:line>
        <draw:line draw:style-name="gr1041" draw:text-style-name="P86" draw:layer="layout" svg:x1="6.5cm" svg:y1="24.7cm" svg:x2="9.5cm" svg:y2="24.7cm">
          <text:p/>
        </draw:line>
        <draw:line draw:style-name="gr1036" draw:text-style-name="P4" draw:layer="layout" svg:x1="10.5cm" svg:y1="24.7cm" svg:x2="16.3cm" svg:y2="24.7cm">
          <text:p/>
        </draw:line>
        <draw:line draw:style-name="gr1041" draw:text-style-name="P86" draw:layer="layout" svg:x1="6.5cm" svg:y1="24.1cm" svg:x2="9.5cm" svg:y2="24.1cm">
          <text:p/>
        </draw:line>
        <draw:line draw:style-name="gr1041" draw:text-style-name="P86" draw:layer="layout" svg:x1="6.5cm" svg:y1="23.8cm" svg:x2="9.5cm" svg:y2="23.8cm">
          <text:p/>
        </draw:line>
        <draw:line draw:style-name="gr1036" draw:text-style-name="P4" draw:layer="layout" svg:x1="10.5cm" svg:y1="24.1cm" svg:x2="17.4cm" svg:y2="24.1cm">
          <text:p/>
        </draw:line>
        <draw:line draw:style-name="gr1036" draw:text-style-name="P4" draw:layer="layout" svg:x1="10.5cm" svg:y1="23.8cm" svg:x2="17cm" svg:y2="23.8cm">
          <text:p/>
        </draw:line>
        <draw:line draw:style-name="gr1036" draw:text-style-name="P4" draw:layer="layout" svg:x1="6.5cm" svg:y1="23.532cm" svg:x2="6.9cm" svg:y2="23.532cm">
          <text:p/>
        </draw:line>
        <draw:line draw:style-name="gr1041" draw:text-style-name="P86" draw:layer="layout" svg:x1="6.5cm" svg:y1="23.3cm" svg:x2="9.5cm" svg:y2="23.3cm">
          <text:p/>
        </draw:line>
        <draw:line draw:style-name="gr1041" draw:text-style-name="P86" draw:layer="layout" svg:x1="6.5cm" svg:y1="23cm" svg:x2="9.5cm" svg:y2="23cm">
          <text:p/>
        </draw:line>
        <draw:line draw:style-name="gr1041" draw:text-style-name="P86" draw:layer="layout" svg:x1="6.5cm" svg:y1="22.7cm" svg:x2="9.5cm" svg:y2="22.7cm">
          <text:p/>
        </draw:line>
        <draw:line draw:style-name="gr1041" draw:text-style-name="P86" draw:layer="layout" svg:x1="10.5cm" svg:y1="23.4cm" svg:x2="25cm" svg:y2="23.3cm">
          <text:p/>
        </draw:line>
        <draw:line draw:style-name="gr1041" draw:text-style-name="P86" draw:layer="layout" svg:x1="10.5cm" svg:y1="23cm" svg:x2="25cm" svg:y2="23cm">
          <text:p/>
        </draw:line>
        <draw:line draw:style-name="gr1041" draw:text-style-name="P86" draw:layer="layout" svg:x1="10.5cm" svg:y1="22.7cm" svg:x2="25cm" svg:y2="22.7cm">
          <text:p/>
        </draw:line>
        <draw:line draw:style-name="gr1036" draw:text-style-name="P4" draw:layer="layout" svg:x1="26cm" svg:y1="23.3cm" svg:x2="32cm" svg:y2="23.3cm">
          <text:p/>
        </draw:line>
        <draw:custom-shape draw:style-name="gr1015" draw:text-style-name="P77" draw:layer="layout" svg:width="0.2cm" svg:height="0.2cm" svg:x="15.105cm" svg:y="5.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36" draw:text-style-name="P4" draw:layer="layout" svg:x1="10.5cm" svg:y1="25.9cm" svg:x2="24.6cm" svg:y2="25.9cm">
          <text:p/>
        </draw:line>
        <draw:polygon draw:style-name="gr58" draw:text-style-name="P1" draw:layer="layout" svg:width="0.499cm" svg:height="0.999cm" svg:x="12.5cm" svg:y="10.8cm" svg:viewBox="0 0 500 1000" draw:points="0,0 0,1000 500,850 500,150">
          <text:p/>
        </draw:polygon>
        <draw:polygon draw:style-name="gr58" draw:text-style-name="P1" draw:layer="layout" svg:width="0.499cm" svg:height="0.999cm" svg:x="12.5cm" svg:y="12.5cm" svg:viewBox="0 0 500 1000" draw:points="0,0 0,1000 500,850 500,150">
          <text:p/>
        </draw:polygon>
        <draw:custom-shape draw:style-name="gr1091" draw:text-style-name="P36" draw:layer="layout" svg:width="1cm" svg:height="1cm" svg:x="12.7cm" svg:y="15.1cm">
          <text:p text:style-name="P35"><text:span text:style-name="T10">FW</text:span></text:p>
          <draw:enhanced-geometry svg:viewBox="0 0 21600 21600" draw:type="rectangle" draw:enhanced-path="M 0 0 L 21600 0 21600 21600 0 21600 0 0 Z N"/>
        </draw:custom-shape>
        <draw:line draw:style-name="gr1007" draw:text-style-name="P4" draw:layer="layout" svg:x1="12.8cm" svg:y1="15.1cm" svg:x2="12.8cm" svg:y2="13.402cm">
          <text:p/>
        </draw:line>
        <draw:line draw:style-name="gr1036" draw:text-style-name="P4" draw:layer="layout" svg:x1="13.2cm" svg:y1="15.1cm" svg:x2="13.2cm" svg:y2="12cm">
          <text:p/>
        </draw:line>
        <draw:line draw:style-name="gr1007" draw:text-style-name="P4" draw:layer="layout" svg:x1="13.2cm" svg:y1="12cm" svg:x2="12.8cm" svg:y2="11.7cm">
          <text:p/>
        </draw:line>
        <draw:line draw:style-name="gr38" draw:text-style-name="P4" draw:layer="layout" svg:x1="11.4cm" svg:y1="11.3cm" svg:x2="12.5cm" svg:y2="11.3cm">
          <text:p/>
        </draw:line>
        <draw:line draw:style-name="gr38" draw:text-style-name="P4" draw:layer="layout" svg:x1="11.7cm" svg:y1="11.6cm" svg:x2="12.5cm" svg:y2="11.6cm">
          <text:p/>
        </draw:line>
        <draw:line draw:style-name="gr38" draw:text-style-name="P4" draw:layer="layout" svg:x1="11.4cm" svg:y1="13cm" svg:x2="12.5cm" svg:y2="13cm">
          <text:p/>
        </draw:line>
        <draw:line draw:style-name="gr38" draw:text-style-name="P4" draw:layer="layout" svg:x1="11.7cm" svg:y1="13.3cm" svg:x2="12.5cm" svg:y2="13.3cm">
          <text:p/>
        </draw:line>
        <draw:line draw:style-name="gr1009" draw:text-style-name="P4" draw:layer="layout" svg:x1="11.4cm" svg:y1="11.3cm" svg:x2="11.4cm" svg:y2="21.1cm">
          <text:p/>
        </draw:line>
        <draw:custom-shape draw:style-name="gr461" draw:text-style-name="P5" draw:layer="layout" svg:width="0.2cm" svg:height="0.2cm" svg:x="11.302cm" svg:y="12.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9" draw:text-style-name="P4" draw:layer="layout" svg:x1="11.7cm" svg:y1="11.6cm" svg:x2="11.7cm" svg:y2="17.5cm">
          <text:p/>
        </draw:line>
        <draw:line draw:style-name="gr1009" draw:text-style-name="P4" draw:layer="layout" svg:x1="15.5cm" svg:y1="12.7cm" svg:x2="15.5cm" svg:y2="14cm">
          <text:p/>
        </draw:line>
        <draw:frame draw:style-name="gr1137" draw:text-style-name="P89" draw:layer="layout" svg:width="1.227cm" svg:height="0.569cm" svg:x="12.418cm" svg:y="11.775cm">
          <draw:text-box>
            <text:p><text:span text:style-name="T30">forwA</text:span></text:p>
          </draw:text-box>
        </draw:frame>
        <draw:frame draw:style-name="gr1137" draw:text-style-name="P89" draw:layer="layout" svg:width="1.227cm" svg:height="0.569cm" svg:x="12.1cm" svg:y="13.875cm">
          <draw:text-box>
            <text:p><text:span text:style-name="T30">forwB</text:span></text:p>
          </draw:text-box>
        </draw:frame>
        <draw:line draw:style-name="gr38" draw:text-style-name="P4" draw:layer="layout" svg:x1="10.5cm" svg:y1="15cm" svg:x2="16cm" svg:y2="15cm">
          <text:p/>
        </draw:line>
        <draw:line draw:style-name="gr1009" draw:text-style-name="P4" draw:layer="layout" svg:x1="26.3cm" svg:y1="13cm" svg:x2="26.3cm" svg:y2="17.5cm">
          <text:p/>
        </draw:line>
        <draw:custom-shape draw:style-name="gr461" draw:text-style-name="P5" draw:layer="layout" svg:width="0.2cm" svg:height="0.2cm" svg:x="26.201cm" svg:y="12.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1.7cm" svg:y1="17.5cm" svg:x2="26.3cm" svg:y2="17.5cm">
          <text:p/>
        </draw:line>
        <draw:line draw:style-name="gr1093" draw:text-style-name="P4" draw:layer="layout" svg:x1="13cm" svg:y1="16.9cm" svg:x2="13cm" svg:y2="16.1cm">
          <text:p/>
        </draw:line>
        <draw:line draw:style-name="gr1093" draw:text-style-name="P4" draw:layer="layout" svg:x1="13.4cm" svg:y1="16.9cm" svg:x2="13.4cm" svg:y2="16.101cm">
          <text:p/>
        </draw:line>
        <draw:custom-shape draw:style-name="gr461" draw:text-style-name="P5" draw:layer="layout" svg:width="0.2cm" svg:height="0.2cm" svg:x="12.9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13.3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38" draw:text-style-name="P37" draw:layer="layout" svg:width="2.599cm" svg:height="0.569cm" svg:x="10.6cm" svg:y="16.5cm">
          <draw:text-box>
            <text:p><text:span text:style-name="T10">id_ex_reg_rs1_s</text:span></text:p>
          </draw:text-box>
        </draw:frame>
        <draw:line draw:style-name="gr1095" draw:text-style-name="P4" draw:layer="layout" svg:x1="18.1cm" svg:y1="15.4cm" svg:x2="13.7cm" svg:y2="15.4cm">
          <text:p/>
        </draw:line>
        <draw:line draw:style-name="gr1095" draw:text-style-name="P4" draw:layer="layout" svg:x1="17.801cm" svg:y1="15.8cm" svg:x2="13.7cm" svg:y2="15.8cm">
          <text:p/>
        </draw:line>
        <draw:frame draw:style-name="gr1139" draw:text-style-name="P37" draw:layer="layout" svg:width="2.867cm" svg:height="0.569cm" svg:x="13.8cm" svg:y="15.013cm">
          <draw:text-box>
            <text:p><text:span text:style-name="T10">ex_mem_reg_rd_</text:span><text:span text:style-name="T10">s</text:span></text:p>
          </draw:text-box>
        </draw:frame>
        <draw:frame draw:style-name="gr1140" draw:text-style-name="P37" draw:layer="layout" svg:width="2.93cm" svg:height="0.569cm" svg:x="13.82cm" svg:y="15.4cm">
          <draw:text-box>
            <text:p><text:span text:style-name="T10">mem_wb_reg_rd</text:span><text:span text:style-name="T10">_s</text:span></text:p>
          </draw:text-box>
        </draw:frame>
        <draw:line draw:style-name="gr38" draw:text-style-name="P4" draw:layer="layout" svg:x1="26.6cm" svg:y1="16.9cm" svg:x2="26.6cm" svg:y2="17.2cm">
          <text:p/>
        </draw:line>
        <draw:line draw:style-name="gr38" draw:text-style-name="P4" draw:layer="layout" svg:x1="26.6cm" svg:y1="17.2cm" svg:x2="18.1cm" svg:y2="17.2cm">
          <text:p/>
        </draw:line>
        <draw:line draw:style-name="gr38" draw:text-style-name="P4" draw:layer="layout" svg:x1="18.1cm" svg:y1="17.2cm" svg:x2="18.1cm" svg:y2="15.4cm">
          <text:p/>
        </draw:line>
        <draw:custom-shape draw:style-name="gr461" draw:text-style-name="P5" draw:layer="layout" svg:width="0.2cm" svg:height="0.2cm" svg:x="26.5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7.8cm" svg:y1="20.8cm" svg:x2="17.801cm" svg:y2="15.8cm">
          <text:p/>
        </draw:line>
        <draw:custom-shape draw:style-name="gr461" draw:text-style-name="P5" draw:layer="layout" svg:width="0.2cm" svg:height="0.2cm" svg:x="18cm" svg:y="2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7" draw:text-style-name="P4" draw:layer="layout" svg:x1="13.7cm" svg:y1="21.6cm" svg:x2="13.7cm" svg:y2="16.1cm">
          <text:p/>
        </draw:line>
        <draw:line draw:style-name="gr1036" draw:text-style-name="P4" draw:layer="layout" svg:x1="12.7cm" svg:y1="22cm" svg:x2="27cm" svg:y2="22cm">
          <text:p/>
        </draw:line>
        <draw:line draw:style-name="gr1007" draw:text-style-name="P4" draw:layer="layout" svg:x1="12.7cm" svg:y1="22cm" svg:x2="12.7cm" svg:y2="16.1cm">
          <text:p/>
        </draw:line>
        <draw:custom-shape draw:style-name="gr1098" draw:text-style-name="P18" draw:layer="layout" svg:width="0.2cm" svg:height="0.2cm" svg:x="26.9cm" svg:y="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36" draw:text-style-name="P4" draw:layer="layout" svg:x1="27cm" svg:y1="24.4cm" svg:x2="27cm" svg:y2="22cm">
          <text:p/>
        </draw:line>
        <draw:custom-shape draw:style-name="gr1099" draw:text-style-name="P36" draw:layer="layout" svg:width="2cm" svg:height="2cm" svg:x="1.5cm" svg:y="6cm">
          <text:p text:style-name="P35"><text:span text:style-name="T10">Hazard</text:span></text:p>
          <draw:enhanced-geometry svg:viewBox="0 0 21600 21600" draw:type="rectangle" draw:enhanced-path="M 0 0 L 21600 0 21600 21600 0 21600 0 0 Z N"/>
        </draw:custom-shape>
        <draw:line draw:style-name="gr1008" draw:text-style-name="P4" draw:layer="layout" svg:x1="1.802cm" svg:y1="11.5cm" svg:x2="1.8cm" svg:y2="8cm">
          <text:p/>
        </draw:line>
        <draw:custom-shape draw:style-name="gr1015" draw:text-style-name="P77" draw:layer="layout" svg:width="0.2cm" svg:height="0.2cm" svg:x="1.7cm" svg:y="11.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8" draw:text-style-name="P4" draw:layer="layout" svg:x1="2.2cm" svg:y1="11.8cm" svg:x2="2.2cm" svg:y2="8.001cm">
          <text:p/>
        </draw:line>
        <draw:custom-shape draw:style-name="gr1015" draw:text-style-name="P77" draw:layer="layout" svg:width="0.2cm" svg:height="0.2cm" svg:x="2.101cm" svg:y="11.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7" draw:text-style-name="P4" draw:layer="layout" svg:x1="2.5cm" svg:y1="22.3cm" svg:x2="2.5cm" svg:y2="8cm">
          <text:p/>
        </draw:line>
        <draw:custom-shape draw:style-name="gr1098" draw:text-style-name="P18" draw:layer="layout" svg:width="0.2cm" svg:height="0.2cm" svg:x="17.901cm" svg:y="2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36" draw:text-style-name="P4" draw:layer="layout" svg:x1="18cm" svg:y1="23.3cm" svg:x2="18cm" svg:y2="22.3cm">
          <text:p/>
        </draw:line>
        <draw:line draw:style-name="gr1036" draw:text-style-name="P4" draw:layer="layout" svg:x1="2.5cm" svg:y1="22.3cm" svg:x2="18cm" svg:y2="22.3cm">
          <text:p/>
        </draw:line>
        <draw:line draw:style-name="gr1014" draw:text-style-name="P4" draw:layer="layout" svg:x1="2.8cm" svg:y1="17.9cm" svg:x2="11cm" svg:y2="17.9cm">
          <text:p/>
        </draw:line>
        <draw:line draw:style-name="gr1008" draw:text-style-name="P4" draw:layer="layout" svg:x1="2.8cm" svg:y1="17.9cm" svg:x2="2.8cm" svg:y2="8.002cm">
          <text:p/>
        </draw:line>
        <draw:line draw:style-name="gr1033" draw:text-style-name="P4" draw:layer="layout" svg:x1="11cm" svg:y1="16.9cm" svg:x2="11cm" svg:y2="17.9cm">
          <text:p/>
        </draw:line>
        <draw:custom-shape draw:style-name="gr1015" draw:text-style-name="P77" draw:layer="layout" svg:width="0.2cm" svg:height="0.2cm" svg:x="10.9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6" draw:text-style-name="P4" draw:layer="layout" svg:x1="3.5cm" svg:y1="7cm" svg:x2="5.5cm" svg:y2="7cm">
          <text:p/>
        </draw:line>
        <draw:frame draw:style-name="gr1100" draw:text-style-name="P9" draw:layer="layout" svg:width="1.255cm" svg:height="0.725cm" svg:x="5.277cm" svg:y="6.9cm">
          <draw:text-box>
            <text:p><text:span text:style-name="T2">stall</text:span></text:p>
          </draw:text-box>
        </draw:frame>
        <draw:line draw:style-name="gr1006" draw:text-style-name="P4" draw:layer="layout" svg:x1="1.8cm" svg:y1="3.4cm" svg:x2="1cm" svg:y2="4.007cm">
          <text:p/>
        </draw:line>
        <draw:frame draw:style-name="gr1100" draw:text-style-name="P9" draw:layer="layout" svg:width="1.255cm" svg:height="0.725cm" svg:x="1.6cm" svg:y="3cm">
          <draw:text-box>
            <text:p><text:span text:style-name="T2">stall</text:span></text:p>
          </draw:text-box>
        </draw:frame>
        <draw:polygon draw:style-name="gr58" draw:text-style-name="P1" draw:layer="layout" svg:width="0.499cm" svg:height="3.699cm" svg:x="8.5cm" svg:y="22.6cm" svg:viewBox="0 0 500 3700" draw:points="0,0 0,3700 500,3500 500,150">
          <text:p/>
        </draw:polygon>
        <draw:frame draw:style-name="gr1101" draw:text-style-name="P78" draw:layer="layout" svg:width="0.737cm" svg:height="0.725cm" svg:x="6.965cm" svg:y="25.9cm">
          <draw:text-box>
            <text:p><text:span text:style-name="T26">0</text:span></text:p>
          </draw:text-box>
        </draw:frame>
        <draw:line draw:style-name="gr1102" draw:text-style-name="P4" draw:layer="layout" svg:x1="7.5cm" svg:y1="26.2cm" svg:x2="8.5cm" svg:y2="26.1cm">
          <text:p/>
        </draw:line>
        <draw:frame draw:style-name="gr1100" draw:text-style-name="P9" draw:layer="layout" svg:width="1.255cm" svg:height="0.725cm" svg:x="9.249cm" svg:y="26.2cm">
          <draw:text-box>
            <text:p><text:span text:style-name="T2">stall</text:span></text:p>
          </draw:text-box>
        </draw:frame>
        <draw:line draw:style-name="gr1103" draw:text-style-name="P4" draw:layer="layout" svg:x1="9.4cm" svg:y1="26.6cm" svg:x2="8.8cm" svg:y2="26.2cm">
          <text:p/>
        </draw:line>
        <draw:line draw:style-name="gr1104" draw:text-style-name="P4" draw:layer="layout" svg:x1="36.001cm" svg:y1="16cm" svg:x2="37cm" svg:y2="16cm">
          <text:p/>
        </draw:line>
        <draw:line draw:style-name="gr1104" draw:text-style-name="P4" draw:layer="layout" svg:x1="36cm" svg:y1="17.4cm" svg:x2="36.999cm" svg:y2="17.4cm">
          <text:p/>
        </draw:line>
        <draw:line draw:style-name="gr1104" draw:text-style-name="P4" draw:layer="layout" svg:x1="36.002cm" svg:y1="12cm" svg:x2="37.001cm" svg:y2="12cm">
          <text:p/>
        </draw:line>
        <draw:line draw:style-name="gr1104" draw:text-style-name="P4" draw:layer="layout" svg:x1="36.003cm" svg:y1="5cm" svg:x2="37.002cm" svg:y2="5cm">
          <text:p/>
        </draw:line>
        <draw:line draw:style-name="gr1104" draw:text-style-name="P4" draw:layer="layout" svg:x1="36.004cm" svg:y1="22.7cm" svg:x2="37.003cm" svg:y2="22.7cm">
          <text:p/>
        </draw:line>
        <draw:line draw:style-name="gr1104" draw:text-style-name="P4" draw:layer="layout" svg:x1="36.005cm" svg:y1="24.4cm" svg:x2="37.004cm" svg:y2="24.4cm">
          <text:p/>
        </draw:line>
        <draw:line draw:style-name="gr1104" draw:text-style-name="P4" draw:layer="layout" svg:x1="25.001cm" svg:y1="14cm" svg:x2="26cm" svg:y2="14cm">
          <text:p/>
        </draw:line>
        <draw:line draw:style-name="gr1104" draw:text-style-name="P4" draw:layer="layout" svg:x1="25.001cm" svg:y1="23cm" svg:x2="26cm" svg:y2="23cm">
          <text:p/>
        </draw:line>
        <draw:custom-shape draw:style-name="gr461" draw:text-style-name="P5" draw:layer="layout" svg:width="0.2cm" svg:height="0.2cm" svg:x="15.402cm" svg:y="12.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41" draw:text-style-name="P37" draw:layer="layout" svg:width="2.772cm" svg:height="0.569cm" draw:transform="rotate (-1.5707963267949) translate (38.99cm 9.099cm)">
          <draw:text-box>
            <text:p><text:span text:style-name="T10">pc_4_writeback_</text:span><text:span text:style-name="T10">s</text:span></text:p>
          </draw:text-box>
        </draw:frame>
        <draw:frame draw:style-name="gr1142" draw:text-style-name="P37" draw:layer="layout" svg:width="2.851cm" svg:height="0.569cm" draw:transform="rotate (-1.5707963267949) translate (39.991cm 9.4cm)">
          <draw:text-box>
            <text:p><text:span text:style-name="T10">result_writeback_</text:span><text:span text:style-name="T10">s</text:span></text:p>
          </draw:text-box>
        </draw:frame>
        <draw:frame draw:style-name="gr1143" draw:text-style-name="P37" draw:layer="layout" svg:width="4.08cm" svg:height="0.569cm" draw:transform="rotate (-1.5707963267949) translate (39.692cm 12.301cm)">
          <draw:text-box>
            <text:p><text:span text:style-name="T10">result_mux_src_</text:span><text:span text:style-name="T10">writeback_s</text:span></text:p>
          </draw:text-box>
        </draw:frame>
        <draw:frame draw:style-name="gr1144" draw:text-style-name="P37" draw:layer="layout" svg:width="4.065cm" svg:height="0.569cm" svg:x="34.9cm" svg:y="11.531cm">
          <draw:text-box>
            <text:p><text:span text:style-name="T10">dmem_data_rd_</text:span><text:span text:style-name="T10">writeback_s</text:span></text:p>
          </draw:text-box>
        </draw:frame>
        <draw:frame draw:style-name="gr1145" draw:text-style-name="P37" draw:layer="layout" svg:width="2.847cm" svg:height="0.569cm" draw:transform="rotate (-1.5707963267949) translate (38.892cm 12.901cm)">
          <draw:text-box>
            <text:p><text:span text:style-name="T10">alu_result_mem_</text:span><text:span text:style-name="T10">s</text:span></text:p>
          </draw:text-box>
        </draw:frame>
        <draw:frame draw:style-name="gr1127" draw:text-style-name="P37" draw:layer="layout" svg:width="3.497cm" svg:height="0.569cm" svg:x="32.8cm" svg:y="11.9cm">
          <draw:text-box>
            <text:p><text:span text:style-name="T10">dmem_data_rd_</text:span><text:span text:style-name="T10">mem_s</text:span></text:p>
          </draw:text-box>
        </draw:frame>
        <draw:frame draw:style-name="gr1130" draw:text-style-name="P37" draw:layer="layout" svg:width="3.513cm" svg:height="0.569cm" svg:x="32.4cm" svg:y="22.3cm">
          <draw:text-box>
            <text:p><text:span text:style-name="T10">result_mux_src_</text:span><text:span text:style-name="T10">mem_s</text:span></text:p>
          </draw:text-box>
        </draw:frame>
        <draw:frame draw:style-name="gr1049" draw:text-style-name="P37" draw:layer="layout" svg:width="2.205cm" svg:height="0.569cm" svg:x="33.2cm" svg:y="4.5cm">
          <draw:text-box>
            <text:p><text:span text:style-name="T10">pc_4_mem_s</text:span></text:p>
          </draw:text-box>
        </draw:frame>
        <draw:line draw:style-name="gr1006" draw:text-style-name="P4" draw:layer="layout" svg:x1="34cm" svg:y1="9cm" svg:x2="36.001cm" svg:y2="9cm">
          <text:p/>
        </draw:line>
        <draw:custom-shape draw:style-name="gr461" draw:text-style-name="P5" draw:layer="layout" svg:width="0.2cm" svg:height="0.2cm" svg:x="33.901cm" svg:y="11.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4cm" svg:y1="12cm" svg:x2="34cm" svg:y2="9cm">
          <text:p/>
        </draw:line>
        <draw:g draw:style-name="gr1">
          <draw:custom-shape draw:style-name="gr1146" draw:text-style-name="P29" draw:layer="layout" svg:width="0.5cm" svg:height="1cm" svg:x="40cm" svg:y="8.499cm">
            <text:p/>
            <draw:enhanced-geometry svg:viewBox="0 0 21600 21600" draw:type="rectangle" draw:enhanced-path="M 0 0 L 21600 0 21600 21600 0 21600 0 0 Z N"/>
          </draw:custom-shape>
          <draw:custom-shape draw:style-name="gr1146" draw:text-style-name="P29" draw:layer="layout" svg:width="0.5cm" svg:height="1cm" svg:x="40.5cm" svg:y="8.499cm">
            <text:p/>
            <draw:enhanced-geometry svg:viewBox="0 0 21600 21600" draw:type="rectangle" draw:enhanced-path="M 0 0 L 21600 0 21600 21600 0 21600 0 0 Z N"/>
          </draw:custom-shape>
        </draw:g>
        <draw:line draw:style-name="gr1006" draw:text-style-name="P4" draw:layer="layout" svg:x1="37.001cm" svg:y1="9cm" svg:x2="40.001cm" svg:y2="9cm">
          <text:p/>
        </draw:line>
        <draw:frame draw:style-name="gr1147" draw:text-style-name="P37" draw:layer="layout" svg:width="4.223cm" svg:height="0.569cm" svg:x="36.8cm" svg:y="8.531cm">
          <draw:text-box>
            <text:p><text:span text:style-name="T10">dmem_data_rd_</text:span><text:span text:style-name="T10">writeback2_s</text:span></text:p>
          </draw:text-box>
        </draw:frame>
        <draw:line draw:style-name="gr1006" draw:text-style-name="P4" draw:layer="layout" svg:x1="41cm" svg:y1="9cm" svg:x2="43.001cm" svg:y2="9cm">
          <text:p/>
        </draw:line>
        <draw:frame draw:style-name="gr1147" draw:text-style-name="P37" draw:layer="layout" svg:width="4.223cm" svg:height="0.569cm" svg:x="40.8cm" svg:y="8.501cm">
          <draw:text-box>
            <text:p><text:span text:style-name="T10">dmem_data_rd_</text:span><text:span text:style-name="T10">writeback3_s</text:span></text:p>
          </draw:text-box>
        </draw:frame>
        <draw:frame draw:style-name="gr1129" draw:text-style-name="P37" draw:layer="layout" svg:width="2.835cm" svg:height="0.569cm" draw:transform="rotate (-1.5707963267949) translate (33.891cm 8.8cm)">
          <draw:text-box>
            <text:p><text:span text:style-name="T10">dmem_wr_mem_</text:span><text:span text:style-name="T10">s</text:span></text:p>
          </draw:text-box>
        </draw:frame>
        <draw:custom-shape draw:style-name="gr461" draw:text-style-name="P5" draw:layer="layout" svg:width="0.2cm" svg:height="0.2cm" svg:x="33.301cm" svg:y="9.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41" draw:text-style-name="P86" draw:layer="layout" svg:x1="33.4cm" svg:y1="8cm" svg:x2="36cm" svg:y2="8cm">
          <text:p/>
        </draw:line>
        <draw:g draw:style-name="gr1">
          <draw:custom-shape draw:style-name="gr1146" draw:text-style-name="P29" draw:layer="layout" svg:width="0.5cm" svg:height="1cm" svg:x="40cm" svg:y="7.499cm">
            <text:p/>
            <draw:enhanced-geometry svg:viewBox="0 0 21600 21600" draw:type="rectangle" draw:enhanced-path="M 0 0 L 21600 0 21600 21600 0 21600 0 0 Z N"/>
          </draw:custom-shape>
          <draw:custom-shape draw:style-name="gr1146" draw:text-style-name="P29" draw:layer="layout" svg:width="0.5cm" svg:height="1cm" svg:x="40.5cm" svg:y="7.499cm">
            <text:p/>
            <draw:enhanced-geometry svg:viewBox="0 0 21600 21600" draw:type="rectangle" draw:enhanced-path="M 0 0 L 21600 0 21600 21600 0 21600 0 0 Z N"/>
          </draw:custom-shape>
        </draw:g>
        <draw:line draw:style-name="gr1041" draw:text-style-name="P86" draw:layer="layout" svg:x1="37cm" svg:y1="8cm" svg:x2="40cm" svg:y2="8cm">
          <text:p/>
        </draw:line>
        <draw:frame draw:style-name="gr1148" draw:text-style-name="P37" draw:layer="layout" svg:width="3.402cm" svg:height="0.569cm" svg:x="36.801cm" svg:y="7.532cm">
          <draw:text-box>
            <text:p><text:span text:style-name="T10">dmem_wr_writeb</text:span><text:span text:style-name="T10">ack_s</text:span></text:p>
          </draw:text-box>
        </draw:frame>
        <draw:g draw:style-name="gr1">
          <draw:custom-shape draw:style-name="gr1146" draw:text-style-name="P29" draw:layer="layout" svg:width="0.5cm" svg:height="1cm" svg:x="40cm" svg:y="15.999cm">
            <text:p/>
            <draw:enhanced-geometry svg:viewBox="0 0 21600 21600" draw:type="rectangle" draw:enhanced-path="M 0 0 L 21600 0 21600 21600 0 21600 0 0 Z N"/>
          </draw:custom-shape>
          <draw:custom-shape draw:style-name="gr1146" draw:text-style-name="P29" draw:layer="layout" svg:width="0.5cm" svg:height="1cm" svg:x="40.5cm" svg:y="15.999cm">
            <text:p/>
            <draw:enhanced-geometry svg:viewBox="0 0 21600 21600" draw:type="rectangle" draw:enhanced-path="M 0 0 L 21600 0 21600 21600 0 21600 0 0 Z N"/>
          </draw:custom-shape>
        </draw:g>
        <draw:line draw:style-name="gr1006" draw:text-style-name="P4" draw:layer="layout" svg:x1="37.001cm" svg:y1="16.5cm" svg:x2="40cm" svg:y2="16.5cm">
          <text:p/>
        </draw:line>
        <draw:custom-shape draw:style-name="gr461" draw:text-style-name="P5" draw:layer="layout" svg:width="0.2cm" svg:height="0.2cm" svg:x="34.902cm" svg:y="15.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5cm" svg:y1="16cm" svg:x2="35cm" svg:y2="16.5cm">
          <text:p/>
        </draw:line>
        <draw:line draw:style-name="gr1006" draw:text-style-name="P4" draw:layer="layout" svg:x1="35cm" svg:y1="16.5cm" svg:x2="36.001cm" svg:y2="16.5cm">
          <text:p/>
        </draw:line>
        <draw:frame draw:style-name="gr1149" draw:text-style-name="P37" draw:layer="layout" svg:width="3.8cm" svg:height="0.569cm" svg:x="36.8cm" svg:y="15.999cm">
          <draw:text-box>
            <text:p><text:span text:style-name="T10">alu_result_writeb</text:span><text:span text:style-name="T10">ack_s</text:span></text:p>
          </draw:text-box>
        </draw:frame>
        <draw:frame draw:style-name="gr1118" draw:text-style-name="P37" draw:layer="layout" svg:width="3.845cm" svg:height="0.569cm" svg:x="26.582cm" svg:y="9.5cm">
          <draw:text-box>
            <text:p><text:span text:style-name="T10">instr_execute_s[6</text:span><text:span text:style-name="T10">:0] == 35</text:span></text:p>
          </draw:text-box>
        </draw:frame>
        <draw:frame draw:style-name="gr1150" draw:text-style-name="P37" draw:layer="layout" svg:width="3.024cm" svg:height="0.569cm" svg:x="36.8cm" svg:y="26cm">
          <draw:text-box>
            <text:p><text:span text:style-name="T10">reg_wr_writeback</text:span><text:span text:style-name="T10">_s</text:span></text:p>
          </draw:text-box>
        </draw:frame>
        <draw:frame draw:style-name="gr1131" draw:text-style-name="P37" draw:layer="layout" svg:width="2.457cm" svg:height="0.569cm" svg:x="32.901cm" svg:y="23.901cm">
          <draw:text-box>
            <text:p><text:span text:style-name="T10">reg_wr_mem_s</text:span></text:p>
          </draw:text-box>
        </draw:frame>
        <draw:custom-shape draw:style-name="gr1151" draw:text-style-name="P85" draw:layer="layout" svg:width="1cm" svg:height="1cm" svg:x="36cm" svg:y="26cm">
          <text:p/>
          <draw:enhanced-geometry svg:viewBox="0 0 21600 21600" draw:type="rectangle" draw:enhanced-path="M 0 0 L 21600 0 21600 21600 0 21600 0 0 Z N"/>
        </draw:custom-shape>
        <draw:custom-shape draw:style-name="gr1098" draw:text-style-name="P18" draw:layer="layout" svg:width="0.2cm" svg:height="0.2cm" svg:x="33.901cm" svg:y="2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41" draw:text-style-name="P86" draw:layer="layout" svg:x1="34cm" svg:y1="26.5cm" svg:x2="36cm" svg:y2="26.5cm">
          <text:p/>
        </draw:line>
        <draw:line draw:style-name="gr1036" draw:text-style-name="P4" draw:layer="layout" svg:x1="34.001cm" svg:y1="26.5cm" svg:x2="34.001cm" svg:y2="24.4cm">
          <text:p/>
        </draw:line>
        <draw:line draw:style-name="gr1041" draw:text-style-name="P86" draw:layer="layout" svg:x1="37cm" svg:y1="26.5cm" svg:x2="39cm" svg:y2="26.5cm">
          <text:p/>
        </draw:line>
        <draw:frame draw:style-name="gr1131" draw:text-style-name="P37" draw:layer="layout" svg:width="2.457cm" svg:height="0.569cm" svg:x="36.801cm" svg:y="23.902cm">
          <draw:text-box>
            <text:p><text:span text:style-name="T10">reg_wr_mem_s</text:span></text:p>
          </draw:text-box>
        </draw:frame>
        <draw:frame draw:style-name="gr694" draw:text-style-name="P37" draw:layer="layout" svg:width="2.315cm" svg:height="0.569cm" svg:x="25.8cm" svg:y="13.5cm">
          <draw:text-box>
            <text:p><text:span text:style-name="T10">reg_b_mem_s</text:span></text:p>
          </draw:text-box>
        </draw:frame>
        <draw:frame draw:style-name="gr1152" draw:text-style-name="P37" draw:layer="layout" svg:width="3.021cm" svg:height="0.569cm" svg:x="36.801cm" svg:y="16.402cm">
          <draw:text-box>
            <text:p><text:span text:style-name="T10">instr_writeback_s</text:span></text:p>
          </draw:text-box>
        </draw:frame>
        <draw:custom-shape draw:style-name="gr461" draw:text-style-name="P5" draw:layer="layout" svg:width="0.2cm" svg:height="0.2cm" svg:x="29.401cm" svg:y="16.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26" draw:text-style-name="P37" draw:layer="layout" svg:width="2.141cm" svg:height="0.569cm" draw:transform="rotate (-1.5707963267949) translate (29.993cm 11.902cm)">
          <draw:text-box>
            <text:p><text:span text:style-name="T10">instr_mem_o</text:span></text:p>
          </draw:text-box>
        </draw:frame>
        <draw:frame draw:style-name="gr1153" draw:text-style-name="P37" draw:layer="layout" svg:width="2.125cm" svg:height="0.569cm" svg:x="32.701cm" svg:y="16.402cm">
          <draw:text-box>
            <text:p><text:span text:style-name="T10">instr_mem_s</text:span></text:p>
          </draw:text-box>
        </draw:frame>
        <draw:frame draw:style-name="gr1125" draw:text-style-name="P37" draw:layer="layout" svg:width="2.404cm" svg:height="0.569cm" svg:x="28.7cm" svg:y="11.301cm">
          <draw:text-box>
            <text:p><text:span text:style-name="T10">dBusDataWr_s</text:span></text:p>
          </draw:text-box>
        </draw:frame>
        <draw:frame draw:style-name="gr1046" draw:text-style-name="P37" draw:layer="layout" svg:width="2.41cm" svg:height="0.569cm" svg:x="32.701cm" svg:y="11.501cm">
          <draw:text-box>
            <text:p><text:span text:style-name="T10">dBusDataRd_s</text:span></text:p>
          </draw:text-box>
        </draw:frame>
        <draw:polygon draw:style-name="gr1120" draw:text-style-name="P60" draw:layer="layout" svg:width="0.499cm" svg:height="0.999cm" svg:x="28.4cm" svg:y="10.9cm" svg:viewBox="0 0 500 1000" draw:points="0,0 0,1000 500,850 500,150">
          <text:p/>
        </draw:polygon>
        <draw:frame draw:style-name="gr1123" draw:text-style-name="P37" draw:layer="layout" svg:width="2.819cm" svg:height="0.569cm" svg:x="33.2cm" svg:y="15.501cm">
          <draw:text-box>
            <text:p><text:span text:style-name="T10">alu_result_mem_</text:span><text:span text:style-name="T10">s</text:span></text:p>
          </draw:text-box>
        </draw:frame>
        <draw:frame draw:style-name="gr1119" draw:text-style-name="P37" draw:layer="layout" svg:width="1.992cm" svg:height="0.569cm" svg:x="26.582cm" svg:y="9.101cm">
          <draw:text-box>
            <text:p><text:span text:style-name="T10">instr = store</text:span></text:p>
          </draw:text-box>
        </draw:frame>
        <draw:line draw:style-name="gr1007" draw:text-style-name="P4" draw:layer="layout" svg:x1="28.7cm" svg:y1="10.2cm" svg:x2="28.7cm" svg:y2="11cm">
          <text:p/>
        </draw:line>
        <draw:frame draw:style-name="gr1123" draw:text-style-name="P37" draw:layer="layout" svg:width="2.819cm" svg:height="0.569cm" svg:x="25.8cm" svg:y="12.531cm">
          <draw:text-box>
            <text:p><text:span text:style-name="T10">alu_result_mem_</text:span><text:span text:style-name="T10">s</text:span></text:p>
          </draw:text-box>
        </draw:frame>
        <draw:frame draw:style-name="gr1122" draw:text-style-name="P37" draw:layer="layout" svg:width="3.183cm" svg:height="0.569cm" svg:x="25.4cm" svg:y="10.632cm">
          <draw:text-box>
            <text:p><text:span text:style-name="T10">alu_result_execut</text:span><text:span text:style-name="T10">e_s</text:span></text:p>
          </draw:text-box>
        </draw:frame>
        <draw:frame draw:style-name="gr1124" draw:text-style-name="P37" draw:layer="layout" svg:width="2.047cm" svg:height="0.569cm" svg:x="28.7cm" svg:y="10.9cm">
          <draw:text-box>
            <text:p><text:span text:style-name="T10">dBusAddr_s</text:span></text:p>
          </draw:text-box>
        </draw:frame>
        <draw:line draw:style-name="gr38" draw:text-style-name="P4" draw:layer="layout" svg:x1="28.9cm" svg:y1="11.4cm" svg:x2="29.3cm" svg:y2="11.4cm">
          <text:p/>
        </draw:line>
        <draw:line draw:style-name="gr38" draw:text-style-name="P4" draw:layer="layout" svg:x1="28.4cm" svg:y1="11.1cm" svg:x2="27cm" svg:y2="11.1cm">
          <text:p/>
        </draw:line>
        <draw:line draw:style-name="gr38" draw:text-style-name="P4" draw:layer="layout" svg:x1="28.4cm" svg:y1="11.7cm" svg:x2="27.5cm" svg:y2="11.7cm">
          <text:p/>
        </draw:line>
        <draw:frame draw:style-name="gr1122" draw:text-style-name="P37" draw:layer="layout" svg:width="3.183cm" svg:height="0.569cm" svg:x="22.8cm" svg:y="11.533cm">
          <draw:text-box>
            <text:p><text:span text:style-name="T10">alu_result_execut</text:span><text:span text:style-name="T10">e_s</text:span></text:p>
          </draw:text-box>
        </draw:frame>
        <draw:line draw:style-name="gr1006" draw:text-style-name="P4" draw:layer="layout" svg:x1="24cm" svg:y1="13cm" svg:x2="25cm" svg:y2="13cm">
          <text:p/>
        </draw:line>
        <draw:custom-shape draw:style-name="gr461" draw:text-style-name="P5" draw:layer="layout" svg:width="0.2cm" svg:height="0.2cm" svg:x="23.9cm" svg:y="11.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4cm" svg:y1="13cm" svg:x2="24cm" svg:y2="12cm">
          <text:p/>
        </draw:line>
        <draw:line draw:style-name="gr1104" draw:text-style-name="P4" draw:layer="layout" svg:x1="25.002cm" svg:y1="12cm" svg:x2="26.001cm" svg:y2="12cm">
          <text:p/>
        </draw:line>
        <draw:line draw:style-name="gr1009" draw:text-style-name="P4" draw:layer="layout" svg:x1="26cm" svg:y1="13cm" svg:x2="28cm" svg:y2="13cm">
          <text:p/>
        </draw:line>
        <draw:line draw:style-name="gr38" draw:text-style-name="P4" draw:layer="layout" svg:x1="27cm" svg:y1="12cm" svg:x2="27cm" svg:y2="11.1cm">
          <text:p/>
        </draw:line>
        <draw:line draw:style-name="gr38" draw:text-style-name="P4" draw:layer="layout" svg:x1="27.5cm" svg:y1="13cm" svg:x2="27.5cm" svg:y2="11.7cm">
          <text:p/>
        </draw:line>
        <draw:frame draw:style-name="gr1154" draw:text-style-name="P37" draw:layer="layout" svg:width="3.198cm" svg:height="0.569cm" svg:x="21.8cm" svg:y="22.601cm">
          <draw:text-box>
            <text:p><text:span text:style-name="T10">dmem_wr_execut</text:span><text:span text:style-name="T10">e_s</text:span></text:p>
          </draw:text-box>
        </draw:frame>
        <draw:frame draw:style-name="gr1155" draw:text-style-name="P37" draw:layer="layout" svg:width="3.194cm" svg:height="0.569cm" svg:x="25.8cm" svg:y="22.602cm">
          <draw:text-box>
            <text:p><text:span text:style-name="T10">dmem_wr_mem_</text:span><text:span text:style-name="T10">s</text:span></text:p>
          </draw:text-box>
        </draw:frame>
        <draw:frame draw:style-name="gr1156" draw:text-style-name="P37" draw:layer="layout" svg:width="2.536cm" svg:height="0.569cm" svg:x="22.4cm" svg:y="13.501cm">
          <draw:text-box>
            <text:p><text:span text:style-name="T10">data_to_store_s</text:span></text:p>
          </draw:text-box>
        </draw:frame>
        <draw:frame draw:style-name="gr1128" draw:text-style-name="P37" draw:layer="layout" svg:width="2.788cm" svg:height="0.569cm" draw:transform="rotate (-1.5707963267949) translate (32.492cm 12.601cm)">
          <draw:text-box>
            <text:p><text:span text:style-name="T10">dmem_rd_mem_</text:span><text:span text:style-name="T10">s</text:span></text:p>
          </draw:text-box>
        </draw:frame>
        <draw:frame draw:style-name="gr1155" draw:text-style-name="P37" draw:layer="layout" svg:width="3.194cm" svg:height="0.569cm" svg:x="25.8cm" svg:y="22.903cm">
          <draw:text-box>
            <text:p><text:span text:style-name="T10">dmem_rd_mem_</text:span><text:span text:style-name="T10">s</text:span></text:p>
          </draw:text-box>
        </draw:frame>
        <draw:frame draw:style-name="gr1155" draw:text-style-name="P37" draw:layer="layout" svg:width="3.194cm" svg:height="0.569cm" svg:x="21.8cm" svg:y="22.904cm">
          <draw:text-box>
            <text:p><text:span text:style-name="T10">dmem_rd_execut</text:span><text:span text:style-name="T10">e_s</text:span></text:p>
          </draw:text-box>
        </draw:frame>
        <draw:frame draw:style-name="gr753" draw:text-style-name="P37" draw:layer="layout" svg:width="3.876cm" svg:height="0.569cm" svg:x="21.2cm" svg:y="22.301cm">
          <draw:text-box>
            <text:p><text:span text:style-name="T10">result_mux_src_e</text:span><text:span text:style-name="T10">xecute_s</text:span></text:p>
          </draw:text-box>
        </draw:frame>
        <draw:frame draw:style-name="gr1157" draw:text-style-name="P37" draw:layer="layout" svg:width="2.82cm" svg:height="0.569cm" svg:x="22.201cm" svg:y="24.002cm">
          <draw:text-box>
            <text:p><text:span text:style-name="T10">reg_wr_execute_</text:span><text:span text:style-name="T10">s</text:span></text:p>
          </draw:text-box>
        </draw:frame>
        <draw:frame draw:style-name="gr1158" draw:text-style-name="P37" draw:layer="layout" svg:width="2.489cm" svg:height="0.569cm" svg:x="22.702cm" svg:y="16.403cm">
          <draw:text-box>
            <text:p><text:span text:style-name="T10">instr_execute_s</text:span></text:p>
          </draw:text-box>
        </draw:frame>
        <draw:frame draw:style-name="gr1159" draw:text-style-name="P37" draw:layer="layout" svg:width="2.568cm" svg:height="0.569cm" svg:x="21cm" svg:y="4.501cm">
          <draw:text-box>
            <text:p><text:span text:style-name="T10">pc_4_execute_s</text:span></text:p>
          </draw:text-box>
        </draw:frame>
        <draw:g draw:style-name="gr66">
          <draw:polygon draw:style-name="gr1120" draw:text-style-name="P60" draw:layer="layout" svg:width="0.499cm" svg:height="0.999cm" svg:x="20.4cm" svg:y="13.6cm" svg:viewBox="0 0 500 1000" draw:points="0,0 0,1000 500,850 500,150">
            <text:p/>
          </draw:polygon>
          <draw:line draw:style-name="gr38" draw:text-style-name="P4" draw:layer="layout" svg:x1="20.1cm" svg:y1="13.8cm" svg:x2="20.4cm" svg:y2="13.8cm">
            <text:p/>
          </draw:line>
          <draw:line draw:style-name="gr38" draw:text-style-name="P4" draw:layer="layout" svg:x1="20.1cm" svg:y1="14cm" svg:x2="20.4cm" svg:y2="14cm">
            <text:p/>
          </draw:line>
          <draw:line draw:style-name="gr38" draw:text-style-name="P4" draw:layer="layout" svg:x1="20.1cm" svg:y1="14.2cm" svg:x2="20.4cm" svg:y2="14.2cm">
            <text:p/>
          </draw:line>
          <draw:line draw:style-name="gr38" draw:text-style-name="P4" draw:layer="layout" svg:x1="20.1cm" svg:y1="14.4cm" svg:x2="20.4cm" svg:y2="14.4cm">
            <text:p/>
          </draw:line>
          <draw:line draw:style-name="gr38" draw:text-style-name="P4" draw:layer="layout" svg:x1="20.9cm" svg:y1="14.1cm" svg:x2="21.2cm" svg:y2="14.1cm">
            <text:p/>
          </draw:line>
        </draw:g>
        <draw:g draw:style-name="gr66">
          <draw:polygon draw:style-name="gr1120" draw:text-style-name="P60" draw:layer="layout" svg:width="0.499cm" svg:height="0.999cm" svg:x="21.5cm" svg:y="13.5cm" svg:viewBox="0 0 500 1000" draw:points="0,0 0,1000 500,850 500,150">
            <text:p/>
          </draw:polygon>
          <draw:line draw:style-name="gr38" draw:text-style-name="P4" draw:layer="layout" svg:x1="21.2cm" svg:y1="13.7cm" svg:x2="21.5cm" svg:y2="13.7cm">
            <text:p/>
          </draw:line>
          <draw:line draw:style-name="gr38" draw:text-style-name="P4" draw:layer="layout" svg:x1="21.2cm" svg:y1="13.9cm" svg:x2="21.5cm" svg:y2="13.9cm">
            <text:p/>
          </draw:line>
          <draw:line draw:style-name="gr38" draw:text-style-name="P4" draw:layer="layout" svg:x1="21.2cm" svg:y1="14.1cm" svg:x2="21.5cm" svg:y2="14.1cm">
            <text:p/>
          </draw:line>
          <draw:line draw:style-name="gr38" draw:text-style-name="P4" draw:layer="layout" svg:x1="21.2cm" svg:y1="14.3cm" svg:x2="21.5cm" svg:y2="14.3cm">
            <text:p/>
          </draw:line>
          <draw:line draw:style-name="gr38" draw:text-style-name="P4" draw:layer="layout" svg:x1="22cm" svg:y1="14cm" svg:x2="22.3cm" svg:y2="14cm">
            <text:p/>
          </draw:line>
        </draw:g>
        <draw:line draw:style-name="gr1007" draw:text-style-name="P4" draw:layer="layout" svg:x1="20.7cm" svg:y1="15.2cm" svg:x2="20.7cm" svg:y2="14.503cm">
          <text:p/>
        </draw:line>
        <draw:line draw:style-name="gr1007" draw:text-style-name="P4" draw:layer="layout" svg:x1="21.8cm" svg:y1="15.101cm" svg:x2="21.8cm" svg:y2="14.404cm">
          <text:p/>
        </draw:line>
        <draw:frame draw:style-name="gr1137" draw:text-style-name="P89" draw:layer="layout" svg:width="1.227cm" svg:height="0.569cm" svg:x="20cm" svg:y="14.976cm">
          <draw:text-box>
            <text:p><text:span text:style-name="T30">forwB</text:span></text:p>
          </draw:text-box>
        </draw:frame>
        <draw:frame draw:style-name="gr1160" draw:text-style-name="P89" draw:layer="layout" svg:width="1.385cm" svg:height="0.569cm" svg:x="21.2cm" svg:y="14.877cm">
          <draw:text-box>
            <text:p><text:span text:style-name="T30">forwSd</text:span></text:p>
          </draw:text-box>
        </draw:frame>
        <draw:frame draw:style-name="gr1161" draw:text-style-name="P37" draw:layer="layout" svg:width="3.308cm" svg:height="0.569cm" svg:x="12.8cm" svg:y="12.302cm">
          <draw:text-box>
            <text:p><text:span text:style-name="T10">forward_b_mux_</text:span><text:span text:style-name="T10">out_s</text:span></text:p>
          </draw:text-box>
        </draw:frame>
        <draw:frame draw:style-name="gr1161" draw:text-style-name="P37" draw:layer="layout" svg:width="3.308cm" svg:height="0.569cm" svg:x="12.8cm" svg:y="10.603cm">
          <draw:text-box>
            <text:p><text:span text:style-name="T10">forward_a_mux_</text:span><text:span text:style-name="T10">out_s</text:span></text:p>
          </draw:text-box>
        </draw:frame>
        <draw:line draw:style-name="gr1009" draw:text-style-name="P4" draw:layer="layout" svg:x1="15.5cm" svg:y1="14cm" svg:x2="19cm" svg:y2="14cm">
          <text:p/>
        </draw:line>
        <draw:frame draw:style-name="gr1162" draw:text-style-name="P37" draw:layer="layout" svg:width="0.66cm" svg:height="0.569cm" svg:x="21.24cm" svg:y="13.431cm">
          <draw:text-box>
            <text:p><text:span text:style-name="T10">0</text:span></text:p>
          </draw:text-box>
        </draw:frame>
        <draw:frame draw:style-name="gr1162" draw:text-style-name="P37" draw:layer="layout" svg:width="0.66cm" svg:height="0.569cm" svg:x="21.24cm" svg:y="13.833cm">
          <draw:text-box>
            <text:p><text:span text:style-name="T10">2</text:span></text:p>
          </draw:text-box>
        </draw:frame>
        <draw:frame draw:style-name="gr1162" draw:text-style-name="P37" draw:layer="layout" svg:width="0.66cm" svg:height="0.569cm" svg:x="21.24cm" svg:y="13.632cm">
          <draw:text-box>
            <text:p><text:span text:style-name="T10">1</text:span></text:p>
          </draw:text-box>
        </draw:frame>
        <draw:frame draw:style-name="gr1162" draw:text-style-name="P37" draw:layer="layout" svg:width="0.66cm" svg:height="0.569cm" svg:x="21.24cm" svg:y="14.034cm">
          <draw:text-box>
            <text:p><text:span text:style-name="T10">3</text:span></text:p>
          </draw:text-box>
        </draw:frame>
        <draw:frame draw:style-name="gr1162" draw:text-style-name="P37" draw:layer="layout" svg:width="0.66cm" svg:height="0.569cm" svg:x="20.14cm" svg:y="13.531cm">
          <draw:text-box>
            <text:p><text:span text:style-name="T10">0</text:span></text:p>
          </draw:text-box>
        </draw:frame>
        <draw:frame draw:style-name="gr1162" draw:text-style-name="P37" draw:layer="layout" svg:width="0.66cm" svg:height="0.569cm" svg:x="20.14cm" svg:y="13.933cm">
          <draw:text-box>
            <text:p><text:span text:style-name="T10">2</text:span></text:p>
          </draw:text-box>
        </draw:frame>
        <draw:frame draw:style-name="gr1162" draw:text-style-name="P37" draw:layer="layout" svg:width="0.66cm" svg:height="0.569cm" svg:x="20.14cm" svg:y="13.732cm">
          <draw:text-box>
            <text:p><text:span text:style-name="T10">1</text:span></text:p>
          </draw:text-box>
        </draw:frame>
        <draw:frame draw:style-name="gr1162" draw:text-style-name="P37" draw:layer="layout" svg:width="0.66cm" svg:height="0.569cm" svg:x="20.14cm" svg:y="14.134cm">
          <draw:text-box>
            <text:p><text:span text:style-name="T10">3</text:span></text:p>
          </draw:text-box>
        </draw:frame>
        <draw:line draw:style-name="gr38" draw:text-style-name="P4" draw:layer="layout" svg:x1="19cm" svg:y1="14cm" svg:x2="19cm" svg:y2="13.4cm">
          <text:p/>
        </draw:line>
        <draw:line draw:style-name="gr38" draw:text-style-name="P4" draw:layer="layout" svg:x1="19cm" svg:y1="13.4cm" svg:x2="21cm" svg:y2="13.4cm">
          <text:p/>
        </draw:line>
        <draw:line draw:style-name="gr38" draw:text-style-name="P4" draw:layer="layout" svg:x1="21cm" svg:y1="13.7cm" svg:x2="21cm" svg:y2="13.4cm">
          <text:p/>
        </draw:line>
        <draw:line draw:style-name="gr38" draw:text-style-name="P4" draw:layer="layout" svg:x1="21cm" svg:y1="13.7cm" svg:x2="21.2cm" svg:y2="13.7cm">
          <text:p/>
        </draw:line>
        <draw:line draw:style-name="gr1012" draw:text-style-name="P4" draw:layer="layout" svg:x1="41.6cm" svg:y1="21.4cm" svg:x2="21.1cm" svg:y2="21.4cm">
          <text:p/>
        </draw:line>
        <draw:line draw:style-name="gr38" draw:text-style-name="P4" draw:layer="layout" svg:x1="41.6cm" svg:y1="9cm" svg:x2="41.6cm" svg:y2="21.4cm">
          <text:p/>
        </draw:line>
        <draw:custom-shape draw:style-name="gr461" draw:text-style-name="P5" draw:layer="layout" svg:width="0.2cm" svg:height="0.2cm" svg:x="41.502cm" svg:y="8.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1.1cm" svg:y1="13.9cm" svg:x2="21.24cm" svg:y2="13.9cm">
          <text:p/>
        </draw:line>
        <draw:line draw:style-name="gr38" draw:text-style-name="P4" draw:layer="layout" svg:x1="21.1cm" svg:y1="13.9cm" svg:x2="21.1cm" svg:y2="21.4cm">
          <text:p/>
        </draw:line>
        <draw:custom-shape draw:style-name="gr461" draw:text-style-name="P5" draw:layer="layout" svg:width="0.2cm" svg:height="0.2cm" svg:x="21.1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1.2cm" svg:y1="13.7cm" svg:x2="21.2cm" svg:y2="14.3cm">
          <text:p/>
        </draw:line>
        <draw:line draw:style-name="gr1012" draw:text-style-name="P4" draw:layer="layout" svg:x1="39.6cm" svg:y1="21.1cm" svg:x2="11.4cm" svg:y2="21.1cm">
          <text:p/>
        </draw:line>
        <draw:line draw:style-name="gr38" draw:text-style-name="P4" draw:layer="layout" svg:x1="39.6cm" svg:y1="16.5cm" svg:x2="39.6cm" svg:y2="21.1cm">
          <text:p/>
        </draw:line>
        <draw:custom-shape draw:style-name="gr461" draw:text-style-name="P5" draw:layer="layout" svg:width="0.2cm" svg:height="0.2cm" svg:x="39.502cm" svg:y="1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9.8cm" svg:y1="14cm" svg:x2="19.8cm" svg:y2="21.1cm">
          <text:p/>
        </draw:line>
        <draw:line draw:style-name="gr38" draw:text-style-name="P4" draw:layer="layout" svg:x1="19.8cm" svg:y1="14cm" svg:x2="20.1cm" svg:y2="14cm">
          <text:p/>
        </draw:line>
        <draw:line draw:style-name="gr38" draw:text-style-name="P4" draw:layer="layout" svg:x1="19.5cm" svg:y1="3cm" svg:x2="19.5cm" svg:y2="14.2cm">
          <text:p/>
        </draw:line>
        <draw:line draw:style-name="gr38" draw:text-style-name="P4" draw:layer="layout" svg:x1="19.5cm" svg:y1="14.2cm" svg:x2="20.1cm" svg:y2="14.2cm">
          <text:p/>
        </draw:line>
        <draw:custom-shape draw:style-name="gr461" draw:text-style-name="P5" draw:layer="layout" svg:width="0.2cm" svg:height="0.2cm" svg:x="19.404cm" svg:y="2.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9.3cm" svg:y1="13.8cm" svg:x2="19.3cm" svg:y2="20.5cm">
          <text:p/>
        </draw:line>
        <draw:line draw:style-name="gr38" draw:text-style-name="P4" draw:layer="layout" svg:x1="19.3cm" svg:y1="13.8cm" svg:x2="20.1cm" svg:y2="13.8cm">
          <text:p/>
        </draw:line>
        <draw:line draw:style-name="gr38" draw:text-style-name="P4" draw:layer="layout" svg:x1="19.3cm" svg:y1="14.4cm" svg:x2="20.1cm" svg:y2="14.4cm">
          <text:p/>
        </draw:line>
        <draw:custom-shape draw:style-name="gr461" draw:text-style-name="P5" draw:layer="layout" svg:width="0.2cm" svg:height="0.2cm" svg:x="19.202cm" svg:y="14.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12" draw:text-style-name="P4" draw:layer="layout" svg:x1="37.5cm" svg:y1="20.5cm" svg:x2="19.3cm" svg:y2="20.5cm">
          <text:p/>
        </draw:line>
        <draw:line draw:style-name="gr38" draw:text-style-name="P4" draw:layer="layout" svg:x1="37.5cm" svg:y1="9cm" svg:x2="37.5cm" svg:y2="20.5cm">
          <text:p/>
        </draw:line>
        <draw:custom-shape draw:style-name="gr461" draw:text-style-name="P5" draw:layer="layout" svg:width="0.2cm" svg:height="0.2cm" svg:x="37.403cm" svg:y="8.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1" draw:text-style-name="P36" draw:layer="layout" svg:width="1cm" svg:height="1cm" svg:x="21.3cm" svg:y="15.4cm">
          <text:p text:style-name="P35"><text:span text:style-name="T10">FW</text:span></text:p>
          <draw:enhanced-geometry svg:viewBox="0 0 21600 21600" draw:type="rectangle" draw:enhanced-path="M 0 0 L 21600 0 21600 21600 0 21600 0 0 Z N"/>
        </draw:custom-shape>
        <draw:frame draw:style-name="gr1140" draw:text-style-name="P37" draw:layer="layout" svg:width="2.93cm" svg:height="0.569cm" svg:x="22.1cm" svg:y="15.7cm">
          <draw:text-box>
            <text:p><text:span text:style-name="T10">mem_wb_reg_rd</text:span><text:span text:style-name="T10">_s</text:span></text:p>
          </draw:text-box>
        </draw:frame>
        <draw:frame draw:style-name="gr1163" draw:text-style-name="P37" draw:layer="layout" svg:width="3.009cm" svg:height="0.569cm" svg:x="19.1cm" svg:y="16.8cm">
          <draw:text-box>
            <text:p><text:span text:style-name="T10">ex_mem_reg_rs2</text:span><text:span text:style-name="T10">_s</text:span></text:p>
          </draw:text-box>
        </draw:frame>
        <draw:frame draw:style-name="gr1138" draw:text-style-name="P37" draw:layer="layout" svg:width="2.599cm" svg:height="0.569cm" svg:x="19.2cm" svg:y="16.2cm">
          <draw:text-box>
            <text:p><text:span text:style-name="T10">id_ex_reg_rs2_s</text:span></text:p>
          </draw:text-box>
        </draw:frame>
        <draw:frame draw:style-name="gr1164" draw:text-style-name="P37" draw:layer="layout" svg:width="2.928cm" svg:height="0.569cm" svg:x="22.1cm" svg:y="15.3cm">
          <draw:text-box>
            <text:p><text:span text:style-name="T10">dmem_wr_mem_</text:span><text:span text:style-name="T10">s</text:span></text:p>
          </draw:text-box>
        </draw:frame>
        <draw:line draw:style-name="gr1093" draw:text-style-name="P4" draw:layer="layout" svg:x1="21.6cm" svg:y1="16.9cm" svg:x2="21.6cm" svg:y2="16.401cm">
          <text:p/>
        </draw:line>
        <draw:line draw:style-name="gr1093" draw:text-style-name="P4" draw:layer="layout" svg:x1="22cm" svg:y1="17.2cm" svg:x2="22cm" svg:y2="16.402cm">
          <text:p/>
        </draw:line>
        <draw:custom-shape draw:style-name="gr461" draw:text-style-name="P5" draw:layer="layout" svg:width="0.2cm" svg:height="0.2cm" svg:x="21.5cm" svg:y="16.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21.9cm" svg:y="17.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65" draw:text-style-name="P4" draw:layer="layout" svg:x1="23.3cm" svg:y1="15.703cm" svg:x2="22.301cm" svg:y2="15.7cm">
          <text:p/>
        </draw:line>
        <draw:line draw:style-name="gr1095" draw:text-style-name="P4" draw:layer="layout" svg:x1="23cm" svg:y1="16.1cm" svg:x2="22.302cm" svg:y2="16.1cm">
          <text:p/>
        </draw:line>
        <draw:custom-shape draw:style-name="gr461" draw:text-style-name="P5" draw:layer="layout" svg:width="0.2cm" svg:height="0.2cm" svg:x="22.9cm" svg:y="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3cm" svg:y1="16.1cm" svg:x2="23cm" svg:y2="20.8cm">
          <text:p/>
        </draw:line>
        <draw:custom-shape draw:style-name="gr1098" draw:text-style-name="P18" draw:layer="layout" svg:width="0.2cm" svg:height="0.2cm" svg:x="28.5cm" svg:y="22.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36" draw:text-style-name="P4" draw:layer="layout" svg:x1="28.6cm" svg:y1="23cm" svg:x2="28.6cm" svg:y2="20.2cm">
          <text:p/>
        </draw:line>
        <draw:line draw:style-name="gr1036" draw:text-style-name="P4" draw:layer="layout" svg:x1="23.3cm" svg:y1="20.2cm" svg:x2="28.6cm" svg:y2="20.2cm">
          <text:p/>
        </draw:line>
        <draw:line draw:style-name="gr1036" draw:text-style-name="P4" draw:layer="layout" svg:x1="23.3cm" svg:y1="20.2cm" svg:x2="23.3cm" svg:y2="15.703cm">
          <text:p/>
        </draw:line>
        <draw:frame draw:style-name="gr722" draw:text-style-name="P37" draw:layer="layout" svg:width="3.008cm" svg:height="0.569cm" svg:x="13.481cm" svg:y="21.148cm">
          <draw:text-box>
            <text:p><text:span text:style-name="T10">mem_wb_reg_wr</text:span><text:span text:style-name="T10">_s</text:span></text:p>
          </draw:text-box>
        </draw:frame>
        <draw:frame draw:style-name="gr722" draw:text-style-name="P37" draw:layer="layout" svg:width="3.008cm" svg:height="0.569cm" svg:x="12.481cm" svg:y="21.548cm">
          <draw:text-box>
            <text:p><text:span text:style-name="T10">ex_mem_reg_wr</text:span><text:span text:style-name="T10">_s</text:span></text:p>
          </draw:text-box>
        </draw:frame>
        <draw:line draw:style-name="gr1036" draw:text-style-name="P4" draw:layer="layout" svg:x1="13.7cm" svg:y1="21.6cm" svg:x2="37.8cm" svg:y2="21.6cm">
          <text:p/>
        </draw:line>
        <draw:line draw:style-name="gr1036" draw:text-style-name="P4" draw:layer="layout" svg:x1="37.8cm" svg:y1="26.5cm" svg:x2="37.8cm" svg:y2="21.6cm">
          <text:p/>
        </draw:line>
        <draw:custom-shape draw:style-name="gr1098" draw:text-style-name="P18" draw:layer="layout" svg:width="0.2cm" svg:height="0.2cm" svg:x="37.702cm" svg:y="2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66" draw:text-style-name="P37" draw:layer="layout" svg:width="5.192cm" svg:height="0.569cm" svg:x="5.681cm" svg:y="21.249cm">
          <draw:text-box>
            <text:p><text:span text:style-name="T10">ex_mem_reg_wr</text:span><text:span text:style-name="T10">_s = </text:span><text:span text:style-name="T10">reg_wr_mem_s</text:span></text:p>
          </draw:text-box>
        </draw:frame>
        <draw:frame draw:style-name="gr1138" draw:text-style-name="P37" draw:layer="layout" svg:width="2.599cm" svg:height="0.569cm" svg:x="13.201cm" svg:y="16.501cm">
          <draw:text-box>
            <text:p><text:span text:style-name="T10">id_ex_reg_rs2_s</text:span></text:p>
          </draw:text-box>
        </draw:frame>
        <draw:frame draw:style-name="gr1132" draw:text-style-name="P37" draw:layer="layout" svg:width="2.678cm" svg:height="0.569cm" svg:x="10.092cm" svg:y="12.231cm">
          <draw:text-box>
            <text:p><text:span text:style-name="T10">reg_b_execute_s</text:span></text:p>
          </draw:text-box>
        </draw:frame>
        <draw:frame draw:style-name="gr1167" draw:text-style-name="P37" draw:layer="layout" svg:width="3.387cm" svg:height="0.569cm" svg:x="9.392cm" svg:y="12.532cm">
          <draw:text-box>
            <text:p><text:span text:style-name="T10">alu_result_writeb</text:span><text:span text:style-name="T10">ack_s</text:span></text:p>
          </draw:text-box>
        </draw:frame>
        <draw:frame draw:style-name="gr1123" draw:text-style-name="P37" draw:layer="layout" svg:width="2.819cm" svg:height="0.569cm" svg:x="9.893cm" svg:y="12.833cm">
          <draw:text-box>
            <text:p><text:span text:style-name="T10">alu_result_mem_</text:span><text:span text:style-name="T10">s</text:span></text:p>
          </draw:text-box>
        </draw:frame>
        <draw:custom-shape draw:style-name="gr461" draw:text-style-name="P5" draw:layer="layout" svg:width="0.2cm" svg:height="0.2cm" svg:x="19.701cm" svg:y="2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32" draw:text-style-name="P37" draw:layer="layout" svg:width="2.678cm" svg:height="0.569cm" svg:x="10.092cm" svg:y="10.532cm">
          <draw:text-box>
            <text:p><text:span text:style-name="T10">reg_a_execute_s</text:span></text:p>
          </draw:text-box>
        </draw:frame>
        <draw:frame draw:style-name="gr1168" draw:text-style-name="P37" draw:layer="layout" svg:width="6.12cm" svg:height="0.569cm" svg:x="9.894cm" svg:y="11.134cm">
          <draw:text-box>
            <text:p><text:span text:style-name="T10">alu_result_mem_</text:span><text:span text:style-name="T10">s || </text:span><text:span text:style-name="T10">dmem_data_rd_</text:span><text:span text:style-name="T10">mem_s</text:span></text:p>
          </draw:text-box>
        </draw:frame>
        <draw:frame draw:style-name="gr1169" draw:text-style-name="P37" draw:layer="layout" svg:width="2.508cm" svg:height="0.569cm" svg:x="10.292cm" svg:y="5.033cm">
          <draw:text-box>
            <text:p><text:span text:style-name="T10">pc_execute_s</text:span></text:p>
          </draw:text-box>
        </draw:frame>
        <draw:frame draw:style-name="gr1170" draw:text-style-name="P37" draw:layer="layout" svg:width="2.709cm" svg:height="0.569cm" svg:x="17.3cm" svg:y="10.5cm">
          <draw:text-box>
            <text:p><text:span text:style-name="T10">exec.alu_src_a_s</text:span></text:p>
          </draw:text-box>
        </draw:frame>
        <draw:frame draw:style-name="gr1170" draw:text-style-name="P37" draw:layer="layout" svg:width="2.709cm" svg:height="0.569cm" svg:x="16.901cm" svg:y="12.601cm">
          <draw:text-box>
            <text:p><text:span text:style-name="T10">exec.alu_src_b_s</text:span></text:p>
          </draw:text-box>
        </draw:frame>
        <draw:frame draw:style-name="gr1139" draw:text-style-name="P37" draw:layer="layout" svg:width="2.867cm" svg:height="0.569cm" svg:x="10.301cm" svg:y="14.614cm">
          <draw:text-box>
            <text:p><text:span text:style-name="T10">imm_execute_s</text:span></text:p>
          </draw:text-box>
        </draw:frame>
        <draw:custom-shape draw:style-name="gr461" draw:text-style-name="P5" draw:layer="layout" svg:width="0.2cm" svg:height="0.2cm" svg:x="34.902cm" svg:y="16.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5cm" svg:y1="16.875cm" svg:x2="35cm" svg:y2="17.375cm">
          <text:p/>
        </draw:line>
        <draw:line draw:style-name="gr1006" draw:text-style-name="P4" draw:layer="layout" svg:x1="35cm" svg:y1="17.375cm" svg:x2="36.001cm" svg:y2="17.375cm">
          <text:p/>
        </draw:line>
        <draw:frame draw:style-name="gr1153" draw:text-style-name="P37" draw:layer="layout" svg:width="2.125cm" svg:height="0.569cm" svg:x="36.775cm" svg:y="16.9cm">
          <draw:text-box>
            <text:p><text:span text:style-name="T10">instr_mem_s</text:span></text:p>
          </draw:text-box>
        </draw:frame>
        <draw:line draw:style-name="gr1012" draw:text-style-name="P4" draw:layer="layout" svg:x1="37cm" svg:y1="17.4cm" svg:x2="37.9cm" svg:y2="17.4cm">
          <text:p/>
        </draw:line>
        <draw:line draw:style-name="gr1012" draw:text-style-name="P4" draw:layer="layout" svg:x1="37.9cm" svg:y1="17.4cm" svg:x2="37.9cm" svg:y2="20.7cm">
          <text:p/>
        </draw:line>
        <draw:line draw:style-name="gr1012" draw:text-style-name="P4" draw:layer="layout" svg:x1="37.9cm" svg:y1="20.7cm" svg:x2="1.2cm" svg:y2="20.7cm">
          <text:p/>
        </draw:line>
      </draw:page>
      <draw:page draw:name="page17" draw:style-name="dp1" draw:master-page-name="Standard">
        <draw:frame draw:style-name="gr1171" draw:text-style-name="P34" draw:layer="layout" svg:width="4.807cm" svg:height="3.095cm" svg:x="1cm" svg:y="3.005cm">
          <draw:text-box>
            <text:p><text:span text:style-name="T9">Progra</text:span><text:span text:style-name="T9">m</text:span></text:p>
            <text:p><text:span text:style-name="T9">executi</text:span><text:span text:style-name="T9">on</text:span></text:p>
            <text:p><text:span text:style-name="T9">order</text:span></text:p>
            <text:p><text:span text:style-name="T9">(in </text:span><text:span text:style-name="T9">instructi</text:span><text:span text:style-name="T9">ons)</text:span></text:p>
          </draw:text-box>
        </draw:frame>
        <draw:frame draw:style-name="gr1172" draw:text-style-name="P81" draw:layer="layout" svg:width="3.601cm" svg:height="0.806cm" svg:x="1.008cm" svg:y="6.6cm">
          <draw:text-box>
            <text:p><text:span text:style-name="T27">sub </text:span><text:span text:style-name="T31">x2</text:span><text:span text:style-name="T27">, </text:span><text:span text:style-name="T27">x1, x3</text:span></text:p>
          </draw:text-box>
        </draw:frame>
        <draw:frame draw:style-name="gr1173" draw:text-style-name="P34" draw:layer="layout" svg:width="6.124cm" svg:height="0.962cm" svg:x="5.699cm" svg:y="4.038cm">
          <draw:text-box>
            <text:p><text:span text:style-name="T9">Time in </text:span><text:span text:style-name="T9">clock </text:span><text:span text:style-name="T9">cycles</text:span></text:p>
          </draw:text-box>
        </draw:frame>
        <draw:line draw:style-name="gr146" draw:text-style-name="P4" draw:layer="layout" svg:x1="1.099cm" svg:y1="6cm" svg:x2="1.099cm" svg:y2="12cm">
          <text:p/>
        </draw:line>
        <draw:line draw:style-name="gr146" draw:text-style-name="P4" draw:layer="layout" svg:x1="5.999cm" svg:y1="5cm" svg:x2="12.999cm" svg:y2="5cm">
          <text:p/>
        </draw:line>
        <draw:g draw:style-name="gr66">
          <draw:polygon draw:style-name="gr1174" draw:text-style-name="P90" draw:layer="layout" svg:width="1.999cm" svg:height="2.999cm" svg:x="14.999cm" svg:y="5.5cm" svg:viewBox="0 0 2000 3000" draw:points="0,0 0,1100 400,1500 0,1900 0,3000 2000,2000 2000,1000">
            <text:p/>
          </draw:polygon>
          <draw:frame draw:style-name="gr1175" draw:text-style-name="P81" draw:layer="layout" svg:width="1.466cm" svg:height="0.806cm" svg:x="15.399cm" svg:y="6.594cm">
            <draw:text-box>
              <text:p><text:span text:style-name="T27">ALU</text:span></text:p>
            </draw:text-box>
          </draw:frame>
        </draw:g>
        <draw:g draw:style-name="gr1">
          <draw:g draw:style-name="gr1">
            <draw:custom-shape draw:style-name="gr1176" draw:text-style-name="P14" draw:layer="layout" svg:width="1cm" svg:height="2cm" svg:x="6.999cm" svg:y="6cm">
              <text:p/>
              <draw:enhanced-geometry svg:viewBox="0 0 21600 21600" draw:type="rectangle" draw:enhanced-path="M 0 0 L 21600 0 21600 21600 0 21600 0 0 Z N"/>
            </draw:custom-shape>
            <draw:custom-shape draw:style-name="gr1177" draw:text-style-name="P1" draw:layer="layout" svg:width="1cm" svg:height="2cm" svg:x="7.999cm" svg:y="6cm">
              <text:p/>
              <draw:enhanced-geometry svg:viewBox="0 0 21600 21600" draw:type="rectangle" draw:enhanced-path="M 0 0 L 21600 0 21600 21600 0 21600 0 0 Z N"/>
            </draw:custom-shape>
          </draw:g>
          <draw:g draw:style-name="gr66">
            <draw:frame draw:style-name="gr1178" draw:text-style-name="P81" draw:layer="layout" svg:width="1.052cm" svg:height="0.806cm" svg:x="7.528cm" svg:y="6.597cm">
              <draw:text-box>
                <text:p><text:span text:style-name="T27">IM</text:span></text:p>
              </draw:text-box>
            </draw:frame>
          </draw:g>
        </draw:g>
        <draw:g draw:style-name="gr1">
          <draw:g draw:style-name="gr1">
            <draw:custom-shape draw:style-name="gr1179" draw:text-style-name="P14" draw:layer="layout" svg:width="1cm" svg:height="2cm" svg:x="10.999cm" svg:y="6cm">
              <text:p/>
              <draw:enhanced-geometry svg:viewBox="0 0 21600 21600" draw:type="rectangle" draw:enhanced-path="M 0 0 L 21600 0 21600 21600 0 21600 0 0 Z N"/>
            </draw:custom-shape>
            <draw:custom-shape draw:style-name="gr1177" draw:text-style-name="P1" draw:layer="layout" svg:width="1cm" svg:height="2cm" svg:x="11.999cm" svg:y="6cm">
              <text:p/>
              <draw:enhanced-geometry svg:viewBox="0 0 21600 21600" draw:type="rectangle" draw:enhanced-path="M 0 0 L 21600 0 21600 21600 0 21600 0 0 Z N"/>
            </draw:custom-shape>
          </draw:g>
          <draw:g draw:style-name="gr66">
            <draw:frame draw:style-name="gr1180" draw:text-style-name="P81" draw:layer="layout" svg:width="1.411cm" svg:height="0.806cm" svg:x="11.528cm" svg:y="6.597cm">
              <draw:text-box>
                <text:p><text:span text:style-name="T27">Reg</text:span></text:p>
              </draw:text-box>
            </draw:frame>
          </draw:g>
        </draw:g>
        <draw:g draw:style-name="gr1">
          <draw:g draw:style-name="gr1">
            <draw:custom-shape draw:style-name="gr1179" draw:text-style-name="P14" draw:layer="layout" svg:width="1cm" svg:height="2cm" svg:x="23.999cm" svg:y="6cm">
              <text:p/>
              <draw:enhanced-geometry svg:viewBox="0 0 21600 21600" draw:mirror-horizontal="true" draw:type="rectangle" draw:enhanced-path="M 0 0 L 21600 0 21600 21600 0 21600 0 0 Z N"/>
            </draw:custom-shape>
            <draw:custom-shape draw:style-name="gr1177" draw:text-style-name="P1" draw:layer="layout" svg:width="1cm" svg:height="2cm" svg:x="22.999cm" svg:y="6cm">
              <text:p/>
              <draw:enhanced-geometry svg:viewBox="0 0 21600 21600" draw:mirror-horizontal="true" draw:type="rectangle" draw:enhanced-path="M 0 0 L 21600 0 21600 21600 0 21600 0 0 Z N"/>
            </draw:custom-shape>
          </draw:g>
          <draw:g draw:style-name="gr66">
            <draw:frame draw:style-name="gr1180" draw:text-style-name="P81" draw:layer="layout" svg:width="1.411cm" svg:height="0.806cm" svg:x="23.35cm" svg:y="6.597cm">
              <draw:text-box>
                <text:p><text:span text:style-name="T27">Reg</text:span></text:p>
              </draw:text-box>
            </draw:frame>
          </draw:g>
        </draw:g>
        <draw:line draw:style-name="gr38" draw:text-style-name="P4" draw:layer="layout" svg:x1="8.999cm" svg:y1="7cm" svg:x2="10.999cm" svg:y2="7cm">
          <text:p/>
        </draw:line>
        <draw:line draw:style-name="gr38" draw:text-style-name="P4" draw:layer="layout" svg:x1="10.499cm" svg:y1="7cm" svg:x2="10.499cm" svg:y2="6.5cm">
          <text:p/>
        </draw:line>
        <draw:line draw:style-name="gr38" draw:text-style-name="P4" draw:layer="layout" svg:x1="10.499cm" svg:y1="6.5cm" svg:x2="10.999cm" svg:y2="6.5cm">
          <text:p/>
        </draw:line>
        <draw:line draw:style-name="gr38" draw:text-style-name="P4" draw:layer="layout" svg:x1="12.999cm" svg:y1="6.5cm" svg:x2="14.999cm" svg:y2="6.5cm">
          <text:p/>
        </draw:line>
        <draw:line draw:style-name="gr38" draw:text-style-name="P4" draw:layer="layout" svg:x1="12.999cm" svg:y1="7.5cm" svg:x2="14.999cm" svg:y2="7.5cm">
          <text:p/>
        </draw:line>
        <draw:line draw:style-name="gr38" draw:text-style-name="P4" draw:layer="layout" svg:x1="16.999cm" svg:y1="7cm" svg:x2="18.999cm" svg:y2="7cm">
          <text:p/>
        </draw:line>
        <draw:line draw:style-name="gr38" draw:text-style-name="P4" draw:layer="layout" svg:x1="20.999cm" svg:y1="7cm" svg:x2="22.999cm" svg:y2="7cm">
          <text:p/>
        </draw:line>
        <draw:g draw:style-name="gr66">
          <draw:polygon draw:style-name="gr1174" draw:text-style-name="P90" draw:layer="layout" svg:width="1.999cm" svg:height="2.999cm" svg:x="18.999cm" svg:y="8.5cm" svg:viewBox="0 0 2000 3000" draw:points="0,0 0,1100 400,1500 0,1900 0,3000 2000,2000 2000,1000">
            <text:p/>
          </draw:polygon>
          <draw:frame draw:style-name="gr1175" draw:text-style-name="P81" draw:layer="layout" svg:width="1.466cm" svg:height="0.806cm" svg:x="19.399cm" svg:y="9.594cm">
            <draw:text-box>
              <text:p><text:span text:style-name="T27">ALU</text:span></text:p>
            </draw:text-box>
          </draw:frame>
        </draw:g>
        <draw:g draw:style-name="gr1">
          <draw:g draw:style-name="gr1">
            <draw:custom-shape draw:style-name="gr1176" draw:text-style-name="P14" draw:layer="layout" svg:width="1cm" svg:height="2cm" svg:x="10.999cm" svg:y="9cm">
              <text:p/>
              <draw:enhanced-geometry svg:viewBox="0 0 21600 21600" draw:type="rectangle" draw:enhanced-path="M 0 0 L 21600 0 21600 21600 0 21600 0 0 Z N"/>
            </draw:custom-shape>
            <draw:custom-shape draw:style-name="gr1177" draw:text-style-name="P1" draw:layer="layout" svg:width="1cm" svg:height="2cm" svg:x="11.999cm" svg:y="9cm">
              <text:p/>
              <draw:enhanced-geometry svg:viewBox="0 0 21600 21600" draw:type="rectangle" draw:enhanced-path="M 0 0 L 21600 0 21600 21600 0 21600 0 0 Z N"/>
            </draw:custom-shape>
          </draw:g>
          <draw:g draw:style-name="gr66">
            <draw:frame draw:style-name="gr1178" draw:text-style-name="P81" draw:layer="layout" svg:width="1.052cm" svg:height="0.806cm" svg:x="11.528cm" svg:y="9.597cm">
              <draw:text-box>
                <text:p><text:span text:style-name="T27">IM</text:span></text:p>
              </draw:text-box>
            </draw:frame>
          </draw:g>
        </draw:g>
        <draw:g draw:style-name="gr1">
          <draw:g draw:style-name="gr1">
            <draw:custom-shape draw:style-name="gr1179" draw:text-style-name="P14" draw:layer="layout" svg:width="1cm" svg:height="2cm" svg:x="14.999cm" svg:y="9cm">
              <text:p/>
              <draw:enhanced-geometry svg:viewBox="0 0 21600 21600" draw:type="rectangle" draw:enhanced-path="M 0 0 L 21600 0 21600 21600 0 21600 0 0 Z N"/>
            </draw:custom-shape>
            <draw:custom-shape draw:style-name="gr1177" draw:text-style-name="P1" draw:layer="layout" svg:width="1cm" svg:height="2cm" svg:x="15.999cm" svg:y="9cm">
              <text:p/>
              <draw:enhanced-geometry svg:viewBox="0 0 21600 21600" draw:type="rectangle" draw:enhanced-path="M 0 0 L 21600 0 21600 21600 0 21600 0 0 Z N"/>
            </draw:custom-shape>
          </draw:g>
          <draw:g draw:style-name="gr66">
            <draw:frame draw:style-name="gr1181" draw:text-style-name="P81" draw:layer="layout" svg:width="1.575cm" svg:height="0.806cm" svg:x="15.528cm" svg:y="9.597cm">
              <draw:text-box>
                <text:p><text:span text:style-name="T27">REG</text:span></text:p>
              </draw:text-box>
            </draw:frame>
          </draw:g>
        </draw:g>
        <draw:g draw:style-name="gr1">
          <draw:g draw:style-name="gr1">
            <draw:custom-shape draw:style-name="gr1179" draw:text-style-name="P14" draw:layer="layout" svg:width="1cm" svg:height="2cm" svg:x="27.999cm" svg:y="9cm">
              <text:p/>
              <draw:enhanced-geometry svg:viewBox="0 0 21600 21600" draw:mirror-horizontal="true" draw:type="rectangle" draw:enhanced-path="M 0 0 L 21600 0 21600 21600 0 21600 0 0 Z N"/>
            </draw:custom-shape>
            <draw:custom-shape draw:style-name="gr1177" draw:text-style-name="P1" draw:layer="layout" svg:width="1cm" svg:height="2cm" svg:x="26.999cm" svg:y="9cm">
              <text:p/>
              <draw:enhanced-geometry svg:viewBox="0 0 21600 21600" draw:mirror-horizontal="true" draw:type="rectangle" draw:enhanced-path="M 0 0 L 21600 0 21600 21600 0 21600 0 0 Z N"/>
            </draw:custom-shape>
          </draw:g>
          <draw:g draw:style-name="gr66">
            <draw:frame draw:style-name="gr1180" draw:text-style-name="P81" draw:layer="layout" svg:width="1.411cm" svg:height="0.806cm" svg:x="27.35cm" svg:y="9.597cm">
              <draw:text-box>
                <text:p><text:span text:style-name="T27">Reg</text:span></text:p>
              </draw:text-box>
            </draw:frame>
          </draw:g>
        </draw:g>
        <draw:line draw:style-name="gr38" draw:text-style-name="P4" draw:layer="layout" svg:x1="12.999cm" svg:y1="10cm" svg:x2="14.999cm" svg:y2="10cm">
          <text:p/>
        </draw:line>
        <draw:line draw:style-name="gr38" draw:text-style-name="P4" draw:layer="layout" svg:x1="14.499cm" svg:y1="10cm" svg:x2="14.499cm" svg:y2="9.5cm">
          <text:p/>
        </draw:line>
        <draw:line draw:style-name="gr38" draw:text-style-name="P4" draw:layer="layout" svg:x1="14.499cm" svg:y1="9.5cm" svg:x2="14.999cm" svg:y2="9.5cm">
          <text:p/>
        </draw:line>
        <draw:line draw:style-name="gr38" draw:text-style-name="P4" draw:layer="layout" svg:x1="16.999cm" svg:y1="9.5cm" svg:x2="18.999cm" svg:y2="9.5cm">
          <text:p/>
        </draw:line>
        <draw:line draw:style-name="gr38" draw:text-style-name="P4" draw:layer="layout" svg:x1="16.999cm" svg:y1="10.5cm" svg:x2="18.999cm" svg:y2="10.5cm">
          <text:p/>
        </draw:line>
        <draw:line draw:style-name="gr38" draw:text-style-name="P4" draw:layer="layout" svg:x1="20.999cm" svg:y1="10cm" svg:x2="22.999cm" svg:y2="10cm">
          <text:p/>
        </draw:line>
        <draw:line draw:style-name="gr38" draw:text-style-name="P4" draw:layer="layout" svg:x1="24.999cm" svg:y1="10cm" svg:x2="26.999cm" svg:y2="10cm">
          <text:p/>
        </draw:line>
        <draw:frame draw:style-name="gr1182" draw:text-style-name="P81" draw:layer="layout" svg:width="3.861cm" svg:height="0.806cm" svg:x="1.009cm" svg:y="9.6cm">
          <draw:text-box>
            <text:p><text:span text:style-name="T27">and x12, </text:span><text:span text:style-name="T31">x2</text:span><text:span text:style-name="T27">, x5</text:span></text:p>
          </draw:text-box>
        </draw:frame>
        <draw:line draw:style-name="gr1183" draw:text-style-name="P4" draw:layer="layout" svg:x1="9.999cm" svg:y1="5cm" svg:x2="9.999cm" svg:y2="21cm">
          <text:p/>
        </draw:line>
        <draw:line draw:style-name="gr1183" draw:text-style-name="P4" draw:layer="layout" svg:x1="13.999cm" svg:y1="5cm" svg:x2="13.999cm" svg:y2="21cm">
          <text:p/>
        </draw:line>
        <draw:line draw:style-name="gr1183" draw:text-style-name="P4" draw:layer="layout" svg:x1="17.999cm" svg:y1="5cm" svg:x2="17.999cm" svg:y2="21cm">
          <text:p/>
        </draw:line>
        <draw:line draw:style-name="gr1183" draw:text-style-name="P4" draw:layer="layout" svg:x1="21.999cm" svg:y1="5cm" svg:x2="21.999cm" svg:y2="21cm">
          <text:p/>
        </draw:line>
        <draw:line draw:style-name="gr1183" draw:text-style-name="P4" draw:layer="layout" svg:x1="25.999cm" svg:y1="5cm" svg:x2="25.999cm" svg:y2="21cm">
          <text:p/>
        </draw:line>
        <draw:line draw:style-name="gr1183" draw:text-style-name="P4" draw:layer="layout" svg:x1="29.999cm" svg:y1="5cm" svg:x2="29.999cm" svg:y2="21cm">
          <text:p/>
        </draw:line>
        <draw:line draw:style-name="gr1183" draw:text-style-name="P4" draw:layer="layout" svg:x1="33.999cm" svg:y1="5cm" svg:x2="33.999cm" svg:y2="21cm">
          <text:p/>
        </draw:line>
        <draw:frame draw:style-name="gr1184" draw:text-style-name="P3" draw:layer="layout" svg:width="1.949cm" svg:height="0.962cm" svg:x="7.053cm" svg:y="5cm">
          <draw:text-box>
            <text:p>CC 1</text:p>
          </draw:text-box>
        </draw:frame>
        <draw:frame draw:style-name="gr1184" draw:text-style-name="P3" draw:layer="layout" svg:width="1.949cm" svg:height="0.962cm" svg:x="11.053cm" svg:y="5cm">
          <draw:text-box>
            <text:p>CC 2</text:p>
          </draw:text-box>
        </draw:frame>
        <draw:frame draw:style-name="gr1184" draw:text-style-name="P3" draw:layer="layout" svg:width="1.949cm" svg:height="0.962cm" svg:x="15.053cm" svg:y="5cm">
          <draw:text-box>
            <text:p>CC 3</text:p>
          </draw:text-box>
        </draw:frame>
        <draw:frame draw:style-name="gr1184" draw:text-style-name="P3" draw:layer="layout" svg:width="1.949cm" svg:height="0.962cm" svg:x="23.053cm" svg:y="5cm">
          <draw:text-box>
            <text:p>CC 5</text:p>
          </draw:text-box>
        </draw:frame>
        <draw:frame draw:style-name="gr1184" draw:text-style-name="P3" draw:layer="layout" svg:width="1.949cm" svg:height="0.962cm" svg:x="27.053cm" svg:y="5cm">
          <draw:text-box>
            <text:p>CC 6</text:p>
          </draw:text-box>
        </draw:frame>
        <draw:frame draw:style-name="gr1184" draw:text-style-name="P3" draw:layer="layout" svg:width="1.949cm" svg:height="0.962cm" svg:x="31.053cm" svg:y="5cm">
          <draw:text-box>
            <text:p>CC 7</text:p>
          </draw:text-box>
        </draw:frame>
        <draw:frame draw:style-name="gr1185" draw:text-style-name="P81" draw:layer="layout" svg:width="3.575cm" svg:height="0.806cm" svg:x="1.01cm" svg:y="12.6cm">
          <draw:text-box>
            <text:p text:style-name="P6"><text:span text:style-name="T32">or x13, </text:span><text:span text:style-name="T33">x6, </text:span><text:span text:style-name="T31">x2</text:span></text:p>
          </draw:text-box>
        </draw:frame>
        <draw:frame draw:style-name="gr1184" draw:text-style-name="P3" draw:layer="layout" svg:width="1.949cm" svg:height="0.962cm" svg:x="18.999cm" svg:y="5cm">
          <draw:text-box>
            <text:p>CC 4</text:p>
          </draw:text-box>
        </draw:frame>
        <draw:g draw:style-name="gr1">
          <draw:g draw:style-name="gr1">
            <draw:custom-shape draw:style-name="gr1176" draw:text-style-name="P91" draw:layer="layout" svg:width="1cm" svg:height="2cm" svg:x="18.999cm" svg:y="6cm">
              <text:p/>
              <draw:enhanced-geometry svg:viewBox="0 0 21600 21600" draw:mirror-horizontal="false" draw:mirror-vertical="false" draw:type="rectangle" draw:enhanced-path="M 0 0 L 21600 0 21600 21600 0 21600 0 0 Z N"/>
            </draw:custom-shape>
            <draw:custom-shape draw:style-name="gr1186" draw:text-style-name="P92" draw:layer="layout" svg:width="1cm" svg:height="2cm" svg:x="19.999cm" svg:y="6cm">
              <text:p/>
              <draw:enhanced-geometry svg:viewBox="0 0 21600 21600" draw:mirror-horizontal="false" draw:mirror-vertical="false" draw:type="rectangle" draw:enhanced-path="M 0 0 L 21600 0 21600 21600 0 21600 0 0 Z N"/>
            </draw:custom-shape>
          </draw:g>
          <draw:frame draw:style-name="gr1187" draw:text-style-name="P81" draw:layer="layout" svg:width="1.272cm" svg:height="0.806cm" svg:x="19.365cm" svg:y="6.599cm">
            <draw:text-box>
              <text:p><text:span text:style-name="T27">DM</text:span></text:p>
            </draw:text-box>
          </draw:frame>
        </draw:g>
        <draw:line draw:style-name="gr38" draw:text-style-name="P4" draw:layer="layout" svg:x1="18.499cm" svg:y1="7cm" svg:x2="18.499cm" svg:y2="8.2cm">
          <text:p/>
        </draw:line>
        <draw:line draw:style-name="gr38" draw:text-style-name="P4" draw:layer="layout" svg:x1="18.499cm" svg:y1="8.2cm" svg:x2="21.499cm" svg:y2="8.2cm">
          <text:p/>
        </draw:line>
        <draw:line draw:style-name="gr38" draw:text-style-name="P4" draw:layer="layout" svg:x1="21.499cm" svg:y1="8.2cm" svg:x2="21.999cm" svg:y2="7cm">
          <text:p/>
        </draw:line>
        <draw:g draw:style-name="gr1">
          <draw:g draw:style-name="gr1">
            <draw:custom-shape draw:style-name="gr1176" draw:text-style-name="P91" draw:layer="layout" svg:width="1cm" svg:height="2cm" svg:x="22.999cm" svg:y="9cm">
              <text:p/>
              <draw:enhanced-geometry svg:viewBox="0 0 21600 21600" draw:mirror-horizontal="false" draw:mirror-vertical="false" draw:type="rectangle" draw:enhanced-path="M 0 0 L 21600 0 21600 21600 0 21600 0 0 Z N"/>
            </draw:custom-shape>
            <draw:custom-shape draw:style-name="gr1186" draw:text-style-name="P92" draw:layer="layout" svg:width="1cm" svg:height="2cm" svg:x="23.999cm" svg:y="9cm">
              <text:p/>
              <draw:enhanced-geometry svg:viewBox="0 0 21600 21600" draw:mirror-horizontal="false" draw:mirror-vertical="false" draw:type="rectangle" draw:enhanced-path="M 0 0 L 21600 0 21600 21600 0 21600 0 0 Z N"/>
            </draw:custom-shape>
          </draw:g>
          <draw:frame draw:style-name="gr1187" draw:text-style-name="P81" draw:layer="layout" svg:width="1.272cm" svg:height="0.806cm" svg:x="23.365cm" svg:y="9.599cm">
            <draw:text-box>
              <text:p><text:span text:style-name="T27">DM</text:span></text:p>
            </draw:text-box>
          </draw:frame>
        </draw:g>
        <draw:line draw:style-name="gr38" draw:text-style-name="P4" draw:layer="layout" svg:x1="22.499cm" svg:y1="10cm" svg:x2="22.499cm" svg:y2="11.2cm">
          <text:p/>
        </draw:line>
        <draw:line draw:style-name="gr38" draw:text-style-name="P4" draw:layer="layout" svg:x1="22.499cm" svg:y1="11.2cm" svg:x2="25.499cm" svg:y2="11.2cm">
          <text:p/>
        </draw:line>
        <draw:line draw:style-name="gr38" draw:text-style-name="P4" draw:layer="layout" svg:x1="25.499cm" svg:y1="11.2cm" svg:x2="25.999cm" svg:y2="10cm">
          <text:p/>
        </draw:line>
        <draw:g draw:style-name="gr66">
          <draw:polygon draw:style-name="gr1174" draw:text-style-name="P90" draw:layer="layout" svg:width="1.999cm" svg:height="2.999cm" svg:x="22.999cm" svg:y="11.5cm" svg:viewBox="0 0 2000 3000" draw:points="0,0 0,1100 400,1500 0,1900 0,3000 2000,2000 2000,1000">
            <text:p/>
          </draw:polygon>
          <draw:frame draw:style-name="gr1175" draw:text-style-name="P81" draw:layer="layout" svg:width="1.466cm" svg:height="0.806cm" svg:x="23.399cm" svg:y="12.594cm">
            <draw:text-box>
              <text:p><text:span text:style-name="T27">ALU</text:span></text:p>
            </draw:text-box>
          </draw:frame>
        </draw:g>
        <draw:g draw:style-name="gr1">
          <draw:g draw:style-name="gr1">
            <draw:custom-shape draw:style-name="gr1176" draw:text-style-name="P14" draw:layer="layout" svg:width="1cm" svg:height="2cm" svg:x="14.999cm" svg:y="12cm">
              <text:p/>
              <draw:enhanced-geometry svg:viewBox="0 0 21600 21600" draw:type="rectangle" draw:enhanced-path="M 0 0 L 21600 0 21600 21600 0 21600 0 0 Z N"/>
            </draw:custom-shape>
            <draw:custom-shape draw:style-name="gr1177" draw:text-style-name="P1" draw:layer="layout" svg:width="1cm" svg:height="2cm" svg:x="15.999cm" svg:y="12cm">
              <text:p/>
              <draw:enhanced-geometry svg:viewBox="0 0 21600 21600" draw:type="rectangle" draw:enhanced-path="M 0 0 L 21600 0 21600 21600 0 21600 0 0 Z N"/>
            </draw:custom-shape>
          </draw:g>
          <draw:g draw:style-name="gr66">
            <draw:frame draw:style-name="gr1178" draw:text-style-name="P81" draw:layer="layout" svg:width="1.052cm" svg:height="0.806cm" svg:x="15.528cm" svg:y="12.597cm">
              <draw:text-box>
                <text:p><text:span text:style-name="T27">IM</text:span></text:p>
              </draw:text-box>
            </draw:frame>
          </draw:g>
        </draw:g>
        <draw:g draw:style-name="gr1">
          <draw:g draw:style-name="gr1">
            <draw:custom-shape draw:style-name="gr1179" draw:text-style-name="P14" draw:layer="layout" svg:width="1cm" svg:height="2cm" svg:x="18.999cm" svg:y="12cm">
              <text:p/>
              <draw:enhanced-geometry svg:viewBox="0 0 21600 21600" draw:type="rectangle" draw:enhanced-path="M 0 0 L 21600 0 21600 21600 0 21600 0 0 Z N"/>
            </draw:custom-shape>
            <draw:custom-shape draw:style-name="gr1177" draw:text-style-name="P1" draw:layer="layout" svg:width="1cm" svg:height="2cm" svg:x="19.999cm" svg:y="12cm">
              <text:p/>
              <draw:enhanced-geometry svg:viewBox="0 0 21600 21600" draw:type="rectangle" draw:enhanced-path="M 0 0 L 21600 0 21600 21600 0 21600 0 0 Z N"/>
            </draw:custom-shape>
          </draw:g>
          <draw:g draw:style-name="gr66">
            <draw:frame draw:style-name="gr1181" draw:text-style-name="P81" draw:layer="layout" svg:width="1.575cm" svg:height="0.806cm" svg:x="19.528cm" svg:y="12.597cm">
              <draw:text-box>
                <text:p><text:span text:style-name="T27">REG</text:span></text:p>
              </draw:text-box>
            </draw:frame>
          </draw:g>
        </draw:g>
        <draw:g draw:style-name="gr1">
          <draw:g draw:style-name="gr1">
            <draw:custom-shape draw:style-name="gr1179" draw:text-style-name="P14" draw:layer="layout" svg:width="1cm" svg:height="2cm" svg:x="31.999cm" svg:y="12cm">
              <text:p/>
              <draw:enhanced-geometry svg:viewBox="0 0 21600 21600" draw:mirror-horizontal="true" draw:type="rectangle" draw:enhanced-path="M 0 0 L 21600 0 21600 21600 0 21600 0 0 Z N"/>
            </draw:custom-shape>
            <draw:custom-shape draw:style-name="gr1177" draw:text-style-name="P1" draw:layer="layout" svg:width="1cm" svg:height="2cm" svg:x="30.999cm" svg:y="12cm">
              <text:p/>
              <draw:enhanced-geometry svg:viewBox="0 0 21600 21600" draw:mirror-horizontal="true" draw:type="rectangle" draw:enhanced-path="M 0 0 L 21600 0 21600 21600 0 21600 0 0 Z N"/>
            </draw:custom-shape>
          </draw:g>
          <draw:g draw:style-name="gr66">
            <draw:frame draw:style-name="gr1180" draw:text-style-name="P81" draw:layer="layout" svg:width="1.411cm" svg:height="0.806cm" svg:x="31.35cm" svg:y="12.597cm">
              <draw:text-box>
                <text:p><text:span text:style-name="T27">Reg</text:span></text:p>
              </draw:text-box>
            </draw:frame>
          </draw:g>
        </draw:g>
        <draw:line draw:style-name="gr38" draw:text-style-name="P4" draw:layer="layout" svg:x1="16.999cm" svg:y1="13cm" svg:x2="18.999cm" svg:y2="13cm">
          <text:p/>
        </draw:line>
        <draw:line draw:style-name="gr38" draw:text-style-name="P4" draw:layer="layout" svg:x1="18.499cm" svg:y1="13cm" svg:x2="18.499cm" svg:y2="12.5cm">
          <text:p/>
        </draw:line>
        <draw:line draw:style-name="gr38" draw:text-style-name="P4" draw:layer="layout" svg:x1="18.499cm" svg:y1="12.5cm" svg:x2="18.999cm" svg:y2="12.5cm">
          <text:p/>
        </draw:line>
        <draw:line draw:style-name="gr38" draw:text-style-name="P4" draw:layer="layout" svg:x1="20.999cm" svg:y1="12.5cm" svg:x2="22.999cm" svg:y2="12.5cm">
          <text:p/>
        </draw:line>
        <draw:line draw:style-name="gr38" draw:text-style-name="P4" draw:layer="layout" svg:x1="20.999cm" svg:y1="13.5cm" svg:x2="22.999cm" svg:y2="13.5cm">
          <text:p/>
        </draw:line>
        <draw:line draw:style-name="gr38" draw:text-style-name="P4" draw:layer="layout" svg:x1="24.999cm" svg:y1="13cm" svg:x2="26.999cm" svg:y2="13cm">
          <text:p/>
        </draw:line>
        <draw:line draw:style-name="gr38" draw:text-style-name="P4" draw:layer="layout" svg:x1="28.999cm" svg:y1="13cm" svg:x2="30.999cm" svg:y2="13cm">
          <text:p/>
        </draw:line>
        <draw:g draw:style-name="gr1">
          <draw:g draw:style-name="gr1">
            <draw:custom-shape draw:style-name="gr1176" draw:text-style-name="P91" draw:layer="layout" svg:width="1cm" svg:height="2cm" svg:x="26.999cm" svg:y="12cm">
              <text:p/>
              <draw:enhanced-geometry svg:viewBox="0 0 21600 21600" draw:mirror-horizontal="false" draw:mirror-vertical="false" draw:type="rectangle" draw:enhanced-path="M 0 0 L 21600 0 21600 21600 0 21600 0 0 Z N"/>
            </draw:custom-shape>
            <draw:custom-shape draw:style-name="gr1186" draw:text-style-name="P92" draw:layer="layout" svg:width="1cm" svg:height="2cm" svg:x="27.999cm" svg:y="12cm">
              <text:p/>
              <draw:enhanced-geometry svg:viewBox="0 0 21600 21600" draw:mirror-horizontal="false" draw:mirror-vertical="false" draw:type="rectangle" draw:enhanced-path="M 0 0 L 21600 0 21600 21600 0 21600 0 0 Z N"/>
            </draw:custom-shape>
          </draw:g>
          <draw:frame draw:style-name="gr1187" draw:text-style-name="P81" draw:layer="layout" svg:width="1.272cm" svg:height="0.806cm" svg:x="27.365cm" svg:y="12.599cm">
            <draw:text-box>
              <text:p><text:span text:style-name="T27">DM</text:span></text:p>
            </draw:text-box>
          </draw:frame>
        </draw:g>
        <draw:line draw:style-name="gr38" draw:text-style-name="P4" draw:layer="layout" svg:x1="26.499cm" svg:y1="13cm" svg:x2="26.499cm" svg:y2="14.2cm">
          <text:p/>
        </draw:line>
        <draw:line draw:style-name="gr38" draw:text-style-name="P4" draw:layer="layout" svg:x1="26.499cm" svg:y1="14.2cm" svg:x2="29.499cm" svg:y2="14.2cm">
          <text:p/>
        </draw:line>
        <draw:line draw:style-name="gr38" draw:text-style-name="P4" draw:layer="layout" svg:x1="29.499cm" svg:y1="14.2cm" svg:x2="29.999cm" svg:y2="13cm">
          <text:p/>
        </draw:line>
        <draw:frame draw:style-name="gr22" draw:text-style-name="P3" draw:layer="layout" svg:width="7.701cm" svg:height="0.962cm" svg:x="8.899cm" svg:y="1cm">
          <draw:text-box>
            <text:p>R-types following R-types</text:p>
          </draw:text-box>
        </draw:frame>
        <draw:line draw:style-name="gr1183" draw:text-style-name="P4" draw:layer="layout" svg:x1="37.999cm" svg:y1="5cm" svg:x2="37.999cm" svg:y2="21cm">
          <text:p/>
        </draw:line>
        <draw:g draw:style-name="gr66">
          <draw:polygon draw:style-name="gr1174" draw:text-style-name="P90" draw:layer="layout" svg:width="1.999cm" svg:height="2.999cm" svg:x="26.999cm" svg:y="14.5cm" svg:viewBox="0 0 2000 3000" draw:points="0,0 0,1100 400,1500 0,1900 0,3000 2000,2000 2000,1000">
            <text:p/>
          </draw:polygon>
          <draw:frame draw:style-name="gr1175" draw:text-style-name="P81" draw:layer="layout" svg:width="1.466cm" svg:height="0.806cm" svg:x="27.399cm" svg:y="15.594cm">
            <draw:text-box>
              <text:p><text:span text:style-name="T27">ALU</text:span></text:p>
            </draw:text-box>
          </draw:frame>
        </draw:g>
        <draw:g draw:style-name="gr1">
          <draw:g draw:style-name="gr1">
            <draw:custom-shape draw:style-name="gr1176" draw:text-style-name="P14" draw:layer="layout" svg:width="1cm" svg:height="2cm" svg:x="18.999cm" svg:y="15cm">
              <text:p/>
              <draw:enhanced-geometry svg:viewBox="0 0 21600 21600" draw:type="rectangle" draw:enhanced-path="M 0 0 L 21600 0 21600 21600 0 21600 0 0 Z N"/>
            </draw:custom-shape>
            <draw:custom-shape draw:style-name="gr1177" draw:text-style-name="P1" draw:layer="layout" svg:width="1cm" svg:height="2cm" svg:x="19.999cm" svg:y="15cm">
              <text:p/>
              <draw:enhanced-geometry svg:viewBox="0 0 21600 21600" draw:type="rectangle" draw:enhanced-path="M 0 0 L 21600 0 21600 21600 0 21600 0 0 Z N"/>
            </draw:custom-shape>
          </draw:g>
          <draw:g draw:style-name="gr66">
            <draw:frame draw:style-name="gr1178" draw:text-style-name="P81" draw:layer="layout" svg:width="1.052cm" svg:height="0.806cm" svg:x="19.528cm" svg:y="15.597cm">
              <draw:text-box>
                <text:p><text:span text:style-name="T27">IM</text:span></text:p>
              </draw:text-box>
            </draw:frame>
          </draw:g>
        </draw:g>
        <draw:g draw:style-name="gr1">
          <draw:g draw:style-name="gr1">
            <draw:custom-shape draw:style-name="gr1179" draw:text-style-name="P14" draw:layer="layout" svg:width="1cm" svg:height="2cm" svg:x="22.999cm" svg:y="15cm">
              <text:p/>
              <draw:enhanced-geometry svg:viewBox="0 0 21600 21600" draw:type="rectangle" draw:enhanced-path="M 0 0 L 21600 0 21600 21600 0 21600 0 0 Z N"/>
            </draw:custom-shape>
            <draw:custom-shape draw:style-name="gr1177" draw:text-style-name="P1" draw:layer="layout" svg:width="1cm" svg:height="2cm" svg:x="23.999cm" svg:y="15cm">
              <text:p/>
              <draw:enhanced-geometry svg:viewBox="0 0 21600 21600" draw:type="rectangle" draw:enhanced-path="M 0 0 L 21600 0 21600 21600 0 21600 0 0 Z N"/>
            </draw:custom-shape>
          </draw:g>
          <draw:g draw:style-name="gr66">
            <draw:frame draw:style-name="gr1181" draw:text-style-name="P81" draw:layer="layout" svg:width="1.575cm" svg:height="0.806cm" svg:x="23.528cm" svg:y="15.597cm">
              <draw:text-box>
                <text:p><text:span text:style-name="T27">REG</text:span></text:p>
              </draw:text-box>
            </draw:frame>
          </draw:g>
        </draw:g>
        <draw:g draw:style-name="gr1">
          <draw:g draw:style-name="gr1">
            <draw:custom-shape draw:style-name="gr1179" draw:text-style-name="P14" draw:layer="layout" svg:width="1cm" svg:height="2cm" svg:x="35.999cm" svg:y="15cm">
              <text:p/>
              <draw:enhanced-geometry svg:viewBox="0 0 21600 21600" draw:mirror-horizontal="true" draw:type="rectangle" draw:enhanced-path="M 0 0 L 21600 0 21600 21600 0 21600 0 0 Z N"/>
            </draw:custom-shape>
            <draw:custom-shape draw:style-name="gr1177" draw:text-style-name="P1" draw:layer="layout" svg:width="1cm" svg:height="2cm" svg:x="34.999cm" svg:y="15cm">
              <text:p/>
              <draw:enhanced-geometry svg:viewBox="0 0 21600 21600" draw:mirror-horizontal="true" draw:type="rectangle" draw:enhanced-path="M 0 0 L 21600 0 21600 21600 0 21600 0 0 Z N"/>
            </draw:custom-shape>
          </draw:g>
          <draw:g draw:style-name="gr66">
            <draw:frame draw:style-name="gr1180" draw:text-style-name="P81" draw:layer="layout" svg:width="1.411cm" svg:height="0.806cm" svg:x="35.35cm" svg:y="15.597cm">
              <draw:text-box>
                <text:p><text:span text:style-name="T27">Reg</text:span></text:p>
              </draw:text-box>
            </draw:frame>
          </draw:g>
        </draw:g>
        <draw:line draw:style-name="gr38" draw:text-style-name="P4" draw:layer="layout" svg:x1="20.999cm" svg:y1="16cm" svg:x2="22.999cm" svg:y2="16cm">
          <text:p/>
        </draw:line>
        <draw:line draw:style-name="gr38" draw:text-style-name="P4" draw:layer="layout" svg:x1="22.499cm" svg:y1="16cm" svg:x2="22.499cm" svg:y2="15.5cm">
          <text:p/>
        </draw:line>
        <draw:line draw:style-name="gr38" draw:text-style-name="P4" draw:layer="layout" svg:x1="22.499cm" svg:y1="15.5cm" svg:x2="22.999cm" svg:y2="15.5cm">
          <text:p/>
        </draw:line>
        <draw:line draw:style-name="gr38" draw:text-style-name="P4" draw:layer="layout" svg:x1="24.999cm" svg:y1="15.5cm" svg:x2="26.999cm" svg:y2="15.5cm">
          <text:p/>
        </draw:line>
        <draw:line draw:style-name="gr38" draw:text-style-name="P4" draw:layer="layout" svg:x1="24.999cm" svg:y1="16.5cm" svg:x2="26.999cm" svg:y2="16.5cm">
          <text:p/>
        </draw:line>
        <draw:line draw:style-name="gr38" draw:text-style-name="P4" draw:layer="layout" svg:x1="28.999cm" svg:y1="16cm" svg:x2="30.999cm" svg:y2="16cm">
          <text:p/>
        </draw:line>
        <draw:line draw:style-name="gr38" draw:text-style-name="P4" draw:layer="layout" svg:x1="32.999cm" svg:y1="16cm" svg:x2="34.999cm" svg:y2="16cm">
          <text:p/>
        </draw:line>
        <draw:g draw:style-name="gr1">
          <draw:g draw:style-name="gr1">
            <draw:custom-shape draw:style-name="gr1176" draw:text-style-name="P91" draw:layer="layout" svg:width="1cm" svg:height="2cm" svg:x="30.999cm" svg:y="15cm">
              <text:p/>
              <draw:enhanced-geometry svg:viewBox="0 0 21600 21600" draw:mirror-horizontal="false" draw:mirror-vertical="false" draw:type="rectangle" draw:enhanced-path="M 0 0 L 21600 0 21600 21600 0 21600 0 0 Z N"/>
            </draw:custom-shape>
            <draw:custom-shape draw:style-name="gr1186" draw:text-style-name="P92" draw:layer="layout" svg:width="1cm" svg:height="2cm" svg:x="31.999cm" svg:y="15cm">
              <text:p/>
              <draw:enhanced-geometry svg:viewBox="0 0 21600 21600" draw:mirror-horizontal="false" draw:mirror-vertical="false" draw:type="rectangle" draw:enhanced-path="M 0 0 L 21600 0 21600 21600 0 21600 0 0 Z N"/>
            </draw:custom-shape>
          </draw:g>
          <draw:frame draw:style-name="gr1187" draw:text-style-name="P81" draw:layer="layout" svg:width="1.272cm" svg:height="0.806cm" svg:x="31.365cm" svg:y="15.599cm">
            <draw:text-box>
              <text:p><text:span text:style-name="T27">DM</text:span></text:p>
            </draw:text-box>
          </draw:frame>
        </draw:g>
        <draw:line draw:style-name="gr38" draw:text-style-name="P4" draw:layer="layout" svg:x1="30.499cm" svg:y1="16cm" svg:x2="30.499cm" svg:y2="17.2cm">
          <text:p/>
        </draw:line>
        <draw:line draw:style-name="gr38" draw:text-style-name="P4" draw:layer="layout" svg:x1="30.499cm" svg:y1="17.2cm" svg:x2="33.499cm" svg:y2="17.2cm">
          <text:p/>
        </draw:line>
        <draw:line draw:style-name="gr38" draw:text-style-name="P4" draw:layer="layout" svg:x1="33.499cm" svg:y1="17.2cm" svg:x2="33.999cm" svg:y2="16cm">
          <text:p/>
        </draw:line>
        <draw:g draw:style-name="gr66">
          <draw:polygon draw:style-name="gr1174" draw:text-style-name="P90" draw:layer="layout" svg:width="1.999cm" svg:height="2.999cm" svg:x="30.999cm" svg:y="17.5cm" svg:viewBox="0 0 2000 3000" draw:points="0,0 0,1100 400,1500 0,1900 0,3000 2000,2000 2000,1000">
            <text:p/>
          </draw:polygon>
          <draw:frame draw:style-name="gr1175" draw:text-style-name="P81" draw:layer="layout" svg:width="1.466cm" svg:height="0.806cm" svg:x="31.399cm" svg:y="18.594cm">
            <draw:text-box>
              <text:p><text:span text:style-name="T27">ALU</text:span></text:p>
            </draw:text-box>
          </draw:frame>
        </draw:g>
        <draw:g draw:style-name="gr1">
          <draw:g draw:style-name="gr1">
            <draw:custom-shape draw:style-name="gr1176" draw:text-style-name="P14" draw:layer="layout" svg:width="1cm" svg:height="2cm" svg:x="22.999cm" svg:y="18cm">
              <text:p/>
              <draw:enhanced-geometry svg:viewBox="0 0 21600 21600" draw:type="rectangle" draw:enhanced-path="M 0 0 L 21600 0 21600 21600 0 21600 0 0 Z N"/>
            </draw:custom-shape>
            <draw:custom-shape draw:style-name="gr1177" draw:text-style-name="P1" draw:layer="layout" svg:width="1cm" svg:height="2cm" svg:x="23.999cm" svg:y="18cm">
              <text:p/>
              <draw:enhanced-geometry svg:viewBox="0 0 21600 21600" draw:type="rectangle" draw:enhanced-path="M 0 0 L 21600 0 21600 21600 0 21600 0 0 Z N"/>
            </draw:custom-shape>
          </draw:g>
          <draw:g draw:style-name="gr66">
            <draw:frame draw:style-name="gr1178" draw:text-style-name="P81" draw:layer="layout" svg:width="1.052cm" svg:height="0.806cm" svg:x="23.528cm" svg:y="18.597cm">
              <draw:text-box>
                <text:p><text:span text:style-name="T27">IM</text:span></text:p>
              </draw:text-box>
            </draw:frame>
          </draw:g>
        </draw:g>
        <draw:g draw:style-name="gr1">
          <draw:g draw:style-name="gr1">
            <draw:custom-shape draw:style-name="gr1179" draw:text-style-name="P14" draw:layer="layout" svg:width="1cm" svg:height="2cm" svg:x="26.999cm" svg:y="18cm">
              <text:p/>
              <draw:enhanced-geometry svg:viewBox="0 0 21600 21600" draw:type="rectangle" draw:enhanced-path="M 0 0 L 21600 0 21600 21600 0 21600 0 0 Z N"/>
            </draw:custom-shape>
            <draw:custom-shape draw:style-name="gr1177" draw:text-style-name="P1" draw:layer="layout" svg:width="1cm" svg:height="2cm" svg:x="27.999cm" svg:y="18cm">
              <text:p/>
              <draw:enhanced-geometry svg:viewBox="0 0 21600 21600" draw:type="rectangle" draw:enhanced-path="M 0 0 L 21600 0 21600 21600 0 21600 0 0 Z N"/>
            </draw:custom-shape>
          </draw:g>
          <draw:g draw:style-name="gr66">
            <draw:frame draw:style-name="gr1181" draw:text-style-name="P81" draw:layer="layout" svg:width="1.575cm" svg:height="0.806cm" svg:x="27.528cm" svg:y="18.597cm">
              <draw:text-box>
                <text:p><text:span text:style-name="T27">REG</text:span></text:p>
              </draw:text-box>
            </draw:frame>
          </draw:g>
        </draw:g>
        <draw:g draw:style-name="gr1">
          <draw:g draw:style-name="gr1">
            <draw:custom-shape draw:style-name="gr1179" draw:text-style-name="P14" draw:layer="layout" svg:width="1cm" svg:height="2cm" svg:x="39.999cm" svg:y="18cm">
              <text:p/>
              <draw:enhanced-geometry svg:viewBox="0 0 21600 21600" draw:mirror-horizontal="true" draw:type="rectangle" draw:enhanced-path="M 0 0 L 21600 0 21600 21600 0 21600 0 0 Z N"/>
            </draw:custom-shape>
            <draw:custom-shape draw:style-name="gr1177" draw:text-style-name="P1" draw:layer="layout" svg:width="1cm" svg:height="2cm" svg:x="38.999cm" svg:y="18cm">
              <text:p/>
              <draw:enhanced-geometry svg:viewBox="0 0 21600 21600" draw:mirror-horizontal="true" draw:type="rectangle" draw:enhanced-path="M 0 0 L 21600 0 21600 21600 0 21600 0 0 Z N"/>
            </draw:custom-shape>
          </draw:g>
          <draw:g draw:style-name="gr66">
            <draw:frame draw:style-name="gr1180" draw:text-style-name="P81" draw:layer="layout" svg:width="1.411cm" svg:height="0.806cm" svg:x="39.35cm" svg:y="18.597cm">
              <draw:text-box>
                <text:p><text:span text:style-name="T27">Reg</text:span></text:p>
              </draw:text-box>
            </draw:frame>
          </draw:g>
        </draw:g>
        <draw:line draw:style-name="gr38" draw:text-style-name="P4" draw:layer="layout" svg:x1="24.999cm" svg:y1="19cm" svg:x2="26.999cm" svg:y2="19cm">
          <text:p/>
        </draw:line>
        <draw:line draw:style-name="gr38" draw:text-style-name="P4" draw:layer="layout" svg:x1="26.499cm" svg:y1="19cm" svg:x2="26.499cm" svg:y2="18.5cm">
          <text:p/>
        </draw:line>
        <draw:line draw:style-name="gr38" draw:text-style-name="P4" draw:layer="layout" svg:x1="26.499cm" svg:y1="18.5cm" svg:x2="26.999cm" svg:y2="18.5cm">
          <text:p/>
        </draw:line>
        <draw:line draw:style-name="gr38" draw:text-style-name="P4" draw:layer="layout" svg:x1="28.999cm" svg:y1="18.5cm" svg:x2="30.999cm" svg:y2="18.5cm">
          <text:p/>
        </draw:line>
        <draw:line draw:style-name="gr38" draw:text-style-name="P4" draw:layer="layout" svg:x1="28.999cm" svg:y1="19.5cm" svg:x2="30.999cm" svg:y2="19.5cm">
          <text:p/>
        </draw:line>
        <draw:line draw:style-name="gr38" draw:text-style-name="P4" draw:layer="layout" svg:x1="32.999cm" svg:y1="19cm" svg:x2="34.999cm" svg:y2="19cm">
          <text:p/>
        </draw:line>
        <draw:line draw:style-name="gr38" draw:text-style-name="P4" draw:layer="layout" svg:x1="36.999cm" svg:y1="19cm" svg:x2="38.999cm" svg:y2="19cm">
          <text:p/>
        </draw:line>
        <draw:g draw:style-name="gr1">
          <draw:g draw:style-name="gr1">
            <draw:custom-shape draw:style-name="gr1176" draw:text-style-name="P91" draw:layer="layout" svg:width="1cm" svg:height="2cm" svg:x="34.999cm" svg:y="18cm">
              <text:p/>
              <draw:enhanced-geometry svg:viewBox="0 0 21600 21600" draw:mirror-horizontal="false" draw:mirror-vertical="false" draw:type="rectangle" draw:enhanced-path="M 0 0 L 21600 0 21600 21600 0 21600 0 0 Z N"/>
            </draw:custom-shape>
            <draw:custom-shape draw:style-name="gr1186" draw:text-style-name="P92" draw:layer="layout" svg:width="1cm" svg:height="2cm" svg:x="35.999cm" svg:y="18cm">
              <text:p/>
              <draw:enhanced-geometry svg:viewBox="0 0 21600 21600" draw:mirror-horizontal="false" draw:mirror-vertical="false" draw:type="rectangle" draw:enhanced-path="M 0 0 L 21600 0 21600 21600 0 21600 0 0 Z N"/>
            </draw:custom-shape>
          </draw:g>
          <draw:frame draw:style-name="gr1187" draw:text-style-name="P81" draw:layer="layout" svg:width="1.272cm" svg:height="0.806cm" svg:x="35.365cm" svg:y="18.599cm">
            <draw:text-box>
              <text:p><text:span text:style-name="T27">DM</text:span></text:p>
            </draw:text-box>
          </draw:frame>
        </draw:g>
        <draw:line draw:style-name="gr38" draw:text-style-name="P4" draw:layer="layout" svg:x1="34.499cm" svg:y1="19cm" svg:x2="34.499cm" svg:y2="20.2cm">
          <text:p/>
        </draw:line>
        <draw:line draw:style-name="gr38" draw:text-style-name="P4" draw:layer="layout" svg:x1="34.499cm" svg:y1="20.2cm" svg:x2="37.499cm" svg:y2="20.2cm">
          <text:p/>
        </draw:line>
        <draw:line draw:style-name="gr38" draw:text-style-name="P4" draw:layer="layout" svg:x1="37.499cm" svg:y1="20.2cm" svg:x2="37.999cm" svg:y2="19cm">
          <text:p/>
        </draw:line>
        <draw:frame draw:style-name="gr1182" draw:text-style-name="P81" draw:layer="layout" svg:width="3.861cm" svg:height="0.806cm" svg:x="1.011cm" svg:y="15.6cm">
          <draw:text-box>
            <text:p><text:span text:style-name="T27">add x14, </text:span><text:span text:style-name="T31">x2</text:span><text:span text:style-name="T27">, </text:span><text:span text:style-name="T31">x2</text:span></text:p>
          </draw:text-box>
        </draw:frame>
        <draw:frame draw:style-name="gr1188" draw:text-style-name="P81" draw:layer="layout" svg:width="3.916cm" svg:height="0.806cm" svg:x="1.012cm" svg:y="18.6cm">
          <draw:text-box>
            <text:p><text:span text:style-name="T27">sd x15, </text:span><text:span text:style-name="T27">100(</text:span><text:span text:style-name="T31">x2</text:span><text:span text:style-name="T27">)</text:span></text:p>
          </draw:text-box>
        </draw:frame>
        <draw:custom-shape draw:style-name="gr1189" draw:text-style-name="P4" draw:layer="layout" svg:width="2.6cm" svg:height="2.6cm" svg:x="22.6cm" svg:y="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90" draw:text-style-name="P93" draw:layer="layout" svg:width="1.173cm" svg:height="0.962cm" svg:x="23.129cm" svg:y="7.1cm">
          <draw:text-box>
            <text:p><text:span text:style-name="T34">x2</text:span></text:p>
          </draw:text-box>
        </draw:frame>
        <draw:line draw:style-name="gr1191" draw:text-style-name="P4" draw:layer="layout" svg:x1="23.6cm" svg:y1="8cm" svg:x2="15.999cm" svg:y2="9.597cm">
          <text:p/>
        </draw:line>
        <draw:line draw:style-name="gr1192" draw:text-style-name="P4" draw:layer="layout" svg:x1="23.6cm" svg:y1="8cm" svg:x2="19.999cm" svg:y2="12.7cm">
          <text:p/>
        </draw:line>
        <draw:line draw:style-name="gr1193" draw:text-style-name="P4" draw:layer="layout" svg:x1="23.6cm" svg:y1="8cm" svg:x2="23.999cm" svg:y2="15.597cm">
          <text:p/>
        </draw:line>
        <draw:line draw:style-name="gr1194" draw:text-style-name="P4" draw:layer="layout" svg:x1="23.6cm" svg:y1="8cm" svg:x2="27.999cm" svg:y2="18.7cm">
          <text:p/>
        </draw:line>
        <draw:frame draw:style-name="gr1195" draw:text-style-name="P81" draw:layer="layout" svg:width="5.83cm" svg:height="0.806cm" svg:x="17.96cm" svg:y="1.994cm">
          <draw:text-box>
            <text:p><text:span text:style-name="T27">and: </text:span><text:span text:style-name="T27">id_ex_reg</text:span><text:span text:style-name="T27">_rs1 = x2</text:span></text:p>
          </draw:text-box>
        </draw:frame>
        <draw:frame draw:style-name="gr1196" draw:text-style-name="P81" draw:layer="layout" svg:width="6.27cm" svg:height="0.806cm" svg:x="18.96cm" svg:y="2.994cm">
          <draw:text-box>
            <text:p><text:span text:style-name="T27">sub: </text:span><text:span text:style-name="T27">ex_mem_</text:span><text:span text:style-name="T27">reg_rd = </text:span><text:span text:style-name="T27">x2</text:span></text:p>
          </draw:text-box>
        </draw:frame>
        <draw:line draw:style-name="gr1197" draw:text-style-name="P4" draw:layer="layout" svg:x1="20.1cm" svg:y1="3.6cm" svg:x2="17.999cm" svg:y2="5.5cm">
          <text:p/>
        </draw:line>
        <draw:line draw:style-name="gr1198" draw:text-style-name="P4" draw:layer="layout" svg:x1="19.1cm" svg:y1="2.6cm" svg:x2="17.999cm" svg:y2="9.3cm">
          <text:p/>
        </draw:line>
        <draw:line draw:style-name="gr1199" draw:text-style-name="P4" draw:layer="layout" svg:x1="18.1cm" svg:y1="7cm" svg:x2="18.7cm" svg:y2="9.5cm">
          <text:p/>
        </draw:line>
        <draw:frame draw:style-name="gr1200" draw:text-style-name="P81" draw:layer="layout" svg:width="5.444cm" svg:height="0.806cm" svg:x="25.96cm" svg:y="1.994cm">
          <draw:text-box>
            <text:p><text:span text:style-name="T27">or: </text:span><text:span text:style-name="T27">id_ex_reg</text:span><text:span text:style-name="T27">_rs2 = x2</text:span></text:p>
          </draw:text-box>
        </draw:frame>
        <draw:frame draw:style-name="gr1201" draw:text-style-name="P81" draw:layer="layout" svg:width="6.38cm" svg:height="0.806cm" svg:x="26.96cm" svg:y="2.994cm">
          <draw:text-box>
            <text:p><text:span text:style-name="T27">sub: </text:span><text:span text:style-name="T27">mem_wb</text:span><text:span text:style-name="T27">_reg_rd = </text:span><text:span text:style-name="T27">x2</text:span></text:p>
          </draw:text-box>
        </draw:frame>
        <draw:line draw:style-name="gr1202" draw:text-style-name="P4" draw:layer="layout" svg:x1="28cm" svg:y1="3.6cm" svg:x2="21.999cm" svg:y2="5.5cm">
          <text:p/>
        </draw:line>
        <draw:line draw:style-name="gr1203" draw:text-style-name="P4" draw:layer="layout" svg:x1="26.7cm" svg:y1="2.6cm" svg:x2="21.999cm" svg:y2="12.2cm">
          <text:p/>
        </draw:line>
        <draw:line draw:style-name="gr1204" draw:text-style-name="P4" draw:layer="layout" svg:x1="22.1cm" svg:y1="7cm" svg:x2="22.7cm" svg:y2="12.5cm">
          <text:p/>
        </draw:line>
        <draw:frame draw:style-name="gr1205" draw:text-style-name="P81" draw:layer="layout" svg:width="5.93cm" svg:height="0.806cm" svg:x="17.96cm" svg:y="0.994cm">
          <draw:text-box>
            <text:p><text:span text:style-name="T27">sub: </text:span><text:span text:style-name="T27">ex_mem_</text:span><text:span text:style-name="T27">regWr = 1</text:span></text:p>
          </draw:text-box>
        </draw:frame>
        <draw:frame draw:style-name="gr1206" draw:text-style-name="P81" draw:layer="layout" svg:width="6.04cm" svg:height="0.806cm" svg:x="26.061cm" svg:y="0.994cm">
          <draw:text-box>
            <text:p><text:span text:style-name="T27">sub: </text:span><text:span text:style-name="T27">mem_wb</text:span><text:span text:style-name="T27">_regWr = </text:span><text:span text:style-name="T27">1</text:span></text:p>
          </draw:text-box>
        </draw:frame>
      </draw:page>
      <draw:page draw:name="page18" draw:style-name="dp1" draw:master-page-name="Standard">
        <draw:frame draw:style-name="gr1207" draw:text-style-name="P81" draw:layer="layout" svg:width="4.522cm" svg:height="0.806cm" svg:x="1.008cm" svg:y="5.6cm">
          <draw:text-box>
            <text:p><text:span text:style-name="T27">addi </text:span><text:span text:style-name="T31">x2</text:span><text:span text:style-name="T27">, </text:span><text:span text:style-name="T27">x0, 0x100</text:span></text:p>
          </draw:text-box>
        </draw:frame>
        <draw:frame draw:style-name="gr1173" draw:text-style-name="P34" draw:layer="layout" svg:width="6.124cm" svg:height="0.962cm" svg:x="5.699cm" svg:y="1.038cm">
          <draw:text-box>
            <text:p><text:span text:style-name="T9">Time in </text:span><text:span text:style-name="T9">clock </text:span><text:span text:style-name="T9">cycles</text:span></text:p>
          </draw:text-box>
        </draw:frame>
        <draw:line draw:style-name="gr146" draw:text-style-name="P4" draw:layer="layout" svg:x1="1.099cm" svg:y1="5cm" svg:x2="1.099cm" svg:y2="11cm">
          <text:p/>
        </draw:line>
        <draw:line draw:style-name="gr146" draw:text-style-name="P4" draw:layer="layout" svg:x1="5.999cm" svg:y1="2cm" svg:x2="12.999cm" svg:y2="2cm">
          <text:p/>
        </draw:line>
        <draw:g draw:style-name="gr66">
          <draw:polygon draw:style-name="gr1174" draw:text-style-name="P90" draw:layer="layout" svg:width="1.999cm" svg:height="2.999cm" svg:x="14.999cm" svg:y="4.5cm" svg:viewBox="0 0 2000 3000" draw:points="0,0 0,1100 400,1500 0,1900 0,3000 2000,2000 2000,1000">
            <text:p/>
          </draw:polygon>
          <draw:frame draw:style-name="gr1175" draw:text-style-name="P81" draw:layer="layout" svg:width="1.466cm" svg:height="0.806cm" svg:x="15.399cm" svg:y="5.594cm">
            <draw:text-box>
              <text:p><text:span text:style-name="T27">ALU</text:span></text:p>
            </draw:text-box>
          </draw:frame>
        </draw:g>
        <draw:g draw:style-name="gr1">
          <draw:g draw:style-name="gr1">
            <draw:custom-shape draw:style-name="gr1176" draw:text-style-name="P14" draw:layer="layout" svg:width="1cm" svg:height="2cm" svg:x="6.999cm" svg:y="5cm">
              <text:p/>
              <draw:enhanced-geometry svg:viewBox="0 0 21600 21600" draw:type="rectangle" draw:enhanced-path="M 0 0 L 21600 0 21600 21600 0 21600 0 0 Z N"/>
            </draw:custom-shape>
            <draw:custom-shape draw:style-name="gr1177" draw:text-style-name="P1" draw:layer="layout" svg:width="1cm" svg:height="2cm" svg:x="7.999cm" svg:y="5cm">
              <text:p/>
              <draw:enhanced-geometry svg:viewBox="0 0 21600 21600" draw:type="rectangle" draw:enhanced-path="M 0 0 L 21600 0 21600 21600 0 21600 0 0 Z N"/>
            </draw:custom-shape>
          </draw:g>
          <draw:g draw:style-name="gr66">
            <draw:frame draw:style-name="gr1178" draw:text-style-name="P81" draw:layer="layout" svg:width="1.052cm" svg:height="0.806cm" svg:x="7.528cm" svg:y="5.597cm">
              <draw:text-box>
                <text:p><text:span text:style-name="T27">IM</text:span></text:p>
              </draw:text-box>
            </draw:frame>
          </draw:g>
        </draw:g>
        <draw:g draw:style-name="gr1">
          <draw:g draw:style-name="gr1">
            <draw:custom-shape draw:style-name="gr1179" draw:text-style-name="P14" draw:layer="layout" svg:width="1cm" svg:height="2cm" svg:x="10.999cm" svg:y="5cm">
              <text:p/>
              <draw:enhanced-geometry svg:viewBox="0 0 21600 21600" draw:type="rectangle" draw:enhanced-path="M 0 0 L 21600 0 21600 21600 0 21600 0 0 Z N"/>
            </draw:custom-shape>
            <draw:custom-shape draw:style-name="gr1177" draw:text-style-name="P1" draw:layer="layout" svg:width="1cm" svg:height="2cm" svg:x="11.999cm" svg:y="5cm">
              <text:p/>
              <draw:enhanced-geometry svg:viewBox="0 0 21600 21600" draw:type="rectangle" draw:enhanced-path="M 0 0 L 21600 0 21600 21600 0 21600 0 0 Z N"/>
            </draw:custom-shape>
          </draw:g>
          <draw:g draw:style-name="gr66">
            <draw:frame draw:style-name="gr1180" draw:text-style-name="P81" draw:layer="layout" svg:width="1.411cm" svg:height="0.806cm" svg:x="11.528cm" svg:y="5.597cm">
              <draw:text-box>
                <text:p><text:span text:style-name="T27">Reg</text:span></text:p>
              </draw:text-box>
            </draw:frame>
          </draw:g>
        </draw:g>
        <draw:g draw:style-name="gr1">
          <draw:g draw:style-name="gr1">
            <draw:custom-shape draw:style-name="gr1179" draw:text-style-name="P14" draw:layer="layout" svg:width="1cm" svg:height="2cm" svg:x="23.999cm" svg:y="5cm">
              <text:p/>
              <draw:enhanced-geometry svg:viewBox="0 0 21600 21600" draw:mirror-horizontal="true" draw:type="rectangle" draw:enhanced-path="M 0 0 L 21600 0 21600 21600 0 21600 0 0 Z N"/>
            </draw:custom-shape>
            <draw:custom-shape draw:style-name="gr1177" draw:text-style-name="P1" draw:layer="layout" svg:width="1cm" svg:height="2cm" svg:x="22.999cm" svg:y="5cm">
              <text:p/>
              <draw:enhanced-geometry svg:viewBox="0 0 21600 21600" draw:mirror-horizontal="true" draw:type="rectangle" draw:enhanced-path="M 0 0 L 21600 0 21600 21600 0 21600 0 0 Z N"/>
            </draw:custom-shape>
          </draw:g>
          <draw:g draw:style-name="gr66">
            <draw:frame draw:style-name="gr1180" draw:text-style-name="P81" draw:layer="layout" svg:width="1.411cm" svg:height="0.806cm" svg:x="23.35cm" svg:y="5.597cm">
              <draw:text-box>
                <text:p><text:span text:style-name="T27">Reg</text:span></text:p>
              </draw:text-box>
            </draw:frame>
          </draw:g>
        </draw:g>
        <draw:line draw:style-name="gr38" draw:text-style-name="P4" draw:layer="layout" svg:x1="8.999cm" svg:y1="6cm" svg:x2="10.999cm" svg:y2="6cm">
          <text:p/>
        </draw:line>
        <draw:line draw:style-name="gr38" draw:text-style-name="P4" draw:layer="layout" svg:x1="10.499cm" svg:y1="6cm" svg:x2="10.499cm" svg:y2="5.5cm">
          <text:p/>
        </draw:line>
        <draw:line draw:style-name="gr38" draw:text-style-name="P4" draw:layer="layout" svg:x1="10.499cm" svg:y1="5.5cm" svg:x2="10.999cm" svg:y2="5.5cm">
          <text:p/>
        </draw:line>
        <draw:line draw:style-name="gr38" draw:text-style-name="P4" draw:layer="layout" svg:x1="12.999cm" svg:y1="5.5cm" svg:x2="14.999cm" svg:y2="5.5cm">
          <text:p/>
        </draw:line>
        <draw:line draw:style-name="gr38" draw:text-style-name="P4" draw:layer="layout" svg:x1="12.999cm" svg:y1="6.5cm" svg:x2="14.999cm" svg:y2="6.5cm">
          <text:p/>
        </draw:line>
        <draw:line draw:style-name="gr38" draw:text-style-name="P4" draw:layer="layout" svg:x1="16.999cm" svg:y1="6cm" svg:x2="18.999cm" svg:y2="6cm">
          <text:p/>
        </draw:line>
        <draw:line draw:style-name="gr38" draw:text-style-name="P4" draw:layer="layout" svg:x1="20.999cm" svg:y1="6cm" svg:x2="22.999cm" svg:y2="6cm">
          <text:p/>
        </draw:line>
        <draw:g draw:style-name="gr66">
          <draw:polygon draw:style-name="gr1174" draw:text-style-name="P90" draw:layer="layout" svg:width="1.999cm" svg:height="2.999cm" svg:x="18.999cm" svg:y="7.5cm" svg:viewBox="0 0 2000 3000" draw:points="0,0 0,1100 400,1500 0,1900 0,3000 2000,2000 2000,1000">
            <text:p/>
          </draw:polygon>
          <draw:frame draw:style-name="gr1175" draw:text-style-name="P81" draw:layer="layout" svg:width="1.466cm" svg:height="0.806cm" svg:x="19.399cm" svg:y="8.594cm">
            <draw:text-box>
              <text:p><text:span text:style-name="T27">ALU</text:span></text:p>
            </draw:text-box>
          </draw:frame>
        </draw:g>
        <draw:g draw:style-name="gr1">
          <draw:g draw:style-name="gr1">
            <draw:custom-shape draw:style-name="gr1176" draw:text-style-name="P14" draw:layer="layout" svg:width="1cm" svg:height="2cm" svg:x="10.999cm" svg:y="8cm">
              <text:p/>
              <draw:enhanced-geometry svg:viewBox="0 0 21600 21600" draw:type="rectangle" draw:enhanced-path="M 0 0 L 21600 0 21600 21600 0 21600 0 0 Z N"/>
            </draw:custom-shape>
            <draw:custom-shape draw:style-name="gr1177" draw:text-style-name="P1" draw:layer="layout" svg:width="1cm" svg:height="2cm" svg:x="11.999cm" svg:y="8cm">
              <text:p/>
              <draw:enhanced-geometry svg:viewBox="0 0 21600 21600" draw:type="rectangle" draw:enhanced-path="M 0 0 L 21600 0 21600 21600 0 21600 0 0 Z N"/>
            </draw:custom-shape>
          </draw:g>
          <draw:g draw:style-name="gr66">
            <draw:frame draw:style-name="gr1178" draw:text-style-name="P81" draw:layer="layout" svg:width="1.052cm" svg:height="0.806cm" svg:x="11.528cm" svg:y="8.597cm">
              <draw:text-box>
                <text:p><text:span text:style-name="T27">IM</text:span></text:p>
              </draw:text-box>
            </draw:frame>
          </draw:g>
        </draw:g>
        <draw:g draw:style-name="gr1">
          <draw:g draw:style-name="gr1">
            <draw:custom-shape draw:style-name="gr1179" draw:text-style-name="P14" draw:layer="layout" svg:width="1cm" svg:height="2cm" svg:x="14.999cm" svg:y="8cm">
              <text:p/>
              <draw:enhanced-geometry svg:viewBox="0 0 21600 21600" draw:type="rectangle" draw:enhanced-path="M 0 0 L 21600 0 21600 21600 0 21600 0 0 Z N"/>
            </draw:custom-shape>
            <draw:custom-shape draw:style-name="gr1177" draw:text-style-name="P1" draw:layer="layout" svg:width="1cm" svg:height="2cm" svg:x="15.999cm" svg:y="8cm">
              <text:p/>
              <draw:enhanced-geometry svg:viewBox="0 0 21600 21600" draw:type="rectangle" draw:enhanced-path="M 0 0 L 21600 0 21600 21600 0 21600 0 0 Z N"/>
            </draw:custom-shape>
          </draw:g>
          <draw:g draw:style-name="gr66">
            <draw:frame draw:style-name="gr1181" draw:text-style-name="P81" draw:layer="layout" svg:width="1.575cm" svg:height="0.806cm" svg:x="15.528cm" svg:y="8.597cm">
              <draw:text-box>
                <text:p><text:span text:style-name="T27">REG</text:span></text:p>
              </draw:text-box>
            </draw:frame>
          </draw:g>
        </draw:g>
        <draw:g draw:style-name="gr1">
          <draw:g draw:style-name="gr1">
            <draw:custom-shape draw:style-name="gr1179" draw:text-style-name="P14" draw:layer="layout" svg:width="1cm" svg:height="2cm" svg:x="27.999cm" svg:y="8cm">
              <text:p/>
              <draw:enhanced-geometry svg:viewBox="0 0 21600 21600" draw:mirror-horizontal="true" draw:type="rectangle" draw:enhanced-path="M 0 0 L 21600 0 21600 21600 0 21600 0 0 Z N"/>
            </draw:custom-shape>
            <draw:custom-shape draw:style-name="gr1177" draw:text-style-name="P1" draw:layer="layout" svg:width="1cm" svg:height="2cm" svg:x="26.999cm" svg:y="8cm">
              <text:p/>
              <draw:enhanced-geometry svg:viewBox="0 0 21600 21600" draw:mirror-horizontal="true" draw:type="rectangle" draw:enhanced-path="M 0 0 L 21600 0 21600 21600 0 21600 0 0 Z N"/>
            </draw:custom-shape>
          </draw:g>
          <draw:g draw:style-name="gr66">
            <draw:frame draw:style-name="gr1180" draw:text-style-name="P81" draw:layer="layout" svg:width="1.411cm" svg:height="0.806cm" svg:x="27.35cm" svg:y="8.597cm">
              <draw:text-box>
                <text:p><text:span text:style-name="T27">Reg</text:span></text:p>
              </draw:text-box>
            </draw:frame>
          </draw:g>
        </draw:g>
        <draw:line draw:style-name="gr38" draw:text-style-name="P4" draw:layer="layout" svg:x1="12.999cm" svg:y1="9cm" svg:x2="14.999cm" svg:y2="9cm">
          <text:p/>
        </draw:line>
        <draw:line draw:style-name="gr38" draw:text-style-name="P4" draw:layer="layout" svg:x1="14.499cm" svg:y1="9cm" svg:x2="14.499cm" svg:y2="8.5cm">
          <text:p/>
        </draw:line>
        <draw:line draw:style-name="gr38" draw:text-style-name="P4" draw:layer="layout" svg:x1="14.499cm" svg:y1="8.5cm" svg:x2="14.999cm" svg:y2="8.5cm">
          <text:p/>
        </draw:line>
        <draw:line draw:style-name="gr38" draw:text-style-name="P4" draw:layer="layout" svg:x1="16.999cm" svg:y1="8.5cm" svg:x2="18.999cm" svg:y2="8.5cm">
          <text:p/>
        </draw:line>
        <draw:line draw:style-name="gr38" draw:text-style-name="P4" draw:layer="layout" svg:x1="16.999cm" svg:y1="9.5cm" svg:x2="18.999cm" svg:y2="9.5cm">
          <text:p/>
        </draw:line>
        <draw:line draw:style-name="gr38" draw:text-style-name="P4" draw:layer="layout" svg:x1="20.999cm" svg:y1="9cm" svg:x2="22.999cm" svg:y2="9cm">
          <text:p/>
        </draw:line>
        <draw:line draw:style-name="gr38" draw:text-style-name="P4" draw:layer="layout" svg:x1="24.999cm" svg:y1="9cm" svg:x2="26.999cm" svg:y2="9cm">
          <text:p/>
        </draw:line>
        <draw:frame draw:style-name="gr1208" draw:text-style-name="P81" draw:layer="layout" svg:width="3.855cm" svg:height="0.806cm" svg:x="1.009cm" svg:y="8.6cm">
          <draw:text-box>
            <text:p><text:span text:style-name="T27">slli </text:span><text:span text:style-name="T31">x2, x2</text:span><text:span text:style-name="T27">, </text:span><text:span text:style-name="T27">8</text:span></text:p>
          </draw:text-box>
        </draw:frame>
        <draw:line draw:style-name="gr1183" draw:text-style-name="P4" draw:layer="layout" svg:x1="9.999cm" svg:y1="4cm" svg:x2="9.999cm" svg:y2="20cm">
          <text:p/>
        </draw:line>
        <draw:line draw:style-name="gr1183" draw:text-style-name="P4" draw:layer="layout" svg:x1="13.999cm" svg:y1="4cm" svg:x2="13.999cm" svg:y2="20cm">
          <text:p/>
        </draw:line>
        <draw:line draw:style-name="gr1183" draw:text-style-name="P4" draw:layer="layout" svg:x1="17.999cm" svg:y1="4cm" svg:x2="17.999cm" svg:y2="20cm">
          <text:p/>
        </draw:line>
        <draw:line draw:style-name="gr1183" draw:text-style-name="P4" draw:layer="layout" svg:x1="21.999cm" svg:y1="4cm" svg:x2="21.999cm" svg:y2="20cm">
          <text:p/>
        </draw:line>
        <draw:line draw:style-name="gr1183" draw:text-style-name="P4" draw:layer="layout" svg:x1="25.999cm" svg:y1="4cm" svg:x2="25.999cm" svg:y2="20cm">
          <text:p/>
        </draw:line>
        <draw:line draw:style-name="gr1183" draw:text-style-name="P4" draw:layer="layout" svg:x1="29.999cm" svg:y1="4cm" svg:x2="29.999cm" svg:y2="20cm">
          <text:p/>
        </draw:line>
        <draw:line draw:style-name="gr1183" draw:text-style-name="P4" draw:layer="layout" svg:x1="33.999cm" svg:y1="4cm" svg:x2="33.999cm" svg:y2="20cm">
          <text:p/>
        </draw:line>
        <draw:frame draw:style-name="gr1184" draw:text-style-name="P3" draw:layer="layout" svg:width="1.949cm" svg:height="0.962cm" svg:x="7.053cm" svg:y="2cm">
          <draw:text-box>
            <text:p>CC 1</text:p>
          </draw:text-box>
        </draw:frame>
        <draw:frame draw:style-name="gr1184" draw:text-style-name="P3" draw:layer="layout" svg:width="1.949cm" svg:height="0.962cm" svg:x="11.053cm" svg:y="2cm">
          <draw:text-box>
            <text:p>CC 2</text:p>
          </draw:text-box>
        </draw:frame>
        <draw:frame draw:style-name="gr1184" draw:text-style-name="P3" draw:layer="layout" svg:width="1.949cm" svg:height="0.962cm" svg:x="15.053cm" svg:y="2cm">
          <draw:text-box>
            <text:p>CC 3</text:p>
          </draw:text-box>
        </draw:frame>
        <draw:frame draw:style-name="gr1184" draw:text-style-name="P3" draw:layer="layout" svg:width="1.949cm" svg:height="0.962cm" svg:x="23.053cm" svg:y="2cm">
          <draw:text-box>
            <text:p>CC 5</text:p>
          </draw:text-box>
        </draw:frame>
        <draw:frame draw:style-name="gr1184" draw:text-style-name="P3" draw:layer="layout" svg:width="1.949cm" svg:height="0.962cm" svg:x="27.053cm" svg:y="2cm">
          <draw:text-box>
            <text:p>CC 6</text:p>
          </draw:text-box>
        </draw:frame>
        <draw:frame draw:style-name="gr1184" draw:text-style-name="P3" draw:layer="layout" svg:width="1.949cm" svg:height="0.962cm" svg:x="31.053cm" svg:y="2cm">
          <draw:text-box>
            <text:p>CC 7</text:p>
          </draw:text-box>
        </draw:frame>
        <draw:frame draw:style-name="gr1184" draw:text-style-name="P3" draw:layer="layout" svg:width="1.949cm" svg:height="0.962cm" svg:x="18.999cm" svg:y="2cm">
          <draw:text-box>
            <text:p>CC 4</text:p>
          </draw:text-box>
        </draw:frame>
        <draw:g draw:style-name="gr1">
          <draw:g draw:style-name="gr1">
            <draw:custom-shape draw:style-name="gr1176" draw:text-style-name="P91" draw:layer="layout" svg:width="1cm" svg:height="2cm" svg:x="18.999cm" svg:y="5cm">
              <text:p/>
              <draw:enhanced-geometry svg:viewBox="0 0 21600 21600" draw:mirror-horizontal="false" draw:mirror-vertical="false" draw:type="rectangle" draw:enhanced-path="M 0 0 L 21600 0 21600 21600 0 21600 0 0 Z N"/>
            </draw:custom-shape>
            <draw:custom-shape draw:style-name="gr1186" draw:text-style-name="P92" draw:layer="layout" svg:width="1cm" svg:height="2cm" svg:x="19.999cm" svg:y="5cm">
              <text:p/>
              <draw:enhanced-geometry svg:viewBox="0 0 21600 21600" draw:mirror-horizontal="false" draw:mirror-vertical="false" draw:type="rectangle" draw:enhanced-path="M 0 0 L 21600 0 21600 21600 0 21600 0 0 Z N"/>
            </draw:custom-shape>
          </draw:g>
          <draw:frame draw:style-name="gr1187" draw:text-style-name="P81" draw:layer="layout" svg:width="1.272cm" svg:height="0.806cm" svg:x="19.365cm" svg:y="5.599cm">
            <draw:text-box>
              <text:p><text:span text:style-name="T27">DM</text:span></text:p>
            </draw:text-box>
          </draw:frame>
        </draw:g>
        <draw:line draw:style-name="gr1209" draw:text-style-name="P4" draw:layer="layout" svg:x1="18.499cm" svg:y1="6cm" svg:x2="18.499cm" svg:y2="7.2cm">
          <text:p/>
        </draw:line>
        <draw:line draw:style-name="gr1209" draw:text-style-name="P4" draw:layer="layout" svg:x1="18.499cm" svg:y1="7.2cm" svg:x2="21.499cm" svg:y2="7.2cm">
          <text:p/>
        </draw:line>
        <draw:line draw:style-name="gr1209" draw:text-style-name="P4" draw:layer="layout" svg:x1="21.499cm" svg:y1="7.2cm" svg:x2="21.999cm" svg:y2="6cm">
          <text:p/>
        </draw:line>
        <draw:g draw:style-name="gr1">
          <draw:g draw:style-name="gr1">
            <draw:custom-shape draw:style-name="gr1176" draw:text-style-name="P91" draw:layer="layout" svg:width="1cm" svg:height="2cm" svg:x="22.999cm" svg:y="8cm">
              <text:p/>
              <draw:enhanced-geometry svg:viewBox="0 0 21600 21600" draw:mirror-horizontal="false" draw:mirror-vertical="false" draw:type="rectangle" draw:enhanced-path="M 0 0 L 21600 0 21600 21600 0 21600 0 0 Z N"/>
            </draw:custom-shape>
            <draw:custom-shape draw:style-name="gr1186" draw:text-style-name="P92" draw:layer="layout" svg:width="1cm" svg:height="2cm" svg:x="23.999cm" svg:y="8cm">
              <text:p/>
              <draw:enhanced-geometry svg:viewBox="0 0 21600 21600" draw:mirror-horizontal="false" draw:mirror-vertical="false" draw:type="rectangle" draw:enhanced-path="M 0 0 L 21600 0 21600 21600 0 21600 0 0 Z N"/>
            </draw:custom-shape>
          </draw:g>
          <draw:frame draw:style-name="gr1187" draw:text-style-name="P81" draw:layer="layout" svg:width="1.272cm" svg:height="0.806cm" svg:x="23.365cm" svg:y="8.599cm">
            <draw:text-box>
              <text:p><text:span text:style-name="T27">DM</text:span></text:p>
            </draw:text-box>
          </draw:frame>
        </draw:g>
        <draw:line draw:style-name="gr1209" draw:text-style-name="P4" draw:layer="layout" svg:x1="22.499cm" svg:y1="9cm" svg:x2="22.499cm" svg:y2="10.2cm">
          <text:p/>
        </draw:line>
        <draw:line draw:style-name="gr1209" draw:text-style-name="P4" draw:layer="layout" svg:x1="22.499cm" svg:y1="10.2cm" svg:x2="25.499cm" svg:y2="10.2cm">
          <text:p/>
        </draw:line>
        <draw:line draw:style-name="gr1209" draw:text-style-name="P4" draw:layer="layout" svg:x1="25.499cm" svg:y1="10.2cm" svg:x2="25.999cm" svg:y2="9cm">
          <text:p/>
        </draw:line>
        <draw:g draw:style-name="gr66">
          <draw:polygon draw:style-name="gr1174" draw:text-style-name="P90" draw:layer="layout" svg:width="1.999cm" svg:height="2.999cm" svg:x="22.999cm" svg:y="10.5cm" svg:viewBox="0 0 2000 3000" draw:points="0,0 0,1100 400,1500 0,1900 0,3000 2000,2000 2000,1000">
            <text:p/>
          </draw:polygon>
          <draw:frame draw:style-name="gr1175" draw:text-style-name="P81" draw:layer="layout" svg:width="1.466cm" svg:height="0.806cm" svg:x="23.399cm" svg:y="11.594cm">
            <draw:text-box>
              <text:p><text:span text:style-name="T27">ALU</text:span></text:p>
            </draw:text-box>
          </draw:frame>
        </draw:g>
        <draw:g draw:style-name="gr1">
          <draw:g draw:style-name="gr1">
            <draw:custom-shape draw:style-name="gr1176" draw:text-style-name="P14" draw:layer="layout" svg:width="1cm" svg:height="2cm" svg:x="14.999cm" svg:y="11cm">
              <text:p/>
              <draw:enhanced-geometry svg:viewBox="0 0 21600 21600" draw:type="rectangle" draw:enhanced-path="M 0 0 L 21600 0 21600 21600 0 21600 0 0 Z N"/>
            </draw:custom-shape>
            <draw:custom-shape draw:style-name="gr1177" draw:text-style-name="P1" draw:layer="layout" svg:width="1cm" svg:height="2cm" svg:x="15.999cm" svg:y="11cm">
              <text:p/>
              <draw:enhanced-geometry svg:viewBox="0 0 21600 21600" draw:type="rectangle" draw:enhanced-path="M 0 0 L 21600 0 21600 21600 0 21600 0 0 Z N"/>
            </draw:custom-shape>
          </draw:g>
          <draw:g draw:style-name="gr66">
            <draw:frame draw:style-name="gr1178" draw:text-style-name="P81" draw:layer="layout" svg:width="1.052cm" svg:height="0.806cm" svg:x="15.528cm" svg:y="11.597cm">
              <draw:text-box>
                <text:p><text:span text:style-name="T27">IM</text:span></text:p>
              </draw:text-box>
            </draw:frame>
          </draw:g>
        </draw:g>
        <draw:g draw:style-name="gr1">
          <draw:g draw:style-name="gr1">
            <draw:custom-shape draw:style-name="gr1179" draw:text-style-name="P14" draw:layer="layout" svg:width="1cm" svg:height="2cm" svg:x="18.999cm" svg:y="11cm">
              <text:p/>
              <draw:enhanced-geometry svg:viewBox="0 0 21600 21600" draw:type="rectangle" draw:enhanced-path="M 0 0 L 21600 0 21600 21600 0 21600 0 0 Z N"/>
            </draw:custom-shape>
            <draw:custom-shape draw:style-name="gr1177" draw:text-style-name="P1" draw:layer="layout" svg:width="1cm" svg:height="2cm" svg:x="19.999cm" svg:y="11cm">
              <text:p/>
              <draw:enhanced-geometry svg:viewBox="0 0 21600 21600" draw:type="rectangle" draw:enhanced-path="M 0 0 L 21600 0 21600 21600 0 21600 0 0 Z N"/>
            </draw:custom-shape>
          </draw:g>
          <draw:g draw:style-name="gr66">
            <draw:frame draw:style-name="gr1181" draw:text-style-name="P81" draw:layer="layout" svg:width="1.575cm" svg:height="0.806cm" svg:x="19.528cm" svg:y="11.597cm">
              <draw:text-box>
                <text:p><text:span text:style-name="T27">REG</text:span></text:p>
              </draw:text-box>
            </draw:frame>
          </draw:g>
        </draw:g>
        <draw:g draw:style-name="gr1">
          <draw:g draw:style-name="gr1">
            <draw:custom-shape draw:style-name="gr1179" draw:text-style-name="P14" draw:layer="layout" svg:width="1cm" svg:height="2cm" svg:x="31.999cm" svg:y="11cm">
              <text:p/>
              <draw:enhanced-geometry svg:viewBox="0 0 21600 21600" draw:mirror-horizontal="true" draw:type="rectangle" draw:enhanced-path="M 0 0 L 21600 0 21600 21600 0 21600 0 0 Z N"/>
            </draw:custom-shape>
            <draw:custom-shape draw:style-name="gr1177" draw:text-style-name="P1" draw:layer="layout" svg:width="1cm" svg:height="2cm" svg:x="30.999cm" svg:y="11cm">
              <text:p/>
              <draw:enhanced-geometry svg:viewBox="0 0 21600 21600" draw:mirror-horizontal="true" draw:type="rectangle" draw:enhanced-path="M 0 0 L 21600 0 21600 21600 0 21600 0 0 Z N"/>
            </draw:custom-shape>
          </draw:g>
          <draw:g draw:style-name="gr66">
            <draw:frame draw:style-name="gr1180" draw:text-style-name="P81" draw:layer="layout" svg:width="1.411cm" svg:height="0.806cm" svg:x="31.35cm" svg:y="11.597cm">
              <draw:text-box>
                <text:p><text:span text:style-name="T27">Reg</text:span></text:p>
              </draw:text-box>
            </draw:frame>
          </draw:g>
        </draw:g>
        <draw:line draw:style-name="gr38" draw:text-style-name="P4" draw:layer="layout" svg:x1="16.999cm" svg:y1="12cm" svg:x2="18.999cm" svg:y2="12cm">
          <text:p/>
        </draw:line>
        <draw:line draw:style-name="gr38" draw:text-style-name="P4" draw:layer="layout" svg:x1="18.499cm" svg:y1="12cm" svg:x2="18.499cm" svg:y2="11.5cm">
          <text:p/>
        </draw:line>
        <draw:line draw:style-name="gr38" draw:text-style-name="P4" draw:layer="layout" svg:x1="18.499cm" svg:y1="11.5cm" svg:x2="18.999cm" svg:y2="11.5cm">
          <text:p/>
        </draw:line>
        <draw:line draw:style-name="gr38" draw:text-style-name="P4" draw:layer="layout" svg:x1="20.999cm" svg:y1="11.5cm" svg:x2="22.999cm" svg:y2="11.5cm">
          <text:p/>
        </draw:line>
        <draw:line draw:style-name="gr38" draw:text-style-name="P4" draw:layer="layout" svg:x1="20.999cm" svg:y1="12.5cm" svg:x2="22.999cm" svg:y2="12.5cm">
          <text:p/>
        </draw:line>
        <draw:line draw:style-name="gr38" draw:text-style-name="P4" draw:layer="layout" svg:x1="24.999cm" svg:y1="12cm" svg:x2="26.999cm" svg:y2="12cm">
          <text:p/>
        </draw:line>
        <draw:line draw:style-name="gr38" draw:text-style-name="P4" draw:layer="layout" svg:x1="28.999cm" svg:y1="12cm" svg:x2="30.999cm" svg:y2="12cm">
          <text:p/>
        </draw:line>
        <draw:g draw:style-name="gr1">
          <draw:g draw:style-name="gr1">
            <draw:custom-shape draw:style-name="gr1176" draw:text-style-name="P91" draw:layer="layout" svg:width="1cm" svg:height="2cm" svg:x="26.999cm" svg:y="11cm">
              <text:p/>
              <draw:enhanced-geometry svg:viewBox="0 0 21600 21600" draw:mirror-horizontal="false" draw:mirror-vertical="false" draw:type="rectangle" draw:enhanced-path="M 0 0 L 21600 0 21600 21600 0 21600 0 0 Z N"/>
            </draw:custom-shape>
            <draw:custom-shape draw:style-name="gr1186" draw:text-style-name="P92" draw:layer="layout" svg:width="1cm" svg:height="2cm" svg:x="27.999cm" svg:y="11cm">
              <text:p/>
              <draw:enhanced-geometry svg:viewBox="0 0 21600 21600" draw:mirror-horizontal="false" draw:mirror-vertical="false" draw:type="rectangle" draw:enhanced-path="M 0 0 L 21600 0 21600 21600 0 21600 0 0 Z N"/>
            </draw:custom-shape>
          </draw:g>
          <draw:frame draw:style-name="gr1187" draw:text-style-name="P81" draw:layer="layout" svg:width="1.272cm" svg:height="0.806cm" svg:x="27.365cm" svg:y="11.599cm">
            <draw:text-box>
              <text:p><text:span text:style-name="T27">DM</text:span></text:p>
            </draw:text-box>
          </draw:frame>
        </draw:g>
        <draw:line draw:style-name="gr38" draw:text-style-name="P4" draw:layer="layout" svg:x1="26.499cm" svg:y1="12cm" svg:x2="26.499cm" svg:y2="13.2cm">
          <text:p/>
        </draw:line>
        <draw:line draw:style-name="gr38" draw:text-style-name="P4" draw:layer="layout" svg:x1="26.499cm" svg:y1="13.2cm" svg:x2="29.499cm" svg:y2="13.2cm">
          <text:p/>
        </draw:line>
        <draw:line draw:style-name="gr38" draw:text-style-name="P4" draw:layer="layout" svg:x1="29.499cm" svg:y1="13.2cm" svg:x2="29.999cm" svg:y2="12cm">
          <text:p/>
        </draw:line>
        <draw:frame draw:style-name="gr22" draw:text-style-name="P3" draw:layer="layout" svg:width="3.501cm" svg:height="0.962cm" svg:x="15.699cm" svg:y="1cm">
          <draw:text-box>
            <text:p>addi → slli</text:p>
          </draw:text-box>
        </draw:frame>
        <draw:line draw:style-name="gr1183" draw:text-style-name="P4" draw:layer="layout" svg:x1="37.999cm" svg:y1="4cm" svg:x2="37.999cm" svg:y2="20cm">
          <text:p/>
        </draw:line>
        <draw:g draw:style-name="gr66">
          <draw:polygon draw:style-name="gr1174" draw:text-style-name="P90" draw:layer="layout" svg:width="1.999cm" svg:height="2.999cm" svg:x="26.999cm" svg:y="13.5cm" svg:viewBox="0 0 2000 3000" draw:points="0,0 0,1100 400,1500 0,1900 0,3000 2000,2000 2000,1000">
            <text:p/>
          </draw:polygon>
          <draw:frame draw:style-name="gr1175" draw:text-style-name="P81" draw:layer="layout" svg:width="1.466cm" svg:height="0.806cm" svg:x="27.399cm" svg:y="14.594cm">
            <draw:text-box>
              <text:p><text:span text:style-name="T27">ALU</text:span></text:p>
            </draw:text-box>
          </draw:frame>
        </draw:g>
        <draw:g draw:style-name="gr1">
          <draw:g draw:style-name="gr1">
            <draw:custom-shape draw:style-name="gr1176" draw:text-style-name="P14" draw:layer="layout" svg:width="1cm" svg:height="2cm" svg:x="18.999cm" svg:y="14cm">
              <text:p/>
              <draw:enhanced-geometry svg:viewBox="0 0 21600 21600" draw:type="rectangle" draw:enhanced-path="M 0 0 L 21600 0 21600 21600 0 21600 0 0 Z N"/>
            </draw:custom-shape>
            <draw:custom-shape draw:style-name="gr1177" draw:text-style-name="P1" draw:layer="layout" svg:width="1cm" svg:height="2cm" svg:x="19.999cm" svg:y="14cm">
              <text:p/>
              <draw:enhanced-geometry svg:viewBox="0 0 21600 21600" draw:type="rectangle" draw:enhanced-path="M 0 0 L 21600 0 21600 21600 0 21600 0 0 Z N"/>
            </draw:custom-shape>
          </draw:g>
          <draw:g draw:style-name="gr66">
            <draw:frame draw:style-name="gr1178" draw:text-style-name="P81" draw:layer="layout" svg:width="1.052cm" svg:height="0.806cm" svg:x="19.528cm" svg:y="14.597cm">
              <draw:text-box>
                <text:p><text:span text:style-name="T27">IM</text:span></text:p>
              </draw:text-box>
            </draw:frame>
          </draw:g>
        </draw:g>
        <draw:g draw:style-name="gr1">
          <draw:g draw:style-name="gr1">
            <draw:custom-shape draw:style-name="gr1179" draw:text-style-name="P14" draw:layer="layout" svg:width="1cm" svg:height="2cm" svg:x="22.999cm" svg:y="14cm">
              <text:p/>
              <draw:enhanced-geometry svg:viewBox="0 0 21600 21600" draw:type="rectangle" draw:enhanced-path="M 0 0 L 21600 0 21600 21600 0 21600 0 0 Z N"/>
            </draw:custom-shape>
            <draw:custom-shape draw:style-name="gr1177" draw:text-style-name="P1" draw:layer="layout" svg:width="1cm" svg:height="2cm" svg:x="23.999cm" svg:y="14cm">
              <text:p/>
              <draw:enhanced-geometry svg:viewBox="0 0 21600 21600" draw:type="rectangle" draw:enhanced-path="M 0 0 L 21600 0 21600 21600 0 21600 0 0 Z N"/>
            </draw:custom-shape>
          </draw:g>
          <draw:g draw:style-name="gr66">
            <draw:frame draw:style-name="gr1181" draw:text-style-name="P81" draw:layer="layout" svg:width="1.575cm" svg:height="0.806cm" svg:x="23.528cm" svg:y="14.597cm">
              <draw:text-box>
                <text:p><text:span text:style-name="T27">REG</text:span></text:p>
              </draw:text-box>
            </draw:frame>
          </draw:g>
        </draw:g>
        <draw:g draw:style-name="gr1">
          <draw:g draw:style-name="gr1">
            <draw:custom-shape draw:style-name="gr1179" draw:text-style-name="P14" draw:layer="layout" svg:width="1cm" svg:height="2cm" svg:x="35.999cm" svg:y="14cm">
              <text:p/>
              <draw:enhanced-geometry svg:viewBox="0 0 21600 21600" draw:mirror-horizontal="true" draw:type="rectangle" draw:enhanced-path="M 0 0 L 21600 0 21600 21600 0 21600 0 0 Z N"/>
            </draw:custom-shape>
            <draw:custom-shape draw:style-name="gr1177" draw:text-style-name="P1" draw:layer="layout" svg:width="1cm" svg:height="2cm" svg:x="34.999cm" svg:y="14cm">
              <text:p/>
              <draw:enhanced-geometry svg:viewBox="0 0 21600 21600" draw:mirror-horizontal="true" draw:type="rectangle" draw:enhanced-path="M 0 0 L 21600 0 21600 21600 0 21600 0 0 Z N"/>
            </draw:custom-shape>
          </draw:g>
          <draw:g draw:style-name="gr66">
            <draw:frame draw:style-name="gr1180" draw:text-style-name="P81" draw:layer="layout" svg:width="1.411cm" svg:height="0.806cm" svg:x="35.35cm" svg:y="14.597cm">
              <draw:text-box>
                <text:p><text:span text:style-name="T27">Reg</text:span></text:p>
              </draw:text-box>
            </draw:frame>
          </draw:g>
        </draw:g>
        <draw:line draw:style-name="gr38" draw:text-style-name="P4" draw:layer="layout" svg:x1="20.999cm" svg:y1="15cm" svg:x2="22.999cm" svg:y2="15cm">
          <text:p/>
        </draw:line>
        <draw:line draw:style-name="gr38" draw:text-style-name="P4" draw:layer="layout" svg:x1="22.499cm" svg:y1="15cm" svg:x2="22.499cm" svg:y2="14.5cm">
          <text:p/>
        </draw:line>
        <draw:line draw:style-name="gr38" draw:text-style-name="P4" draw:layer="layout" svg:x1="22.499cm" svg:y1="14.5cm" svg:x2="22.999cm" svg:y2="14.5cm">
          <text:p/>
        </draw:line>
        <draw:line draw:style-name="gr38" draw:text-style-name="P4" draw:layer="layout" svg:x1="24.999cm" svg:y1="14.5cm" svg:x2="26.999cm" svg:y2="14.5cm">
          <text:p/>
        </draw:line>
        <draw:line draw:style-name="gr38" draw:text-style-name="P4" draw:layer="layout" svg:x1="24.999cm" svg:y1="15.5cm" svg:x2="26.999cm" svg:y2="15.5cm">
          <text:p/>
        </draw:line>
        <draw:line draw:style-name="gr38" draw:text-style-name="P4" draw:layer="layout" svg:x1="28.999cm" svg:y1="15cm" svg:x2="30.999cm" svg:y2="15cm">
          <text:p/>
        </draw:line>
        <draw:line draw:style-name="gr38" draw:text-style-name="P4" draw:layer="layout" svg:x1="32.999cm" svg:y1="15cm" svg:x2="34.999cm" svg:y2="15cm">
          <text:p/>
        </draw:line>
        <draw:g draw:style-name="gr1">
          <draw:g draw:style-name="gr1">
            <draw:custom-shape draw:style-name="gr1176" draw:text-style-name="P91" draw:layer="layout" svg:width="1cm" svg:height="2cm" svg:x="30.999cm" svg:y="14cm">
              <text:p/>
              <draw:enhanced-geometry svg:viewBox="0 0 21600 21600" draw:mirror-horizontal="false" draw:mirror-vertical="false" draw:type="rectangle" draw:enhanced-path="M 0 0 L 21600 0 21600 21600 0 21600 0 0 Z N"/>
            </draw:custom-shape>
            <draw:custom-shape draw:style-name="gr1186" draw:text-style-name="P92" draw:layer="layout" svg:width="1cm" svg:height="2cm" svg:x="31.999cm" svg:y="14cm">
              <text:p/>
              <draw:enhanced-geometry svg:viewBox="0 0 21600 21600" draw:mirror-horizontal="false" draw:mirror-vertical="false" draw:type="rectangle" draw:enhanced-path="M 0 0 L 21600 0 21600 21600 0 21600 0 0 Z N"/>
            </draw:custom-shape>
          </draw:g>
          <draw:frame draw:style-name="gr1187" draw:text-style-name="P81" draw:layer="layout" svg:width="1.272cm" svg:height="0.806cm" svg:x="31.365cm" svg:y="14.599cm">
            <draw:text-box>
              <text:p><text:span text:style-name="T27">DM</text:span></text:p>
            </draw:text-box>
          </draw:frame>
        </draw:g>
        <draw:line draw:style-name="gr38" draw:text-style-name="P4" draw:layer="layout" svg:x1="30.499cm" svg:y1="15cm" svg:x2="30.499cm" svg:y2="16.2cm">
          <text:p/>
        </draw:line>
        <draw:line draw:style-name="gr38" draw:text-style-name="P4" draw:layer="layout" svg:x1="30.499cm" svg:y1="16.2cm" svg:x2="33.499cm" svg:y2="16.2cm">
          <text:p/>
        </draw:line>
        <draw:line draw:style-name="gr38" draw:text-style-name="P4" draw:layer="layout" svg:x1="33.499cm" svg:y1="16.2cm" svg:x2="33.999cm" svg:y2="15cm">
          <text:p/>
        </draw:line>
        <draw:g draw:style-name="gr66">
          <draw:polygon draw:style-name="gr1174" draw:text-style-name="P90" draw:layer="layout" svg:width="1.999cm" svg:height="2.999cm" svg:x="30.999cm" svg:y="16.5cm" svg:viewBox="0 0 2000 3000" draw:points="0,0 0,1100 400,1500 0,1900 0,3000 2000,2000 2000,1000">
            <text:p/>
          </draw:polygon>
          <draw:frame draw:style-name="gr1175" draw:text-style-name="P81" draw:layer="layout" svg:width="1.466cm" svg:height="0.806cm" svg:x="31.399cm" svg:y="17.594cm">
            <draw:text-box>
              <text:p><text:span text:style-name="T27">ALU</text:span></text:p>
            </draw:text-box>
          </draw:frame>
        </draw:g>
        <draw:g draw:style-name="gr1">
          <draw:g draw:style-name="gr1">
            <draw:custom-shape draw:style-name="gr1176" draw:text-style-name="P14" draw:layer="layout" svg:width="1cm" svg:height="2cm" svg:x="22.999cm" svg:y="17cm">
              <text:p/>
              <draw:enhanced-geometry svg:viewBox="0 0 21600 21600" draw:type="rectangle" draw:enhanced-path="M 0 0 L 21600 0 21600 21600 0 21600 0 0 Z N"/>
            </draw:custom-shape>
            <draw:custom-shape draw:style-name="gr1177" draw:text-style-name="P1" draw:layer="layout" svg:width="1cm" svg:height="2cm" svg:x="23.999cm" svg:y="17cm">
              <text:p/>
              <draw:enhanced-geometry svg:viewBox="0 0 21600 21600" draw:type="rectangle" draw:enhanced-path="M 0 0 L 21600 0 21600 21600 0 21600 0 0 Z N"/>
            </draw:custom-shape>
          </draw:g>
          <draw:g draw:style-name="gr66">
            <draw:frame draw:style-name="gr1178" draw:text-style-name="P81" draw:layer="layout" svg:width="1.052cm" svg:height="0.806cm" svg:x="23.528cm" svg:y="17.597cm">
              <draw:text-box>
                <text:p><text:span text:style-name="T27">IM</text:span></text:p>
              </draw:text-box>
            </draw:frame>
          </draw:g>
        </draw:g>
        <draw:g draw:style-name="gr1">
          <draw:g draw:style-name="gr1">
            <draw:custom-shape draw:style-name="gr1179" draw:text-style-name="P14" draw:layer="layout" svg:width="1cm" svg:height="2cm" svg:x="26.999cm" svg:y="17cm">
              <text:p/>
              <draw:enhanced-geometry svg:viewBox="0 0 21600 21600" draw:type="rectangle" draw:enhanced-path="M 0 0 L 21600 0 21600 21600 0 21600 0 0 Z N"/>
            </draw:custom-shape>
            <draw:custom-shape draw:style-name="gr1177" draw:text-style-name="P1" draw:layer="layout" svg:width="1cm" svg:height="2cm" svg:x="27.999cm" svg:y="17cm">
              <text:p/>
              <draw:enhanced-geometry svg:viewBox="0 0 21600 21600" draw:type="rectangle" draw:enhanced-path="M 0 0 L 21600 0 21600 21600 0 21600 0 0 Z N"/>
            </draw:custom-shape>
          </draw:g>
          <draw:g draw:style-name="gr66">
            <draw:frame draw:style-name="gr1181" draw:text-style-name="P81" draw:layer="layout" svg:width="1.575cm" svg:height="0.806cm" svg:x="27.528cm" svg:y="17.597cm">
              <draw:text-box>
                <text:p><text:span text:style-name="T27">REG</text:span></text:p>
              </draw:text-box>
            </draw:frame>
          </draw:g>
        </draw:g>
        <draw:g draw:style-name="gr1">
          <draw:g draw:style-name="gr1">
            <draw:custom-shape draw:style-name="gr1179" draw:text-style-name="P14" draw:layer="layout" svg:width="1cm" svg:height="2cm" svg:x="39.999cm" svg:y="17cm">
              <text:p/>
              <draw:enhanced-geometry svg:viewBox="0 0 21600 21600" draw:mirror-horizontal="true" draw:type="rectangle" draw:enhanced-path="M 0 0 L 21600 0 21600 21600 0 21600 0 0 Z N"/>
            </draw:custom-shape>
            <draw:custom-shape draw:style-name="gr1177" draw:text-style-name="P1" draw:layer="layout" svg:width="1cm" svg:height="2cm" svg:x="38.999cm" svg:y="17cm">
              <text:p/>
              <draw:enhanced-geometry svg:viewBox="0 0 21600 21600" draw:mirror-horizontal="true" draw:type="rectangle" draw:enhanced-path="M 0 0 L 21600 0 21600 21600 0 21600 0 0 Z N"/>
            </draw:custom-shape>
          </draw:g>
          <draw:g draw:style-name="gr66">
            <draw:frame draw:style-name="gr1180" draw:text-style-name="P81" draw:layer="layout" svg:width="1.411cm" svg:height="0.806cm" svg:x="39.35cm" svg:y="17.597cm">
              <draw:text-box>
                <text:p><text:span text:style-name="T27">Reg</text:span></text:p>
              </draw:text-box>
            </draw:frame>
          </draw:g>
        </draw:g>
        <draw:line draw:style-name="gr38" draw:text-style-name="P4" draw:layer="layout" svg:x1="24.999cm" svg:y1="18cm" svg:x2="26.999cm" svg:y2="18cm">
          <text:p/>
        </draw:line>
        <draw:line draw:style-name="gr38" draw:text-style-name="P4" draw:layer="layout" svg:x1="26.499cm" svg:y1="18cm" svg:x2="26.499cm" svg:y2="17.5cm">
          <text:p/>
        </draw:line>
        <draw:line draw:style-name="gr38" draw:text-style-name="P4" draw:layer="layout" svg:x1="26.499cm" svg:y1="17.5cm" svg:x2="26.999cm" svg:y2="17.5cm">
          <text:p/>
        </draw:line>
        <draw:line draw:style-name="gr38" draw:text-style-name="P4" draw:layer="layout" svg:x1="28.999cm" svg:y1="17.5cm" svg:x2="30.999cm" svg:y2="17.5cm">
          <text:p/>
        </draw:line>
        <draw:line draw:style-name="gr38" draw:text-style-name="P4" draw:layer="layout" svg:x1="28.999cm" svg:y1="18.5cm" svg:x2="30.999cm" svg:y2="18.5cm">
          <text:p/>
        </draw:line>
        <draw:line draw:style-name="gr38" draw:text-style-name="P4" draw:layer="layout" svg:x1="32.999cm" svg:y1="18cm" svg:x2="34.999cm" svg:y2="18cm">
          <text:p/>
        </draw:line>
        <draw:line draw:style-name="gr38" draw:text-style-name="P4" draw:layer="layout" svg:x1="36.999cm" svg:y1="18cm" svg:x2="38.999cm" svg:y2="18cm">
          <text:p/>
        </draw:line>
        <draw:g draw:style-name="gr1">
          <draw:g draw:style-name="gr1">
            <draw:custom-shape draw:style-name="gr1176" draw:text-style-name="P91" draw:layer="layout" svg:width="1cm" svg:height="2cm" svg:x="34.999cm" svg:y="17cm">
              <text:p/>
              <draw:enhanced-geometry svg:viewBox="0 0 21600 21600" draw:mirror-horizontal="false" draw:mirror-vertical="false" draw:type="rectangle" draw:enhanced-path="M 0 0 L 21600 0 21600 21600 0 21600 0 0 Z N"/>
            </draw:custom-shape>
            <draw:custom-shape draw:style-name="gr1186" draw:text-style-name="P92" draw:layer="layout" svg:width="1cm" svg:height="2cm" svg:x="35.999cm" svg:y="17cm">
              <text:p/>
              <draw:enhanced-geometry svg:viewBox="0 0 21600 21600" draw:mirror-horizontal="false" draw:mirror-vertical="false" draw:type="rectangle" draw:enhanced-path="M 0 0 L 21600 0 21600 21600 0 21600 0 0 Z N"/>
            </draw:custom-shape>
          </draw:g>
          <draw:frame draw:style-name="gr1187" draw:text-style-name="P81" draw:layer="layout" svg:width="1.272cm" svg:height="0.806cm" svg:x="35.365cm" svg:y="17.599cm">
            <draw:text-box>
              <text:p><text:span text:style-name="T27">DM</text:span></text:p>
            </draw:text-box>
          </draw:frame>
        </draw:g>
        <draw:line draw:style-name="gr38" draw:text-style-name="P4" draw:layer="layout" svg:x1="34.499cm" svg:y1="18cm" svg:x2="34.499cm" svg:y2="19.2cm">
          <text:p/>
        </draw:line>
        <draw:line draw:style-name="gr38" draw:text-style-name="P4" draw:layer="layout" svg:x1="34.499cm" svg:y1="19.2cm" svg:x2="37.499cm" svg:y2="19.2cm">
          <text:p/>
        </draw:line>
        <draw:line draw:style-name="gr38" draw:text-style-name="P4" draw:layer="layout" svg:x1="37.499cm" svg:y1="19.2cm" svg:x2="37.999cm" svg:y2="18cm">
          <text:p/>
        </draw:line>
        <draw:custom-shape draw:style-name="gr1189" draw:text-style-name="P4" draw:layer="layout" svg:width="2.6cm" svg:height="2.6cm" svg:x="22.6cm" svg:y="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90" draw:text-style-name="P93" draw:layer="layout" svg:width="1.173cm" svg:height="0.962cm" svg:x="23.129cm" svg:y="6.1cm">
          <draw:text-box>
            <text:p><text:span text:style-name="T34">x2</text:span></text:p>
          </draw:text-box>
        </draw:frame>
        <draw:frame draw:style-name="gr1210" draw:text-style-name="P94" draw:layer="layout" svg:width="2.479cm" svg:height="0.569cm" svg:x="9.8cm" svg:y="3.901cm">
          <draw:text-box>
            <text:p><text:span text:style-name="T35">if_id_reg_rd=2</text:span></text:p>
          </draw:text-box>
        </draw:frame>
        <draw:frame draw:style-name="gr1211" draw:text-style-name="P94" draw:layer="layout" svg:width="2.465cm" svg:height="0.569cm" svg:x="9.8cm" svg:y="4.231cm">
          <draw:text-box>
            <text:p><text:span text:style-name="T35">if_id_reg_rs1=0</text:span></text:p>
          </draw:text-box>
        </draw:frame>
        <draw:frame draw:style-name="gr1212" draw:text-style-name="P94" draw:layer="layout" svg:width="2.462cm" svg:height="0.569cm" svg:x="9.8cm" svg:y="4.532cm">
          <draw:text-box>
            <text:p><text:span text:style-name="T35">if_id_reg_rs2=-</text:span></text:p>
          </draw:text-box>
        </draw:frame>
        <draw:frame draw:style-name="gr1210" draw:text-style-name="P94" draw:layer="layout" svg:width="2.479cm" svg:height="0.569cm" svg:x="13.801cm" svg:y="6.901cm">
          <draw:text-box>
            <text:p><text:span text:style-name="T35">if_id_reg_rd=2</text:span></text:p>
          </draw:text-box>
        </draw:frame>
        <draw:frame draw:style-name="gr1211" draw:text-style-name="P94" draw:layer="layout" svg:width="2.465cm" svg:height="0.569cm" svg:x="13.801cm" svg:y="7.231cm">
          <draw:text-box>
            <text:p><text:span text:style-name="T35">if_id_reg_rs1=2</text:span></text:p>
          </draw:text-box>
        </draw:frame>
        <draw:frame draw:style-name="gr1212" draw:text-style-name="P94" draw:layer="layout" svg:width="2.462cm" svg:height="0.569cm" svg:x="13.801cm" svg:y="7.532cm">
          <draw:text-box>
            <text:p><text:span text:style-name="T35">if_id_reg_rs2=-</text:span></text:p>
          </draw:text-box>
        </draw:frame>
        <draw:frame draw:style-name="gr1213" draw:text-style-name="P94" draw:layer="layout" svg:width="2.481cm" svg:height="0.569cm" svg:x="13.801cm" svg:y="3.901cm">
          <draw:text-box>
            <text:p><text:span text:style-name="T35">id_ex_reg_rd=2</text:span></text:p>
          </draw:text-box>
        </draw:frame>
        <draw:frame draw:style-name="gr1214" draw:text-style-name="P94" draw:layer="layout" svg:width="2.623cm" svg:height="0.569cm" svg:x="13.801cm" svg:y="4.231cm">
          <draw:text-box>
            <text:p><text:span text:style-name="T35">id_ex_reg_rs1=0</text:span></text:p>
          </draw:text-box>
        </draw:frame>
        <draw:frame draw:style-name="gr1215" draw:text-style-name="P94" draw:layer="layout" svg:width="2.56cm" svg:height="0.569cm" svg:x="13.801cm" svg:y="4.532cm">
          <draw:text-box>
            <text:p><text:span text:style-name="T35">id_ex_reg_rs2=-</text:span></text:p>
          </draw:text-box>
        </draw:frame>
        <draw:frame draw:style-name="gr1216" draw:text-style-name="P89" draw:layer="layout" svg:width="2.891cm" svg:height="0.569cm" svg:x="17.802cm" svg:y="3.901cm">
          <draw:text-box>
            <text:p><text:span text:style-name="T30">ex_mem_reg_rd=</text:span><text:span text:style-name="T30">2</text:span></text:p>
          </draw:text-box>
        </draw:frame>
        <draw:frame draw:style-name="gr1217" draw:text-style-name="P94" draw:layer="layout" svg:width="3.032cm" svg:height="0.569cm" svg:x="17.802cm" svg:y="4.231cm">
          <draw:text-box>
            <text:p><text:span text:style-name="T35">ex_mem_reg_rs1</text:span><text:span text:style-name="T35">=0</text:span></text:p>
          </draw:text-box>
        </draw:frame>
        <draw:frame draw:style-name="gr1218" draw:text-style-name="P94" draw:layer="layout" svg:width="2.969cm" svg:height="0.569cm" svg:x="17.802cm" svg:y="4.532cm">
          <draw:text-box>
            <text:p><text:span text:style-name="T35">ex_mem_reg_rs2</text:span><text:span text:style-name="T35">=-</text:span></text:p>
          </draw:text-box>
        </draw:frame>
        <draw:frame draw:style-name="gr1219" draw:text-style-name="P94" draw:layer="layout" svg:width="2.954cm" svg:height="0.569cm" svg:x="21.803cm" svg:y="3.901cm">
          <draw:text-box>
            <text:p><text:span text:style-name="T35">mem_wb_reg_rd</text:span><text:span text:style-name="T35">=2</text:span></text:p>
          </draw:text-box>
        </draw:frame>
        <draw:frame draw:style-name="gr1220" draw:text-style-name="P94" draw:layer="layout" svg:width="3.095cm" svg:height="0.569cm" svg:x="21.803cm" svg:y="4.231cm">
          <draw:text-box>
            <text:p><text:span text:style-name="T35">mem_wb_reg_rs</text:span><text:span text:style-name="T35">1=0</text:span></text:p>
          </draw:text-box>
        </draw:frame>
        <draw:frame draw:style-name="gr1217" draw:text-style-name="P94" draw:layer="layout" svg:width="3.032cm" svg:height="0.569cm" svg:x="21.803cm" svg:y="4.532cm">
          <draw:text-box>
            <text:p><text:span text:style-name="T35">mem_wb_reg_rs</text:span><text:span text:style-name="T35">2=-</text:span></text:p>
          </draw:text-box>
        </draw:frame>
        <draw:frame draw:style-name="gr1213" draw:text-style-name="P94" draw:layer="layout" svg:width="2.481cm" svg:height="0.569cm" svg:x="17.802cm" svg:y="6.901cm">
          <draw:text-box>
            <text:p><text:span text:style-name="T35">id_ex_reg_rd=2</text:span></text:p>
          </draw:text-box>
        </draw:frame>
        <draw:frame draw:style-name="gr1214" draw:text-style-name="P89" draw:layer="layout" svg:width="2.623cm" svg:height="0.569cm" svg:x="17.802cm" svg:y="7.231cm">
          <draw:text-box>
            <text:p><text:span text:style-name="T30">id_ex_reg_rs1=2</text:span></text:p>
          </draw:text-box>
        </draw:frame>
        <draw:frame draw:style-name="gr1215" draw:text-style-name="P94" draw:layer="layout" svg:width="2.56cm" svg:height="0.569cm" svg:x="17.802cm" svg:y="7.532cm">
          <draw:text-box>
            <text:p><text:span text:style-name="T35">id_ex_reg_rs2=-</text:span></text:p>
          </draw:text-box>
        </draw:frame>
        <draw:frame draw:style-name="gr1216" draw:text-style-name="P94" draw:layer="layout" svg:width="2.891cm" svg:height="0.569cm" svg:x="21.803cm" svg:y="6.901cm">
          <draw:text-box>
            <text:p><text:span text:style-name="T35">ex_mem_reg_rd=</text:span><text:span text:style-name="T35">2</text:span></text:p>
          </draw:text-box>
        </draw:frame>
        <draw:frame draw:style-name="gr1217" draw:text-style-name="P94" draw:layer="layout" svg:width="3.032cm" svg:height="0.569cm" svg:x="21.803cm" svg:y="7.231cm">
          <draw:text-box>
            <text:p><text:span text:style-name="T35">ex_mem_reg_rs1</text:span><text:span text:style-name="T35">=2</text:span></text:p>
          </draw:text-box>
        </draw:frame>
        <draw:frame draw:style-name="gr1218" draw:text-style-name="P94" draw:layer="layout" svg:width="2.969cm" svg:height="0.569cm" svg:x="21.803cm" svg:y="7.532cm">
          <draw:text-box>
            <text:p><text:span text:style-name="T35">ex_mem_reg_rs2</text:span><text:span text:style-name="T35">=-</text:span></text:p>
          </draw:text-box>
        </draw:frame>
        <draw:frame draw:style-name="gr1219" draw:text-style-name="P94" draw:layer="layout" svg:width="2.954cm" svg:height="0.569cm" svg:x="25.804cm" svg:y="6.901cm">
          <draw:text-box>
            <text:p><text:span text:style-name="T35">mem_wb_reg_rd</text:span><text:span text:style-name="T35">=2</text:span></text:p>
          </draw:text-box>
        </draw:frame>
        <draw:frame draw:style-name="gr1220" draw:text-style-name="P94" draw:layer="layout" svg:width="3.095cm" svg:height="0.569cm" svg:x="25.804cm" svg:y="7.231cm">
          <draw:text-box>
            <text:p><text:span text:style-name="T35">mem_wb_reg_rs</text:span><text:span text:style-name="T35">1=2</text:span></text:p>
          </draw:text-box>
        </draw:frame>
        <draw:frame draw:style-name="gr1217" draw:text-style-name="P94" draw:layer="layout" svg:width="3.032cm" svg:height="0.569cm" svg:x="25.804cm" svg:y="7.532cm">
          <draw:text-box>
            <text:p><text:span text:style-name="T35">mem_wb_reg_rs</text:span><text:span text:style-name="T35">2=-</text:span></text:p>
          </draw:text-box>
        </draw:frame>
        <draw:frame draw:style-name="gr1221" draw:text-style-name="P89" draw:layer="layout" svg:width="2.087cm" svg:height="0.569cm" svg:x="16.762cm" svg:y="5.5cm">
          <draw:text-box>
            <text:p><text:span text:style-name="T30">forward_a=2</text:span></text:p>
          </draw:text-box>
        </draw:frame>
        <draw:line draw:style-name="gr1222" draw:text-style-name="P4" draw:layer="layout" svg:x1="23.601cm" svg:y1="6.743cm" svg:x2="16cm" svg:y2="8.34cm">
          <text:p/>
        </draw:line>
        <draw:line draw:style-name="gr1199" draw:text-style-name="P4" draw:layer="layout" svg:x1="18.138cm" svg:y1="6cm" svg:x2="18.738cm" svg:y2="8.5cm">
          <text:p/>
        </draw:line>
        <draw:frame draw:style-name="gr1223" draw:text-style-name="P89" draw:layer="layout" svg:width="5.949cm" svg:height="0.569cm" svg:x="16.463cm" svg:y="3.401cm">
          <draw:text-box>
            <text:p><text:span text:style-name="T30">forward_a_mux_</text:span><text:span text:style-name="T30">out_s = </text:span><text:span text:style-name="T30">alu_result_mem_</text:span><text:span text:style-name="T30">s</text:span></text:p>
          </draw:text-box>
        </draw:frame>
        <draw:frame draw:style-name="gr1224" draw:text-style-name="P94" draw:layer="layout" svg:width="2.051cm" svg:height="0.569cm" svg:x="22.948cm" svg:y="5.3cm">
          <draw:text-box>
            <text:p><text:span text:style-name="T35">x2=0x100</text:span></text:p>
          </draw:text-box>
        </draw:frame>
        <draw:frame draw:style-name="gr1225" draw:text-style-name="P94" draw:layer="layout" svg:width="2.291cm" svg:height="0.569cm" svg:x="12.2cm" svg:y="6.1cm">
          <draw:text-box>
            <text:p><text:span text:style-name="T35">imm_d=0x100</text:span></text:p>
          </draw:text-box>
        </draw:frame>
        <draw:frame draw:style-name="gr1224" draw:text-style-name="P94" draw:layer="layout" svg:width="2.051cm" svg:height="0.569cm" svg:x="12.301cm" svg:y="5.101cm">
          <draw:text-box>
            <text:p><text:span text:style-name="T35">reg_a=0</text:span></text:p>
          </draw:text-box>
        </draw:frame>
        <draw:frame draw:style-name="gr1226" draw:text-style-name="P94" draw:layer="layout" svg:width="2.67cm" svg:height="0.569cm" svg:x="15.33cm" svg:y="6.031cm">
          <draw:text-box>
            <text:p><text:span text:style-name="T35">alu_result=0x100</text:span></text:p>
          </draw:text-box>
        </draw:frame>
        <draw:frame draw:style-name="gr1224" draw:text-style-name="P94" draw:layer="layout" svg:width="2.051cm" svg:height="0.569cm" svg:x="14.949cm" svg:y="8.301cm">
          <draw:text-box>
            <text:p><text:span text:style-name="T35">x2=0x???</text:span></text:p>
          </draw:text-box>
        </draw:frame>
        <draw:frame draw:style-name="gr1224" draw:text-style-name="P94" draw:layer="layout" svg:width="2.051cm" svg:height="0.569cm" svg:x="16.2cm" svg:y="9.1cm">
          <draw:text-box>
            <text:p><text:span text:style-name="T35">imm_d=8</text:span></text:p>
          </draw:text-box>
        </draw:frame>
        <draw:frame draw:style-name="gr1224" draw:text-style-name="P94" draw:layer="layout" svg:width="2.051cm" svg:height="0.569cm" svg:x="16.301cm" svg:y="8.101cm">
          <draw:text-box>
            <text:p><text:span text:style-name="T35">reg_a=??</text:span></text:p>
          </draw:text-box>
        </draw:frame>
        <draw:frame draw:style-name="gr1227" draw:text-style-name="P94" draw:layer="layout" svg:width="2.986cm" svg:height="0.569cm" svg:x="19.031cm" svg:y="9.032cm">
          <draw:text-box>
            <text:p><text:span text:style-name="T35">alu_result=0x100</text:span><text:span text:style-name="T35">00</text:span></text:p>
          </draw:text-box>
        </draw:frame>
        <draw:frame draw:style-name="gr1228" draw:text-style-name="P94" draw:layer="layout" svg:width="2.055cm" svg:height="0.569cm" svg:x="26.949cm" svg:y="8.301cm">
          <draw:text-box>
            <text:p><text:span text:style-name="T35">x2=0x10000</text:span></text:p>
          </draw:text-box>
        </draw:frame>
      </draw:page>
      <draw:page draw:name="page19" draw:style-name="dp1" draw:master-page-name="Standard">
        <draw:frame draw:style-name="gr1207" draw:text-style-name="P81" draw:layer="layout" svg:width="4.522cm" svg:height="0.806cm" svg:x="1.008cm" svg:y="5.6cm">
          <draw:text-box>
            <text:p><text:span text:style-name="T27">addi </text:span><text:span text:style-name="T31">x2</text:span><text:span text:style-name="T27">, </text:span><text:span text:style-name="T27">x0, 0x100</text:span></text:p>
          </draw:text-box>
        </draw:frame>
        <draw:frame draw:style-name="gr1173" draw:text-style-name="P34" draw:layer="layout" svg:width="6.124cm" svg:height="0.962cm" svg:x="5.699cm" svg:y="1.038cm">
          <draw:text-box>
            <text:p><text:span text:style-name="T9">Time in </text:span><text:span text:style-name="T9">clock </text:span><text:span text:style-name="T9">cycles</text:span></text:p>
          </draw:text-box>
        </draw:frame>
        <draw:line draw:style-name="gr146" draw:text-style-name="P4" draw:layer="layout" svg:x1="1.099cm" svg:y1="5cm" svg:x2="1.099cm" svg:y2="11cm">
          <text:p/>
        </draw:line>
        <draw:line draw:style-name="gr146" draw:text-style-name="P4" draw:layer="layout" svg:x1="5.999cm" svg:y1="2cm" svg:x2="12.999cm" svg:y2="2cm">
          <text:p/>
        </draw:line>
        <draw:g draw:style-name="gr66">
          <draw:polygon draw:style-name="gr1174" draw:text-style-name="P90" draw:layer="layout" svg:width="1.999cm" svg:height="2.999cm" svg:x="14.999cm" svg:y="4.5cm" svg:viewBox="0 0 2000 3000" draw:points="0,0 0,1100 400,1500 0,1900 0,3000 2000,2000 2000,1000">
            <text:p/>
          </draw:polygon>
          <draw:frame draw:style-name="gr1175" draw:text-style-name="P81" draw:layer="layout" svg:width="1.466cm" svg:height="0.806cm" svg:x="15.399cm" svg:y="5.594cm">
            <draw:text-box>
              <text:p><text:span text:style-name="T27">ALU</text:span></text:p>
            </draw:text-box>
          </draw:frame>
        </draw:g>
        <draw:g draw:style-name="gr1">
          <draw:g draw:style-name="gr1">
            <draw:custom-shape draw:style-name="gr1176" draw:text-style-name="P14" draw:layer="layout" svg:width="1cm" svg:height="2cm" svg:x="6.999cm" svg:y="5cm">
              <text:p/>
              <draw:enhanced-geometry svg:viewBox="0 0 21600 21600" draw:type="rectangle" draw:enhanced-path="M 0 0 L 21600 0 21600 21600 0 21600 0 0 Z N"/>
            </draw:custom-shape>
            <draw:custom-shape draw:style-name="gr1177" draw:text-style-name="P1" draw:layer="layout" svg:width="1cm" svg:height="2cm" svg:x="7.999cm" svg:y="5cm">
              <text:p/>
              <draw:enhanced-geometry svg:viewBox="0 0 21600 21600" draw:type="rectangle" draw:enhanced-path="M 0 0 L 21600 0 21600 21600 0 21600 0 0 Z N"/>
            </draw:custom-shape>
          </draw:g>
          <draw:g draw:style-name="gr66">
            <draw:frame draw:style-name="gr1178" draw:text-style-name="P81" draw:layer="layout" svg:width="1.052cm" svg:height="0.806cm" svg:x="7.528cm" svg:y="5.597cm">
              <draw:text-box>
                <text:p><text:span text:style-name="T27">IM</text:span></text:p>
              </draw:text-box>
            </draw:frame>
          </draw:g>
        </draw:g>
        <draw:g draw:style-name="gr1">
          <draw:g draw:style-name="gr1">
            <draw:custom-shape draw:style-name="gr1179" draw:text-style-name="P14" draw:layer="layout" svg:width="1cm" svg:height="2cm" svg:x="10.999cm" svg:y="5cm">
              <text:p/>
              <draw:enhanced-geometry svg:viewBox="0 0 21600 21600" draw:type="rectangle" draw:enhanced-path="M 0 0 L 21600 0 21600 21600 0 21600 0 0 Z N"/>
            </draw:custom-shape>
            <draw:custom-shape draw:style-name="gr1177" draw:text-style-name="P1" draw:layer="layout" svg:width="1cm" svg:height="2cm" svg:x="11.999cm" svg:y="5cm">
              <text:p/>
              <draw:enhanced-geometry svg:viewBox="0 0 21600 21600" draw:type="rectangle" draw:enhanced-path="M 0 0 L 21600 0 21600 21600 0 21600 0 0 Z N"/>
            </draw:custom-shape>
          </draw:g>
          <draw:g draw:style-name="gr66">
            <draw:frame draw:style-name="gr1180" draw:text-style-name="P81" draw:layer="layout" svg:width="1.411cm" svg:height="0.806cm" svg:x="11.528cm" svg:y="5.597cm">
              <draw:text-box>
                <text:p><text:span text:style-name="T27">Reg</text:span></text:p>
              </draw:text-box>
            </draw:frame>
          </draw:g>
        </draw:g>
        <draw:g draw:style-name="gr1">
          <draw:g draw:style-name="gr1">
            <draw:custom-shape draw:style-name="gr1179" draw:text-style-name="P14" draw:layer="layout" svg:width="1cm" svg:height="2cm" svg:x="23.999cm" svg:y="5cm">
              <text:p/>
              <draw:enhanced-geometry svg:viewBox="0 0 21600 21600" draw:mirror-horizontal="true" draw:type="rectangle" draw:enhanced-path="M 0 0 L 21600 0 21600 21600 0 21600 0 0 Z N"/>
            </draw:custom-shape>
            <draw:custom-shape draw:style-name="gr1177" draw:text-style-name="P1" draw:layer="layout" svg:width="1cm" svg:height="2cm" svg:x="22.999cm" svg:y="5cm">
              <text:p/>
              <draw:enhanced-geometry svg:viewBox="0 0 21600 21600" draw:mirror-horizontal="true" draw:type="rectangle" draw:enhanced-path="M 0 0 L 21600 0 21600 21600 0 21600 0 0 Z N"/>
            </draw:custom-shape>
          </draw:g>
          <draw:g draw:style-name="gr66">
            <draw:frame draw:style-name="gr1180" draw:text-style-name="P81" draw:layer="layout" svg:width="1.411cm" svg:height="0.806cm" svg:x="23.35cm" svg:y="5.597cm">
              <draw:text-box>
                <text:p><text:span text:style-name="T27">Reg</text:span></text:p>
              </draw:text-box>
            </draw:frame>
          </draw:g>
        </draw:g>
        <draw:line draw:style-name="gr38" draw:text-style-name="P4" draw:layer="layout" svg:x1="8.999cm" svg:y1="6cm" svg:x2="10.999cm" svg:y2="6cm">
          <text:p/>
        </draw:line>
        <draw:line draw:style-name="gr38" draw:text-style-name="P4" draw:layer="layout" svg:x1="10.499cm" svg:y1="6cm" svg:x2="10.499cm" svg:y2="5.5cm">
          <text:p/>
        </draw:line>
        <draw:line draw:style-name="gr38" draw:text-style-name="P4" draw:layer="layout" svg:x1="10.499cm" svg:y1="5.5cm" svg:x2="10.999cm" svg:y2="5.5cm">
          <text:p/>
        </draw:line>
        <draw:line draw:style-name="gr38" draw:text-style-name="P4" draw:layer="layout" svg:x1="12.999cm" svg:y1="5.5cm" svg:x2="14.999cm" svg:y2="5.5cm">
          <text:p/>
        </draw:line>
        <draw:line draw:style-name="gr38" draw:text-style-name="P4" draw:layer="layout" svg:x1="12.999cm" svg:y1="6.5cm" svg:x2="14.999cm" svg:y2="6.5cm">
          <text:p/>
        </draw:line>
        <draw:line draw:style-name="gr38" draw:text-style-name="P4" draw:layer="layout" svg:x1="16.999cm" svg:y1="6cm" svg:x2="18.999cm" svg:y2="6cm">
          <text:p/>
        </draw:line>
        <draw:line draw:style-name="gr38" draw:text-style-name="P4" draw:layer="layout" svg:x1="20.999cm" svg:y1="6cm" svg:x2="22.999cm" svg:y2="6cm">
          <text:p/>
        </draw:line>
        <draw:g draw:style-name="gr66">
          <draw:polygon draw:style-name="gr1174" draw:text-style-name="P90" draw:layer="layout" svg:width="1.999cm" svg:height="2.999cm" svg:x="18.999cm" svg:y="7.5cm" svg:viewBox="0 0 2000 3000" draw:points="0,0 0,1100 400,1500 0,1900 0,3000 2000,2000 2000,1000">
            <text:p/>
          </draw:polygon>
          <draw:frame draw:style-name="gr1175" draw:text-style-name="P81" draw:layer="layout" svg:width="1.466cm" svg:height="0.806cm" svg:x="19.399cm" svg:y="8.594cm">
            <draw:text-box>
              <text:p><text:span text:style-name="T27">ALU</text:span></text:p>
            </draw:text-box>
          </draw:frame>
        </draw:g>
        <draw:g draw:style-name="gr1">
          <draw:g draw:style-name="gr1">
            <draw:custom-shape draw:style-name="gr1176" draw:text-style-name="P14" draw:layer="layout" svg:width="1cm" svg:height="2cm" svg:x="10.999cm" svg:y="8cm">
              <text:p/>
              <draw:enhanced-geometry svg:viewBox="0 0 21600 21600" draw:type="rectangle" draw:enhanced-path="M 0 0 L 21600 0 21600 21600 0 21600 0 0 Z N"/>
            </draw:custom-shape>
            <draw:custom-shape draw:style-name="gr1177" draw:text-style-name="P1" draw:layer="layout" svg:width="1cm" svg:height="2cm" svg:x="11.999cm" svg:y="8cm">
              <text:p/>
              <draw:enhanced-geometry svg:viewBox="0 0 21600 21600" draw:type="rectangle" draw:enhanced-path="M 0 0 L 21600 0 21600 21600 0 21600 0 0 Z N"/>
            </draw:custom-shape>
          </draw:g>
          <draw:g draw:style-name="gr66">
            <draw:frame draw:style-name="gr1178" draw:text-style-name="P81" draw:layer="layout" svg:width="1.052cm" svg:height="0.806cm" svg:x="11.528cm" svg:y="8.597cm">
              <draw:text-box>
                <text:p><text:span text:style-name="T27">IM</text:span></text:p>
              </draw:text-box>
            </draw:frame>
          </draw:g>
        </draw:g>
        <draw:g draw:style-name="gr1">
          <draw:g draw:style-name="gr1">
            <draw:custom-shape draw:style-name="gr1179" draw:text-style-name="P14" draw:layer="layout" svg:width="1cm" svg:height="2cm" svg:x="14.999cm" svg:y="8cm">
              <text:p/>
              <draw:enhanced-geometry svg:viewBox="0 0 21600 21600" draw:type="rectangle" draw:enhanced-path="M 0 0 L 21600 0 21600 21600 0 21600 0 0 Z N"/>
            </draw:custom-shape>
            <draw:custom-shape draw:style-name="gr1177" draw:text-style-name="P1" draw:layer="layout" svg:width="1cm" svg:height="2cm" svg:x="15.999cm" svg:y="8cm">
              <text:p/>
              <draw:enhanced-geometry svg:viewBox="0 0 21600 21600" draw:type="rectangle" draw:enhanced-path="M 0 0 L 21600 0 21600 21600 0 21600 0 0 Z N"/>
            </draw:custom-shape>
          </draw:g>
          <draw:g draw:style-name="gr66">
            <draw:frame draw:style-name="gr1181" draw:text-style-name="P81" draw:layer="layout" svg:width="1.575cm" svg:height="0.806cm" svg:x="15.528cm" svg:y="8.597cm">
              <draw:text-box>
                <text:p><text:span text:style-name="T27">REG</text:span></text:p>
              </draw:text-box>
            </draw:frame>
          </draw:g>
        </draw:g>
        <draw:g draw:style-name="gr1">
          <draw:g draw:style-name="gr1">
            <draw:custom-shape draw:style-name="gr1179" draw:text-style-name="P14" draw:layer="layout" svg:width="1cm" svg:height="2cm" svg:x="27.999cm" svg:y="8cm">
              <text:p/>
              <draw:enhanced-geometry svg:viewBox="0 0 21600 21600" draw:mirror-horizontal="true" draw:type="rectangle" draw:enhanced-path="M 0 0 L 21600 0 21600 21600 0 21600 0 0 Z N"/>
            </draw:custom-shape>
            <draw:custom-shape draw:style-name="gr1177" draw:text-style-name="P1" draw:layer="layout" svg:width="1cm" svg:height="2cm" svg:x="26.999cm" svg:y="8cm">
              <text:p/>
              <draw:enhanced-geometry svg:viewBox="0 0 21600 21600" draw:mirror-horizontal="true" draw:type="rectangle" draw:enhanced-path="M 0 0 L 21600 0 21600 21600 0 21600 0 0 Z N"/>
            </draw:custom-shape>
          </draw:g>
          <draw:g draw:style-name="gr66">
            <draw:frame draw:style-name="gr1180" draw:text-style-name="P81" draw:layer="layout" svg:width="1.411cm" svg:height="0.806cm" svg:x="27.35cm" svg:y="8.597cm">
              <draw:text-box>
                <text:p><text:span text:style-name="T27">Reg</text:span></text:p>
              </draw:text-box>
            </draw:frame>
          </draw:g>
        </draw:g>
        <draw:line draw:style-name="gr38" draw:text-style-name="P4" draw:layer="layout" svg:x1="12.999cm" svg:y1="9cm" svg:x2="14.999cm" svg:y2="9cm">
          <text:p/>
        </draw:line>
        <draw:line draw:style-name="gr38" draw:text-style-name="P4" draw:layer="layout" svg:x1="14.499cm" svg:y1="9cm" svg:x2="14.499cm" svg:y2="8.5cm">
          <text:p/>
        </draw:line>
        <draw:line draw:style-name="gr38" draw:text-style-name="P4" draw:layer="layout" svg:x1="14.499cm" svg:y1="8.5cm" svg:x2="14.999cm" svg:y2="8.5cm">
          <text:p/>
        </draw:line>
        <draw:line draw:style-name="gr38" draw:text-style-name="P4" draw:layer="layout" svg:x1="16.999cm" svg:y1="8.5cm" svg:x2="18.999cm" svg:y2="8.5cm">
          <text:p/>
        </draw:line>
        <draw:line draw:style-name="gr38" draw:text-style-name="P4" draw:layer="layout" svg:x1="16.999cm" svg:y1="9.5cm" svg:x2="18.999cm" svg:y2="9.5cm">
          <text:p/>
        </draw:line>
        <draw:line draw:style-name="gr38" draw:text-style-name="P4" draw:layer="layout" svg:x1="20.999cm" svg:y1="9cm" svg:x2="22.999cm" svg:y2="9cm">
          <text:p/>
        </draw:line>
        <draw:line draw:style-name="gr38" draw:text-style-name="P4" draw:layer="layout" svg:x1="24.999cm" svg:y1="9cm" svg:x2="26.999cm" svg:y2="9cm">
          <text:p/>
        </draw:line>
        <draw:frame draw:style-name="gr1208" draw:text-style-name="P81" draw:layer="layout" svg:width="3.855cm" svg:height="0.806cm" svg:x="1.009cm" svg:y="8.6cm">
          <draw:text-box>
            <text:p><text:span text:style-name="T27">slli </text:span><text:span text:style-name="T31">x2, x2</text:span><text:span text:style-name="T27">, </text:span><text:span text:style-name="T27">8</text:span></text:p>
          </draw:text-box>
        </draw:frame>
        <draw:line draw:style-name="gr1183" draw:text-style-name="P4" draw:layer="layout" svg:x1="9.999cm" svg:y1="4cm" svg:x2="9.999cm" svg:y2="20cm">
          <text:p/>
        </draw:line>
        <draw:line draw:style-name="gr1183" draw:text-style-name="P4" draw:layer="layout" svg:x1="13.999cm" svg:y1="4cm" svg:x2="13.999cm" svg:y2="20cm">
          <text:p/>
        </draw:line>
        <draw:line draw:style-name="gr1183" draw:text-style-name="P4" draw:layer="layout" svg:x1="17.999cm" svg:y1="4cm" svg:x2="17.999cm" svg:y2="20cm">
          <text:p/>
        </draw:line>
        <draw:line draw:style-name="gr1183" draw:text-style-name="P4" draw:layer="layout" svg:x1="21.999cm" svg:y1="4cm" svg:x2="21.999cm" svg:y2="20cm">
          <text:p/>
        </draw:line>
        <draw:line draw:style-name="gr1183" draw:text-style-name="P4" draw:layer="layout" svg:x1="25.999cm" svg:y1="4cm" svg:x2="25.999cm" svg:y2="20cm">
          <text:p/>
        </draw:line>
        <draw:line draw:style-name="gr1183" draw:text-style-name="P4" draw:layer="layout" svg:x1="29.999cm" svg:y1="4cm" svg:x2="29.999cm" svg:y2="20cm">
          <text:p/>
        </draw:line>
        <draw:line draw:style-name="gr1183" draw:text-style-name="P4" draw:layer="layout" svg:x1="33.999cm" svg:y1="4cm" svg:x2="33.999cm" svg:y2="20cm">
          <text:p/>
        </draw:line>
        <draw:frame draw:style-name="gr1184" draw:text-style-name="P3" draw:layer="layout" svg:width="1.949cm" svg:height="0.962cm" svg:x="7.053cm" svg:y="2cm">
          <draw:text-box>
            <text:p>CC 1</text:p>
          </draw:text-box>
        </draw:frame>
        <draw:frame draw:style-name="gr1184" draw:text-style-name="P3" draw:layer="layout" svg:width="1.949cm" svg:height="0.962cm" svg:x="11.053cm" svg:y="2cm">
          <draw:text-box>
            <text:p>CC 2</text:p>
          </draw:text-box>
        </draw:frame>
        <draw:frame draw:style-name="gr1184" draw:text-style-name="P3" draw:layer="layout" svg:width="1.949cm" svg:height="0.962cm" svg:x="15.053cm" svg:y="2cm">
          <draw:text-box>
            <text:p>CC 3</text:p>
          </draw:text-box>
        </draw:frame>
        <draw:frame draw:style-name="gr1184" draw:text-style-name="P3" draw:layer="layout" svg:width="1.949cm" svg:height="0.962cm" svg:x="23.053cm" svg:y="2cm">
          <draw:text-box>
            <text:p>CC 5</text:p>
          </draw:text-box>
        </draw:frame>
        <draw:frame draw:style-name="gr1184" draw:text-style-name="P3" draw:layer="layout" svg:width="1.949cm" svg:height="0.962cm" svg:x="27.053cm" svg:y="2cm">
          <draw:text-box>
            <text:p>CC 6</text:p>
          </draw:text-box>
        </draw:frame>
        <draw:frame draw:style-name="gr1184" draw:text-style-name="P3" draw:layer="layout" svg:width="1.949cm" svg:height="0.962cm" svg:x="31.053cm" svg:y="2cm">
          <draw:text-box>
            <text:p>CC 7</text:p>
          </draw:text-box>
        </draw:frame>
        <draw:frame draw:style-name="gr1184" draw:text-style-name="P3" draw:layer="layout" svg:width="1.949cm" svg:height="0.962cm" svg:x="18.999cm" svg:y="2cm">
          <draw:text-box>
            <text:p>CC 4</text:p>
          </draw:text-box>
        </draw:frame>
        <draw:g draw:style-name="gr1">
          <draw:g draw:style-name="gr1">
            <draw:custom-shape draw:style-name="gr1176" draw:text-style-name="P91" draw:layer="layout" svg:width="1cm" svg:height="2cm" svg:x="18.999cm" svg:y="5cm">
              <text:p/>
              <draw:enhanced-geometry svg:viewBox="0 0 21600 21600" draw:mirror-horizontal="false" draw:mirror-vertical="false" draw:type="rectangle" draw:enhanced-path="M 0 0 L 21600 0 21600 21600 0 21600 0 0 Z N"/>
            </draw:custom-shape>
            <draw:custom-shape draw:style-name="gr1186" draw:text-style-name="P92" draw:layer="layout" svg:width="1cm" svg:height="2cm" svg:x="19.999cm" svg:y="5cm">
              <text:p/>
              <draw:enhanced-geometry svg:viewBox="0 0 21600 21600" draw:mirror-horizontal="false" draw:mirror-vertical="false" draw:type="rectangle" draw:enhanced-path="M 0 0 L 21600 0 21600 21600 0 21600 0 0 Z N"/>
            </draw:custom-shape>
          </draw:g>
          <draw:frame draw:style-name="gr1187" draw:text-style-name="P81" draw:layer="layout" svg:width="1.272cm" svg:height="0.806cm" svg:x="19.365cm" svg:y="5.599cm">
            <draw:text-box>
              <text:p><text:span text:style-name="T27">DM</text:span></text:p>
            </draw:text-box>
          </draw:frame>
        </draw:g>
        <draw:line draw:style-name="gr1209" draw:text-style-name="P4" draw:layer="layout" svg:x1="18.499cm" svg:y1="6cm" svg:x2="18.499cm" svg:y2="7.2cm">
          <text:p/>
        </draw:line>
        <draw:line draw:style-name="gr1209" draw:text-style-name="P4" draw:layer="layout" svg:x1="18.499cm" svg:y1="7.2cm" svg:x2="21.499cm" svg:y2="7.2cm">
          <text:p/>
        </draw:line>
        <draw:line draw:style-name="gr1209" draw:text-style-name="P4" draw:layer="layout" svg:x1="21.499cm" svg:y1="7.2cm" svg:x2="21.999cm" svg:y2="6cm">
          <text:p/>
        </draw:line>
        <draw:g draw:style-name="gr1">
          <draw:g draw:style-name="gr1">
            <draw:custom-shape draw:style-name="gr1176" draw:text-style-name="P91" draw:layer="layout" svg:width="1cm" svg:height="2cm" svg:x="22.999cm" svg:y="8cm">
              <text:p/>
              <draw:enhanced-geometry svg:viewBox="0 0 21600 21600" draw:mirror-horizontal="false" draw:mirror-vertical="false" draw:type="rectangle" draw:enhanced-path="M 0 0 L 21600 0 21600 21600 0 21600 0 0 Z N"/>
            </draw:custom-shape>
            <draw:custom-shape draw:style-name="gr1186" draw:text-style-name="P92" draw:layer="layout" svg:width="1cm" svg:height="2cm" svg:x="23.999cm" svg:y="8cm">
              <text:p/>
              <draw:enhanced-geometry svg:viewBox="0 0 21600 21600" draw:mirror-horizontal="false" draw:mirror-vertical="false" draw:type="rectangle" draw:enhanced-path="M 0 0 L 21600 0 21600 21600 0 21600 0 0 Z N"/>
            </draw:custom-shape>
          </draw:g>
          <draw:frame draw:style-name="gr1187" draw:text-style-name="P81" draw:layer="layout" svg:width="1.272cm" svg:height="0.806cm" svg:x="23.365cm" svg:y="8.599cm">
            <draw:text-box>
              <text:p><text:span text:style-name="T27">DM</text:span></text:p>
            </draw:text-box>
          </draw:frame>
        </draw:g>
        <draw:line draw:style-name="gr1209" draw:text-style-name="P4" draw:layer="layout" svg:x1="22.499cm" svg:y1="9cm" svg:x2="22.499cm" svg:y2="10.2cm">
          <text:p/>
        </draw:line>
        <draw:line draw:style-name="gr1209" draw:text-style-name="P4" draw:layer="layout" svg:x1="22.499cm" svg:y1="10.2cm" svg:x2="25.499cm" svg:y2="10.2cm">
          <text:p/>
        </draw:line>
        <draw:line draw:style-name="gr1209" draw:text-style-name="P4" draw:layer="layout" svg:x1="25.499cm" svg:y1="10.2cm" svg:x2="25.999cm" svg:y2="9cm">
          <text:p/>
        </draw:line>
        <draw:g draw:style-name="gr66">
          <draw:polygon draw:style-name="gr1174" draw:text-style-name="P90" draw:layer="layout" svg:width="1.999cm" svg:height="2.999cm" svg:x="22.999cm" svg:y="10.5cm" svg:viewBox="0 0 2000 3000" draw:points="0,0 0,1100 400,1500 0,1900 0,3000 2000,2000 2000,1000">
            <text:p/>
          </draw:polygon>
          <draw:frame draw:style-name="gr1175" draw:text-style-name="P81" draw:layer="layout" svg:width="1.466cm" svg:height="0.806cm" svg:x="23.399cm" svg:y="11.594cm">
            <draw:text-box>
              <text:p><text:span text:style-name="T27">ALU</text:span></text:p>
            </draw:text-box>
          </draw:frame>
        </draw:g>
        <draw:g draw:style-name="gr1">
          <draw:g draw:style-name="gr1">
            <draw:custom-shape draw:style-name="gr1176" draw:text-style-name="P14" draw:layer="layout" svg:width="1cm" svg:height="2cm" svg:x="14.999cm" svg:y="11cm">
              <text:p/>
              <draw:enhanced-geometry svg:viewBox="0 0 21600 21600" draw:type="rectangle" draw:enhanced-path="M 0 0 L 21600 0 21600 21600 0 21600 0 0 Z N"/>
            </draw:custom-shape>
            <draw:custom-shape draw:style-name="gr1177" draw:text-style-name="P1" draw:layer="layout" svg:width="1cm" svg:height="2cm" svg:x="15.999cm" svg:y="11cm">
              <text:p/>
              <draw:enhanced-geometry svg:viewBox="0 0 21600 21600" draw:type="rectangle" draw:enhanced-path="M 0 0 L 21600 0 21600 21600 0 21600 0 0 Z N"/>
            </draw:custom-shape>
          </draw:g>
          <draw:g draw:style-name="gr66">
            <draw:frame draw:style-name="gr1178" draw:text-style-name="P81" draw:layer="layout" svg:width="1.052cm" svg:height="0.806cm" svg:x="15.528cm" svg:y="11.597cm">
              <draw:text-box>
                <text:p><text:span text:style-name="T27">IM</text:span></text:p>
              </draw:text-box>
            </draw:frame>
          </draw:g>
        </draw:g>
        <draw:g draw:style-name="gr1">
          <draw:g draw:style-name="gr1">
            <draw:custom-shape draw:style-name="gr1179" draw:text-style-name="P14" draw:layer="layout" svg:width="1cm" svg:height="2cm" svg:x="18.999cm" svg:y="11cm">
              <text:p/>
              <draw:enhanced-geometry svg:viewBox="0 0 21600 21600" draw:type="rectangle" draw:enhanced-path="M 0 0 L 21600 0 21600 21600 0 21600 0 0 Z N"/>
            </draw:custom-shape>
            <draw:custom-shape draw:style-name="gr1177" draw:text-style-name="P1" draw:layer="layout" svg:width="1cm" svg:height="2cm" svg:x="19.999cm" svg:y="11cm">
              <text:p/>
              <draw:enhanced-geometry svg:viewBox="0 0 21600 21600" draw:type="rectangle" draw:enhanced-path="M 0 0 L 21600 0 21600 21600 0 21600 0 0 Z N"/>
            </draw:custom-shape>
          </draw:g>
          <draw:g draw:style-name="gr66">
            <draw:frame draw:style-name="gr1181" draw:text-style-name="P81" draw:layer="layout" svg:width="1.575cm" svg:height="0.806cm" svg:x="19.528cm" svg:y="11.597cm">
              <draw:text-box>
                <text:p><text:span text:style-name="T27">REG</text:span></text:p>
              </draw:text-box>
            </draw:frame>
          </draw:g>
        </draw:g>
        <draw:g draw:style-name="gr1">
          <draw:g draw:style-name="gr1">
            <draw:custom-shape draw:style-name="gr1179" draw:text-style-name="P14" draw:layer="layout" svg:width="1cm" svg:height="2cm" svg:x="31.999cm" svg:y="11cm">
              <text:p/>
              <draw:enhanced-geometry svg:viewBox="0 0 21600 21600" draw:mirror-horizontal="true" draw:type="rectangle" draw:enhanced-path="M 0 0 L 21600 0 21600 21600 0 21600 0 0 Z N"/>
            </draw:custom-shape>
            <draw:custom-shape draw:style-name="gr1177" draw:text-style-name="P1" draw:layer="layout" svg:width="1cm" svg:height="2cm" svg:x="30.999cm" svg:y="11cm">
              <text:p/>
              <draw:enhanced-geometry svg:viewBox="0 0 21600 21600" draw:mirror-horizontal="true" draw:type="rectangle" draw:enhanced-path="M 0 0 L 21600 0 21600 21600 0 21600 0 0 Z N"/>
            </draw:custom-shape>
          </draw:g>
          <draw:g draw:style-name="gr66">
            <draw:frame draw:style-name="gr1180" draw:text-style-name="P81" draw:layer="layout" svg:width="1.411cm" svg:height="0.806cm" svg:x="31.35cm" svg:y="11.597cm">
              <draw:text-box>
                <text:p><text:span text:style-name="T27">Reg</text:span></text:p>
              </draw:text-box>
            </draw:frame>
          </draw:g>
        </draw:g>
        <draw:line draw:style-name="gr38" draw:text-style-name="P4" draw:layer="layout" svg:x1="16.999cm" svg:y1="12cm" svg:x2="18.999cm" svg:y2="12cm">
          <text:p/>
        </draw:line>
        <draw:line draw:style-name="gr38" draw:text-style-name="P4" draw:layer="layout" svg:x1="18.499cm" svg:y1="12cm" svg:x2="18.499cm" svg:y2="11.5cm">
          <text:p/>
        </draw:line>
        <draw:line draw:style-name="gr38" draw:text-style-name="P4" draw:layer="layout" svg:x1="18.499cm" svg:y1="11.5cm" svg:x2="18.999cm" svg:y2="11.5cm">
          <text:p/>
        </draw:line>
        <draw:line draw:style-name="gr38" draw:text-style-name="P4" draw:layer="layout" svg:x1="20.999cm" svg:y1="11.5cm" svg:x2="22.999cm" svg:y2="11.5cm">
          <text:p/>
        </draw:line>
        <draw:line draw:style-name="gr38" draw:text-style-name="P4" draw:layer="layout" svg:x1="20.999cm" svg:y1="12.5cm" svg:x2="22.999cm" svg:y2="12.5cm">
          <text:p/>
        </draw:line>
        <draw:line draw:style-name="gr38" draw:text-style-name="P4" draw:layer="layout" svg:x1="24.999cm" svg:y1="12cm" svg:x2="26.999cm" svg:y2="12cm">
          <text:p/>
        </draw:line>
        <draw:line draw:style-name="gr38" draw:text-style-name="P4" draw:layer="layout" svg:x1="28.999cm" svg:y1="12cm" svg:x2="30.999cm" svg:y2="12cm">
          <text:p/>
        </draw:line>
        <draw:g draw:style-name="gr1">
          <draw:g draw:style-name="gr1">
            <draw:custom-shape draw:style-name="gr1176" draw:text-style-name="P91" draw:layer="layout" svg:width="1cm" svg:height="2cm" svg:x="26.999cm" svg:y="11cm">
              <text:p/>
              <draw:enhanced-geometry svg:viewBox="0 0 21600 21600" draw:mirror-horizontal="false" draw:mirror-vertical="false" draw:type="rectangle" draw:enhanced-path="M 0 0 L 21600 0 21600 21600 0 21600 0 0 Z N"/>
            </draw:custom-shape>
            <draw:custom-shape draw:style-name="gr1186" draw:text-style-name="P92" draw:layer="layout" svg:width="1cm" svg:height="2cm" svg:x="27.999cm" svg:y="11cm">
              <text:p/>
              <draw:enhanced-geometry svg:viewBox="0 0 21600 21600" draw:mirror-horizontal="false" draw:mirror-vertical="false" draw:type="rectangle" draw:enhanced-path="M 0 0 L 21600 0 21600 21600 0 21600 0 0 Z N"/>
            </draw:custom-shape>
          </draw:g>
          <draw:frame draw:style-name="gr1187" draw:text-style-name="P81" draw:layer="layout" svg:width="1.272cm" svg:height="0.806cm" svg:x="27.365cm" svg:y="11.599cm">
            <draw:text-box>
              <text:p><text:span text:style-name="T27">DM</text:span></text:p>
            </draw:text-box>
          </draw:frame>
        </draw:g>
        <draw:line draw:style-name="gr38" draw:text-style-name="P4" draw:layer="layout" svg:x1="26.499cm" svg:y1="12cm" svg:x2="26.499cm" svg:y2="13.2cm">
          <text:p/>
        </draw:line>
        <draw:line draw:style-name="gr38" draw:text-style-name="P4" draw:layer="layout" svg:x1="26.499cm" svg:y1="13.2cm" svg:x2="29.499cm" svg:y2="13.2cm">
          <text:p/>
        </draw:line>
        <draw:line draw:style-name="gr38" draw:text-style-name="P4" draw:layer="layout" svg:x1="29.499cm" svg:y1="13.2cm" svg:x2="29.999cm" svg:y2="12cm">
          <text:p/>
        </draw:line>
        <draw:frame draw:style-name="gr22" draw:text-style-name="P3" draw:layer="layout" svg:width="5.001cm" svg:height="0.962cm" svg:x="15.699cm" svg:y="1cm">
          <draw:text-box>
            <text:p>addi → slli → ld</text:p>
          </draw:text-box>
        </draw:frame>
        <draw:line draw:style-name="gr1183" draw:text-style-name="P4" draw:layer="layout" svg:x1="37.999cm" svg:y1="4cm" svg:x2="37.999cm" svg:y2="20cm">
          <text:p/>
        </draw:line>
        <draw:g draw:style-name="gr66">
          <draw:polygon draw:style-name="gr1174" draw:text-style-name="P90" draw:layer="layout" svg:width="1.999cm" svg:height="2.999cm" svg:x="26.999cm" svg:y="13.5cm" svg:viewBox="0 0 2000 3000" draw:points="0,0 0,1100 400,1500 0,1900 0,3000 2000,2000 2000,1000">
            <text:p/>
          </draw:polygon>
          <draw:frame draw:style-name="gr1175" draw:text-style-name="P81" draw:layer="layout" svg:width="1.466cm" svg:height="0.806cm" svg:x="27.399cm" svg:y="14.594cm">
            <draw:text-box>
              <text:p><text:span text:style-name="T27">ALU</text:span></text:p>
            </draw:text-box>
          </draw:frame>
        </draw:g>
        <draw:g draw:style-name="gr1">
          <draw:g draw:style-name="gr1">
            <draw:custom-shape draw:style-name="gr1176" draw:text-style-name="P14" draw:layer="layout" svg:width="1cm" svg:height="2cm" svg:x="18.999cm" svg:y="14cm">
              <text:p/>
              <draw:enhanced-geometry svg:viewBox="0 0 21600 21600" draw:type="rectangle" draw:enhanced-path="M 0 0 L 21600 0 21600 21600 0 21600 0 0 Z N"/>
            </draw:custom-shape>
            <draw:custom-shape draw:style-name="gr1177" draw:text-style-name="P1" draw:layer="layout" svg:width="1cm" svg:height="2cm" svg:x="19.999cm" svg:y="14cm">
              <text:p/>
              <draw:enhanced-geometry svg:viewBox="0 0 21600 21600" draw:type="rectangle" draw:enhanced-path="M 0 0 L 21600 0 21600 21600 0 21600 0 0 Z N"/>
            </draw:custom-shape>
          </draw:g>
          <draw:g draw:style-name="gr66">
            <draw:frame draw:style-name="gr1178" draw:text-style-name="P81" draw:layer="layout" svg:width="1.052cm" svg:height="0.806cm" svg:x="19.528cm" svg:y="14.597cm">
              <draw:text-box>
                <text:p><text:span text:style-name="T27">IM</text:span></text:p>
              </draw:text-box>
            </draw:frame>
          </draw:g>
        </draw:g>
        <draw:g draw:style-name="gr1">
          <draw:g draw:style-name="gr1">
            <draw:custom-shape draw:style-name="gr1179" draw:text-style-name="P14" draw:layer="layout" svg:width="1cm" svg:height="2cm" svg:x="22.999cm" svg:y="14cm">
              <text:p/>
              <draw:enhanced-geometry svg:viewBox="0 0 21600 21600" draw:type="rectangle" draw:enhanced-path="M 0 0 L 21600 0 21600 21600 0 21600 0 0 Z N"/>
            </draw:custom-shape>
            <draw:custom-shape draw:style-name="gr1177" draw:text-style-name="P1" draw:layer="layout" svg:width="1cm" svg:height="2cm" svg:x="23.999cm" svg:y="14cm">
              <text:p/>
              <draw:enhanced-geometry svg:viewBox="0 0 21600 21600" draw:type="rectangle" draw:enhanced-path="M 0 0 L 21600 0 21600 21600 0 21600 0 0 Z N"/>
            </draw:custom-shape>
          </draw:g>
          <draw:g draw:style-name="gr66">
            <draw:frame draw:style-name="gr1181" draw:text-style-name="P81" draw:layer="layout" svg:width="1.575cm" svg:height="0.806cm" svg:x="23.528cm" svg:y="14.597cm">
              <draw:text-box>
                <text:p><text:span text:style-name="T27">REG</text:span></text:p>
              </draw:text-box>
            </draw:frame>
          </draw:g>
        </draw:g>
        <draw:g draw:style-name="gr1">
          <draw:g draw:style-name="gr1">
            <draw:custom-shape draw:style-name="gr1179" draw:text-style-name="P14" draw:layer="layout" svg:width="1cm" svg:height="2cm" svg:x="35.999cm" svg:y="14cm">
              <text:p/>
              <draw:enhanced-geometry svg:viewBox="0 0 21600 21600" draw:mirror-horizontal="true" draw:type="rectangle" draw:enhanced-path="M 0 0 L 21600 0 21600 21600 0 21600 0 0 Z N"/>
            </draw:custom-shape>
            <draw:custom-shape draw:style-name="gr1177" draw:text-style-name="P1" draw:layer="layout" svg:width="1cm" svg:height="2cm" svg:x="34.999cm" svg:y="14cm">
              <text:p/>
              <draw:enhanced-geometry svg:viewBox="0 0 21600 21600" draw:mirror-horizontal="true" draw:type="rectangle" draw:enhanced-path="M 0 0 L 21600 0 21600 21600 0 21600 0 0 Z N"/>
            </draw:custom-shape>
          </draw:g>
          <draw:g draw:style-name="gr66">
            <draw:frame draw:style-name="gr1180" draw:text-style-name="P81" draw:layer="layout" svg:width="1.411cm" svg:height="0.806cm" svg:x="35.35cm" svg:y="14.597cm">
              <draw:text-box>
                <text:p><text:span text:style-name="T27">Reg</text:span></text:p>
              </draw:text-box>
            </draw:frame>
          </draw:g>
        </draw:g>
        <draw:line draw:style-name="gr38" draw:text-style-name="P4" draw:layer="layout" svg:x1="20.999cm" svg:y1="15cm" svg:x2="22.999cm" svg:y2="15cm">
          <text:p/>
        </draw:line>
        <draw:line draw:style-name="gr38" draw:text-style-name="P4" draw:layer="layout" svg:x1="22.499cm" svg:y1="15cm" svg:x2="22.499cm" svg:y2="14.5cm">
          <text:p/>
        </draw:line>
        <draw:line draw:style-name="gr38" draw:text-style-name="P4" draw:layer="layout" svg:x1="22.499cm" svg:y1="14.5cm" svg:x2="22.999cm" svg:y2="14.5cm">
          <text:p/>
        </draw:line>
        <draw:line draw:style-name="gr38" draw:text-style-name="P4" draw:layer="layout" svg:x1="24.999cm" svg:y1="14.5cm" svg:x2="26.999cm" svg:y2="14.5cm">
          <text:p/>
        </draw:line>
        <draw:line draw:style-name="gr38" draw:text-style-name="P4" draw:layer="layout" svg:x1="24.999cm" svg:y1="15.5cm" svg:x2="26.999cm" svg:y2="15.5cm">
          <text:p/>
        </draw:line>
        <draw:line draw:style-name="gr38" draw:text-style-name="P4" draw:layer="layout" svg:x1="28.999cm" svg:y1="15cm" svg:x2="30.999cm" svg:y2="15cm">
          <text:p/>
        </draw:line>
        <draw:line draw:style-name="gr38" draw:text-style-name="P4" draw:layer="layout" svg:x1="32.999cm" svg:y1="15cm" svg:x2="34.999cm" svg:y2="15cm">
          <text:p/>
        </draw:line>
        <draw:g draw:style-name="gr1">
          <draw:g draw:style-name="gr1">
            <draw:custom-shape draw:style-name="gr1176" draw:text-style-name="P91" draw:layer="layout" svg:width="1cm" svg:height="2cm" svg:x="30.999cm" svg:y="14cm">
              <text:p/>
              <draw:enhanced-geometry svg:viewBox="0 0 21600 21600" draw:mirror-horizontal="false" draw:mirror-vertical="false" draw:type="rectangle" draw:enhanced-path="M 0 0 L 21600 0 21600 21600 0 21600 0 0 Z N"/>
            </draw:custom-shape>
            <draw:custom-shape draw:style-name="gr1186" draw:text-style-name="P92" draw:layer="layout" svg:width="1cm" svg:height="2cm" svg:x="31.999cm" svg:y="14cm">
              <text:p/>
              <draw:enhanced-geometry svg:viewBox="0 0 21600 21600" draw:mirror-horizontal="false" draw:mirror-vertical="false" draw:type="rectangle" draw:enhanced-path="M 0 0 L 21600 0 21600 21600 0 21600 0 0 Z N"/>
            </draw:custom-shape>
          </draw:g>
          <draw:frame draw:style-name="gr1187" draw:text-style-name="P81" draw:layer="layout" svg:width="1.272cm" svg:height="0.806cm" svg:x="31.365cm" svg:y="14.599cm">
            <draw:text-box>
              <text:p><text:span text:style-name="T27">DM</text:span></text:p>
            </draw:text-box>
          </draw:frame>
        </draw:g>
        <draw:line draw:style-name="gr38" draw:text-style-name="P4" draw:layer="layout" svg:x1="30.499cm" svg:y1="15cm" svg:x2="30.499cm" svg:y2="16.2cm">
          <text:p/>
        </draw:line>
        <draw:line draw:style-name="gr38" draw:text-style-name="P4" draw:layer="layout" svg:x1="30.499cm" svg:y1="16.2cm" svg:x2="33.499cm" svg:y2="16.2cm">
          <text:p/>
        </draw:line>
        <draw:line draw:style-name="gr38" draw:text-style-name="P4" draw:layer="layout" svg:x1="33.499cm" svg:y1="16.2cm" svg:x2="33.999cm" svg:y2="15cm">
          <text:p/>
        </draw:line>
        <draw:g draw:style-name="gr66">
          <draw:polygon draw:style-name="gr1174" draw:text-style-name="P90" draw:layer="layout" svg:width="1.999cm" svg:height="2.999cm" svg:x="30.999cm" svg:y="16.5cm" svg:viewBox="0 0 2000 3000" draw:points="0,0 0,1100 400,1500 0,1900 0,3000 2000,2000 2000,1000">
            <text:p/>
          </draw:polygon>
          <draw:frame draw:style-name="gr1175" draw:text-style-name="P81" draw:layer="layout" svg:width="1.466cm" svg:height="0.806cm" svg:x="31.399cm" svg:y="17.594cm">
            <draw:text-box>
              <text:p><text:span text:style-name="T27">ALU</text:span></text:p>
            </draw:text-box>
          </draw:frame>
        </draw:g>
        <draw:g draw:style-name="gr1">
          <draw:g draw:style-name="gr1">
            <draw:custom-shape draw:style-name="gr1176" draw:text-style-name="P14" draw:layer="layout" svg:width="1cm" svg:height="2cm" svg:x="22.999cm" svg:y="17cm">
              <text:p/>
              <draw:enhanced-geometry svg:viewBox="0 0 21600 21600" draw:type="rectangle" draw:enhanced-path="M 0 0 L 21600 0 21600 21600 0 21600 0 0 Z N"/>
            </draw:custom-shape>
            <draw:custom-shape draw:style-name="gr1177" draw:text-style-name="P1" draw:layer="layout" svg:width="1cm" svg:height="2cm" svg:x="23.999cm" svg:y="17cm">
              <text:p/>
              <draw:enhanced-geometry svg:viewBox="0 0 21600 21600" draw:type="rectangle" draw:enhanced-path="M 0 0 L 21600 0 21600 21600 0 21600 0 0 Z N"/>
            </draw:custom-shape>
          </draw:g>
          <draw:g draw:style-name="gr66">
            <draw:frame draw:style-name="gr1178" draw:text-style-name="P81" draw:layer="layout" svg:width="1.052cm" svg:height="0.806cm" svg:x="23.528cm" svg:y="17.597cm">
              <draw:text-box>
                <text:p><text:span text:style-name="T27">IM</text:span></text:p>
              </draw:text-box>
            </draw:frame>
          </draw:g>
        </draw:g>
        <draw:g draw:style-name="gr1">
          <draw:g draw:style-name="gr1">
            <draw:custom-shape draw:style-name="gr1179" draw:text-style-name="P14" draw:layer="layout" svg:width="1cm" svg:height="2cm" svg:x="26.999cm" svg:y="17cm">
              <text:p/>
              <draw:enhanced-geometry svg:viewBox="0 0 21600 21600" draw:type="rectangle" draw:enhanced-path="M 0 0 L 21600 0 21600 21600 0 21600 0 0 Z N"/>
            </draw:custom-shape>
            <draw:custom-shape draw:style-name="gr1177" draw:text-style-name="P1" draw:layer="layout" svg:width="1cm" svg:height="2cm" svg:x="27.999cm" svg:y="17cm">
              <text:p/>
              <draw:enhanced-geometry svg:viewBox="0 0 21600 21600" draw:type="rectangle" draw:enhanced-path="M 0 0 L 21600 0 21600 21600 0 21600 0 0 Z N"/>
            </draw:custom-shape>
          </draw:g>
          <draw:g draw:style-name="gr66">
            <draw:frame draw:style-name="gr1181" draw:text-style-name="P81" draw:layer="layout" svg:width="1.575cm" svg:height="0.806cm" svg:x="27.528cm" svg:y="17.597cm">
              <draw:text-box>
                <text:p><text:span text:style-name="T27">REG</text:span></text:p>
              </draw:text-box>
            </draw:frame>
          </draw:g>
        </draw:g>
        <draw:g draw:style-name="gr1">
          <draw:g draw:style-name="gr1">
            <draw:custom-shape draw:style-name="gr1179" draw:text-style-name="P14" draw:layer="layout" svg:width="1cm" svg:height="2cm" svg:x="39.999cm" svg:y="17cm">
              <text:p/>
              <draw:enhanced-geometry svg:viewBox="0 0 21600 21600" draw:mirror-horizontal="true" draw:type="rectangle" draw:enhanced-path="M 0 0 L 21600 0 21600 21600 0 21600 0 0 Z N"/>
            </draw:custom-shape>
            <draw:custom-shape draw:style-name="gr1177" draw:text-style-name="P1" draw:layer="layout" svg:width="1cm" svg:height="2cm" svg:x="38.999cm" svg:y="17cm">
              <text:p/>
              <draw:enhanced-geometry svg:viewBox="0 0 21600 21600" draw:mirror-horizontal="true" draw:type="rectangle" draw:enhanced-path="M 0 0 L 21600 0 21600 21600 0 21600 0 0 Z N"/>
            </draw:custom-shape>
          </draw:g>
          <draw:g draw:style-name="gr66">
            <draw:frame draw:style-name="gr1180" draw:text-style-name="P81" draw:layer="layout" svg:width="1.411cm" svg:height="0.806cm" svg:x="39.35cm" svg:y="17.597cm">
              <draw:text-box>
                <text:p><text:span text:style-name="T27">Reg</text:span></text:p>
              </draw:text-box>
            </draw:frame>
          </draw:g>
        </draw:g>
        <draw:line draw:style-name="gr38" draw:text-style-name="P4" draw:layer="layout" svg:x1="24.999cm" svg:y1="18cm" svg:x2="26.999cm" svg:y2="18cm">
          <text:p/>
        </draw:line>
        <draw:line draw:style-name="gr38" draw:text-style-name="P4" draw:layer="layout" svg:x1="26.499cm" svg:y1="18cm" svg:x2="26.499cm" svg:y2="17.5cm">
          <text:p/>
        </draw:line>
        <draw:line draw:style-name="gr38" draw:text-style-name="P4" draw:layer="layout" svg:x1="26.499cm" svg:y1="17.5cm" svg:x2="26.999cm" svg:y2="17.5cm">
          <text:p/>
        </draw:line>
        <draw:line draw:style-name="gr38" draw:text-style-name="P4" draw:layer="layout" svg:x1="28.999cm" svg:y1="17.5cm" svg:x2="30.999cm" svg:y2="17.5cm">
          <text:p/>
        </draw:line>
        <draw:line draw:style-name="gr38" draw:text-style-name="P4" draw:layer="layout" svg:x1="28.999cm" svg:y1="18.5cm" svg:x2="30.999cm" svg:y2="18.5cm">
          <text:p/>
        </draw:line>
        <draw:line draw:style-name="gr38" draw:text-style-name="P4" draw:layer="layout" svg:x1="32.999cm" svg:y1="18cm" svg:x2="34.999cm" svg:y2="18cm">
          <text:p/>
        </draw:line>
        <draw:line draw:style-name="gr38" draw:text-style-name="P4" draw:layer="layout" svg:x1="36.999cm" svg:y1="18cm" svg:x2="38.999cm" svg:y2="18cm">
          <text:p/>
        </draw:line>
        <draw:g draw:style-name="gr1">
          <draw:g draw:style-name="gr1">
            <draw:custom-shape draw:style-name="gr1176" draw:text-style-name="P91" draw:layer="layout" svg:width="1cm" svg:height="2cm" svg:x="34.999cm" svg:y="17cm">
              <text:p/>
              <draw:enhanced-geometry svg:viewBox="0 0 21600 21600" draw:mirror-horizontal="false" draw:mirror-vertical="false" draw:type="rectangle" draw:enhanced-path="M 0 0 L 21600 0 21600 21600 0 21600 0 0 Z N"/>
            </draw:custom-shape>
            <draw:custom-shape draw:style-name="gr1186" draw:text-style-name="P92" draw:layer="layout" svg:width="1cm" svg:height="2cm" svg:x="35.999cm" svg:y="17cm">
              <text:p/>
              <draw:enhanced-geometry svg:viewBox="0 0 21600 21600" draw:mirror-horizontal="false" draw:mirror-vertical="false" draw:type="rectangle" draw:enhanced-path="M 0 0 L 21600 0 21600 21600 0 21600 0 0 Z N"/>
            </draw:custom-shape>
          </draw:g>
          <draw:frame draw:style-name="gr1187" draw:text-style-name="P81" draw:layer="layout" svg:width="1.272cm" svg:height="0.806cm" svg:x="35.365cm" svg:y="17.599cm">
            <draw:text-box>
              <text:p><text:span text:style-name="T27">DM</text:span></text:p>
            </draw:text-box>
          </draw:frame>
        </draw:g>
        <draw:line draw:style-name="gr38" draw:text-style-name="P4" draw:layer="layout" svg:x1="34.499cm" svg:y1="18cm" svg:x2="34.499cm" svg:y2="19.2cm">
          <text:p/>
        </draw:line>
        <draw:line draw:style-name="gr38" draw:text-style-name="P4" draw:layer="layout" svg:x1="34.499cm" svg:y1="19.2cm" svg:x2="37.499cm" svg:y2="19.2cm">
          <text:p/>
        </draw:line>
        <draw:line draw:style-name="gr38" draw:text-style-name="P4" draw:layer="layout" svg:x1="37.499cm" svg:y1="19.2cm" svg:x2="37.999cm" svg:y2="18cm">
          <text:p/>
        </draw:line>
        <draw:custom-shape draw:style-name="gr1189" draw:text-style-name="P4" draw:layer="layout" svg:width="2.6cm" svg:height="2.6cm" svg:x="22.6cm" svg:y="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90" draw:text-style-name="P93" draw:layer="layout" svg:width="1.173cm" svg:height="0.962cm" svg:x="23.129cm" svg:y="6.1cm">
          <draw:text-box>
            <text:p><text:span text:style-name="T34">x2</text:span></text:p>
          </draw:text-box>
        </draw:frame>
        <draw:frame draw:style-name="gr1210" draw:text-style-name="P94" draw:layer="layout" svg:width="2.479cm" svg:height="0.569cm" svg:x="9.8cm" svg:y="3.901cm">
          <draw:text-box>
            <text:p><text:span text:style-name="T35">if_id_reg_rd=2</text:span></text:p>
          </draw:text-box>
        </draw:frame>
        <draw:frame draw:style-name="gr1211" draw:text-style-name="P94" draw:layer="layout" svg:width="2.465cm" svg:height="0.569cm" svg:x="9.8cm" svg:y="4.231cm">
          <draw:text-box>
            <text:p><text:span text:style-name="T35">if_id_reg_rs1=0</text:span></text:p>
          </draw:text-box>
        </draw:frame>
        <draw:frame draw:style-name="gr1212" draw:text-style-name="P94" draw:layer="layout" svg:width="2.462cm" svg:height="0.569cm" svg:x="9.8cm" svg:y="4.532cm">
          <draw:text-box>
            <text:p><text:span text:style-name="T35">if_id_reg_rs2=-</text:span></text:p>
          </draw:text-box>
        </draw:frame>
        <draw:frame draw:style-name="gr1210" draw:text-style-name="P94" draw:layer="layout" svg:width="2.479cm" svg:height="0.569cm" svg:x="13.801cm" svg:y="6.901cm">
          <draw:text-box>
            <text:p><text:span text:style-name="T35">if_id_reg_rd=2</text:span></text:p>
          </draw:text-box>
        </draw:frame>
        <draw:frame draw:style-name="gr1211" draw:text-style-name="P94" draw:layer="layout" svg:width="2.465cm" svg:height="0.569cm" svg:x="13.801cm" svg:y="7.231cm">
          <draw:text-box>
            <text:p><text:span text:style-name="T35">if_id_reg_rs1=2</text:span></text:p>
          </draw:text-box>
        </draw:frame>
        <draw:frame draw:style-name="gr1212" draw:text-style-name="P94" draw:layer="layout" svg:width="2.462cm" svg:height="0.569cm" svg:x="13.801cm" svg:y="7.532cm">
          <draw:text-box>
            <text:p><text:span text:style-name="T35">if_id_reg_rs2=-</text:span></text:p>
          </draw:text-box>
        </draw:frame>
        <draw:frame draw:style-name="gr1213" draw:text-style-name="P94" draw:layer="layout" svg:width="2.481cm" svg:height="0.569cm" svg:x="13.801cm" svg:y="3.901cm">
          <draw:text-box>
            <text:p><text:span text:style-name="T35">id_ex_reg_rd=2</text:span></text:p>
          </draw:text-box>
        </draw:frame>
        <draw:frame draw:style-name="gr1214" draw:text-style-name="P94" draw:layer="layout" svg:width="2.623cm" svg:height="0.569cm" svg:x="13.801cm" svg:y="4.231cm">
          <draw:text-box>
            <text:p><text:span text:style-name="T35">id_ex_reg_rs1=0</text:span></text:p>
          </draw:text-box>
        </draw:frame>
        <draw:frame draw:style-name="gr1215" draw:text-style-name="P94" draw:layer="layout" svg:width="2.56cm" svg:height="0.569cm" svg:x="13.801cm" svg:y="4.532cm">
          <draw:text-box>
            <text:p><text:span text:style-name="T35">id_ex_reg_rs2=-</text:span></text:p>
          </draw:text-box>
        </draw:frame>
        <draw:frame draw:style-name="gr1216" draw:text-style-name="P89" draw:layer="layout" svg:width="2.891cm" svg:height="0.569cm" svg:x="17.802cm" svg:y="3.901cm">
          <draw:text-box>
            <text:p><text:span text:style-name="T30">ex_mem_reg_rd=</text:span><text:span text:style-name="T30">2</text:span></text:p>
          </draw:text-box>
        </draw:frame>
        <draw:frame draw:style-name="gr1217" draw:text-style-name="P94" draw:layer="layout" svg:width="3.032cm" svg:height="0.569cm" svg:x="17.802cm" svg:y="4.231cm">
          <draw:text-box>
            <text:p><text:span text:style-name="T35">ex_mem_reg_rs1</text:span><text:span text:style-name="T35">=0</text:span></text:p>
          </draw:text-box>
        </draw:frame>
        <draw:frame draw:style-name="gr1218" draw:text-style-name="P94" draw:layer="layout" svg:width="2.969cm" svg:height="0.569cm" svg:x="17.802cm" svg:y="4.532cm">
          <draw:text-box>
            <text:p><text:span text:style-name="T35">ex_mem_reg_rs2</text:span><text:span text:style-name="T35">=-</text:span></text:p>
          </draw:text-box>
        </draw:frame>
        <draw:frame draw:style-name="gr1219" draw:text-style-name="P94" draw:layer="layout" svg:width="2.954cm" svg:height="0.569cm" svg:x="21.803cm" svg:y="3.901cm">
          <draw:text-box>
            <text:p><text:span text:style-name="T35">mem_wb_reg_rd</text:span><text:span text:style-name="T35">=2</text:span></text:p>
          </draw:text-box>
        </draw:frame>
        <draw:frame draw:style-name="gr1220" draw:text-style-name="P94" draw:layer="layout" svg:width="3.095cm" svg:height="0.569cm" svg:x="21.803cm" svg:y="4.231cm">
          <draw:text-box>
            <text:p><text:span text:style-name="T35">mem_wb_reg_rs</text:span><text:span text:style-name="T35">1=0</text:span></text:p>
          </draw:text-box>
        </draw:frame>
        <draw:frame draw:style-name="gr1217" draw:text-style-name="P94" draw:layer="layout" svg:width="3.032cm" svg:height="0.569cm" svg:x="21.803cm" svg:y="4.532cm">
          <draw:text-box>
            <text:p><text:span text:style-name="T35">mem_wb_reg_rs</text:span><text:span text:style-name="T35">2=-</text:span></text:p>
          </draw:text-box>
        </draw:frame>
        <draw:frame draw:style-name="gr1213" draw:text-style-name="P94" draw:layer="layout" svg:width="2.481cm" svg:height="0.569cm" svg:x="17.802cm" svg:y="6.901cm">
          <draw:text-box>
            <text:p><text:span text:style-name="T35">id_ex_reg_rd=2</text:span></text:p>
          </draw:text-box>
        </draw:frame>
        <draw:frame draw:style-name="gr1214" draw:text-style-name="P89" draw:layer="layout" svg:width="2.623cm" svg:height="0.569cm" svg:x="17.802cm" svg:y="7.231cm">
          <draw:text-box>
            <text:p><text:span text:style-name="T30">id_ex_reg_rs1=2</text:span></text:p>
          </draw:text-box>
        </draw:frame>
        <draw:frame draw:style-name="gr1215" draw:text-style-name="P94" draw:layer="layout" svg:width="2.56cm" svg:height="0.569cm" svg:x="17.802cm" svg:y="7.532cm">
          <draw:text-box>
            <text:p><text:span text:style-name="T35">id_ex_reg_rs2=-</text:span></text:p>
          </draw:text-box>
        </draw:frame>
        <draw:frame draw:style-name="gr1216" draw:text-style-name="P89" draw:layer="layout" svg:width="2.891cm" svg:height="0.569cm" svg:x="21.803cm" svg:y="6.901cm">
          <draw:text-box>
            <text:p><text:span text:style-name="T30">ex_mem_reg_rd=</text:span><text:span text:style-name="T30">2</text:span></text:p>
          </draw:text-box>
        </draw:frame>
        <draw:frame draw:style-name="gr1217" draw:text-style-name="P94" draw:layer="layout" svg:width="3.032cm" svg:height="0.569cm" svg:x="21.803cm" svg:y="7.231cm">
          <draw:text-box>
            <text:p><text:span text:style-name="T35">ex_mem_reg_rs1</text:span><text:span text:style-name="T35">=2</text:span></text:p>
          </draw:text-box>
        </draw:frame>
        <draw:frame draw:style-name="gr1218" draw:text-style-name="P94" draw:layer="layout" svg:width="2.969cm" svg:height="0.569cm" svg:x="21.803cm" svg:y="7.532cm">
          <draw:text-box>
            <text:p><text:span text:style-name="T35">ex_mem_reg_rs2</text:span><text:span text:style-name="T35">=-</text:span></text:p>
          </draw:text-box>
        </draw:frame>
        <draw:frame draw:style-name="gr1219" draw:text-style-name="P94" draw:layer="layout" svg:width="2.954cm" svg:height="0.569cm" svg:x="25.804cm" svg:y="6.901cm">
          <draw:text-box>
            <text:p><text:span text:style-name="T35">mem_wb_reg_rd</text:span><text:span text:style-name="T35">=2</text:span></text:p>
          </draw:text-box>
        </draw:frame>
        <draw:frame draw:style-name="gr1220" draw:text-style-name="P94" draw:layer="layout" svg:width="3.095cm" svg:height="0.569cm" svg:x="25.804cm" svg:y="7.231cm">
          <draw:text-box>
            <text:p><text:span text:style-name="T35">mem_wb_reg_rs</text:span><text:span text:style-name="T35">1=2</text:span></text:p>
          </draw:text-box>
        </draw:frame>
        <draw:frame draw:style-name="gr1217" draw:text-style-name="P94" draw:layer="layout" svg:width="3.032cm" svg:height="0.569cm" svg:x="25.804cm" svg:y="7.532cm">
          <draw:text-box>
            <text:p><text:span text:style-name="T35">mem_wb_reg_rs</text:span><text:span text:style-name="T35">2=-</text:span></text:p>
          </draw:text-box>
        </draw:frame>
        <draw:frame draw:style-name="gr1221" draw:text-style-name="P89" draw:layer="layout" svg:width="2.087cm" svg:height="0.569cm" svg:x="16.762cm" svg:y="5.5cm">
          <draw:text-box>
            <text:p><text:span text:style-name="T30">forward_a=2</text:span></text:p>
          </draw:text-box>
        </draw:frame>
        <draw:line draw:style-name="gr1222" draw:text-style-name="P4" draw:layer="layout" svg:x1="23.601cm" svg:y1="6.843cm" svg:x2="16cm" svg:y2="8.44cm">
          <text:p/>
        </draw:line>
        <draw:line draw:style-name="gr1199" draw:text-style-name="P4" draw:layer="layout" svg:x1="18.138cm" svg:y1="6cm" svg:x2="18.738cm" svg:y2="8.5cm">
          <text:p/>
        </draw:line>
        <draw:frame draw:style-name="gr1223" draw:text-style-name="P89" draw:layer="layout" svg:width="5.949cm" svg:height="0.569cm" svg:x="16.063cm" svg:y="5.201cm">
          <draw:text-box>
            <text:p><text:span text:style-name="T30">forward_a_mux_</text:span><text:span text:style-name="T30">out_s = </text:span><text:span text:style-name="T30">alu_result_mem_</text:span><text:span text:style-name="T30">s</text:span></text:p>
          </draw:text-box>
        </draw:frame>
        <draw:frame draw:style-name="gr1224" draw:text-style-name="P94" draw:layer="layout" svg:width="2.051cm" svg:height="0.569cm" svg:x="22.948cm" svg:y="5.3cm">
          <draw:text-box>
            <text:p><text:span text:style-name="T35">x2=0x100</text:span></text:p>
          </draw:text-box>
        </draw:frame>
        <draw:frame draw:style-name="gr1225" draw:text-style-name="P94" draw:layer="layout" svg:width="2.291cm" svg:height="0.569cm" svg:x="12.2cm" svg:y="6.1cm">
          <draw:text-box>
            <text:p><text:span text:style-name="T35">imm_d=0x100</text:span></text:p>
          </draw:text-box>
        </draw:frame>
        <draw:frame draw:style-name="gr1224" draw:text-style-name="P94" draw:layer="layout" svg:width="2.051cm" svg:height="0.569cm" svg:x="12.301cm" svg:y="5.101cm">
          <draw:text-box>
            <text:p><text:span text:style-name="T35">reg_a=0</text:span></text:p>
          </draw:text-box>
        </draw:frame>
        <draw:frame draw:style-name="gr1226" draw:text-style-name="P94" draw:layer="layout" svg:width="2.67cm" svg:height="0.569cm" svg:x="15.33cm" svg:y="6.031cm">
          <draw:text-box>
            <text:p><text:span text:style-name="T35">alu_result=0x100</text:span></text:p>
          </draw:text-box>
        </draw:frame>
        <draw:frame draw:style-name="gr1224" draw:text-style-name="P94" draw:layer="layout" svg:width="2.051cm" svg:height="0.569cm" svg:x="14.949cm" svg:y="8.301cm">
          <draw:text-box>
            <text:p><text:span text:style-name="T35">x2=0x???</text:span></text:p>
          </draw:text-box>
        </draw:frame>
        <draw:frame draw:style-name="gr1224" draw:text-style-name="P94" draw:layer="layout" svg:width="2.051cm" svg:height="0.569cm" svg:x="16.2cm" svg:y="9.1cm">
          <draw:text-box>
            <text:p><text:span text:style-name="T35">imm_d=8</text:span></text:p>
          </draw:text-box>
        </draw:frame>
        <draw:frame draw:style-name="gr1224" draw:text-style-name="P94" draw:layer="layout" svg:width="2.051cm" svg:height="0.569cm" svg:x="16.301cm" svg:y="8.101cm">
          <draw:text-box>
            <text:p><text:span text:style-name="T35">reg_a=??</text:span></text:p>
          </draw:text-box>
        </draw:frame>
        <draw:frame draw:style-name="gr1227" draw:text-style-name="P94" draw:layer="layout" svg:width="2.986cm" svg:height="0.569cm" svg:x="19.031cm" svg:y="9.032cm">
          <draw:text-box>
            <text:p><text:span text:style-name="T35">alu_result=0x100</text:span><text:span text:style-name="T35">00</text:span></text:p>
          </draw:text-box>
        </draw:frame>
        <draw:frame draw:style-name="gr1228" draw:text-style-name="P94" draw:layer="layout" svg:width="2.055cm" svg:height="0.569cm" svg:x="26.949cm" svg:y="8.301cm">
          <draw:text-box>
            <text:p><text:span text:style-name="T35">x2=0x10000</text:span></text:p>
          </draw:text-box>
        </draw:frame>
        <draw:frame draw:style-name="gr1208" draw:text-style-name="P81" draw:layer="layout" svg:width="3.855cm" svg:height="0.806cm" svg:x="1.01cm" svg:y="11.6cm">
          <draw:text-box>
            <text:p><text:span text:style-name="T27">ld x3, </text:span><text:span text:style-name="T27">0(</text:span><text:span text:style-name="T31">x2</text:span><text:span text:style-name="T27">)</text:span></text:p>
          </draw:text-box>
        </draw:frame>
        <draw:frame draw:style-name="gr1210" draw:text-style-name="P94" draw:layer="layout" svg:width="2.479cm" svg:height="0.569cm" svg:x="17.801cm" svg:y="9.902cm">
          <draw:text-box>
            <text:p><text:span text:style-name="T35">if_id_reg_rd=3</text:span></text:p>
          </draw:text-box>
        </draw:frame>
        <draw:frame draw:style-name="gr1211" draw:text-style-name="P94" draw:layer="layout" svg:width="2.465cm" svg:height="0.569cm" svg:x="17.801cm" svg:y="10.232cm">
          <draw:text-box>
            <text:p><text:span text:style-name="T35">if_id_reg_rs1=2</text:span></text:p>
          </draw:text-box>
        </draw:frame>
        <draw:frame draw:style-name="gr1212" draw:text-style-name="P94" draw:layer="layout" svg:width="2.462cm" svg:height="0.569cm" svg:x="17.801cm" svg:y="10.533cm">
          <draw:text-box>
            <text:p><text:span text:style-name="T35">if_id_reg_rs2=-</text:span></text:p>
          </draw:text-box>
        </draw:frame>
        <draw:frame draw:style-name="gr1213" draw:text-style-name="P94" draw:layer="layout" svg:width="2.481cm" svg:height="0.569cm" svg:x="21.802cm" svg:y="9.902cm">
          <draw:text-box>
            <text:p><text:span text:style-name="T35">id_ex_reg_rd=3</text:span></text:p>
          </draw:text-box>
        </draw:frame>
        <draw:frame draw:style-name="gr1214" draw:text-style-name="P89" draw:layer="layout" svg:width="2.623cm" svg:height="0.569cm" svg:x="21.802cm" svg:y="10.232cm">
          <draw:text-box>
            <text:p><text:span text:style-name="T30">id_ex_reg_rs1=2</text:span></text:p>
          </draw:text-box>
        </draw:frame>
        <draw:frame draw:style-name="gr1215" draw:text-style-name="P94" draw:layer="layout" svg:width="2.56cm" svg:height="0.569cm" svg:x="21.802cm" svg:y="10.533cm">
          <draw:text-box>
            <text:p><text:span text:style-name="T35">id_ex_reg_rs2=-</text:span></text:p>
          </draw:text-box>
        </draw:frame>
        <draw:frame draw:style-name="gr1216" draw:text-style-name="P94" draw:layer="layout" svg:width="2.891cm" svg:height="0.569cm" svg:x="25.803cm" svg:y="9.902cm">
          <draw:text-box>
            <text:p><text:span text:style-name="T35">ex_mem_reg_rd=</text:span><text:span text:style-name="T35">3</text:span></text:p>
          </draw:text-box>
        </draw:frame>
        <draw:frame draw:style-name="gr1217" draw:text-style-name="P94" draw:layer="layout" svg:width="3.032cm" svg:height="0.569cm" svg:x="25.803cm" svg:y="10.232cm">
          <draw:text-box>
            <text:p><text:span text:style-name="T35">ex_mem_reg_rs1</text:span><text:span text:style-name="T35">=2</text:span></text:p>
          </draw:text-box>
        </draw:frame>
        <draw:frame draw:style-name="gr1218" draw:text-style-name="P94" draw:layer="layout" svg:width="2.969cm" svg:height="0.569cm" svg:x="25.803cm" svg:y="10.533cm">
          <draw:text-box>
            <text:p><text:span text:style-name="T35">ex_mem_reg_rs2</text:span><text:span text:style-name="T35">=-</text:span></text:p>
          </draw:text-box>
        </draw:frame>
        <draw:frame draw:style-name="gr1219" draw:text-style-name="P94" draw:layer="layout" svg:width="2.954cm" svg:height="0.569cm" svg:x="29.804cm" svg:y="9.902cm">
          <draw:text-box>
            <text:p><text:span text:style-name="T35">mem_wb_reg_rd</text:span><text:span text:style-name="T35">=3</text:span></text:p>
          </draw:text-box>
        </draw:frame>
        <draw:frame draw:style-name="gr1220" draw:text-style-name="P94" draw:layer="layout" svg:width="3.095cm" svg:height="0.569cm" svg:x="29.804cm" svg:y="10.232cm">
          <draw:text-box>
            <text:p><text:span text:style-name="T35">mem_wb_reg_rs</text:span><text:span text:style-name="T35">1=2</text:span></text:p>
          </draw:text-box>
        </draw:frame>
        <draw:frame draw:style-name="gr1217" draw:text-style-name="P94" draw:layer="layout" svg:width="3.032cm" svg:height="0.569cm" svg:x="29.804cm" svg:y="10.533cm">
          <draw:text-box>
            <text:p><text:span text:style-name="T35">mem_wb_reg_rs</text:span><text:span text:style-name="T35">2=-</text:span></text:p>
          </draw:text-box>
        </draw:frame>
        <draw:frame draw:style-name="gr1224" draw:text-style-name="P94" draw:layer="layout" svg:width="2.051cm" svg:height="0.569cm" svg:x="18.95cm" svg:y="11.302cm">
          <draw:text-box>
            <text:p><text:span text:style-name="T35">x2=0x???</text:span></text:p>
          </draw:text-box>
        </draw:frame>
        <draw:line draw:style-name="gr1222" draw:text-style-name="P4" draw:layer="layout" svg:x1="27.627cm" svg:y1="9.783cm" svg:x2="20.026cm" svg:y2="11.38cm">
          <text:p/>
        </draw:line>
        <draw:frame draw:style-name="gr1224" draw:text-style-name="P94" draw:layer="layout" svg:width="2.051cm" svg:height="0.569cm" svg:x="20.201cm" svg:y="12.101cm">
          <draw:text-box>
            <text:p><text:span text:style-name="T35">imm_d=0</text:span></text:p>
          </draw:text-box>
        </draw:frame>
        <draw:frame draw:style-name="gr1224" draw:text-style-name="P94" draw:layer="layout" svg:width="2.051cm" svg:height="0.569cm" svg:x="20.302cm" svg:y="11.102cm">
          <draw:text-box>
            <text:p><text:span text:style-name="T35">reg_a=??</text:span></text:p>
          </draw:text-box>
        </draw:frame>
        <draw:line draw:style-name="gr1199" draw:text-style-name="P4" draw:layer="layout" svg:x1="22.176cm" svg:y1="9cm" svg:x2="22.776cm" svg:y2="11.5cm">
          <text:p/>
        </draw:line>
        <draw:frame draw:style-name="gr1221" draw:text-style-name="P89" draw:layer="layout" svg:width="2.087cm" svg:height="0.569cm" svg:x="20.763cm" svg:y="8.501cm">
          <draw:text-box>
            <text:p><text:span text:style-name="T30">forward_a=2</text:span></text:p>
          </draw:text-box>
        </draw:frame>
        <draw:frame draw:style-name="gr1223" draw:text-style-name="P89" draw:layer="layout" svg:width="5.949cm" svg:height="0.569cm" svg:x="20.063cm" svg:y="8.202cm">
          <draw:text-box>
            <text:p><text:span text:style-name="T30">forward_a_mux_</text:span><text:span text:style-name="T30">out_s = </text:span><text:span text:style-name="T30">alu_result_mem_</text:span><text:span text:style-name="T30">s</text:span></text:p>
          </draw:text-box>
        </draw:frame>
        <draw:frame draw:style-name="gr1227" draw:text-style-name="P94" draw:layer="layout" svg:width="2.986cm" svg:height="0.569cm" svg:x="23.032cm" svg:y="12.033cm">
          <draw:text-box>
            <text:p><text:span text:style-name="T35">alu_result=0x100</text:span><text:span text:style-name="T35">00</text:span></text:p>
          </draw:text-box>
        </draw:frame>
        <draw:frame draw:style-name="gr1229" draw:text-style-name="P94" draw:layer="layout" svg:width="1.07cm" svg:height="0.569cm" svg:x="26.131cm" svg:y="11.6cm">
          <draw:text-box>
            <text:p><text:span text:style-name="T35">addr</text:span></text:p>
          </draw:text-box>
        </draw:frame>
        <draw:frame draw:style-name="gr1230" draw:text-style-name="P94" draw:layer="layout" svg:width="2.308cm" svg:height="0.569cm" svg:x="26.795cm" svg:y="11cm">
          <draw:text-box>
            <text:p><text:span text:style-name="T35">M[0x10000]=1</text:span></text:p>
          </draw:text-box>
        </draw:frame>
        <draw:frame draw:style-name="gr1231" draw:text-style-name="P94" draw:layer="layout" svg:width="1.574cm" svg:height="0.569cm" svg:x="27.227cm" svg:y="11.231cm">
          <draw:text-box>
            <text:p><text:span text:style-name="T35">GPIO.ID</text:span></text:p>
          </draw:text-box>
        </draw:frame>
        <draw:frame draw:style-name="gr1228" draw:text-style-name="P94" draw:layer="layout" svg:width="2.055cm" svg:height="0.569cm" svg:x="30.999cm" svg:y="11.331cm">
          <draw:text-box>
            <text:p><text:span text:style-name="T35">x2=0x10000</text:span></text:p>
          </draw:text-box>
        </draw:frame>
        <draw:frame draw:style-name="gr1224" draw:text-style-name="P94" draw:layer="layout" svg:width="2.051cm" svg:height="0.569cm" svg:x="31cm" svg:y="12.032cm">
          <draw:text-box>
            <text:p><text:span text:style-name="T35">x3=0x1</text:span></text:p>
          </draw:text-box>
        </draw:frame>
      </draw:page>
      <draw:page draw:name="page20" draw:style-name="dp1" draw:master-page-name="Standard">
        <draw:frame draw:style-name="gr1207" draw:text-style-name="P81" draw:layer="layout" svg:width="4.522cm" svg:height="0.806cm" svg:x="1.008cm" svg:y="5.6cm">
          <draw:text-box>
            <text:p><text:span text:style-name="T27">addi </text:span><text:span text:style-name="T31">x2</text:span><text:span text:style-name="T27">, </text:span><text:span text:style-name="T27">x0, 0x100</text:span></text:p>
          </draw:text-box>
        </draw:frame>
        <draw:frame draw:style-name="gr1173" draw:text-style-name="P34" draw:layer="layout" svg:width="6.124cm" svg:height="0.962cm" svg:x="5.699cm" svg:y="1.038cm">
          <draw:text-box>
            <text:p><text:span text:style-name="T9">Time in </text:span><text:span text:style-name="T9">clock </text:span><text:span text:style-name="T9">cycles</text:span></text:p>
          </draw:text-box>
        </draw:frame>
        <draw:line draw:style-name="gr146" draw:text-style-name="P4" draw:layer="layout" svg:x1="1.099cm" svg:y1="5cm" svg:x2="1.099cm" svg:y2="11cm">
          <text:p/>
        </draw:line>
        <draw:line draw:style-name="gr146" draw:text-style-name="P4" draw:layer="layout" svg:x1="5.999cm" svg:y1="2cm" svg:x2="12.999cm" svg:y2="2cm">
          <text:p/>
        </draw:line>
        <draw:g draw:style-name="gr66">
          <draw:polygon draw:style-name="gr1174" draw:text-style-name="P90" draw:layer="layout" svg:width="1.999cm" svg:height="2.999cm" svg:x="14.999cm" svg:y="4.5cm" svg:viewBox="0 0 2000 3000" draw:points="0,0 0,1100 400,1500 0,1900 0,3000 2000,2000 2000,1000">
            <text:p/>
          </draw:polygon>
          <draw:frame draw:style-name="gr1175" draw:text-style-name="P81" draw:layer="layout" svg:width="1.466cm" svg:height="0.806cm" svg:x="15.399cm" svg:y="5.594cm">
            <draw:text-box>
              <text:p><text:span text:style-name="T27">ALU</text:span></text:p>
            </draw:text-box>
          </draw:frame>
        </draw:g>
        <draw:g draw:style-name="gr1">
          <draw:g draw:style-name="gr1">
            <draw:custom-shape draw:style-name="gr1176" draw:text-style-name="P14" draw:layer="layout" svg:width="1cm" svg:height="2cm" svg:x="6.999cm" svg:y="5cm">
              <text:p/>
              <draw:enhanced-geometry svg:viewBox="0 0 21600 21600" draw:type="rectangle" draw:enhanced-path="M 0 0 L 21600 0 21600 21600 0 21600 0 0 Z N"/>
            </draw:custom-shape>
            <draw:custom-shape draw:style-name="gr1177" draw:text-style-name="P1" draw:layer="layout" svg:width="1cm" svg:height="2cm" svg:x="7.999cm" svg:y="5cm">
              <text:p/>
              <draw:enhanced-geometry svg:viewBox="0 0 21600 21600" draw:type="rectangle" draw:enhanced-path="M 0 0 L 21600 0 21600 21600 0 21600 0 0 Z N"/>
            </draw:custom-shape>
          </draw:g>
          <draw:g draw:style-name="gr66">
            <draw:frame draw:style-name="gr1178" draw:text-style-name="P81" draw:layer="layout" svg:width="1.052cm" svg:height="0.806cm" svg:x="7.528cm" svg:y="5.597cm">
              <draw:text-box>
                <text:p><text:span text:style-name="T27">IM</text:span></text:p>
              </draw:text-box>
            </draw:frame>
          </draw:g>
        </draw:g>
        <draw:g draw:style-name="gr1">
          <draw:g draw:style-name="gr1">
            <draw:custom-shape draw:style-name="gr1179" draw:text-style-name="P14" draw:layer="layout" svg:width="1cm" svg:height="2cm" svg:x="10.999cm" svg:y="5cm">
              <text:p/>
              <draw:enhanced-geometry svg:viewBox="0 0 21600 21600" draw:type="rectangle" draw:enhanced-path="M 0 0 L 21600 0 21600 21600 0 21600 0 0 Z N"/>
            </draw:custom-shape>
            <draw:custom-shape draw:style-name="gr1177" draw:text-style-name="P1" draw:layer="layout" svg:width="1cm" svg:height="2cm" svg:x="11.999cm" svg:y="5cm">
              <text:p/>
              <draw:enhanced-geometry svg:viewBox="0 0 21600 21600" draw:type="rectangle" draw:enhanced-path="M 0 0 L 21600 0 21600 21600 0 21600 0 0 Z N"/>
            </draw:custom-shape>
          </draw:g>
          <draw:g draw:style-name="gr66">
            <draw:frame draw:style-name="gr1180" draw:text-style-name="P81" draw:layer="layout" svg:width="1.411cm" svg:height="0.806cm" svg:x="11.528cm" svg:y="5.597cm">
              <draw:text-box>
                <text:p><text:span text:style-name="T27">Reg</text:span></text:p>
              </draw:text-box>
            </draw:frame>
          </draw:g>
        </draw:g>
        <draw:g draw:style-name="gr1">
          <draw:g draw:style-name="gr1">
            <draw:custom-shape draw:style-name="gr1179" draw:text-style-name="P14" draw:layer="layout" svg:width="1cm" svg:height="2cm" svg:x="23.999cm" svg:y="5cm">
              <text:p/>
              <draw:enhanced-geometry svg:viewBox="0 0 21600 21600" draw:mirror-horizontal="true" draw:type="rectangle" draw:enhanced-path="M 0 0 L 21600 0 21600 21600 0 21600 0 0 Z N"/>
            </draw:custom-shape>
            <draw:custom-shape draw:style-name="gr1177" draw:text-style-name="P1" draw:layer="layout" svg:width="1cm" svg:height="2cm" svg:x="22.999cm" svg:y="5cm">
              <text:p/>
              <draw:enhanced-geometry svg:viewBox="0 0 21600 21600" draw:mirror-horizontal="true" draw:type="rectangle" draw:enhanced-path="M 0 0 L 21600 0 21600 21600 0 21600 0 0 Z N"/>
            </draw:custom-shape>
          </draw:g>
          <draw:g draw:style-name="gr66">
            <draw:frame draw:style-name="gr1180" draw:text-style-name="P81" draw:layer="layout" svg:width="1.411cm" svg:height="0.806cm" svg:x="23.35cm" svg:y="5.597cm">
              <draw:text-box>
                <text:p><text:span text:style-name="T27">Reg</text:span></text:p>
              </draw:text-box>
            </draw:frame>
          </draw:g>
        </draw:g>
        <draw:line draw:style-name="gr38" draw:text-style-name="P4" draw:layer="layout" svg:x1="8.999cm" svg:y1="6cm" svg:x2="10.999cm" svg:y2="6cm">
          <text:p/>
        </draw:line>
        <draw:line draw:style-name="gr38" draw:text-style-name="P4" draw:layer="layout" svg:x1="10.499cm" svg:y1="6cm" svg:x2="10.499cm" svg:y2="5.5cm">
          <text:p/>
        </draw:line>
        <draw:line draw:style-name="gr38" draw:text-style-name="P4" draw:layer="layout" svg:x1="10.499cm" svg:y1="5.5cm" svg:x2="10.999cm" svg:y2="5.5cm">
          <text:p/>
        </draw:line>
        <draw:line draw:style-name="gr38" draw:text-style-name="P4" draw:layer="layout" svg:x1="12.999cm" svg:y1="5.5cm" svg:x2="14.999cm" svg:y2="5.5cm">
          <text:p/>
        </draw:line>
        <draw:line draw:style-name="gr38" draw:text-style-name="P4" draw:layer="layout" svg:x1="12.999cm" svg:y1="6.5cm" svg:x2="14.999cm" svg:y2="6.5cm">
          <text:p/>
        </draw:line>
        <draw:line draw:style-name="gr38" draw:text-style-name="P4" draw:layer="layout" svg:x1="16.999cm" svg:y1="6cm" svg:x2="18.999cm" svg:y2="6cm">
          <text:p/>
        </draw:line>
        <draw:line draw:style-name="gr38" draw:text-style-name="P4" draw:layer="layout" svg:x1="20.999cm" svg:y1="6cm" svg:x2="22.999cm" svg:y2="6cm">
          <text:p/>
        </draw:line>
        <draw:g draw:style-name="gr66">
          <draw:polygon draw:style-name="gr1174" draw:text-style-name="P90" draw:layer="layout" svg:width="1.999cm" svg:height="2.999cm" svg:x="18.999cm" svg:y="7.5cm" svg:viewBox="0 0 2000 3000" draw:points="0,0 0,1100 400,1500 0,1900 0,3000 2000,2000 2000,1000">
            <text:p/>
          </draw:polygon>
          <draw:frame draw:style-name="gr1175" draw:text-style-name="P81" draw:layer="layout" svg:width="1.466cm" svg:height="0.806cm" svg:x="19.399cm" svg:y="8.594cm">
            <draw:text-box>
              <text:p><text:span text:style-name="T27">ALU</text:span></text:p>
            </draw:text-box>
          </draw:frame>
        </draw:g>
        <draw:g draw:style-name="gr1">
          <draw:g draw:style-name="gr1">
            <draw:custom-shape draw:style-name="gr1176" draw:text-style-name="P14" draw:layer="layout" svg:width="1cm" svg:height="2cm" svg:x="10.999cm" svg:y="8cm">
              <text:p/>
              <draw:enhanced-geometry svg:viewBox="0 0 21600 21600" draw:type="rectangle" draw:enhanced-path="M 0 0 L 21600 0 21600 21600 0 21600 0 0 Z N"/>
            </draw:custom-shape>
            <draw:custom-shape draw:style-name="gr1177" draw:text-style-name="P1" draw:layer="layout" svg:width="1cm" svg:height="2cm" svg:x="11.999cm" svg:y="8cm">
              <text:p/>
              <draw:enhanced-geometry svg:viewBox="0 0 21600 21600" draw:type="rectangle" draw:enhanced-path="M 0 0 L 21600 0 21600 21600 0 21600 0 0 Z N"/>
            </draw:custom-shape>
          </draw:g>
          <draw:g draw:style-name="gr66">
            <draw:frame draw:style-name="gr1178" draw:text-style-name="P81" draw:layer="layout" svg:width="1.052cm" svg:height="0.806cm" svg:x="11.528cm" svg:y="8.597cm">
              <draw:text-box>
                <text:p><text:span text:style-name="T27">IM</text:span></text:p>
              </draw:text-box>
            </draw:frame>
          </draw:g>
        </draw:g>
        <draw:g draw:style-name="gr1">
          <draw:g draw:style-name="gr1">
            <draw:custom-shape draw:style-name="gr1179" draw:text-style-name="P14" draw:layer="layout" svg:width="1cm" svg:height="2cm" svg:x="14.999cm" svg:y="8cm">
              <text:p/>
              <draw:enhanced-geometry svg:viewBox="0 0 21600 21600" draw:type="rectangle" draw:enhanced-path="M 0 0 L 21600 0 21600 21600 0 21600 0 0 Z N"/>
            </draw:custom-shape>
            <draw:custom-shape draw:style-name="gr1177" draw:text-style-name="P1" draw:layer="layout" svg:width="1cm" svg:height="2cm" svg:x="15.999cm" svg:y="8cm">
              <text:p/>
              <draw:enhanced-geometry svg:viewBox="0 0 21600 21600" draw:type="rectangle" draw:enhanced-path="M 0 0 L 21600 0 21600 21600 0 21600 0 0 Z N"/>
            </draw:custom-shape>
          </draw:g>
          <draw:g draw:style-name="gr66">
            <draw:frame draw:style-name="gr1181" draw:text-style-name="P81" draw:layer="layout" svg:width="1.575cm" svg:height="0.806cm" svg:x="15.528cm" svg:y="8.597cm">
              <draw:text-box>
                <text:p><text:span text:style-name="T27">REG</text:span></text:p>
              </draw:text-box>
            </draw:frame>
          </draw:g>
        </draw:g>
        <draw:g draw:style-name="gr1">
          <draw:g draw:style-name="gr1">
            <draw:custom-shape draw:style-name="gr1179" draw:text-style-name="P14" draw:layer="layout" svg:width="1cm" svg:height="2cm" svg:x="27.999cm" svg:y="8cm">
              <text:p/>
              <draw:enhanced-geometry svg:viewBox="0 0 21600 21600" draw:mirror-horizontal="true" draw:type="rectangle" draw:enhanced-path="M 0 0 L 21600 0 21600 21600 0 21600 0 0 Z N"/>
            </draw:custom-shape>
            <draw:custom-shape draw:style-name="gr1177" draw:text-style-name="P1" draw:layer="layout" svg:width="1cm" svg:height="2cm" svg:x="26.999cm" svg:y="8cm">
              <text:p/>
              <draw:enhanced-geometry svg:viewBox="0 0 21600 21600" draw:mirror-horizontal="true" draw:type="rectangle" draw:enhanced-path="M 0 0 L 21600 0 21600 21600 0 21600 0 0 Z N"/>
            </draw:custom-shape>
          </draw:g>
          <draw:g draw:style-name="gr66">
            <draw:frame draw:style-name="gr1180" draw:text-style-name="P81" draw:layer="layout" svg:width="1.411cm" svg:height="0.806cm" svg:x="27.35cm" svg:y="8.597cm">
              <draw:text-box>
                <text:p><text:span text:style-name="T27">Reg</text:span></text:p>
              </draw:text-box>
            </draw:frame>
          </draw:g>
        </draw:g>
        <draw:line draw:style-name="gr38" draw:text-style-name="P4" draw:layer="layout" svg:x1="12.999cm" svg:y1="9cm" svg:x2="14.999cm" svg:y2="9cm">
          <text:p/>
        </draw:line>
        <draw:line draw:style-name="gr38" draw:text-style-name="P4" draw:layer="layout" svg:x1="14.499cm" svg:y1="9cm" svg:x2="14.499cm" svg:y2="8.5cm">
          <text:p/>
        </draw:line>
        <draw:line draw:style-name="gr38" draw:text-style-name="P4" draw:layer="layout" svg:x1="14.499cm" svg:y1="8.5cm" svg:x2="14.999cm" svg:y2="8.5cm">
          <text:p/>
        </draw:line>
        <draw:line draw:style-name="gr38" draw:text-style-name="P4" draw:layer="layout" svg:x1="16.999cm" svg:y1="8.5cm" svg:x2="18.999cm" svg:y2="8.5cm">
          <text:p/>
        </draw:line>
        <draw:line draw:style-name="gr38" draw:text-style-name="P4" draw:layer="layout" svg:x1="16.999cm" svg:y1="9.5cm" svg:x2="18.999cm" svg:y2="9.5cm">
          <text:p/>
        </draw:line>
        <draw:line draw:style-name="gr38" draw:text-style-name="P4" draw:layer="layout" svg:x1="20.999cm" svg:y1="9cm" svg:x2="22.999cm" svg:y2="9cm">
          <text:p/>
        </draw:line>
        <draw:line draw:style-name="gr38" draw:text-style-name="P4" draw:layer="layout" svg:x1="24.999cm" svg:y1="9cm" svg:x2="26.999cm" svg:y2="9cm">
          <text:p/>
        </draw:line>
        <draw:frame draw:style-name="gr1208" draw:text-style-name="P81" draw:layer="layout" svg:width="3.855cm" svg:height="0.806cm" svg:x="1.009cm" svg:y="8.6cm">
          <draw:text-box>
            <text:p><text:span text:style-name="T27">slli </text:span><text:span text:style-name="T31">x2, x2</text:span><text:span text:style-name="T27">, </text:span><text:span text:style-name="T27">8</text:span></text:p>
          </draw:text-box>
        </draw:frame>
        <draw:line draw:style-name="gr1183" draw:text-style-name="P4" draw:layer="layout" svg:x1="9.999cm" svg:y1="4cm" svg:x2="9.999cm" svg:y2="20cm">
          <text:p/>
        </draw:line>
        <draw:line draw:style-name="gr1183" draw:text-style-name="P4" draw:layer="layout" svg:x1="13.999cm" svg:y1="4cm" svg:x2="13.999cm" svg:y2="20cm">
          <text:p/>
        </draw:line>
        <draw:line draw:style-name="gr1183" draw:text-style-name="P4" draw:layer="layout" svg:x1="17.999cm" svg:y1="4cm" svg:x2="17.999cm" svg:y2="20cm">
          <text:p/>
        </draw:line>
        <draw:line draw:style-name="gr1183" draw:text-style-name="P4" draw:layer="layout" svg:x1="21.999cm" svg:y1="4cm" svg:x2="21.999cm" svg:y2="20cm">
          <text:p/>
        </draw:line>
        <draw:line draw:style-name="gr1183" draw:text-style-name="P4" draw:layer="layout" svg:x1="25.999cm" svg:y1="4cm" svg:x2="25.999cm" svg:y2="20cm">
          <text:p/>
        </draw:line>
        <draw:line draw:style-name="gr1183" draw:text-style-name="P4" draw:layer="layout" svg:x1="29.999cm" svg:y1="4cm" svg:x2="29.999cm" svg:y2="20cm">
          <text:p/>
        </draw:line>
        <draw:line draw:style-name="gr1183" draw:text-style-name="P4" draw:layer="layout" svg:x1="33.999cm" svg:y1="4cm" svg:x2="33.999cm" svg:y2="20cm">
          <text:p/>
        </draw:line>
        <draw:frame draw:style-name="gr1184" draw:text-style-name="P3" draw:layer="layout" svg:width="1.949cm" svg:height="0.962cm" svg:x="7.053cm" svg:y="2cm">
          <draw:text-box>
            <text:p>CC 1</text:p>
          </draw:text-box>
        </draw:frame>
        <draw:frame draw:style-name="gr1184" draw:text-style-name="P3" draw:layer="layout" svg:width="1.949cm" svg:height="0.962cm" svg:x="11.053cm" svg:y="2cm">
          <draw:text-box>
            <text:p>CC 2</text:p>
          </draw:text-box>
        </draw:frame>
        <draw:frame draw:style-name="gr1184" draw:text-style-name="P3" draw:layer="layout" svg:width="1.949cm" svg:height="0.962cm" svg:x="15.053cm" svg:y="2cm">
          <draw:text-box>
            <text:p>CC 3</text:p>
          </draw:text-box>
        </draw:frame>
        <draw:frame draw:style-name="gr1184" draw:text-style-name="P3" draw:layer="layout" svg:width="1.949cm" svg:height="0.962cm" svg:x="23.053cm" svg:y="2cm">
          <draw:text-box>
            <text:p>CC 5</text:p>
          </draw:text-box>
        </draw:frame>
        <draw:frame draw:style-name="gr1184" draw:text-style-name="P3" draw:layer="layout" svg:width="1.949cm" svg:height="0.962cm" svg:x="27.053cm" svg:y="2cm">
          <draw:text-box>
            <text:p>CC 6</text:p>
          </draw:text-box>
        </draw:frame>
        <draw:frame draw:style-name="gr1184" draw:text-style-name="P3" draw:layer="layout" svg:width="1.949cm" svg:height="0.962cm" svg:x="31.053cm" svg:y="2cm">
          <draw:text-box>
            <text:p>CC 7</text:p>
          </draw:text-box>
        </draw:frame>
        <draw:frame draw:style-name="gr1184" draw:text-style-name="P3" draw:layer="layout" svg:width="1.949cm" svg:height="0.962cm" svg:x="18.999cm" svg:y="2cm">
          <draw:text-box>
            <text:p>CC 4</text:p>
          </draw:text-box>
        </draw:frame>
        <draw:g draw:style-name="gr1">
          <draw:g draw:style-name="gr1">
            <draw:custom-shape draw:style-name="gr1176" draw:text-style-name="P91" draw:layer="layout" svg:width="1cm" svg:height="2cm" svg:x="18.999cm" svg:y="5cm">
              <text:p/>
              <draw:enhanced-geometry svg:viewBox="0 0 21600 21600" draw:mirror-horizontal="false" draw:mirror-vertical="false" draw:type="rectangle" draw:enhanced-path="M 0 0 L 21600 0 21600 21600 0 21600 0 0 Z N"/>
            </draw:custom-shape>
            <draw:custom-shape draw:style-name="gr1186" draw:text-style-name="P92" draw:layer="layout" svg:width="1cm" svg:height="2cm" svg:x="19.999cm" svg:y="5cm">
              <text:p/>
              <draw:enhanced-geometry svg:viewBox="0 0 21600 21600" draw:mirror-horizontal="false" draw:mirror-vertical="false" draw:type="rectangle" draw:enhanced-path="M 0 0 L 21600 0 21600 21600 0 21600 0 0 Z N"/>
            </draw:custom-shape>
          </draw:g>
          <draw:frame draw:style-name="gr1187" draw:text-style-name="P81" draw:layer="layout" svg:width="1.272cm" svg:height="0.806cm" svg:x="19.365cm" svg:y="5.599cm">
            <draw:text-box>
              <text:p><text:span text:style-name="T27">DM</text:span></text:p>
            </draw:text-box>
          </draw:frame>
        </draw:g>
        <draw:line draw:style-name="gr1209" draw:text-style-name="P4" draw:layer="layout" svg:x1="18.499cm" svg:y1="6cm" svg:x2="18.499cm" svg:y2="7.2cm">
          <text:p/>
        </draw:line>
        <draw:line draw:style-name="gr1209" draw:text-style-name="P4" draw:layer="layout" svg:x1="18.499cm" svg:y1="7.2cm" svg:x2="21.499cm" svg:y2="7.2cm">
          <text:p/>
        </draw:line>
        <draw:line draw:style-name="gr1209" draw:text-style-name="P4" draw:layer="layout" svg:x1="21.499cm" svg:y1="7.2cm" svg:x2="21.999cm" svg:y2="6cm">
          <text:p/>
        </draw:line>
        <draw:g draw:style-name="gr1">
          <draw:g draw:style-name="gr1">
            <draw:custom-shape draw:style-name="gr1176" draw:text-style-name="P91" draw:layer="layout" svg:width="1cm" svg:height="2cm" svg:x="22.999cm" svg:y="8cm">
              <text:p/>
              <draw:enhanced-geometry svg:viewBox="0 0 21600 21600" draw:mirror-horizontal="false" draw:mirror-vertical="false" draw:type="rectangle" draw:enhanced-path="M 0 0 L 21600 0 21600 21600 0 21600 0 0 Z N"/>
            </draw:custom-shape>
            <draw:custom-shape draw:style-name="gr1186" draw:text-style-name="P92" draw:layer="layout" svg:width="1cm" svg:height="2cm" svg:x="23.999cm" svg:y="8cm">
              <text:p/>
              <draw:enhanced-geometry svg:viewBox="0 0 21600 21600" draw:mirror-horizontal="false" draw:mirror-vertical="false" draw:type="rectangle" draw:enhanced-path="M 0 0 L 21600 0 21600 21600 0 21600 0 0 Z N"/>
            </draw:custom-shape>
          </draw:g>
          <draw:frame draw:style-name="gr1187" draw:text-style-name="P81" draw:layer="layout" svg:width="1.272cm" svg:height="0.806cm" svg:x="23.365cm" svg:y="8.599cm">
            <draw:text-box>
              <text:p><text:span text:style-name="T27">DM</text:span></text:p>
            </draw:text-box>
          </draw:frame>
        </draw:g>
        <draw:line draw:style-name="gr1209" draw:text-style-name="P4" draw:layer="layout" svg:x1="22.499cm" svg:y1="9cm" svg:x2="22.499cm" svg:y2="10.2cm">
          <text:p/>
        </draw:line>
        <draw:line draw:style-name="gr1209" draw:text-style-name="P4" draw:layer="layout" svg:x1="22.499cm" svg:y1="10.2cm" svg:x2="25.499cm" svg:y2="10.2cm">
          <text:p/>
        </draw:line>
        <draw:line draw:style-name="gr1209" draw:text-style-name="P4" draw:layer="layout" svg:x1="25.499cm" svg:y1="10.2cm" svg:x2="25.999cm" svg:y2="9cm">
          <text:p/>
        </draw:line>
        <draw:g draw:style-name="gr66">
          <draw:polygon draw:style-name="gr1174" draw:text-style-name="P90" draw:layer="layout" svg:width="1.999cm" svg:height="2.999cm" svg:x="22.999cm" svg:y="10.5cm" svg:viewBox="0 0 2000 3000" draw:points="0,0 0,1100 400,1500 0,1900 0,3000 2000,2000 2000,1000">
            <text:p/>
          </draw:polygon>
          <draw:frame draw:style-name="gr1175" draw:text-style-name="P81" draw:layer="layout" svg:width="1.466cm" svg:height="0.806cm" svg:x="23.399cm" svg:y="11.594cm">
            <draw:text-box>
              <text:p><text:span text:style-name="T27">ALU</text:span></text:p>
            </draw:text-box>
          </draw:frame>
        </draw:g>
        <draw:g draw:style-name="gr1">
          <draw:g draw:style-name="gr1">
            <draw:custom-shape draw:style-name="gr1176" draw:text-style-name="P14" draw:layer="layout" svg:width="1cm" svg:height="2cm" svg:x="14.999cm" svg:y="11cm">
              <text:p/>
              <draw:enhanced-geometry svg:viewBox="0 0 21600 21600" draw:type="rectangle" draw:enhanced-path="M 0 0 L 21600 0 21600 21600 0 21600 0 0 Z N"/>
            </draw:custom-shape>
            <draw:custom-shape draw:style-name="gr1177" draw:text-style-name="P1" draw:layer="layout" svg:width="1cm" svg:height="2cm" svg:x="15.999cm" svg:y="11cm">
              <text:p/>
              <draw:enhanced-geometry svg:viewBox="0 0 21600 21600" draw:type="rectangle" draw:enhanced-path="M 0 0 L 21600 0 21600 21600 0 21600 0 0 Z N"/>
            </draw:custom-shape>
          </draw:g>
          <draw:g draw:style-name="gr66">
            <draw:frame draw:style-name="gr1178" draw:text-style-name="P81" draw:layer="layout" svg:width="1.052cm" svg:height="0.806cm" svg:x="15.528cm" svg:y="11.597cm">
              <draw:text-box>
                <text:p><text:span text:style-name="T27">IM</text:span></text:p>
              </draw:text-box>
            </draw:frame>
          </draw:g>
        </draw:g>
        <draw:g draw:style-name="gr1">
          <draw:g draw:style-name="gr1">
            <draw:custom-shape draw:style-name="gr1179" draw:text-style-name="P14" draw:layer="layout" svg:width="1cm" svg:height="2cm" svg:x="18.999cm" svg:y="11cm">
              <text:p/>
              <draw:enhanced-geometry svg:viewBox="0 0 21600 21600" draw:type="rectangle" draw:enhanced-path="M 0 0 L 21600 0 21600 21600 0 21600 0 0 Z N"/>
            </draw:custom-shape>
            <draw:custom-shape draw:style-name="gr1177" draw:text-style-name="P1" draw:layer="layout" svg:width="1cm" svg:height="2cm" svg:x="19.999cm" svg:y="11cm">
              <text:p/>
              <draw:enhanced-geometry svg:viewBox="0 0 21600 21600" draw:type="rectangle" draw:enhanced-path="M 0 0 L 21600 0 21600 21600 0 21600 0 0 Z N"/>
            </draw:custom-shape>
          </draw:g>
          <draw:g draw:style-name="gr66">
            <draw:frame draw:style-name="gr1181" draw:text-style-name="P81" draw:layer="layout" svg:width="1.575cm" svg:height="0.806cm" svg:x="19.528cm" svg:y="11.597cm">
              <draw:text-box>
                <text:p><text:span text:style-name="T27">REG</text:span></text:p>
              </draw:text-box>
            </draw:frame>
          </draw:g>
        </draw:g>
        <draw:g draw:style-name="gr1">
          <draw:g draw:style-name="gr1">
            <draw:custom-shape draw:style-name="gr1179" draw:text-style-name="P14" draw:layer="layout" svg:width="1cm" svg:height="2cm" svg:x="31.999cm" svg:y="11cm">
              <text:p/>
              <draw:enhanced-geometry svg:viewBox="0 0 21600 21600" draw:mirror-horizontal="true" draw:type="rectangle" draw:enhanced-path="M 0 0 L 21600 0 21600 21600 0 21600 0 0 Z N"/>
            </draw:custom-shape>
            <draw:custom-shape draw:style-name="gr1177" draw:text-style-name="P1" draw:layer="layout" svg:width="1cm" svg:height="2cm" svg:x="30.999cm" svg:y="11cm">
              <text:p/>
              <draw:enhanced-geometry svg:viewBox="0 0 21600 21600" draw:mirror-horizontal="true" draw:type="rectangle" draw:enhanced-path="M 0 0 L 21600 0 21600 21600 0 21600 0 0 Z N"/>
            </draw:custom-shape>
          </draw:g>
          <draw:g draw:style-name="gr66">
            <draw:frame draw:style-name="gr1180" draw:text-style-name="P81" draw:layer="layout" svg:width="1.411cm" svg:height="0.806cm" svg:x="31.35cm" svg:y="11.597cm">
              <draw:text-box>
                <text:p><text:span text:style-name="T27">Reg</text:span></text:p>
              </draw:text-box>
            </draw:frame>
          </draw:g>
        </draw:g>
        <draw:line draw:style-name="gr38" draw:text-style-name="P4" draw:layer="layout" svg:x1="16.999cm" svg:y1="12cm" svg:x2="18.999cm" svg:y2="12cm">
          <text:p/>
        </draw:line>
        <draw:line draw:style-name="gr38" draw:text-style-name="P4" draw:layer="layout" svg:x1="18.499cm" svg:y1="12cm" svg:x2="18.499cm" svg:y2="11.5cm">
          <text:p/>
        </draw:line>
        <draw:line draw:style-name="gr38" draw:text-style-name="P4" draw:layer="layout" svg:x1="18.499cm" svg:y1="11.5cm" svg:x2="18.999cm" svg:y2="11.5cm">
          <text:p/>
        </draw:line>
        <draw:line draw:style-name="gr38" draw:text-style-name="P4" draw:layer="layout" svg:x1="20.999cm" svg:y1="11.5cm" svg:x2="22.999cm" svg:y2="11.5cm">
          <text:p/>
        </draw:line>
        <draw:line draw:style-name="gr38" draw:text-style-name="P4" draw:layer="layout" svg:x1="20.999cm" svg:y1="12.5cm" svg:x2="22.999cm" svg:y2="12.5cm">
          <text:p/>
        </draw:line>
        <draw:line draw:style-name="gr38" draw:text-style-name="P4" draw:layer="layout" svg:x1="24.999cm" svg:y1="12cm" svg:x2="26.999cm" svg:y2="12cm">
          <text:p/>
        </draw:line>
        <draw:line draw:style-name="gr38" draw:text-style-name="P4" draw:layer="layout" svg:x1="28.999cm" svg:y1="12cm" svg:x2="30.999cm" svg:y2="12cm">
          <text:p/>
        </draw:line>
        <draw:g draw:style-name="gr1">
          <draw:g draw:style-name="gr1">
            <draw:custom-shape draw:style-name="gr1176" draw:text-style-name="P91" draw:layer="layout" svg:width="1cm" svg:height="2cm" svg:x="26.999cm" svg:y="11cm">
              <text:p/>
              <draw:enhanced-geometry svg:viewBox="0 0 21600 21600" draw:mirror-horizontal="false" draw:mirror-vertical="false" draw:type="rectangle" draw:enhanced-path="M 0 0 L 21600 0 21600 21600 0 21600 0 0 Z N"/>
            </draw:custom-shape>
            <draw:custom-shape draw:style-name="gr1186" draw:text-style-name="P92" draw:layer="layout" svg:width="1cm" svg:height="2cm" svg:x="27.999cm" svg:y="11cm">
              <text:p/>
              <draw:enhanced-geometry svg:viewBox="0 0 21600 21600" draw:mirror-horizontal="false" draw:mirror-vertical="false" draw:type="rectangle" draw:enhanced-path="M 0 0 L 21600 0 21600 21600 0 21600 0 0 Z N"/>
            </draw:custom-shape>
          </draw:g>
          <draw:frame draw:style-name="gr1187" draw:text-style-name="P81" draw:layer="layout" svg:width="1.272cm" svg:height="0.806cm" svg:x="27.365cm" svg:y="11.599cm">
            <draw:text-box>
              <text:p><text:span text:style-name="T27">DM</text:span></text:p>
            </draw:text-box>
          </draw:frame>
        </draw:g>
        <draw:line draw:style-name="gr38" draw:text-style-name="P4" draw:layer="layout" svg:x1="26.499cm" svg:y1="12cm" svg:x2="26.499cm" svg:y2="13.2cm">
          <text:p/>
        </draw:line>
        <draw:line draw:style-name="gr38" draw:text-style-name="P4" draw:layer="layout" svg:x1="26.499cm" svg:y1="13.2cm" svg:x2="29.499cm" svg:y2="13.2cm">
          <text:p/>
        </draw:line>
        <draw:line draw:style-name="gr38" draw:text-style-name="P4" draw:layer="layout" svg:x1="29.499cm" svg:y1="13.2cm" svg:x2="29.999cm" svg:y2="12cm">
          <text:p/>
        </draw:line>
        <draw:frame draw:style-name="gr22" draw:text-style-name="P3" draw:layer="layout" svg:width="6.601cm" svg:height="0.962cm" svg:x="15.699cm" svg:y="1cm">
          <draw:text-box>
            <text:p>addi → slli → ld → sd</text:p>
          </draw:text-box>
        </draw:frame>
        <draw:line draw:style-name="gr1183" draw:text-style-name="P4" draw:layer="layout" svg:x1="37.999cm" svg:y1="4cm" svg:x2="37.999cm" svg:y2="20cm">
          <text:p/>
        </draw:line>
        <draw:g draw:style-name="gr66">
          <draw:polygon draw:style-name="gr1174" draw:text-style-name="P90" draw:layer="layout" svg:width="1.999cm" svg:height="2.999cm" svg:x="26.999cm" svg:y="13.5cm" svg:viewBox="0 0 2000 3000" draw:points="0,0 0,1100 400,1500 0,1900 0,3000 2000,2000 2000,1000">
            <text:p/>
          </draw:polygon>
          <draw:frame draw:style-name="gr1175" draw:text-style-name="P81" draw:layer="layout" svg:width="1.466cm" svg:height="0.806cm" svg:x="27.399cm" svg:y="14.594cm">
            <draw:text-box>
              <text:p><text:span text:style-name="T27">ALU</text:span></text:p>
            </draw:text-box>
          </draw:frame>
        </draw:g>
        <draw:g draw:style-name="gr1">
          <draw:g draw:style-name="gr1">
            <draw:custom-shape draw:style-name="gr1176" draw:text-style-name="P14" draw:layer="layout" svg:width="1cm" svg:height="2cm" svg:x="18.999cm" svg:y="14cm">
              <text:p/>
              <draw:enhanced-geometry svg:viewBox="0 0 21600 21600" draw:type="rectangle" draw:enhanced-path="M 0 0 L 21600 0 21600 21600 0 21600 0 0 Z N"/>
            </draw:custom-shape>
            <draw:custom-shape draw:style-name="gr1177" draw:text-style-name="P1" draw:layer="layout" svg:width="1cm" svg:height="2cm" svg:x="19.999cm" svg:y="14cm">
              <text:p/>
              <draw:enhanced-geometry svg:viewBox="0 0 21600 21600" draw:type="rectangle" draw:enhanced-path="M 0 0 L 21600 0 21600 21600 0 21600 0 0 Z N"/>
            </draw:custom-shape>
          </draw:g>
          <draw:g draw:style-name="gr66">
            <draw:frame draw:style-name="gr1178" draw:text-style-name="P81" draw:layer="layout" svg:width="1.052cm" svg:height="0.806cm" svg:x="19.528cm" svg:y="14.597cm">
              <draw:text-box>
                <text:p><text:span text:style-name="T27">IM</text:span></text:p>
              </draw:text-box>
            </draw:frame>
          </draw:g>
        </draw:g>
        <draw:g draw:style-name="gr1">
          <draw:g draw:style-name="gr1">
            <draw:custom-shape draw:style-name="gr1179" draw:text-style-name="P14" draw:layer="layout" svg:width="1cm" svg:height="2cm" svg:x="22.999cm" svg:y="14cm">
              <text:p/>
              <draw:enhanced-geometry svg:viewBox="0 0 21600 21600" draw:type="rectangle" draw:enhanced-path="M 0 0 L 21600 0 21600 21600 0 21600 0 0 Z N"/>
            </draw:custom-shape>
            <draw:custom-shape draw:style-name="gr1177" draw:text-style-name="P1" draw:layer="layout" svg:width="1cm" svg:height="2cm" svg:x="23.999cm" svg:y="14cm">
              <text:p/>
              <draw:enhanced-geometry svg:viewBox="0 0 21600 21600" draw:type="rectangle" draw:enhanced-path="M 0 0 L 21600 0 21600 21600 0 21600 0 0 Z N"/>
            </draw:custom-shape>
          </draw:g>
          <draw:g draw:style-name="gr66">
            <draw:frame draw:style-name="gr1181" draw:text-style-name="P81" draw:layer="layout" svg:width="1.575cm" svg:height="0.806cm" svg:x="23.528cm" svg:y="14.597cm">
              <draw:text-box>
                <text:p><text:span text:style-name="T27">REG</text:span></text:p>
              </draw:text-box>
            </draw:frame>
          </draw:g>
        </draw:g>
        <draw:g draw:style-name="gr1">
          <draw:g draw:style-name="gr1">
            <draw:custom-shape draw:style-name="gr1179" draw:text-style-name="P14" draw:layer="layout" svg:width="1cm" svg:height="2cm" svg:x="35.999cm" svg:y="14cm">
              <text:p/>
              <draw:enhanced-geometry svg:viewBox="0 0 21600 21600" draw:mirror-horizontal="true" draw:type="rectangle" draw:enhanced-path="M 0 0 L 21600 0 21600 21600 0 21600 0 0 Z N"/>
            </draw:custom-shape>
            <draw:custom-shape draw:style-name="gr1177" draw:text-style-name="P1" draw:layer="layout" svg:width="1cm" svg:height="2cm" svg:x="34.999cm" svg:y="14cm">
              <text:p/>
              <draw:enhanced-geometry svg:viewBox="0 0 21600 21600" draw:mirror-horizontal="true" draw:type="rectangle" draw:enhanced-path="M 0 0 L 21600 0 21600 21600 0 21600 0 0 Z N"/>
            </draw:custom-shape>
          </draw:g>
          <draw:g draw:style-name="gr66">
            <draw:frame draw:style-name="gr1180" draw:text-style-name="P81" draw:layer="layout" svg:width="1.411cm" svg:height="0.806cm" svg:x="35.35cm" svg:y="14.597cm">
              <draw:text-box>
                <text:p><text:span text:style-name="T27">Reg</text:span></text:p>
              </draw:text-box>
            </draw:frame>
          </draw:g>
        </draw:g>
        <draw:line draw:style-name="gr38" draw:text-style-name="P4" draw:layer="layout" svg:x1="20.999cm" svg:y1="15cm" svg:x2="22.999cm" svg:y2="15cm">
          <text:p/>
        </draw:line>
        <draw:line draw:style-name="gr38" draw:text-style-name="P4" draw:layer="layout" svg:x1="22.499cm" svg:y1="15cm" svg:x2="22.499cm" svg:y2="14.5cm">
          <text:p/>
        </draw:line>
        <draw:line draw:style-name="gr38" draw:text-style-name="P4" draw:layer="layout" svg:x1="22.499cm" svg:y1="14.5cm" svg:x2="22.999cm" svg:y2="14.5cm">
          <text:p/>
        </draw:line>
        <draw:line draw:style-name="gr38" draw:text-style-name="P4" draw:layer="layout" svg:x1="24.999cm" svg:y1="14.5cm" svg:x2="26.999cm" svg:y2="14.5cm">
          <text:p/>
        </draw:line>
        <draw:line draw:style-name="gr38" draw:text-style-name="P4" draw:layer="layout" svg:x1="24.999cm" svg:y1="15.5cm" svg:x2="26.999cm" svg:y2="15.5cm">
          <text:p/>
        </draw:line>
        <draw:line draw:style-name="gr38" draw:text-style-name="P4" draw:layer="layout" svg:x1="28.999cm" svg:y1="15cm" svg:x2="30.999cm" svg:y2="15cm">
          <text:p/>
        </draw:line>
        <draw:line draw:style-name="gr38" draw:text-style-name="P4" draw:layer="layout" svg:x1="32.999cm" svg:y1="15cm" svg:x2="34.999cm" svg:y2="15cm">
          <text:p/>
        </draw:line>
        <draw:g draw:style-name="gr1">
          <draw:g draw:style-name="gr1">
            <draw:custom-shape draw:style-name="gr1176" draw:text-style-name="P91" draw:layer="layout" svg:width="1cm" svg:height="2cm" svg:x="30.999cm" svg:y="14cm">
              <text:p/>
              <draw:enhanced-geometry svg:viewBox="0 0 21600 21600" draw:mirror-horizontal="false" draw:mirror-vertical="false" draw:type="rectangle" draw:enhanced-path="M 0 0 L 21600 0 21600 21600 0 21600 0 0 Z N"/>
            </draw:custom-shape>
            <draw:custom-shape draw:style-name="gr1186" draw:text-style-name="P92" draw:layer="layout" svg:width="1cm" svg:height="2cm" svg:x="31.999cm" svg:y="14cm">
              <text:p/>
              <draw:enhanced-geometry svg:viewBox="0 0 21600 21600" draw:mirror-horizontal="false" draw:mirror-vertical="false" draw:type="rectangle" draw:enhanced-path="M 0 0 L 21600 0 21600 21600 0 21600 0 0 Z N"/>
            </draw:custom-shape>
          </draw:g>
          <draw:frame draw:style-name="gr1187" draw:text-style-name="P81" draw:layer="layout" svg:width="1.272cm" svg:height="0.806cm" svg:x="31.365cm" svg:y="14.599cm">
            <draw:text-box>
              <text:p><text:span text:style-name="T27">DM</text:span></text:p>
            </draw:text-box>
          </draw:frame>
        </draw:g>
        <draw:line draw:style-name="gr38" draw:text-style-name="P4" draw:layer="layout" svg:x1="30.499cm" svg:y1="15cm" svg:x2="30.499cm" svg:y2="16.2cm">
          <text:p/>
        </draw:line>
        <draw:line draw:style-name="gr38" draw:text-style-name="P4" draw:layer="layout" svg:x1="30.499cm" svg:y1="16.2cm" svg:x2="33.499cm" svg:y2="16.2cm">
          <text:p/>
        </draw:line>
        <draw:line draw:style-name="gr38" draw:text-style-name="P4" draw:layer="layout" svg:x1="33.499cm" svg:y1="16.2cm" svg:x2="33.999cm" svg:y2="15cm">
          <text:p/>
        </draw:line>
        <draw:g draw:style-name="gr66">
          <draw:polygon draw:style-name="gr1174" draw:text-style-name="P90" draw:layer="layout" svg:width="1.999cm" svg:height="2.999cm" svg:x="30.999cm" svg:y="16.5cm" svg:viewBox="0 0 2000 3000" draw:points="0,0 0,1100 400,1500 0,1900 0,3000 2000,2000 2000,1000">
            <text:p/>
          </draw:polygon>
          <draw:frame draw:style-name="gr1175" draw:text-style-name="P81" draw:layer="layout" svg:width="1.466cm" svg:height="0.806cm" svg:x="31.399cm" svg:y="17.594cm">
            <draw:text-box>
              <text:p><text:span text:style-name="T27">ALU</text:span></text:p>
            </draw:text-box>
          </draw:frame>
        </draw:g>
        <draw:g draw:style-name="gr1">
          <draw:g draw:style-name="gr1">
            <draw:custom-shape draw:style-name="gr1176" draw:text-style-name="P14" draw:layer="layout" svg:width="1cm" svg:height="2cm" svg:x="22.999cm" svg:y="17cm">
              <text:p/>
              <draw:enhanced-geometry svg:viewBox="0 0 21600 21600" draw:type="rectangle" draw:enhanced-path="M 0 0 L 21600 0 21600 21600 0 21600 0 0 Z N"/>
            </draw:custom-shape>
            <draw:custom-shape draw:style-name="gr1177" draw:text-style-name="P1" draw:layer="layout" svg:width="1cm" svg:height="2cm" svg:x="23.999cm" svg:y="17cm">
              <text:p/>
              <draw:enhanced-geometry svg:viewBox="0 0 21600 21600" draw:type="rectangle" draw:enhanced-path="M 0 0 L 21600 0 21600 21600 0 21600 0 0 Z N"/>
            </draw:custom-shape>
          </draw:g>
          <draw:g draw:style-name="gr66">
            <draw:frame draw:style-name="gr1178" draw:text-style-name="P81" draw:layer="layout" svg:width="1.052cm" svg:height="0.806cm" svg:x="23.528cm" svg:y="17.597cm">
              <draw:text-box>
                <text:p><text:span text:style-name="T27">IM</text:span></text:p>
              </draw:text-box>
            </draw:frame>
          </draw:g>
        </draw:g>
        <draw:g draw:style-name="gr1">
          <draw:g draw:style-name="gr1">
            <draw:custom-shape draw:style-name="gr1179" draw:text-style-name="P14" draw:layer="layout" svg:width="1cm" svg:height="2cm" svg:x="26.999cm" svg:y="17cm">
              <text:p/>
              <draw:enhanced-geometry svg:viewBox="0 0 21600 21600" draw:type="rectangle" draw:enhanced-path="M 0 0 L 21600 0 21600 21600 0 21600 0 0 Z N"/>
            </draw:custom-shape>
            <draw:custom-shape draw:style-name="gr1177" draw:text-style-name="P1" draw:layer="layout" svg:width="1cm" svg:height="2cm" svg:x="27.999cm" svg:y="17cm">
              <text:p/>
              <draw:enhanced-geometry svg:viewBox="0 0 21600 21600" draw:type="rectangle" draw:enhanced-path="M 0 0 L 21600 0 21600 21600 0 21600 0 0 Z N"/>
            </draw:custom-shape>
          </draw:g>
          <draw:g draw:style-name="gr66">
            <draw:frame draw:style-name="gr1181" draw:text-style-name="P81" draw:layer="layout" svg:width="1.575cm" svg:height="0.806cm" svg:x="27.528cm" svg:y="17.597cm">
              <draw:text-box>
                <text:p><text:span text:style-name="T27">REG</text:span></text:p>
              </draw:text-box>
            </draw:frame>
          </draw:g>
        </draw:g>
        <draw:g draw:style-name="gr1">
          <draw:g draw:style-name="gr1">
            <draw:custom-shape draw:style-name="gr1179" draw:text-style-name="P14" draw:layer="layout" svg:width="1cm" svg:height="2cm" svg:x="39.999cm" svg:y="17cm">
              <text:p/>
              <draw:enhanced-geometry svg:viewBox="0 0 21600 21600" draw:mirror-horizontal="true" draw:type="rectangle" draw:enhanced-path="M 0 0 L 21600 0 21600 21600 0 21600 0 0 Z N"/>
            </draw:custom-shape>
            <draw:custom-shape draw:style-name="gr1177" draw:text-style-name="P1" draw:layer="layout" svg:width="1cm" svg:height="2cm" svg:x="38.999cm" svg:y="17cm">
              <text:p/>
              <draw:enhanced-geometry svg:viewBox="0 0 21600 21600" draw:mirror-horizontal="true" draw:type="rectangle" draw:enhanced-path="M 0 0 L 21600 0 21600 21600 0 21600 0 0 Z N"/>
            </draw:custom-shape>
          </draw:g>
          <draw:g draw:style-name="gr66">
            <draw:frame draw:style-name="gr1180" draw:text-style-name="P81" draw:layer="layout" svg:width="1.411cm" svg:height="0.806cm" svg:x="39.35cm" svg:y="17.597cm">
              <draw:text-box>
                <text:p><text:span text:style-name="T27">Reg</text:span></text:p>
              </draw:text-box>
            </draw:frame>
          </draw:g>
        </draw:g>
        <draw:line draw:style-name="gr38" draw:text-style-name="P4" draw:layer="layout" svg:x1="24.999cm" svg:y1="18cm" svg:x2="26.999cm" svg:y2="18cm">
          <text:p/>
        </draw:line>
        <draw:line draw:style-name="gr38" draw:text-style-name="P4" draw:layer="layout" svg:x1="26.499cm" svg:y1="18cm" svg:x2="26.499cm" svg:y2="17.5cm">
          <text:p/>
        </draw:line>
        <draw:line draw:style-name="gr38" draw:text-style-name="P4" draw:layer="layout" svg:x1="26.499cm" svg:y1="17.5cm" svg:x2="26.999cm" svg:y2="17.5cm">
          <text:p/>
        </draw:line>
        <draw:line draw:style-name="gr38" draw:text-style-name="P4" draw:layer="layout" svg:x1="28.999cm" svg:y1="17.5cm" svg:x2="30.999cm" svg:y2="17.5cm">
          <text:p/>
        </draw:line>
        <draw:line draw:style-name="gr38" draw:text-style-name="P4" draw:layer="layout" svg:x1="28.999cm" svg:y1="18.5cm" svg:x2="30.999cm" svg:y2="18.5cm">
          <text:p/>
        </draw:line>
        <draw:line draw:style-name="gr38" draw:text-style-name="P4" draw:layer="layout" svg:x1="32.999cm" svg:y1="18cm" svg:x2="34.999cm" svg:y2="18cm">
          <text:p/>
        </draw:line>
        <draw:line draw:style-name="gr38" draw:text-style-name="P4" draw:layer="layout" svg:x1="36.999cm" svg:y1="18cm" svg:x2="38.999cm" svg:y2="18cm">
          <text:p/>
        </draw:line>
        <draw:g draw:style-name="gr1">
          <draw:g draw:style-name="gr1">
            <draw:custom-shape draw:style-name="gr1176" draw:text-style-name="P91" draw:layer="layout" svg:width="1cm" svg:height="2cm" svg:x="34.999cm" svg:y="17cm">
              <text:p/>
              <draw:enhanced-geometry svg:viewBox="0 0 21600 21600" draw:mirror-horizontal="false" draw:mirror-vertical="false" draw:type="rectangle" draw:enhanced-path="M 0 0 L 21600 0 21600 21600 0 21600 0 0 Z N"/>
            </draw:custom-shape>
            <draw:custom-shape draw:style-name="gr1186" draw:text-style-name="P92" draw:layer="layout" svg:width="1cm" svg:height="2cm" svg:x="35.999cm" svg:y="17cm">
              <text:p/>
              <draw:enhanced-geometry svg:viewBox="0 0 21600 21600" draw:mirror-horizontal="false" draw:mirror-vertical="false" draw:type="rectangle" draw:enhanced-path="M 0 0 L 21600 0 21600 21600 0 21600 0 0 Z N"/>
            </draw:custom-shape>
          </draw:g>
          <draw:frame draw:style-name="gr1187" draw:text-style-name="P81" draw:layer="layout" svg:width="1.272cm" svg:height="0.806cm" svg:x="35.365cm" svg:y="17.599cm">
            <draw:text-box>
              <text:p><text:span text:style-name="T27">DM</text:span></text:p>
            </draw:text-box>
          </draw:frame>
        </draw:g>
        <draw:line draw:style-name="gr38" draw:text-style-name="P4" draw:layer="layout" svg:x1="34.499cm" svg:y1="18cm" svg:x2="34.499cm" svg:y2="19.2cm">
          <text:p/>
        </draw:line>
        <draw:line draw:style-name="gr38" draw:text-style-name="P4" draw:layer="layout" svg:x1="34.499cm" svg:y1="19.2cm" svg:x2="37.499cm" svg:y2="19.2cm">
          <text:p/>
        </draw:line>
        <draw:line draw:style-name="gr38" draw:text-style-name="P4" draw:layer="layout" svg:x1="37.499cm" svg:y1="19.2cm" svg:x2="37.999cm" svg:y2="18cm">
          <text:p/>
        </draw:line>
        <draw:custom-shape draw:style-name="gr1189" draw:text-style-name="P4" draw:layer="layout" svg:width="2.6cm" svg:height="2.6cm" svg:x="22.6cm" svg:y="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90" draw:text-style-name="P93" draw:layer="layout" svg:width="1.173cm" svg:height="0.962cm" svg:x="23.129cm" svg:y="6.1cm">
          <draw:text-box>
            <text:p><text:span text:style-name="T34">x2</text:span></text:p>
          </draw:text-box>
        </draw:frame>
        <draw:frame draw:style-name="gr1210" draw:text-style-name="P94" draw:layer="layout" svg:width="2.479cm" svg:height="0.569cm" svg:x="9.8cm" svg:y="3.901cm">
          <draw:text-box>
            <text:p><text:span text:style-name="T35">if_id_reg_rd=2</text:span></text:p>
          </draw:text-box>
        </draw:frame>
        <draw:frame draw:style-name="gr1211" draw:text-style-name="P94" draw:layer="layout" svg:width="2.465cm" svg:height="0.569cm" svg:x="9.8cm" svg:y="4.231cm">
          <draw:text-box>
            <text:p><text:span text:style-name="T35">if_id_reg_rs1=0</text:span></text:p>
          </draw:text-box>
        </draw:frame>
        <draw:frame draw:style-name="gr1212" draw:text-style-name="P94" draw:layer="layout" svg:width="2.462cm" svg:height="0.569cm" svg:x="9.8cm" svg:y="4.532cm">
          <draw:text-box>
            <text:p><text:span text:style-name="T35">if_id_reg_rs2=-</text:span></text:p>
          </draw:text-box>
        </draw:frame>
        <draw:frame draw:style-name="gr1210" draw:text-style-name="P94" draw:layer="layout" svg:width="2.479cm" svg:height="0.569cm" svg:x="13.801cm" svg:y="6.901cm">
          <draw:text-box>
            <text:p><text:span text:style-name="T35">if_id_reg_rd=2</text:span></text:p>
          </draw:text-box>
        </draw:frame>
        <draw:frame draw:style-name="gr1211" draw:text-style-name="P94" draw:layer="layout" svg:width="2.465cm" svg:height="0.569cm" svg:x="13.801cm" svg:y="7.231cm">
          <draw:text-box>
            <text:p><text:span text:style-name="T35">if_id_reg_rs1=2</text:span></text:p>
          </draw:text-box>
        </draw:frame>
        <draw:frame draw:style-name="gr1212" draw:text-style-name="P94" draw:layer="layout" svg:width="2.462cm" svg:height="0.569cm" svg:x="13.801cm" svg:y="7.532cm">
          <draw:text-box>
            <text:p><text:span text:style-name="T35">if_id_reg_rs2=-</text:span></text:p>
          </draw:text-box>
        </draw:frame>
        <draw:frame draw:style-name="gr1213" draw:text-style-name="P94" draw:layer="layout" svg:width="2.481cm" svg:height="0.569cm" svg:x="13.801cm" svg:y="3.901cm">
          <draw:text-box>
            <text:p><text:span text:style-name="T35">id_ex_reg_rd=2</text:span></text:p>
          </draw:text-box>
        </draw:frame>
        <draw:frame draw:style-name="gr1214" draw:text-style-name="P94" draw:layer="layout" svg:width="2.623cm" svg:height="0.569cm" svg:x="13.801cm" svg:y="4.231cm">
          <draw:text-box>
            <text:p><text:span text:style-name="T35">id_ex_reg_rs1=0</text:span></text:p>
          </draw:text-box>
        </draw:frame>
        <draw:frame draw:style-name="gr1215" draw:text-style-name="P94" draw:layer="layout" svg:width="2.56cm" svg:height="0.569cm" svg:x="13.801cm" svg:y="4.532cm">
          <draw:text-box>
            <text:p><text:span text:style-name="T35">id_ex_reg_rs2=-</text:span></text:p>
          </draw:text-box>
        </draw:frame>
        <draw:frame draw:style-name="gr1216" draw:text-style-name="P89" draw:layer="layout" svg:width="2.891cm" svg:height="0.569cm" svg:x="17.802cm" svg:y="3.901cm">
          <draw:text-box>
            <text:p><text:span text:style-name="T30">ex_mem_reg_rd=</text:span><text:span text:style-name="T30">2</text:span></text:p>
          </draw:text-box>
        </draw:frame>
        <draw:frame draw:style-name="gr1217" draw:text-style-name="P94" draw:layer="layout" svg:width="3.032cm" svg:height="0.569cm" svg:x="17.802cm" svg:y="4.231cm">
          <draw:text-box>
            <text:p><text:span text:style-name="T35">ex_mem_reg_rs1</text:span><text:span text:style-name="T35">=0</text:span></text:p>
          </draw:text-box>
        </draw:frame>
        <draw:frame draw:style-name="gr1218" draw:text-style-name="P94" draw:layer="layout" svg:width="2.969cm" svg:height="0.569cm" svg:x="17.802cm" svg:y="4.532cm">
          <draw:text-box>
            <text:p><text:span text:style-name="T35">ex_mem_reg_rs2</text:span><text:span text:style-name="T35">=-</text:span></text:p>
          </draw:text-box>
        </draw:frame>
        <draw:frame draw:style-name="gr1219" draw:text-style-name="P94" draw:layer="layout" svg:width="2.954cm" svg:height="0.569cm" svg:x="21.803cm" svg:y="3.901cm">
          <draw:text-box>
            <text:p><text:span text:style-name="T35">mem_wb_reg_rd</text:span><text:span text:style-name="T35">=2</text:span></text:p>
          </draw:text-box>
        </draw:frame>
        <draw:frame draw:style-name="gr1220" draw:text-style-name="P94" draw:layer="layout" svg:width="3.095cm" svg:height="0.569cm" svg:x="21.803cm" svg:y="4.231cm">
          <draw:text-box>
            <text:p><text:span text:style-name="T35">mem_wb_reg_rs</text:span><text:span text:style-name="T35">1=0</text:span></text:p>
          </draw:text-box>
        </draw:frame>
        <draw:frame draw:style-name="gr1217" draw:text-style-name="P94" draw:layer="layout" svg:width="3.032cm" svg:height="0.569cm" svg:x="21.803cm" svg:y="4.532cm">
          <draw:text-box>
            <text:p><text:span text:style-name="T35">mem_wb_reg_rs</text:span><text:span text:style-name="T35">2=-</text:span></text:p>
          </draw:text-box>
        </draw:frame>
        <draw:frame draw:style-name="gr1213" draw:text-style-name="P94" draw:layer="layout" svg:width="2.481cm" svg:height="0.569cm" svg:x="17.802cm" svg:y="6.901cm">
          <draw:text-box>
            <text:p><text:span text:style-name="T35">id_ex_reg_rd=2</text:span></text:p>
          </draw:text-box>
        </draw:frame>
        <draw:frame draw:style-name="gr1214" draw:text-style-name="P89" draw:layer="layout" svg:width="2.623cm" svg:height="0.569cm" svg:x="17.802cm" svg:y="7.231cm">
          <draw:text-box>
            <text:p><text:span text:style-name="T30">id_ex_reg_rs1=2</text:span></text:p>
          </draw:text-box>
        </draw:frame>
        <draw:frame draw:style-name="gr1215" draw:text-style-name="P94" draw:layer="layout" svg:width="2.56cm" svg:height="0.569cm" svg:x="17.802cm" svg:y="7.532cm">
          <draw:text-box>
            <text:p><text:span text:style-name="T35">id_ex_reg_rs2=-</text:span></text:p>
          </draw:text-box>
        </draw:frame>
        <draw:frame draw:style-name="gr1216" draw:text-style-name="P89" draw:layer="layout" svg:width="2.891cm" svg:height="0.569cm" svg:x="21.803cm" svg:y="6.901cm">
          <draw:text-box>
            <text:p><text:span text:style-name="T30">ex_mem_reg_rd=</text:span><text:span text:style-name="T30">2</text:span></text:p>
          </draw:text-box>
        </draw:frame>
        <draw:frame draw:style-name="gr1217" draw:text-style-name="P94" draw:layer="layout" svg:width="3.032cm" svg:height="0.569cm" svg:x="21.803cm" svg:y="7.231cm">
          <draw:text-box>
            <text:p><text:span text:style-name="T35">ex_mem_reg_rs1</text:span><text:span text:style-name="T35">=2</text:span></text:p>
          </draw:text-box>
        </draw:frame>
        <draw:frame draw:style-name="gr1218" draw:text-style-name="P94" draw:layer="layout" svg:width="2.969cm" svg:height="0.569cm" svg:x="21.803cm" svg:y="7.532cm">
          <draw:text-box>
            <text:p><text:span text:style-name="T35">ex_mem_reg_rs2</text:span><text:span text:style-name="T35">=-</text:span></text:p>
          </draw:text-box>
        </draw:frame>
        <draw:frame draw:style-name="gr1219" draw:text-style-name="P95" draw:layer="layout" svg:width="2.954cm" svg:height="0.569cm" svg:x="25.804cm" svg:y="6.901cm">
          <draw:text-box>
            <text:p><text:span text:style-name="T36">mem_wb_reg_rd</text:span><text:span text:style-name="T36">=2</text:span></text:p>
          </draw:text-box>
        </draw:frame>
        <draw:frame draw:style-name="gr1220" draw:text-style-name="P94" draw:layer="layout" svg:width="3.095cm" svg:height="0.569cm" svg:x="25.804cm" svg:y="7.231cm">
          <draw:text-box>
            <text:p><text:span text:style-name="T35">mem_wb_reg_rs</text:span><text:span text:style-name="T35">1=2</text:span></text:p>
          </draw:text-box>
        </draw:frame>
        <draw:frame draw:style-name="gr1217" draw:text-style-name="P94" draw:layer="layout" svg:width="3.032cm" svg:height="0.569cm" svg:x="25.804cm" svg:y="7.532cm">
          <draw:text-box>
            <text:p><text:span text:style-name="T35">mem_wb_reg_rs</text:span><text:span text:style-name="T35">2=-</text:span></text:p>
          </draw:text-box>
        </draw:frame>
        <draw:frame draw:style-name="gr1221" draw:text-style-name="P89" draw:layer="layout" svg:width="2.087cm" svg:height="0.569cm" svg:x="16.762cm" svg:y="5.5cm">
          <draw:text-box>
            <text:p><text:span text:style-name="T30">forward_a=2</text:span></text:p>
          </draw:text-box>
        </draw:frame>
        <draw:line draw:style-name="gr1222" draw:text-style-name="P4" draw:layer="layout" svg:x1="23.601cm" svg:y1="6.843cm" svg:x2="16cm" svg:y2="8.44cm">
          <text:p/>
        </draw:line>
        <draw:line draw:style-name="gr1199" draw:text-style-name="P4" draw:layer="layout" svg:x1="18.138cm" svg:y1="6cm" svg:x2="18.738cm" svg:y2="8.5cm">
          <text:p/>
        </draw:line>
        <draw:frame draw:style-name="gr1223" draw:text-style-name="P89" draw:layer="layout" svg:width="5.949cm" svg:height="0.569cm" svg:x="16.063cm" svg:y="5.201cm">
          <draw:text-box>
            <text:p><text:span text:style-name="T30">forward_a_mux_</text:span><text:span text:style-name="T30">out_s = </text:span><text:span text:style-name="T30">alu_result_mem_</text:span><text:span text:style-name="T30">s</text:span></text:p>
          </draw:text-box>
        </draw:frame>
        <draw:frame draw:style-name="gr1224" draw:text-style-name="P94" draw:layer="layout" svg:width="2.051cm" svg:height="0.569cm" svg:x="22.948cm" svg:y="5.3cm">
          <draw:text-box>
            <text:p><text:span text:style-name="T35">x2=0x100</text:span></text:p>
          </draw:text-box>
        </draw:frame>
        <draw:frame draw:style-name="gr1225" draw:text-style-name="P94" draw:layer="layout" svg:width="2.291cm" svg:height="0.569cm" svg:x="12.2cm" svg:y="6.1cm">
          <draw:text-box>
            <text:p><text:span text:style-name="T35">imm_d=0x100</text:span></text:p>
          </draw:text-box>
        </draw:frame>
        <draw:frame draw:style-name="gr1224" draw:text-style-name="P94" draw:layer="layout" svg:width="2.051cm" svg:height="0.569cm" svg:x="12.301cm" svg:y="5.101cm">
          <draw:text-box>
            <text:p><text:span text:style-name="T35">reg_a=0</text:span></text:p>
          </draw:text-box>
        </draw:frame>
        <draw:frame draw:style-name="gr1226" draw:text-style-name="P94" draw:layer="layout" svg:width="2.67cm" svg:height="0.569cm" svg:x="15.33cm" svg:y="6.031cm">
          <draw:text-box>
            <text:p><text:span text:style-name="T35">alu_result=0x100</text:span></text:p>
          </draw:text-box>
        </draw:frame>
        <draw:frame draw:style-name="gr1224" draw:text-style-name="P94" draw:layer="layout" svg:width="2.051cm" svg:height="0.569cm" svg:x="14.949cm" svg:y="8.301cm">
          <draw:text-box>
            <text:p><text:span text:style-name="T35">x2=0x???</text:span></text:p>
          </draw:text-box>
        </draw:frame>
        <draw:frame draw:style-name="gr1224" draw:text-style-name="P94" draw:layer="layout" svg:width="2.051cm" svg:height="0.569cm" svg:x="16.2cm" svg:y="9.1cm">
          <draw:text-box>
            <text:p><text:span text:style-name="T35">imm_d=8</text:span></text:p>
          </draw:text-box>
        </draw:frame>
        <draw:frame draw:style-name="gr1224" draw:text-style-name="P94" draw:layer="layout" svg:width="2.051cm" svg:height="0.569cm" svg:x="16.301cm" svg:y="8.101cm">
          <draw:text-box>
            <text:p><text:span text:style-name="T35">reg_a=??</text:span></text:p>
          </draw:text-box>
        </draw:frame>
        <draw:frame draw:style-name="gr1227" draw:text-style-name="P94" draw:layer="layout" svg:width="2.986cm" svg:height="0.569cm" svg:x="19.031cm" svg:y="9.032cm">
          <draw:text-box>
            <text:p><text:span text:style-name="T35">alu_result=0x100</text:span><text:span text:style-name="T35">00</text:span></text:p>
          </draw:text-box>
        </draw:frame>
        <draw:frame draw:style-name="gr1228" draw:text-style-name="P94" draw:layer="layout" svg:width="2.055cm" svg:height="0.569cm" svg:x="26.949cm" svg:y="8.301cm">
          <draw:text-box>
            <text:p><text:span text:style-name="T35">x2=0x10000</text:span></text:p>
          </draw:text-box>
        </draw:frame>
        <draw:frame draw:style-name="gr1208" draw:text-style-name="P81" draw:layer="layout" svg:width="3.855cm" svg:height="0.806cm" svg:x="1.01cm" svg:y="11.6cm">
          <draw:text-box>
            <text:p><text:span text:style-name="T27">ld </text:span><text:span text:style-name="T37">x3</text:span><text:span text:style-name="T27">, </text:span><text:span text:style-name="T27">0(</text:span><text:span text:style-name="T31">x2</text:span><text:span text:style-name="T27">)</text:span></text:p>
          </draw:text-box>
        </draw:frame>
        <draw:frame draw:style-name="gr1210" draw:text-style-name="P94" draw:layer="layout" svg:width="2.479cm" svg:height="0.569cm" svg:x="17.801cm" svg:y="9.902cm">
          <draw:text-box>
            <text:p><text:span text:style-name="T35">if_id_reg_rd=3</text:span></text:p>
          </draw:text-box>
        </draw:frame>
        <draw:frame draw:style-name="gr1211" draw:text-style-name="P94" draw:layer="layout" svg:width="2.465cm" svg:height="0.569cm" svg:x="17.801cm" svg:y="10.232cm">
          <draw:text-box>
            <text:p><text:span text:style-name="T35">if_id_reg_rs1=2</text:span></text:p>
          </draw:text-box>
        </draw:frame>
        <draw:frame draw:style-name="gr1212" draw:text-style-name="P94" draw:layer="layout" svg:width="2.462cm" svg:height="0.569cm" svg:x="17.801cm" svg:y="10.533cm">
          <draw:text-box>
            <text:p><text:span text:style-name="T35">if_id_reg_rs2=-</text:span></text:p>
          </draw:text-box>
        </draw:frame>
        <draw:frame draw:style-name="gr1213" draw:text-style-name="P96" draw:layer="layout" svg:width="2.481cm" svg:height="0.569cm" svg:x="21.802cm" svg:y="9.902cm">
          <draw:text-box>
            <text:p><text:span text:style-name="T38">id_ex_reg_rd=3</text:span></text:p>
          </draw:text-box>
        </draw:frame>
        <draw:frame draw:style-name="gr1214" draw:text-style-name="P89" draw:layer="layout" svg:width="2.623cm" svg:height="0.569cm" svg:x="21.802cm" svg:y="10.232cm">
          <draw:text-box>
            <text:p><text:span text:style-name="T30">id_ex_reg_rs1=2</text:span></text:p>
          </draw:text-box>
        </draw:frame>
        <draw:frame draw:style-name="gr1215" draw:text-style-name="P94" draw:layer="layout" svg:width="2.56cm" svg:height="0.569cm" svg:x="21.802cm" svg:y="10.533cm">
          <draw:text-box>
            <text:p><text:span text:style-name="T35">id_ex_reg_rs2=-</text:span></text:p>
          </draw:text-box>
        </draw:frame>
        <draw:frame draw:style-name="gr1216" draw:text-style-name="P97" draw:layer="layout" svg:width="2.891cm" svg:height="0.569cm" svg:x="25.803cm" svg:y="9.902cm">
          <draw:text-box>
            <text:p><text:span text:style-name="T39">ex_mem_reg_rd=</text:span><text:span text:style-name="T39">3</text:span></text:p>
          </draw:text-box>
        </draw:frame>
        <draw:frame draw:style-name="gr1217" draw:text-style-name="P94" draw:layer="layout" svg:width="3.032cm" svg:height="0.569cm" svg:x="25.803cm" svg:y="10.232cm">
          <draw:text-box>
            <text:p><text:span text:style-name="T35">ex_mem_reg_rs1</text:span><text:span text:style-name="T35">=2</text:span></text:p>
          </draw:text-box>
        </draw:frame>
        <draw:frame draw:style-name="gr1218" draw:text-style-name="P94" draw:layer="layout" svg:width="2.969cm" svg:height="0.569cm" svg:x="25.803cm" svg:y="10.533cm">
          <draw:text-box>
            <text:p><text:span text:style-name="T35">ex_mem_reg_rs2</text:span><text:span text:style-name="T35">=-</text:span></text:p>
          </draw:text-box>
        </draw:frame>
        <draw:frame draw:style-name="gr1219" draw:text-style-name="P96" draw:layer="layout" svg:width="2.954cm" svg:height="0.569cm" svg:x="29.804cm" svg:y="9.902cm">
          <draw:text-box>
            <text:p><text:span text:style-name="T38">mem_wb_reg_rd</text:span><text:span text:style-name="T38">=3</text:span></text:p>
          </draw:text-box>
        </draw:frame>
        <draw:frame draw:style-name="gr1220" draw:text-style-name="P94" draw:layer="layout" svg:width="3.095cm" svg:height="0.569cm" svg:x="29.804cm" svg:y="10.232cm">
          <draw:text-box>
            <text:p><text:span text:style-name="T35">mem_wb_reg_rs</text:span><text:span text:style-name="T35">1=2</text:span></text:p>
          </draw:text-box>
        </draw:frame>
        <draw:frame draw:style-name="gr1217" draw:text-style-name="P94" draw:layer="layout" svg:width="3.032cm" svg:height="0.569cm" svg:x="29.804cm" svg:y="10.533cm">
          <draw:text-box>
            <text:p><text:span text:style-name="T35">mem_wb_reg_rs</text:span><text:span text:style-name="T35">2=-</text:span></text:p>
          </draw:text-box>
        </draw:frame>
        <draw:frame draw:style-name="gr1224" draw:text-style-name="P94" draw:layer="layout" svg:width="2.051cm" svg:height="0.569cm" svg:x="18.95cm" svg:y="11.302cm">
          <draw:text-box>
            <text:p><text:span text:style-name="T35">x2=0x???</text:span></text:p>
          </draw:text-box>
        </draw:frame>
        <draw:line draw:style-name="gr1222" draw:text-style-name="P4" draw:layer="layout" svg:x1="27.627cm" svg:y1="9.783cm" svg:x2="20.026cm" svg:y2="11.38cm">
          <text:p/>
        </draw:line>
        <draw:frame draw:style-name="gr1224" draw:text-style-name="P94" draw:layer="layout" svg:width="2.051cm" svg:height="0.569cm" svg:x="20.201cm" svg:y="12.101cm">
          <draw:text-box>
            <text:p><text:span text:style-name="T35">imm_d=0</text:span></text:p>
          </draw:text-box>
        </draw:frame>
        <draw:frame draw:style-name="gr1224" draw:text-style-name="P94" draw:layer="layout" svg:width="2.051cm" svg:height="0.569cm" svg:x="20.302cm" svg:y="11.102cm">
          <draw:text-box>
            <text:p><text:span text:style-name="T35">reg_a=??</text:span></text:p>
          </draw:text-box>
        </draw:frame>
        <draw:line draw:style-name="gr1199" draw:text-style-name="P4" draw:layer="layout" svg:x1="22.176cm" svg:y1="9cm" svg:x2="22.776cm" svg:y2="11.5cm">
          <text:p/>
        </draw:line>
        <draw:frame draw:style-name="gr1221" draw:text-style-name="P89" draw:layer="layout" svg:width="2.087cm" svg:height="0.569cm" svg:x="20.763cm" svg:y="8.501cm">
          <draw:text-box>
            <text:p><text:span text:style-name="T30">forward_a=2</text:span></text:p>
          </draw:text-box>
        </draw:frame>
        <draw:frame draw:style-name="gr1223" draw:text-style-name="P89" draw:layer="layout" svg:width="5.949cm" svg:height="0.569cm" svg:x="20.063cm" svg:y="8.202cm">
          <draw:text-box>
            <text:p><text:span text:style-name="T30">forward_a_mux_</text:span><text:span text:style-name="T30">out_s = </text:span><text:span text:style-name="T30">alu_result_mem_</text:span><text:span text:style-name="T30">s</text:span></text:p>
          </draw:text-box>
        </draw:frame>
        <draw:frame draw:style-name="gr1227" draw:text-style-name="P94" draw:layer="layout" svg:width="2.986cm" svg:height="0.569cm" svg:x="23.032cm" svg:y="12.033cm">
          <draw:text-box>
            <text:p><text:span text:style-name="T35">alu_result=0x100</text:span><text:span text:style-name="T35">00</text:span></text:p>
          </draw:text-box>
        </draw:frame>
        <draw:frame draw:style-name="gr1229" draw:text-style-name="P94" draw:layer="layout" svg:width="1.07cm" svg:height="0.569cm" svg:x="26.131cm" svg:y="11.6cm">
          <draw:text-box>
            <text:p><text:span text:style-name="T35">addr</text:span></text:p>
          </draw:text-box>
        </draw:frame>
        <draw:frame draw:style-name="gr1230" draw:text-style-name="P94" draw:layer="layout" svg:width="2.308cm" svg:height="0.569cm" svg:x="26.795cm" svg:y="11cm">
          <draw:text-box>
            <text:p><text:span text:style-name="T35">M[0x10000]=1</text:span></text:p>
          </draw:text-box>
        </draw:frame>
        <draw:frame draw:style-name="gr1231" draw:text-style-name="P94" draw:layer="layout" svg:width="1.574cm" svg:height="0.569cm" svg:x="27.227cm" svg:y="11.231cm">
          <draw:text-box>
            <text:p><text:span text:style-name="T35">GPIO.ID</text:span></text:p>
          </draw:text-box>
        </draw:frame>
        <draw:frame draw:style-name="gr1228" draw:text-style-name="P94" draw:layer="layout" svg:width="2.055cm" svg:height="0.569cm" svg:x="30.999cm" svg:y="11.331cm">
          <draw:text-box>
            <text:p><text:span text:style-name="T35">x2=0x10000</text:span></text:p>
          </draw:text-box>
        </draw:frame>
        <draw:frame draw:style-name="gr1224" draw:text-style-name="P94" draw:layer="layout" svg:width="2.051cm" svg:height="0.569cm" svg:x="31cm" svg:y="12.032cm">
          <draw:text-box>
            <text:p><text:span text:style-name="T35">x3=0x1</text:span></text:p>
          </draw:text-box>
        </draw:frame>
        <draw:frame draw:style-name="gr1208" draw:text-style-name="P98" draw:layer="layout" svg:width="3.855cm" svg:height="0.806cm" svg:x="1.011cm" svg:y="14.6cm">
          <draw:text-box>
            <text:p><text:span text:style-name="T40">sd </text:span><text:span text:style-name="T41">x3</text:span><text:span text:style-name="T40">, </text:span><text:span text:style-name="T40">4(</text:span><text:span text:style-name="T42">x2</text:span><text:span text:style-name="T40">)</text:span></text:p>
          </draw:text-box>
        </draw:frame>
        <draw:frame draw:style-name="gr1210" draw:text-style-name="P94" draw:layer="layout" svg:width="2.479cm" svg:height="0.569cm" svg:x="21.8cm" svg:y="12.901cm">
          <draw:text-box>
            <text:p><text:span text:style-name="T35">if_id_reg_rd=-</text:span></text:p>
          </draw:text-box>
        </draw:frame>
        <draw:frame draw:style-name="gr1211" draw:text-style-name="P94" draw:layer="layout" svg:width="2.465cm" svg:height="0.569cm" svg:x="21.8cm" svg:y="13.231cm">
          <draw:text-box>
            <text:p><text:span text:style-name="T35">if_id_reg_rs1=2</text:span></text:p>
          </draw:text-box>
        </draw:frame>
        <draw:frame draw:style-name="gr1211" draw:text-style-name="P96" draw:layer="layout" svg:width="2.465cm" svg:height="0.569cm" svg:x="21.8cm" svg:y="13.532cm">
          <draw:text-box>
            <text:p><text:span text:style-name="T38">if_id_reg_rs2=3</text:span></text:p>
          </draw:text-box>
        </draw:frame>
        <draw:frame draw:style-name="gr1210" draw:text-style-name="P94" draw:layer="layout" svg:width="2.479cm" svg:height="0.569cm" svg:x="25.801cm" svg:y="12.901cm">
          <draw:text-box>
            <text:p><text:span text:style-name="T35">id_ex_reg_rd=-</text:span></text:p>
          </draw:text-box>
        </draw:frame>
        <draw:frame draw:style-name="gr1214" draw:text-style-name="P95" draw:layer="layout" svg:width="2.623cm" svg:height="0.569cm" svg:x="25.801cm" svg:y="13.231cm">
          <draw:text-box>
            <text:p><text:span text:style-name="T36">id_ex_reg_rs1=2</text:span></text:p>
          </draw:text-box>
        </draw:frame>
        <draw:frame draw:style-name="gr1214" draw:text-style-name="P94" draw:layer="layout" svg:width="2.623cm" svg:height="0.569cm" svg:x="25.801cm" svg:y="13.532cm">
          <draw:text-box>
            <text:p><text:span text:style-name="T35">id_ex_reg_rs2=3</text:span></text:p>
          </draw:text-box>
        </draw:frame>
        <draw:frame draw:style-name="gr1232" draw:text-style-name="P99" draw:layer="layout" svg:width="2.827cm" svg:height="0.569cm" svg:x="29.802cm" svg:y="12.901cm">
          <draw:text-box>
            <text:p><text:span text:style-name="T43">ex_mem_reg_rd=</text:span><text:span text:style-name="T43">-</text:span></text:p>
          </draw:text-box>
        </draw:frame>
        <draw:frame draw:style-name="gr1217" draw:text-style-name="P94" draw:layer="layout" svg:width="3.032cm" svg:height="0.569cm" svg:x="29.802cm" svg:y="13.231cm">
          <draw:text-box>
            <text:p><text:span text:style-name="T35">ex_mem_reg_rs1</text:span><text:span text:style-name="T35">=2</text:span></text:p>
          </draw:text-box>
        </draw:frame>
        <draw:frame draw:style-name="gr1217" draw:text-style-name="P94" draw:layer="layout" svg:width="3.032cm" svg:height="0.569cm" svg:x="29.802cm" svg:y="13.532cm">
          <draw:text-box>
            <text:p><text:span text:style-name="T35">ex_mem_reg_rs2</text:span><text:span text:style-name="T35">=3</text:span></text:p>
          </draw:text-box>
        </draw:frame>
        <draw:frame draw:style-name="gr1233" draw:text-style-name="P94" draw:layer="layout" svg:width="2.89cm" svg:height="0.569cm" svg:x="33.803cm" svg:y="12.901cm">
          <draw:text-box>
            <text:p><text:span text:style-name="T35">mem_wb_reg_rd</text:span><text:span text:style-name="T35">=-</text:span></text:p>
          </draw:text-box>
        </draw:frame>
        <draw:frame draw:style-name="gr1220" draw:text-style-name="P94" draw:layer="layout" svg:width="3.095cm" svg:height="0.569cm" svg:x="33.803cm" svg:y="13.231cm">
          <draw:text-box>
            <text:p><text:span text:style-name="T35">mem_wb_reg_rs</text:span><text:span text:style-name="T35">1=2</text:span></text:p>
          </draw:text-box>
        </draw:frame>
        <draw:frame draw:style-name="gr1220" draw:text-style-name="P94" draw:layer="layout" svg:width="3.095cm" svg:height="0.569cm" svg:x="33.803cm" svg:y="13.532cm">
          <draw:text-box>
            <text:p><text:span text:style-name="T35">mem_wb_reg_rs</text:span><text:span text:style-name="T35">2=3</text:span></text:p>
          </draw:text-box>
        </draw:frame>
        <draw:frame draw:style-name="gr1224" draw:text-style-name="P94" draw:layer="layout" svg:width="2.051cm" svg:height="0.569cm" svg:x="22.949cm" svg:y="14.301cm">
          <draw:text-box>
            <text:p><text:span text:style-name="T35">x2=0x100</text:span></text:p>
          </draw:text-box>
        </draw:frame>
        <draw:line draw:style-name="gr1234" draw:text-style-name="P4" draw:layer="layout" svg:x1="27.627cm" svg:y1="9.783cm" svg:x2="23.999cm" svg:y2="14.4cm">
          <text:p/>
        </draw:line>
        <draw:frame draw:style-name="gr1224" draw:text-style-name="P94" draw:layer="layout" svg:width="2.051cm" svg:height="0.569cm" svg:x="23.001cm" svg:y="15.033cm">
          <draw:text-box>
            <text:p><text:span text:style-name="T35">x3=0x??</text:span></text:p>
          </draw:text-box>
        </draw:frame>
        <draw:line draw:style-name="gr1235" draw:text-style-name="P4" draw:layer="layout" svg:x1="31.35cm" svg:y1="12.403cm" svg:x2="24.3cm" svg:y2="15.403cm">
          <text:p/>
        </draw:line>
        <draw:frame draw:style-name="gr1221" draw:text-style-name="P95" draw:layer="layout" svg:width="2.087cm" svg:height="0.569cm" svg:x="25.015cm" svg:y="8.6cm">
          <draw:text-box>
            <text:p><text:span text:style-name="T36">forward_a=1</text:span></text:p>
          </draw:text-box>
        </draw:frame>
        <draw:line draw:style-name="gr1236" draw:text-style-name="P4" draw:layer="layout" svg:x1="26.2cm" svg:y1="9cm" svg:x2="26.7cm" svg:y2="14.5cm">
          <text:p/>
        </draw:line>
        <draw:frame draw:style-name="gr1237" draw:text-style-name="P95" draw:layer="layout" svg:width="5.98cm" svg:height="0.569cm" svg:x="24cm" svg:y="8.331cm">
          <draw:text-box>
            <text:p><text:span text:style-name="T36">forward_a_mux_</text:span><text:span text:style-name="T36">out_s = </text:span><text:span text:style-name="T36">result_writeback_</text:span><text:span text:style-name="T36">s</text:span></text:p>
          </draw:text-box>
        </draw:frame>
        <draw:frame draw:style-name="gr1224" draw:text-style-name="P94" draw:layer="layout" svg:width="2.051cm" svg:height="0.569cm" svg:x="24.202cm" svg:y="15.402cm">
          <draw:text-box>
            <text:p><text:span text:style-name="T35">imm_d=4</text:span></text:p>
          </draw:text-box>
        </draw:frame>
        <draw:frame draw:style-name="gr1238" draw:text-style-name="P94" draw:layer="layout" svg:width="2.166cm" svg:height="0.569cm" svg:x="24.349cm" svg:y="14.1cm">
          <draw:text-box>
            <text:p><text:span text:style-name="T35">reg_a=0x100</text:span></text:p>
          </draw:text-box>
        </draw:frame>
        <draw:frame draw:style-name="gr1224" draw:text-style-name="P94" draw:layer="layout" svg:width="2.051cm" svg:height="0.569cm" svg:x="18.951cm" svg:y="12.303cm">
          <draw:text-box>
            <text:p><text:span text:style-name="T35">x3=0x???</text:span></text:p>
          </draw:text-box>
        </draw:frame>
        <draw:frame draw:style-name="gr1224" draw:text-style-name="P94" draw:layer="layout" svg:width="2.051cm" svg:height="0.569cm" svg:x="24.349cm" svg:y="15.101cm">
          <draw:text-box>
            <text:p><text:span text:style-name="T35">reg_b=0x??</text:span></text:p>
          </draw:text-box>
        </draw:frame>
        <draw:frame draw:style-name="gr1239" draw:text-style-name="P96" draw:layer="layout" svg:width="1.054cm" svg:height="0.569cm" svg:x="22.1cm" svg:y="14.031cm">
          <draw:text-box>
            <text:p><text:span text:style-name="T38">Stall</text:span></text:p>
          </draw:text-box>
        </draw:frame>
        <draw:frame draw:style-name="gr1240" draw:text-style-name="P94" draw:layer="layout" svg:width="5.893cm" svg:height="0.569cm" svg:x="14.909cm" svg:y="16.431cm">
          <draw:text-box>
            <text:p><text:span text:style-name="T35">Forward (grün) </text:span><text:span text:style-name="T35">und Stall (gelb) </text:span><text:span text:style-name="T35">stören sich.</text:span></text:p>
          </draw:text-box>
        </draw:frame>
        <draw:frame draw:style-name="gr1241" draw:text-style-name="P94" draw:layer="layout" svg:width="2.983cm" svg:height="0.569cm" svg:x="30.999cm" svg:y="18.031cm">
          <draw:text-box>
            <text:p><text:span text:style-name="T35">alu_result=0x104</text:span></text:p>
          </draw:text-box>
        </draw:frame>
        <draw:frame draw:style-name="gr1229" draw:text-style-name="P94" draw:layer="layout" svg:width="1.07cm" svg:height="0.569cm" svg:x="30.099cm" svg:y="14.531cm">
          <draw:text-box>
            <text:p><text:span text:style-name="T35">addr</text:span></text:p>
          </draw:text-box>
        </draw:frame>
        <draw:frame draw:style-name="gr1242" draw:text-style-name="P94" draw:layer="layout" svg:width="2.765cm" svg:height="0.569cm" svg:x="30.796cm" svg:y="14cm">
          <draw:text-box>
            <text:p><text:span text:style-name="T35">0x??</text:span><text:span text:style-name="T35">=M[0x10004]</text:span></text:p>
          </draw:text-box>
        </draw:frame>
        <draw:frame draw:style-name="gr1243" draw:text-style-name="P94" draw:layer="layout" svg:width="1.211cm" svg:height="0.569cm" svg:x="31.228cm" svg:y="14.231cm">
          <draw:text-box>
            <text:p><text:span text:style-name="T35">GPIO</text:span></text:p>
          </draw:text-box>
        </draw:frame>
        <draw:path draw:style-name="gr1244" draw:text-style-name="P4" draw:layer="layout" svg:width="1.629cm" svg:height="5.039cm" draw:transform="rotate (-1.28526046116862) translate (30.6442005031741cm 14.0458839158355cm)" svg:viewBox="0 0 1630 5040" svg:d="M0 5038c165 15 315-82 478-80 182 2 311-139 462-210 161-76 233-232 279-387 56-187-73-338-41-521 26-147-20-293-7-443 11-135 41-267 99-385s111-242 150-370c45-144 54-297 101-439 45-135 100-267 107-410 8-156-11-313-101-456-100-161-198-325-297-488-82-134-53-299-76-449l-22-159 12-134 59-107">
          <text:p/>
        </draw:path>
        <draw:frame draw:style-name="gr1208" draw:text-style-name="P81" draw:layer="layout" svg:width="3.855cm" svg:height="0.806cm" svg:x="4.012cm" svg:y="17.6cm">
          <draw:text-box>
            <text:p><text:span text:style-name="T27">sd </text:span><text:span text:style-name="T37">x3</text:span><text:span text:style-name="T27">, </text:span><text:span text:style-name="T27">4(</text:span><text:span text:style-name="T31">x2</text:span><text:span text:style-name="T27">)</text:span></text:p>
          </draw:text-box>
        </draw:frame>
        <draw:frame draw:style-name="gr1208" draw:text-style-name="P81" draw:layer="layout" svg:width="3.855cm" svg:height="0.806cm" svg:x="4.013cm" svg:y="14.6cm">
          <draw:text-box>
            <text:p><text:span text:style-name="T27">nop</text:span></text:p>
          </draw:text-box>
        </draw:frame>
        <draw:custom-shape draw:style-name="gr1245" draw:text-style-name="P18" draw:layer="layout" svg:width="0.4cm" svg:height="2cm" svg:x="17.8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45" draw:text-style-name="P18" draw:layer="layout" svg:width="0.4cm" svg:height="2cm" svg:x="21.801cm" svg:y="14.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46" draw:text-style-name="P100" draw:layer="layout" svg:width="3.1cm" svg:height="2.4cm" svg:x="26.404cm" svg:y="13.7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46" draw:text-style-name="P100" draw:layer="layout" svg:width="3.1cm" svg:height="2.4cm" svg:x="30.405cm" svg:y="13.7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46" draw:text-style-name="P100" draw:layer="layout" svg:width="3.1cm" svg:height="2.4cm" svg:x="34.406cm" svg:y="13.70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224" draw:text-style-name="P94" draw:layer="layout" svg:width="2.051cm" svg:height="0.569cm" svg:x="26.95cm" svg:y="17.302cm">
          <draw:text-box>
            <text:p><text:span text:style-name="T35">x2=0x100</text:span></text:p>
          </draw:text-box>
        </draw:frame>
        <draw:frame draw:style-name="gr1224" draw:text-style-name="P94" draw:layer="layout" svg:width="2.051cm" svg:height="0.569cm" svg:x="27.002cm" svg:y="18.034cm">
          <draw:text-box>
            <text:p><text:span text:style-name="T35">x3=0x??</text:span></text:p>
          </draw:text-box>
        </draw:frame>
        <draw:frame draw:style-name="gr1210" draw:text-style-name="P94" draw:layer="layout" svg:width="2.479cm" svg:height="0.569cm" svg:x="25.8cm" svg:y="15.901cm">
          <draw:text-box>
            <text:p><text:span text:style-name="T35">if_id_reg_rd=-</text:span></text:p>
          </draw:text-box>
        </draw:frame>
        <draw:frame draw:style-name="gr1211" draw:text-style-name="P94" draw:layer="layout" svg:width="2.465cm" svg:height="0.569cm" svg:x="25.8cm" svg:y="16.231cm">
          <draw:text-box>
            <text:p><text:span text:style-name="T35">if_id_reg_rs1=2</text:span></text:p>
          </draw:text-box>
        </draw:frame>
        <draw:frame draw:style-name="gr1211" draw:text-style-name="P99" draw:layer="layout" svg:width="2.465cm" svg:height="0.569cm" svg:x="25.8cm" svg:y="16.532cm">
          <draw:text-box>
            <text:p><text:span text:style-name="T43">if_id_reg_rs2=3</text:span></text:p>
          </draw:text-box>
        </draw:frame>
        <draw:frame draw:style-name="gr1210" draw:text-style-name="P94" draw:layer="layout" svg:width="2.479cm" svg:height="0.569cm" svg:x="29.801cm" svg:y="15.901cm">
          <draw:text-box>
            <text:p><text:span text:style-name="T35">id_ex_reg_rd=-</text:span></text:p>
          </draw:text-box>
        </draw:frame>
        <draw:frame draw:style-name="gr1214" draw:text-style-name="P99" draw:layer="layout" svg:width="2.623cm" svg:height="0.569cm" svg:x="29.801cm" svg:y="16.231cm">
          <draw:text-box>
            <text:p><text:span text:style-name="T43">id_ex_reg_rs1=2</text:span></text:p>
          </draw:text-box>
        </draw:frame>
        <draw:frame draw:style-name="gr1214" draw:text-style-name="P96" draw:layer="layout" svg:width="2.623cm" svg:height="0.569cm" svg:x="29.801cm" svg:y="16.532cm">
          <draw:text-box>
            <text:p><text:span text:style-name="T38">id_ex_reg_rs2=3</text:span></text:p>
          </draw:text-box>
        </draw:frame>
        <draw:frame draw:style-name="gr1232" draw:text-style-name="P99" draw:layer="layout" svg:width="2.827cm" svg:height="0.569cm" svg:x="33.802cm" svg:y="15.901cm">
          <draw:text-box>
            <text:p><text:span text:style-name="T43">ex_mem_reg_rd=</text:span><text:span text:style-name="T43">-</text:span></text:p>
          </draw:text-box>
        </draw:frame>
        <draw:frame draw:style-name="gr1217" draw:text-style-name="P94" draw:layer="layout" svg:width="3.032cm" svg:height="0.569cm" svg:x="33.802cm" svg:y="16.231cm">
          <draw:text-box>
            <text:p><text:span text:style-name="T35">ex_mem_reg_rs1</text:span><text:span text:style-name="T35">=2</text:span></text:p>
          </draw:text-box>
        </draw:frame>
        <draw:frame draw:style-name="gr1217" draw:text-style-name="P94" draw:layer="layout" svg:width="3.032cm" svg:height="0.569cm" svg:x="33.802cm" svg:y="16.532cm">
          <draw:text-box>
            <text:p><text:span text:style-name="T35">ex_mem_reg_rs2</text:span><text:span text:style-name="T35">=3</text:span></text:p>
          </draw:text-box>
        </draw:frame>
        <draw:frame draw:style-name="gr1233" draw:text-style-name="P94" draw:layer="layout" svg:width="2.89cm" svg:height="0.569cm" svg:x="37.803cm" svg:y="15.901cm">
          <draw:text-box>
            <text:p><text:span text:style-name="T35">mem_wb_reg_rd</text:span><text:span text:style-name="T35">=-</text:span></text:p>
          </draw:text-box>
        </draw:frame>
        <draw:frame draw:style-name="gr1220" draw:text-style-name="P94" draw:layer="layout" svg:width="3.095cm" svg:height="0.569cm" svg:x="37.803cm" svg:y="16.231cm">
          <draw:text-box>
            <text:p><text:span text:style-name="T35">mem_wb_reg_rs</text:span><text:span text:style-name="T35">1=2</text:span></text:p>
          </draw:text-box>
        </draw:frame>
        <draw:frame draw:style-name="gr1220" draw:text-style-name="P94" draw:layer="layout" svg:width="3.095cm" svg:height="0.569cm" svg:x="37.803cm" svg:y="16.532cm">
          <draw:text-box>
            <text:p><text:span text:style-name="T35">mem_wb_reg_rs</text:span><text:span text:style-name="T35">2=3</text:span></text:p>
          </draw:text-box>
        </draw:frame>
        <draw:frame draw:style-name="gr1238" draw:text-style-name="P94" draw:layer="layout" svg:width="2.166cm" svg:height="0.569cm" svg:x="28.349cm" svg:y="17.101cm">
          <draw:text-box>
            <text:p><text:span text:style-name="T35">reg_a=0x100</text:span></text:p>
          </draw:text-box>
        </draw:frame>
        <draw:frame draw:style-name="gr1224" draw:text-style-name="P94" draw:layer="layout" svg:width="2.051cm" svg:height="0.569cm" svg:x="28.203cm" svg:y="18.403cm">
          <draw:text-box>
            <text:p><text:span text:style-name="T35">imm_d=4</text:span></text:p>
          </draw:text-box>
        </draw:frame>
        <draw:frame draw:style-name="gr1224" draw:text-style-name="P94" draw:layer="layout" svg:width="2.051cm" svg:height="0.569cm" svg:x="28.35cm" svg:y="18.102cm">
          <draw:text-box>
            <text:p><text:span text:style-name="T35">reg_b=0x??</text:span></text:p>
          </draw:text-box>
        </draw:frame>
        <draw:frame draw:style-name="gr1227" draw:text-style-name="P94" draw:layer="layout" svg:width="2.986cm" svg:height="0.569cm" svg:x="26.999cm" svg:y="15.031cm">
          <draw:text-box>
            <text:p><text:span text:style-name="T35">alu_result=0x100</text:span><text:span text:style-name="T35">04</text:span></text:p>
          </draw:text-box>
        </draw:frame>
        <draw:frame draw:style-name="gr1229" draw:text-style-name="P94" draw:layer="layout" svg:width="1.07cm" svg:height="0.569cm" svg:x="34.131cm" svg:y="17.5cm">
          <draw:text-box>
            <text:p><text:span text:style-name="T35">addr</text:span></text:p>
          </draw:text-box>
        </draw:frame>
        <draw:frame draw:style-name="gr1247" draw:text-style-name="P94" draw:layer="layout" svg:width="2.763cm" svg:height="0.569cm" svg:x="34.797cm" svg:y="17cm">
          <draw:text-box>
            <text:p><text:span text:style-name="T35">0x??=M[0x104]</text:span></text:p>
          </draw:text-box>
        </draw:frame>
        <draw:frame draw:style-name="gr1243" draw:text-style-name="P94" draw:layer="layout" svg:width="1.211cm" svg:height="0.569cm" svg:x="35.229cm" svg:y="17.231cm">
          <draw:text-box>
            <text:p><text:span text:style-name="T35">GPIO</text:span></text:p>
          </draw:text-box>
        </draw:frame>
        <draw:frame draw:style-name="gr1237" draw:text-style-name="P96" draw:layer="layout" svg:width="5.98cm" svg:height="0.569cm" svg:x="30.32cm" svg:y="8.831cm">
          <draw:text-box>
            <text:p><text:span text:style-name="T38">forward_b_mux_</text:span><text:span text:style-name="T38">out_s = </text:span><text:span text:style-name="T38">result_writeback_</text:span><text:span text:style-name="T38">s</text:span></text:p>
          </draw:text-box>
        </draw:frame>
        <draw:frame draw:style-name="gr1221" draw:text-style-name="P96" draw:layer="layout" svg:width="2.087cm" svg:height="0.569cm" svg:x="31.2cm" svg:y="9.231cm">
          <draw:text-box>
            <text:p><text:span text:style-name="T38">forward_b=1</text:span></text:p>
          </draw:text-box>
        </draw:frame>
        <draw:line draw:style-name="gr1248" draw:text-style-name="P4" draw:layer="layout" svg:x1="30.2cm" svg:y1="12cm" svg:x2="30.5cm" svg:y2="18.5cm">
          <text:p/>
        </draw:line>
        <draw:path draw:style-name="gr1244" draw:text-style-name="P4" draw:layer="layout" svg:width="1.605cm" svg:height="4.957cm" draw:transform="rotate (-1.28526046116862) translate (34.9519514301039cm 17.1208808607118cm)" svg:viewBox="0 0 1606 4958" svg:d="M0 4896c164 15 291 60 454 62 182 2 311-140 462-210 161-76 233-232 279-387 56-187-73-338-41-520 26-148-20-294-7-444 11-135 41-267 99-385s111-242 150-370c45-144 54-297 101-439 45-135 100-267 107-410 8-156-11-313-101-455-100-162-198-326-297-489-82-134-53-299-76-449l-22-159 12-134 59-107">
          <text:p/>
        </draw:path>
        <draw:frame draw:style-name="gr1221" draw:text-style-name="P89" draw:layer="layout" svg:width="2.087cm" svg:height="0.569cm" svg:x="18.015cm" svg:y="20.4cm">
          <draw:text-box>
            <text:p><text:span text:style-name="T30">forward_a=2</text:span></text:p>
          </draw:text-box>
        </draw:frame>
        <draw:frame draw:style-name="gr1221" draw:text-style-name="P89" draw:layer="layout" svg:width="2.087cm" svg:height="0.569cm" svg:x="22.016cm" svg:y="20.401cm">
          <draw:text-box>
            <text:p><text:span text:style-name="T30">forward_a=2</text:span></text:p>
          </draw:text-box>
        </draw:frame>
        <draw:frame draw:style-name="gr1221" draw:text-style-name="P95" draw:layer="layout" svg:width="2.087cm" svg:height="0.569cm" svg:x="26.015cm" svg:y="20.431cm">
          <draw:text-box>
            <text:p><text:span text:style-name="T36">forward_a=1</text:span></text:p>
          </draw:text-box>
        </draw:frame>
        <draw:frame draw:style-name="gr1221" draw:text-style-name="P96" draw:layer="layout" svg:width="2.087cm" svg:height="0.569cm" svg:x="30.015cm" svg:y="21.431cm">
          <draw:text-box>
            <text:p><text:span text:style-name="T38">forward_b=1</text:span></text:p>
          </draw:text-box>
        </draw:frame>
      </draw:page>
      <draw:page draw:name="page21" draw:style-name="dp1" draw:master-page-name="Standard">
        <draw:frame draw:style-name="gr1171" draw:text-style-name="P34" draw:layer="layout" svg:width="4.807cm" svg:height="3.095cm" svg:x="1cm" svg:y="3.005cm">
          <draw:text-box>
            <text:p><text:span text:style-name="T9">Progra</text:span><text:span text:style-name="T9">m</text:span></text:p>
            <text:p><text:span text:style-name="T9">executi</text:span><text:span text:style-name="T9">on</text:span></text:p>
            <text:p><text:span text:style-name="T9">order</text:span></text:p>
            <text:p><text:span text:style-name="T9">(in </text:span><text:span text:style-name="T9">instructi</text:span><text:span text:style-name="T9">ons)</text:span></text:p>
          </draw:text-box>
        </draw:frame>
        <draw:frame draw:style-name="gr1172" draw:text-style-name="P81" draw:layer="layout" svg:width="3.601cm" svg:height="0.806cm" svg:x="1.008cm" svg:y="6.6cm">
          <draw:text-box>
            <text:p><text:span text:style-name="T27">ld </text:span><text:span text:style-name="T31">x2</text:span><text:span text:style-name="T27">, </text:span><text:span text:style-name="T27">20(x1)</text:span></text:p>
          </draw:text-box>
        </draw:frame>
        <draw:frame draw:style-name="gr1173" draw:text-style-name="P34" draw:layer="layout" svg:width="6.124cm" svg:height="0.962cm" svg:x="5.699cm" svg:y="4.038cm">
          <draw:text-box>
            <text:p><text:span text:style-name="T9">Time in </text:span><text:span text:style-name="T9">clock </text:span><text:span text:style-name="T9">cycles</text:span></text:p>
          </draw:text-box>
        </draw:frame>
        <draw:line draw:style-name="gr146" draw:text-style-name="P4" draw:layer="layout" svg:x1="1.099cm" svg:y1="6cm" svg:x2="1.099cm" svg:y2="12cm">
          <text:p/>
        </draw:line>
        <draw:line draw:style-name="gr146" draw:text-style-name="P4" draw:layer="layout" svg:x1="5.999cm" svg:y1="5cm" svg:x2="12.999cm" svg:y2="5cm">
          <text:p/>
        </draw:line>
        <draw:g draw:style-name="gr66">
          <draw:polygon draw:style-name="gr1174" draw:text-style-name="P90" draw:layer="layout" svg:width="1.999cm" svg:height="2.999cm" svg:x="14.999cm" svg:y="5.5cm" svg:viewBox="0 0 2000 3000" draw:points="0,0 0,1100 400,1500 0,1900 0,3000 2000,2000 2000,1000">
            <text:p/>
          </draw:polygon>
          <draw:frame draw:style-name="gr1175" draw:text-style-name="P81" draw:layer="layout" svg:width="1.466cm" svg:height="0.806cm" svg:x="15.399cm" svg:y="6.594cm">
            <draw:text-box>
              <text:p><text:span text:style-name="T27">ALU</text:span></text:p>
            </draw:text-box>
          </draw:frame>
        </draw:g>
        <draw:g draw:style-name="gr1">
          <draw:g draw:style-name="gr1">
            <draw:custom-shape draw:style-name="gr1176" draw:text-style-name="P14" draw:layer="layout" svg:width="1cm" svg:height="2cm" svg:x="6.999cm" svg:y="6cm">
              <text:p/>
              <draw:enhanced-geometry svg:viewBox="0 0 21600 21600" draw:type="rectangle" draw:enhanced-path="M 0 0 L 21600 0 21600 21600 0 21600 0 0 Z N"/>
            </draw:custom-shape>
            <draw:custom-shape draw:style-name="gr1177" draw:text-style-name="P1" draw:layer="layout" svg:width="1cm" svg:height="2cm" svg:x="7.999cm" svg:y="6cm">
              <text:p/>
              <draw:enhanced-geometry svg:viewBox="0 0 21600 21600" draw:type="rectangle" draw:enhanced-path="M 0 0 L 21600 0 21600 21600 0 21600 0 0 Z N"/>
            </draw:custom-shape>
          </draw:g>
          <draw:g draw:style-name="gr66">
            <draw:frame draw:style-name="gr1178" draw:text-style-name="P81" draw:layer="layout" svg:width="1.052cm" svg:height="0.806cm" svg:x="7.528cm" svg:y="6.597cm">
              <draw:text-box>
                <text:p><text:span text:style-name="T27">IM</text:span></text:p>
              </draw:text-box>
            </draw:frame>
          </draw:g>
        </draw:g>
        <draw:g draw:style-name="gr1">
          <draw:g draw:style-name="gr1">
            <draw:custom-shape draw:style-name="gr1179" draw:text-style-name="P14" draw:layer="layout" svg:width="1cm" svg:height="2cm" svg:x="10.999cm" svg:y="6cm">
              <text:p/>
              <draw:enhanced-geometry svg:viewBox="0 0 21600 21600" draw:type="rectangle" draw:enhanced-path="M 0 0 L 21600 0 21600 21600 0 21600 0 0 Z N"/>
            </draw:custom-shape>
            <draw:custom-shape draw:style-name="gr1177" draw:text-style-name="P1" draw:layer="layout" svg:width="1cm" svg:height="2cm" svg:x="11.999cm" svg:y="6cm">
              <text:p/>
              <draw:enhanced-geometry svg:viewBox="0 0 21600 21600" draw:type="rectangle" draw:enhanced-path="M 0 0 L 21600 0 21600 21600 0 21600 0 0 Z N"/>
            </draw:custom-shape>
          </draw:g>
          <draw:g draw:style-name="gr66">
            <draw:frame draw:style-name="gr1180" draw:text-style-name="P81" draw:layer="layout" svg:width="1.411cm" svg:height="0.806cm" svg:x="11.528cm" svg:y="6.597cm">
              <draw:text-box>
                <text:p><text:span text:style-name="T27">Reg</text:span></text:p>
              </draw:text-box>
            </draw:frame>
          </draw:g>
        </draw:g>
        <draw:g draw:style-name="gr1">
          <draw:g draw:style-name="gr1">
            <draw:custom-shape draw:style-name="gr1179" draw:text-style-name="P14" draw:layer="layout" svg:width="1cm" svg:height="2cm" svg:x="23.999cm" svg:y="6cm">
              <text:p/>
              <draw:enhanced-geometry svg:viewBox="0 0 21600 21600" draw:mirror-horizontal="true" draw:type="rectangle" draw:enhanced-path="M 0 0 L 21600 0 21600 21600 0 21600 0 0 Z N"/>
            </draw:custom-shape>
            <draw:custom-shape draw:style-name="gr1177" draw:text-style-name="P1" draw:layer="layout" svg:width="1cm" svg:height="2cm" svg:x="22.999cm" svg:y="6cm">
              <text:p/>
              <draw:enhanced-geometry svg:viewBox="0 0 21600 21600" draw:mirror-horizontal="true" draw:type="rectangle" draw:enhanced-path="M 0 0 L 21600 0 21600 21600 0 21600 0 0 Z N"/>
            </draw:custom-shape>
          </draw:g>
          <draw:g draw:style-name="gr66">
            <draw:frame draw:style-name="gr1180" draw:text-style-name="P81" draw:layer="layout" svg:width="1.411cm" svg:height="0.806cm" svg:x="23.35cm" svg:y="6.597cm">
              <draw:text-box>
                <text:p><text:span text:style-name="T27">Reg</text:span></text:p>
              </draw:text-box>
            </draw:frame>
          </draw:g>
        </draw:g>
        <draw:line draw:style-name="gr38" draw:text-style-name="P4" draw:layer="layout" svg:x1="8.999cm" svg:y1="7cm" svg:x2="10.999cm" svg:y2="7cm">
          <text:p/>
        </draw:line>
        <draw:line draw:style-name="gr38" draw:text-style-name="P4" draw:layer="layout" svg:x1="10.499cm" svg:y1="7cm" svg:x2="10.499cm" svg:y2="6.5cm">
          <text:p/>
        </draw:line>
        <draw:line draw:style-name="gr38" draw:text-style-name="P4" draw:layer="layout" svg:x1="10.499cm" svg:y1="6.5cm" svg:x2="10.999cm" svg:y2="6.5cm">
          <text:p/>
        </draw:line>
        <draw:line draw:style-name="gr38" draw:text-style-name="P4" draw:layer="layout" svg:x1="12.999cm" svg:y1="6.5cm" svg:x2="14.999cm" svg:y2="6.5cm">
          <text:p/>
        </draw:line>
        <draw:line draw:style-name="gr38" draw:text-style-name="P4" draw:layer="layout" svg:x1="12.999cm" svg:y1="7.5cm" svg:x2="14.999cm" svg:y2="7.5cm">
          <text:p/>
        </draw:line>
        <draw:line draw:style-name="gr38" draw:text-style-name="P4" draw:layer="layout" svg:x1="16.999cm" svg:y1="7cm" svg:x2="18.999cm" svg:y2="7cm">
          <text:p/>
        </draw:line>
        <draw:line draw:style-name="gr38" draw:text-style-name="P4" draw:layer="layout" svg:x1="20.999cm" svg:y1="7cm" svg:x2="22.999cm" svg:y2="7cm">
          <text:p/>
        </draw:line>
        <draw:g draw:style-name="gr66">
          <draw:polygon draw:style-name="gr1174" draw:text-style-name="P90" draw:layer="layout" svg:width="1.999cm" svg:height="2.999cm" svg:x="18.999cm" svg:y="8.5cm" svg:viewBox="0 0 2000 3000" draw:points="0,0 0,1100 400,1500 0,1900 0,3000 2000,2000 2000,1000">
            <text:p/>
          </draw:polygon>
          <draw:frame draw:style-name="gr1175" draw:text-style-name="P81" draw:layer="layout" svg:width="1.466cm" svg:height="0.806cm" svg:x="19.399cm" svg:y="9.594cm">
            <draw:text-box>
              <text:p><text:span text:style-name="T27">ALU</text:span></text:p>
            </draw:text-box>
          </draw:frame>
        </draw:g>
        <draw:g draw:style-name="gr1">
          <draw:g draw:style-name="gr1">
            <draw:custom-shape draw:style-name="gr1176" draw:text-style-name="P14" draw:layer="layout" svg:width="1cm" svg:height="2cm" svg:x="10.999cm" svg:y="9cm">
              <text:p/>
              <draw:enhanced-geometry svg:viewBox="0 0 21600 21600" draw:type="rectangle" draw:enhanced-path="M 0 0 L 21600 0 21600 21600 0 21600 0 0 Z N"/>
            </draw:custom-shape>
            <draw:custom-shape draw:style-name="gr1177" draw:text-style-name="P1" draw:layer="layout" svg:width="1cm" svg:height="2cm" svg:x="11.999cm" svg:y="9cm">
              <text:p/>
              <draw:enhanced-geometry svg:viewBox="0 0 21600 21600" draw:type="rectangle" draw:enhanced-path="M 0 0 L 21600 0 21600 21600 0 21600 0 0 Z N"/>
            </draw:custom-shape>
          </draw:g>
          <draw:g draw:style-name="gr66">
            <draw:frame draw:style-name="gr1178" draw:text-style-name="P81" draw:layer="layout" svg:width="1.052cm" svg:height="0.806cm" svg:x="11.528cm" svg:y="9.597cm">
              <draw:text-box>
                <text:p><text:span text:style-name="T27">IM</text:span></text:p>
              </draw:text-box>
            </draw:frame>
          </draw:g>
        </draw:g>
        <draw:g draw:style-name="gr1">
          <draw:g draw:style-name="gr1">
            <draw:custom-shape draw:style-name="gr1179" draw:text-style-name="P14" draw:layer="layout" svg:width="1cm" svg:height="2cm" svg:x="14.999cm" svg:y="9cm">
              <text:p/>
              <draw:enhanced-geometry svg:viewBox="0 0 21600 21600" draw:type="rectangle" draw:enhanced-path="M 0 0 L 21600 0 21600 21600 0 21600 0 0 Z N"/>
            </draw:custom-shape>
            <draw:custom-shape draw:style-name="gr1177" draw:text-style-name="P1" draw:layer="layout" svg:width="1cm" svg:height="2cm" svg:x="15.999cm" svg:y="9cm">
              <text:p/>
              <draw:enhanced-geometry svg:viewBox="0 0 21600 21600" draw:type="rectangle" draw:enhanced-path="M 0 0 L 21600 0 21600 21600 0 21600 0 0 Z N"/>
            </draw:custom-shape>
          </draw:g>
          <draw:g draw:style-name="gr66">
            <draw:frame draw:style-name="gr1181" draw:text-style-name="P81" draw:layer="layout" svg:width="1.575cm" svg:height="0.806cm" svg:x="15.528cm" svg:y="9.597cm">
              <draw:text-box>
                <text:p><text:span text:style-name="T27">REG</text:span></text:p>
              </draw:text-box>
            </draw:frame>
          </draw:g>
        </draw:g>
        <draw:g draw:style-name="gr1">
          <draw:g draw:style-name="gr1">
            <draw:custom-shape draw:style-name="gr1179" draw:text-style-name="P14" draw:layer="layout" svg:width="1cm" svg:height="2cm" svg:x="27.999cm" svg:y="9cm">
              <text:p/>
              <draw:enhanced-geometry svg:viewBox="0 0 21600 21600" draw:mirror-horizontal="true" draw:type="rectangle" draw:enhanced-path="M 0 0 L 21600 0 21600 21600 0 21600 0 0 Z N"/>
            </draw:custom-shape>
            <draw:custom-shape draw:style-name="gr1177" draw:text-style-name="P1" draw:layer="layout" svg:width="1cm" svg:height="2cm" svg:x="26.999cm" svg:y="9cm">
              <text:p/>
              <draw:enhanced-geometry svg:viewBox="0 0 21600 21600" draw:mirror-horizontal="true" draw:type="rectangle" draw:enhanced-path="M 0 0 L 21600 0 21600 21600 0 21600 0 0 Z N"/>
            </draw:custom-shape>
          </draw:g>
          <draw:g draw:style-name="gr66">
            <draw:frame draw:style-name="gr1180" draw:text-style-name="P81" draw:layer="layout" svg:width="1.411cm" svg:height="0.806cm" svg:x="27.35cm" svg:y="9.597cm">
              <draw:text-box>
                <text:p><text:span text:style-name="T27">Reg</text:span></text:p>
              </draw:text-box>
            </draw:frame>
          </draw:g>
        </draw:g>
        <draw:line draw:style-name="gr38" draw:text-style-name="P4" draw:layer="layout" svg:x1="12.999cm" svg:y1="10cm" svg:x2="14.999cm" svg:y2="10cm">
          <text:p/>
        </draw:line>
        <draw:line draw:style-name="gr38" draw:text-style-name="P4" draw:layer="layout" svg:x1="14.499cm" svg:y1="10cm" svg:x2="14.499cm" svg:y2="9.5cm">
          <text:p/>
        </draw:line>
        <draw:line draw:style-name="gr38" draw:text-style-name="P4" draw:layer="layout" svg:x1="14.499cm" svg:y1="9.5cm" svg:x2="14.999cm" svg:y2="9.5cm">
          <text:p/>
        </draw:line>
        <draw:line draw:style-name="gr38" draw:text-style-name="P4" draw:layer="layout" svg:x1="16.999cm" svg:y1="9.5cm" svg:x2="18.999cm" svg:y2="9.5cm">
          <text:p/>
        </draw:line>
        <draw:line draw:style-name="gr38" draw:text-style-name="P4" draw:layer="layout" svg:x1="16.999cm" svg:y1="10.5cm" svg:x2="18.999cm" svg:y2="10.5cm">
          <text:p/>
        </draw:line>
        <draw:line draw:style-name="gr38" draw:text-style-name="P4" draw:layer="layout" svg:x1="20.999cm" svg:y1="10cm" svg:x2="22.999cm" svg:y2="10cm">
          <text:p/>
        </draw:line>
        <draw:line draw:style-name="gr38" draw:text-style-name="P4" draw:layer="layout" svg:x1="24.999cm" svg:y1="10cm" svg:x2="26.999cm" svg:y2="10cm">
          <text:p/>
        </draw:line>
        <draw:frame draw:style-name="gr1249" draw:text-style-name="P81" draw:layer="layout" svg:width="3.585cm" svg:height="0.806cm" svg:x="1.009cm" svg:y="9.6cm">
          <draw:text-box>
            <text:p><text:span text:style-name="T27">and x4, </text:span><text:span text:style-name="T31">x2</text:span><text:span text:style-name="T27">, x5</text:span></text:p>
          </draw:text-box>
        </draw:frame>
        <draw:line draw:style-name="gr1183" draw:text-style-name="P4" draw:layer="layout" svg:x1="9.999cm" svg:y1="5cm" svg:x2="9.999cm" svg:y2="21cm">
          <text:p/>
        </draw:line>
        <draw:line draw:style-name="gr1183" draw:text-style-name="P4" draw:layer="layout" svg:x1="13.999cm" svg:y1="5cm" svg:x2="13.999cm" svg:y2="21cm">
          <text:p/>
        </draw:line>
        <draw:line draw:style-name="gr1183" draw:text-style-name="P4" draw:layer="layout" svg:x1="17.999cm" svg:y1="5cm" svg:x2="17.999cm" svg:y2="21cm">
          <text:p/>
        </draw:line>
        <draw:line draw:style-name="gr1183" draw:text-style-name="P4" draw:layer="layout" svg:x1="21.999cm" svg:y1="5cm" svg:x2="21.999cm" svg:y2="21cm">
          <text:p/>
        </draw:line>
        <draw:line draw:style-name="gr1183" draw:text-style-name="P4" draw:layer="layout" svg:x1="25.999cm" svg:y1="5cm" svg:x2="25.999cm" svg:y2="21cm">
          <text:p/>
        </draw:line>
        <draw:line draw:style-name="gr1183" draw:text-style-name="P4" draw:layer="layout" svg:x1="29.999cm" svg:y1="5cm" svg:x2="29.999cm" svg:y2="21cm">
          <text:p/>
        </draw:line>
        <draw:line draw:style-name="gr1183" draw:text-style-name="P4" draw:layer="layout" svg:x1="33.999cm" svg:y1="5cm" svg:x2="33.999cm" svg:y2="21cm">
          <text:p/>
        </draw:line>
        <draw:frame draw:style-name="gr1184" draw:text-style-name="P34" draw:layer="layout" svg:width="1.949cm" svg:height="0.962cm" svg:x="7.053cm" svg:y="5cm">
          <draw:text-box>
            <text:p><text:span text:style-name="T9">CC 1</text:span></text:p>
          </draw:text-box>
        </draw:frame>
        <draw:frame draw:style-name="gr1184" draw:text-style-name="P34" draw:layer="layout" svg:width="1.949cm" svg:height="0.962cm" svg:x="11.053cm" svg:y="5cm">
          <draw:text-box>
            <text:p><text:span text:style-name="T9">CC 2</text:span></text:p>
          </draw:text-box>
        </draw:frame>
        <draw:frame draw:style-name="gr1184" draw:text-style-name="P34" draw:layer="layout" svg:width="1.949cm" svg:height="0.962cm" svg:x="15.053cm" svg:y="5cm">
          <draw:text-box>
            <text:p><text:span text:style-name="T9">CC 3</text:span></text:p>
          </draw:text-box>
        </draw:frame>
        <draw:frame draw:style-name="gr1184" draw:text-style-name="P34" draw:layer="layout" svg:width="1.949cm" svg:height="0.962cm" svg:x="23.053cm" svg:y="5cm">
          <draw:text-box>
            <text:p><text:span text:style-name="T9">CC 5</text:span></text:p>
          </draw:text-box>
        </draw:frame>
        <draw:frame draw:style-name="gr1184" draw:text-style-name="P34" draw:layer="layout" svg:width="1.949cm" svg:height="0.962cm" svg:x="27.053cm" svg:y="5cm">
          <draw:text-box>
            <text:p><text:span text:style-name="T9">CC 6</text:span></text:p>
          </draw:text-box>
        </draw:frame>
        <draw:frame draw:style-name="gr1184" draw:text-style-name="P34" draw:layer="layout" svg:width="1.949cm" svg:height="0.962cm" svg:x="31.053cm" svg:y="5cm">
          <draw:text-box>
            <text:p><text:span text:style-name="T9">CC 7</text:span></text:p>
          </draw:text-box>
        </draw:frame>
        <draw:frame draw:style-name="gr1184" draw:text-style-name="P34" draw:layer="layout" svg:width="1.949cm" svg:height="0.962cm" svg:x="27.053cm" svg:y="5cm">
          <draw:text-box>
            <text:p><text:span text:style-name="T9">CC 6</text:span></text:p>
          </draw:text-box>
        </draw:frame>
        <draw:frame draw:style-name="gr1184" draw:text-style-name="P34" draw:layer="layout" svg:width="1.949cm" svg:height="0.962cm" svg:x="27.053cm" svg:y="5cm">
          <draw:text-box>
            <text:p><text:span text:style-name="T9">CC 6</text:span></text:p>
          </draw:text-box>
        </draw:frame>
        <draw:frame draw:style-name="gr1185" draw:text-style-name="P81" draw:layer="layout" svg:width="3.575cm" svg:height="0.806cm" svg:x="1.01cm" svg:y="12.6cm">
          <draw:text-box>
            <text:p><text:span text:style-name="T27">or x8, </text:span><text:span text:style-name="T31">x2</text:span><text:span text:style-name="T27">, </text:span><text:span text:style-name="T27">x6</text:span></text:p>
          </draw:text-box>
        </draw:frame>
        <draw:frame draw:style-name="gr1184" draw:text-style-name="P34" draw:layer="layout" svg:width="1.949cm" svg:height="0.962cm" svg:x="18.999cm" svg:y="5cm">
          <draw:text-box>
            <text:p><text:span text:style-name="T9">CC 4</text:span></text:p>
          </draw:text-box>
        </draw:frame>
        <draw:g draw:style-name="gr1">
          <draw:g draw:style-name="gr1">
            <draw:custom-shape draw:style-name="gr1176" draw:text-style-name="P91" draw:layer="layout" svg:width="1cm" svg:height="2cm" svg:x="18.999cm" svg:y="6cm">
              <text:p/>
              <draw:enhanced-geometry svg:viewBox="0 0 21600 21600" draw:mirror-horizontal="false" draw:mirror-vertical="false" draw:type="rectangle" draw:enhanced-path="M 0 0 L 21600 0 21600 21600 0 21600 0 0 Z N"/>
            </draw:custom-shape>
            <draw:custom-shape draw:style-name="gr1186" draw:text-style-name="P92" draw:layer="layout" svg:width="1cm" svg:height="2cm" svg:x="19.999cm" svg:y="6cm">
              <text:p/>
              <draw:enhanced-geometry svg:viewBox="0 0 21600 21600" draw:mirror-horizontal="false" draw:mirror-vertical="false" draw:type="rectangle" draw:enhanced-path="M 0 0 L 21600 0 21600 21600 0 21600 0 0 Z N"/>
            </draw:custom-shape>
          </draw:g>
          <draw:frame draw:style-name="gr1187" draw:text-style-name="P81" draw:layer="layout" svg:width="1.272cm" svg:height="0.806cm" svg:x="19.365cm" svg:y="6.599cm">
            <draw:text-box>
              <text:p><text:span text:style-name="T27">DM</text:span></text:p>
            </draw:text-box>
          </draw:frame>
        </draw:g>
        <draw:line draw:style-name="gr38" draw:text-style-name="P4" draw:layer="layout" svg:x1="18.499cm" svg:y1="7cm" svg:x2="18.499cm" svg:y2="8.2cm">
          <text:p/>
        </draw:line>
        <draw:line draw:style-name="gr38" draw:text-style-name="P4" draw:layer="layout" svg:x1="18.499cm" svg:y1="8.2cm" svg:x2="21.499cm" svg:y2="8.2cm">
          <text:p/>
        </draw:line>
        <draw:line draw:style-name="gr38" draw:text-style-name="P4" draw:layer="layout" svg:x1="21.499cm" svg:y1="8.2cm" svg:x2="21.999cm" svg:y2="7cm">
          <text:p/>
        </draw:line>
        <draw:g draw:style-name="gr1">
          <draw:g draw:style-name="gr1">
            <draw:custom-shape draw:style-name="gr1176" draw:text-style-name="P91" draw:layer="layout" svg:width="1cm" svg:height="2cm" svg:x="22.999cm" svg:y="9cm">
              <text:p/>
              <draw:enhanced-geometry svg:viewBox="0 0 21600 21600" draw:mirror-horizontal="false" draw:mirror-vertical="false" draw:type="rectangle" draw:enhanced-path="M 0 0 L 21600 0 21600 21600 0 21600 0 0 Z N"/>
            </draw:custom-shape>
            <draw:custom-shape draw:style-name="gr1186" draw:text-style-name="P92" draw:layer="layout" svg:width="1cm" svg:height="2cm" svg:x="23.999cm" svg:y="9cm">
              <text:p/>
              <draw:enhanced-geometry svg:viewBox="0 0 21600 21600" draw:mirror-horizontal="false" draw:mirror-vertical="false" draw:type="rectangle" draw:enhanced-path="M 0 0 L 21600 0 21600 21600 0 21600 0 0 Z N"/>
            </draw:custom-shape>
          </draw:g>
          <draw:frame draw:style-name="gr1187" draw:text-style-name="P81" draw:layer="layout" svg:width="1.272cm" svg:height="0.806cm" svg:x="23.365cm" svg:y="9.599cm">
            <draw:text-box>
              <text:p><text:span text:style-name="T27">DM</text:span></text:p>
            </draw:text-box>
          </draw:frame>
        </draw:g>
        <draw:line draw:style-name="gr38" draw:text-style-name="P4" draw:layer="layout" svg:x1="22.499cm" svg:y1="10cm" svg:x2="22.499cm" svg:y2="11.2cm">
          <text:p/>
        </draw:line>
        <draw:line draw:style-name="gr38" draw:text-style-name="P4" draw:layer="layout" svg:x1="22.499cm" svg:y1="11.2cm" svg:x2="25.499cm" svg:y2="11.2cm">
          <text:p/>
        </draw:line>
        <draw:line draw:style-name="gr38" draw:text-style-name="P4" draw:layer="layout" svg:x1="25.499cm" svg:y1="11.2cm" svg:x2="25.999cm" svg:y2="10cm">
          <text:p/>
        </draw:line>
        <draw:g draw:style-name="gr66">
          <draw:polygon draw:style-name="gr1174" draw:text-style-name="P90" draw:layer="layout" svg:width="1.999cm" svg:height="2.999cm" svg:x="22.999cm" svg:y="11.5cm" svg:viewBox="0 0 2000 3000" draw:points="0,0 0,1100 400,1500 0,1900 0,3000 2000,2000 2000,1000">
            <text:p/>
          </draw:polygon>
          <draw:frame draw:style-name="gr1175" draw:text-style-name="P81" draw:layer="layout" svg:width="1.466cm" svg:height="0.806cm" svg:x="23.399cm" svg:y="12.594cm">
            <draw:text-box>
              <text:p><text:span text:style-name="T27">ALU</text:span></text:p>
            </draw:text-box>
          </draw:frame>
        </draw:g>
        <draw:g draw:style-name="gr1">
          <draw:g draw:style-name="gr1">
            <draw:custom-shape draw:style-name="gr1176" draw:text-style-name="P14" draw:layer="layout" svg:width="1cm" svg:height="2cm" svg:x="14.999cm" svg:y="12cm">
              <text:p/>
              <draw:enhanced-geometry svg:viewBox="0 0 21600 21600" draw:type="rectangle" draw:enhanced-path="M 0 0 L 21600 0 21600 21600 0 21600 0 0 Z N"/>
            </draw:custom-shape>
            <draw:custom-shape draw:style-name="gr1177" draw:text-style-name="P1" draw:layer="layout" svg:width="1cm" svg:height="2cm" svg:x="15.999cm" svg:y="12cm">
              <text:p/>
              <draw:enhanced-geometry svg:viewBox="0 0 21600 21600" draw:type="rectangle" draw:enhanced-path="M 0 0 L 21600 0 21600 21600 0 21600 0 0 Z N"/>
            </draw:custom-shape>
          </draw:g>
          <draw:g draw:style-name="gr66">
            <draw:frame draw:style-name="gr1178" draw:text-style-name="P81" draw:layer="layout" svg:width="1.052cm" svg:height="0.806cm" svg:x="15.528cm" svg:y="12.597cm">
              <draw:text-box>
                <text:p><text:span text:style-name="T27">IM</text:span></text:p>
              </draw:text-box>
            </draw:frame>
          </draw:g>
        </draw:g>
        <draw:g draw:style-name="gr1">
          <draw:g draw:style-name="gr1">
            <draw:custom-shape draw:style-name="gr1179" draw:text-style-name="P14" draw:layer="layout" svg:width="1cm" svg:height="2cm" svg:x="18.999cm" svg:y="12cm">
              <text:p/>
              <draw:enhanced-geometry svg:viewBox="0 0 21600 21600" draw:type="rectangle" draw:enhanced-path="M 0 0 L 21600 0 21600 21600 0 21600 0 0 Z N"/>
            </draw:custom-shape>
            <draw:custom-shape draw:style-name="gr1177" draw:text-style-name="P1" draw:layer="layout" svg:width="1cm" svg:height="2cm" svg:x="19.999cm" svg:y="12cm">
              <text:p/>
              <draw:enhanced-geometry svg:viewBox="0 0 21600 21600" draw:type="rectangle" draw:enhanced-path="M 0 0 L 21600 0 21600 21600 0 21600 0 0 Z N"/>
            </draw:custom-shape>
          </draw:g>
          <draw:g draw:style-name="gr66">
            <draw:frame draw:style-name="gr1181" draw:text-style-name="P81" draw:layer="layout" svg:width="1.575cm" svg:height="0.806cm" svg:x="19.528cm" svg:y="12.597cm">
              <draw:text-box>
                <text:p><text:span text:style-name="T27">REG</text:span></text:p>
              </draw:text-box>
            </draw:frame>
          </draw:g>
        </draw:g>
        <draw:g draw:style-name="gr1">
          <draw:g draw:style-name="gr1">
            <draw:custom-shape draw:style-name="gr1179" draw:text-style-name="P14" draw:layer="layout" svg:width="1cm" svg:height="2cm" svg:x="31.999cm" svg:y="12cm">
              <text:p/>
              <draw:enhanced-geometry svg:viewBox="0 0 21600 21600" draw:mirror-horizontal="true" draw:type="rectangle" draw:enhanced-path="M 0 0 L 21600 0 21600 21600 0 21600 0 0 Z N"/>
            </draw:custom-shape>
            <draw:custom-shape draw:style-name="gr1177" draw:text-style-name="P1" draw:layer="layout" svg:width="1cm" svg:height="2cm" svg:x="30.999cm" svg:y="12cm">
              <text:p/>
              <draw:enhanced-geometry svg:viewBox="0 0 21600 21600" draw:mirror-horizontal="true" draw:type="rectangle" draw:enhanced-path="M 0 0 L 21600 0 21600 21600 0 21600 0 0 Z N"/>
            </draw:custom-shape>
          </draw:g>
          <draw:g draw:style-name="gr66">
            <draw:frame draw:style-name="gr1180" draw:text-style-name="P81" draw:layer="layout" svg:width="1.411cm" svg:height="0.806cm" svg:x="31.35cm" svg:y="12.597cm">
              <draw:text-box>
                <text:p><text:span text:style-name="T27">Reg</text:span></text:p>
              </draw:text-box>
            </draw:frame>
          </draw:g>
        </draw:g>
        <draw:line draw:style-name="gr38" draw:text-style-name="P4" draw:layer="layout" svg:x1="16.999cm" svg:y1="13cm" svg:x2="18.999cm" svg:y2="13cm">
          <text:p/>
        </draw:line>
        <draw:line draw:style-name="gr38" draw:text-style-name="P4" draw:layer="layout" svg:x1="18.499cm" svg:y1="13cm" svg:x2="18.499cm" svg:y2="12.5cm">
          <text:p/>
        </draw:line>
        <draw:line draw:style-name="gr38" draw:text-style-name="P4" draw:layer="layout" svg:x1="18.499cm" svg:y1="12.5cm" svg:x2="18.999cm" svg:y2="12.5cm">
          <text:p/>
        </draw:line>
        <draw:line draw:style-name="gr38" draw:text-style-name="P4" draw:layer="layout" svg:x1="20.999cm" svg:y1="12.5cm" svg:x2="22.999cm" svg:y2="12.5cm">
          <text:p/>
        </draw:line>
        <draw:line draw:style-name="gr38" draw:text-style-name="P4" draw:layer="layout" svg:x1="20.999cm" svg:y1="13.5cm" svg:x2="22.999cm" svg:y2="13.5cm">
          <text:p/>
        </draw:line>
        <draw:line draw:style-name="gr38" draw:text-style-name="P4" draw:layer="layout" svg:x1="24.999cm" svg:y1="13cm" svg:x2="26.999cm" svg:y2="13cm">
          <text:p/>
        </draw:line>
        <draw:line draw:style-name="gr38" draw:text-style-name="P4" draw:layer="layout" svg:x1="28.999cm" svg:y1="13cm" svg:x2="30.999cm" svg:y2="13cm">
          <text:p/>
        </draw:line>
        <draw:g draw:style-name="gr1">
          <draw:g draw:style-name="gr1">
            <draw:custom-shape draw:style-name="gr1176" draw:text-style-name="P91" draw:layer="layout" svg:width="1cm" svg:height="2cm" svg:x="26.999cm" svg:y="12cm">
              <text:p/>
              <draw:enhanced-geometry svg:viewBox="0 0 21600 21600" draw:mirror-horizontal="false" draw:mirror-vertical="false" draw:type="rectangle" draw:enhanced-path="M 0 0 L 21600 0 21600 21600 0 21600 0 0 Z N"/>
            </draw:custom-shape>
            <draw:custom-shape draw:style-name="gr1186" draw:text-style-name="P92" draw:layer="layout" svg:width="1cm" svg:height="2cm" svg:x="27.999cm" svg:y="12cm">
              <text:p/>
              <draw:enhanced-geometry svg:viewBox="0 0 21600 21600" draw:mirror-horizontal="false" draw:mirror-vertical="false" draw:type="rectangle" draw:enhanced-path="M 0 0 L 21600 0 21600 21600 0 21600 0 0 Z N"/>
            </draw:custom-shape>
          </draw:g>
          <draw:frame draw:style-name="gr1187" draw:text-style-name="P81" draw:layer="layout" svg:width="1.272cm" svg:height="0.806cm" svg:x="27.365cm" svg:y="12.599cm">
            <draw:text-box>
              <text:p><text:span text:style-name="T27">DM</text:span></text:p>
            </draw:text-box>
          </draw:frame>
        </draw:g>
        <draw:line draw:style-name="gr38" draw:text-style-name="P4" draw:layer="layout" svg:x1="26.499cm" svg:y1="13cm" svg:x2="26.499cm" svg:y2="14.2cm">
          <text:p/>
        </draw:line>
        <draw:line draw:style-name="gr38" draw:text-style-name="P4" draw:layer="layout" svg:x1="26.499cm" svg:y1="14.2cm" svg:x2="29.499cm" svg:y2="14.2cm">
          <text:p/>
        </draw:line>
        <draw:line draw:style-name="gr38" draw:text-style-name="P4" draw:layer="layout" svg:x1="29.499cm" svg:y1="14.2cm" svg:x2="29.999cm" svg:y2="13cm">
          <text:p/>
        </draw:line>
        <draw:frame draw:style-name="gr1250" draw:text-style-name="P34" draw:layer="layout" svg:width="7.456cm" svg:height="0.962cm" svg:x="8.899cm" svg:y="1cm">
          <draw:text-box>
            <text:p><text:span text:style-name="T9">R-Type </text:span><text:span text:style-name="T9">followin</text:span><text:span text:style-name="T9">g an </text:span><text:span text:style-name="T9">load</text:span></text:p>
          </draw:text-box>
        </draw:frame>
        <draw:line draw:style-name="gr1183" draw:text-style-name="P4" draw:layer="layout" svg:x1="37.999cm" svg:y1="5cm" svg:x2="37.999cm" svg:y2="21cm">
          <text:p/>
        </draw:line>
        <draw:g draw:style-name="gr66">
          <draw:polygon draw:style-name="gr1174" draw:text-style-name="P90" draw:layer="layout" svg:width="1.999cm" svg:height="2.999cm" svg:x="26.999cm" svg:y="14.5cm" svg:viewBox="0 0 2000 3000" draw:points="0,0 0,1100 400,1500 0,1900 0,3000 2000,2000 2000,1000">
            <text:p/>
          </draw:polygon>
          <draw:frame draw:style-name="gr1175" draw:text-style-name="P81" draw:layer="layout" svg:width="1.466cm" svg:height="0.806cm" svg:x="27.399cm" svg:y="15.594cm">
            <draw:text-box>
              <text:p><text:span text:style-name="T27">ALU</text:span></text:p>
            </draw:text-box>
          </draw:frame>
        </draw:g>
        <draw:g draw:style-name="gr1">
          <draw:g draw:style-name="gr1">
            <draw:custom-shape draw:style-name="gr1176" draw:text-style-name="P14" draw:layer="layout" svg:width="1cm" svg:height="2cm" svg:x="18.999cm" svg:y="15cm">
              <text:p/>
              <draw:enhanced-geometry svg:viewBox="0 0 21600 21600" draw:type="rectangle" draw:enhanced-path="M 0 0 L 21600 0 21600 21600 0 21600 0 0 Z N"/>
            </draw:custom-shape>
            <draw:custom-shape draw:style-name="gr1177" draw:text-style-name="P1" draw:layer="layout" svg:width="1cm" svg:height="2cm" svg:x="19.999cm" svg:y="15cm">
              <text:p/>
              <draw:enhanced-geometry svg:viewBox="0 0 21600 21600" draw:type="rectangle" draw:enhanced-path="M 0 0 L 21600 0 21600 21600 0 21600 0 0 Z N"/>
            </draw:custom-shape>
          </draw:g>
          <draw:g draw:style-name="gr66">
            <draw:frame draw:style-name="gr1178" draw:text-style-name="P81" draw:layer="layout" svg:width="1.052cm" svg:height="0.806cm" svg:x="19.528cm" svg:y="15.597cm">
              <draw:text-box>
                <text:p><text:span text:style-name="T27">IM</text:span></text:p>
              </draw:text-box>
            </draw:frame>
          </draw:g>
        </draw:g>
        <draw:g draw:style-name="gr1">
          <draw:g draw:style-name="gr1">
            <draw:custom-shape draw:style-name="gr1179" draw:text-style-name="P14" draw:layer="layout" svg:width="1cm" svg:height="2cm" svg:x="22.999cm" svg:y="15cm">
              <text:p/>
              <draw:enhanced-geometry svg:viewBox="0 0 21600 21600" draw:type="rectangle" draw:enhanced-path="M 0 0 L 21600 0 21600 21600 0 21600 0 0 Z N"/>
            </draw:custom-shape>
            <draw:custom-shape draw:style-name="gr1177" draw:text-style-name="P1" draw:layer="layout" svg:width="1cm" svg:height="2cm" svg:x="23.999cm" svg:y="15cm">
              <text:p/>
              <draw:enhanced-geometry svg:viewBox="0 0 21600 21600" draw:type="rectangle" draw:enhanced-path="M 0 0 L 21600 0 21600 21600 0 21600 0 0 Z N"/>
            </draw:custom-shape>
          </draw:g>
          <draw:g draw:style-name="gr66">
            <draw:frame draw:style-name="gr1181" draw:text-style-name="P81" draw:layer="layout" svg:width="1.575cm" svg:height="0.806cm" svg:x="23.528cm" svg:y="15.597cm">
              <draw:text-box>
                <text:p><text:span text:style-name="T27">REG</text:span></text:p>
              </draw:text-box>
            </draw:frame>
          </draw:g>
        </draw:g>
        <draw:g draw:style-name="gr1">
          <draw:g draw:style-name="gr1">
            <draw:custom-shape draw:style-name="gr1179" draw:text-style-name="P14" draw:layer="layout" svg:width="1cm" svg:height="2cm" svg:x="35.999cm" svg:y="15cm">
              <text:p/>
              <draw:enhanced-geometry svg:viewBox="0 0 21600 21600" draw:mirror-horizontal="true" draw:type="rectangle" draw:enhanced-path="M 0 0 L 21600 0 21600 21600 0 21600 0 0 Z N"/>
            </draw:custom-shape>
            <draw:custom-shape draw:style-name="gr1177" draw:text-style-name="P1" draw:layer="layout" svg:width="1cm" svg:height="2cm" svg:x="34.999cm" svg:y="15cm">
              <text:p/>
              <draw:enhanced-geometry svg:viewBox="0 0 21600 21600" draw:mirror-horizontal="true" draw:type="rectangle" draw:enhanced-path="M 0 0 L 21600 0 21600 21600 0 21600 0 0 Z N"/>
            </draw:custom-shape>
          </draw:g>
          <draw:g draw:style-name="gr66">
            <draw:frame draw:style-name="gr1180" draw:text-style-name="P81" draw:layer="layout" svg:width="1.411cm" svg:height="0.806cm" svg:x="35.35cm" svg:y="15.597cm">
              <draw:text-box>
                <text:p><text:span text:style-name="T27">Reg</text:span></text:p>
              </draw:text-box>
            </draw:frame>
          </draw:g>
        </draw:g>
        <draw:line draw:style-name="gr38" draw:text-style-name="P4" draw:layer="layout" svg:x1="20.999cm" svg:y1="16cm" svg:x2="22.999cm" svg:y2="16cm">
          <text:p/>
        </draw:line>
        <draw:line draw:style-name="gr38" draw:text-style-name="P4" draw:layer="layout" svg:x1="22.499cm" svg:y1="16cm" svg:x2="22.499cm" svg:y2="15.5cm">
          <text:p/>
        </draw:line>
        <draw:line draw:style-name="gr38" draw:text-style-name="P4" draw:layer="layout" svg:x1="22.499cm" svg:y1="15.5cm" svg:x2="22.999cm" svg:y2="15.5cm">
          <text:p/>
        </draw:line>
        <draw:line draw:style-name="gr38" draw:text-style-name="P4" draw:layer="layout" svg:x1="24.999cm" svg:y1="15.5cm" svg:x2="26.999cm" svg:y2="15.5cm">
          <text:p/>
        </draw:line>
        <draw:line draw:style-name="gr38" draw:text-style-name="P4" draw:layer="layout" svg:x1="24.999cm" svg:y1="16.5cm" svg:x2="26.999cm" svg:y2="16.5cm">
          <text:p/>
        </draw:line>
        <draw:line draw:style-name="gr38" draw:text-style-name="P4" draw:layer="layout" svg:x1="28.999cm" svg:y1="16cm" svg:x2="30.999cm" svg:y2="16cm">
          <text:p/>
        </draw:line>
        <draw:line draw:style-name="gr38" draw:text-style-name="P4" draw:layer="layout" svg:x1="32.999cm" svg:y1="16cm" svg:x2="34.999cm" svg:y2="16cm">
          <text:p/>
        </draw:line>
        <draw:g draw:style-name="gr1">
          <draw:g draw:style-name="gr1">
            <draw:custom-shape draw:style-name="gr1176" draw:text-style-name="P91" draw:layer="layout" svg:width="1cm" svg:height="2cm" svg:x="30.999cm" svg:y="15cm">
              <text:p/>
              <draw:enhanced-geometry svg:viewBox="0 0 21600 21600" draw:mirror-horizontal="false" draw:mirror-vertical="false" draw:type="rectangle" draw:enhanced-path="M 0 0 L 21600 0 21600 21600 0 21600 0 0 Z N"/>
            </draw:custom-shape>
            <draw:custom-shape draw:style-name="gr1186" draw:text-style-name="P92" draw:layer="layout" svg:width="1cm" svg:height="2cm" svg:x="31.999cm" svg:y="15cm">
              <text:p/>
              <draw:enhanced-geometry svg:viewBox="0 0 21600 21600" draw:mirror-horizontal="false" draw:mirror-vertical="false" draw:type="rectangle" draw:enhanced-path="M 0 0 L 21600 0 21600 21600 0 21600 0 0 Z N"/>
            </draw:custom-shape>
          </draw:g>
          <draw:frame draw:style-name="gr1187" draw:text-style-name="P81" draw:layer="layout" svg:width="1.272cm" svg:height="0.806cm" svg:x="31.365cm" svg:y="15.599cm">
            <draw:text-box>
              <text:p><text:span text:style-name="T27">DM</text:span></text:p>
            </draw:text-box>
          </draw:frame>
        </draw:g>
        <draw:line draw:style-name="gr38" draw:text-style-name="P4" draw:layer="layout" svg:x1="30.499cm" svg:y1="16cm" svg:x2="30.499cm" svg:y2="17.2cm">
          <text:p/>
        </draw:line>
        <draw:line draw:style-name="gr38" draw:text-style-name="P4" draw:layer="layout" svg:x1="30.499cm" svg:y1="17.2cm" svg:x2="33.499cm" svg:y2="17.2cm">
          <text:p/>
        </draw:line>
        <draw:line draw:style-name="gr38" draw:text-style-name="P4" draw:layer="layout" svg:x1="33.499cm" svg:y1="17.2cm" svg:x2="33.999cm" svg:y2="16cm">
          <text:p/>
        </draw:line>
        <draw:g draw:style-name="gr66">
          <draw:polygon draw:style-name="gr1174" draw:text-style-name="P90" draw:layer="layout" svg:width="1.999cm" svg:height="2.999cm" svg:x="30.999cm" svg:y="17.5cm" svg:viewBox="0 0 2000 3000" draw:points="0,0 0,1100 400,1500 0,1900 0,3000 2000,2000 2000,1000">
            <text:p/>
          </draw:polygon>
          <draw:frame draw:style-name="gr1175" draw:text-style-name="P81" draw:layer="layout" svg:width="1.466cm" svg:height="0.806cm" svg:x="31.399cm" svg:y="18.594cm">
            <draw:text-box>
              <text:p><text:span text:style-name="T27">ALU</text:span></text:p>
            </draw:text-box>
          </draw:frame>
        </draw:g>
        <draw:g draw:style-name="gr1">
          <draw:g draw:style-name="gr1">
            <draw:custom-shape draw:style-name="gr1176" draw:text-style-name="P14" draw:layer="layout" svg:width="1cm" svg:height="2cm" svg:x="22.999cm" svg:y="18cm">
              <text:p/>
              <draw:enhanced-geometry svg:viewBox="0 0 21600 21600" draw:type="rectangle" draw:enhanced-path="M 0 0 L 21600 0 21600 21600 0 21600 0 0 Z N"/>
            </draw:custom-shape>
            <draw:custom-shape draw:style-name="gr1177" draw:text-style-name="P1" draw:layer="layout" svg:width="1cm" svg:height="2cm" svg:x="23.999cm" svg:y="18cm">
              <text:p/>
              <draw:enhanced-geometry svg:viewBox="0 0 21600 21600" draw:type="rectangle" draw:enhanced-path="M 0 0 L 21600 0 21600 21600 0 21600 0 0 Z N"/>
            </draw:custom-shape>
          </draw:g>
          <draw:g draw:style-name="gr66">
            <draw:frame draw:style-name="gr1178" draw:text-style-name="P81" draw:layer="layout" svg:width="1.052cm" svg:height="0.806cm" svg:x="23.528cm" svg:y="18.597cm">
              <draw:text-box>
                <text:p><text:span text:style-name="T27">IM</text:span></text:p>
              </draw:text-box>
            </draw:frame>
          </draw:g>
        </draw:g>
        <draw:g draw:style-name="gr1">
          <draw:g draw:style-name="gr1">
            <draw:custom-shape draw:style-name="gr1179" draw:text-style-name="P14" draw:layer="layout" svg:width="1cm" svg:height="2cm" svg:x="26.999cm" svg:y="18cm">
              <text:p/>
              <draw:enhanced-geometry svg:viewBox="0 0 21600 21600" draw:type="rectangle" draw:enhanced-path="M 0 0 L 21600 0 21600 21600 0 21600 0 0 Z N"/>
            </draw:custom-shape>
            <draw:custom-shape draw:style-name="gr1177" draw:text-style-name="P1" draw:layer="layout" svg:width="1cm" svg:height="2cm" svg:x="27.999cm" svg:y="18cm">
              <text:p/>
              <draw:enhanced-geometry svg:viewBox="0 0 21600 21600" draw:type="rectangle" draw:enhanced-path="M 0 0 L 21600 0 21600 21600 0 21600 0 0 Z N"/>
            </draw:custom-shape>
          </draw:g>
          <draw:g draw:style-name="gr66">
            <draw:frame draw:style-name="gr1181" draw:text-style-name="P81" draw:layer="layout" svg:width="1.575cm" svg:height="0.806cm" svg:x="27.528cm" svg:y="18.597cm">
              <draw:text-box>
                <text:p><text:span text:style-name="T27">REG</text:span></text:p>
              </draw:text-box>
            </draw:frame>
          </draw:g>
        </draw:g>
        <draw:g draw:style-name="gr1">
          <draw:g draw:style-name="gr1">
            <draw:custom-shape draw:style-name="gr1179" draw:text-style-name="P14" draw:layer="layout" svg:width="1cm" svg:height="2cm" svg:x="39.999cm" svg:y="18cm">
              <text:p/>
              <draw:enhanced-geometry svg:viewBox="0 0 21600 21600" draw:mirror-horizontal="true" draw:type="rectangle" draw:enhanced-path="M 0 0 L 21600 0 21600 21600 0 21600 0 0 Z N"/>
            </draw:custom-shape>
            <draw:custom-shape draw:style-name="gr1177" draw:text-style-name="P1" draw:layer="layout" svg:width="1cm" svg:height="2cm" svg:x="38.999cm" svg:y="18cm">
              <text:p/>
              <draw:enhanced-geometry svg:viewBox="0 0 21600 21600" draw:mirror-horizontal="true" draw:type="rectangle" draw:enhanced-path="M 0 0 L 21600 0 21600 21600 0 21600 0 0 Z N"/>
            </draw:custom-shape>
          </draw:g>
          <draw:g draw:style-name="gr66">
            <draw:frame draw:style-name="gr1180" draw:text-style-name="P81" draw:layer="layout" svg:width="1.411cm" svg:height="0.806cm" svg:x="39.35cm" svg:y="18.597cm">
              <draw:text-box>
                <text:p><text:span text:style-name="T27">Reg</text:span></text:p>
              </draw:text-box>
            </draw:frame>
          </draw:g>
        </draw:g>
        <draw:line draw:style-name="gr38" draw:text-style-name="P4" draw:layer="layout" svg:x1="24.999cm" svg:y1="19cm" svg:x2="26.999cm" svg:y2="19cm">
          <text:p/>
        </draw:line>
        <draw:line draw:style-name="gr38" draw:text-style-name="P4" draw:layer="layout" svg:x1="26.499cm" svg:y1="19cm" svg:x2="26.499cm" svg:y2="18.5cm">
          <text:p/>
        </draw:line>
        <draw:line draw:style-name="gr38" draw:text-style-name="P4" draw:layer="layout" svg:x1="26.499cm" svg:y1="18.5cm" svg:x2="26.999cm" svg:y2="18.5cm">
          <text:p/>
        </draw:line>
        <draw:line draw:style-name="gr38" draw:text-style-name="P4" draw:layer="layout" svg:x1="28.999cm" svg:y1="18.5cm" svg:x2="30.999cm" svg:y2="18.5cm">
          <text:p/>
        </draw:line>
        <draw:line draw:style-name="gr38" draw:text-style-name="P4" draw:layer="layout" svg:x1="28.999cm" svg:y1="19.5cm" svg:x2="30.999cm" svg:y2="19.5cm">
          <text:p/>
        </draw:line>
        <draw:line draw:style-name="gr38" draw:text-style-name="P4" draw:layer="layout" svg:x1="32.999cm" svg:y1="19cm" svg:x2="34.999cm" svg:y2="19cm">
          <text:p/>
        </draw:line>
        <draw:line draw:style-name="gr38" draw:text-style-name="P4" draw:layer="layout" svg:x1="36.999cm" svg:y1="19cm" svg:x2="38.999cm" svg:y2="19cm">
          <text:p/>
        </draw:line>
        <draw:g draw:style-name="gr1">
          <draw:g draw:style-name="gr1">
            <draw:custom-shape draw:style-name="gr1176" draw:text-style-name="P91" draw:layer="layout" svg:width="1cm" svg:height="2cm" svg:x="34.999cm" svg:y="18cm">
              <text:p/>
              <draw:enhanced-geometry svg:viewBox="0 0 21600 21600" draw:mirror-horizontal="false" draw:mirror-vertical="false" draw:type="rectangle" draw:enhanced-path="M 0 0 L 21600 0 21600 21600 0 21600 0 0 Z N"/>
            </draw:custom-shape>
            <draw:custom-shape draw:style-name="gr1186" draw:text-style-name="P92" draw:layer="layout" svg:width="1cm" svg:height="2cm" svg:x="35.999cm" svg:y="18cm">
              <text:p/>
              <draw:enhanced-geometry svg:viewBox="0 0 21600 21600" draw:mirror-horizontal="false" draw:mirror-vertical="false" draw:type="rectangle" draw:enhanced-path="M 0 0 L 21600 0 21600 21600 0 21600 0 0 Z N"/>
            </draw:custom-shape>
          </draw:g>
          <draw:frame draw:style-name="gr1187" draw:text-style-name="P81" draw:layer="layout" svg:width="1.272cm" svg:height="0.806cm" svg:x="35.365cm" svg:y="18.599cm">
            <draw:text-box>
              <text:p><text:span text:style-name="T27">DM</text:span></text:p>
            </draw:text-box>
          </draw:frame>
        </draw:g>
        <draw:line draw:style-name="gr38" draw:text-style-name="P4" draw:layer="layout" svg:x1="34.499cm" svg:y1="19cm" svg:x2="34.499cm" svg:y2="20.2cm">
          <text:p/>
        </draw:line>
        <draw:line draw:style-name="gr38" draw:text-style-name="P4" draw:layer="layout" svg:x1="34.499cm" svg:y1="20.2cm" svg:x2="37.499cm" svg:y2="20.2cm">
          <text:p/>
        </draw:line>
        <draw:line draw:style-name="gr38" draw:text-style-name="P4" draw:layer="layout" svg:x1="37.499cm" svg:y1="20.2cm" svg:x2="37.999cm" svg:y2="19cm">
          <text:p/>
        </draw:line>
        <draw:frame draw:style-name="gr1251" draw:text-style-name="P81" draw:layer="layout" svg:width="3.586cm" svg:height="0.806cm" svg:x="1.011cm" svg:y="15.6cm">
          <draw:text-box>
            <text:p><text:span text:style-name="T27">add x9, </text:span><text:span text:style-name="T27">x4, </text:span><text:span text:style-name="T31">x2</text:span></text:p>
          </draw:text-box>
        </draw:frame>
        <draw:frame draw:style-name="gr1185" draw:text-style-name="P81" draw:layer="layout" svg:width="3.575cm" svg:height="0.806cm" svg:x="1.012cm" svg:y="18.6cm">
          <draw:text-box>
            <text:p><text:span text:style-name="T27">sub x1, </text:span><text:span text:style-name="T27">x6, x7</text:span></text:p>
          </draw:text-box>
        </draw:frame>
        <draw:custom-shape draw:style-name="gr1189" draw:text-style-name="P4" draw:layer="layout" svg:width="2.6cm" svg:height="2.6cm" svg:x="22.601cm" svg:y="5.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90" draw:text-style-name="P93" draw:layer="layout" svg:width="1.173cm" svg:height="0.962cm" svg:x="23.13cm" svg:y="7.1cm">
          <draw:text-box>
            <text:p><text:span text:style-name="T34">x2</text:span></text:p>
          </draw:text-box>
        </draw:frame>
        <draw:line draw:style-name="gr1191" draw:text-style-name="P4" draw:layer="layout" svg:x1="22.2cm" svg:y1="7cm" svg:x2="18.4cm" svg:y2="9.5cm">
          <text:p/>
        </draw:line>
        <draw:line draw:style-name="gr1194" draw:text-style-name="P4" draw:layer="layout" svg:x1="22.2cm" svg:y1="7cm" svg:x2="22.5cm" svg:y2="12.5cm">
          <text:p/>
        </draw:line>
        <draw:line draw:style-name="gr1194" draw:text-style-name="P4" draw:layer="layout" svg:x1="23.567cm" svg:y1="8cm" svg:x2="24.2cm" svg:y2="15.597cm">
          <text:p/>
        </draw:line>
        <draw:frame draw:style-name="gr1252" draw:text-style-name="P81" draw:layer="layout" svg:width="8.513cm" svg:height="0.806cm" svg:x="13.089cm" svg:y="1.9cm">
          <draw:text-box>
            <text:p><text:span text:style-name="T27">Geht nicht </text:span><text:span text:style-name="T27">– Zukunft </text:span><text:span text:style-name="T27">trotz </text:span><text:span text:style-name="T27">forwardin</text:span><text:span text:style-name="T27">g</text:span></text:p>
          </draw:text-box>
        </draw:frame>
        <draw:line draw:style-name="gr1253" draw:text-style-name="P4" draw:layer="layout" svg:x1="18.9cm" svg:y1="2.5cm" svg:x2="20.1cm" svg:y2="8.4cm">
          <text:p/>
        </draw:line>
        <draw:frame draw:style-name="gr1249" draw:text-style-name="P81" draw:layer="layout" svg:width="3.585cm" svg:height="0.806cm" svg:x="4.809cm" svg:y="12.6cm">
          <draw:text-box>
            <text:p><text:span text:style-name="T27">and x4, </text:span><text:span text:style-name="T31">x2</text:span><text:span text:style-name="T27">, x5</text:span></text:p>
          </draw:text-box>
        </draw:frame>
        <draw:frame draw:style-name="gr1185" draw:text-style-name="P81" draw:layer="layout" svg:width="3.575cm" svg:height="0.806cm" svg:x="4.81cm" svg:y="15.6cm">
          <draw:text-box>
            <text:p><text:span text:style-name="T27">or x8, </text:span><text:span text:style-name="T31">x2</text:span><text:span text:style-name="T27">, </text:span><text:span text:style-name="T27">x6</text:span></text:p>
          </draw:text-box>
        </draw:frame>
        <draw:frame draw:style-name="gr1251" draw:text-style-name="P81" draw:layer="layout" svg:width="3.586cm" svg:height="0.806cm" svg:x="4.811cm" svg:y="18.6cm">
          <draw:text-box>
            <text:p><text:span text:style-name="T27">add x9, </text:span><text:span text:style-name="T27">x4, </text:span><text:span text:style-name="T31">x2</text:span></text:p>
          </draw:text-box>
        </draw:frame>
        <draw:frame draw:style-name="gr1185" draw:text-style-name="P81" draw:layer="layout" svg:width="3.575cm" svg:height="0.806cm" svg:x="4.812cm" svg:y="21.6cm">
          <draw:text-box>
            <text:p><text:span text:style-name="T27">sub x1, </text:span><text:span text:style-name="T27">x6, x7</text:span></text:p>
          </draw:text-box>
        </draw:frame>
        <draw:frame draw:style-name="gr1254" draw:text-style-name="P81" draw:layer="layout" svg:width="3.58cm" svg:height="0.806cm" svg:x="4.809cm" svg:y="9.6cm">
          <draw:text-box>
            <text:p><text:span text:style-name="T27">nop</text:span></text:p>
          </draw:text-box>
        </draw:frame>
        <draw:line draw:style-name="gr1255" draw:text-style-name="P4" draw:layer="layout" svg:x1="22.2cm" svg:y1="7cm" svg:x2="22.8cm" svg:y2="12.5cm">
          <text:p/>
        </draw:line>
        <draw:line draw:style-name="gr1255" draw:text-style-name="P4" draw:layer="layout" svg:x1="23.558cm" svg:y1="8cm" svg:x2="24.5cm" svg:y2="15.597cm">
          <text:p/>
        </draw:line>
        <draw:custom-shape draw:style-name="gr1246" draw:text-style-name="P100" draw:layer="layout" svg:width="3.1cm" svg:height="2.4cm" svg:x="26.402cm" svg:y="8.9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46" draw:text-style-name="P100" draw:layer="layout" svg:width="3.1cm" svg:height="2.4cm" svg:x="22.303cm" svg:y="8.9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46" draw:text-style-name="P100" draw:layer="layout" svg:width="3.1cm" svg:height="2.4cm" svg:x="18.304cm" svg:y="8.9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256" draw:text-style-name="P81" draw:layer="layout" svg:width="5.828cm" svg:height="0.806cm" svg:x="24cm" svg:y="1.994cm">
          <draw:text-box>
            <text:p><text:span text:style-name="T27">and: </text:span><text:span text:style-name="T27">if_id_reg_</text:span><text:span text:style-name="T27">rs1 = x2</text:span></text:p>
          </draw:text-box>
        </draw:frame>
        <draw:frame draw:style-name="gr1257" draw:text-style-name="P81" draw:layer="layout" svg:width="6.268cm" svg:height="0.806cm" svg:x="24.988cm" svg:y="3cm">
          <draw:text-box>
            <text:p><text:span text:style-name="T27">ld: </text:span><text:span text:style-name="T27">id_ex_reg</text:span><text:span text:style-name="T27">_rd = x2</text:span></text:p>
          </draw:text-box>
        </draw:frame>
        <draw:frame draw:style-name="gr1258" draw:text-style-name="P81" draw:layer="layout" svg:width="5.929cm" svg:height="0.806cm" svg:x="23.988cm" svg:y="1cm">
          <draw:text-box>
            <text:p><text:span text:style-name="T27">ld: </text:span><text:span text:style-name="T27">id_ex_me</text:span><text:span text:style-name="T27">mRd = 1</text:span></text:p>
          </draw:text-box>
        </draw:frame>
        <draw:line draw:style-name="gr1259" draw:text-style-name="P4" draw:layer="layout" svg:x1="25.1cm" svg:y1="2.6cm" svg:x2="13.999cm" svg:y2="9.3cm">
          <text:p/>
        </draw:line>
        <draw:line draw:style-name="gr1260" draw:text-style-name="P4" draw:layer="layout" svg:x1="25.7cm" svg:y1="3.6cm" svg:x2="13.999cm" svg:y2="6.2cm">
          <text:p/>
        </draw:line>
        <draw:custom-shape draw:style-name="gr1245" draw:text-style-name="P18" draw:layer="layout" svg:width="0.4cm" svg:height="2cm" svg:x="13.8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45" draw:text-style-name="P18" draw:layer="layout" svg:width="0.4cm" svg:height="2cm" svg:x="9.801cm" svg:y="9.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57" draw:text-style-name="P81" draw:layer="layout" svg:width="6.268cm" svg:height="0.806cm" svg:x="24.988cm" svg:y="4cm">
          <draw:text-box>
            <text:p><text:span text:style-name="T27">stall</text:span></text:p>
          </draw:text-box>
        </draw:frame>
        <draw:line draw:style-name="gr1261" draw:text-style-name="P4" draw:layer="layout" svg:x1="25.2cm" svg:y1="4.7cm" svg:x2="13.999cm" svg:y2="9.9cm">
          <text:p/>
        </draw:line>
        <draw:line draw:style-name="gr1261" draw:text-style-name="P4" draw:layer="layout" svg:x1="25.201cm" svg:y1="4.705cm" svg:x2="10.1cm" svg:y2="10cm">
          <text:p/>
        </draw:line>
      </draw:page>
      <draw:page draw:name="page22" draw:style-name="dp1" draw:master-page-name="Standard">
        <draw:frame draw:style-name="gr1171" draw:text-style-name="P34" draw:layer="layout" svg:width="4.807cm" svg:height="3.095cm" svg:x="1cm" svg:y="3.005cm">
          <draw:text-box>
            <text:p><text:span text:style-name="T9">Progra</text:span><text:span text:style-name="T9">m</text:span></text:p>
            <text:p><text:span text:style-name="T9">executi</text:span><text:span text:style-name="T9">on</text:span></text:p>
            <text:p><text:span text:style-name="T9">order</text:span></text:p>
            <text:p><text:span text:style-name="T9">(in </text:span><text:span text:style-name="T9">instructi</text:span><text:span text:style-name="T9">ons)</text:span></text:p>
          </draw:text-box>
        </draw:frame>
        <draw:frame draw:style-name="gr1262" draw:text-style-name="P81" draw:layer="layout" svg:width="3.613cm" svg:height="0.806cm" svg:x="1.008cm" svg:y="6.6cm">
          <draw:text-box>
            <text:p><text:span text:style-name="T27">add </text:span><text:span text:style-name="T31">x2</text:span><text:span text:style-name="T27">, </text:span><text:span text:style-name="T27">x0, 16</text:span></text:p>
          </draw:text-box>
        </draw:frame>
        <draw:frame draw:style-name="gr1173" draw:text-style-name="P34" draw:layer="layout" svg:width="6.124cm" svg:height="0.962cm" svg:x="5.699cm" svg:y="4.038cm">
          <draw:text-box>
            <text:p><text:span text:style-name="T9">Time in </text:span><text:span text:style-name="T9">clock </text:span><text:span text:style-name="T9">cycles</text:span></text:p>
          </draw:text-box>
        </draw:frame>
        <draw:line draw:style-name="gr146" draw:text-style-name="P4" draw:layer="layout" svg:x1="1.099cm" svg:y1="6cm" svg:x2="1.099cm" svg:y2="12cm">
          <text:p/>
        </draw:line>
        <draw:line draw:style-name="gr146" draw:text-style-name="P4" draw:layer="layout" svg:x1="5.999cm" svg:y1="5cm" svg:x2="12.999cm" svg:y2="5cm">
          <text:p/>
        </draw:line>
        <draw:g draw:style-name="gr66">
          <draw:polygon draw:style-name="gr1174" draw:text-style-name="P90" draw:layer="layout" svg:width="1.999cm" svg:height="2.999cm" svg:x="14.999cm" svg:y="5.5cm" svg:viewBox="0 0 2000 3000" draw:points="0,0 0,1100 400,1500 0,1900 0,3000 2000,2000 2000,1000">
            <text:p/>
          </draw:polygon>
          <draw:frame draw:style-name="gr1175" draw:text-style-name="P81" draw:layer="layout" svg:width="1.466cm" svg:height="0.806cm" svg:x="15.399cm" svg:y="6.594cm">
            <draw:text-box>
              <text:p><text:span text:style-name="T27">ALU</text:span></text:p>
            </draw:text-box>
          </draw:frame>
        </draw:g>
        <draw:g draw:style-name="gr1">
          <draw:g draw:style-name="gr1">
            <draw:custom-shape draw:style-name="gr1176" draw:text-style-name="P14" draw:layer="layout" svg:width="1cm" svg:height="2cm" svg:x="6.999cm" svg:y="6cm">
              <text:p/>
              <draw:enhanced-geometry svg:viewBox="0 0 21600 21600" draw:type="rectangle" draw:enhanced-path="M 0 0 L 21600 0 21600 21600 0 21600 0 0 Z N"/>
            </draw:custom-shape>
            <draw:custom-shape draw:style-name="gr1177" draw:text-style-name="P1" draw:layer="layout" svg:width="1cm" svg:height="2cm" svg:x="7.999cm" svg:y="6cm">
              <text:p/>
              <draw:enhanced-geometry svg:viewBox="0 0 21600 21600" draw:type="rectangle" draw:enhanced-path="M 0 0 L 21600 0 21600 21600 0 21600 0 0 Z N"/>
            </draw:custom-shape>
          </draw:g>
          <draw:g draw:style-name="gr66">
            <draw:frame draw:style-name="gr1178" draw:text-style-name="P81" draw:layer="layout" svg:width="1.052cm" svg:height="0.806cm" svg:x="7.528cm" svg:y="6.597cm">
              <draw:text-box>
                <text:p><text:span text:style-name="T27">IM</text:span></text:p>
              </draw:text-box>
            </draw:frame>
          </draw:g>
        </draw:g>
        <draw:g draw:style-name="gr1">
          <draw:g draw:style-name="gr1">
            <draw:custom-shape draw:style-name="gr1179" draw:text-style-name="P14" draw:layer="layout" svg:width="1cm" svg:height="2cm" svg:x="10.999cm" svg:y="6cm">
              <text:p/>
              <draw:enhanced-geometry svg:viewBox="0 0 21600 21600" draw:type="rectangle" draw:enhanced-path="M 0 0 L 21600 0 21600 21600 0 21600 0 0 Z N"/>
            </draw:custom-shape>
            <draw:custom-shape draw:style-name="gr1177" draw:text-style-name="P1" draw:layer="layout" svg:width="1cm" svg:height="2cm" svg:x="11.999cm" svg:y="6cm">
              <text:p/>
              <draw:enhanced-geometry svg:viewBox="0 0 21600 21600" draw:type="rectangle" draw:enhanced-path="M 0 0 L 21600 0 21600 21600 0 21600 0 0 Z N"/>
            </draw:custom-shape>
          </draw:g>
          <draw:g draw:style-name="gr66">
            <draw:frame draw:style-name="gr1180" draw:text-style-name="P81" draw:layer="layout" svg:width="1.411cm" svg:height="0.806cm" svg:x="11.528cm" svg:y="6.597cm">
              <draw:text-box>
                <text:p><text:span text:style-name="T27">Reg</text:span></text:p>
              </draw:text-box>
            </draw:frame>
          </draw:g>
        </draw:g>
        <draw:g draw:style-name="gr1">
          <draw:g draw:style-name="gr1">
            <draw:custom-shape draw:style-name="gr1179" draw:text-style-name="P14" draw:layer="layout" svg:width="1cm" svg:height="2cm" svg:x="23.999cm" svg:y="6cm">
              <text:p/>
              <draw:enhanced-geometry svg:viewBox="0 0 21600 21600" draw:mirror-horizontal="true" draw:type="rectangle" draw:enhanced-path="M 0 0 L 21600 0 21600 21600 0 21600 0 0 Z N"/>
            </draw:custom-shape>
            <draw:custom-shape draw:style-name="gr1177" draw:text-style-name="P1" draw:layer="layout" svg:width="1cm" svg:height="2cm" svg:x="22.999cm" svg:y="6cm">
              <text:p/>
              <draw:enhanced-geometry svg:viewBox="0 0 21600 21600" draw:mirror-horizontal="true" draw:type="rectangle" draw:enhanced-path="M 0 0 L 21600 0 21600 21600 0 21600 0 0 Z N"/>
            </draw:custom-shape>
          </draw:g>
          <draw:g draw:style-name="gr66">
            <draw:frame draw:style-name="gr1180" draw:text-style-name="P81" draw:layer="layout" svg:width="1.411cm" svg:height="0.806cm" svg:x="23.35cm" svg:y="6.597cm">
              <draw:text-box>
                <text:p><text:span text:style-name="T27">Reg</text:span></text:p>
              </draw:text-box>
            </draw:frame>
          </draw:g>
        </draw:g>
        <draw:line draw:style-name="gr38" draw:text-style-name="P4" draw:layer="layout" svg:x1="8.999cm" svg:y1="7cm" svg:x2="10.999cm" svg:y2="7cm">
          <text:p/>
        </draw:line>
        <draw:line draw:style-name="gr38" draw:text-style-name="P4" draw:layer="layout" svg:x1="10.499cm" svg:y1="7cm" svg:x2="10.499cm" svg:y2="6.5cm">
          <text:p/>
        </draw:line>
        <draw:line draw:style-name="gr38" draw:text-style-name="P4" draw:layer="layout" svg:x1="10.499cm" svg:y1="6.5cm" svg:x2="10.999cm" svg:y2="6.5cm">
          <text:p/>
        </draw:line>
        <draw:line draw:style-name="gr38" draw:text-style-name="P4" draw:layer="layout" svg:x1="12.999cm" svg:y1="6.5cm" svg:x2="14.999cm" svg:y2="6.5cm">
          <text:p/>
        </draw:line>
        <draw:line draw:style-name="gr38" draw:text-style-name="P4" draw:layer="layout" svg:x1="12.999cm" svg:y1="7.5cm" svg:x2="14.999cm" svg:y2="7.5cm">
          <text:p/>
        </draw:line>
        <draw:line draw:style-name="gr38" draw:text-style-name="P4" draw:layer="layout" svg:x1="16.999cm" svg:y1="7cm" svg:x2="18.999cm" svg:y2="7cm">
          <text:p/>
        </draw:line>
        <draw:line draw:style-name="gr38" draw:text-style-name="P4" draw:layer="layout" svg:x1="20.999cm" svg:y1="7cm" svg:x2="22.999cm" svg:y2="7cm">
          <text:p/>
        </draw:line>
        <draw:g draw:style-name="gr66">
          <draw:polygon draw:style-name="gr1174" draw:text-style-name="P90" draw:layer="layout" svg:width="1.999cm" svg:height="2.999cm" svg:x="18.999cm" svg:y="8.5cm" svg:viewBox="0 0 2000 3000" draw:points="0,0 0,1100 400,1500 0,1900 0,3000 2000,2000 2000,1000">
            <text:p/>
          </draw:polygon>
          <draw:frame draw:style-name="gr1175" draw:text-style-name="P81" draw:layer="layout" svg:width="1.466cm" svg:height="0.806cm" svg:x="19.399cm" svg:y="9.594cm">
            <draw:text-box>
              <text:p><text:span text:style-name="T27">ALU</text:span></text:p>
            </draw:text-box>
          </draw:frame>
        </draw:g>
        <draw:g draw:style-name="gr1">
          <draw:g draw:style-name="gr1">
            <draw:custom-shape draw:style-name="gr1176" draw:text-style-name="P14" draw:layer="layout" svg:width="1cm" svg:height="2cm" svg:x="10.999cm" svg:y="9cm">
              <text:p/>
              <draw:enhanced-geometry svg:viewBox="0 0 21600 21600" draw:type="rectangle" draw:enhanced-path="M 0 0 L 21600 0 21600 21600 0 21600 0 0 Z N"/>
            </draw:custom-shape>
            <draw:custom-shape draw:style-name="gr1177" draw:text-style-name="P1" draw:layer="layout" svg:width="1cm" svg:height="2cm" svg:x="11.999cm" svg:y="9cm">
              <text:p/>
              <draw:enhanced-geometry svg:viewBox="0 0 21600 21600" draw:type="rectangle" draw:enhanced-path="M 0 0 L 21600 0 21600 21600 0 21600 0 0 Z N"/>
            </draw:custom-shape>
          </draw:g>
          <draw:g draw:style-name="gr66">
            <draw:frame draw:style-name="gr1178" draw:text-style-name="P81" draw:layer="layout" svg:width="1.052cm" svg:height="0.806cm" svg:x="11.528cm" svg:y="9.597cm">
              <draw:text-box>
                <text:p><text:span text:style-name="T27">IM</text:span></text:p>
              </draw:text-box>
            </draw:frame>
          </draw:g>
        </draw:g>
        <draw:g draw:style-name="gr1">
          <draw:g draw:style-name="gr1">
            <draw:custom-shape draw:style-name="gr1179" draw:text-style-name="P14" draw:layer="layout" svg:width="1cm" svg:height="2cm" svg:x="14.999cm" svg:y="9cm">
              <text:p/>
              <draw:enhanced-geometry svg:viewBox="0 0 21600 21600" draw:type="rectangle" draw:enhanced-path="M 0 0 L 21600 0 21600 21600 0 21600 0 0 Z N"/>
            </draw:custom-shape>
            <draw:custom-shape draw:style-name="gr1177" draw:text-style-name="P1" draw:layer="layout" svg:width="1cm" svg:height="2cm" svg:x="15.999cm" svg:y="9cm">
              <text:p/>
              <draw:enhanced-geometry svg:viewBox="0 0 21600 21600" draw:type="rectangle" draw:enhanced-path="M 0 0 L 21600 0 21600 21600 0 21600 0 0 Z N"/>
            </draw:custom-shape>
          </draw:g>
          <draw:g draw:style-name="gr66">
            <draw:frame draw:style-name="gr1181" draw:text-style-name="P81" draw:layer="layout" svg:width="1.575cm" svg:height="0.806cm" svg:x="15.528cm" svg:y="9.597cm">
              <draw:text-box>
                <text:p><text:span text:style-name="T27">REG</text:span></text:p>
              </draw:text-box>
            </draw:frame>
          </draw:g>
        </draw:g>
        <draw:g draw:style-name="gr1">
          <draw:g draw:style-name="gr1">
            <draw:custom-shape draw:style-name="gr1179" draw:text-style-name="P14" draw:layer="layout" svg:width="1cm" svg:height="2cm" svg:x="27.999cm" svg:y="9cm">
              <text:p/>
              <draw:enhanced-geometry svg:viewBox="0 0 21600 21600" draw:mirror-horizontal="true" draw:type="rectangle" draw:enhanced-path="M 0 0 L 21600 0 21600 21600 0 21600 0 0 Z N"/>
            </draw:custom-shape>
            <draw:custom-shape draw:style-name="gr1177" draw:text-style-name="P1" draw:layer="layout" svg:width="1cm" svg:height="2cm" svg:x="26.999cm" svg:y="9cm">
              <text:p/>
              <draw:enhanced-geometry svg:viewBox="0 0 21600 21600" draw:mirror-horizontal="true" draw:type="rectangle" draw:enhanced-path="M 0 0 L 21600 0 21600 21600 0 21600 0 0 Z N"/>
            </draw:custom-shape>
          </draw:g>
          <draw:g draw:style-name="gr66">
            <draw:frame draw:style-name="gr1180" draw:text-style-name="P81" draw:layer="layout" svg:width="1.411cm" svg:height="0.806cm" svg:x="27.35cm" svg:y="9.597cm">
              <draw:text-box>
                <text:p><text:span text:style-name="T27">Reg</text:span></text:p>
              </draw:text-box>
            </draw:frame>
          </draw:g>
        </draw:g>
        <draw:line draw:style-name="gr38" draw:text-style-name="P4" draw:layer="layout" svg:x1="12.999cm" svg:y1="10cm" svg:x2="14.999cm" svg:y2="10cm">
          <text:p/>
        </draw:line>
        <draw:line draw:style-name="gr38" draw:text-style-name="P4" draw:layer="layout" svg:x1="14.499cm" svg:y1="10cm" svg:x2="14.499cm" svg:y2="9.5cm">
          <text:p/>
        </draw:line>
        <draw:line draw:style-name="gr38" draw:text-style-name="P4" draw:layer="layout" svg:x1="14.499cm" svg:y1="9.5cm" svg:x2="14.999cm" svg:y2="9.5cm">
          <text:p/>
        </draw:line>
        <draw:line draw:style-name="gr38" draw:text-style-name="P4" draw:layer="layout" svg:x1="16.999cm" svg:y1="9.5cm" svg:x2="18.999cm" svg:y2="9.5cm">
          <text:p/>
        </draw:line>
        <draw:line draw:style-name="gr38" draw:text-style-name="P4" draw:layer="layout" svg:x1="16.999cm" svg:y1="10.5cm" svg:x2="18.999cm" svg:y2="10.5cm">
          <text:p/>
        </draw:line>
        <draw:line draw:style-name="gr38" draw:text-style-name="P4" draw:layer="layout" svg:x1="20.999cm" svg:y1="10cm" svg:x2="22.999cm" svg:y2="10cm">
          <text:p/>
        </draw:line>
        <draw:line draw:style-name="gr38" draw:text-style-name="P4" draw:layer="layout" svg:x1="24.999cm" svg:y1="10cm" svg:x2="26.999cm" svg:y2="10cm">
          <text:p/>
        </draw:line>
        <draw:frame draw:style-name="gr1254" draw:text-style-name="P81" draw:layer="layout" svg:width="3.58cm" svg:height="0.806cm" svg:x="1.009cm" svg:y="9.6cm">
          <draw:text-box>
            <text:p><text:span text:style-name="T27">sd x4, </text:span><text:span text:style-name="T27">4(</text:span><text:span text:style-name="T31">x2)</text:span></text:p>
          </draw:text-box>
        </draw:frame>
        <draw:line draw:style-name="gr1183" draw:text-style-name="P4" draw:layer="layout" svg:x1="9.999cm" svg:y1="5cm" svg:x2="9.999cm" svg:y2="21cm">
          <text:p/>
        </draw:line>
        <draw:line draw:style-name="gr1183" draw:text-style-name="P4" draw:layer="layout" svg:x1="13.999cm" svg:y1="5cm" svg:x2="13.999cm" svg:y2="21cm">
          <text:p/>
        </draw:line>
        <draw:line draw:style-name="gr1183" draw:text-style-name="P4" draw:layer="layout" svg:x1="17.999cm" svg:y1="5cm" svg:x2="17.999cm" svg:y2="21cm">
          <text:p/>
        </draw:line>
        <draw:line draw:style-name="gr1183" draw:text-style-name="P4" draw:layer="layout" svg:x1="21.999cm" svg:y1="5cm" svg:x2="21.999cm" svg:y2="21cm">
          <text:p/>
        </draw:line>
        <draw:line draw:style-name="gr1183" draw:text-style-name="P4" draw:layer="layout" svg:x1="25.999cm" svg:y1="5cm" svg:x2="25.999cm" svg:y2="21cm">
          <text:p/>
        </draw:line>
        <draw:line draw:style-name="gr1183" draw:text-style-name="P4" draw:layer="layout" svg:x1="29.999cm" svg:y1="5cm" svg:x2="29.999cm" svg:y2="21cm">
          <text:p/>
        </draw:line>
        <draw:line draw:style-name="gr1183" draw:text-style-name="P4" draw:layer="layout" svg:x1="33.999cm" svg:y1="5cm" svg:x2="33.999cm" svg:y2="21cm">
          <text:p/>
        </draw:line>
        <draw:frame draw:style-name="gr1184" draw:text-style-name="P34" draw:layer="layout" svg:width="1.949cm" svg:height="0.962cm" svg:x="7.053cm" svg:y="5cm">
          <draw:text-box>
            <text:p><text:span text:style-name="T9">CC 1</text:span></text:p>
          </draw:text-box>
        </draw:frame>
        <draw:frame draw:style-name="gr1184" draw:text-style-name="P34" draw:layer="layout" svg:width="1.949cm" svg:height="0.962cm" svg:x="11.053cm" svg:y="5cm">
          <draw:text-box>
            <text:p><text:span text:style-name="T9">CC 2</text:span></text:p>
          </draw:text-box>
        </draw:frame>
        <draw:frame draw:style-name="gr1184" draw:text-style-name="P34" draw:layer="layout" svg:width="1.949cm" svg:height="0.962cm" svg:x="15.053cm" svg:y="5cm">
          <draw:text-box>
            <text:p><text:span text:style-name="T9">CC 3</text:span></text:p>
          </draw:text-box>
        </draw:frame>
        <draw:frame draw:style-name="gr1184" draw:text-style-name="P34" draw:layer="layout" svg:width="1.949cm" svg:height="0.962cm" svg:x="23.053cm" svg:y="5cm">
          <draw:text-box>
            <text:p><text:span text:style-name="T9">CC 5</text:span></text:p>
          </draw:text-box>
        </draw:frame>
        <draw:frame draw:style-name="gr1184" draw:text-style-name="P34" draw:layer="layout" svg:width="1.949cm" svg:height="0.962cm" svg:x="27.053cm" svg:y="5cm">
          <draw:text-box>
            <text:p><text:span text:style-name="T9">CC 6</text:span></text:p>
          </draw:text-box>
        </draw:frame>
        <draw:frame draw:style-name="gr1184" draw:text-style-name="P34" draw:layer="layout" svg:width="1.949cm" svg:height="0.962cm" svg:x="31.053cm" svg:y="5cm">
          <draw:text-box>
            <text:p><text:span text:style-name="T9">CC 7</text:span></text:p>
          </draw:text-box>
        </draw:frame>
        <draw:frame draw:style-name="gr1184" draw:text-style-name="P34" draw:layer="layout" svg:width="1.949cm" svg:height="0.962cm" svg:x="27.053cm" svg:y="5cm">
          <draw:text-box>
            <text:p><text:span text:style-name="T9">CC 6</text:span></text:p>
          </draw:text-box>
        </draw:frame>
        <draw:frame draw:style-name="gr1184" draw:text-style-name="P34" draw:layer="layout" svg:width="1.949cm" svg:height="0.962cm" svg:x="27.053cm" svg:y="5cm">
          <draw:text-box>
            <text:p><text:span text:style-name="T9">CC 6</text:span></text:p>
          </draw:text-box>
        </draw:frame>
        <draw:frame draw:style-name="gr1185" draw:text-style-name="P81" draw:layer="layout" svg:width="3.575cm" svg:height="0.806cm" svg:x="1.01cm" svg:y="12.6cm">
          <draw:text-box>
            <text:p><text:span text:style-name="T27">or x8, </text:span><text:span text:style-name="T31">x2</text:span><text:span text:style-name="T27">, </text:span><text:span text:style-name="T27">x6</text:span></text:p>
          </draw:text-box>
        </draw:frame>
        <draw:frame draw:style-name="gr1184" draw:text-style-name="P34" draw:layer="layout" svg:width="1.949cm" svg:height="0.962cm" svg:x="18.999cm" svg:y="5cm">
          <draw:text-box>
            <text:p><text:span text:style-name="T9">CC 4</text:span></text:p>
          </draw:text-box>
        </draw:frame>
        <draw:g draw:style-name="gr1">
          <draw:g draw:style-name="gr1">
            <draw:custom-shape draw:style-name="gr1176" draw:text-style-name="P91" draw:layer="layout" svg:width="1cm" svg:height="2cm" svg:x="18.999cm" svg:y="6cm">
              <text:p/>
              <draw:enhanced-geometry svg:viewBox="0 0 21600 21600" draw:mirror-horizontal="false" draw:mirror-vertical="false" draw:type="rectangle" draw:enhanced-path="M 0 0 L 21600 0 21600 21600 0 21600 0 0 Z N"/>
            </draw:custom-shape>
            <draw:custom-shape draw:style-name="gr1186" draw:text-style-name="P92" draw:layer="layout" svg:width="1cm" svg:height="2cm" svg:x="19.999cm" svg:y="6cm">
              <text:p/>
              <draw:enhanced-geometry svg:viewBox="0 0 21600 21600" draw:mirror-horizontal="false" draw:mirror-vertical="false" draw:type="rectangle" draw:enhanced-path="M 0 0 L 21600 0 21600 21600 0 21600 0 0 Z N"/>
            </draw:custom-shape>
          </draw:g>
          <draw:frame draw:style-name="gr1187" draw:text-style-name="P81" draw:layer="layout" svg:width="1.272cm" svg:height="0.806cm" svg:x="19.365cm" svg:y="6.599cm">
            <draw:text-box>
              <text:p><text:span text:style-name="T27">DM</text:span></text:p>
            </draw:text-box>
          </draw:frame>
        </draw:g>
        <draw:line draw:style-name="gr38" draw:text-style-name="P4" draw:layer="layout" svg:x1="18.499cm" svg:y1="7cm" svg:x2="18.499cm" svg:y2="8.2cm">
          <text:p/>
        </draw:line>
        <draw:line draw:style-name="gr38" draw:text-style-name="P4" draw:layer="layout" svg:x1="18.499cm" svg:y1="8.2cm" svg:x2="21.499cm" svg:y2="8.2cm">
          <text:p/>
        </draw:line>
        <draw:line draw:style-name="gr38" draw:text-style-name="P4" draw:layer="layout" svg:x1="21.499cm" svg:y1="8.2cm" svg:x2="21.999cm" svg:y2="7cm">
          <text:p/>
        </draw:line>
        <draw:g draw:style-name="gr1">
          <draw:g draw:style-name="gr1">
            <draw:custom-shape draw:style-name="gr1176" draw:text-style-name="P91" draw:layer="layout" svg:width="1cm" svg:height="2cm" svg:x="22.999cm" svg:y="9cm">
              <text:p/>
              <draw:enhanced-geometry svg:viewBox="0 0 21600 21600" draw:mirror-horizontal="false" draw:mirror-vertical="false" draw:type="rectangle" draw:enhanced-path="M 0 0 L 21600 0 21600 21600 0 21600 0 0 Z N"/>
            </draw:custom-shape>
            <draw:custom-shape draw:style-name="gr1186" draw:text-style-name="P92" draw:layer="layout" svg:width="1cm" svg:height="2cm" svg:x="23.999cm" svg:y="9cm">
              <text:p/>
              <draw:enhanced-geometry svg:viewBox="0 0 21600 21600" draw:mirror-horizontal="false" draw:mirror-vertical="false" draw:type="rectangle" draw:enhanced-path="M 0 0 L 21600 0 21600 21600 0 21600 0 0 Z N"/>
            </draw:custom-shape>
          </draw:g>
          <draw:frame draw:style-name="gr1187" draw:text-style-name="P81" draw:layer="layout" svg:width="1.272cm" svg:height="0.806cm" svg:x="23.365cm" svg:y="9.599cm">
            <draw:text-box>
              <text:p><text:span text:style-name="T27">DM</text:span></text:p>
            </draw:text-box>
          </draw:frame>
        </draw:g>
        <draw:line draw:style-name="gr38" draw:text-style-name="P4" draw:layer="layout" svg:x1="22.499cm" svg:y1="10cm" svg:x2="22.499cm" svg:y2="11.2cm">
          <text:p/>
        </draw:line>
        <draw:line draw:style-name="gr38" draw:text-style-name="P4" draw:layer="layout" svg:x1="22.499cm" svg:y1="11.2cm" svg:x2="25.499cm" svg:y2="11.2cm">
          <text:p/>
        </draw:line>
        <draw:line draw:style-name="gr38" draw:text-style-name="P4" draw:layer="layout" svg:x1="25.499cm" svg:y1="11.2cm" svg:x2="25.999cm" svg:y2="10cm">
          <text:p/>
        </draw:line>
        <draw:g draw:style-name="gr66">
          <draw:polygon draw:style-name="gr1174" draw:text-style-name="P90" draw:layer="layout" svg:width="1.999cm" svg:height="2.999cm" svg:x="22.999cm" svg:y="11.5cm" svg:viewBox="0 0 2000 3000" draw:points="0,0 0,1100 400,1500 0,1900 0,3000 2000,2000 2000,1000">
            <text:p/>
          </draw:polygon>
          <draw:frame draw:style-name="gr1175" draw:text-style-name="P81" draw:layer="layout" svg:width="1.466cm" svg:height="0.806cm" svg:x="23.399cm" svg:y="12.594cm">
            <draw:text-box>
              <text:p><text:span text:style-name="T27">ALU</text:span></text:p>
            </draw:text-box>
          </draw:frame>
        </draw:g>
        <draw:g draw:style-name="gr1">
          <draw:g draw:style-name="gr1">
            <draw:custom-shape draw:style-name="gr1176" draw:text-style-name="P14" draw:layer="layout" svg:width="1cm" svg:height="2cm" svg:x="14.999cm" svg:y="12cm">
              <text:p/>
              <draw:enhanced-geometry svg:viewBox="0 0 21600 21600" draw:type="rectangle" draw:enhanced-path="M 0 0 L 21600 0 21600 21600 0 21600 0 0 Z N"/>
            </draw:custom-shape>
            <draw:custom-shape draw:style-name="gr1177" draw:text-style-name="P1" draw:layer="layout" svg:width="1cm" svg:height="2cm" svg:x="15.999cm" svg:y="12cm">
              <text:p/>
              <draw:enhanced-geometry svg:viewBox="0 0 21600 21600" draw:type="rectangle" draw:enhanced-path="M 0 0 L 21600 0 21600 21600 0 21600 0 0 Z N"/>
            </draw:custom-shape>
          </draw:g>
          <draw:g draw:style-name="gr66">
            <draw:frame draw:style-name="gr1178" draw:text-style-name="P81" draw:layer="layout" svg:width="1.052cm" svg:height="0.806cm" svg:x="15.528cm" svg:y="12.597cm">
              <draw:text-box>
                <text:p><text:span text:style-name="T27">IM</text:span></text:p>
              </draw:text-box>
            </draw:frame>
          </draw:g>
        </draw:g>
        <draw:g draw:style-name="gr1">
          <draw:g draw:style-name="gr1">
            <draw:custom-shape draw:style-name="gr1179" draw:text-style-name="P14" draw:layer="layout" svg:width="1cm" svg:height="2cm" svg:x="18.999cm" svg:y="12cm">
              <text:p/>
              <draw:enhanced-geometry svg:viewBox="0 0 21600 21600" draw:type="rectangle" draw:enhanced-path="M 0 0 L 21600 0 21600 21600 0 21600 0 0 Z N"/>
            </draw:custom-shape>
            <draw:custom-shape draw:style-name="gr1177" draw:text-style-name="P1" draw:layer="layout" svg:width="1cm" svg:height="2cm" svg:x="19.999cm" svg:y="12cm">
              <text:p/>
              <draw:enhanced-geometry svg:viewBox="0 0 21600 21600" draw:type="rectangle" draw:enhanced-path="M 0 0 L 21600 0 21600 21600 0 21600 0 0 Z N"/>
            </draw:custom-shape>
          </draw:g>
          <draw:g draw:style-name="gr66">
            <draw:frame draw:style-name="gr1181" draw:text-style-name="P81" draw:layer="layout" svg:width="1.575cm" svg:height="0.806cm" svg:x="19.528cm" svg:y="12.597cm">
              <draw:text-box>
                <text:p><text:span text:style-name="T27">REG</text:span></text:p>
              </draw:text-box>
            </draw:frame>
          </draw:g>
        </draw:g>
        <draw:g draw:style-name="gr1">
          <draw:g draw:style-name="gr1">
            <draw:custom-shape draw:style-name="gr1179" draw:text-style-name="P14" draw:layer="layout" svg:width="1cm" svg:height="2cm" svg:x="31.999cm" svg:y="12cm">
              <text:p/>
              <draw:enhanced-geometry svg:viewBox="0 0 21600 21600" draw:mirror-horizontal="true" draw:type="rectangle" draw:enhanced-path="M 0 0 L 21600 0 21600 21600 0 21600 0 0 Z N"/>
            </draw:custom-shape>
            <draw:custom-shape draw:style-name="gr1177" draw:text-style-name="P1" draw:layer="layout" svg:width="1cm" svg:height="2cm" svg:x="30.999cm" svg:y="12cm">
              <text:p/>
              <draw:enhanced-geometry svg:viewBox="0 0 21600 21600" draw:mirror-horizontal="true" draw:type="rectangle" draw:enhanced-path="M 0 0 L 21600 0 21600 21600 0 21600 0 0 Z N"/>
            </draw:custom-shape>
          </draw:g>
          <draw:g draw:style-name="gr66">
            <draw:frame draw:style-name="gr1180" draw:text-style-name="P81" draw:layer="layout" svg:width="1.411cm" svg:height="0.806cm" svg:x="31.35cm" svg:y="12.597cm">
              <draw:text-box>
                <text:p><text:span text:style-name="T27">Reg</text:span></text:p>
              </draw:text-box>
            </draw:frame>
          </draw:g>
        </draw:g>
        <draw:line draw:style-name="gr38" draw:text-style-name="P4" draw:layer="layout" svg:x1="16.999cm" svg:y1="13cm" svg:x2="18.999cm" svg:y2="13cm">
          <text:p/>
        </draw:line>
        <draw:line draw:style-name="gr38" draw:text-style-name="P4" draw:layer="layout" svg:x1="18.499cm" svg:y1="13cm" svg:x2="18.499cm" svg:y2="12.5cm">
          <text:p/>
        </draw:line>
        <draw:line draw:style-name="gr38" draw:text-style-name="P4" draw:layer="layout" svg:x1="18.499cm" svg:y1="12.5cm" svg:x2="18.999cm" svg:y2="12.5cm">
          <text:p/>
        </draw:line>
        <draw:line draw:style-name="gr38" draw:text-style-name="P4" draw:layer="layout" svg:x1="20.999cm" svg:y1="12.5cm" svg:x2="22.999cm" svg:y2="12.5cm">
          <text:p/>
        </draw:line>
        <draw:line draw:style-name="gr38" draw:text-style-name="P4" draw:layer="layout" svg:x1="20.999cm" svg:y1="13.5cm" svg:x2="22.999cm" svg:y2="13.5cm">
          <text:p/>
        </draw:line>
        <draw:line draw:style-name="gr38" draw:text-style-name="P4" draw:layer="layout" svg:x1="24.999cm" svg:y1="13cm" svg:x2="26.999cm" svg:y2="13cm">
          <text:p/>
        </draw:line>
        <draw:line draw:style-name="gr38" draw:text-style-name="P4" draw:layer="layout" svg:x1="28.999cm" svg:y1="13cm" svg:x2="30.999cm" svg:y2="13cm">
          <text:p/>
        </draw:line>
        <draw:g draw:style-name="gr1">
          <draw:g draw:style-name="gr1">
            <draw:custom-shape draw:style-name="gr1176" draw:text-style-name="P91" draw:layer="layout" svg:width="1cm" svg:height="2cm" svg:x="26.999cm" svg:y="12cm">
              <text:p/>
              <draw:enhanced-geometry svg:viewBox="0 0 21600 21600" draw:mirror-horizontal="false" draw:mirror-vertical="false" draw:type="rectangle" draw:enhanced-path="M 0 0 L 21600 0 21600 21600 0 21600 0 0 Z N"/>
            </draw:custom-shape>
            <draw:custom-shape draw:style-name="gr1186" draw:text-style-name="P92" draw:layer="layout" svg:width="1cm" svg:height="2cm" svg:x="27.999cm" svg:y="12cm">
              <text:p/>
              <draw:enhanced-geometry svg:viewBox="0 0 21600 21600" draw:mirror-horizontal="false" draw:mirror-vertical="false" draw:type="rectangle" draw:enhanced-path="M 0 0 L 21600 0 21600 21600 0 21600 0 0 Z N"/>
            </draw:custom-shape>
          </draw:g>
          <draw:frame draw:style-name="gr1187" draw:text-style-name="P81" draw:layer="layout" svg:width="1.272cm" svg:height="0.806cm" svg:x="27.365cm" svg:y="12.599cm">
            <draw:text-box>
              <text:p><text:span text:style-name="T27">DM</text:span></text:p>
            </draw:text-box>
          </draw:frame>
        </draw:g>
        <draw:line draw:style-name="gr38" draw:text-style-name="P4" draw:layer="layout" svg:x1="26.499cm" svg:y1="13cm" svg:x2="26.499cm" svg:y2="14.2cm">
          <text:p/>
        </draw:line>
        <draw:line draw:style-name="gr38" draw:text-style-name="P4" draw:layer="layout" svg:x1="26.499cm" svg:y1="14.2cm" svg:x2="29.499cm" svg:y2="14.2cm">
          <text:p/>
        </draw:line>
        <draw:line draw:style-name="gr38" draw:text-style-name="P4" draw:layer="layout" svg:x1="29.499cm" svg:y1="14.2cm" svg:x2="29.999cm" svg:y2="13cm">
          <text:p/>
        </draw:line>
        <draw:frame draw:style-name="gr1263" draw:text-style-name="P34" draw:layer="layout" svg:width="12.961cm" svg:height="0.962cm" svg:x="8.899cm" svg:y="1cm">
          <draw:text-box>
            <text:p><text:span text:style-name="T9">Store </text:span><text:span text:style-name="T9">followin</text:span><text:span text:style-name="T9">g a R-</text:span><text:span text:style-name="T9">type </text:span><text:span text:style-name="T9">(prepari</text:span><text:span text:style-name="T9">ng </text:span><text:span text:style-name="T9">address</text:span><text:span text:style-name="T9">)</text:span></text:p>
          </draw:text-box>
        </draw:frame>
        <draw:line draw:style-name="gr1183" draw:text-style-name="P4" draw:layer="layout" svg:x1="37.999cm" svg:y1="5cm" svg:x2="37.999cm" svg:y2="21cm">
          <text:p/>
        </draw:line>
        <draw:g draw:style-name="gr66">
          <draw:polygon draw:style-name="gr1174" draw:text-style-name="P90" draw:layer="layout" svg:width="1.999cm" svg:height="2.999cm" svg:x="26.999cm" svg:y="14.5cm" svg:viewBox="0 0 2000 3000" draw:points="0,0 0,1100 400,1500 0,1900 0,3000 2000,2000 2000,1000">
            <text:p/>
          </draw:polygon>
          <draw:frame draw:style-name="gr1175" draw:text-style-name="P81" draw:layer="layout" svg:width="1.466cm" svg:height="0.806cm" svg:x="27.399cm" svg:y="15.594cm">
            <draw:text-box>
              <text:p><text:span text:style-name="T27">ALU</text:span></text:p>
            </draw:text-box>
          </draw:frame>
        </draw:g>
        <draw:g draw:style-name="gr1">
          <draw:g draw:style-name="gr1">
            <draw:custom-shape draw:style-name="gr1176" draw:text-style-name="P14" draw:layer="layout" svg:width="1cm" svg:height="2cm" svg:x="18.999cm" svg:y="15cm">
              <text:p/>
              <draw:enhanced-geometry svg:viewBox="0 0 21600 21600" draw:type="rectangle" draw:enhanced-path="M 0 0 L 21600 0 21600 21600 0 21600 0 0 Z N"/>
            </draw:custom-shape>
            <draw:custom-shape draw:style-name="gr1177" draw:text-style-name="P1" draw:layer="layout" svg:width="1cm" svg:height="2cm" svg:x="19.999cm" svg:y="15cm">
              <text:p/>
              <draw:enhanced-geometry svg:viewBox="0 0 21600 21600" draw:type="rectangle" draw:enhanced-path="M 0 0 L 21600 0 21600 21600 0 21600 0 0 Z N"/>
            </draw:custom-shape>
          </draw:g>
          <draw:g draw:style-name="gr66">
            <draw:frame draw:style-name="gr1178" draw:text-style-name="P81" draw:layer="layout" svg:width="1.052cm" svg:height="0.806cm" svg:x="19.528cm" svg:y="15.597cm">
              <draw:text-box>
                <text:p><text:span text:style-name="T27">IM</text:span></text:p>
              </draw:text-box>
            </draw:frame>
          </draw:g>
        </draw:g>
        <draw:g draw:style-name="gr1">
          <draw:g draw:style-name="gr1">
            <draw:custom-shape draw:style-name="gr1179" draw:text-style-name="P14" draw:layer="layout" svg:width="1cm" svg:height="2cm" svg:x="22.999cm" svg:y="15cm">
              <text:p/>
              <draw:enhanced-geometry svg:viewBox="0 0 21600 21600" draw:type="rectangle" draw:enhanced-path="M 0 0 L 21600 0 21600 21600 0 21600 0 0 Z N"/>
            </draw:custom-shape>
            <draw:custom-shape draw:style-name="gr1177" draw:text-style-name="P1" draw:layer="layout" svg:width="1cm" svg:height="2cm" svg:x="23.999cm" svg:y="15cm">
              <text:p/>
              <draw:enhanced-geometry svg:viewBox="0 0 21600 21600" draw:type="rectangle" draw:enhanced-path="M 0 0 L 21600 0 21600 21600 0 21600 0 0 Z N"/>
            </draw:custom-shape>
          </draw:g>
          <draw:g draw:style-name="gr66">
            <draw:frame draw:style-name="gr1181" draw:text-style-name="P81" draw:layer="layout" svg:width="1.575cm" svg:height="0.806cm" svg:x="23.528cm" svg:y="15.597cm">
              <draw:text-box>
                <text:p><text:span text:style-name="T27">REG</text:span></text:p>
              </draw:text-box>
            </draw:frame>
          </draw:g>
        </draw:g>
        <draw:g draw:style-name="gr1">
          <draw:g draw:style-name="gr1">
            <draw:custom-shape draw:style-name="gr1179" draw:text-style-name="P14" draw:layer="layout" svg:width="1cm" svg:height="2cm" svg:x="35.999cm" svg:y="15cm">
              <text:p/>
              <draw:enhanced-geometry svg:viewBox="0 0 21600 21600" draw:mirror-horizontal="true" draw:type="rectangle" draw:enhanced-path="M 0 0 L 21600 0 21600 21600 0 21600 0 0 Z N"/>
            </draw:custom-shape>
            <draw:custom-shape draw:style-name="gr1177" draw:text-style-name="P1" draw:layer="layout" svg:width="1cm" svg:height="2cm" svg:x="34.999cm" svg:y="15cm">
              <text:p/>
              <draw:enhanced-geometry svg:viewBox="0 0 21600 21600" draw:mirror-horizontal="true" draw:type="rectangle" draw:enhanced-path="M 0 0 L 21600 0 21600 21600 0 21600 0 0 Z N"/>
            </draw:custom-shape>
          </draw:g>
          <draw:g draw:style-name="gr66">
            <draw:frame draw:style-name="gr1180" draw:text-style-name="P81" draw:layer="layout" svg:width="1.411cm" svg:height="0.806cm" svg:x="35.35cm" svg:y="15.597cm">
              <draw:text-box>
                <text:p><text:span text:style-name="T27">Reg</text:span></text:p>
              </draw:text-box>
            </draw:frame>
          </draw:g>
        </draw:g>
        <draw:line draw:style-name="gr38" draw:text-style-name="P4" draw:layer="layout" svg:x1="20.999cm" svg:y1="16cm" svg:x2="22.999cm" svg:y2="16cm">
          <text:p/>
        </draw:line>
        <draw:line draw:style-name="gr38" draw:text-style-name="P4" draw:layer="layout" svg:x1="22.499cm" svg:y1="16cm" svg:x2="22.499cm" svg:y2="15.5cm">
          <text:p/>
        </draw:line>
        <draw:line draw:style-name="gr38" draw:text-style-name="P4" draw:layer="layout" svg:x1="22.499cm" svg:y1="15.5cm" svg:x2="22.999cm" svg:y2="15.5cm">
          <text:p/>
        </draw:line>
        <draw:line draw:style-name="gr38" draw:text-style-name="P4" draw:layer="layout" svg:x1="24.999cm" svg:y1="15.5cm" svg:x2="26.999cm" svg:y2="15.5cm">
          <text:p/>
        </draw:line>
        <draw:line draw:style-name="gr38" draw:text-style-name="P4" draw:layer="layout" svg:x1="24.999cm" svg:y1="16.5cm" svg:x2="26.999cm" svg:y2="16.5cm">
          <text:p/>
        </draw:line>
        <draw:line draw:style-name="gr38" draw:text-style-name="P4" draw:layer="layout" svg:x1="28.999cm" svg:y1="16cm" svg:x2="30.999cm" svg:y2="16cm">
          <text:p/>
        </draw:line>
        <draw:line draw:style-name="gr38" draw:text-style-name="P4" draw:layer="layout" svg:x1="32.999cm" svg:y1="16cm" svg:x2="34.999cm" svg:y2="16cm">
          <text:p/>
        </draw:line>
        <draw:g draw:style-name="gr1">
          <draw:g draw:style-name="gr1">
            <draw:custom-shape draw:style-name="gr1176" draw:text-style-name="P91" draw:layer="layout" svg:width="1cm" svg:height="2cm" svg:x="30.999cm" svg:y="15cm">
              <text:p/>
              <draw:enhanced-geometry svg:viewBox="0 0 21600 21600" draw:mirror-horizontal="false" draw:mirror-vertical="false" draw:type="rectangle" draw:enhanced-path="M 0 0 L 21600 0 21600 21600 0 21600 0 0 Z N"/>
            </draw:custom-shape>
            <draw:custom-shape draw:style-name="gr1186" draw:text-style-name="P92" draw:layer="layout" svg:width="1cm" svg:height="2cm" svg:x="31.999cm" svg:y="15cm">
              <text:p/>
              <draw:enhanced-geometry svg:viewBox="0 0 21600 21600" draw:mirror-horizontal="false" draw:mirror-vertical="false" draw:type="rectangle" draw:enhanced-path="M 0 0 L 21600 0 21600 21600 0 21600 0 0 Z N"/>
            </draw:custom-shape>
          </draw:g>
          <draw:frame draw:style-name="gr1187" draw:text-style-name="P81" draw:layer="layout" svg:width="1.272cm" svg:height="0.806cm" svg:x="31.365cm" svg:y="15.599cm">
            <draw:text-box>
              <text:p><text:span text:style-name="T27">DM</text:span></text:p>
            </draw:text-box>
          </draw:frame>
        </draw:g>
        <draw:line draw:style-name="gr38" draw:text-style-name="P4" draw:layer="layout" svg:x1="30.499cm" svg:y1="16cm" svg:x2="30.499cm" svg:y2="17.2cm">
          <text:p/>
        </draw:line>
        <draw:line draw:style-name="gr38" draw:text-style-name="P4" draw:layer="layout" svg:x1="30.499cm" svg:y1="17.2cm" svg:x2="33.499cm" svg:y2="17.2cm">
          <text:p/>
        </draw:line>
        <draw:line draw:style-name="gr38" draw:text-style-name="P4" draw:layer="layout" svg:x1="33.499cm" svg:y1="17.2cm" svg:x2="33.999cm" svg:y2="16cm">
          <text:p/>
        </draw:line>
        <draw:g draw:style-name="gr66">
          <draw:polygon draw:style-name="gr1174" draw:text-style-name="P90" draw:layer="layout" svg:width="1.999cm" svg:height="2.999cm" svg:x="30.999cm" svg:y="17.5cm" svg:viewBox="0 0 2000 3000" draw:points="0,0 0,1100 400,1500 0,1900 0,3000 2000,2000 2000,1000">
            <text:p/>
          </draw:polygon>
          <draw:frame draw:style-name="gr1175" draw:text-style-name="P81" draw:layer="layout" svg:width="1.466cm" svg:height="0.806cm" svg:x="31.399cm" svg:y="18.594cm">
            <draw:text-box>
              <text:p><text:span text:style-name="T27">ALU</text:span></text:p>
            </draw:text-box>
          </draw:frame>
        </draw:g>
        <draw:g draw:style-name="gr1">
          <draw:g draw:style-name="gr1">
            <draw:custom-shape draw:style-name="gr1176" draw:text-style-name="P14" draw:layer="layout" svg:width="1cm" svg:height="2cm" svg:x="22.999cm" svg:y="18cm">
              <text:p/>
              <draw:enhanced-geometry svg:viewBox="0 0 21600 21600" draw:type="rectangle" draw:enhanced-path="M 0 0 L 21600 0 21600 21600 0 21600 0 0 Z N"/>
            </draw:custom-shape>
            <draw:custom-shape draw:style-name="gr1177" draw:text-style-name="P1" draw:layer="layout" svg:width="1cm" svg:height="2cm" svg:x="23.999cm" svg:y="18cm">
              <text:p/>
              <draw:enhanced-geometry svg:viewBox="0 0 21600 21600" draw:type="rectangle" draw:enhanced-path="M 0 0 L 21600 0 21600 21600 0 21600 0 0 Z N"/>
            </draw:custom-shape>
          </draw:g>
          <draw:g draw:style-name="gr66">
            <draw:frame draw:style-name="gr1178" draw:text-style-name="P81" draw:layer="layout" svg:width="1.052cm" svg:height="0.806cm" svg:x="23.528cm" svg:y="18.597cm">
              <draw:text-box>
                <text:p><text:span text:style-name="T27">IM</text:span></text:p>
              </draw:text-box>
            </draw:frame>
          </draw:g>
        </draw:g>
        <draw:g draw:style-name="gr1">
          <draw:g draw:style-name="gr1">
            <draw:custom-shape draw:style-name="gr1179" draw:text-style-name="P14" draw:layer="layout" svg:width="1cm" svg:height="2cm" svg:x="26.999cm" svg:y="18cm">
              <text:p/>
              <draw:enhanced-geometry svg:viewBox="0 0 21600 21600" draw:type="rectangle" draw:enhanced-path="M 0 0 L 21600 0 21600 21600 0 21600 0 0 Z N"/>
            </draw:custom-shape>
            <draw:custom-shape draw:style-name="gr1177" draw:text-style-name="P1" draw:layer="layout" svg:width="1cm" svg:height="2cm" svg:x="27.999cm" svg:y="18cm">
              <text:p/>
              <draw:enhanced-geometry svg:viewBox="0 0 21600 21600" draw:type="rectangle" draw:enhanced-path="M 0 0 L 21600 0 21600 21600 0 21600 0 0 Z N"/>
            </draw:custom-shape>
          </draw:g>
          <draw:g draw:style-name="gr66">
            <draw:frame draw:style-name="gr1181" draw:text-style-name="P81" draw:layer="layout" svg:width="1.575cm" svg:height="0.806cm" svg:x="27.528cm" svg:y="18.597cm">
              <draw:text-box>
                <text:p><text:span text:style-name="T27">REG</text:span></text:p>
              </draw:text-box>
            </draw:frame>
          </draw:g>
        </draw:g>
        <draw:g draw:style-name="gr1">
          <draw:g draw:style-name="gr1">
            <draw:custom-shape draw:style-name="gr1179" draw:text-style-name="P14" draw:layer="layout" svg:width="1cm" svg:height="2cm" svg:x="39.999cm" svg:y="18cm">
              <text:p/>
              <draw:enhanced-geometry svg:viewBox="0 0 21600 21600" draw:mirror-horizontal="true" draw:type="rectangle" draw:enhanced-path="M 0 0 L 21600 0 21600 21600 0 21600 0 0 Z N"/>
            </draw:custom-shape>
            <draw:custom-shape draw:style-name="gr1177" draw:text-style-name="P1" draw:layer="layout" svg:width="1cm" svg:height="2cm" svg:x="38.999cm" svg:y="18cm">
              <text:p/>
              <draw:enhanced-geometry svg:viewBox="0 0 21600 21600" draw:mirror-horizontal="true" draw:type="rectangle" draw:enhanced-path="M 0 0 L 21600 0 21600 21600 0 21600 0 0 Z N"/>
            </draw:custom-shape>
          </draw:g>
          <draw:g draw:style-name="gr66">
            <draw:frame draw:style-name="gr1180" draw:text-style-name="P81" draw:layer="layout" svg:width="1.411cm" svg:height="0.806cm" svg:x="39.35cm" svg:y="18.597cm">
              <draw:text-box>
                <text:p><text:span text:style-name="T27">Reg</text:span></text:p>
              </draw:text-box>
            </draw:frame>
          </draw:g>
        </draw:g>
        <draw:line draw:style-name="gr38" draw:text-style-name="P4" draw:layer="layout" svg:x1="24.999cm" svg:y1="19cm" svg:x2="26.999cm" svg:y2="19cm">
          <text:p/>
        </draw:line>
        <draw:line draw:style-name="gr38" draw:text-style-name="P4" draw:layer="layout" svg:x1="26.499cm" svg:y1="19cm" svg:x2="26.499cm" svg:y2="18.5cm">
          <text:p/>
        </draw:line>
        <draw:line draw:style-name="gr38" draw:text-style-name="P4" draw:layer="layout" svg:x1="26.499cm" svg:y1="18.5cm" svg:x2="26.999cm" svg:y2="18.5cm">
          <text:p/>
        </draw:line>
        <draw:line draw:style-name="gr38" draw:text-style-name="P4" draw:layer="layout" svg:x1="28.999cm" svg:y1="18.5cm" svg:x2="30.999cm" svg:y2="18.5cm">
          <text:p/>
        </draw:line>
        <draw:line draw:style-name="gr38" draw:text-style-name="P4" draw:layer="layout" svg:x1="28.999cm" svg:y1="19.5cm" svg:x2="30.999cm" svg:y2="19.5cm">
          <text:p/>
        </draw:line>
        <draw:line draw:style-name="gr38" draw:text-style-name="P4" draw:layer="layout" svg:x1="32.999cm" svg:y1="19cm" svg:x2="34.999cm" svg:y2="19cm">
          <text:p/>
        </draw:line>
        <draw:line draw:style-name="gr38" draw:text-style-name="P4" draw:layer="layout" svg:x1="36.999cm" svg:y1="19cm" svg:x2="38.999cm" svg:y2="19cm">
          <text:p/>
        </draw:line>
        <draw:g draw:style-name="gr1">
          <draw:g draw:style-name="gr1">
            <draw:custom-shape draw:style-name="gr1176" draw:text-style-name="P91" draw:layer="layout" svg:width="1cm" svg:height="2cm" svg:x="34.999cm" svg:y="18cm">
              <text:p/>
              <draw:enhanced-geometry svg:viewBox="0 0 21600 21600" draw:mirror-horizontal="false" draw:mirror-vertical="false" draw:type="rectangle" draw:enhanced-path="M 0 0 L 21600 0 21600 21600 0 21600 0 0 Z N"/>
            </draw:custom-shape>
            <draw:custom-shape draw:style-name="gr1186" draw:text-style-name="P92" draw:layer="layout" svg:width="1cm" svg:height="2cm" svg:x="35.999cm" svg:y="18cm">
              <text:p/>
              <draw:enhanced-geometry svg:viewBox="0 0 21600 21600" draw:mirror-horizontal="false" draw:mirror-vertical="false" draw:type="rectangle" draw:enhanced-path="M 0 0 L 21600 0 21600 21600 0 21600 0 0 Z N"/>
            </draw:custom-shape>
          </draw:g>
          <draw:frame draw:style-name="gr1187" draw:text-style-name="P81" draw:layer="layout" svg:width="1.272cm" svg:height="0.806cm" svg:x="35.365cm" svg:y="18.599cm">
            <draw:text-box>
              <text:p><text:span text:style-name="T27">DM</text:span></text:p>
            </draw:text-box>
          </draw:frame>
        </draw:g>
        <draw:line draw:style-name="gr38" draw:text-style-name="P4" draw:layer="layout" svg:x1="34.499cm" svg:y1="19cm" svg:x2="34.499cm" svg:y2="20.2cm">
          <text:p/>
        </draw:line>
        <draw:line draw:style-name="gr38" draw:text-style-name="P4" draw:layer="layout" svg:x1="34.499cm" svg:y1="20.2cm" svg:x2="37.499cm" svg:y2="20.2cm">
          <text:p/>
        </draw:line>
        <draw:line draw:style-name="gr38" draw:text-style-name="P4" draw:layer="layout" svg:x1="37.499cm" svg:y1="20.2cm" svg:x2="37.999cm" svg:y2="19cm">
          <text:p/>
        </draw:line>
        <draw:frame draw:style-name="gr1251" draw:text-style-name="P81" draw:layer="layout" svg:width="3.586cm" svg:height="0.806cm" svg:x="1.011cm" svg:y="15.6cm">
          <draw:text-box>
            <text:p><text:span text:style-name="T27">add x9, </text:span><text:span text:style-name="T27">x4, </text:span><text:span text:style-name="T31">x2</text:span></text:p>
          </draw:text-box>
        </draw:frame>
        <draw:frame draw:style-name="gr1185" draw:text-style-name="P81" draw:layer="layout" svg:width="3.575cm" svg:height="0.806cm" svg:x="1.012cm" svg:y="18.6cm">
          <draw:text-box>
            <text:p><text:span text:style-name="T27">sub x1, </text:span><text:span text:style-name="T27">x6, x7</text:span></text:p>
          </draw:text-box>
        </draw:frame>
        <draw:custom-shape draw:style-name="gr1189" draw:text-style-name="P4" draw:layer="layout" svg:width="2.6cm" svg:height="2.6cm" svg:x="22.601cm" svg:y="5.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90" draw:text-style-name="P93" draw:layer="layout" svg:width="1.173cm" svg:height="0.962cm" svg:x="23.13cm" svg:y="7.1cm">
          <draw:text-box>
            <text:p><text:span text:style-name="T34">x2</text:span></text:p>
          </draw:text-box>
        </draw:frame>
        <draw:line draw:style-name="gr1191" draw:text-style-name="P4" draw:layer="layout" svg:x1="22.2cm" svg:y1="7cm" svg:x2="18.4cm" svg:y2="9.5cm">
          <text:p/>
        </draw:line>
        <draw:line draw:style-name="gr1194" draw:text-style-name="P4" draw:layer="layout" svg:x1="22.2cm" svg:y1="7cm" svg:x2="22.5cm" svg:y2="12.5cm">
          <text:p/>
        </draw:line>
        <draw:line draw:style-name="gr1194" draw:text-style-name="P4" draw:layer="layout" svg:x1="23.567cm" svg:y1="8cm" svg:x2="24.2cm" svg:y2="15.597cm">
          <text:p/>
        </draw:line>
        <draw:frame draw:style-name="gr1252" draw:text-style-name="P81" draw:layer="layout" svg:width="8.513cm" svg:height="0.806cm" svg:x="13.089cm" svg:y="1.9cm">
          <draw:text-box>
            <text:p><text:span text:style-name="T27">Geht nicht </text:span><text:span text:style-name="T27">– Zukunft </text:span><text:span text:style-name="T27">trotz </text:span><text:span text:style-name="T27">forwardin</text:span><text:span text:style-name="T27">g</text:span></text:p>
          </draw:text-box>
        </draw:frame>
        <draw:line draw:style-name="gr1253" draw:text-style-name="P4" draw:layer="layout" svg:x1="18.9cm" svg:y1="2.5cm" svg:x2="20.1cm" svg:y2="8.4cm">
          <text:p/>
        </draw:line>
        <draw:line draw:style-name="gr1255" draw:text-style-name="P4" draw:layer="layout" svg:x1="22.2cm" svg:y1="7cm" svg:x2="22.8cm" svg:y2="12.5cm">
          <text:p/>
        </draw:line>
        <draw:line draw:style-name="gr1255" draw:text-style-name="P4" draw:layer="layout" svg:x1="23.558cm" svg:y1="8cm" svg:x2="24.5cm" svg:y2="15.597cm">
          <text:p/>
        </draw:line>
        <draw:frame draw:style-name="gr1256" draw:text-style-name="P81" draw:layer="layout" svg:width="5.828cm" svg:height="0.806cm" svg:x="24cm" svg:y="1.994cm">
          <draw:text-box>
            <text:p><text:span text:style-name="T27">add: </text:span><text:span text:style-name="T27">id_ex_reg</text:span><text:span text:style-name="T27">_rd = x2</text:span></text:p>
          </draw:text-box>
        </draw:frame>
        <draw:frame draw:style-name="gr1257" draw:text-style-name="P81" draw:layer="layout" svg:width="6.268cm" svg:height="0.806cm" svg:x="24.988cm" svg:y="3cm">
          <draw:text-box>
            <text:p><text:span text:style-name="T27">sd: </text:span><text:span text:style-name="T27">if_id_reg_</text:span><text:span text:style-name="T27">rs1 = x2</text:span></text:p>
          </draw:text-box>
        </draw:frame>
        <draw:frame draw:style-name="gr1258" draw:text-style-name="P81" draw:layer="layout" svg:width="5.929cm" svg:height="0.806cm" svg:x="23.988cm" svg:y="1cm">
          <draw:text-box>
            <text:p><text:span text:style-name="T27">sd: </text:span><text:span text:style-name="T27">if_id_me</text:span><text:span text:style-name="T27">mWr = 1</text:span></text:p>
          </draw:text-box>
        </draw:frame>
        <draw:frame draw:style-name="gr1257" draw:text-style-name="P81" draw:layer="layout" svg:width="6.268cm" svg:height="0.806cm" svg:x="24.988cm" svg:y="4cm">
          <draw:text-box>
            <text:p><text:span text:style-name="T27">stall</text:span></text:p>
          </draw:text-box>
        </draw:frame>
        <draw:frame draw:style-name="gr1264" draw:text-style-name="P81" draw:layer="layout" svg:width="0.777cm" svg:height="0.806cm" svg:x="18.222cm" svg:y="9.7cm">
          <draw:text-box>
            <text:p><text:span text:style-name="T27">4</text:span></text:p>
          </draw:text-box>
        </draw:frame>
        <draw:frame draw:style-name="gr1190" draw:text-style-name="P93" draw:layer="layout" svg:width="1.173cm" svg:height="0.962cm" svg:x="15.731cm" svg:y="9cm">
          <draw:text-box>
            <text:p><text:span text:style-name="T34">x2</text:span></text:p>
          </draw:text-box>
        </draw:frame>
        <draw:frame draw:style-name="gr1254" draw:text-style-name="P81" draw:layer="layout" svg:width="3.58cm" svg:height="0.806cm" svg:x="5.009cm" svg:y="12.6cm">
          <draw:text-box>
            <text:p><text:span text:style-name="T27">sd x4, </text:span><text:span text:style-name="T27">4(</text:span><text:span text:style-name="T31">x2)</text:span></text:p>
          </draw:text-box>
        </draw:frame>
        <draw:frame draw:style-name="gr1185" draw:text-style-name="P81" draw:layer="layout" svg:width="3.575cm" svg:height="0.806cm" svg:x="5.01cm" svg:y="15.6cm">
          <draw:text-box>
            <text:p><text:span text:style-name="T27">or x8, </text:span><text:span text:style-name="T31">x2</text:span><text:span text:style-name="T27">, </text:span><text:span text:style-name="T27">x6</text:span></text:p>
          </draw:text-box>
        </draw:frame>
        <draw:frame draw:style-name="gr1251" draw:text-style-name="P81" draw:layer="layout" svg:width="3.586cm" svg:height="0.806cm" svg:x="5.011cm" svg:y="18.6cm">
          <draw:text-box>
            <text:p><text:span text:style-name="T27">add x9, </text:span><text:span text:style-name="T27">x4, </text:span><text:span text:style-name="T31">x2</text:span></text:p>
          </draw:text-box>
        </draw:frame>
        <draw:frame draw:style-name="gr1185" draw:text-style-name="P81" draw:layer="layout" svg:width="3.575cm" svg:height="0.806cm" svg:x="5.012cm" svg:y="21.6cm">
          <draw:text-box>
            <text:p><text:span text:style-name="T27">sub x1, </text:span><text:span text:style-name="T27">x6, x7</text:span></text:p>
          </draw:text-box>
        </draw:frame>
        <draw:frame draw:style-name="gr1254" draw:text-style-name="P81" draw:layer="layout" svg:width="3.58cm" svg:height="0.806cm" svg:x="5.009cm" svg:y="9.6cm">
          <draw:text-box>
            <text:p><text:span text:style-name="T27">nop</text:span></text:p>
          </draw:text-box>
        </draw:frame>
        <draw:line draw:style-name="gr1259" draw:text-style-name="P4" draw:layer="layout" svg:x1="25.101cm" svg:y1="2.6cm" svg:x2="13.999cm" svg:y2="6.241cm">
          <text:p/>
        </draw:line>
        <draw:line draw:style-name="gr1260" draw:text-style-name="P4" draw:layer="layout" svg:x1="25.701cm" svg:y1="3.641cm" svg:x2="14.025cm" svg:y2="9.001cm">
          <text:p/>
        </draw:line>
        <draw:custom-shape draw:style-name="gr1245" draw:text-style-name="P18" draw:layer="layout" svg:width="0.4cm" svg:height="2cm" svg:x="9.802cm" svg:y="9.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45" draw:text-style-name="P18" draw:layer="layout" svg:width="0.4cm" svg:height="2cm" svg:x="13.801cm" svg:y="9.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61" draw:text-style-name="P4" draw:layer="layout" svg:x1="25.227cm" svg:y1="4.713cm" svg:x2="10.126cm" svg:y2="10.008cm">
          <text:p/>
        </draw:line>
        <draw:line draw:style-name="gr1261" draw:text-style-name="P4" draw:layer="layout" svg:x1="25.226cm" svg:y1="4.683cm" svg:x2="14.025cm" svg:y2="9.883cm">
          <text:p/>
        </draw:line>
        <draw:custom-shape draw:style-name="gr1246" draw:text-style-name="P100" draw:layer="layout" svg:width="3.1cm" svg:height="2.4cm" svg:x="18.305cm" svg:y="8.9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46" draw:text-style-name="P100" draw:layer="layout" svg:width="3.1cm" svg:height="2.4cm" svg:x="22.304cm" svg:y="8.9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46" draw:text-style-name="P100" draw:layer="layout" svg:width="3.1cm" svg:height="2.4cm" svg:x="26.403cm" svg:y="8.9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23" draw:style-name="dp1" draw:master-page-name="Standard">
        <draw:custom-shape draw:style-name="gr1245" draw:text-style-name="P18" draw:layer="layout" svg:width="0.4cm" svg:height="2cm" svg:x="17.802cm" svg:y="12.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71" draw:text-style-name="P34" draw:layer="layout" svg:width="4.807cm" svg:height="3.095cm" svg:x="1cm" svg:y="3.005cm">
          <draw:text-box>
            <text:p><text:span text:style-name="T9">Progra</text:span><text:span text:style-name="T9">m</text:span></text:p>
            <text:p><text:span text:style-name="T9">executi</text:span><text:span text:style-name="T9">on</text:span></text:p>
            <text:p><text:span text:style-name="T9">order</text:span></text:p>
            <text:p><text:span text:style-name="T9">(in </text:span><text:span text:style-name="T9">instructi</text:span><text:span text:style-name="T9">ons)</text:span></text:p>
          </draw:text-box>
        </draw:frame>
        <draw:frame draw:style-name="gr1265" draw:text-style-name="P81" draw:layer="layout" svg:width="3.605cm" svg:height="0.806cm" svg:x="1.008cm" svg:y="6.6cm">
          <draw:text-box>
            <text:p><text:span text:style-name="T27">slli </text:span><text:span text:style-name="T31">x2</text:span><text:span text:style-name="T27">, x2, </text:span><text:span text:style-name="T27">8</text:span></text:p>
          </draw:text-box>
        </draw:frame>
        <draw:frame draw:style-name="gr1173" draw:text-style-name="P34" draw:layer="layout" svg:width="6.124cm" svg:height="0.962cm" svg:x="5.699cm" svg:y="4.038cm">
          <draw:text-box>
            <text:p><text:span text:style-name="T9">Time in </text:span><text:span text:style-name="T9">clock </text:span><text:span text:style-name="T9">cycles</text:span></text:p>
          </draw:text-box>
        </draw:frame>
        <draw:line draw:style-name="gr146" draw:text-style-name="P4" draw:layer="layout" svg:x1="1.099cm" svg:y1="6cm" svg:x2="1.099cm" svg:y2="12cm">
          <text:p/>
        </draw:line>
        <draw:line draw:style-name="gr146" draw:text-style-name="P4" draw:layer="layout" svg:x1="5.999cm" svg:y1="5cm" svg:x2="12.999cm" svg:y2="5cm">
          <text:p/>
        </draw:line>
        <draw:g draw:style-name="gr66">
          <draw:polygon draw:style-name="gr1174" draw:text-style-name="P90" draw:layer="layout" svg:width="1.999cm" svg:height="2.999cm" svg:x="14.999cm" svg:y="5.5cm" svg:viewBox="0 0 2000 3000" draw:points="0,0 0,1100 400,1500 0,1900 0,3000 2000,2000 2000,1000">
            <text:p/>
          </draw:polygon>
          <draw:frame draw:style-name="gr1175" draw:text-style-name="P81" draw:layer="layout" svg:width="1.466cm" svg:height="0.806cm" svg:x="15.399cm" svg:y="6.594cm">
            <draw:text-box>
              <text:p><text:span text:style-name="T27">ALU</text:span></text:p>
            </draw:text-box>
          </draw:frame>
        </draw:g>
        <draw:g draw:style-name="gr1">
          <draw:g draw:style-name="gr1">
            <draw:custom-shape draw:style-name="gr1176" draw:text-style-name="P14" draw:layer="layout" svg:width="1cm" svg:height="2cm" svg:x="6.999cm" svg:y="6cm">
              <text:p/>
              <draw:enhanced-geometry svg:viewBox="0 0 21600 21600" draw:type="rectangle" draw:enhanced-path="M 0 0 L 21600 0 21600 21600 0 21600 0 0 Z N"/>
            </draw:custom-shape>
            <draw:custom-shape draw:style-name="gr1177" draw:text-style-name="P1" draw:layer="layout" svg:width="1cm" svg:height="2cm" svg:x="7.999cm" svg:y="6cm">
              <text:p/>
              <draw:enhanced-geometry svg:viewBox="0 0 21600 21600" draw:type="rectangle" draw:enhanced-path="M 0 0 L 21600 0 21600 21600 0 21600 0 0 Z N"/>
            </draw:custom-shape>
          </draw:g>
          <draw:g draw:style-name="gr66">
            <draw:frame draw:style-name="gr1178" draw:text-style-name="P81" draw:layer="layout" svg:width="1.052cm" svg:height="0.806cm" svg:x="7.528cm" svg:y="6.597cm">
              <draw:text-box>
                <text:p><text:span text:style-name="T27">IM</text:span></text:p>
              </draw:text-box>
            </draw:frame>
          </draw:g>
        </draw:g>
        <draw:g draw:style-name="gr1">
          <draw:g draw:style-name="gr1">
            <draw:custom-shape draw:style-name="gr1179" draw:text-style-name="P14" draw:layer="layout" svg:width="1cm" svg:height="2cm" svg:x="10.999cm" svg:y="6cm">
              <text:p/>
              <draw:enhanced-geometry svg:viewBox="0 0 21600 21600" draw:type="rectangle" draw:enhanced-path="M 0 0 L 21600 0 21600 21600 0 21600 0 0 Z N"/>
            </draw:custom-shape>
            <draw:custom-shape draw:style-name="gr1177" draw:text-style-name="P1" draw:layer="layout" svg:width="1cm" svg:height="2cm" svg:x="11.999cm" svg:y="6cm">
              <text:p/>
              <draw:enhanced-geometry svg:viewBox="0 0 21600 21600" draw:type="rectangle" draw:enhanced-path="M 0 0 L 21600 0 21600 21600 0 21600 0 0 Z N"/>
            </draw:custom-shape>
          </draw:g>
          <draw:g draw:style-name="gr66">
            <draw:frame draw:style-name="gr1180" draw:text-style-name="P81" draw:layer="layout" svg:width="1.411cm" svg:height="0.806cm" svg:x="11.528cm" svg:y="6.597cm">
              <draw:text-box>
                <text:p><text:span text:style-name="T27">Reg</text:span></text:p>
              </draw:text-box>
            </draw:frame>
          </draw:g>
        </draw:g>
        <draw:g draw:style-name="gr1">
          <draw:g draw:style-name="gr1">
            <draw:custom-shape draw:style-name="gr1179" draw:text-style-name="P14" draw:layer="layout" svg:width="1cm" svg:height="2cm" svg:x="23.999cm" svg:y="6cm">
              <text:p/>
              <draw:enhanced-geometry svg:viewBox="0 0 21600 21600" draw:mirror-horizontal="true" draw:type="rectangle" draw:enhanced-path="M 0 0 L 21600 0 21600 21600 0 21600 0 0 Z N"/>
            </draw:custom-shape>
            <draw:custom-shape draw:style-name="gr1177" draw:text-style-name="P1" draw:layer="layout" svg:width="1cm" svg:height="2cm" svg:x="22.999cm" svg:y="6cm">
              <text:p/>
              <draw:enhanced-geometry svg:viewBox="0 0 21600 21600" draw:mirror-horizontal="true" draw:type="rectangle" draw:enhanced-path="M 0 0 L 21600 0 21600 21600 0 21600 0 0 Z N"/>
            </draw:custom-shape>
          </draw:g>
          <draw:g draw:style-name="gr66">
            <draw:frame draw:style-name="gr1180" draw:text-style-name="P81" draw:layer="layout" svg:width="1.411cm" svg:height="0.806cm" svg:x="23.35cm" svg:y="6.597cm">
              <draw:text-box>
                <text:p><text:span text:style-name="T27">Reg</text:span></text:p>
              </draw:text-box>
            </draw:frame>
          </draw:g>
        </draw:g>
        <draw:line draw:style-name="gr38" draw:text-style-name="P4" draw:layer="layout" svg:x1="8.999cm" svg:y1="7cm" svg:x2="10.999cm" svg:y2="7cm">
          <text:p/>
        </draw:line>
        <draw:line draw:style-name="gr38" draw:text-style-name="P4" draw:layer="layout" svg:x1="10.499cm" svg:y1="7cm" svg:x2="10.499cm" svg:y2="6.5cm">
          <text:p/>
        </draw:line>
        <draw:line draw:style-name="gr38" draw:text-style-name="P4" draw:layer="layout" svg:x1="10.499cm" svg:y1="6.5cm" svg:x2="10.999cm" svg:y2="6.5cm">
          <text:p/>
        </draw:line>
        <draw:line draw:style-name="gr38" draw:text-style-name="P4" draw:layer="layout" svg:x1="12.999cm" svg:y1="6.5cm" svg:x2="14.999cm" svg:y2="6.5cm">
          <text:p/>
        </draw:line>
        <draw:line draw:style-name="gr38" draw:text-style-name="P4" draw:layer="layout" svg:x1="12.999cm" svg:y1="7.5cm" svg:x2="14.999cm" svg:y2="7.5cm">
          <text:p/>
        </draw:line>
        <draw:line draw:style-name="gr38" draw:text-style-name="P4" draw:layer="layout" svg:x1="16.999cm" svg:y1="7cm" svg:x2="18.999cm" svg:y2="7cm">
          <text:p/>
        </draw:line>
        <draw:line draw:style-name="gr38" draw:text-style-name="P4" draw:layer="layout" svg:x1="20.999cm" svg:y1="7cm" svg:x2="22.999cm" svg:y2="7cm">
          <text:p/>
        </draw:line>
        <draw:g draw:style-name="gr66">
          <draw:polygon draw:style-name="gr1174" draw:text-style-name="P90" draw:layer="layout" svg:width="1.999cm" svg:height="2.999cm" svg:x="18.999cm" svg:y="8.5cm" svg:viewBox="0 0 2000 3000" draw:points="0,0 0,1100 400,1500 0,1900 0,3000 2000,2000 2000,1000">
            <text:p/>
          </draw:polygon>
          <draw:frame draw:style-name="gr1175" draw:text-style-name="P81" draw:layer="layout" svg:width="1.466cm" svg:height="0.806cm" svg:x="19.399cm" svg:y="9.594cm">
            <draw:text-box>
              <text:p><text:span text:style-name="T27">ALU</text:span></text:p>
            </draw:text-box>
          </draw:frame>
        </draw:g>
        <draw:g draw:style-name="gr1">
          <draw:g draw:style-name="gr1">
            <draw:custom-shape draw:style-name="gr1176" draw:text-style-name="P14" draw:layer="layout" svg:width="1cm" svg:height="2cm" svg:x="10.999cm" svg:y="9cm">
              <text:p/>
              <draw:enhanced-geometry svg:viewBox="0 0 21600 21600" draw:type="rectangle" draw:enhanced-path="M 0 0 L 21600 0 21600 21600 0 21600 0 0 Z N"/>
            </draw:custom-shape>
            <draw:custom-shape draw:style-name="gr1177" draw:text-style-name="P1" draw:layer="layout" svg:width="1cm" svg:height="2cm" svg:x="11.999cm" svg:y="9cm">
              <text:p/>
              <draw:enhanced-geometry svg:viewBox="0 0 21600 21600" draw:type="rectangle" draw:enhanced-path="M 0 0 L 21600 0 21600 21600 0 21600 0 0 Z N"/>
            </draw:custom-shape>
          </draw:g>
          <draw:g draw:style-name="gr66">
            <draw:frame draw:style-name="gr1178" draw:text-style-name="P81" draw:layer="layout" svg:width="1.052cm" svg:height="0.806cm" svg:x="11.528cm" svg:y="9.597cm">
              <draw:text-box>
                <text:p><text:span text:style-name="T27">IM</text:span></text:p>
              </draw:text-box>
            </draw:frame>
          </draw:g>
        </draw:g>
        <draw:g draw:style-name="gr1">
          <draw:g draw:style-name="gr1">
            <draw:custom-shape draw:style-name="gr1179" draw:text-style-name="P14" draw:layer="layout" svg:width="1cm" svg:height="2cm" svg:x="14.999cm" svg:y="9cm">
              <text:p/>
              <draw:enhanced-geometry svg:viewBox="0 0 21600 21600" draw:type="rectangle" draw:enhanced-path="M 0 0 L 21600 0 21600 21600 0 21600 0 0 Z N"/>
            </draw:custom-shape>
            <draw:custom-shape draw:style-name="gr1177" draw:text-style-name="P1" draw:layer="layout" svg:width="1cm" svg:height="2cm" svg:x="15.999cm" svg:y="9cm">
              <text:p/>
              <draw:enhanced-geometry svg:viewBox="0 0 21600 21600" draw:type="rectangle" draw:enhanced-path="M 0 0 L 21600 0 21600 21600 0 21600 0 0 Z N"/>
            </draw:custom-shape>
          </draw:g>
          <draw:g draw:style-name="gr66">
            <draw:frame draw:style-name="gr1181" draw:text-style-name="P81" draw:layer="layout" svg:width="1.575cm" svg:height="0.806cm" svg:x="15.528cm" svg:y="9.597cm">
              <draw:text-box>
                <text:p><text:span text:style-name="T27">REG</text:span></text:p>
              </draw:text-box>
            </draw:frame>
          </draw:g>
        </draw:g>
        <draw:g draw:style-name="gr1">
          <draw:g draw:style-name="gr1">
            <draw:custom-shape draw:style-name="gr1179" draw:text-style-name="P14" draw:layer="layout" svg:width="1cm" svg:height="2cm" svg:x="27.999cm" svg:y="9cm">
              <text:p/>
              <draw:enhanced-geometry svg:viewBox="0 0 21600 21600" draw:mirror-horizontal="true" draw:type="rectangle" draw:enhanced-path="M 0 0 L 21600 0 21600 21600 0 21600 0 0 Z N"/>
            </draw:custom-shape>
            <draw:custom-shape draw:style-name="gr1177" draw:text-style-name="P1" draw:layer="layout" svg:width="1cm" svg:height="2cm" svg:x="26.999cm" svg:y="9cm">
              <text:p/>
              <draw:enhanced-geometry svg:viewBox="0 0 21600 21600" draw:mirror-horizontal="true" draw:type="rectangle" draw:enhanced-path="M 0 0 L 21600 0 21600 21600 0 21600 0 0 Z N"/>
            </draw:custom-shape>
          </draw:g>
          <draw:g draw:style-name="gr66">
            <draw:frame draw:style-name="gr1180" draw:text-style-name="P81" draw:layer="layout" svg:width="1.411cm" svg:height="0.806cm" svg:x="27.35cm" svg:y="9.597cm">
              <draw:text-box>
                <text:p><text:span text:style-name="T27">Reg</text:span></text:p>
              </draw:text-box>
            </draw:frame>
          </draw:g>
        </draw:g>
        <draw:line draw:style-name="gr38" draw:text-style-name="P4" draw:layer="layout" svg:x1="12.999cm" svg:y1="10cm" svg:x2="14.999cm" svg:y2="10cm">
          <text:p/>
        </draw:line>
        <draw:line draw:style-name="gr38" draw:text-style-name="P4" draw:layer="layout" svg:x1="14.499cm" svg:y1="10cm" svg:x2="14.499cm" svg:y2="9.5cm">
          <text:p/>
        </draw:line>
        <draw:line draw:style-name="gr38" draw:text-style-name="P4" draw:layer="layout" svg:x1="14.499cm" svg:y1="9.5cm" svg:x2="14.999cm" svg:y2="9.5cm">
          <text:p/>
        </draw:line>
        <draw:line draw:style-name="gr38" draw:text-style-name="P4" draw:layer="layout" svg:x1="16.999cm" svg:y1="9.5cm" svg:x2="18.999cm" svg:y2="9.5cm">
          <text:p/>
        </draw:line>
        <draw:line draw:style-name="gr38" draw:text-style-name="P4" draw:layer="layout" svg:x1="16.999cm" svg:y1="10.5cm" svg:x2="18.999cm" svg:y2="10.5cm">
          <text:p/>
        </draw:line>
        <draw:line draw:style-name="gr38" draw:text-style-name="P4" draw:layer="layout" svg:x1="20.999cm" svg:y1="10cm" svg:x2="22.999cm" svg:y2="10cm">
          <text:p/>
        </draw:line>
        <draw:line draw:style-name="gr38" draw:text-style-name="P4" draw:layer="layout" svg:x1="24.999cm" svg:y1="10cm" svg:x2="26.999cm" svg:y2="10cm">
          <text:p/>
        </draw:line>
        <draw:frame draw:style-name="gr1254" draw:text-style-name="P81" draw:layer="layout" svg:width="3.58cm" svg:height="0.806cm" svg:x="1.009cm" svg:y="9.6cm">
          <draw:text-box>
            <text:p><text:span text:style-name="T27">ld x3, </text:span><text:span text:style-name="T27">0(</text:span><text:span text:style-name="T31">x2)</text:span></text:p>
          </draw:text-box>
        </draw:frame>
        <draw:line draw:style-name="gr1183" draw:text-style-name="P4" draw:layer="layout" svg:x1="9.999cm" svg:y1="5cm" svg:x2="9.999cm" svg:y2="21cm">
          <text:p/>
        </draw:line>
        <draw:line draw:style-name="gr1183" draw:text-style-name="P4" draw:layer="layout" svg:x1="13.999cm" svg:y1="5cm" svg:x2="13.999cm" svg:y2="21cm">
          <text:p/>
        </draw:line>
        <draw:line draw:style-name="gr1183" draw:text-style-name="P4" draw:layer="layout" svg:x1="17.999cm" svg:y1="5cm" svg:x2="17.999cm" svg:y2="21cm">
          <text:p/>
        </draw:line>
        <draw:line draw:style-name="gr1183" draw:text-style-name="P4" draw:layer="layout" svg:x1="21.999cm" svg:y1="5cm" svg:x2="21.999cm" svg:y2="21cm">
          <text:p/>
        </draw:line>
        <draw:line draw:style-name="gr1183" draw:text-style-name="P4" draw:layer="layout" svg:x1="25.999cm" svg:y1="5cm" svg:x2="25.999cm" svg:y2="21cm">
          <text:p/>
        </draw:line>
        <draw:line draw:style-name="gr1183" draw:text-style-name="P4" draw:layer="layout" svg:x1="29.999cm" svg:y1="5cm" svg:x2="29.999cm" svg:y2="21cm">
          <text:p/>
        </draw:line>
        <draw:line draw:style-name="gr1183" draw:text-style-name="P4" draw:layer="layout" svg:x1="33.999cm" svg:y1="5cm" svg:x2="33.999cm" svg:y2="21cm">
          <text:p/>
        </draw:line>
        <draw:frame draw:style-name="gr1184" draw:text-style-name="P34" draw:layer="layout" svg:width="1.949cm" svg:height="0.962cm" svg:x="7.053cm" svg:y="5cm">
          <draw:text-box>
            <text:p><text:span text:style-name="T9">CC 1</text:span></text:p>
          </draw:text-box>
        </draw:frame>
        <draw:frame draw:style-name="gr1184" draw:text-style-name="P34" draw:layer="layout" svg:width="1.949cm" svg:height="0.962cm" svg:x="11.053cm" svg:y="5cm">
          <draw:text-box>
            <text:p><text:span text:style-name="T9">CC 2</text:span></text:p>
          </draw:text-box>
        </draw:frame>
        <draw:frame draw:style-name="gr1184" draw:text-style-name="P34" draw:layer="layout" svg:width="1.949cm" svg:height="0.962cm" svg:x="15.053cm" svg:y="5cm">
          <draw:text-box>
            <text:p><text:span text:style-name="T9">CC 3</text:span></text:p>
          </draw:text-box>
        </draw:frame>
        <draw:frame draw:style-name="gr1184" draw:text-style-name="P34" draw:layer="layout" svg:width="1.949cm" svg:height="0.962cm" svg:x="23.053cm" svg:y="5cm">
          <draw:text-box>
            <text:p><text:span text:style-name="T9">CC 5</text:span></text:p>
          </draw:text-box>
        </draw:frame>
        <draw:frame draw:style-name="gr1184" draw:text-style-name="P34" draw:layer="layout" svg:width="1.949cm" svg:height="0.962cm" svg:x="27.053cm" svg:y="5cm">
          <draw:text-box>
            <text:p><text:span text:style-name="T9">CC 6</text:span></text:p>
          </draw:text-box>
        </draw:frame>
        <draw:frame draw:style-name="gr1184" draw:text-style-name="P34" draw:layer="layout" svg:width="1.949cm" svg:height="0.962cm" svg:x="31.053cm" svg:y="5cm">
          <draw:text-box>
            <text:p><text:span text:style-name="T9">CC 7</text:span></text:p>
          </draw:text-box>
        </draw:frame>
        <draw:frame draw:style-name="gr1184" draw:text-style-name="P34" draw:layer="layout" svg:width="1.949cm" svg:height="0.962cm" svg:x="27.053cm" svg:y="5cm">
          <draw:text-box>
            <text:p><text:span text:style-name="T9">CC 6</text:span></text:p>
          </draw:text-box>
        </draw:frame>
        <draw:frame draw:style-name="gr1184" draw:text-style-name="P34" draw:layer="layout" svg:width="1.949cm" svg:height="0.962cm" svg:x="27.053cm" svg:y="5cm">
          <draw:text-box>
            <text:p><text:span text:style-name="T9">CC 6</text:span></text:p>
          </draw:text-box>
        </draw:frame>
        <draw:frame draw:style-name="gr1185" draw:text-style-name="P81" draw:layer="layout" svg:width="3.575cm" svg:height="0.806cm" svg:x="1.01cm" svg:y="12.6cm">
          <draw:text-box>
            <text:p><text:span text:style-name="T27">sd x3, </text:span><text:span text:style-name="T27">4(</text:span><text:span text:style-name="T31">x2</text:span><text:span text:style-name="T27">)</text:span></text:p>
          </draw:text-box>
        </draw:frame>
        <draw:frame draw:style-name="gr1184" draw:text-style-name="P34" draw:layer="layout" svg:width="1.949cm" svg:height="0.962cm" svg:x="18.999cm" svg:y="5cm">
          <draw:text-box>
            <text:p><text:span text:style-name="T9">CC 4</text:span></text:p>
          </draw:text-box>
        </draw:frame>
        <draw:g draw:style-name="gr1">
          <draw:g draw:style-name="gr1">
            <draw:custom-shape draw:style-name="gr1176" draw:text-style-name="P91" draw:layer="layout" svg:width="1cm" svg:height="2cm" svg:x="18.999cm" svg:y="6cm">
              <text:p/>
              <draw:enhanced-geometry svg:viewBox="0 0 21600 21600" draw:mirror-horizontal="false" draw:mirror-vertical="false" draw:type="rectangle" draw:enhanced-path="M 0 0 L 21600 0 21600 21600 0 21600 0 0 Z N"/>
            </draw:custom-shape>
            <draw:custom-shape draw:style-name="gr1186" draw:text-style-name="P92" draw:layer="layout" svg:width="1cm" svg:height="2cm" svg:x="19.999cm" svg:y="6cm">
              <text:p/>
              <draw:enhanced-geometry svg:viewBox="0 0 21600 21600" draw:mirror-horizontal="false" draw:mirror-vertical="false" draw:type="rectangle" draw:enhanced-path="M 0 0 L 21600 0 21600 21600 0 21600 0 0 Z N"/>
            </draw:custom-shape>
          </draw:g>
          <draw:frame draw:style-name="gr1187" draw:text-style-name="P81" draw:layer="layout" svg:width="1.272cm" svg:height="0.806cm" svg:x="19.365cm" svg:y="6.599cm">
            <draw:text-box>
              <text:p><text:span text:style-name="T27">DM</text:span></text:p>
            </draw:text-box>
          </draw:frame>
        </draw:g>
        <draw:line draw:style-name="gr1209" draw:text-style-name="P4" draw:layer="layout" svg:x1="18.499cm" svg:y1="7cm" svg:x2="18.499cm" svg:y2="8.2cm">
          <text:p/>
        </draw:line>
        <draw:line draw:style-name="gr1209" draw:text-style-name="P4" draw:layer="layout" svg:x1="18.499cm" svg:y1="8.2cm" svg:x2="21.499cm" svg:y2="8.2cm">
          <text:p/>
        </draw:line>
        <draw:line draw:style-name="gr1209" draw:text-style-name="P4" draw:layer="layout" svg:x1="21.499cm" svg:y1="8.2cm" svg:x2="21.999cm" svg:y2="7cm">
          <text:p/>
        </draw:line>
        <draw:g draw:style-name="gr1">
          <draw:g draw:style-name="gr1">
            <draw:custom-shape draw:style-name="gr1176" draw:text-style-name="P91" draw:layer="layout" svg:width="1cm" svg:height="2cm" svg:x="22.999cm" svg:y="9cm">
              <text:p/>
              <draw:enhanced-geometry svg:viewBox="0 0 21600 21600" draw:mirror-horizontal="false" draw:mirror-vertical="false" draw:type="rectangle" draw:enhanced-path="M 0 0 L 21600 0 21600 21600 0 21600 0 0 Z N"/>
            </draw:custom-shape>
            <draw:custom-shape draw:style-name="gr1186" draw:text-style-name="P92" draw:layer="layout" svg:width="1cm" svg:height="2cm" svg:x="23.999cm" svg:y="9cm">
              <text:p/>
              <draw:enhanced-geometry svg:viewBox="0 0 21600 21600" draw:mirror-horizontal="false" draw:mirror-vertical="false" draw:type="rectangle" draw:enhanced-path="M 0 0 L 21600 0 21600 21600 0 21600 0 0 Z N"/>
            </draw:custom-shape>
          </draw:g>
          <draw:frame draw:style-name="gr1187" draw:text-style-name="P81" draw:layer="layout" svg:width="1.272cm" svg:height="0.806cm" svg:x="23.365cm" svg:y="9.599cm">
            <draw:text-box>
              <text:p><text:span text:style-name="T27">DM</text:span></text:p>
            </draw:text-box>
          </draw:frame>
        </draw:g>
        <draw:line draw:style-name="gr38" draw:text-style-name="P4" draw:layer="layout" svg:x1="22.499cm" svg:y1="10cm" svg:x2="22.499cm" svg:y2="11.2cm">
          <text:p/>
        </draw:line>
        <draw:line draw:style-name="gr38" draw:text-style-name="P4" draw:layer="layout" svg:x1="22.499cm" svg:y1="11.2cm" svg:x2="25.499cm" svg:y2="11.2cm">
          <text:p/>
        </draw:line>
        <draw:line draw:style-name="gr38" draw:text-style-name="P4" draw:layer="layout" svg:x1="25.499cm" svg:y1="11.2cm" svg:x2="25.999cm" svg:y2="10cm">
          <text:p/>
        </draw:line>
        <draw:g draw:style-name="gr66">
          <draw:polygon draw:style-name="gr1174" draw:text-style-name="P90" draw:layer="layout" svg:width="1.999cm" svg:height="2.999cm" svg:x="22.999cm" svg:y="11.5cm" svg:viewBox="0 0 2000 3000" draw:points="0,0 0,1100 400,1500 0,1900 0,3000 2000,2000 2000,1000">
            <text:p/>
          </draw:polygon>
          <draw:frame draw:style-name="gr1175" draw:text-style-name="P81" draw:layer="layout" svg:width="1.466cm" svg:height="0.806cm" svg:x="23.399cm" svg:y="12.594cm">
            <draw:text-box>
              <text:p><text:span text:style-name="T27">ALU</text:span></text:p>
            </draw:text-box>
          </draw:frame>
        </draw:g>
        <draw:g draw:style-name="gr1">
          <draw:g draw:style-name="gr1">
            <draw:custom-shape draw:style-name="gr1176" draw:text-style-name="P14" draw:layer="layout" svg:width="1cm" svg:height="2cm" svg:x="14.999cm" svg:y="12cm">
              <text:p/>
              <draw:enhanced-geometry svg:viewBox="0 0 21600 21600" draw:type="rectangle" draw:enhanced-path="M 0 0 L 21600 0 21600 21600 0 21600 0 0 Z N"/>
            </draw:custom-shape>
            <draw:custom-shape draw:style-name="gr1177" draw:text-style-name="P1" draw:layer="layout" svg:width="1cm" svg:height="2cm" svg:x="15.999cm" svg:y="12cm">
              <text:p/>
              <draw:enhanced-geometry svg:viewBox="0 0 21600 21600" draw:type="rectangle" draw:enhanced-path="M 0 0 L 21600 0 21600 21600 0 21600 0 0 Z N"/>
            </draw:custom-shape>
          </draw:g>
          <draw:g draw:style-name="gr66">
            <draw:frame draw:style-name="gr1178" draw:text-style-name="P81" draw:layer="layout" svg:width="1.052cm" svg:height="0.806cm" svg:x="15.528cm" svg:y="12.597cm">
              <draw:text-box>
                <text:p><text:span text:style-name="T27">IM</text:span></text:p>
              </draw:text-box>
            </draw:frame>
          </draw:g>
        </draw:g>
        <draw:g draw:style-name="gr1">
          <draw:g draw:style-name="gr1">
            <draw:custom-shape draw:style-name="gr1179" draw:text-style-name="P14" draw:layer="layout" svg:width="1cm" svg:height="2cm" svg:x="18.999cm" svg:y="12cm">
              <text:p/>
              <draw:enhanced-geometry svg:viewBox="0 0 21600 21600" draw:type="rectangle" draw:enhanced-path="M 0 0 L 21600 0 21600 21600 0 21600 0 0 Z N"/>
            </draw:custom-shape>
            <draw:custom-shape draw:style-name="gr1177" draw:text-style-name="P1" draw:layer="layout" svg:width="1cm" svg:height="2cm" svg:x="19.999cm" svg:y="12cm">
              <text:p/>
              <draw:enhanced-geometry svg:viewBox="0 0 21600 21600" draw:type="rectangle" draw:enhanced-path="M 0 0 L 21600 0 21600 21600 0 21600 0 0 Z N"/>
            </draw:custom-shape>
          </draw:g>
          <draw:g draw:style-name="gr66">
            <draw:frame draw:style-name="gr1181" draw:text-style-name="P81" draw:layer="layout" svg:width="1.575cm" svg:height="0.806cm" svg:x="19.528cm" svg:y="12.597cm">
              <draw:text-box>
                <text:p><text:span text:style-name="T27">REG</text:span></text:p>
              </draw:text-box>
            </draw:frame>
          </draw:g>
        </draw:g>
        <draw:g draw:style-name="gr1">
          <draw:g draw:style-name="gr1">
            <draw:custom-shape draw:style-name="gr1179" draw:text-style-name="P14" draw:layer="layout" svg:width="1cm" svg:height="2cm" svg:x="31.999cm" svg:y="12cm">
              <text:p/>
              <draw:enhanced-geometry svg:viewBox="0 0 21600 21600" draw:mirror-horizontal="true" draw:type="rectangle" draw:enhanced-path="M 0 0 L 21600 0 21600 21600 0 21600 0 0 Z N"/>
            </draw:custom-shape>
            <draw:custom-shape draw:style-name="gr1177" draw:text-style-name="P1" draw:layer="layout" svg:width="1cm" svg:height="2cm" svg:x="30.999cm" svg:y="12cm">
              <text:p/>
              <draw:enhanced-geometry svg:viewBox="0 0 21600 21600" draw:mirror-horizontal="true" draw:type="rectangle" draw:enhanced-path="M 0 0 L 21600 0 21600 21600 0 21600 0 0 Z N"/>
            </draw:custom-shape>
          </draw:g>
          <draw:g draw:style-name="gr66">
            <draw:frame draw:style-name="gr1180" draw:text-style-name="P81" draw:layer="layout" svg:width="1.411cm" svg:height="0.806cm" svg:x="31.35cm" svg:y="12.597cm">
              <draw:text-box>
                <text:p><text:span text:style-name="T27">Reg</text:span></text:p>
              </draw:text-box>
            </draw:frame>
          </draw:g>
        </draw:g>
        <draw:line draw:style-name="gr38" draw:text-style-name="P4" draw:layer="layout" svg:x1="16.999cm" svg:y1="13cm" svg:x2="18.999cm" svg:y2="13cm">
          <text:p/>
        </draw:line>
        <draw:line draw:style-name="gr38" draw:text-style-name="P4" draw:layer="layout" svg:x1="18.499cm" svg:y1="13cm" svg:x2="18.499cm" svg:y2="12.5cm">
          <text:p/>
        </draw:line>
        <draw:line draw:style-name="gr38" draw:text-style-name="P4" draw:layer="layout" svg:x1="18.499cm" svg:y1="12.5cm" svg:x2="18.999cm" svg:y2="12.5cm">
          <text:p/>
        </draw:line>
        <draw:line draw:style-name="gr38" draw:text-style-name="P4" draw:layer="layout" svg:x1="20.999cm" svg:y1="12.5cm" svg:x2="22.999cm" svg:y2="12.5cm">
          <text:p/>
        </draw:line>
        <draw:line draw:style-name="gr38" draw:text-style-name="P4" draw:layer="layout" svg:x1="20.999cm" svg:y1="13.5cm" svg:x2="22.999cm" svg:y2="13.5cm">
          <text:p/>
        </draw:line>
        <draw:line draw:style-name="gr38" draw:text-style-name="P4" draw:layer="layout" svg:x1="24.999cm" svg:y1="13cm" svg:x2="26.999cm" svg:y2="13cm">
          <text:p/>
        </draw:line>
        <draw:line draw:style-name="gr38" draw:text-style-name="P4" draw:layer="layout" svg:x1="28.999cm" svg:y1="13cm" svg:x2="30.999cm" svg:y2="13cm">
          <text:p/>
        </draw:line>
        <draw:g draw:style-name="gr1">
          <draw:g draw:style-name="gr1">
            <draw:custom-shape draw:style-name="gr1176" draw:text-style-name="P91" draw:layer="layout" svg:width="1cm" svg:height="2cm" svg:x="26.999cm" svg:y="12cm">
              <text:p/>
              <draw:enhanced-geometry svg:viewBox="0 0 21600 21600" draw:mirror-horizontal="false" draw:mirror-vertical="false" draw:type="rectangle" draw:enhanced-path="M 0 0 L 21600 0 21600 21600 0 21600 0 0 Z N"/>
            </draw:custom-shape>
            <draw:custom-shape draw:style-name="gr1186" draw:text-style-name="P92" draw:layer="layout" svg:width="1cm" svg:height="2cm" svg:x="27.999cm" svg:y="12cm">
              <text:p/>
              <draw:enhanced-geometry svg:viewBox="0 0 21600 21600" draw:mirror-horizontal="false" draw:mirror-vertical="false" draw:type="rectangle" draw:enhanced-path="M 0 0 L 21600 0 21600 21600 0 21600 0 0 Z N"/>
            </draw:custom-shape>
          </draw:g>
          <draw:frame draw:style-name="gr1187" draw:text-style-name="P81" draw:layer="layout" svg:width="1.272cm" svg:height="0.806cm" svg:x="27.365cm" svg:y="12.599cm">
            <draw:text-box>
              <text:p><text:span text:style-name="T27">DM</text:span></text:p>
            </draw:text-box>
          </draw:frame>
        </draw:g>
        <draw:line draw:style-name="gr38" draw:text-style-name="P4" draw:layer="layout" svg:x1="26.499cm" svg:y1="13cm" svg:x2="26.499cm" svg:y2="14.2cm">
          <text:p/>
        </draw:line>
        <draw:line draw:style-name="gr38" draw:text-style-name="P4" draw:layer="layout" svg:x1="26.499cm" svg:y1="14.2cm" svg:x2="29.499cm" svg:y2="14.2cm">
          <text:p/>
        </draw:line>
        <draw:line draw:style-name="gr38" draw:text-style-name="P4" draw:layer="layout" svg:x1="29.499cm" svg:y1="14.2cm" svg:x2="29.999cm" svg:y2="13cm">
          <text:p/>
        </draw:line>
        <draw:frame draw:style-name="gr1263" draw:text-style-name="P34" draw:layer="layout" svg:width="12.961cm" svg:height="0.962cm" svg:x="8.899cm" svg:y="1cm">
          <draw:text-box>
            <text:p><text:span text:style-name="T9">slli → ld </text:span><text:span text:style-name="T9">→ sd</text:span></text:p>
          </draw:text-box>
        </draw:frame>
        <draw:line draw:style-name="gr1183" draw:text-style-name="P4" draw:layer="layout" svg:x1="37.999cm" svg:y1="5cm" svg:x2="37.999cm" svg:y2="21cm">
          <text:p/>
        </draw:line>
        <draw:g draw:style-name="gr66">
          <draw:polygon draw:style-name="gr1174" draw:text-style-name="P90" draw:layer="layout" svg:width="1.999cm" svg:height="2.999cm" svg:x="26.999cm" svg:y="14.5cm" svg:viewBox="0 0 2000 3000" draw:points="0,0 0,1100 400,1500 0,1900 0,3000 2000,2000 2000,1000">
            <text:p/>
          </draw:polygon>
          <draw:frame draw:style-name="gr1175" draw:text-style-name="P81" draw:layer="layout" svg:width="1.466cm" svg:height="0.806cm" svg:x="27.399cm" svg:y="15.594cm">
            <draw:text-box>
              <text:p><text:span text:style-name="T27">ALU</text:span></text:p>
            </draw:text-box>
          </draw:frame>
        </draw:g>
        <draw:g draw:style-name="gr1">
          <draw:g draw:style-name="gr1">
            <draw:custom-shape draw:style-name="gr1176" draw:text-style-name="P14" draw:layer="layout" svg:width="1cm" svg:height="2cm" svg:x="18.999cm" svg:y="15cm">
              <text:p/>
              <draw:enhanced-geometry svg:viewBox="0 0 21600 21600" draw:type="rectangle" draw:enhanced-path="M 0 0 L 21600 0 21600 21600 0 21600 0 0 Z N"/>
            </draw:custom-shape>
            <draw:custom-shape draw:style-name="gr1177" draw:text-style-name="P1" draw:layer="layout" svg:width="1cm" svg:height="2cm" svg:x="19.999cm" svg:y="15cm">
              <text:p/>
              <draw:enhanced-geometry svg:viewBox="0 0 21600 21600" draw:type="rectangle" draw:enhanced-path="M 0 0 L 21600 0 21600 21600 0 21600 0 0 Z N"/>
            </draw:custom-shape>
          </draw:g>
          <draw:g draw:style-name="gr66">
            <draw:frame draw:style-name="gr1178" draw:text-style-name="P81" draw:layer="layout" svg:width="1.052cm" svg:height="0.806cm" svg:x="19.528cm" svg:y="15.597cm">
              <draw:text-box>
                <text:p><text:span text:style-name="T27">IM</text:span></text:p>
              </draw:text-box>
            </draw:frame>
          </draw:g>
        </draw:g>
        <draw:g draw:style-name="gr1">
          <draw:g draw:style-name="gr1">
            <draw:custom-shape draw:style-name="gr1179" draw:text-style-name="P14" draw:layer="layout" svg:width="1cm" svg:height="2cm" svg:x="22.999cm" svg:y="15cm">
              <text:p/>
              <draw:enhanced-geometry svg:viewBox="0 0 21600 21600" draw:type="rectangle" draw:enhanced-path="M 0 0 L 21600 0 21600 21600 0 21600 0 0 Z N"/>
            </draw:custom-shape>
            <draw:custom-shape draw:style-name="gr1177" draw:text-style-name="P1" draw:layer="layout" svg:width="1cm" svg:height="2cm" svg:x="23.999cm" svg:y="15cm">
              <text:p/>
              <draw:enhanced-geometry svg:viewBox="0 0 21600 21600" draw:type="rectangle" draw:enhanced-path="M 0 0 L 21600 0 21600 21600 0 21600 0 0 Z N"/>
            </draw:custom-shape>
          </draw:g>
          <draw:g draw:style-name="gr66">
            <draw:frame draw:style-name="gr1181" draw:text-style-name="P81" draw:layer="layout" svg:width="1.575cm" svg:height="0.806cm" svg:x="23.528cm" svg:y="15.597cm">
              <draw:text-box>
                <text:p><text:span text:style-name="T27">REG</text:span></text:p>
              </draw:text-box>
            </draw:frame>
          </draw:g>
        </draw:g>
        <draw:g draw:style-name="gr1">
          <draw:g draw:style-name="gr1">
            <draw:custom-shape draw:style-name="gr1179" draw:text-style-name="P14" draw:layer="layout" svg:width="1cm" svg:height="2cm" svg:x="35.999cm" svg:y="15cm">
              <text:p/>
              <draw:enhanced-geometry svg:viewBox="0 0 21600 21600" draw:mirror-horizontal="true" draw:type="rectangle" draw:enhanced-path="M 0 0 L 21600 0 21600 21600 0 21600 0 0 Z N"/>
            </draw:custom-shape>
            <draw:custom-shape draw:style-name="gr1177" draw:text-style-name="P1" draw:layer="layout" svg:width="1cm" svg:height="2cm" svg:x="34.999cm" svg:y="15cm">
              <text:p/>
              <draw:enhanced-geometry svg:viewBox="0 0 21600 21600" draw:mirror-horizontal="true" draw:type="rectangle" draw:enhanced-path="M 0 0 L 21600 0 21600 21600 0 21600 0 0 Z N"/>
            </draw:custom-shape>
          </draw:g>
          <draw:g draw:style-name="gr66">
            <draw:frame draw:style-name="gr1180" draw:text-style-name="P81" draw:layer="layout" svg:width="1.411cm" svg:height="0.806cm" svg:x="35.35cm" svg:y="15.597cm">
              <draw:text-box>
                <text:p><text:span text:style-name="T27">Reg</text:span></text:p>
              </draw:text-box>
            </draw:frame>
          </draw:g>
        </draw:g>
        <draw:line draw:style-name="gr38" draw:text-style-name="P4" draw:layer="layout" svg:x1="20.999cm" svg:y1="16cm" svg:x2="22.999cm" svg:y2="16cm">
          <text:p/>
        </draw:line>
        <draw:line draw:style-name="gr38" draw:text-style-name="P4" draw:layer="layout" svg:x1="22.499cm" svg:y1="16cm" svg:x2="22.499cm" svg:y2="15.5cm">
          <text:p/>
        </draw:line>
        <draw:line draw:style-name="gr38" draw:text-style-name="P4" draw:layer="layout" svg:x1="22.499cm" svg:y1="15.5cm" svg:x2="22.999cm" svg:y2="15.5cm">
          <text:p/>
        </draw:line>
        <draw:line draw:style-name="gr38" draw:text-style-name="P4" draw:layer="layout" svg:x1="24.999cm" svg:y1="15.5cm" svg:x2="26.999cm" svg:y2="15.5cm">
          <text:p/>
        </draw:line>
        <draw:line draw:style-name="gr38" draw:text-style-name="P4" draw:layer="layout" svg:x1="24.999cm" svg:y1="16.5cm" svg:x2="26.999cm" svg:y2="16.5cm">
          <text:p/>
        </draw:line>
        <draw:line draw:style-name="gr38" draw:text-style-name="P4" draw:layer="layout" svg:x1="28.999cm" svg:y1="16cm" svg:x2="30.999cm" svg:y2="16cm">
          <text:p/>
        </draw:line>
        <draw:line draw:style-name="gr38" draw:text-style-name="P4" draw:layer="layout" svg:x1="32.999cm" svg:y1="16cm" svg:x2="34.999cm" svg:y2="16cm">
          <text:p/>
        </draw:line>
        <draw:g draw:style-name="gr1">
          <draw:g draw:style-name="gr1">
            <draw:custom-shape draw:style-name="gr1176" draw:text-style-name="P91" draw:layer="layout" svg:width="1cm" svg:height="2cm" svg:x="30.999cm" svg:y="15cm">
              <text:p/>
              <draw:enhanced-geometry svg:viewBox="0 0 21600 21600" draw:mirror-horizontal="false" draw:mirror-vertical="false" draw:type="rectangle" draw:enhanced-path="M 0 0 L 21600 0 21600 21600 0 21600 0 0 Z N"/>
            </draw:custom-shape>
            <draw:custom-shape draw:style-name="gr1186" draw:text-style-name="P92" draw:layer="layout" svg:width="1cm" svg:height="2cm" svg:x="31.999cm" svg:y="15cm">
              <text:p/>
              <draw:enhanced-geometry svg:viewBox="0 0 21600 21600" draw:mirror-horizontal="false" draw:mirror-vertical="false" draw:type="rectangle" draw:enhanced-path="M 0 0 L 21600 0 21600 21600 0 21600 0 0 Z N"/>
            </draw:custom-shape>
          </draw:g>
          <draw:frame draw:style-name="gr1187" draw:text-style-name="P81" draw:layer="layout" svg:width="1.272cm" svg:height="0.806cm" svg:x="31.365cm" svg:y="15.599cm">
            <draw:text-box>
              <text:p><text:span text:style-name="T27">DM</text:span></text:p>
            </draw:text-box>
          </draw:frame>
        </draw:g>
        <draw:line draw:style-name="gr38" draw:text-style-name="P4" draw:layer="layout" svg:x1="30.499cm" svg:y1="16cm" svg:x2="30.499cm" svg:y2="17.2cm">
          <text:p/>
        </draw:line>
        <draw:line draw:style-name="gr38" draw:text-style-name="P4" draw:layer="layout" svg:x1="30.499cm" svg:y1="17.2cm" svg:x2="33.499cm" svg:y2="17.2cm">
          <text:p/>
        </draw:line>
        <draw:line draw:style-name="gr38" draw:text-style-name="P4" draw:layer="layout" svg:x1="33.499cm" svg:y1="17.2cm" svg:x2="33.999cm" svg:y2="16cm">
          <text:p/>
        </draw:line>
        <draw:g draw:style-name="gr66">
          <draw:polygon draw:style-name="gr1174" draw:text-style-name="P90" draw:layer="layout" svg:width="1.999cm" svg:height="2.999cm" svg:x="30.999cm" svg:y="17.5cm" svg:viewBox="0 0 2000 3000" draw:points="0,0 0,1100 400,1500 0,1900 0,3000 2000,2000 2000,1000">
            <text:p/>
          </draw:polygon>
          <draw:frame draw:style-name="gr1175" draw:text-style-name="P81" draw:layer="layout" svg:width="1.466cm" svg:height="0.806cm" svg:x="31.399cm" svg:y="18.594cm">
            <draw:text-box>
              <text:p><text:span text:style-name="T27">ALU</text:span></text:p>
            </draw:text-box>
          </draw:frame>
        </draw:g>
        <draw:g draw:style-name="gr1">
          <draw:g draw:style-name="gr1">
            <draw:custom-shape draw:style-name="gr1176" draw:text-style-name="P14" draw:layer="layout" svg:width="1cm" svg:height="2cm" svg:x="22.999cm" svg:y="18cm">
              <text:p/>
              <draw:enhanced-geometry svg:viewBox="0 0 21600 21600" draw:type="rectangle" draw:enhanced-path="M 0 0 L 21600 0 21600 21600 0 21600 0 0 Z N"/>
            </draw:custom-shape>
            <draw:custom-shape draw:style-name="gr1177" draw:text-style-name="P1" draw:layer="layout" svg:width="1cm" svg:height="2cm" svg:x="23.999cm" svg:y="18cm">
              <text:p/>
              <draw:enhanced-geometry svg:viewBox="0 0 21600 21600" draw:type="rectangle" draw:enhanced-path="M 0 0 L 21600 0 21600 21600 0 21600 0 0 Z N"/>
            </draw:custom-shape>
          </draw:g>
          <draw:g draw:style-name="gr66">
            <draw:frame draw:style-name="gr1178" draw:text-style-name="P81" draw:layer="layout" svg:width="1.052cm" svg:height="0.806cm" svg:x="23.528cm" svg:y="18.597cm">
              <draw:text-box>
                <text:p><text:span text:style-name="T27">IM</text:span></text:p>
              </draw:text-box>
            </draw:frame>
          </draw:g>
        </draw:g>
        <draw:g draw:style-name="gr1">
          <draw:g draw:style-name="gr1">
            <draw:custom-shape draw:style-name="gr1179" draw:text-style-name="P14" draw:layer="layout" svg:width="1cm" svg:height="2cm" svg:x="26.999cm" svg:y="18cm">
              <text:p/>
              <draw:enhanced-geometry svg:viewBox="0 0 21600 21600" draw:type="rectangle" draw:enhanced-path="M 0 0 L 21600 0 21600 21600 0 21600 0 0 Z N"/>
            </draw:custom-shape>
            <draw:custom-shape draw:style-name="gr1177" draw:text-style-name="P1" draw:layer="layout" svg:width="1cm" svg:height="2cm" svg:x="27.999cm" svg:y="18cm">
              <text:p/>
              <draw:enhanced-geometry svg:viewBox="0 0 21600 21600" draw:type="rectangle" draw:enhanced-path="M 0 0 L 21600 0 21600 21600 0 21600 0 0 Z N"/>
            </draw:custom-shape>
          </draw:g>
          <draw:g draw:style-name="gr66">
            <draw:frame draw:style-name="gr1181" draw:text-style-name="P81" draw:layer="layout" svg:width="1.575cm" svg:height="0.806cm" svg:x="27.528cm" svg:y="18.597cm">
              <draw:text-box>
                <text:p><text:span text:style-name="T27">REG</text:span></text:p>
              </draw:text-box>
            </draw:frame>
          </draw:g>
        </draw:g>
        <draw:g draw:style-name="gr1">
          <draw:g draw:style-name="gr1">
            <draw:custom-shape draw:style-name="gr1179" draw:text-style-name="P14" draw:layer="layout" svg:width="1cm" svg:height="2cm" svg:x="39.999cm" svg:y="18cm">
              <text:p/>
              <draw:enhanced-geometry svg:viewBox="0 0 21600 21600" draw:mirror-horizontal="true" draw:type="rectangle" draw:enhanced-path="M 0 0 L 21600 0 21600 21600 0 21600 0 0 Z N"/>
            </draw:custom-shape>
            <draw:custom-shape draw:style-name="gr1177" draw:text-style-name="P1" draw:layer="layout" svg:width="1cm" svg:height="2cm" svg:x="38.999cm" svg:y="18cm">
              <text:p/>
              <draw:enhanced-geometry svg:viewBox="0 0 21600 21600" draw:mirror-horizontal="true" draw:type="rectangle" draw:enhanced-path="M 0 0 L 21600 0 21600 21600 0 21600 0 0 Z N"/>
            </draw:custom-shape>
          </draw:g>
          <draw:g draw:style-name="gr66">
            <draw:frame draw:style-name="gr1180" draw:text-style-name="P81" draw:layer="layout" svg:width="1.411cm" svg:height="0.806cm" svg:x="39.35cm" svg:y="18.597cm">
              <draw:text-box>
                <text:p><text:span text:style-name="T27">Reg</text:span></text:p>
              </draw:text-box>
            </draw:frame>
          </draw:g>
        </draw:g>
        <draw:line draw:style-name="gr38" draw:text-style-name="P4" draw:layer="layout" svg:x1="24.999cm" svg:y1="19cm" svg:x2="26.999cm" svg:y2="19cm">
          <text:p/>
        </draw:line>
        <draw:line draw:style-name="gr38" draw:text-style-name="P4" draw:layer="layout" svg:x1="26.499cm" svg:y1="19cm" svg:x2="26.499cm" svg:y2="18.5cm">
          <text:p/>
        </draw:line>
        <draw:line draw:style-name="gr38" draw:text-style-name="P4" draw:layer="layout" svg:x1="26.499cm" svg:y1="18.5cm" svg:x2="26.999cm" svg:y2="18.5cm">
          <text:p/>
        </draw:line>
        <draw:line draw:style-name="gr38" draw:text-style-name="P4" draw:layer="layout" svg:x1="28.999cm" svg:y1="18.5cm" svg:x2="30.999cm" svg:y2="18.5cm">
          <text:p/>
        </draw:line>
        <draw:line draw:style-name="gr38" draw:text-style-name="P4" draw:layer="layout" svg:x1="28.999cm" svg:y1="19.5cm" svg:x2="30.999cm" svg:y2="19.5cm">
          <text:p/>
        </draw:line>
        <draw:line draw:style-name="gr38" draw:text-style-name="P4" draw:layer="layout" svg:x1="32.999cm" svg:y1="19cm" svg:x2="34.999cm" svg:y2="19cm">
          <text:p/>
        </draw:line>
        <draw:line draw:style-name="gr38" draw:text-style-name="P4" draw:layer="layout" svg:x1="36.999cm" svg:y1="19cm" svg:x2="38.999cm" svg:y2="19cm">
          <text:p/>
        </draw:line>
        <draw:g draw:style-name="gr1">
          <draw:g draw:style-name="gr1">
            <draw:custom-shape draw:style-name="gr1176" draw:text-style-name="P91" draw:layer="layout" svg:width="1cm" svg:height="2cm" svg:x="34.999cm" svg:y="18cm">
              <text:p/>
              <draw:enhanced-geometry svg:viewBox="0 0 21600 21600" draw:mirror-horizontal="false" draw:mirror-vertical="false" draw:type="rectangle" draw:enhanced-path="M 0 0 L 21600 0 21600 21600 0 21600 0 0 Z N"/>
            </draw:custom-shape>
            <draw:custom-shape draw:style-name="gr1186" draw:text-style-name="P92" draw:layer="layout" svg:width="1cm" svg:height="2cm" svg:x="35.999cm" svg:y="18cm">
              <text:p/>
              <draw:enhanced-geometry svg:viewBox="0 0 21600 21600" draw:mirror-horizontal="false" draw:mirror-vertical="false" draw:type="rectangle" draw:enhanced-path="M 0 0 L 21600 0 21600 21600 0 21600 0 0 Z N"/>
            </draw:custom-shape>
          </draw:g>
          <draw:frame draw:style-name="gr1187" draw:text-style-name="P81" draw:layer="layout" svg:width="1.272cm" svg:height="0.806cm" svg:x="35.365cm" svg:y="18.599cm">
            <draw:text-box>
              <text:p><text:span text:style-name="T27">DM</text:span></text:p>
            </draw:text-box>
          </draw:frame>
        </draw:g>
        <draw:line draw:style-name="gr38" draw:text-style-name="P4" draw:layer="layout" svg:x1="34.499cm" svg:y1="19cm" svg:x2="34.499cm" svg:y2="20.2cm">
          <text:p/>
        </draw:line>
        <draw:line draw:style-name="gr38" draw:text-style-name="P4" draw:layer="layout" svg:x1="34.499cm" svg:y1="20.2cm" svg:x2="37.499cm" svg:y2="20.2cm">
          <text:p/>
        </draw:line>
        <draw:line draw:style-name="gr38" draw:text-style-name="P4" draw:layer="layout" svg:x1="37.499cm" svg:y1="20.2cm" svg:x2="37.999cm" svg:y2="19cm">
          <text:p/>
        </draw:line>
        <draw:frame draw:style-name="gr1254" draw:text-style-name="P81" draw:layer="layout" svg:width="3.58cm" svg:height="0.806cm" svg:x="1.011cm" svg:y="15.6cm">
          <draw:text-box>
            <text:p><text:span text:style-name="T27">jal x0, </text:span><text:span text:style-name="T27">done</text:span></text:p>
          </draw:text-box>
        </draw:frame>
        <draw:frame draw:style-name="gr1266" draw:text-style-name="P81" draw:layer="layout" svg:width="4.165cm" svg:height="0.806cm" svg:x="1.012cm" svg:y="18.6cm">
          <draw:text-box>
            <text:p><text:span text:style-name="T27">beq x2, </text:span><text:span text:style-name="T27">x2, done</text:span></text:p>
          </draw:text-box>
        </draw:frame>
        <draw:custom-shape draw:style-name="gr1189" draw:text-style-name="P4" draw:layer="layout" svg:width="2.6cm" svg:height="2.6cm" svg:x="22.601cm" svg:y="5.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90" draw:text-style-name="P93" draw:layer="layout" svg:width="1.173cm" svg:height="0.962cm" svg:x="23.13cm" svg:y="7.1cm">
          <draw:text-box>
            <text:p><text:span text:style-name="T34">x2</text:span></text:p>
          </draw:text-box>
        </draw:frame>
        <draw:frame draw:style-name="gr1267" draw:text-style-name="P81" draw:layer="layout" svg:width="1.412cm" svg:height="0.806cm" svg:x="19.587cm" svg:y="8.594cm">
          <draw:text-box>
            <text:p><text:span text:style-name="T27">stall</text:span></text:p>
          </draw:text-box>
        </draw:frame>
        <draw:frame draw:style-name="gr1264" draw:text-style-name="P81" draw:layer="layout" svg:width="0.777cm" svg:height="0.806cm" svg:x="18.222cm" svg:y="9.9cm">
          <draw:text-box>
            <text:p><text:span text:style-name="T27">0</text:span></text:p>
          </draw:text-box>
        </draw:frame>
        <draw:frame draw:style-name="gr1190" draw:text-style-name="P93" draw:layer="layout" svg:width="1.173cm" svg:height="0.962cm" svg:x="15.831cm" svg:y="9cm">
          <draw:text-box>
            <text:p><text:span text:style-name="T34">x2</text:span></text:p>
          </draw:text-box>
        </draw:frame>
        <draw:frame draw:style-name="gr1190" draw:text-style-name="P93" draw:layer="layout" svg:width="1.173cm" svg:height="0.962cm" svg:x="19.932cm" svg:y="11.9cm">
          <draw:text-box>
            <text:p><text:span text:style-name="T34">x2</text:span></text:p>
          </draw:text-box>
        </draw:frame>
        <draw:frame draw:style-name="gr1268" draw:text-style-name="P94" draw:layer="layout" svg:width="2.15cm" svg:height="0.569cm" svg:x="16.762cm" svg:y="6.531cm">
          <draw:text-box>
            <text:p><text:span text:style-name="T35">res=0x10000</text:span></text:p>
          </draw:text-box>
        </draw:frame>
        <draw:frame draw:style-name="gr1269" draw:text-style-name="P94" draw:layer="layout" svg:width="2.04cm" svg:height="0.569cm" svg:x="12.848cm" svg:y="6.031cm">
          <draw:text-box>
            <text:p><text:span text:style-name="T35">regA=0x100</text:span></text:p>
          </draw:text-box>
        </draw:frame>
        <draw:frame draw:style-name="gr1270" draw:text-style-name="P94" draw:layer="layout" svg:width="1.361cm" svg:height="0.569cm" svg:x="12.849cm" svg:y="7.032cm">
          <draw:text-box>
            <text:p><text:span text:style-name="T35">imm=8</text:span></text:p>
          </draw:text-box>
        </draw:frame>
        <draw:frame draw:style-name="gr1271" draw:text-style-name="P94" draw:layer="layout" svg:width="0.98cm" svg:height="0.569cm" svg:x="15.05cm" svg:y="7.233cm">
          <draw:text-box>
            <text:p><text:span text:style-name="T35">slli</text:span></text:p>
          </draw:text-box>
        </draw:frame>
        <draw:frame draw:style-name="gr1228" draw:text-style-name="P94" draw:layer="layout" svg:width="2.055cm" svg:height="0.569cm" svg:x="22.9cm" svg:y="6.231cm">
          <draw:text-box>
            <text:p><text:span text:style-name="T35">x2=0x10000</text:span></text:p>
          </draw:text-box>
        </draw:frame>
        <draw:frame draw:style-name="gr1213" draw:text-style-name="P94" draw:layer="layout" svg:width="2.481cm" svg:height="0.569cm" svg:x="12.921cm" svg:y="5cm">
          <draw:text-box>
            <text:p><text:span text:style-name="T35">id_ex_reg_rd=2</text:span></text:p>
          </draw:text-box>
        </draw:frame>
        <draw:frame draw:style-name="gr1216" draw:text-style-name="P94" draw:layer="layout" svg:width="2.891cm" svg:height="0.569cm" svg:x="16.522cm" svg:y="5.001cm">
          <draw:text-box>
            <text:p><text:span text:style-name="T35">ex_mem_reg_rd=</text:span><text:span text:style-name="T35">2</text:span></text:p>
          </draw:text-box>
        </draw:frame>
        <draw:frame draw:style-name="gr1219" draw:text-style-name="P94" draw:layer="layout" svg:width="2.954cm" svg:height="0.569cm" svg:x="20.422cm" svg:y="5.002cm">
          <draw:text-box>
            <text:p><text:span text:style-name="T35">mem_wb_reg_rd</text:span><text:span text:style-name="T35">=2</text:span></text:p>
          </draw:text-box>
        </draw:frame>
        <draw:frame draw:style-name="gr1211" draw:text-style-name="P94" draw:layer="layout" svg:width="2.465cm" svg:height="0.569cm" svg:x="12.822cm" svg:y="9.001cm">
          <draw:text-box>
            <text:p><text:span text:style-name="T35">if_id_reg_rs1=2</text:span></text:p>
          </draw:text-box>
        </draw:frame>
        <draw:frame draw:style-name="gr1214" draw:text-style-name="P94" draw:layer="layout" svg:width="2.623cm" svg:height="0.569cm" svg:x="16.822cm" svg:y="9.002cm">
          <draw:text-box>
            <text:p><text:span text:style-name="T35">id_ex_reg_rs1=2</text:span></text:p>
          </draw:text-box>
        </draw:frame>
        <draw:frame draw:style-name="gr1217" draw:text-style-name="P94" draw:layer="layout" svg:width="3.032cm" svg:height="0.569cm" svg:x="20.523cm" svg:y="9.003cm">
          <draw:text-box>
            <text:p><text:span text:style-name="T35">ex_mem_reg_rs1</text:span><text:span text:style-name="T35">=2</text:span></text:p>
          </draw:text-box>
        </draw:frame>
        <draw:frame draw:style-name="gr1268" draw:text-style-name="P94" draw:layer="layout" svg:width="2.15cm" svg:height="0.569cm" svg:x="20.863cm" svg:y="6.532cm">
          <draw:text-box>
            <text:p><text:span text:style-name="T35">res=0x10000</text:span></text:p>
          </draw:text-box>
        </draw:frame>
        <draw:frame draw:style-name="gr1272" draw:text-style-name="P94" draw:layer="layout" svg:width="1.74cm" svg:height="0.569cm" svg:x="14.999cm" svg:y="10.1cm">
          <draw:text-box>
            <text:p><text:span text:style-name="T35">x2=0x100</text:span></text:p>
          </draw:text-box>
        </draw:frame>
        <draw:frame draw:style-name="gr1272" draw:text-style-name="P94" draw:layer="layout" svg:width="1.74cm" svg:height="0.569cm" svg:x="19.199cm" svg:y="13.201cm">
          <draw:text-box>
            <text:p><text:span text:style-name="T35">x2=0x100</text:span></text:p>
          </draw:text-box>
        </draw:frame>
        <draw:frame draw:style-name="gr1211" draw:text-style-name="P94" draw:layer="layout" svg:width="2.465cm" svg:height="0.569cm" svg:x="16.822cm" svg:y="12.002cm">
          <draw:text-box>
            <text:p><text:span text:style-name="T35">if_id_reg_rs1=2</text:span></text:p>
          </draw:text-box>
        </draw:frame>
        <draw:frame draw:style-name="gr1214" draw:text-style-name="P94" draw:layer="layout" svg:width="2.623cm" svg:height="0.569cm" svg:x="20.822cm" svg:y="12.003cm">
          <draw:text-box>
            <text:p><text:span text:style-name="T35">id_ex_reg_rs1=2</text:span></text:p>
          </draw:text-box>
        </draw:frame>
        <draw:frame draw:style-name="gr1217" draw:text-style-name="P94" draw:layer="layout" svg:width="3.032cm" svg:height="0.569cm" svg:x="24.522cm" svg:y="12.004cm">
          <draw:text-box>
            <text:p><text:span text:style-name="T35">ex_mem_reg_rs1</text:span><text:span text:style-name="T35">=2</text:span></text:p>
          </draw:text-box>
        </draw:frame>
        <draw:frame draw:style-name="gr1220" draw:text-style-name="P94" draw:layer="layout" svg:width="3.095cm" svg:height="0.569cm" svg:x="24.824cm" svg:y="9.004cm">
          <draw:text-box>
            <text:p><text:span text:style-name="T35">mem_wb_reg_rs</text:span><text:span text:style-name="T35">1=2</text:span></text:p>
          </draw:text-box>
        </draw:frame>
        <draw:frame draw:style-name="gr1220" draw:text-style-name="P94" draw:layer="layout" svg:width="3.095cm" svg:height="0.569cm" svg:x="28.823cm" svg:y="12.005cm">
          <draw:text-box>
            <text:p><text:span text:style-name="T35">mem_wb_reg_rs</text:span><text:span text:style-name="T35">1=2</text:span></text:p>
          </draw:text-box>
        </draw:frame>
        <draw:frame draw:style-name="gr1264" draw:text-style-name="P81" draw:layer="layout" svg:width="0.777cm" svg:height="0.806cm" svg:x="22.323cm" svg:y="12.9cm">
          <draw:text-box>
            <text:p><text:span text:style-name="T27">4</text:span></text:p>
          </draw:text-box>
        </draw:frame>
        <draw:frame draw:style-name="gr1268" draw:text-style-name="P94" draw:layer="layout" svg:width="2.15cm" svg:height="0.569cm" svg:x="20.863cm" svg:y="9.532cm">
          <draw:text-box>
            <text:p><text:span text:style-name="T35">res=0x10000</text:span></text:p>
          </draw:text-box>
        </draw:frame>
        <draw:frame draw:style-name="gr1273" draw:text-style-name="P94" draw:layer="layout" svg:width="1.992cm" svg:height="0.569cm" svg:x="22.864cm" svg:y="10.033cm">
          <draw:text-box>
            <text:p><text:span text:style-name="T35">0x100-&gt;0x5</text:span></text:p>
          </draw:text-box>
        </draw:frame>
        <draw:frame draw:style-name="gr1274" draw:text-style-name="P94" draw:layer="layout" svg:width="1.425cm" svg:height="0.569cm" svg:x="26.999cm" svg:y="10.101cm">
          <draw:text-box>
            <text:p><text:span text:style-name="T35">x3=0x1</text:span></text:p>
          </draw:text-box>
        </draw:frame>
        <draw:frame draw:style-name="gr1275" draw:text-style-name="P94" draw:layer="layout" svg:width="2.323cm" svg:height="0.569cm" svg:x="12.822cm" svg:y="10.102cm">
          <draw:text-box>
            <text:p><text:span text:style-name="T35">if_id_reg_rd=3</text:span></text:p>
          </draw:text-box>
        </draw:frame>
        <draw:frame draw:style-name="gr1213" draw:text-style-name="P94" draw:layer="layout" svg:width="2.481cm" svg:height="0.569cm" svg:x="16.823cm" svg:y="10.703cm">
          <draw:text-box>
            <text:p><text:span text:style-name="T35">id_ex_reg_rd=3</text:span></text:p>
          </draw:text-box>
        </draw:frame>
        <draw:frame draw:style-name="gr1216" draw:text-style-name="P94" draw:layer="layout" svg:width="2.891cm" svg:height="0.569cm" svg:x="20.124cm" svg:y="10.704cm">
          <draw:text-box>
            <text:p><text:span text:style-name="T35">ex_mem_reg_rd=</text:span><text:span text:style-name="T35">3</text:span></text:p>
          </draw:text-box>
        </draw:frame>
        <draw:frame draw:style-name="gr1219" draw:text-style-name="P94" draw:layer="layout" svg:width="2.954cm" svg:height="0.569cm" svg:x="24.825cm" svg:y="10.405cm">
          <draw:text-box>
            <text:p><text:span text:style-name="T35">mem_wb_reg_rd</text:span><text:span text:style-name="T35">=3</text:span></text:p>
          </draw:text-box>
        </draw:frame>
        <draw:frame draw:style-name="gr1268" draw:text-style-name="P94" draw:layer="layout" svg:width="2.15cm" svg:height="0.569cm" svg:x="24.864cm" svg:y="12.533cm">
          <draw:text-box>
            <text:p><text:span text:style-name="T35">res=0x10004</text:span></text:p>
          </draw:text-box>
        </draw:frame>
        <draw:frame draw:style-name="gr1273" draw:text-style-name="P94" draw:layer="layout" svg:width="1.992cm" svg:height="0.569cm" svg:x="26.808cm" svg:y="13.2cm">
          <draw:text-box>
            <text:p><text:span text:style-name="T35">0x104-&gt;0x6</text:span></text:p>
          </draw:text-box>
        </draw:frame>
        <draw:frame draw:style-name="gr1211" draw:text-style-name="P94" draw:layer="layout" svg:width="2.465cm" svg:height="0.569cm" svg:x="16.822cm" svg:y="13.403cm">
          <draw:text-box>
            <text:p><text:span text:style-name="T35">if_id_reg_rs2=3</text:span></text:p>
          </draw:text-box>
        </draw:frame>
        <draw:frame draw:style-name="gr1274" draw:text-style-name="P94" draw:layer="layout" svg:width="1.425cm" svg:height="0.569cm" svg:x="19.199cm" svg:y="13.502cm">
          <draw:text-box>
            <text:p><text:span text:style-name="T35">x3=0x6</text:span></text:p>
          </draw:text-box>
        </draw:frame>
        <draw:frame draw:style-name="gr1276" draw:text-style-name="P94" draw:layer="layout" svg:width="3.237cm" svg:height="0.569cm" svg:x="16.522cm" svg:y="4.102cm">
          <draw:text-box>
            <text:p><text:span text:style-name="T35">ex_mem_reg_wr</text:span><text:span text:style-name="T35">_s=1</text:span></text:p>
          </draw:text-box>
        </draw:frame>
        <draw:custom-shape draw:style-name="gr1277" draw:text-style-name="P4" draw:layer="layout" svg:width="3.1cm" svg:height="0.9cm" svg:x="16.6cm" svg:y="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77" draw:text-style-name="P4" draw:layer="layout" svg:width="3.1cm" svg:height="0.9cm" svg:x="16.601cm" svg:y="4.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77" draw:text-style-name="P4" draw:layer="layout" svg:width="3.1cm" svg:height="0.9cm" svg:x="16.602cm" svg:y="8.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78" draw:text-style-name="P81" draw:layer="layout" svg:width="3.324cm" svg:height="0.806cm" svg:x="16.647cm" svg:y="3.3cm">
          <draw:text-box>
            <text:p><text:span text:style-name="T27">forwardA</text:span><text:span text:style-name="T27">=10</text:span></text:p>
          </draw:text-box>
        </draw:frame>
        <draw:line draw:style-name="gr1279" draw:text-style-name="P4" draw:layer="layout" svg:x1="18.1cm" svg:y1="7cm" svg:x2="18.6cm" svg:y2="9.2cm">
          <text:p/>
        </draw:line>
        <draw:frame draw:style-name="gr1269" draw:text-style-name="P94" draw:layer="layout" svg:width="2.04cm" svg:height="0.569cm" svg:x="16.822cm" svg:y="9.331cm">
          <draw:text-box>
            <text:p><text:span text:style-name="T35">regA=0x100</text:span></text:p>
          </draw:text-box>
        </draw:frame>
        <draw:frame draw:style-name="gr1269" draw:text-style-name="P94" draw:layer="layout" svg:width="2.04cm" svg:height="0.569cm" svg:x="20.761cm" svg:y="12.331cm">
          <draw:text-box>
            <text:p><text:span text:style-name="T35">regA=0x100</text:span></text:p>
          </draw:text-box>
        </draw:frame>
        <draw:custom-shape draw:style-name="gr1277" draw:text-style-name="P4" draw:layer="layout" svg:width="3.1cm" svg:height="0.9cm" svg:x="20.402cm" svg:y="4.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77" draw:text-style-name="P4" draw:layer="layout" svg:width="3.1cm" svg:height="0.9cm" svg:x="20.403cm" svg:y="11.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78" draw:text-style-name="P81" draw:layer="layout" svg:width="3.324cm" svg:height="0.806cm" svg:x="20.348cm" svg:y="3.3cm">
          <draw:text-box>
            <text:p><text:span text:style-name="T27">forwardA</text:span><text:span text:style-name="T27">=01</text:span></text:p>
          </draw:text-box>
        </draw:frame>
        <draw:frame draw:style-name="gr1280" draw:text-style-name="P94" draw:layer="layout" svg:width="3.3cm" svg:height="0.569cm" svg:x="20.323cm" svg:y="4.103cm">
          <draw:text-box>
            <text:p><text:span text:style-name="T35">mem_wb_reg_wr</text:span><text:span text:style-name="T35">_s=1</text:span></text:p>
          </draw:text-box>
        </draw:frame>
        <draw:custom-shape draw:style-name="gr1277" draw:text-style-name="P4" draw:layer="layout" svg:width="3.1cm" svg:height="0.9cm" svg:x="20.401cm" svg:y="3.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79" draw:text-style-name="P4" draw:layer="layout" svg:x1="22.14cm" svg:y1="7cm" svg:x2="22.7cm" svg:y2="12.1cm">
          <text:p/>
        </draw:line>
        <draw:frame draw:style-name="gr1230" draw:text-style-name="P94" draw:layer="layout" svg:width="2.308cm" svg:height="0.569cm" svg:x="22.864cm" svg:y="10.334cm">
          <draw:text-box>
            <text:p><text:span text:style-name="T35">0x10000-&gt;0x1</text:span></text:p>
          </draw:text-box>
        </draw:frame>
        <draw:custom-shape draw:style-name="gr1281" draw:text-style-name="P4" draw:layer="layout" svg:width="3.1cm" svg:height="0.9cm" svg:x="16.603cm" svg:y="10.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1" draw:text-style-name="P4" draw:layer="layout" svg:width="3.1cm" svg:height="0.9cm" svg:x="16.604cm" svg:y="13.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82" draw:text-style-name="P94" draw:layer="layout" svg:width="3.474cm" svg:height="0.569cm" svg:x="18.326cm" svg:y="8.231cm">
          <draw:text-box>
            <text:p><text:span text:style-name="T35">dmem_rd_execut</text:span><text:span text:style-name="T35">e_s=1</text:span></text:p>
          </draw:text-box>
        </draw:frame>
        <draw:custom-shape draw:style-name="gr1281" draw:text-style-name="P4" draw:layer="layout" svg:width="3.1cm" svg:height="0.9cm" svg:x="18.504cm" svg:y="8.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45" draw:text-style-name="P18" draw:layer="layout" svg:width="0.4cm" svg:height="2cm" svg:x="13.801cm" svg:y="12.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46" draw:text-style-name="P100" draw:layer="layout" svg:width="3.1cm" svg:height="2.4cm" svg:x="22.306cm" svg:y="11.80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46" draw:text-style-name="P100" draw:layer="layout" svg:width="3.1cm" svg:height="2.4cm" svg:x="26.307cm" svg:y="11.80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46" draw:text-style-name="P100" draw:layer="layout" svg:width="3.1cm" svg:height="2.4cm" svg:x="30.308cm" svg:y="11.80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185" draw:text-style-name="P81" draw:layer="layout" svg:width="3.575cm" svg:height="0.806cm" svg:x="5.01cm" svg:y="15.6cm">
          <draw:text-box>
            <text:p><text:span text:style-name="T27">sd x3, </text:span><text:span text:style-name="T27">4(</text:span><text:span text:style-name="T31">x2</text:span><text:span text:style-name="T27">)</text:span></text:p>
          </draw:text-box>
        </draw:frame>
        <draw:frame draw:style-name="gr1254" draw:text-style-name="P81" draw:layer="layout" svg:width="3.58cm" svg:height="0.806cm" svg:x="5.011cm" svg:y="18.6cm">
          <draw:text-box>
            <text:p><text:span text:style-name="T27">jal x0, </text:span><text:span text:style-name="T27">done</text:span></text:p>
          </draw:text-box>
        </draw:frame>
        <draw:frame draw:style-name="gr1185" draw:text-style-name="P81" draw:layer="layout" svg:width="3.575cm" svg:height="0.806cm" svg:x="5.011cm" svg:y="12.6cm">
          <draw:text-box>
            <text:p><text:span text:style-name="T27">nop</text:span></text:p>
          </draw:text-box>
        </draw:frame>
        <draw:frame draw:style-name="gr1211" draw:text-style-name="P94" draw:layer="layout" svg:width="2.465cm" svg:height="0.569cm" svg:x="20.822cm" svg:y="14.903cm">
          <draw:text-box>
            <text:p><text:span text:style-name="T35">if_id_reg_rs1=2</text:span></text:p>
          </draw:text-box>
        </draw:frame>
        <draw:frame draw:style-name="gr1211" draw:text-style-name="P94" draw:layer="layout" svg:width="2.465cm" svg:height="0.569cm" svg:x="20.822cm" svg:y="16.404cm">
          <draw:text-box>
            <text:p><text:span text:style-name="T35">if_id_reg_rs2=3</text:span></text:p>
          </draw:text-box>
        </draw:frame>
        <draw:frame draw:style-name="gr1228" draw:text-style-name="P89" draw:layer="layout" svg:width="2.055cm" svg:height="0.569cm" svg:x="22.901cm" svg:y="15.232cm">
          <draw:text-box>
            <text:p><text:span text:style-name="T30">x2=0x10000</text:span></text:p>
          </draw:text-box>
        </draw:frame>
        <draw:frame draw:style-name="gr1274" draw:text-style-name="P94" draw:layer="layout" svg:width="1.425cm" svg:height="0.569cm" svg:x="23.2cm" svg:y="16.203cm">
          <draw:text-box>
            <text:p><text:span text:style-name="T35">x3=0x6</text:span></text:p>
          </draw:text-box>
        </draw:frame>
        <draw:frame draw:style-name="gr1283" draw:text-style-name="P94" draw:layer="layout" svg:width="2.355cm" svg:height="0.569cm" svg:x="24.762cm" svg:y="15.332cm">
          <draw:text-box>
            <text:p><text:span text:style-name="T35">regA=0x10000</text:span></text:p>
          </draw:text-box>
        </draw:frame>
        <draw:frame draw:style-name="gr1214" draw:text-style-name="P94" draw:layer="layout" svg:width="2.623cm" svg:height="0.569cm" svg:x="24.823cm" svg:y="14.904cm">
          <draw:text-box>
            <text:p><text:span text:style-name="T35">id_ex_reg_rs1=2</text:span></text:p>
          </draw:text-box>
        </draw:frame>
        <draw:frame draw:style-name="gr1264" draw:text-style-name="P81" draw:layer="layout" svg:width="0.777cm" svg:height="0.806cm" svg:x="26.124cm" svg:y="15.9cm">
          <draw:text-box>
            <text:p><text:span text:style-name="T27">4</text:span></text:p>
          </draw:text-box>
        </draw:frame>
        <draw:frame draw:style-name="gr1217" draw:text-style-name="P94" draw:layer="layout" svg:width="3.032cm" svg:height="0.569cm" svg:x="28.223cm" svg:y="14.805cm">
          <draw:text-box>
            <text:p><text:span text:style-name="T35">ex_mem_reg_rs1</text:span><text:span text:style-name="T35">=2</text:span></text:p>
          </draw:text-box>
        </draw:frame>
        <draw:frame draw:style-name="gr1268" draw:text-style-name="P94" draw:layer="layout" svg:width="2.15cm" svg:height="0.569cm" svg:x="28.765cm" svg:y="15.534cm">
          <draw:text-box>
            <text:p><text:span text:style-name="T35">res=0x10004</text:span></text:p>
          </draw:text-box>
        </draw:frame>
        <draw:frame draw:style-name="gr1230" draw:text-style-name="P94" draw:layer="layout" svg:width="2.308cm" svg:height="0.569cm" svg:x="30.808cm" svg:y="16.201cm">
          <draw:text-box>
            <text:p><text:span text:style-name="T35">0x10004-&gt;0x6</text:span></text:p>
          </draw:text-box>
        </draw:frame>
      </draw:page>
      <draw:page draw:name="page24" draw:style-name="dp1" draw:master-page-name="Default">
        <draw:custom-shape draw:style-name="gr1284" draw:text-style-name="P8" draw:layer="layout" svg:width="2.011cm" svg:height="6cm" svg:x="10.989cm" svg:y="9cm">
          <text:p text:style-name="P7"><text:span text:style-name="T2">TAP</text:span></text:p>
          <draw:enhanced-geometry svg:viewBox="0 0 21600 21600" draw:type="rectangle" draw:enhanced-path="M 0 0 L 21600 0 21600 21600 0 21600 0 0 Z N"/>
        </draw:custom-shape>
        <draw:frame draw:style-name="gr46" draw:text-style-name="P9" draw:layer="layout" svg:width="1.184cm" svg:height="0.725cm" svg:x="7.996cm" svg:y="10cm">
          <draw:text-box>
            <text:p><text:span text:style-name="T2">TDI</text:span></text:p>
          </draw:text-box>
        </draw:frame>
        <draw:frame draw:style-name="gr47" draw:text-style-name="P9" draw:layer="layout" svg:width="1.396cm" svg:height="0.725cm" svg:x="7.996cm" svg:y="11.001cm">
          <draw:text-box>
            <text:p><text:span text:style-name="T2">TMS</text:span></text:p>
          </draw:text-box>
        </draw:frame>
        <draw:frame draw:style-name="gr48" draw:text-style-name="P9" draw:layer="layout" svg:width="1.349cm" svg:height="0.725cm" svg:x="7.997cm" svg:y="12.002cm">
          <draw:text-box>
            <text:p><text:span text:style-name="T2">TCK</text:span></text:p>
          </draw:text-box>
        </draw:frame>
        <draw:frame draw:style-name="gr47" draw:text-style-name="P9" draw:layer="layout" svg:width="1.396cm" svg:height="0.725cm" svg:x="7.998cm" svg:y="13.003cm">
          <draw:text-box>
            <text:p><text:span text:style-name="T2">TDO</text:span></text:p>
          </draw:text-box>
        </draw:frame>
        <draw:frame draw:style-name="gr49" draw:text-style-name="P9" draw:layer="layout" svg:width="1.607cm" svg:height="0.725cm" svg:x="7.996cm" svg:y="9.001cm">
          <draw:text-box>
            <text:p><text:span text:style-name="T2">TRST</text:span></text:p>
          </draw:text-box>
        </draw:frame>
        <draw:line draw:style-name="gr50" draw:text-style-name="P4" draw:layer="layout" svg:x1="9.4cm" svg:y1="9.5cm" svg:x2="10.989cm" svg:y2="9.5cm">
          <text:p/>
        </draw:line>
        <draw:line draw:style-name="gr50" draw:text-style-name="P4" draw:layer="layout" svg:x1="9.4cm" svg:y1="10.5cm" svg:x2="10.989cm" svg:y2="10.5cm">
          <text:p/>
        </draw:line>
        <draw:line draw:style-name="gr50" draw:text-style-name="P4" draw:layer="layout" svg:x1="9.4cm" svg:y1="11.5cm" svg:x2="10.989cm" svg:y2="11.5cm">
          <text:p/>
        </draw:line>
        <draw:line draw:style-name="gr50" draw:text-style-name="P4" draw:layer="layout" svg:x1="9.4cm" svg:y1="12.5cm" svg:x2="10.989cm" svg:y2="12.5cm">
          <text:p/>
        </draw:line>
        <draw:line draw:style-name="gr51" draw:text-style-name="P4" draw:layer="layout" svg:x1="10.989cm" svg:y1="13.5cm" svg:x2="9.393cm" svg:y2="13.5cm">
          <text:p/>
        </draw:line>
        <draw:line draw:style-name="gr53" draw:text-style-name="P4" draw:layer="layout" svg:x1="13cm" svg:y1="10cm" svg:x2="18cm" svg:y2="10cm">
          <text:p/>
        </draw:line>
        <draw:g draw:style-name="gr1">
          <draw:custom-shape draw:style-name="gr54" draw:text-style-name="P10" draw:layer="layout" svg:width="5cm" svg:height="6cm" svg:x="21cm" svg:y="12cm">
            <text:p text:style-name="P7"><text:span text:style-name="T2">IMem</text:span></text:p>
            <draw:enhanced-geometry svg:viewBox="0 0 21600 21600" draw:type="rectangle" draw:enhanced-path="M 0 0 L 21600 0 21600 21600 0 21600 0 0 Z N"/>
          </draw:custom-shape>
          <draw:frame draw:style-name="gr55" draw:text-style-name="P9" draw:layer="layout" svg:width="3.313cm" svg:height="0.725cm" svg:x="20.987cm" svg:y="13cm">
            <draw:text-box>
              <text:p><text:span text:style-name="T2">loadData(3</text:span><text:span text:style-name="T2">1:0)</text:span></text:p>
            </draw:text-box>
          </draw:frame>
          <draw:frame draw:style-name="gr55" draw:text-style-name="P9" draw:layer="layout" svg:width="3.313cm" svg:height="0.725cm" svg:x="20.987cm" svg:y="11.975cm">
            <draw:text-box>
              <text:p><text:span text:style-name="T2">loadAddr(6</text:span><text:span text:style-name="T2">3:0)</text:span></text:p>
            </draw:text-box>
          </draw:frame>
          <draw:frame draw:style-name="gr56" draw:text-style-name="P9" draw:layer="layout" svg:width="1.467cm" svg:height="0.725cm" svg:x="21cm" svg:y="13.975cm">
            <draw:text-box>
              <text:p><text:span text:style-name="T2">wrEn</text:span></text:p>
            </draw:text-box>
          </draw:frame>
          <draw:frame draw:style-name="gr57" draw:text-style-name="P9" draw:layer="layout" svg:width="3.36cm" svg:height="0.725cm" svg:x="21cm" svg:y="16cm">
            <draw:text-box>
              <text:p><text:span text:style-name="T2">readAddr(6</text:span><text:span text:style-name="T2">3:0)</text:span></text:p>
            </draw:text-box>
          </draw:frame>
          <draw:frame draw:style-name="gr57" draw:text-style-name="P9" draw:layer="layout" svg:width="3.36cm" svg:height="0.725cm" svg:x="22.64cm" svg:y="15cm">
            <draw:text-box>
              <text:p><text:span text:style-name="T2">readData(3</text:span><text:span text:style-name="T2">1:0)</text:span></text:p>
            </draw:text-box>
          </draw:frame>
        </draw:g>
        <draw:g draw:style-name="gr1">
          <draw:custom-shape draw:style-name="gr59" draw:text-style-name="P8" draw:layer="layout" svg:width="1cm" svg:height="2cm" svg:x="19cm" svg:y="15.5cm">
            <text:p text:style-name="P7"><text:span text:style-name="T2">PC</text:span></text:p>
            <draw:enhanced-geometry svg:viewBox="0 0 21600 21600" draw:type="rectangle" draw:enhanced-path="M 0 0 L 21600 0 21600 21600 0 21600 0 0 Z N"/>
          </draw:custom-shape>
          <draw:line draw:style-name="gr60" draw:text-style-name="P11" draw:layer="layout" svg:x1="19cm" svg:y1="17.4cm" svg:x2="19.3cm" svg:y2="17.3cm">
            <text:p/>
          </draw:line>
          <draw:line draw:style-name="gr60" draw:text-style-name="P11" draw:layer="layout" svg:x1="19cm" svg:y1="17.2cm" svg:x2="19.3cm" svg:y2="17.3cm">
            <text:p/>
          </draw:line>
        </draw:g>
        <draw:frame draw:style-name="gr61" draw:text-style-name="P9" draw:layer="layout" svg:width="1.09cm" svg:height="0.725cm" svg:x="20cm" svg:y="15.8cm">
          <draw:text-box>
            <text:p><text:span text:style-name="T2">PC</text:span></text:p>
          </draw:text-box>
        </draw:frame>
        <draw:line draw:style-name="gr63" draw:text-style-name="P4" draw:layer="layout" svg:x1="20.005cm" svg:y1="16.5cm" svg:x2="21cm" svg:y2="16.5cm">
          <text:p/>
        </draw:line>
        <draw:line draw:style-name="gr38" draw:text-style-name="P4" draw:layer="layout" svg:x1="26cm" svg:y1="15.5cm" svg:x2="29cm" svg:y2="15.5cm">
          <text:p/>
        </draw:line>
        <draw:frame draw:style-name="gr72" draw:text-style-name="P9" draw:layer="layout" svg:width="2.411cm" svg:height="0.725cm" svg:x="26cm" svg:y="14.804cm">
          <draw:text-box>
            <text:p><text:span text:style-name="T2">instr(31:0)</text:span></text:p>
          </draw:text-box>
        </draw:frame>
        <draw:g draw:style-name="gr1">
          <draw:custom-shape draw:style-name="gr1285" draw:text-style-name="P1" draw:layer="layout" svg:width="1cm" svg:height="2cm" svg:x="36cm" svg:y="5cm">
            <text:p/>
            <draw:enhanced-geometry svg:viewBox="0 0 21600 21600" draw:type="rectangle" draw:enhanced-path="M 0 0 L 21600 0 21600 21600 0 21600 0 0 Z N"/>
          </draw:custom-shape>
          <draw:polygon draw:style-name="gr155" draw:text-style-name="P14" draw:layer="layout" svg:width="0.199cm" svg:height="0.199cm" svg:x="36cm" svg:y="6.7cm" svg:viewBox="0 0 200 200" draw:points="0,200 200,100 0,0">
            <text:p/>
          </draw:polygon>
          <draw:frame draw:style-name="gr1286" draw:text-style-name="P101" draw:layer="layout" svg:width="1.025cm" svg:height="0.806cm" svg:x="35.75cm" svg:y="5.994cm">
            <draw:text-box>
              <text:p><text:span text:style-name="T44">se</text:span></text:p>
            </draw:text-box>
          </draw:frame>
          <draw:frame draw:style-name="gr1287" draw:text-style-name="P101" draw:layer="layout" svg:width="0.888cm" svg:height="0.806cm" svg:x="35.75cm" svg:y="4.994cm">
            <draw:text-box>
              <text:p><text:span text:style-name="T44">di</text:span></text:p>
            </draw:text-box>
          </draw:frame>
          <draw:frame draw:style-name="gr1288" draw:text-style-name="P101" draw:layer="layout" svg:width="0.75cm" svg:height="0.806cm" svg:x="35.75cm" svg:y="5.5cm">
            <draw:text-box>
              <text:p><text:span text:style-name="T44">ti</text:span></text:p>
            </draw:text-box>
          </draw:frame>
          <draw:frame draw:style-name="gr1289" draw:text-style-name="P101" draw:layer="layout" svg:width="1.053cm" svg:height="0.806cm" svg:x="36.2cm" svg:y="5cm">
            <draw:text-box>
              <text:p><text:span text:style-name="T44">do</text:span></text:p>
            </draw:text-box>
          </draw:frame>
        </draw:g>
        <draw:g draw:style-name="gr1">
          <draw:custom-shape draw:style-name="gr1285" draw:text-style-name="P1" draw:layer="layout" svg:width="1cm" svg:height="2cm" svg:x="36.001cm" svg:y="8.001cm">
            <text:p/>
            <draw:enhanced-geometry svg:viewBox="0 0 21600 21600" draw:type="rectangle" draw:enhanced-path="M 0 0 L 21600 0 21600 21600 0 21600 0 0 Z N"/>
          </draw:custom-shape>
          <draw:polygon draw:style-name="gr155" draw:text-style-name="P14" draw:layer="layout" svg:width="0.199cm" svg:height="0.199cm" svg:x="36.001cm" svg:y="9.701cm" svg:viewBox="0 0 200 200" draw:points="0,200 200,100 0,0">
            <text:p/>
          </draw:polygon>
          <draw:frame draw:style-name="gr1286" draw:text-style-name="P101" draw:layer="layout" svg:width="1.025cm" svg:height="0.806cm" svg:x="35.751cm" svg:y="8.995cm">
            <draw:text-box>
              <text:p><text:span text:style-name="T44">se</text:span></text:p>
            </draw:text-box>
          </draw:frame>
          <draw:frame draw:style-name="gr1287" draw:text-style-name="P101" draw:layer="layout" svg:width="0.888cm" svg:height="0.806cm" svg:x="35.751cm" svg:y="7.995cm">
            <draw:text-box>
              <text:p><text:span text:style-name="T44">di</text:span></text:p>
            </draw:text-box>
          </draw:frame>
          <draw:frame draw:style-name="gr1288" draw:text-style-name="P101" draw:layer="layout" svg:width="0.75cm" svg:height="0.806cm" svg:x="35.751cm" svg:y="8.501cm">
            <draw:text-box>
              <text:p><text:span text:style-name="T44">ti</text:span></text:p>
            </draw:text-box>
          </draw:frame>
          <draw:frame draw:style-name="gr1289" draw:text-style-name="P101" draw:layer="layout" svg:width="1.053cm" svg:height="0.806cm" svg:x="36.201cm" svg:y="8.001cm">
            <draw:text-box>
              <text:p><text:span text:style-name="T44">do</text:span></text:p>
            </draw:text-box>
          </draw:frame>
        </draw:g>
        <draw:line draw:style-name="gr38" draw:text-style-name="P4" draw:layer="layout" svg:x1="35cm" svg:y1="5.4cm" svg:x2="36cm" svg:y2="5.4cm">
          <text:p/>
        </draw:line>
        <draw:frame draw:style-name="gr1290" draw:text-style-name="P101" draw:layer="layout" svg:width="0.777cm" svg:height="0.806cm" svg:x="34.2cm" svg:y="4.994cm">
          <draw:text-box>
            <text:p><text:span text:style-name="T44">0</text:span></text:p>
          </draw:text-box>
        </draw:frame>
        <draw:line draw:style-name="gr38" draw:text-style-name="P4" draw:layer="layout" svg:x1="37cm" svg:y1="5.4cm" svg:x2="38cm" svg:y2="5.4cm">
          <text:p/>
        </draw:line>
        <draw:line draw:style-name="gr38" draw:text-style-name="P4" draw:layer="layout" svg:x1="35.001cm" svg:y1="8.4cm" svg:x2="36.001cm" svg:y2="8.4cm">
          <text:p/>
        </draw:line>
        <draw:frame draw:style-name="gr1290" draw:text-style-name="P101" draw:layer="layout" svg:width="0.777cm" svg:height="0.806cm" svg:x="34.201cm" svg:y="7.994cm">
          <draw:text-box>
            <text:p><text:span text:style-name="T44">0</text:span></text:p>
          </draw:text-box>
        </draw:frame>
        <draw:line draw:style-name="gr38" draw:text-style-name="P4" draw:layer="layout" svg:x1="37cm" svg:y1="8.4cm" svg:x2="38cm" svg:y2="8.4cm">
          <text:p/>
        </draw:line>
        <draw:custom-shape draw:style-name="gr40" draw:text-style-name="P5" draw:layer="layout" svg:width="0.2cm" svg:height="0.2cm" svg:x="37.4cm" svg:y="8.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5.5cm" svg:y1="6cm" svg:x2="36cm" svg:y2="5.994cm">
          <text:p/>
        </draw:line>
        <draw:line draw:style-name="gr38" draw:text-style-name="P4" draw:layer="layout" svg:x1="37.5cm" svg:y1="8.4cm" svg:x2="37.5cm" svg:y2="7.5cm">
          <text:p/>
        </draw:line>
        <draw:line draw:style-name="gr38" draw:text-style-name="P4" draw:layer="layout" svg:x1="37.5cm" svg:y1="7.5cm" svg:x2="35.5cm" svg:y2="7.5cm">
          <text:p/>
        </draw:line>
        <draw:line draw:style-name="gr38" draw:text-style-name="P4" draw:layer="layout" svg:x1="35.5cm" svg:y1="7.5cm" svg:x2="35.5cm" svg:y2="6cm">
          <text:p/>
        </draw:line>
        <draw:custom-shape draw:style-name="gr40" draw:text-style-name="P5" draw:layer="layout" svg:width="0.2cm" svg:height="0.2cm" svg:x="37.401cm" svg:y="5.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7.501cm" svg:y1="5.401cm" svg:x2="37.501cm" svg:y2="4.501cm">
          <text:p/>
        </draw:line>
        <draw:frame draw:style-name="gr1291" draw:text-style-name="P101" draw:layer="layout" svg:width="2.199cm" svg:height="0.806cm" svg:x="36.701cm" svg:y="3.894cm">
          <draw:text-box>
            <text:p><text:span text:style-name="T44">To TDO</text:span></text:p>
          </draw:text-box>
        </draw:frame>
        <draw:line draw:style-name="gr38" draw:text-style-name="P4" draw:layer="layout" svg:x1="34cm" svg:y1="6.5cm" svg:x2="36cm" svg:y2="6.5cm">
          <text:p/>
        </draw:line>
        <draw:line draw:style-name="gr38" draw:text-style-name="P4" draw:layer="layout" svg:x1="34cm" svg:y1="9.5cm" svg:x2="36cm" svg:y2="9.5cm">
          <text:p/>
        </draw:line>
        <draw:g draw:style-name="gr1">
          <draw:custom-shape draw:style-name="gr1285" draw:text-style-name="P1" draw:layer="layout" svg:width="1cm" svg:height="2cm" svg:x="36.001cm" svg:y="11cm">
            <text:p/>
            <draw:enhanced-geometry svg:viewBox="0 0 21600 21600" draw:type="rectangle" draw:enhanced-path="M 0 0 L 21600 0 21600 21600 0 21600 0 0 Z N"/>
          </draw:custom-shape>
          <draw:polygon draw:style-name="gr155" draw:text-style-name="P14" draw:layer="layout" svg:width="0.199cm" svg:height="0.199cm" svg:x="36.001cm" svg:y="12.7cm" svg:viewBox="0 0 200 200" draw:points="0,200 200,100 0,0">
            <text:p/>
          </draw:polygon>
          <draw:frame draw:style-name="gr1286" draw:text-style-name="P101" draw:layer="layout" svg:width="1.025cm" svg:height="0.806cm" svg:x="35.751cm" svg:y="11.994cm">
            <draw:text-box>
              <text:p><text:span text:style-name="T44">se</text:span></text:p>
            </draw:text-box>
          </draw:frame>
          <draw:frame draw:style-name="gr1287" draw:text-style-name="P101" draw:layer="layout" svg:width="0.888cm" svg:height="0.806cm" svg:x="35.751cm" svg:y="10.994cm">
            <draw:text-box>
              <text:p><text:span text:style-name="T44">di</text:span></text:p>
            </draw:text-box>
          </draw:frame>
          <draw:frame draw:style-name="gr1288" draw:text-style-name="P101" draw:layer="layout" svg:width="0.75cm" svg:height="0.806cm" svg:x="35.751cm" svg:y="11.5cm">
            <draw:text-box>
              <text:p><text:span text:style-name="T44">ti</text:span></text:p>
            </draw:text-box>
          </draw:frame>
          <draw:frame draw:style-name="gr1289" draw:text-style-name="P101" draw:layer="layout" svg:width="1.053cm" svg:height="0.806cm" svg:x="36.201cm" svg:y="11cm">
            <draw:text-box>
              <text:p><text:span text:style-name="T44">do</text:span></text:p>
            </draw:text-box>
          </draw:frame>
        </draw:g>
        <draw:g draw:style-name="gr1">
          <draw:custom-shape draw:style-name="gr1285" draw:text-style-name="P1" draw:layer="layout" svg:width="1cm" svg:height="2cm" svg:x="36.002cm" svg:y="14.001cm">
            <text:p/>
            <draw:enhanced-geometry svg:viewBox="0 0 21600 21600" draw:type="rectangle" draw:enhanced-path="M 0 0 L 21600 0 21600 21600 0 21600 0 0 Z N"/>
          </draw:custom-shape>
          <draw:polygon draw:style-name="gr155" draw:text-style-name="P14" draw:layer="layout" svg:width="0.199cm" svg:height="0.199cm" svg:x="36.002cm" svg:y="15.701cm" svg:viewBox="0 0 200 200" draw:points="0,200 200,100 0,0">
            <text:p/>
          </draw:polygon>
          <draw:frame draw:style-name="gr1286" draw:text-style-name="P101" draw:layer="layout" svg:width="1.025cm" svg:height="0.806cm" svg:x="35.752cm" svg:y="14.995cm">
            <draw:text-box>
              <text:p><text:span text:style-name="T44">se</text:span></text:p>
            </draw:text-box>
          </draw:frame>
          <draw:frame draw:style-name="gr1287" draw:text-style-name="P101" draw:layer="layout" svg:width="0.888cm" svg:height="0.806cm" svg:x="35.752cm" svg:y="13.995cm">
            <draw:text-box>
              <text:p><text:span text:style-name="T44">di</text:span></text:p>
            </draw:text-box>
          </draw:frame>
          <draw:frame draw:style-name="gr1288" draw:text-style-name="P101" draw:layer="layout" svg:width="0.75cm" svg:height="0.806cm" svg:x="35.752cm" svg:y="14.501cm">
            <draw:text-box>
              <text:p><text:span text:style-name="T44">ti</text:span></text:p>
            </draw:text-box>
          </draw:frame>
          <draw:frame draw:style-name="gr1289" draw:text-style-name="P101" draw:layer="layout" svg:width="1.053cm" svg:height="0.806cm" svg:x="36.202cm" svg:y="14.001cm">
            <draw:text-box>
              <text:p><text:span text:style-name="T44">do</text:span></text:p>
            </draw:text-box>
          </draw:frame>
        </draw:g>
        <draw:line draw:style-name="gr38" draw:text-style-name="P4" draw:layer="layout" svg:x1="35.001cm" svg:y1="11.4cm" svg:x2="36.001cm" svg:y2="11.4cm">
          <text:p/>
        </draw:line>
        <draw:frame draw:style-name="gr1290" draw:text-style-name="P101" draw:layer="layout" svg:width="0.777cm" svg:height="0.806cm" svg:x="34.201cm" svg:y="10.994cm">
          <draw:text-box>
            <text:p><text:span text:style-name="T44">0</text:span></text:p>
          </draw:text-box>
        </draw:frame>
        <draw:line draw:style-name="gr38" draw:text-style-name="P4" draw:layer="layout" svg:x1="37.001cm" svg:y1="11.4cm" svg:x2="38.001cm" svg:y2="11.4cm">
          <text:p/>
        </draw:line>
        <draw:line draw:style-name="gr38" draw:text-style-name="P4" draw:layer="layout" svg:x1="35.002cm" svg:y1="14.4cm" svg:x2="36.002cm" svg:y2="14.4cm">
          <text:p/>
        </draw:line>
        <draw:frame draw:style-name="gr1290" draw:text-style-name="P101" draw:layer="layout" svg:width="0.777cm" svg:height="0.806cm" svg:x="34.202cm" svg:y="13.994cm">
          <draw:text-box>
            <text:p><text:span text:style-name="T44">0</text:span></text:p>
          </draw:text-box>
        </draw:frame>
        <draw:line draw:style-name="gr38" draw:text-style-name="P4" draw:layer="layout" svg:x1="37.001cm" svg:y1="14.4cm" svg:x2="38.001cm" svg:y2="14.4cm">
          <text:p/>
        </draw:line>
        <draw:custom-shape draw:style-name="gr40" draw:text-style-name="P5" draw:layer="layout" svg:width="0.2cm" svg:height="0.2cm" svg:x="37.401cm" svg:y="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5.501cm" svg:y1="12cm" svg:x2="36.001cm" svg:y2="11.994cm">
          <text:p/>
        </draw:line>
        <draw:line draw:style-name="gr38" draw:text-style-name="P4" draw:layer="layout" svg:x1="37.501cm" svg:y1="14.4cm" svg:x2="37.501cm" svg:y2="13.5cm">
          <text:p/>
        </draw:line>
        <draw:line draw:style-name="gr38" draw:text-style-name="P4" draw:layer="layout" svg:x1="37.501cm" svg:y1="13.5cm" svg:x2="35.501cm" svg:y2="13.5cm">
          <text:p/>
        </draw:line>
        <draw:line draw:style-name="gr38" draw:text-style-name="P4" draw:layer="layout" svg:x1="35.501cm" svg:y1="13.5cm" svg:x2="35.501cm" svg:y2="12cm">
          <text:p/>
        </draw:line>
        <draw:custom-shape draw:style-name="gr40" draw:text-style-name="P5" draw:layer="layout" svg:width="0.2cm" svg:height="0.2cm" svg:x="37.402cm" svg:y="11.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7.502cm" svg:y1="11.401cm" svg:x2="37.502cm" svg:y2="10.501cm">
          <text:p/>
        </draw:line>
        <draw:line draw:style-name="gr38" draw:text-style-name="P4" draw:layer="layout" svg:x1="34cm" svg:y1="12.5cm" svg:x2="36.001cm" svg:y2="12.5cm">
          <text:p/>
        </draw:line>
        <draw:line draw:style-name="gr38" draw:text-style-name="P4" draw:layer="layout" svg:x1="34cm" svg:y1="15.5cm" svg:x2="36.001cm" svg:y2="15.5cm">
          <text:p/>
        </draw:line>
        <draw:line draw:style-name="gr38" draw:text-style-name="P4" draw:layer="layout" svg:x1="35.5cm" svg:y1="9cm" svg:x2="36cm" svg:y2="8.994cm">
          <text:p/>
        </draw:line>
        <draw:line draw:style-name="gr38" draw:text-style-name="P4" draw:layer="layout" svg:x1="37.5cm" svg:y1="10.5cm" svg:x2="35.5cm" svg:y2="10.5cm">
          <text:p/>
        </draw:line>
        <draw:line draw:style-name="gr38" draw:text-style-name="P4" draw:layer="layout" svg:x1="35.5cm" svg:y1="10.5cm" svg:x2="35.5cm" svg:y2="9cm">
          <text:p/>
        </draw:line>
        <draw:g draw:style-name="gr1">
          <draw:custom-shape draw:style-name="gr1285" draw:text-style-name="P1" draw:layer="layout" svg:width="1cm" svg:height="2cm" svg:x="36cm" svg:y="18cm">
            <text:p/>
            <draw:enhanced-geometry svg:viewBox="0 0 21600 21600" draw:type="rectangle" draw:enhanced-path="M 0 0 L 21600 0 21600 21600 0 21600 0 0 Z N"/>
          </draw:custom-shape>
          <draw:polygon draw:style-name="gr155" draw:text-style-name="P14" draw:layer="layout" svg:width="0.199cm" svg:height="0.199cm" svg:x="36cm" svg:y="19.7cm" svg:viewBox="0 0 200 200" draw:points="0,200 200,100 0,0">
            <text:p/>
          </draw:polygon>
          <draw:frame draw:style-name="gr1286" draw:text-style-name="P101" draw:layer="layout" svg:width="1.025cm" svg:height="0.806cm" svg:x="35.75cm" svg:y="18.994cm">
            <draw:text-box>
              <text:p><text:span text:style-name="T44">se</text:span></text:p>
            </draw:text-box>
          </draw:frame>
          <draw:frame draw:style-name="gr1287" draw:text-style-name="P101" draw:layer="layout" svg:width="0.888cm" svg:height="0.806cm" svg:x="35.75cm" svg:y="17.994cm">
            <draw:text-box>
              <text:p><text:span text:style-name="T44">di</text:span></text:p>
            </draw:text-box>
          </draw:frame>
          <draw:frame draw:style-name="gr1288" draw:text-style-name="P101" draw:layer="layout" svg:width="0.75cm" svg:height="0.806cm" svg:x="35.75cm" svg:y="18.5cm">
            <draw:text-box>
              <text:p><text:span text:style-name="T44">ti</text:span></text:p>
            </draw:text-box>
          </draw:frame>
          <draw:frame draw:style-name="gr1289" draw:text-style-name="P101" draw:layer="layout" svg:width="1.053cm" svg:height="0.806cm" svg:x="36.2cm" svg:y="18cm">
            <draw:text-box>
              <text:p><text:span text:style-name="T44">do</text:span></text:p>
            </draw:text-box>
          </draw:frame>
        </draw:g>
        <draw:g draw:style-name="gr1">
          <draw:custom-shape draw:style-name="gr1285" draw:text-style-name="P1" draw:layer="layout" svg:width="1cm" svg:height="2cm" svg:x="36.001cm" svg:y="21.001cm">
            <text:p/>
            <draw:enhanced-geometry svg:viewBox="0 0 21600 21600" draw:type="rectangle" draw:enhanced-path="M 0 0 L 21600 0 21600 21600 0 21600 0 0 Z N"/>
          </draw:custom-shape>
          <draw:polygon draw:style-name="gr155" draw:text-style-name="P14" draw:layer="layout" svg:width="0.199cm" svg:height="0.199cm" svg:x="36.001cm" svg:y="22.701cm" svg:viewBox="0 0 200 200" draw:points="0,200 200,100 0,0">
            <text:p/>
          </draw:polygon>
          <draw:frame draw:style-name="gr1286" draw:text-style-name="P101" draw:layer="layout" svg:width="1.025cm" svg:height="0.806cm" svg:x="35.751cm" svg:y="21.995cm">
            <draw:text-box>
              <text:p><text:span text:style-name="T44">se</text:span></text:p>
            </draw:text-box>
          </draw:frame>
          <draw:frame draw:style-name="gr1287" draw:text-style-name="P101" draw:layer="layout" svg:width="0.888cm" svg:height="0.806cm" svg:x="35.751cm" svg:y="20.995cm">
            <draw:text-box>
              <text:p><text:span text:style-name="T44">di</text:span></text:p>
            </draw:text-box>
          </draw:frame>
          <draw:frame draw:style-name="gr1288" draw:text-style-name="P101" draw:layer="layout" svg:width="0.75cm" svg:height="0.806cm" svg:x="35.751cm" svg:y="21.501cm">
            <draw:text-box>
              <text:p><text:span text:style-name="T44">ti</text:span></text:p>
            </draw:text-box>
          </draw:frame>
          <draw:frame draw:style-name="gr1289" draw:text-style-name="P101" draw:layer="layout" svg:width="1.053cm" svg:height="0.806cm" svg:x="36.201cm" svg:y="21.001cm">
            <draw:text-box>
              <text:p><text:span text:style-name="T44">do</text:span></text:p>
            </draw:text-box>
          </draw:frame>
        </draw:g>
        <draw:line draw:style-name="gr38" draw:text-style-name="P4" draw:layer="layout" svg:x1="35cm" svg:y1="18.4cm" svg:x2="36cm" svg:y2="18.4cm">
          <text:p/>
        </draw:line>
        <draw:frame draw:style-name="gr1290" draw:text-style-name="P101" draw:layer="layout" svg:width="0.777cm" svg:height="0.806cm" svg:x="34.2cm" svg:y="17.994cm">
          <draw:text-box>
            <text:p><text:span text:style-name="T44">0</text:span></text:p>
          </draw:text-box>
        </draw:frame>
        <draw:line draw:style-name="gr38" draw:text-style-name="P4" draw:layer="layout" svg:x1="37cm" svg:y1="18.4cm" svg:x2="38cm" svg:y2="18.4cm">
          <text:p/>
        </draw:line>
        <draw:line draw:style-name="gr38" draw:text-style-name="P4" draw:layer="layout" svg:x1="35.001cm" svg:y1="21.4cm" svg:x2="36.001cm" svg:y2="21.4cm">
          <text:p/>
        </draw:line>
        <draw:frame draw:style-name="gr1290" draw:text-style-name="P101" draw:layer="layout" svg:width="0.777cm" svg:height="0.806cm" svg:x="34.201cm" svg:y="20.994cm">
          <draw:text-box>
            <text:p><text:span text:style-name="T44">0</text:span></text:p>
          </draw:text-box>
        </draw:frame>
        <draw:line draw:style-name="gr38" draw:text-style-name="P4" draw:layer="layout" svg:x1="37cm" svg:y1="21.4cm" svg:x2="38cm" svg:y2="21.4cm">
          <text:p/>
        </draw:line>
        <draw:custom-shape draw:style-name="gr40" draw:text-style-name="P5" draw:layer="layout" svg:width="0.2cm" svg:height="0.2cm" svg:x="37.4cm" svg:y="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5.5cm" svg:y1="19cm" svg:x2="36cm" svg:y2="18.994cm">
          <text:p/>
        </draw:line>
        <draw:line draw:style-name="gr38" draw:text-style-name="P4" draw:layer="layout" svg:x1="37.5cm" svg:y1="21.4cm" svg:x2="37.5cm" svg:y2="20.5cm">
          <text:p/>
        </draw:line>
        <draw:line draw:style-name="gr38" draw:text-style-name="P4" draw:layer="layout" svg:x1="37.5cm" svg:y1="20.5cm" svg:x2="35.5cm" svg:y2="20.5cm">
          <text:p/>
        </draw:line>
        <draw:line draw:style-name="gr38" draw:text-style-name="P4" draw:layer="layout" svg:x1="35.5cm" svg:y1="20.5cm" svg:x2="35.5cm" svg:y2="19cm">
          <text:p/>
        </draw:line>
        <draw:custom-shape draw:style-name="gr40" draw:text-style-name="P5" draw:layer="layout" svg:width="0.2cm" svg:height="0.2cm" svg:x="37.401cm" svg:y="18.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7.501cm" svg:y1="18.401cm" svg:x2="37.501cm" svg:y2="17.501cm">
          <text:p/>
        </draw:line>
        <draw:frame draw:style-name="gr1292" draw:text-style-name="P101" draw:layer="layout" svg:width="2.584cm" svg:height="0.806cm" svg:x="34.801cm" svg:y="23.3cm">
          <draw:text-box>
            <text:p><text:span text:style-name="T44">From TDI</text:span></text:p>
          </draw:text-box>
        </draw:frame>
        <draw:line draw:style-name="gr38" draw:text-style-name="P4" draw:layer="layout" svg:x1="34cm" svg:y1="19.5cm" svg:x2="36cm" svg:y2="19.5cm">
          <text:p/>
        </draw:line>
        <draw:line draw:style-name="gr38" draw:text-style-name="P4" draw:layer="layout" svg:x1="34cm" svg:y1="22.5cm" svg:x2="36cm" svg:y2="22.5cm">
          <text:p/>
        </draw:line>
        <draw:line draw:style-name="gr38" draw:text-style-name="P4" draw:layer="layout" svg:x1="35.5cm" svg:y1="22cm" svg:x2="36cm" svg:y2="21.994cm">
          <text:p/>
        </draw:line>
        <draw:line draw:style-name="gr38" draw:text-style-name="P4" draw:layer="layout" svg:x1="35.5cm" svg:y1="23.5cm" svg:x2="35.5cm" svg:y2="22cm">
          <text:p/>
        </draw:line>
        <draw:line draw:style-name="gr38" draw:text-style-name="P4" draw:layer="layout" svg:x1="35.501cm" svg:y1="15cm" svg:x2="36.001cm" svg:y2="14.994cm">
          <text:p/>
        </draw:line>
        <draw:line draw:style-name="gr38" draw:text-style-name="P4" draw:layer="layout" svg:x1="35.501cm" svg:y1="16.5cm" svg:x2="35.501cm" svg:y2="15cm">
          <text:p/>
        </draw:line>
        <draw:line draw:style-name="gr1293" draw:text-style-name="P4" draw:layer="layout" svg:x1="35cm" svg:y1="17cm" svg:x2="38cm" svg:y2="17cm">
          <text:p/>
        </draw:line>
        <draw:line draw:style-name="gr38" draw:text-style-name="P4" draw:layer="layout" svg:x1="34cm" svg:y1="4.5cm" svg:x2="34cm" svg:y2="16cm">
          <text:p/>
        </draw:line>
        <draw:line draw:style-name="gr38" draw:text-style-name="P4" draw:layer="layout" svg:x1="34cm" svg:y1="17.5cm" svg:x2="34cm" svg:y2="22.5cm">
          <text:p/>
        </draw:line>
        <draw:custom-shape draw:style-name="gr40" draw:text-style-name="P5" draw:layer="layout" svg:width="0.2cm" svg:height="0.2cm" svg:x="33.9cm" svg:y="1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33.901cm" svg:y="15.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33.902cm" svg:y="12.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33.902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33.903cm" svg:y="9.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94" draw:text-style-name="P101" draw:layer="layout" svg:width="2.842cm" svg:height="0.806cm" svg:x="33.002cm" svg:y="3.894cm">
          <draw:text-box>
            <text:p><text:span text:style-name="T44">Test </text:span><text:span text:style-name="T44">select</text:span></text:p>
          </draw:text-box>
        </draw:frame>
        <draw:frame draw:style-name="gr1295" draw:text-style-name="P4" draw:layer="layout" svg:width="0.978cm" svg:height="3.353cm" svg:x="20.2cm" svg:y="12cm">
          <draw:image xlink:href="Pictures/10000001000000ED0000032CB50FA5DB.png" xlink:type="simple" xlink:show="embed" xlink:actuate="onLoad" draw:mime-type="image/png">
            <text:p/>
          </draw:image>
        </draw:frame>
        <draw:frame draw:style-name="gr1296" draw:text-style-name="P101" draw:layer="layout" svg:width="3.283cm" svg:height="0.806cm" svg:x="13.017cm" svg:y="11cm">
          <draw:text-box>
            <text:p><text:span text:style-name="T44">scan_shift</text:span><text:span text:style-name="T44">_o</text:span></text:p>
          </draw:text-box>
        </draw:frame>
        <draw:frame draw:style-name="gr1297" draw:text-style-name="P101" draw:layer="layout" svg:width="3.503cm" svg:height="0.806cm" svg:x="13cm" svg:y="10cm">
          <draw:text-box>
            <text:p><text:span text:style-name="T44">scan_cloc</text:span><text:span text:style-name="T44">k_o</text:span></text:p>
          </draw:text-box>
        </draw:frame>
        <draw:frame draw:style-name="gr1298" draw:text-style-name="P101" draw:layer="layout" svg:width="3.476cm" svg:height="0.806cm" svg:x="13cm" svg:y="9cm">
          <draw:text-box>
            <text:p><text:span text:style-name="T44">scan_res</text:span><text:span text:style-name="T44">et_o</text:span></text:p>
          </draw:text-box>
        </draw:frame>
        <draw:frame draw:style-name="gr1297" draw:text-style-name="P101" draw:layer="layout" svg:width="3.503cm" svg:height="0.806cm" svg:x="13cm" svg:y="12.994cm">
          <draw:text-box>
            <text:p><text:span text:style-name="T44">scan_tdi_</text:span><text:span text:style-name="T44">o(2)</text:span></text:p>
          </draw:text-box>
        </draw:frame>
        <draw:frame draw:style-name="gr1297" draw:text-style-name="P101" draw:layer="layout" svg:width="3.503cm" svg:height="0.806cm" svg:x="13cm" svg:y="12cm">
          <draw:text-box>
            <text:p><text:span text:style-name="T44">scan_tdo</text:span><text:span text:style-name="T44">_i(2)</text:span></text:p>
          </draw:text-box>
        </draw:frame>
        <draw:line draw:style-name="gr53" draw:text-style-name="P4" draw:layer="layout" svg:x1="13cm" svg:y1="11cm" svg:x2="18cm" svg:y2="11cm">
          <text:p/>
        </draw:line>
        <draw:line draw:style-name="gr53" draw:text-style-name="P4" draw:layer="layout" svg:x1="13cm" svg:y1="12cm" svg:x2="18cm" svg:y2="12cm">
          <text:p/>
        </draw:line>
        <draw:line draw:style-name="gr1299" draw:text-style-name="P4" draw:layer="layout" svg:x1="13cm" svg:y1="13cm" svg:x2="18cm" svg:y2="13cm">
          <text:p/>
        </draw:line>
        <draw:line draw:style-name="gr53" draw:text-style-name="P4" draw:layer="layout" svg:x1="13cm" svg:y1="14cm" svg:x2="18cm" svg:y2="14cm">
          <text:p/>
        </draw:line>
        <draw:line draw:style-name="gr38" draw:text-style-name="P4" draw:layer="layout" svg:x1="18cm" svg:y1="14cm" svg:x2="20.5cm" svg:y2="15.3cm">
          <text:p/>
        </draw:line>
        <draw:line draw:style-name="gr38" draw:text-style-name="P4" draw:layer="layout" svg:x1="20.9cm" svg:y1="12.1cm" svg:x2="18cm" svg:y2="13cm">
          <text:p/>
        </draw:line>
        <draw:line draw:style-name="gr38" draw:text-style-name="P4" draw:layer="layout" svg:x1="18cm" svg:y1="12cm" svg:x2="20.2cm" svg:y2="12.1cm">
          <text:p/>
        </draw:line>
        <draw:line draw:style-name="gr38" draw:text-style-name="P4" draw:layer="layout" svg:x1="18cm" svg:y1="10cm" svg:x2="20.7cm" svg:y2="11.8cm">
          <text:p/>
        </draw:line>
        <draw:line draw:style-name="gr38" draw:text-style-name="P4" draw:layer="layout" svg:x1="18cm" svg:y1="11cm" svg:x2="20.5cm" svg:y2="11.8cm">
          <text:p/>
        </draw:line>
      </draw:page>
      <draw:page draw:name="page25" draw:style-name="dp1" draw:master-page-name="Default">
        <draw:custom-shape draw:style-name="gr1300" draw:text-style-name="P102" draw:layer="layout" svg:width="3cm" svg:height="3cm" svg:x="14cm" svg:y="10cm">
          <text:p text:style-name="P1">CPU</text:p>
          <text:p text:style-name="P1">Core</text:p>
          <draw:enhanced-geometry svg:viewBox="0 0 21600 21600" draw:type="rectangle" draw:enhanced-path="M 0 0 L 21600 0 21600 21600 0 21600 0 0 Z N"/>
        </draw:custom-shape>
        <draw:custom-shape draw:style-name="gr1301" draw:text-style-name="P12" draw:layer="layout" svg:width="6cm" svg:height="1cm" svg:x="16cm" svg:y="14cm">
          <text:p text:style-name="P1">D-Bus</text:p>
          <draw:enhanced-geometry svg:viewBox="0 0 21600 21600" draw:type="rectangle" draw:enhanced-path="M 0 0 L 21600 0 21600 21600 0 21600 0 0 Z N"/>
        </draw:custom-shape>
        <draw:custom-shape draw:style-name="gr1300" draw:text-style-name="P102" draw:layer="layout" svg:width="3cm" svg:height="3cm" svg:x="9cm" svg:y="16cm">
          <text:p text:style-name="P1">Instr.</text:p>
          <text:p text:style-name="P1">Mem</text:p>
          <draw:enhanced-geometry svg:viewBox="0 0 21600 21600" draw:type="rectangle" draw:enhanced-path="M 0 0 L 21600 0 21600 21600 0 21600 0 0 Z N"/>
        </draw:custom-shape>
        <draw:custom-shape draw:style-name="gr1300" draw:text-style-name="P102" draw:layer="layout" svg:width="3cm" svg:height="3cm" svg:x="19cm" svg:y="16cm">
          <text:p text:style-name="P1">Data</text:p>
          <text:p text:style-name="P1">Mem</text:p>
          <draw:enhanced-geometry svg:viewBox="0 0 21600 21600" draw:type="rectangle" draw:enhanced-path="M 0 0 L 21600 0 21600 21600 0 21600 0 0 Z N"/>
        </draw:custom-shape>
        <draw:custom-shape draw:style-name="gr1301" draw:text-style-name="P12" draw:layer="layout" svg:width="6cm" svg:height="1cm" svg:x="9cm" svg:y="14cm">
          <text:p text:style-name="P1">I-Bus</text:p>
          <draw:enhanced-geometry svg:viewBox="0 0 21600 21600" draw:type="rectangle" draw:enhanced-path="M 0 0 L 21600 0 21600 21600 0 21600 0 0 Z N"/>
        </draw:custom-shape>
        <draw:custom-shape draw:style-name="gr1302" draw:text-style-name="P103" draw:layer="layout" svg:width="3cm" svg:height="3cm" svg:x="9cm" svg:y="10cm">
          <text:p text:style-name="P1">Test &amp;</text:p>
          <text:p text:style-name="P1">Debug</text:p>
          <draw:enhanced-geometry svg:viewBox="0 0 21600 21600" draw:type="rectangle" draw:enhanced-path="M 0 0 L 21600 0 21600 21600 0 21600 0 0 Z N"/>
        </draw:custom-shape>
        <draw:custom-shape draw:style-name="gr1302" draw:text-style-name="P103" draw:layer="layout" svg:width="3cm" svg:height="3cm" svg:x="14cm" svg:y="16cm">
          <text:p text:style-name="P1">EBU</text:p>
          <draw:enhanced-geometry svg:viewBox="0 0 21600 21600" draw:type="rectangle" draw:enhanced-path="M 0 0 L 21600 0 21600 21600 0 21600 0 0 Z N"/>
        </draw:custom-shape>
        <draw:custom-shape draw:style-name="gr1302" draw:text-style-name="P103" draw:layer="layout" svg:width="3cm" svg:height="3cm" svg:x="19cm" svg:y="10cm">
          <text:p text:style-name="P1">GPIO</text:p>
          <draw:enhanced-geometry svg:viewBox="0 0 21600 21600" draw:type="rectangle" draw:enhanced-path="M 0 0 L 21600 0 21600 21600 0 21600 0 0 Z N"/>
        </draw:custom-shape>
        <draw:custom-shape draw:style-name="gr1303" draw:text-style-name="P4" draw:layer="layout" svg:width="15cm" svg:height="11cm" svg:x="8cm" svg:y="9cm">
          <text:p/>
          <draw:enhanced-geometry svg:viewBox="0 0 21600 21600" draw:type="rectangle" draw:enhanced-path="M 0 0 L 21600 0 21600 21600 0 21600 0 0 Z N"/>
        </draw:custom-shape>
        <draw:frame draw:style-name="gr1304" draw:text-style-name="P3" draw:layer="layout" svg:width="3.972cm" svg:height="0.962cm" svg:x="8cm" svg:y="19cm">
          <draw:text-box>
            <text:p>RWU-RV64I</text:p>
          </draw:text-box>
        </draw:frame>
        <draw:custom-shape draw:style-name="gr1301" draw:text-style-name="P12" draw:layer="layout" svg:width="6cm" svg:height="1cm" svg:x="9cm" svg:y="22cm">
          <text:p text:style-name="P1">I-Mem</text:p>
          <draw:enhanced-geometry svg:viewBox="0 0 21600 21600" draw:type="rectangle" draw:enhanced-path="M 0 0 L 21600 0 21600 21600 0 21600 0 0 Z N"/>
        </draw:custom-shape>
        <draw:custom-shape draw:style-name="gr1301" draw:text-style-name="P12" draw:layer="layout" svg:width="6cm" svg:height="1cm" svg:x="16cm" svg:y="22cm">
          <text:p text:style-name="P1">D-Mem</text:p>
          <draw:enhanced-geometry svg:viewBox="0 0 21600 21600" draw:type="rectangle" draw:enhanced-path="M 0 0 L 21600 0 21600 21600 0 21600 0 0 Z N"/>
        </draw:custom-shape>
        <draw:custom-shape draw:style-name="gr1305" draw:text-style-name="P1" draw:layer="layout" svg:width="0.6cm" svg:height="1cm" svg:x="10.3cm" svg:y="1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305" draw:text-style-name="P1" draw:layer="layout" svg:width="0.6cm" svg:height="1cm" svg:x="20.201cm" svg:y="15.00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306" draw:text-style-name="P12" draw:layer="layout" svg:width="2cm" svg:height="0.6cm" svg:x="7cm" svg:y="11.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1307" draw:text-style-name="P3" draw:layer="layout" svg:width="2.078cm" svg:height="0.962cm" svg:x="6.016cm" svg:y="10.043cm">
          <draw:text-box>
            <text:p>JTAG</text:p>
          </draw:text-box>
        </draw:frame>
        <draw:custom-shape draw:style-name="gr1305" draw:text-style-name="P1" draw:layer="layout" svg:width="0.6cm" svg:height="1cm" svg:x="9.7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305" draw:text-style-name="P1" draw:layer="layout" svg:width="0.6cm" svg:height="1cm" svg:x="14.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305" draw:text-style-name="P1" draw:layer="layout" svg:width="0.6cm" svg:height="1cm" svg:x="16.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305" draw:text-style-name="P1" draw:layer="layout" svg:width="0.6cm" svg:height="1cm" svg:x="20.202cm" svg:y="13.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306" draw:text-style-name="P12" draw:layer="layout" svg:width="2cm" svg:height="0.6cm" svg:x="22.001cm" svg:y="11.20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1308" draw:text-style-name="P3" draw:layer="layout" svg:width="2.09cm" svg:height="0.962cm" svg:x="22.91cm" svg:y="10cm">
          <draw:text-box>
            <text:p>GPIO</text:p>
          </draw:text-box>
        </draw:frame>
        <draw:custom-shape draw:style-name="gr1305" draw:text-style-name="P1" draw:layer="layout" svg:width="0.6cm" svg:height="1cm" svg:x="16.202cm" svg:y="15.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305" draw:text-style-name="P1" draw:layer="layout" svg:width="0.6cm" svg:height="1cm" svg:x="14.203cm" svg:y="15.00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1309" draw:text-style-name="P3" draw:layer="layout" svg:width="2.867cm" svg:height="0.962cm" svg:x="16cm" svg:y="20cm">
          <draw:text-box>
            <text:p>Ext. Bus</text:p>
          </draw:text-box>
        </draw:frame>
        <draw:custom-shape draw:style-name="gr1310" draw:text-style-name="P1" draw:layer="layout" svg:width="9cm" svg:height="0.3cm" svg:x="11cm" svg:y="20.8cm">
          <text:p/>
          <draw:enhanced-geometry svg:viewBox="0 0 21600 21600" draw:type="rectangle" draw:enhanced-path="M 0 0 L 21600 0 21600 21600 0 21600 0 0 Z N"/>
        </draw:custom-shape>
        <draw:custom-shape draw:style-name="gr1305" draw:text-style-name="P1" draw:layer="layout" svg:width="0.6cm" svg:height="1cm" svg:x="11.701cm" svg:y="21.00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305" draw:text-style-name="P1" draw:layer="layout" svg:width="0.6cm" svg:height="1cm" svg:x="18.702cm" svg:y="21.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311" draw:text-style-name="P1" draw:layer="layout" svg:width="0.6cm" svg:height="2cm" svg:x="15.204cm" svg:y="19.00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page>
      <draw:page draw:name="page26" draw:style-name="dp1" draw:master-page-name="Default">
        <draw:custom-shape draw:style-name="gr1300" draw:text-style-name="P102" draw:layer="layout" svg:width="3cm" svg:height="3cm" svg:x="14cm" svg:y="10cm">
          <text:p text:style-name="P1">CPU</text:p>
          <text:p text:style-name="P1">Core</text:p>
          <draw:enhanced-geometry svg:viewBox="0 0 21600 21600" draw:type="rectangle" draw:enhanced-path="M 0 0 L 21600 0 21600 21600 0 21600 0 0 Z N"/>
        </draw:custom-shape>
        <draw:custom-shape draw:style-name="gr1301" draw:text-style-name="P12" draw:layer="layout" svg:width="6cm" svg:height="1cm" svg:x="16cm" svg:y="14cm">
          <text:p text:style-name="P1">D-Bus</text:p>
          <draw:enhanced-geometry svg:viewBox="0 0 21600 21600" draw:type="rectangle" draw:enhanced-path="M 0 0 L 21600 0 21600 21600 0 21600 0 0 Z N"/>
        </draw:custom-shape>
        <draw:custom-shape draw:style-name="gr1300" draw:text-style-name="P102" draw:layer="layout" svg:width="3cm" svg:height="3cm" svg:x="9cm" svg:y="16cm">
          <text:p text:style-name="P1">Instr.</text:p>
          <text:p text:style-name="P1">Mem</text:p>
          <draw:enhanced-geometry svg:viewBox="0 0 21600 21600" draw:type="rectangle" draw:enhanced-path="M 0 0 L 21600 0 21600 21600 0 21600 0 0 Z N"/>
        </draw:custom-shape>
        <draw:custom-shape draw:style-name="gr1300" draw:text-style-name="P102" draw:layer="layout" svg:width="3cm" svg:height="3cm" svg:x="19cm" svg:y="16cm">
          <text:p text:style-name="P1">Data</text:p>
          <text:p text:style-name="P1">Mem</text:p>
          <draw:enhanced-geometry svg:viewBox="0 0 21600 21600" draw:type="rectangle" draw:enhanced-path="M 0 0 L 21600 0 21600 21600 0 21600 0 0 Z N"/>
        </draw:custom-shape>
        <draw:custom-shape draw:style-name="gr1301" draw:text-style-name="P12" draw:layer="layout" svg:width="6cm" svg:height="1cm" svg:x="9cm" svg:y="14cm">
          <text:p text:style-name="P1">I-Bus</text:p>
          <draw:enhanced-geometry svg:viewBox="0 0 21600 21600" draw:type="rectangle" draw:enhanced-path="M 0 0 L 21600 0 21600 21600 0 21600 0 0 Z N"/>
        </draw:custom-shape>
        <draw:custom-shape draw:style-name="gr1302" draw:text-style-name="P103" draw:layer="layout" svg:width="3cm" svg:height="3cm" svg:x="9cm" svg:y="10cm">
          <text:p text:style-name="P1">Test &amp;</text:p>
          <text:p text:style-name="P1">Debug</text:p>
          <draw:enhanced-geometry svg:viewBox="0 0 21600 21600" draw:type="rectangle" draw:enhanced-path="M 0 0 L 21600 0 21600 21600 0 21600 0 0 Z N"/>
        </draw:custom-shape>
        <draw:custom-shape draw:style-name="gr1302" draw:text-style-name="P103" draw:layer="layout" svg:width="3cm" svg:height="3cm" svg:x="14cm" svg:y="16cm">
          <text:p text:style-name="P1">EBU</text:p>
          <draw:enhanced-geometry svg:viewBox="0 0 21600 21600" draw:type="rectangle" draw:enhanced-path="M 0 0 L 21600 0 21600 21600 0 21600 0 0 Z N"/>
        </draw:custom-shape>
        <draw:custom-shape draw:style-name="gr1302" draw:text-style-name="P103" draw:layer="layout" svg:width="3cm" svg:height="3cm" svg:x="19cm" svg:y="10cm">
          <text:p text:style-name="P1">GPIO</text:p>
          <draw:enhanced-geometry svg:viewBox="0 0 21600 21600" draw:type="rectangle" draw:enhanced-path="M 0 0 L 21600 0 21600 21600 0 21600 0 0 Z N"/>
        </draw:custom-shape>
        <draw:custom-shape draw:style-name="gr1303" draw:text-style-name="P4" draw:layer="layout" svg:width="15cm" svg:height="11cm" svg:x="8cm" svg:y="9cm">
          <text:p/>
          <draw:enhanced-geometry svg:viewBox="0 0 21600 21600" draw:type="rectangle" draw:enhanced-path="M 0 0 L 21600 0 21600 21600 0 21600 0 0 Z N"/>
        </draw:custom-shape>
        <draw:frame draw:style-name="gr1304" draw:text-style-name="P3" draw:layer="layout" svg:width="3.972cm" svg:height="0.962cm" svg:x="8cm" svg:y="19cm">
          <draw:text-box>
            <text:p>RWU-RV64I</text:p>
          </draw:text-box>
        </draw:frame>
        <draw:custom-shape draw:style-name="gr1301" draw:text-style-name="P12" draw:layer="layout" svg:width="6cm" svg:height="1cm" svg:x="9cm" svg:y="22cm">
          <text:p text:style-name="P1">I-Mem</text:p>
          <draw:enhanced-geometry svg:viewBox="0 0 21600 21600" draw:type="rectangle" draw:enhanced-path="M 0 0 L 21600 0 21600 21600 0 21600 0 0 Z N"/>
        </draw:custom-shape>
        <draw:custom-shape draw:style-name="gr1301" draw:text-style-name="P12" draw:layer="layout" svg:width="6cm" svg:height="1cm" svg:x="16cm" svg:y="22cm">
          <text:p text:style-name="P1">D-Mem</text:p>
          <draw:enhanced-geometry svg:viewBox="0 0 21600 21600" draw:type="rectangle" draw:enhanced-path="M 0 0 L 21600 0 21600 21600 0 21600 0 0 Z N"/>
        </draw:custom-shape>
        <draw:custom-shape draw:style-name="gr1305" draw:text-style-name="P1" draw:layer="layout" svg:width="0.6cm" svg:height="1cm" svg:x="10.3cm" svg:y="1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305" draw:text-style-name="P1" draw:layer="layout" svg:width="0.6cm" svg:height="1cm" svg:x="20.201cm" svg:y="15.00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306" draw:text-style-name="P12" draw:layer="layout" svg:width="2cm" svg:height="0.6cm" svg:x="7cm" svg:y="11.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1307" draw:text-style-name="P3" draw:layer="layout" svg:width="2.078cm" svg:height="0.962cm" svg:x="6.016cm" svg:y="10.043cm">
          <draw:text-box>
            <text:p>JTAG</text:p>
          </draw:text-box>
        </draw:frame>
        <draw:custom-shape draw:style-name="gr1305" draw:text-style-name="P1" draw:layer="layout" svg:width="0.6cm" svg:height="1cm" svg:x="9.7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305" draw:text-style-name="P1" draw:layer="layout" svg:width="0.6cm" svg:height="1cm" svg:x="14.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305" draw:text-style-name="P1" draw:layer="layout" svg:width="0.6cm" svg:height="1cm" svg:x="16.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305" draw:text-style-name="P1" draw:layer="layout" svg:width="0.6cm" svg:height="1cm" svg:x="20.202cm" svg:y="13.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306" draw:text-style-name="P12" draw:layer="layout" svg:width="2cm" svg:height="0.6cm" svg:x="22.001cm" svg:y="11.20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1308" draw:text-style-name="P3" draw:layer="layout" svg:width="2.09cm" svg:height="0.962cm" svg:x="22.91cm" svg:y="10cm">
          <draw:text-box>
            <text:p>GPIO</text:p>
          </draw:text-box>
        </draw:frame>
        <draw:custom-shape draw:style-name="gr1305" draw:text-style-name="P1" draw:layer="layout" svg:width="0.6cm" svg:height="1cm" svg:x="16.202cm" svg:y="15.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305" draw:text-style-name="P1" draw:layer="layout" svg:width="0.6cm" svg:height="1cm" svg:x="14.203cm" svg:y="15.00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1309" draw:text-style-name="P3" draw:layer="layout" svg:width="2.867cm" svg:height="0.962cm" svg:x="16cm" svg:y="20cm">
          <draw:text-box>
            <text:p>Ext. Bus</text:p>
          </draw:text-box>
        </draw:frame>
        <draw:custom-shape draw:style-name="gr1310" draw:text-style-name="P1" draw:layer="layout" svg:width="9cm" svg:height="0.3cm" svg:x="11cm" svg:y="20.8cm">
          <text:p/>
          <draw:enhanced-geometry svg:viewBox="0 0 21600 21600" draw:type="rectangle" draw:enhanced-path="M 0 0 L 21600 0 21600 21600 0 21600 0 0 Z N"/>
        </draw:custom-shape>
        <draw:custom-shape draw:style-name="gr1305" draw:text-style-name="P1" draw:layer="layout" svg:width="0.6cm" svg:height="1cm" svg:x="11.701cm" svg:y="21.00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305" draw:text-style-name="P1" draw:layer="layout" svg:width="0.6cm" svg:height="1cm" svg:x="18.702cm" svg:y="21.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311" draw:text-style-name="P1" draw:layer="layout" svg:width="0.6cm" svg:height="2cm" svg:x="15.204cm" svg:y="19.00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302" draw:text-style-name="P103" draw:layer="layout" svg:width="3cm" svg:height="3cm" svg:x="11.9cm" svg:y="6.5cm">
          <text:p text:style-name="P1">CGU</text:p>
          <draw:enhanced-geometry svg:viewBox="0 0 21600 21600" draw:type="rectangle" draw:enhanced-path="M 0 0 L 21600 0 21600 21600 0 21600 0 0 Z N"/>
        </draw:custom-shape>
        <draw:custom-shape draw:style-name="gr1302" draw:text-style-name="P103" draw:layer="layout" svg:width="3cm" svg:height="3cm" svg:x="15.5cm" svg:y="6.5cm">
          <text:p text:style-name="P1">SCU</text:p>
          <draw:enhanced-geometry svg:viewBox="0 0 21600 21600" draw:type="rectangle" draw:enhanced-path="M 0 0 L 21600 0 21600 21600 0 21600 0 0 Z N"/>
        </draw:custom-shape>
      </draw:page>
      <draw:page draw:name="page27" draw:style-name="dp1" draw:master-page-name="Default">
        <draw:custom-shape draw:style-name="gr1300" draw:text-style-name="P102" draw:layer="layout" svg:width="3cm" svg:height="3cm" svg:x="14cm" svg:y="10cm">
          <text:p text:style-name="P1">CPU</text:p>
          <text:p text:style-name="P1">Core</text:p>
          <draw:enhanced-geometry svg:viewBox="0 0 21600 21600" draw:type="rectangle" draw:enhanced-path="M 0 0 L 21600 0 21600 21600 0 21600 0 0 Z N"/>
        </draw:custom-shape>
        <draw:custom-shape draw:style-name="gr1312" draw:text-style-name="P12" draw:layer="layout" svg:width="14cm" svg:height="1cm" svg:x="16cm" svg:y="14cm">
          <text:p text:style-name="P1">D-Bus</text:p>
          <draw:enhanced-geometry svg:viewBox="0 0 21600 21600" draw:type="rectangle" draw:enhanced-path="M 0 0 L 21600 0 21600 21600 0 21600 0 0 Z N"/>
        </draw:custom-shape>
        <draw:custom-shape draw:style-name="gr1313" draw:text-style-name="P12" draw:layer="layout" svg:width="9cm" svg:height="1cm" svg:x="6cm" svg:y="14cm">
          <text:p text:style-name="P1">I-Bus</text:p>
          <draw:enhanced-geometry svg:viewBox="0 0 21600 21600" draw:type="rectangle" draw:enhanced-path="M 0 0 L 21600 0 21600 21600 0 21600 0 0 Z N"/>
        </draw:custom-shape>
        <draw:custom-shape draw:style-name="gr1302" draw:text-style-name="P103" draw:layer="layout" svg:width="3cm" svg:height="3cm" svg:x="6cm" svg:y="10cm">
          <text:p text:style-name="P1">Test &amp;</text:p>
          <text:p text:style-name="P1">Debug</text:p>
          <draw:enhanced-geometry svg:viewBox="0 0 21600 21600" draw:type="rectangle" draw:enhanced-path="M 0 0 L 21600 0 21600 21600 0 21600 0 0 Z N"/>
        </draw:custom-shape>
        <draw:custom-shape draw:style-name="gr1314" draw:text-style-name="P103" draw:layer="layout" svg:width="2cm" svg:height="3cm" svg:x="13cm" svg:y="16cm">
          <text:p text:style-name="P1">QSPI</text:p>
          <draw:enhanced-geometry svg:viewBox="0 0 21600 21600" draw:type="rectangle" draw:enhanced-path="M 0 0 L 21600 0 21600 21600 0 21600 0 0 Z N"/>
        </draw:custom-shape>
        <draw:custom-shape draw:style-name="gr1302" draw:text-style-name="P103" draw:layer="layout" svg:width="3cm" svg:height="3cm" svg:x="27cm" svg:y="10cm">
          <text:p text:style-name="P1">GPIO</text:p>
          <draw:enhanced-geometry svg:viewBox="0 0 21600 21600" draw:type="rectangle" draw:enhanced-path="M 0 0 L 21600 0 21600 21600 0 21600 0 0 Z N"/>
        </draw:custom-shape>
        <draw:custom-shape draw:style-name="gr1315" draw:text-style-name="P4" draw:layer="layout" svg:width="26cm" svg:height="11cm" svg:x="5cm" svg:y="9cm">
          <text:p/>
          <draw:enhanced-geometry svg:viewBox="0 0 21600 21600" draw:type="rectangle" draw:enhanced-path="M 0 0 L 21600 0 21600 21600 0 21600 0 0 Z N"/>
        </draw:custom-shape>
        <draw:frame draw:style-name="gr1316" draw:text-style-name="P3" draw:layer="layout" svg:width="9.477cm" svg:height="0.962cm" svg:x="15.7cm" svg:y="19cm">
          <draw:text-box>
            <text:p>RWU-RV64I (NoPipelineCache)</text:p>
          </draw:text-box>
        </draw:frame>
        <draw:custom-shape draw:style-name="gr1317" draw:text-style-name="P12" draw:layer="layout" svg:width="4cm" svg:height="2cm" svg:x="12cm" svg:y="21cm">
          <text:p text:style-name="P1">NOR-Flash</text:p>
          <draw:enhanced-geometry svg:viewBox="0 0 21600 21600" draw:type="rectangle" draw:enhanced-path="M 0 0 L 21600 0 21600 21600 0 21600 0 0 Z N"/>
        </draw:custom-shape>
        <draw:custom-shape draw:style-name="gr1306" draw:text-style-name="P12" draw:layer="layout" svg:width="2cm" svg:height="0.6cm" svg:x="4cm" svg:y="11.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1307" draw:text-style-name="P3" draw:layer="layout" svg:width="2.078cm" svg:height="0.962cm" svg:x="3.016cm" svg:y="10.043cm">
          <draw:text-box>
            <text:p>JTAG</text:p>
          </draw:text-box>
        </draw:frame>
        <draw:custom-shape draw:style-name="gr1305" draw:text-style-name="P1" draw:layer="layout" svg:width="0.6cm" svg:height="1cm" svg:x="6.7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305" draw:text-style-name="P1" draw:layer="layout" svg:width="0.6cm" svg:height="1cm" svg:x="14.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305" draw:text-style-name="P1" draw:layer="layout" svg:width="0.6cm" svg:height="1cm" svg:x="16.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305" draw:text-style-name="P1" draw:layer="layout" svg:width="0.6cm" svg:height="1cm" svg:x="28.202cm" svg:y="13.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306" draw:text-style-name="P12" draw:layer="layout" svg:width="2cm" svg:height="0.6cm" svg:x="30.001cm" svg:y="11.20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1308" draw:text-style-name="P3" draw:layer="layout" svg:width="2.09cm" svg:height="0.962cm" svg:x="30.91cm" svg:y="10cm">
          <draw:text-box>
            <text:p>GPIO</text:p>
          </draw:text-box>
        </draw:frame>
        <draw:custom-shape draw:style-name="gr1305" draw:text-style-name="P1" draw:layer="layout" svg:width="0.6cm" svg:height="1cm" svg:x="23.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305" draw:text-style-name="P1" draw:layer="layout" svg:width="0.6cm" svg:height="1cm" svg:x="13.703cm" svg:y="15.00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305" draw:text-style-name="P1" draw:layer="layout" svg:width="0.6cm" svg:height="1cm" svg:x="19.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305" draw:text-style-name="P1" draw:layer="layout" svg:width="0.6cm" svg:height="1cm" svg:x="11.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311" draw:text-style-name="P1" draw:layer="layout" svg:width="0.6cm" svg:height="2cm" svg:x="13.704cm" svg:y="19.00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318" draw:text-style-name="P104" draw:layer="layout" svg:width="3cm" svg:height="3cm" svg:x="22cm" svg:y="10cm">
          <text:p text:style-name="P1">ICU</text:p>
          <draw:enhanced-geometry svg:viewBox="0 0 21600 21600" draw:type="rectangle" draw:enhanced-path="M 0 0 L 21600 0 21600 21600 0 21600 0 0 Z N"/>
        </draw:custom-shape>
        <draw:custom-shape draw:style-name="gr1318" draw:text-style-name="P104" draw:layer="layout" svg:width="3cm" svg:height="3cm" svg:x="27cm" svg:y="16cm">
          <text:p text:style-name="P1">SCU</text:p>
          <draw:enhanced-geometry svg:viewBox="0 0 21600 21600" draw:type="rectangle" draw:enhanced-path="M 0 0 L 21600 0 21600 21600 0 21600 0 0 Z N"/>
        </draw:custom-shape>
        <draw:frame draw:style-name="gr1319" draw:text-style-name="P3" draw:layer="layout" svg:width="2.019cm" svg:height="0.962cm" svg:x="14.082cm" svg:y="20cm">
          <draw:text-box>
            <text:p>QSPI</text:p>
          </draw:text-box>
        </draw:frame>
        <draw:custom-shape draw:style-name="gr1302" draw:text-style-name="P103" draw:layer="layout" svg:width="3cm" svg:height="3cm" svg:x="23cm" svg:y="16cm">
          <text:p text:style-name="P1">CGU</text:p>
          <draw:enhanced-geometry svg:viewBox="0 0 21600 21600" draw:type="rectangle" draw:enhanced-path="M 0 0 L 21600 0 21600 21600 0 21600 0 0 Z N"/>
        </draw:custom-shape>
        <draw:custom-shape draw:style-name="gr1300" draw:text-style-name="P102" draw:layer="layout" svg:width="3cm" svg:height="3cm" svg:x="18cm" svg:y="10cm">
          <text:p text:style-name="P1">D</text:p>
          <text:p text:style-name="P1">Cache</text:p>
          <draw:enhanced-geometry svg:viewBox="0 0 21600 21600" draw:type="rectangle" draw:enhanced-path="M 0 0 L 21600 0 21600 21600 0 21600 0 0 Z N"/>
        </draw:custom-shape>
        <draw:custom-shape draw:style-name="gr1300" draw:text-style-name="P102" draw:layer="layout" svg:width="3cm" svg:height="3cm" svg:x="10cm" svg:y="10cm">
          <text:p text:style-name="P1">I</text:p>
          <text:p text:style-name="P1">Cache</text:p>
          <draw:enhanced-geometry svg:viewBox="0 0 21600 21600" draw:type="rectangle" draw:enhanced-path="M 0 0 L 21600 0 21600 21600 0 21600 0 0 Z N"/>
        </draw:custom-shape>
        <draw:custom-shape draw:style-name="gr1305" draw:text-style-name="P1" draw:layer="layout" svg:width="0.6cm" svg:height="1cm" svg:x="24.2cm" svg:y="1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305" draw:text-style-name="P1" draw:layer="layout" svg:width="0.6cm" svg:height="1cm" svg:x="28.2cm" svg:y="1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300" draw:text-style-name="P102" draw:layer="layout" svg:width="3cm" svg:height="3cm" svg:x="18cm" svg:y="16cm">
          <text:p text:style-name="P1">D</text:p>
          <text:p text:style-name="P1">Scratch</text:p>
          <text:p text:style-name="P1">Pad</text:p>
          <draw:enhanced-geometry svg:viewBox="0 0 21600 21600" draw:type="rectangle" draw:enhanced-path="M 0 0 L 21600 0 21600 21600 0 21600 0 0 Z N"/>
        </draw:custom-shape>
        <draw:custom-shape draw:style-name="gr1305" draw:text-style-name="P1" draw:layer="layout" svg:width="0.6cm" svg:height="1cm" svg:x="19.201cm" svg:y="15.00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page>
      <draw:page draw:name="page28" draw:style-name="dp1" draw:master-page-name="Default">
        <draw:custom-shape draw:style-name="gr1300" draw:text-style-name="P102" draw:layer="layout" svg:width="3cm" svg:height="3cm" svg:x="27cm" svg:y="17cm">
          <text:p text:style-name="P1">CPU</text:p>
          <text:p text:style-name="P1">Core</text:p>
          <draw:enhanced-geometry svg:viewBox="0 0 21600 21600" draw:type="rectangle" draw:enhanced-path="M 0 0 L 21600 0 21600 21600 0 21600 0 0 Z N"/>
        </draw:custom-shape>
        <draw:custom-shape draw:style-name="gr1312" draw:text-style-name="P12" draw:layer="layout" svg:width="14cm" svg:height="1cm" svg:x="29cm" svg:y="21cm">
          <text:p text:style-name="P1">D-Bus</text:p>
          <draw:enhanced-geometry svg:viewBox="0 0 21600 21600" draw:type="rectangle" draw:enhanced-path="M 0 0 L 21600 0 21600 21600 0 21600 0 0 Z N"/>
        </draw:custom-shape>
        <draw:custom-shape draw:style-name="gr1313" draw:text-style-name="P12" draw:layer="layout" svg:width="9cm" svg:height="1cm" svg:x="19cm" svg:y="21cm">
          <text:p text:style-name="P1">I-Bus</text:p>
          <draw:enhanced-geometry svg:viewBox="0 0 21600 21600" draw:type="rectangle" draw:enhanced-path="M 0 0 L 21600 0 21600 21600 0 21600 0 0 Z N"/>
        </draw:custom-shape>
        <draw:custom-shape draw:style-name="gr1302" draw:text-style-name="P103" draw:layer="layout" svg:width="3cm" svg:height="3cm" svg:x="19cm" svg:y="17cm">
          <text:p text:style-name="P1">Test &amp;</text:p>
          <text:p text:style-name="P1">Debug</text:p>
          <draw:enhanced-geometry svg:viewBox="0 0 21600 21600" draw:type="rectangle" draw:enhanced-path="M 0 0 L 21600 0 21600 21600 0 21600 0 0 Z N"/>
        </draw:custom-shape>
        <draw:custom-shape draw:style-name="gr1302" draw:text-style-name="P103" draw:layer="layout" svg:width="3cm" svg:height="3cm" svg:x="40cm" svg:y="17cm">
          <text:p text:style-name="P1">GPIO</text:p>
          <draw:enhanced-geometry svg:viewBox="0 0 21600 21600" draw:type="rectangle" draw:enhanced-path="M 0 0 L 21600 0 21600 21600 0 21600 0 0 Z N"/>
        </draw:custom-shape>
        <draw:custom-shape draw:style-name="gr1315" draw:text-style-name="P4" draw:layer="layout" svg:width="26cm" svg:height="11cm" svg:x="18cm" svg:y="16cm">
          <text:p/>
          <draw:enhanced-geometry svg:viewBox="0 0 21600 21600" draw:type="rectangle" draw:enhanced-path="M 0 0 L 21600 0 21600 21600 0 21600 0 0 Z N"/>
        </draw:custom-shape>
        <draw:frame draw:style-name="gr1320" draw:text-style-name="P3" draw:layer="layout" svg:width="7.639cm" svg:height="0.962cm" svg:x="21cm" svg:y="26cm">
          <draw:text-box>
            <text:p>RWU-RV64I (NoPipeline)</text:p>
          </draw:text-box>
        </draw:frame>
        <draw:custom-shape draw:style-name="gr1306" draw:text-style-name="P12" draw:layer="layout" svg:width="2cm" svg:height="0.6cm" svg:x="17cm" svg:y="18.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1307" draw:text-style-name="P3" draw:layer="layout" svg:width="2.078cm" svg:height="0.962cm" svg:x="16.016cm" svg:y="17.043cm">
          <draw:text-box>
            <text:p>JTAG</text:p>
          </draw:text-box>
        </draw:frame>
        <draw:custom-shape draw:style-name="gr1305" draw:text-style-name="P1" draw:layer="layout" svg:width="0.6cm" svg:height="1cm" svg:x="19.7cm" svg:y="20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305" draw:text-style-name="P1" draw:layer="layout" svg:width="0.6cm" svg:height="1cm" svg:x="27.2cm" svg:y="20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305" draw:text-style-name="P1" draw:layer="layout" svg:width="0.6cm" svg:height="1cm" svg:x="29.2cm" svg:y="20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305" draw:text-style-name="P1" draw:layer="layout" svg:width="0.6cm" svg:height="1cm" svg:x="41.202cm" svg:y="20.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306" draw:text-style-name="P12" draw:layer="layout" svg:width="2cm" svg:height="0.6cm" svg:x="43.001cm" svg:y="18.20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1308" draw:text-style-name="P3" draw:layer="layout" svg:width="2.09cm" svg:height="0.962cm" svg:x="43.91cm" svg:y="17cm">
          <draw:text-box>
            <text:p>GPIO</text:p>
          </draw:text-box>
        </draw:frame>
        <draw:custom-shape draw:style-name="gr1305" draw:text-style-name="P1" draw:layer="layout" svg:width="0.6cm" svg:height="1cm" svg:x="36.2cm" svg:y="20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305" draw:text-style-name="P1" draw:layer="layout" svg:width="0.6cm" svg:height="1cm" svg:x="32.2cm" svg:y="20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305" draw:text-style-name="P1" draw:layer="layout" svg:width="0.6cm" svg:height="1cm" svg:x="24.2cm" svg:y="20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318" draw:text-style-name="P104" draw:layer="layout" svg:width="3cm" svg:height="3cm" svg:x="35cm" svg:y="17cm">
          <text:p text:style-name="P1">ICU</text:p>
          <draw:enhanced-geometry svg:viewBox="0 0 21600 21600" draw:type="rectangle" draw:enhanced-path="M 0 0 L 21600 0 21600 21600 0 21600 0 0 Z N"/>
        </draw:custom-shape>
        <draw:custom-shape draw:style-name="gr1318" draw:text-style-name="P104" draw:layer="layout" svg:width="3cm" svg:height="3cm" svg:x="40cm" svg:y="23cm">
          <text:p text:style-name="P1">SCU</text:p>
          <draw:enhanced-geometry svg:viewBox="0 0 21600 21600" draw:type="rectangle" draw:enhanced-path="M 0 0 L 21600 0 21600 21600 0 21600 0 0 Z N"/>
        </draw:custom-shape>
        <draw:custom-shape draw:style-name="gr1302" draw:text-style-name="P103" draw:layer="layout" svg:width="3cm" svg:height="3cm" svg:x="36cm" svg:y="23cm">
          <text:p text:style-name="P1">CGU</text:p>
          <draw:enhanced-geometry svg:viewBox="0 0 21600 21600" draw:type="rectangle" draw:enhanced-path="M 0 0 L 21600 0 21600 21600 0 21600 0 0 Z N"/>
        </draw:custom-shape>
        <draw:custom-shape draw:style-name="gr1300" draw:text-style-name="P102" draw:layer="layout" svg:width="3cm" svg:height="3cm" svg:x="31cm" svg:y="17cm">
          <text:p text:style-name="P1">D</text:p>
          <text:p text:style-name="P1">Mem</text:p>
          <draw:enhanced-geometry svg:viewBox="0 0 21600 21600" draw:type="rectangle" draw:enhanced-path="M 0 0 L 21600 0 21600 21600 0 21600 0 0 Z N"/>
        </draw:custom-shape>
        <draw:custom-shape draw:style-name="gr1300" draw:text-style-name="P102" draw:layer="layout" svg:width="3cm" svg:height="3cm" svg:x="23cm" svg:y="17cm">
          <text:p text:style-name="P1">I</text:p>
          <text:p text:style-name="P1">Mem</text:p>
          <draw:enhanced-geometry svg:viewBox="0 0 21600 21600" draw:type="rectangle" draw:enhanced-path="M 0 0 L 21600 0 21600 21600 0 21600 0 0 Z N"/>
        </draw:custom-shape>
        <draw:custom-shape draw:style-name="gr1305" draw:text-style-name="P1" draw:layer="layout" svg:width="0.6cm" svg:height="1cm" svg:x="37.2cm" svg:y="2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305" draw:text-style-name="P1" draw:layer="layout" svg:width="0.6cm" svg:height="1cm" svg:x="41.2cm" svg:y="2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321" draw:text-style-name="P105" draw:layer="layout" svg:width="3cm" svg:height="1cm" svg:x="14cm" svg:y="18cm">
          <text:p text:style-name="P15">FT232H</text:p>
          <draw:enhanced-geometry svg:viewBox="0 0 21600 21600" draw:type="rectangle" draw:enhanced-path="M 0 0 L 21600 0 21600 21600 0 21600 0 0 Z N"/>
        </draw:custom-shape>
        <draw:custom-shape draw:style-name="gr1322" draw:text-style-name="P105" draw:layer="layout" svg:width="3cm" svg:height="1cm" svg:x="9cm" svg:y="18cm">
          <text:p text:style-name="P15">PC</text:p>
          <draw:enhanced-geometry svg:viewBox="0 0 21600 21600" draw:type="rectangle" draw:enhanced-path="M 0 0 L 21600 0 21600 21600 0 21600 0 0 Z N"/>
        </draw:custom-shape>
        <draw:custom-shape draw:style-name="gr1306" draw:text-style-name="P12" draw:layer="layout" svg:width="2cm" svg:height="0.6cm" svg:x="12cm" svg:y="18.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1307" draw:text-style-name="P3" draw:layer="layout" svg:width="2.078cm" svg:height="0.962cm" svg:x="11.916cm" svg:y="17.043cm">
          <draw:text-box>
            <text:p>USB</text:p>
          </draw:text-box>
        </draw:frame>
        <draw:custom-shape draw:style-name="gr1323" draw:text-style-name="P105" draw:layer="layout" svg:width="5.6cm" svg:height="2cm" svg:x="12cm" svg:y="20cm">
          <text:p text:style-name="P15">Logic Analyser </text:p>
          <text:p text:style-name="P15">(PulseView)</text:p>
          <draw:enhanced-geometry svg:viewBox="0 0 21600 21600" draw:type="rectangle" draw:enhanced-path="M 0 0 L 21600 0 21600 21600 0 21600 0 0 Z N"/>
        </draw:custom-shape>
        <draw:custom-shape draw:style-name="gr1324" draw:text-style-name="P1" draw:layer="layout" svg:width="0.6cm" svg:height="1.5cm" svg:x="17.1cm" svg:y="18.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24" draw:text-style-name="P1" draw:layer="layout" svg:width="0.6cm" svg:height="1.5cm" svg:x="9.7cm" svg:y="19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06" draw:text-style-name="P12" draw:layer="layout" svg:width="2cm" svg:height="0.6cm" svg:x="10cm" svg:y="20.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page>
      <draw:page draw:name="page29" draw:style-name="dp1" draw:master-page-name="Default">
        <draw:frame draw:style-name="gr1295" draw:text-style-name="P4" draw:layer="layout" svg:width="42.597cm" svg:height="28.812cm" svg:x="2.803cm" svg:y="2.4cm">
          <draw:image xlink:href="Pictures/100000010000064A00000441F1F82341.png" xlink:type="simple" xlink:show="embed" xlink:actuate="onLoad" draw:mime-type="image/png">
            <text:p/>
          </draw:image>
        </draw:frame>
      </draw:page>
      <draw:page draw:name="page30" draw:style-name="dp1" draw:master-page-name="Default">
        <draw:g draw:style-name="gr1">
          <draw:custom-shape draw:style-name="gr1325" draw:text-style-name="P103" draw:layer="layout" svg:width="6cm" svg:height="6cm" svg:x="11.006cm" svg:y="11cm">
            <text:p text:style-name="P1">GPIO</text:p>
            <draw:enhanced-geometry svg:viewBox="0 0 21600 21600" draw:type="rectangle" draw:enhanced-path="M 0 0 L 21600 0 21600 21600 0 21600 0 0 Z N"/>
          </draw:custom-shape>
          <draw:frame draw:style-name="gr1326" draw:text-style-name="P3" draw:layer="layout" svg:width="1.914cm" svg:height="0.962cm" svg:x="11.006cm" svg:y="11.038cm">
            <draw:text-box>
              <text:p>adr_i</text:p>
            </draw:text-box>
          </draw:frame>
          <draw:frame draw:style-name="gr1327" draw:text-style-name="P3" draw:layer="layout" svg:width="1.879cm" svg:height="0.962cm" svg:x="11.006cm" svg:y="12.038cm">
            <draw:text-box>
              <text:p>dat_i</text:p>
            </draw:text-box>
          </draw:frame>
          <draw:frame draw:style-name="gr22" draw:text-style-name="P3" draw:layer="layout" svg:width="1.806cm" svg:height="0.962cm" svg:x="11cm" svg:y="13.038cm">
            <draw:text-box>
              <text:p>sel_i</text:p>
            </draw:text-box>
          </draw:frame>
          <draw:frame draw:style-name="gr1328" draw:text-style-name="P3" draw:layer="layout" svg:width="1.808cm" svg:height="0.962cm" svg:x="11.006cm" svg:y="14.038cm">
            <draw:text-box>
              <text:p>we_i</text:p>
            </draw:text-box>
          </draw:frame>
          <draw:frame draw:style-name="gr35" draw:text-style-name="P3" draw:layer="layout" svg:width="1.949cm" svg:height="0.962cm" svg:x="11.006cm" svg:y="15.038cm">
            <draw:text-box>
              <text:p>cyc_i</text:p>
            </draw:text-box>
          </draw:frame>
          <draw:frame draw:style-name="gr1329" draw:text-style-name="P3" draw:layer="layout" svg:width="1.843cm" svg:height="0.962cm" svg:x="11.006cm" svg:y="16.038cm">
            <draw:text-box>
              <text:p>stb_i</text:p>
            </draw:text-box>
          </draw:frame>
          <draw:frame draw:style-name="gr1330" draw:text-style-name="P3" draw:layer="layout" svg:width="2.091cm" svg:height="0.962cm" svg:x="14.906cm" svg:y="11cm">
            <draw:text-box>
              <text:p>dat_o</text:p>
            </draw:text-box>
          </draw:frame>
          <draw:frame draw:style-name="gr27" draw:text-style-name="P3" draw:layer="layout" svg:width="2.196cm" svg:height="0.962cm" svg:x="14.806cm" svg:y="12.038cm">
            <draw:text-box>
              <text:p>ack_o</text:p>
            </draw:text-box>
          </draw:frame>
          <draw:frame draw:style-name="gr1326" draw:text-style-name="P3" draw:layer="layout" svg:width="1.914cm" svg:height="0.962cm" draw:transform="rotate (1.5707963267949) translate (13.1cm 12.614cm)">
            <draw:text-box>
              <text:p>clk_i</text:p>
            </draw:text-box>
          </draw:frame>
          <draw:frame draw:style-name="gr1331" draw:text-style-name="P3" draw:layer="layout" svg:width="1.7cm" svg:height="0.962cm" draw:transform="rotate (1.5707963267949) translate (13.9cm 12.514cm)">
            <draw:text-box>
              <text:p>rst_i</text:p>
            </draw:text-box>
          </draw:frame>
          <draw:frame draw:style-name="gr1326" draw:text-style-name="P3" draw:layer="layout" svg:width="1.914cm" svg:height="0.962cm" draw:transform="rotate (1.5707963267949) translate (12.8cm 17.214cm)">
            <draw:text-box>
              <text:p>irq_o</text:p>
            </draw:text-box>
          </draw:frame>
          <draw:frame draw:style-name="gr1332" draw:text-style-name="P3" draw:layer="layout" svg:width="2.547cm" svg:height="0.962cm" draw:transform="rotate (1.5707963267949) translate (13.4cm 17.214cm)">
            <draw:text-box>
              <text:p>gpio_io</text:p>
            </draw:text-box>
          </draw:frame>
          <draw:frame draw:style-name="gr1326" draw:text-style-name="P3" draw:layer="layout" svg:width="1.914cm" svg:height="0.962cm" draw:transform="rotate (1.5707963267949) translate (14cm 17.215cm)">
            <draw:text-box>
              <text:p>cs_o</text:p>
            </draw:text-box>
          </draw:frame>
        </draw:g>
        <draw:g draw:style-name="gr1">
          <draw:custom-shape draw:style-name="gr1325" draw:text-style-name="P103" draw:layer="layout" svg:width="6cm" svg:height="6cm" svg:x="11.006cm" svg:y="18cm">
            <text:p text:style-name="P1">QSPI</text:p>
            <draw:enhanced-geometry svg:viewBox="0 0 21600 21600" draw:type="rectangle" draw:enhanced-path="M 0 0 L 21600 0 21600 21600 0 21600 0 0 Z N"/>
          </draw:custom-shape>
          <draw:frame draw:style-name="gr1326" draw:text-style-name="P3" draw:layer="layout" svg:width="1.914cm" svg:height="0.962cm" svg:x="11.006cm" svg:y="18.038cm">
            <draw:text-box>
              <text:p>adr_i</text:p>
            </draw:text-box>
          </draw:frame>
          <draw:frame draw:style-name="gr1327" draw:text-style-name="P3" draw:layer="layout" svg:width="1.879cm" svg:height="0.962cm" svg:x="11.006cm" svg:y="19.038cm">
            <draw:text-box>
              <text:p>dat_i</text:p>
            </draw:text-box>
          </draw:frame>
          <draw:frame draw:style-name="gr22" draw:text-style-name="P3" draw:layer="layout" svg:width="1.806cm" svg:height="0.962cm" svg:x="11cm" svg:y="20.038cm">
            <draw:text-box>
              <text:p>sel_i</text:p>
            </draw:text-box>
          </draw:frame>
          <draw:frame draw:style-name="gr1328" draw:text-style-name="P3" draw:layer="layout" svg:width="1.808cm" svg:height="0.962cm" svg:x="11.006cm" svg:y="21.038cm">
            <draw:text-box>
              <text:p>we_i</text:p>
            </draw:text-box>
          </draw:frame>
          <draw:frame draw:style-name="gr35" draw:text-style-name="P3" draw:layer="layout" svg:width="1.949cm" svg:height="0.962cm" svg:x="11.006cm" svg:y="22.038cm">
            <draw:text-box>
              <text:p>cyc_i</text:p>
            </draw:text-box>
          </draw:frame>
          <draw:frame draw:style-name="gr1329" draw:text-style-name="P3" draw:layer="layout" svg:width="1.843cm" svg:height="0.962cm" svg:x="11.006cm" svg:y="23.038cm">
            <draw:text-box>
              <text:p>stb_i</text:p>
            </draw:text-box>
          </draw:frame>
          <draw:frame draw:style-name="gr1330" draw:text-style-name="P3" draw:layer="layout" svg:width="2.091cm" svg:height="0.962cm" svg:x="14.906cm" svg:y="18cm">
            <draw:text-box>
              <text:p>dat_o</text:p>
            </draw:text-box>
          </draw:frame>
          <draw:frame draw:style-name="gr27" draw:text-style-name="P3" draw:layer="layout" svg:width="2.196cm" svg:height="0.962cm" svg:x="14.806cm" svg:y="19.038cm">
            <draw:text-box>
              <text:p>ack_o</text:p>
            </draw:text-box>
          </draw:frame>
        </draw:g>
        <draw:g draw:style-name="gr1">
          <draw:custom-shape draw:style-name="gr1325" draw:text-style-name="P103" draw:layer="layout" svg:width="6cm" svg:height="6cm" svg:x="11.006cm" svg:y="25cm">
            <text:p text:style-name="P1">CGU</text:p>
            <draw:enhanced-geometry svg:viewBox="0 0 21600 21600" draw:type="rectangle" draw:enhanced-path="M 0 0 L 21600 0 21600 21600 0 21600 0 0 Z N"/>
          </draw:custom-shape>
          <draw:frame draw:style-name="gr1326" draw:text-style-name="P3" draw:layer="layout" svg:width="1.914cm" svg:height="0.962cm" svg:x="11.006cm" svg:y="25.038cm">
            <draw:text-box>
              <text:p>adr_i</text:p>
            </draw:text-box>
          </draw:frame>
          <draw:frame draw:style-name="gr1327" draw:text-style-name="P3" draw:layer="layout" svg:width="1.879cm" svg:height="0.962cm" svg:x="11.006cm" svg:y="26.038cm">
            <draw:text-box>
              <text:p>dat_i</text:p>
            </draw:text-box>
          </draw:frame>
          <draw:frame draw:style-name="gr22" draw:text-style-name="P3" draw:layer="layout" svg:width="1.806cm" svg:height="0.962cm" svg:x="11cm" svg:y="27.038cm">
            <draw:text-box>
              <text:p>sel_i</text:p>
            </draw:text-box>
          </draw:frame>
          <draw:frame draw:style-name="gr1328" draw:text-style-name="P3" draw:layer="layout" svg:width="1.808cm" svg:height="0.962cm" svg:x="11.006cm" svg:y="28.038cm">
            <draw:text-box>
              <text:p>we_i</text:p>
            </draw:text-box>
          </draw:frame>
          <draw:frame draw:style-name="gr35" draw:text-style-name="P3" draw:layer="layout" svg:width="1.949cm" svg:height="0.962cm" svg:x="11.006cm" svg:y="29.038cm">
            <draw:text-box>
              <text:p>cyc_i</text:p>
            </draw:text-box>
          </draw:frame>
          <draw:frame draw:style-name="gr1329" draw:text-style-name="P3" draw:layer="layout" svg:width="1.843cm" svg:height="0.962cm" svg:x="11.006cm" svg:y="30.038cm">
            <draw:text-box>
              <text:p>stb_i</text:p>
            </draw:text-box>
          </draw:frame>
          <draw:frame draw:style-name="gr1330" draw:text-style-name="P3" draw:layer="layout" svg:width="2.091cm" svg:height="0.962cm" svg:x="14.906cm" svg:y="25cm">
            <draw:text-box>
              <text:p>dat_o</text:p>
            </draw:text-box>
          </draw:frame>
          <draw:frame draw:style-name="gr27" draw:text-style-name="P3" draw:layer="layout" svg:width="2.196cm" svg:height="0.962cm" svg:x="14.806cm" svg:y="26.038cm">
            <draw:text-box>
              <text:p>ack_o</text:p>
            </draw:text-box>
          </draw:frame>
          <draw:frame draw:style-name="gr1326" draw:text-style-name="P3" draw:layer="layout" svg:width="1.914cm" svg:height="0.962cm" draw:transform="rotate (1.5707963267949) translate (13.1cm 26.615cm)">
            <draw:text-box>
              <text:p>clk_i</text:p>
            </draw:text-box>
          </draw:frame>
          <draw:frame draw:style-name="gr1331" draw:text-style-name="P3" draw:layer="layout" svg:width="1.7cm" svg:height="0.962cm" draw:transform="rotate (1.5707963267949) translate (13.9cm 26.515cm)">
            <draw:text-box>
              <text:p>rst_i</text:p>
            </draw:text-box>
          </draw:frame>
          <draw:frame draw:style-name="gr1333" draw:text-style-name="P3" draw:layer="layout" svg:width="3.711cm" svg:height="0.962cm" draw:transform="rotate (1.5707963267949) translate (12.8cm 31.215cm)">
            <draw:text-box>
              <text:p>clk_bus1_o</text:p>
            </draw:text-box>
          </draw:frame>
          <draw:frame draw:style-name="gr1333" draw:text-style-name="P3" draw:layer="layout" svg:width="3.711cm" svg:height="0.962cm" draw:transform="rotate (1.5707963267949) translate (13.4cm 31.216cm)">
            <draw:text-box>
              <text:p>clk_bus2_o</text:p>
            </draw:text-box>
          </draw:frame>
          <draw:frame draw:style-name="gr1334" draw:text-style-name="P3" draw:layer="layout" svg:width="3.499cm" svg:height="0.962cm" draw:transform="rotate (1.5707963267949) translate (14cm 31.216cm)">
            <draw:text-box>
              <text:p>clk_qspi_o</text:p>
            </draw:text-box>
          </draw:frame>
          <draw:frame draw:style-name="gr1335" draw:text-style-name="P3" draw:layer="layout" svg:width="3.571cm" svg:height="0.962cm" draw:transform="rotate (1.5707963267949) translate (14.6cm 31.217cm)">
            <draw:text-box>
              <text:p>clk_core_o</text:p>
            </draw:text-box>
          </draw:frame>
        </draw:g>
        <draw:custom-shape draw:style-name="gr1336" draw:text-style-name="P28" draw:layer="layout" svg:width="2cm" svg:height="2cm" svg:x="6cm" svg:y="15.5cm">
          <text:p text:style-name="P1">AND</text:p>
          <draw:enhanced-geometry svg:viewBox="0 0 21600 21600" draw:type="rectangle" draw:enhanced-path="M 0 0 L 21600 0 21600 21600 0 21600 0 0 Z N"/>
        </draw:custom-shape>
        <draw:custom-shape draw:style-name="gr1336" draw:text-style-name="P28" draw:layer="layout" svg:width="2cm" svg:height="2cm" svg:x="22cm" svg:y="11.5cm">
          <text:p text:style-name="P1">OR</text:p>
          <draw:enhanced-geometry svg:viewBox="0 0 21600 21600" draw:type="rectangle" draw:enhanced-path="M 0 0 L 21600 0 21600 21600 0 21600 0 0 Z N"/>
        </draw:custom-shape>
        <draw:custom-shape draw:style-name="gr1336" draw:text-style-name="P28" draw:layer="layout" svg:width="2cm" svg:height="2cm" svg:x="22cm" svg:y="4cm">
          <text:p text:style-name="P1">MUX</text:p>
          <draw:enhanced-geometry svg:viewBox="0 0 21600 21600" draw:type="rectangle" draw:enhanced-path="M 0 0 L 21600 0 21600 21600 0 21600 0 0 Z N"/>
        </draw:custom-shape>
        <draw:line draw:style-name="gr38" draw:text-style-name="P4" draw:layer="layout" svg:x1="38cm" svg:y1="1.5cm" svg:x2="5.5cm" svg:y2="1.5cm">
          <text:p/>
        </draw:line>
        <draw:line draw:style-name="gr38" draw:text-style-name="P4" draw:layer="layout" svg:x1="37.5cm" svg:y1="2cm" svg:x2="9cm" svg:y2="2cm">
          <text:p/>
        </draw:line>
        <draw:line draw:style-name="gr38" draw:text-style-name="P4" draw:layer="layout" svg:x1="37cm" svg:y1="2.5cm" svg:x2="9.5cm" svg:y2="2.5cm">
          <text:p/>
        </draw:line>
        <draw:line draw:style-name="gr38" draw:text-style-name="P4" draw:layer="layout" svg:x1="36.5cm" svg:y1="3cm" svg:x2="10cm" svg:y2="3cm">
          <text:p/>
        </draw:line>
        <draw:line draw:style-name="gr38" draw:text-style-name="P4" draw:layer="layout" svg:x1="36cm" svg:y1="3.5cm" svg:x2="10.5cm" svg:y2="3.5cm">
          <text:p/>
        </draw:line>
        <draw:line draw:style-name="gr38" draw:text-style-name="P4" draw:layer="layout" svg:x1="38.5cm" svg:y1="1cm" svg:x2="5cm" svg:y2="1cm">
          <text:p/>
        </draw:line>
        <draw:line draw:style-name="gr38" draw:text-style-name="P4" draw:layer="layout" svg:x1="10.5cm" svg:y1="3.5cm" svg:x2="10.5cm" svg:y2="25.516cm">
          <text:p/>
        </draw:line>
        <draw:line draw:style-name="gr1337" draw:text-style-name="P4" draw:layer="layout" svg:x1="10.5cm" svg:y1="11.5cm" svg:x2="11.006cm" svg:y2="11.5cm">
          <text:p/>
        </draw:line>
        <draw:custom-shape draw:style-name="gr40" draw:text-style-name="P5" draw:layer="layout" svg:width="0.2cm" svg:height="0.2cm" svg:x="10.402cm" svg:y="11.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0cm" svg:y1="3cm" svg:x2="10cm" svg:y2="26.54cm">
          <text:p/>
        </draw:line>
        <draw:line draw:style-name="gr1337" draw:text-style-name="P4" draw:layer="layout" svg:x1="10cm" svg:y1="12.524cm" svg:x2="11.006cm" svg:y2="12.524cm">
          <text:p/>
        </draw:line>
        <draw:custom-shape draw:style-name="gr40" draw:text-style-name="P5" draw:layer="layout" svg:width="0.2cm" svg:height="0.2cm" svg:x="9.902cm" svg:y="12.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37" draw:text-style-name="P4" draw:layer="layout" svg:x1="9.5cm" svg:y1="13.5cm" svg:x2="11cm" svg:y2="13.5cm">
          <text:p/>
        </draw:line>
        <draw:line draw:style-name="gr1337" draw:text-style-name="P4" draw:layer="layout" svg:x1="9cm" svg:y1="14.5cm" svg:x2="11cm" svg:y2="14.5cm">
          <text:p/>
        </draw:line>
        <draw:line draw:style-name="gr1337" draw:text-style-name="P4" draw:layer="layout" svg:x1="8.5cm" svg:y1="15.496cm" svg:x2="11cm" svg:y2="15.52cm">
          <text:p/>
        </draw:line>
        <draw:line draw:style-name="gr1337" draw:text-style-name="P4" draw:layer="layout" svg:x1="8cm" svg:y1="16.5cm" svg:x2="11cm" svg:y2="16.5cm">
          <text:p/>
        </draw:line>
        <draw:line draw:style-name="gr38" draw:text-style-name="P4" draw:layer="layout" svg:x1="9.5cm" svg:y1="2.5cm" svg:x2="9.5cm" svg:y2="27.516cm">
          <text:p/>
        </draw:line>
        <draw:line draw:style-name="gr38" draw:text-style-name="P4" draw:layer="layout" svg:x1="9cm" svg:y1="2cm" svg:x2="9cm" svg:y2="28.516cm">
          <text:p/>
        </draw:line>
        <draw:line draw:style-name="gr38" draw:text-style-name="P4" draw:layer="layout" svg:x1="8.5cm" svg:y1="1cm" svg:x2="8.5cm" svg:y2="29.512cm">
          <text:p/>
        </draw:line>
        <draw:custom-shape draw:style-name="gr40" draw:text-style-name="P5" draw:layer="layout" svg:width="0.2cm" svg:height="0.2cm" svg:x="8.4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8.9cm" svg:y="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9.4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38" draw:text-style-name="P4" draw:layer="layout" svg:x1="5.5cm" svg:y1="16cm" svg:x2="6cm" svg:y2="16cm">
          <text:p/>
        </draw:line>
        <draw:line draw:style-name="gr1338" draw:text-style-name="P4" draw:layer="layout" svg:x1="3.5cm" svg:y1="17cm" svg:x2="6cm" svg:y2="17cm">
          <text:p/>
        </draw:line>
        <draw:line draw:style-name="gr1338" draw:text-style-name="P4" draw:layer="layout" svg:x1="5cm" svg:y1="16.5cm" svg:x2="6cm" svg:y2="16.5cm">
          <text:p/>
        </draw:line>
        <draw:custom-shape draw:style-name="gr40" draw:text-style-name="P5" draw:layer="layout" svg:width="0.2cm" svg:height="0.2cm" svg:x="8.4cm" svg:y="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5cm" svg:y1="1.5cm" svg:x2="5.5cm" svg:y2="30cm">
          <text:p/>
        </draw:line>
        <draw:line draw:style-name="gr38" draw:text-style-name="P4" draw:layer="layout" svg:x1="5cm" svg:y1="1cm" svg:x2="5cm" svg:y2="30.5cm">
          <text:p/>
        </draw:line>
        <draw:line draw:style-name="gr38" draw:text-style-name="P4" draw:layer="layout" svg:x1="3cm" svg:y1="10cm" svg:x2="3cm" svg:y2="34cm">
          <text:p/>
        </draw:line>
        <draw:custom-shape draw:style-name="gr40" draw:text-style-name="P5" draw:layer="layout" svg:width="0.2cm" svg:height="0.2cm" svg:x="5.4cm" svg:y="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4.9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1">
          <draw:custom-shape draw:style-name="gr1339" draw:text-style-name="P28" draw:layer="layout" svg:width="6cm" svg:height="4cm" svg:x="27cm" svg:y="12cm">
            <text:p text:style-name="P1">Decod.</text:p>
            <draw:enhanced-geometry svg:viewBox="0 0 21600 21600" draw:type="rectangle" draw:enhanced-path="M 0 0 L 21600 0 21600 21600 0 21600 0 0 Z N"/>
          </draw:custom-shape>
          <draw:frame draw:style-name="gr27" draw:text-style-name="P3" draw:layer="layout" svg:width="2.196cm" svg:height="0.962cm" svg:x="30.8cm" svg:y="14cm">
            <draw:text-box>
              <text:p>cs2_o</text:p>
            </draw:text-box>
          </draw:frame>
          <draw:frame draw:style-name="gr27" draw:text-style-name="P3" draw:layer="layout" svg:width="2.196cm" svg:height="0.962cm" svg:x="30.805cm" svg:y="12cm">
            <draw:text-box>
              <text:p>cs0_o</text:p>
            </draw:text-box>
          </draw:frame>
          <draw:frame draw:style-name="gr27" draw:text-style-name="P3" draw:layer="layout" svg:width="2.196cm" svg:height="0.962cm" svg:x="30.805cm" svg:y="13.038cm">
            <draw:text-box>
              <text:p>cs1_o</text:p>
            </draw:text-box>
          </draw:frame>
          <draw:frame draw:style-name="gr1326" draw:text-style-name="P3" draw:layer="layout" svg:width="1.914cm" svg:height="0.962cm" svg:x="27cm" svg:y="12.038cm">
            <draw:text-box>
              <text:p>adr_i</text:p>
            </draw:text-box>
          </draw:frame>
          <draw:frame draw:style-name="gr27" draw:text-style-name="P3" draw:layer="layout" svg:width="2.196cm" svg:height="0.962cm" svg:x="30.8cm" svg:y="15cm">
            <draw:text-box>
              <text:p>cs3_o</text:p>
            </draw:text-box>
          </draw:frame>
        </draw:g>
        <draw:custom-shape draw:style-name="gr1336" draw:text-style-name="P28" draw:layer="layout" svg:width="2cm" svg:height="2cm" svg:x="6cm" svg:y="22.5cm">
          <text:p text:style-name="P1">AND</text:p>
          <draw:enhanced-geometry svg:viewBox="0 0 21600 21600" draw:type="rectangle" draw:enhanced-path="M 0 0 L 21600 0 21600 21600 0 21600 0 0 Z N"/>
        </draw:custom-shape>
        <draw:line draw:style-name="gr1338" draw:text-style-name="P4" draw:layer="layout" svg:x1="5.5cm" svg:y1="23cm" svg:x2="6cm" svg:y2="23cm">
          <text:p/>
        </draw:line>
        <draw:line draw:style-name="gr1338" draw:text-style-name="P4" draw:layer="layout" svg:x1="5cm" svg:y1="23.5cm" svg:x2="6cm" svg:y2="23.5cm">
          <text:p/>
        </draw:line>
        <draw:custom-shape draw:style-name="gr40" draw:text-style-name="P5" draw:layer="layout" svg:width="0.2cm" svg:height="0.2cm" svg:x="5.4cm" svg:y="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4.9cm" svg:y="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6" draw:text-style-name="P28" draw:layer="layout" svg:width="2cm" svg:height="2cm" svg:x="6cm" svg:y="29.5cm">
          <text:p text:style-name="P1">AND</text:p>
          <draw:enhanced-geometry svg:viewBox="0 0 21600 21600" draw:type="rectangle" draw:enhanced-path="M 0 0 L 21600 0 21600 21600 0 21600 0 0 Z N"/>
        </draw:custom-shape>
        <draw:line draw:style-name="gr1338" draw:text-style-name="P4" draw:layer="layout" svg:x1="5.5cm" svg:y1="30cm" svg:x2="6cm" svg:y2="30cm">
          <text:p/>
        </draw:line>
        <draw:line draw:style-name="gr1338" draw:text-style-name="P4" draw:layer="layout" svg:x1="5cm" svg:y1="30.5cm" svg:x2="6cm" svg:y2="30.5cm">
          <text:p/>
        </draw:line>
        <draw:line draw:style-name="gr1337" draw:text-style-name="P4" draw:layer="layout" svg:x1="8cm" svg:y1="23.5cm" svg:x2="11cm" svg:y2="23.5cm">
          <text:p/>
        </draw:line>
        <draw:line draw:style-name="gr1337" draw:text-style-name="P4" draw:layer="layout" svg:x1="8cm" svg:y1="30.5cm" svg:x2="11cm" svg:y2="30.5cm">
          <text:p/>
        </draw:line>
        <draw:line draw:style-name="gr1337" draw:text-style-name="P4" draw:layer="layout" svg:x1="10.5cm" svg:y1="18.508cm" svg:x2="11.006cm" svg:y2="18.508cm">
          <text:p/>
        </draw:line>
        <draw:custom-shape draw:style-name="gr40" draw:text-style-name="P5" draw:layer="layout" svg:width="0.2cm" svg:height="0.2cm" svg:x="10.402cm" svg:y="18.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37" draw:text-style-name="P4" draw:layer="layout" svg:x1="10cm" svg:y1="19.532cm" svg:x2="11.006cm" svg:y2="19.532cm">
          <text:p/>
        </draw:line>
        <draw:custom-shape draw:style-name="gr40" draw:text-style-name="P5" draw:layer="layout" svg:width="0.2cm" svg:height="0.2cm" svg:x="9.902cm" svg:y="19.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37" draw:text-style-name="P4" draw:layer="layout" svg:x1="9.5cm" svg:y1="20.508cm" svg:x2="11cm" svg:y2="20.508cm">
          <text:p/>
        </draw:line>
        <draw:line draw:style-name="gr1337" draw:text-style-name="P4" draw:layer="layout" svg:x1="9cm" svg:y1="21.508cm" svg:x2="11cm" svg:y2="21.508cm">
          <text:p/>
        </draw:line>
        <draw:line draw:style-name="gr1337" draw:text-style-name="P4" draw:layer="layout" svg:x1="8.5cm" svg:y1="22.504cm" svg:x2="11cm" svg:y2="22.528cm">
          <text:p/>
        </draw:line>
        <draw:custom-shape draw:style-name="gr40" draw:text-style-name="P5" draw:layer="layout" svg:width="0.2cm" svg:height="0.2cm" svg:x="8.4cm" svg:y="22.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8.9cm" svg:y="21.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9.4cm" svg:y="20.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37" draw:text-style-name="P4" draw:layer="layout" svg:x1="10.5cm" svg:y1="25.516cm" svg:x2="11.006cm" svg:y2="25.516cm">
          <text:p/>
        </draw:line>
        <draw:line draw:style-name="gr1337" draw:text-style-name="P4" draw:layer="layout" svg:x1="10cm" svg:y1="26.54cm" svg:x2="11.006cm" svg:y2="26.54cm">
          <text:p/>
        </draw:line>
        <draw:line draw:style-name="gr1337" draw:text-style-name="P4" draw:layer="layout" svg:x1="9.5cm" svg:y1="27.516cm" svg:x2="11cm" svg:y2="27.516cm">
          <text:p/>
        </draw:line>
        <draw:line draw:style-name="gr1337" draw:text-style-name="P4" draw:layer="layout" svg:x1="9cm" svg:y1="28.516cm" svg:x2="11cm" svg:y2="28.516cm">
          <text:p/>
        </draw:line>
        <draw:line draw:style-name="gr1337" draw:text-style-name="P4" draw:layer="layout" svg:x1="8.5cm" svg:y1="29.512cm" svg:x2="11cm" svg:y2="29.536cm">
          <text:p/>
        </draw:line>
        <draw:line draw:style-name="gr1338" draw:text-style-name="P4" draw:layer="layout" svg:x1="4cm" svg:y1="24cm" svg:x2="6cm" svg:y2="24cm">
          <text:p/>
        </draw:line>
        <draw:line draw:style-name="gr1338" draw:text-style-name="P4" draw:layer="layout" svg:x1="4.5cm" svg:y1="31cm" svg:x2="6cm" svg:y2="31cm">
          <text:p/>
        </draw:line>
        <draw:line draw:style-name="gr1340" draw:text-style-name="P4" draw:layer="layout" svg:x1="16.996cm" svg:y1="4.5cm" svg:x2="22cm" svg:y2="4.5cm">
          <text:p/>
        </draw:line>
        <draw:line draw:style-name="gr1340" draw:text-style-name="P4" draw:layer="layout" svg:x1="19cm" svg:y1="5cm" svg:x2="22cm" svg:y2="5cm">
          <text:p/>
        </draw:line>
        <draw:line draw:style-name="gr1340" draw:text-style-name="P4" draw:layer="layout" svg:x1="20cm" svg:y1="5.5cm" svg:x2="22cm" svg:y2="5.5cm">
          <text:p/>
        </draw:line>
        <draw:line draw:style-name="gr1340" draw:text-style-name="P4" draw:layer="layout" svg:x1="16.996cm" svg:y1="12.5cm" svg:x2="22cm" svg:y2="12.5cm">
          <text:p/>
        </draw:line>
        <draw:line draw:style-name="gr1340" draw:text-style-name="P4" draw:layer="layout" svg:x1="18cm" svg:y1="12cm" svg:x2="22cm" svg:y2="12cm">
          <text:p/>
        </draw:line>
        <draw:line draw:style-name="gr1340" draw:text-style-name="P4" draw:layer="layout" svg:x1="21cm" svg:y1="13cm" svg:x2="22cm" svg:y2="13cm">
          <text:p/>
        </draw:line>
        <draw:line draw:style-name="gr38" draw:text-style-name="P4" draw:layer="layout" svg:x1="17.006cm" svg:y1="5.5cm" svg:x2="18.006cm" svg:y2="5.5cm">
          <text:p/>
        </draw:line>
        <draw:line draw:style-name="gr38" draw:text-style-name="P4" draw:layer="layout" svg:x1="16.996cm" svg:y1="11.5cm" svg:x2="19cm" svg:y2="11.5cm">
          <text:p/>
        </draw:line>
        <draw:line draw:style-name="gr38" draw:text-style-name="P4" draw:layer="layout" svg:x1="17.006cm" svg:y1="18.5cm" svg:x2="20cm" svg:y2="18.5cm">
          <text:p/>
        </draw:line>
        <draw:line draw:style-name="gr38" draw:text-style-name="P4" draw:layer="layout" svg:x1="17.006cm" svg:y1="19.5cm" svg:x2="21cm" svg:y2="19.5cm">
          <text:p/>
        </draw:line>
        <draw:line draw:style-name="gr38" draw:text-style-name="P4" draw:layer="layout" svg:x1="21cm" svg:y1="19.5cm" svg:x2="21cm" svg:y2="13cm">
          <text:p/>
        </draw:line>
        <draw:line draw:style-name="gr38" draw:text-style-name="P4" draw:layer="layout" svg:x1="19cm" svg:y1="11.5cm" svg:x2="19cm" svg:y2="5cm">
          <text:p/>
        </draw:line>
        <draw:line draw:style-name="gr38" draw:text-style-name="P4" draw:layer="layout" svg:x1="20cm" svg:y1="18.5cm" svg:x2="20cm" svg:y2="5.5cm">
          <text:p/>
        </draw:line>
        <draw:line draw:style-name="gr38" draw:text-style-name="P4" draw:layer="layout" svg:x1="18cm" svg:y1="12cm" svg:x2="18cm" svg:y2="5.5cm">
          <text:p/>
        </draw:line>
        <draw:line draw:style-name="gr38" draw:text-style-name="P4" draw:layer="layout" svg:x1="24cm" svg:y1="12.5cm" svg:x2="25cm" svg:y2="12.5cm">
          <text:p/>
        </draw:line>
        <draw:line draw:style-name="gr38" draw:text-style-name="P4" draw:layer="layout" svg:x1="25cm" svg:y1="12.5cm" svg:x2="25cm" svg:y2="5.5cm">
          <text:p/>
        </draw:line>
        <draw:line draw:style-name="gr38" draw:text-style-name="P4" draw:layer="layout" svg:x1="35cm" svg:y1="4.3cm" svg:x2="36cm" svg:y2="4.3cm">
          <text:p/>
        </draw:line>
        <draw:line draw:style-name="gr38" draw:text-style-name="P4" draw:layer="layout" svg:x1="35cm" svg:y1="4.7cm" svg:x2="36.5cm" svg:y2="4.7cm">
          <text:p/>
        </draw:line>
        <draw:line draw:style-name="gr38" draw:text-style-name="P4" draw:layer="layout" svg:x1="35cm" svg:y1="5.1cm" svg:x2="37cm" svg:y2="5.1cm">
          <text:p/>
        </draw:line>
        <draw:line draw:style-name="gr38" draw:text-style-name="P4" draw:layer="layout" svg:x1="35cm" svg:y1="5.5cm" svg:x2="37.5cm" svg:y2="5.5cm">
          <text:p/>
        </draw:line>
        <draw:line draw:style-name="gr38" draw:text-style-name="P4" draw:layer="layout" svg:x1="35cm" svg:y1="5.9cm" svg:x2="38cm" svg:y2="5.9cm">
          <text:p/>
        </draw:line>
        <draw:line draw:style-name="gr38" draw:text-style-name="P4" draw:layer="layout" svg:x1="35cm" svg:y1="6.3cm" svg:x2="35.5cm" svg:y2="6.3cm">
          <text:p/>
        </draw:line>
        <draw:line draw:style-name="gr38" draw:text-style-name="P4" draw:layer="layout" svg:x1="36cm" svg:y1="3.5cm" svg:x2="36cm" svg:y2="4.3cm">
          <text:p/>
        </draw:line>
        <draw:line draw:style-name="gr38" draw:text-style-name="P4" draw:layer="layout" svg:x1="36.5cm" svg:y1="3cm" svg:x2="36.5cm" svg:y2="4.7cm">
          <text:p/>
        </draw:line>
        <draw:line draw:style-name="gr38" draw:text-style-name="P4" draw:layer="layout" svg:x1="37cm" svg:y1="2.5cm" svg:x2="37cm" svg:y2="5.1cm">
          <text:p/>
        </draw:line>
        <draw:line draw:style-name="gr38" draw:text-style-name="P4" draw:layer="layout" svg:x1="37.5cm" svg:y1="2cm" svg:x2="37.5cm" svg:y2="5.5cm">
          <text:p/>
        </draw:line>
        <draw:line draw:style-name="gr38" draw:text-style-name="P4" draw:layer="layout" svg:x1="38cm" svg:y1="1.5cm" svg:x2="38cm" svg:y2="5.9cm">
          <text:p/>
        </draw:line>
        <draw:line draw:style-name="gr38" draw:text-style-name="P4" draw:layer="layout" svg:x1="38.5cm" svg:y1="1cm" svg:x2="38.5cm" svg:y2="8cm">
          <text:p/>
        </draw:line>
        <draw:line draw:style-name="gr1341" draw:text-style-name="P4" draw:layer="layout" svg:x1="25.5cm" svg:y1="12.5cm" svg:x2="27cm" svg:y2="12.5cm">
          <text:p/>
        </draw:line>
        <draw:line draw:style-name="gr38" draw:text-style-name="P4" draw:layer="layout" svg:x1="25.5cm" svg:y1="12.5cm" svg:x2="25.5cm" svg:y2="3.5cm">
          <text:p/>
        </draw:line>
        <draw:custom-shape draw:style-name="gr40" draw:text-style-name="P5" draw:layer="layout" svg:width="0.2cm" svg:height="0.2cm" svg:x="25.4cm" svg:y="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3cm" svg:y1="12.5cm" svg:x2="35cm" svg:y2="12.5cm">
          <text:p/>
        </draw:line>
        <draw:line draw:style-name="gr38" draw:text-style-name="P4" draw:layer="layout" svg:x1="33cm" svg:y1="13.5cm" svg:x2="34.5cm" svg:y2="13.5cm">
          <text:p/>
        </draw:line>
        <draw:line draw:style-name="gr38" draw:text-style-name="P4" draw:layer="layout" svg:x1="32.995cm" svg:y1="14.5cm" svg:x2="34cm" svg:y2="14.5cm">
          <text:p/>
        </draw:line>
        <draw:line draw:style-name="gr38" draw:text-style-name="P4" draw:layer="layout" svg:x1="35cm" svg:y1="34cm" svg:x2="35cm" svg:y2="12.5cm">
          <text:p/>
        </draw:line>
        <draw:line draw:style-name="gr38" draw:text-style-name="P4" draw:layer="layout" svg:x1="34.5cm" svg:y1="33.5cm" svg:x2="34.5cm" svg:y2="13.5cm">
          <text:p/>
        </draw:line>
        <draw:line draw:style-name="gr38" draw:text-style-name="P4" draw:layer="layout" svg:x1="34cm" svg:y1="33cm" svg:x2="34cm" svg:y2="14.5cm">
          <text:p/>
        </draw:line>
        <draw:line draw:style-name="gr38" draw:text-style-name="P4" draw:layer="layout" svg:x1="3.5cm" svg:y1="17cm" svg:x2="3.5cm" svg:y2="33.5cm">
          <text:p/>
        </draw:line>
        <draw:line draw:style-name="gr38" draw:text-style-name="P4" draw:layer="layout" svg:x1="4cm" svg:y1="24cm" svg:x2="4cm" svg:y2="33cm">
          <text:p/>
        </draw:line>
        <draw:line draw:style-name="gr38" draw:text-style-name="P4" draw:layer="layout" svg:x1="4cm" svg:y1="33cm" svg:x2="34cm" svg:y2="33cm">
          <text:p/>
        </draw:line>
        <draw:line draw:style-name="gr38" draw:text-style-name="P4" draw:layer="layout" svg:x1="3.5cm" svg:y1="33.5cm" svg:x2="34.5cm" svg:y2="33.5cm">
          <text:p/>
        </draw:line>
        <draw:line draw:style-name="gr38" draw:text-style-name="P4" draw:layer="layout" svg:x1="3cm" svg:y1="34cm" svg:x2="35cm" svg:y2="34cm">
          <text:p/>
        </draw:line>
        <draw:custom-shape draw:style-name="gr1336" draw:text-style-name="P28" draw:layer="layout" svg:width="2cm" svg:height="2cm" svg:x="26.5cm" svg:y="5cm">
          <text:p text:style-name="P1">AND</text:p>
          <draw:enhanced-geometry svg:viewBox="0 0 21600 21600" draw:type="rectangle" draw:enhanced-path="M 0 0 L 21600 0 21600 21600 0 21600 0 0 Z N"/>
        </draw:custom-shape>
        <draw:custom-shape draw:style-name="gr1342" draw:text-style-name="P28" draw:layer="layout" svg:width="3cm" svg:height="2cm" svg:x="36cm" svg:y="8.5cm">
          <text:p text:style-name="P1">Arbiter</text:p>
          <draw:enhanced-geometry svg:viewBox="0 0 21600 21600" draw:type="rectangle" draw:enhanced-path="M 0 0 L 21600 0 21600 21600 0 21600 0 0 Z N"/>
        </draw:custom-shape>
        <draw:line draw:style-name="gr1343" draw:text-style-name="P4" draw:layer="layout" svg:x1="35.5cm" svg:y1="9.5cm" svg:x2="36cm" svg:y2="9.5cm">
          <text:p/>
        </draw:line>
        <draw:line draw:style-name="gr38" draw:text-style-name="P4" draw:layer="layout" svg:x1="35.5cm" svg:y1="6.3cm" svg:x2="35.5cm" svg:y2="9.5cm">
          <text:p/>
        </draw:line>
        <draw:frame draw:style-name="gr1344" draw:text-style-name="P3" draw:layer="layout" svg:width="2.161cm" svg:height="0.962cm" svg:x="36.8cm" svg:y="8.538cm">
          <draw:text-box>
            <text:p>cyc_o</text:p>
          </draw:text-box>
        </draw:frame>
        <draw:frame draw:style-name="gr1345" draw:text-style-name="P3" draw:layer="layout" svg:width="2.444cm" svg:height="0.962cm" svg:x="36.801cm" svg:y="9.538cm">
          <draw:text-box>
            <text:p>gnt0_o</text:p>
          </draw:text-box>
        </draw:frame>
        <draw:line draw:style-name="gr38" draw:text-style-name="P4" draw:layer="layout" svg:x1="39cm" svg:y1="9cm" svg:x2="39.5cm" svg:y2="9cm">
          <text:p/>
        </draw:line>
        <draw:line draw:style-name="gr38" draw:text-style-name="P4" draw:layer="layout" svg:x1="39.5cm" svg:y1="8cm" svg:x2="39.5cm" svg:y2="9cm">
          <text:p/>
        </draw:line>
        <draw:line draw:style-name="gr38" draw:text-style-name="P4" draw:layer="layout" svg:x1="38.5cm" svg:y1="8cm" svg:x2="39.5cm" svg:y2="8cm">
          <text:p/>
        </draw:line>
        <draw:line draw:style-name="gr1346" draw:text-style-name="P4" draw:layer="layout" svg:x1="26cm" svg:y1="6.5cm" svg:x2="26.5cm" svg:y2="6.5cm">
          <text:p/>
        </draw:line>
        <draw:line draw:style-name="gr38" draw:text-style-name="P4" draw:layer="layout" svg:x1="26cm" svg:y1="6.5cm" svg:x2="26cm" svg:y2="11.5cm">
          <text:p/>
        </draw:line>
        <draw:line draw:style-name="gr38" draw:text-style-name="P4" draw:layer="layout" svg:x1="39cm" svg:y1="10cm" svg:x2="39.5cm" svg:y2="10cm">
          <text:p/>
        </draw:line>
        <draw:line draw:style-name="gr38" draw:text-style-name="P4" draw:layer="layout" svg:x1="39.5cm" svg:y1="10cm" svg:x2="39.5cm" svg:y2="11.5cm">
          <text:p/>
        </draw:line>
        <draw:line draw:style-name="gr38" draw:text-style-name="P4" draw:layer="layout" svg:x1="26cm" svg:y1="11.5cm" svg:x2="39.5cm" svg:y2="11.5cm">
          <text:p/>
        </draw:line>
        <draw:line draw:style-name="gr38" draw:text-style-name="P4" draw:layer="layout" svg:x1="32.996cm" svg:y1="15.5cm" svg:x2="33.5cm" svg:y2="15.5cm">
          <text:p/>
        </draw:line>
        <draw:line draw:style-name="gr38" draw:text-style-name="P4" draw:layer="layout" svg:x1="33.5cm" svg:y1="32.5cm" svg:x2="33.5cm" svg:y2="15.5cm">
          <text:p/>
        </draw:line>
        <draw:line draw:style-name="gr146" draw:text-style-name="P4" draw:layer="layout" svg:x1="22.3cm" svg:y1="7cm" svg:x2="22.3cm" svg:y2="6cm">
          <text:p/>
        </draw:line>
        <draw:line draw:style-name="gr146" draw:text-style-name="P4" draw:layer="layout" svg:x1="22.6cm" svg:y1="7.001cm" svg:x2="22.6cm" svg:y2="6.001cm">
          <text:p/>
        </draw:line>
        <draw:line draw:style-name="gr146" draw:text-style-name="P4" draw:layer="layout" svg:x1="22.9cm" svg:y1="7.002cm" svg:x2="22.9cm" svg:y2="6.002cm">
          <text:p/>
        </draw:line>
        <draw:line draw:style-name="gr146" draw:text-style-name="P4" draw:layer="layout" svg:x1="23.2cm" svg:y1="7.003cm" svg:x2="23.2cm" svg:y2="6.003cm">
          <text:p/>
        </draw:line>
        <draw:frame draw:style-name="gr1347" draw:text-style-name="P3" draw:layer="layout" svg:width="1.488cm" svg:height="0.962cm" svg:x="22cm" svg:y="6.7cm">
          <draw:text-box>
            <text:p>cs0</text:p>
          </draw:text-box>
        </draw:frame>
        <draw:frame draw:style-name="gr1347" draw:text-style-name="P3" draw:layer="layout" svg:width="1.488cm" svg:height="0.962cm" svg:x="22.2cm" svg:y="7.1cm">
          <draw:text-box>
            <text:p>cs1</text:p>
          </draw:text-box>
        </draw:frame>
        <draw:frame draw:style-name="gr1347" draw:text-style-name="P3" draw:layer="layout" svg:width="1.488cm" svg:height="0.962cm" svg:x="22.4cm" svg:y="7.5cm">
          <draw:text-box>
            <text:p>cs2</text:p>
          </draw:text-box>
        </draw:frame>
        <draw:frame draw:style-name="gr1347" draw:text-style-name="P3" draw:layer="layout" svg:width="1.488cm" svg:height="0.962cm" svg:x="22.6cm" svg:y="7.9cm">
          <draw:text-box>
            <text:p>cs3</text:p>
          </draw:text-box>
        </draw:frame>
        <draw:g draw:style-name="gr1">
          <draw:custom-shape draw:style-name="gr1325" draw:text-style-name="P103" draw:layer="layout" svg:width="6cm" svg:height="6cm" svg:x="11.007cm" svg:y="4.001cm">
            <text:p text:style-name="P1">D-Mem</text:p>
            <draw:enhanced-geometry svg:viewBox="0 0 21600 21600" draw:type="rectangle" draw:enhanced-path="M 0 0 L 21600 0 21600 21600 0 21600 0 0 Z N"/>
          </draw:custom-shape>
          <draw:frame draw:style-name="gr1326" draw:text-style-name="P3" draw:layer="layout" svg:width="1.914cm" svg:height="0.962cm" svg:x="11.007cm" svg:y="4.039cm">
            <draw:text-box>
              <text:p>adr_i</text:p>
            </draw:text-box>
          </draw:frame>
          <draw:frame draw:style-name="gr1327" draw:text-style-name="P3" draw:layer="layout" svg:width="1.879cm" svg:height="0.962cm" svg:x="11.007cm" svg:y="5.039cm">
            <draw:text-box>
              <text:p>dat_i</text:p>
            </draw:text-box>
          </draw:frame>
          <draw:frame draw:style-name="gr22" draw:text-style-name="P3" draw:layer="layout" svg:width="1.806cm" svg:height="0.962cm" svg:x="11.001cm" svg:y="6.039cm">
            <draw:text-box>
              <text:p>sel_i</text:p>
            </draw:text-box>
          </draw:frame>
          <draw:frame draw:style-name="gr1328" draw:text-style-name="P3" draw:layer="layout" svg:width="1.808cm" svg:height="0.962cm" svg:x="11.007cm" svg:y="7.039cm">
            <draw:text-box>
              <text:p>we_i</text:p>
            </draw:text-box>
          </draw:frame>
          <draw:frame draw:style-name="gr35" draw:text-style-name="P3" draw:layer="layout" svg:width="1.949cm" svg:height="0.962cm" svg:x="11.007cm" svg:y="8.039cm">
            <draw:text-box>
              <text:p>cyc_i</text:p>
            </draw:text-box>
          </draw:frame>
          <draw:frame draw:style-name="gr1329" draw:text-style-name="P3" draw:layer="layout" svg:width="1.843cm" svg:height="0.962cm" svg:x="11.007cm" svg:y="9.039cm">
            <draw:text-box>
              <text:p>stb_i</text:p>
            </draw:text-box>
          </draw:frame>
          <draw:frame draw:style-name="gr1330" draw:text-style-name="P3" draw:layer="layout" svg:width="2.091cm" svg:height="0.962cm" svg:x="14.907cm" svg:y="4.001cm">
            <draw:text-box>
              <text:p>dat_o</text:p>
            </draw:text-box>
          </draw:frame>
          <draw:frame draw:style-name="gr27" draw:text-style-name="P3" draw:layer="layout" svg:width="2.196cm" svg:height="0.962cm" svg:x="14.807cm" svg:y="5.039cm">
            <draw:text-box>
              <text:p>ack_o</text:p>
            </draw:text-box>
          </draw:frame>
          <draw:frame draw:style-name="gr1326" draw:text-style-name="P3" draw:layer="layout" svg:width="1.914cm" svg:height="0.962cm" draw:transform="rotate (1.5707963267949) translate (13.101cm 5.615cm)">
            <draw:text-box>
              <text:p>clk_i</text:p>
            </draw:text-box>
          </draw:frame>
          <draw:frame draw:style-name="gr1331" draw:text-style-name="P3" draw:layer="layout" svg:width="1.7cm" svg:height="0.962cm" draw:transform="rotate (1.5707963267949) translate (13.901cm 5.515cm)">
            <draw:text-box>
              <text:p>rst_i</text:p>
            </draw:text-box>
          </draw:frame>
        </draw:g>
        <draw:frame draw:style-name="gr1348" draw:text-style-name="P106" draw:layer="layout" svg:width="2.267cm" svg:height="0.839cm" svg:x="21.9cm" svg:y="5.1cm">
          <draw:text-box>
            <text:p><text:span text:style-name="T45">one hot</text:span></text:p>
          </draw:text-box>
        </draw:frame>
        <draw:line draw:style-name="gr1340" draw:text-style-name="P4" draw:layer="layout" svg:x1="20.5cm" svg:y1="6cm" svg:x2="22cm" svg:y2="6cm">
          <text:p/>
        </draw:line>
        <draw:line draw:style-name="gr1340" draw:text-style-name="P4" draw:layer="layout" svg:x1="21.5cm" svg:y1="13.5cm" svg:x2="22cm" svg:y2="13.5cm">
          <text:p/>
        </draw:line>
        <draw:line draw:style-name="gr38" draw:text-style-name="P4" draw:layer="layout" svg:x1="17.006cm" svg:y1="25.5cm" svg:x2="20.5cm" svg:y2="25.5cm">
          <text:p/>
        </draw:line>
        <draw:line draw:style-name="gr38" draw:text-style-name="P4" draw:layer="layout" svg:x1="17.006cm" svg:y1="26.5cm" svg:x2="21.5cm" svg:y2="26.5cm">
          <text:p/>
        </draw:line>
        <draw:line draw:style-name="gr38" draw:text-style-name="P4" draw:layer="layout" svg:x1="21.5cm" svg:y1="26.5cm" svg:x2="21.5cm" svg:y2="13.5cm">
          <text:p/>
        </draw:line>
        <draw:line draw:style-name="gr38" draw:text-style-name="P4" draw:layer="layout" svg:x1="20.5cm" svg:y1="25.5cm" svg:x2="20.5cm" svg:y2="6cm">
          <text:p/>
        </draw:line>
        <draw:line draw:style-name="gr1337" draw:text-style-name="P4" draw:layer="layout" svg:x1="10.5cm" svg:y1="4.508cm" svg:x2="11.006cm" svg:y2="4.508cm">
          <text:p/>
        </draw:line>
        <draw:custom-shape draw:style-name="gr40" draw:text-style-name="P5" draw:layer="layout" svg:width="0.2cm" svg:height="0.2cm" svg:x="10.402cm" svg:y="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37" draw:text-style-name="P4" draw:layer="layout" svg:x1="10cm" svg:y1="5.532cm" svg:x2="11.006cm" svg:y2="5.532cm">
          <text:p/>
        </draw:line>
        <draw:custom-shape draw:style-name="gr40" draw:text-style-name="P5" draw:layer="layout" svg:width="0.2cm" svg:height="0.2cm" svg:x="9.902cm" svg:y="5.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37" draw:text-style-name="P4" draw:layer="layout" svg:x1="9.5cm" svg:y1="6.508cm" svg:x2="11cm" svg:y2="6.508cm">
          <text:p/>
        </draw:line>
        <draw:line draw:style-name="gr1337" draw:text-style-name="P4" draw:layer="layout" svg:x1="9cm" svg:y1="7.508cm" svg:x2="11cm" svg:y2="7.508cm">
          <text:p/>
        </draw:line>
        <draw:line draw:style-name="gr1337" draw:text-style-name="P4" draw:layer="layout" svg:x1="8.5cm" svg:y1="8.504cm" svg:x2="11cm" svg:y2="8.528cm">
          <text:p/>
        </draw:line>
        <draw:custom-shape draw:style-name="gr40" draw:text-style-name="P5" draw:layer="layout" svg:width="0.2cm" svg:height="0.2cm" svg:x="8.4cm" svg:y="8.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8.9cm" svg:y="7.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9.4cm" svg:y="6.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6" draw:text-style-name="P28" draw:layer="layout" svg:width="2cm" svg:height="2cm" svg:x="6cm" svg:y="8.5cm">
          <text:p text:style-name="P1">AND</text:p>
          <draw:enhanced-geometry svg:viewBox="0 0 21600 21600" draw:type="rectangle" draw:enhanced-path="M 0 0 L 21600 0 21600 21600 0 21600 0 0 Z N"/>
        </draw:custom-shape>
        <draw:line draw:style-name="gr1337" draw:text-style-name="P4" draw:layer="layout" svg:x1="8cm" svg:y1="9.5cm" svg:x2="11cm" svg:y2="9.5cm">
          <text:p/>
        </draw:line>
        <draw:line draw:style-name="gr1338" draw:text-style-name="P4" draw:layer="layout" svg:x1="5.5cm" svg:y1="9cm" svg:x2="6cm" svg:y2="9cm">
          <text:p/>
        </draw:line>
        <draw:line draw:style-name="gr1338" draw:text-style-name="P4" draw:layer="layout" svg:x1="3cm" svg:y1="10cm" svg:x2="6cm" svg:y2="10cm">
          <text:p/>
        </draw:line>
        <draw:line draw:style-name="gr1338" draw:text-style-name="P4" draw:layer="layout" svg:x1="5cm" svg:y1="9.5cm" svg:x2="6cm" svg:y2="9.5cm">
          <text:p/>
        </draw:line>
        <draw:custom-shape draw:style-name="gr40" draw:text-style-name="P5" draw:layer="layout" svg:width="0.2cm" svg:height="0.2cm" svg:x="5.4cm" svg:y="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4.9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5cm" svg:y1="32.5cm" svg:x2="33.5cm" svg:y2="32.5cm">
          <text:p/>
        </draw:line>
        <draw:line draw:style-name="gr38" draw:text-style-name="P4" draw:layer="layout" svg:x1="4.5cm" svg:y1="31cm" svg:x2="4.5cm" svg:y2="32.5cm">
          <text:p/>
        </draw:line>
        <draw:custom-shape draw:style-name="gr1336" draw:text-style-name="P28" draw:layer="layout" svg:width="2cm" svg:height="2cm" svg:x="22cm" svg:y="28cm">
          <text:p text:style-name="P1">MUX</text:p>
          <draw:enhanced-geometry svg:viewBox="0 0 21600 21600" draw:type="rectangle" draw:enhanced-path="M 0 0 L 21600 0 21600 21600 0 21600 0 0 Z N"/>
        </draw:custom-shape>
        <draw:line draw:style-name="gr146" draw:text-style-name="P4" draw:layer="layout" svg:x1="21cm" svg:y1="28.5cm" svg:x2="22cm" svg:y2="28.5cm">
          <text:p/>
        </draw:line>
        <draw:line draw:style-name="gr146" draw:text-style-name="P4" draw:layer="layout" svg:x1="21cm" svg:y1="29.5cm" svg:x2="22cm" svg:y2="29.5cm">
          <text:p/>
        </draw:line>
        <draw:frame draw:style-name="gr1349" draw:text-style-name="P3" draw:layer="layout" svg:width="1.772cm" svg:height="0.962cm" svg:x="19.228cm" svg:y="28cm">
          <draw:text-box>
            <text:p>clk_i</text:p>
          </draw:text-box>
        </draw:frame>
        <draw:line draw:style-name="gr38" draw:text-style-name="P4" draw:layer="layout" svg:x1="15.1cm" svg:y1="31cm" svg:x2="15.1cm" svg:y2="31.5cm">
          <text:p/>
        </draw:line>
        <draw:line draw:style-name="gr38" draw:text-style-name="P4" draw:layer="layout" svg:x1="15.1cm" svg:y1="31.5cm" svg:x2="21cm" svg:y2="31.5cm">
          <text:p/>
        </draw:line>
        <draw:line draw:style-name="gr38" draw:text-style-name="P4" draw:layer="layout" svg:x1="21cm" svg:y1="31.5cm" svg:x2="21cm" svg:y2="29.5cm">
          <text:p/>
        </draw:line>
        <draw:line draw:style-name="gr146" draw:text-style-name="P4" draw:layer="layout" svg:x1="24cm" svg:y1="29cm" svg:x2="25cm" svg:y2="29cm">
          <text:p/>
        </draw:line>
        <draw:frame draw:style-name="gr153" draw:text-style-name="P3" draw:layer="layout" svg:width="3.11cm" svg:height="0.962cm" svg:x="24cm" svg:y="28cm">
          <draw:text-box>
            <text:p>clk_div_s</text:p>
          </draw:text-box>
        </draw:frame>
        <draw:line draw:style-name="gr146" draw:text-style-name="P4" draw:layer="layout" svg:x1="23cm" svg:y1="31cm" svg:x2="23cm" svg:y2="30cm">
          <text:p/>
        </draw:line>
        <draw:frame draw:style-name="gr1350" draw:text-style-name="P3" draw:layer="layout" svg:width="3.114cm" svg:height="0.962cm" svg:x="21.6cm" svg:y="30.7cm">
          <draw:text-box>
            <text:p>dr_cap_s</text:p>
          </draw:text-box>
        </draw:frame>
        <draw:line draw:style-name="gr38" draw:text-style-name="P4" draw:layer="layout" svg:x1="13.3cm" svg:y1="17cm" svg:x2="13.3cm" svg:y2="17.5cm">
          <text:p/>
        </draw:line>
        <draw:line draw:style-name="gr38" draw:text-style-name="P4" draw:layer="layout" svg:x1="13.3cm" svg:y1="17.5cm" svg:x2="26.5cm" svg:y2="17.5cm">
          <text:p/>
        </draw:line>
        <draw:line draw:style-name="gr38" draw:text-style-name="P4" draw:layer="layout" svg:x1="26.5cm" svg:y1="17.5cm" svg:x2="26.5cm" svg:y2="7.5cm">
          <text:p/>
        </draw:line>
        <draw:line draw:style-name="gr38" draw:text-style-name="P4" draw:layer="layout" svg:x1="36cm" svg:y1="9.5cm" svg:x2="38.961cm" svg:y2="9cm">
          <text:p/>
        </draw:line>
        <draw:line draw:style-name="gr38" draw:text-style-name="P4" draw:layer="layout" svg:x1="36cm" svg:y1="9.5cm" svg:x2="39cm" svg:y2="10cm">
          <text:p/>
        </draw:line>
        <draw:g draw:style-name="gr1">
          <draw:custom-shape draw:style-name="gr1325" draw:text-style-name="P103" draw:layer="layout" svg:width="6cm" svg:height="6cm" svg:x="52cm" svg:y="4cm">
            <text:p text:style-name="P1">I-Mem</text:p>
            <draw:enhanced-geometry svg:viewBox="0 0 21600 21600" draw:type="rectangle" draw:enhanced-path="M 0 0 L 21600 0 21600 21600 0 21600 0 0 Z N"/>
          </draw:custom-shape>
          <draw:frame draw:style-name="gr1326" draw:text-style-name="P3" draw:layer="layout" svg:width="1.914cm" svg:height="0.962cm" svg:x="52cm" svg:y="4.038cm">
            <draw:text-box>
              <text:p>adr_i</text:p>
            </draw:text-box>
          </draw:frame>
          <draw:frame draw:style-name="gr1327" draw:text-style-name="P3" draw:layer="layout" svg:width="1.879cm" svg:height="0.962cm" svg:x="52cm" svg:y="5.038cm">
            <draw:text-box>
              <text:p>dat_i</text:p>
            </draw:text-box>
          </draw:frame>
          <draw:frame draw:style-name="gr22" draw:text-style-name="P3" draw:layer="layout" svg:width="1.806cm" svg:height="0.962cm" svg:x="51.994cm" svg:y="6.038cm">
            <draw:text-box>
              <text:p>wr_i</text:p>
            </draw:text-box>
          </draw:frame>
          <draw:frame draw:style-name="gr1330" draw:text-style-name="P3" draw:layer="layout" svg:width="2.091cm" svg:height="0.962cm" svg:x="55.9cm" svg:y="4cm">
            <draw:text-box>
              <text:p>dat_o</text:p>
            </draw:text-box>
          </draw:frame>
          <draw:frame draw:style-name="gr1326" draw:text-style-name="P3" draw:layer="layout" svg:width="1.914cm" svg:height="0.962cm" draw:transform="rotate (1.5707963267949) translate (54.094cm 5.614cm)">
            <draw:text-box>
              <text:p>tck_i</text:p>
            </draw:text-box>
          </draw:frame>
          <draw:frame draw:style-name="gr1349" draw:text-style-name="P3" draw:layer="layout" svg:width="1.772cm" svg:height="0.962cm" draw:transform="rotate (1.5707963267949) translate (54.894cm 5.514cm)">
            <draw:text-box>
              <text:p>clk_i</text:p>
            </draw:text-box>
          </draw:frame>
        </draw:g>
        <draw:custom-shape draw:style-name="gr1336" draw:text-style-name="P28" draw:layer="layout" svg:width="2cm" svg:height="2cm" svg:x="46cm" svg:y="3.538cm">
          <text:p text:style-name="P1">MUX</text:p>
          <draw:enhanced-geometry svg:viewBox="0 0 21600 21600" draw:type="rectangle" draw:enhanced-path="M 0 0 L 21600 0 21600 21600 0 21600 0 0 Z N"/>
        </draw:custom-shape>
        <draw:line draw:style-name="gr146" draw:text-style-name="P4" draw:layer="layout" svg:x1="42.5cm" svg:y1="4cm" svg:x2="46cm" svg:y2="4cm">
          <text:p/>
        </draw:line>
        <draw:line draw:style-name="gr146" draw:text-style-name="P4" draw:layer="layout" svg:x1="45cm" svg:y1="5cm" svg:x2="46cm" svg:y2="5cm">
          <text:p/>
        </draw:line>
        <draw:frame draw:style-name="gr1351" draw:text-style-name="P3" draw:layer="layout" svg:width="3.749cm" svg:height="0.962cm" svg:x="42.251cm" svg:y="3.038cm">
          <draw:text-box>
            <text:p>iBusAddr_s</text:p>
          </draw:text-box>
        </draw:frame>
        <draw:line draw:style-name="gr146" draw:text-style-name="P4" draw:layer="layout" svg:x1="48cm" svg:y1="4.5cm" svg:x2="52.028cm" svg:y2="4.5cm">
          <text:p/>
        </draw:line>
        <draw:frame draw:style-name="gr1352" draw:text-style-name="P3" draw:layer="layout" svg:width="4.1cm" svg:height="0.962cm" svg:x="47.9cm" svg:y="3.638cm">
          <draw:text-box>
            <text:p>iBusAddr2_s</text:p>
          </draw:text-box>
        </draw:frame>
        <draw:line draw:style-name="gr146" draw:text-style-name="P4" draw:layer="layout" svg:x1="47cm" svg:y1="6.5cm" svg:x2="47cm" svg:y2="5.538cm">
          <text:p/>
        </draw:line>
        <draw:frame draw:style-name="gr1353" draw:text-style-name="P3" draw:layer="layout" svg:width="3.533cm" svg:height="0.962cm" svg:x="45.3cm" svg:y="5.638cm">
          <draw:text-box>
            <text:p>mux_sel_s</text:p>
          </draw:text-box>
        </draw:frame>
        <draw:g draw:style-name="gr1">
          <draw:custom-shape draw:style-name="gr1354" draw:text-style-name="P14" draw:layer="layout" svg:width="1cm" svg:height="1cm" svg:x="44cm" svg:y="4.5cm">
            <text:p/>
            <draw:enhanced-geometry svg:viewBox="0 0 21600 21600" draw:type="rectangle" draw:enhanced-path="M 0 0 L 21600 0 21600 21600 0 21600 0 0 Z N"/>
          </draw:custom-shape>
          <draw:custom-shape draw:style-name="gr1354" draw:text-style-name="P14" draw:layer="layout" svg:width="1cm" svg:height="1cm" svg:x="44cm" svg:y="5.5cm">
            <text:p/>
            <draw:enhanced-geometry svg:viewBox="0 0 21600 21600" draw:type="rectangle" draw:enhanced-path="M 0 0 L 21600 0 21600 21600 0 21600 0 0 Z N"/>
          </draw:custom-shape>
          <draw:custom-shape draw:style-name="gr1354" draw:text-style-name="P14" draw:layer="layout" svg:width="1cm" svg:height="1cm" svg:x="44cm" svg:y="7.5cm">
            <text:p/>
            <draw:enhanced-geometry svg:viewBox="0 0 21600 21600" draw:type="rectangle" draw:enhanced-path="M 0 0 L 21600 0 21600 21600 0 21600 0 0 Z N"/>
          </draw:custom-shape>
          <draw:custom-shape draw:style-name="gr1354" draw:text-style-name="P14" draw:layer="layout" svg:width="1cm" svg:height="1cm" svg:x="44cm" svg:y="8.5cm">
            <text:p/>
            <draw:enhanced-geometry svg:viewBox="0 0 21600 21600" draw:type="rectangle" draw:enhanced-path="M 0 0 L 21600 0 21600 21600 0 21600 0 0 Z N"/>
          </draw:custom-shape>
          <draw:path draw:style-name="gr38" draw:text-style-name="P4" draw:layer="layout" svg:width="0.621cm" svg:height="0.378cm" draw:transform="rotate (-1.5707963267949) translate (44.635cm 6.668cm)" svg:viewBox="0 0 622 379" svg:d="M0 344c136 1 299 79 410 0 68-48-368-321-53-317l146-14 119-13">
            <text:p/>
          </draw:path>
        </draw:g>
        <draw:line draw:style-name="gr38" draw:text-style-name="P4" draw:layer="layout" svg:x1="58cm" svg:y1="4.5cm" svg:x2="59cm" svg:y2="4.5cm">
          <text:p/>
        </draw:line>
        <draw:line draw:style-name="gr38" draw:text-style-name="P4" draw:layer="layout" svg:x1="59cm" svg:y1="4.5cm" svg:x2="59cm" svg:y2="3cm">
          <text:p/>
        </draw:line>
        <draw:line draw:style-name="gr38" draw:text-style-name="P4" draw:layer="layout" svg:x1="59cm" svg:y1="3cm" svg:x2="42cm" svg:y2="3cm">
          <text:p/>
        </draw:line>
        <draw:frame draw:style-name="gr1355" draw:text-style-name="P3" draw:layer="layout" svg:width="3.465cm" svg:height="0.962cm" svg:x="42.535cm" svg:y="4.038cm">
          <draw:text-box>
            <text:p>im_addr_s</text:p>
          </draw:text-box>
        </draw:frame>
        <draw:line draw:style-name="gr146" draw:text-style-name="P4" draw:layer="layout" svg:x1="50cm" svg:y1="5.5cm" svg:x2="52cm" svg:y2="5.5cm">
          <text:p/>
        </draw:line>
        <draw:custom-shape draw:style-name="gr1336" draw:text-style-name="P28" draw:layer="layout" svg:width="2cm" svg:height="2cm" svg:x="46cm" svg:y="8.5cm">
          <text:p text:style-name="P1">AND</text:p>
          <draw:enhanced-geometry svg:viewBox="0 0 21600 21600" draw:type="rectangle" draw:enhanced-path="M 0 0 L 21600 0 21600 21600 0 21600 0 0 Z N"/>
        </draw:custom-shape>
        <draw:line draw:style-name="gr146" draw:text-style-name="P4" draw:layer="layout" svg:x1="45cm" svg:y1="9cm" svg:x2="46cm" svg:y2="9cm">
          <text:p/>
        </draw:line>
        <draw:line draw:style-name="gr146" draw:text-style-name="P4" draw:layer="layout" svg:x1="45cm" svg:y1="10cm" svg:x2="46cm" svg:y2="10cm">
          <text:p/>
        </draw:line>
        <draw:frame draw:style-name="gr1356" draw:text-style-name="P3" draw:layer="layout" svg:width="4.452cm" svg:height="0.962cm" svg:x="44.848cm" svg:y="10.138cm">
          <draw:text-box>
            <text:p>im_upd_del_s</text:p>
          </draw:text-box>
        </draw:frame>
        <draw:line draw:style-name="gr38" draw:text-style-name="P4" draw:layer="layout" svg:x1="48cm" svg:y1="9.5cm" svg:x2="51cm" svg:y2="9.5cm">
          <text:p/>
        </draw:line>
        <draw:line draw:style-name="gr146" draw:text-style-name="P4" draw:layer="layout" svg:x1="47cm" svg:y1="6.5cm" svg:x2="51.994cm" svg:y2="6.5cm">
          <text:p/>
        </draw:line>
        <draw:line draw:style-name="gr38" draw:text-style-name="P4" draw:layer="layout" svg:x1="51cm" svg:y1="9.5cm" svg:x2="51cm" svg:y2="6.5cm">
          <text:p/>
        </draw:line>
        <draw:custom-shape draw:style-name="gr40" draw:text-style-name="P5" draw:layer="layout" svg:width="0.2cm" svg:height="0.2cm" svg:x="50.901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5cm" svg:y1="8cm" svg:x2="50cm" svg:y2="8cm">
          <text:p/>
        </draw:line>
        <draw:line draw:style-name="gr38" draw:text-style-name="P4" draw:layer="layout" svg:x1="50cm" svg:y1="8cm" svg:x2="50cm" svg:y2="5.5cm">
          <text:p/>
        </draw:line>
        <draw:frame draw:style-name="gr1357" draw:text-style-name="P3" draw:layer="layout" svg:width="4.545cm" svg:height="0.962cm" svg:x="47.7cm" svg:y="4.7cm">
          <draw:text-box>
            <text:p>iBusDataWr_s</text:p>
          </draw:text-box>
        </draw:frame>
        <draw:frame draw:style-name="gr1358" draw:text-style-name="P3" draw:layer="layout" svg:width="3.52cm" svg:height="0.962cm" svg:x="47.9cm" svg:y="9.238cm">
          <draw:text-box>
            <text:p>iMemWr_s</text:p>
          </draw:text-box>
        </draw:frame>
        <draw:custom-shape draw:style-name="gr1336" draw:text-style-name="P28" draw:layer="layout" svg:width="2cm" svg:height="2cm" svg:x="46cm" svg:y="11cm">
          <text:p text:style-name="P1">FF</text:p>
          <draw:enhanced-geometry svg:viewBox="0 0 21600 21600" draw:type="rectangle" draw:enhanced-path="M 0 0 L 21600 0 21600 21600 0 21600 0 0 Z N"/>
        </draw:custom-shape>
        <draw:line draw:style-name="gr146" draw:text-style-name="P4" draw:layer="layout" svg:x1="62cm" svg:y1="12cm" svg:x2="48cm" svg:y2="12cm">
          <text:p/>
        </draw:line>
        <draw:line draw:style-name="gr38" draw:text-style-name="P4" draw:layer="layout" svg:x1="46cm" svg:y1="12cm" svg:x2="45cm" svg:y2="12cm">
          <text:p/>
        </draw:line>
        <draw:line draw:style-name="gr38" draw:text-style-name="P4" draw:layer="layout" svg:x1="45cm" svg:y1="12cm" svg:x2="45cm" svg:y2="10cm">
          <text:p/>
        </draw:line>
        <draw:frame draw:style-name="gr1359" draw:text-style-name="P3" draw:layer="layout" svg:width="3.254cm" svg:height="0.962cm" svg:x="48cm" svg:y="11.1cm">
          <draw:text-box>
            <text:p>im_upd_s</text:p>
          </draw:text-box>
        </draw:frame>
        <draw:g draw:style-name="gr1">
          <draw:custom-shape draw:style-name="gr1360" draw:text-style-name="P103" draw:layer="layout" svg:width="10cm" svg:height="11cm" svg:x="50cm" svg:y="15cm">
            <text:p text:style-name="P1">JTAG</text:p>
            <draw:enhanced-geometry svg:viewBox="0 0 21600 21600" draw:type="rectangle" draw:enhanced-path="M 0 0 L 21600 0 21600 21600 0 21600 0 0 Z N"/>
          </draw:custom-shape>
          <draw:frame draw:style-name="gr1335" draw:text-style-name="P3" draw:layer="layout" svg:width="3.571cm" svg:height="0.962cm" svg:x="50.134cm" svg:y="16.038cm">
            <draw:text-box>
              <text:p>sc01_tdo_i</text:p>
            </draw:text-box>
          </draw:frame>
          <draw:frame draw:style-name="gr1361" draw:text-style-name="P3" draw:layer="layout" svg:width="3.148cm" svg:height="0.962cm" svg:x="56.787cm" svg:y="16cm">
            <draw:text-box>
              <text:p>tap_rst_o</text:p>
            </draw:text-box>
          </draw:frame>
          <draw:frame draw:style-name="gr1362" draw:text-style-name="P3" draw:layer="layout" svg:width="1.806cm" svg:height="0.962cm" draw:transform="rotate (1.5707963267949) translate (53.682cm 16.906cm)">
            <draw:text-box>
              <text:p>tck_i</text:p>
            </draw:text-box>
          </draw:frame>
          <draw:frame draw:style-name="gr1363" draw:text-style-name="P3" draw:layer="layout" svg:width="1.878cm" svg:height="0.962cm" draw:transform="rotate (1.5707963267949) translate (54.282cm 16.978cm)">
            <draw:text-box>
              <text:p>trst_i</text:p>
            </draw:text-box>
          </draw:frame>
          <draw:frame draw:style-name="gr1364" draw:text-style-name="P3" draw:layer="layout" svg:width="2.018cm" svg:height="0.962cm" draw:transform="rotate (1.5707963267949) translate (54.882cm 17.118cm)">
            <draw:text-box>
              <text:p>tms_i</text:p>
            </draw:text-box>
          </draw:frame>
          <draw:frame draw:style-name="gr1365" draw:text-style-name="P3" draw:layer="layout" svg:width="1.666cm" svg:height="0.962cm" draw:transform="rotate (1.5707963267949) translate (55.482cm 16.766cm)">
            <draw:text-box>
              <text:p>tdi_i</text:p>
            </draw:text-box>
          </draw:frame>
          <draw:frame draw:style-name="gr1308" draw:text-style-name="P3" draw:layer="layout" svg:width="2.09cm" svg:height="0.962cm" draw:transform="rotate (1.5707963267949) translate (54.5cm 25.918cm)">
            <draw:text-box>
              <text:p>tdo_o</text:p>
            </draw:text-box>
          </draw:frame>
          <draw:frame draw:style-name="gr1361" draw:text-style-name="P3" draw:layer="layout" svg:width="3.148cm" svg:height="0.962cm" svg:x="56.787cm" svg:y="16.6cm">
            <draw:text-box>
              <text:p>dr_cap_o</text:p>
            </draw:text-box>
          </draw:frame>
          <draw:frame draw:style-name="gr1335" draw:text-style-name="P3" draw:layer="layout" svg:width="3.571cm" svg:height="0.962cm" svg:x="56.364cm" svg:y="17.2cm">
            <draw:text-box>
              <text:p>sc01_tdi_o</text:p>
            </draw:text-box>
          </draw:frame>
          <draw:frame draw:style-name="gr1366" draw:text-style-name="P3" draw:layer="layout" svg:width="4.066cm" svg:height="0.962cm" svg:x="55.869cm" svg:y="17.8cm">
            <draw:text-box>
              <text:p>sc01_shift_o</text:p>
            </draw:text-box>
          </draw:frame>
          <draw:frame draw:style-name="gr1367" draw:text-style-name="P3" draw:layer="layout" svg:width="4.346cm" svg:height="0.962cm" svg:x="55.589cm" svg:y="18.4cm">
            <draw:text-box>
              <text:p>sc01_clock_o</text:p>
            </draw:text-box>
          </draw:frame>
          <draw:frame draw:style-name="gr1368" draw:text-style-name="P3" draw:layer="layout" svg:width="2.898cm" svg:height="0.962cm" svg:x="50.134cm" svg:y="16.638cm">
            <draw:text-box>
              <text:p>im_tdo_i</text:p>
            </draw:text-box>
          </draw:frame>
          <draw:frame draw:style-name="gr1369" draw:text-style-name="P3" draw:layer="layout" svg:width="2.902cm" svg:height="0.962cm" svg:x="50.134cm" svg:y="17.238cm">
            <draw:text-box>
              <text:p>bs_tdo_i</text:p>
            </draw:text-box>
          </draw:frame>
          <draw:frame draw:style-name="gr1368" draw:text-style-name="P3" draw:layer="layout" svg:width="2.898cm" svg:height="0.962cm" svg:x="57.037cm" svg:y="19cm">
            <draw:text-box>
              <text:p>im_tdi_o</text:p>
            </draw:text-box>
          </draw:frame>
          <draw:frame draw:style-name="gr1370" draw:text-style-name="P3" draw:layer="layout" svg:width="3.393cm" svg:height="0.962cm" svg:x="56.542cm" svg:y="19.6cm">
            <draw:text-box>
              <text:p>im_shift_o</text:p>
            </draw:text-box>
          </draw:frame>
          <draw:frame draw:style-name="gr1371" draw:text-style-name="P3" draw:layer="layout" svg:width="3.677cm" svg:height="0.962cm" svg:x="56.258cm" svg:y="20.2cm">
            <draw:text-box>
              <text:p>im_clock_o</text:p>
            </draw:text-box>
          </draw:frame>
          <draw:frame draw:style-name="gr1372" draw:text-style-name="P3" draw:layer="layout" svg:width="3.288cm" svg:height="0.962cm" svg:x="56.647cm" svg:y="20.8cm">
            <draw:text-box>
              <text:p>im_upd_o</text:p>
            </draw:text-box>
          </draw:frame>
          <draw:frame draw:style-name="gr1373" draw:text-style-name="P3" draw:layer="layout" svg:width="3.817cm" svg:height="0.962cm" svg:x="56.118cm" svg:y="21.4cm">
            <draw:text-box>
              <text:p>im_mode_o</text:p>
            </draw:text-box>
          </draw:frame>
          <draw:frame draw:style-name="gr1369" draw:text-style-name="P3" draw:layer="layout" svg:width="2.902cm" svg:height="0.962cm" svg:x="57.033cm" svg:y="22cm">
            <draw:text-box>
              <text:p>bs_tdi_o</text:p>
            </draw:text-box>
          </draw:frame>
          <draw:frame draw:style-name="gr1370" draw:text-style-name="P3" draw:layer="layout" svg:width="3.393cm" svg:height="0.962cm" svg:x="56.542cm" svg:y="22.6cm">
            <draw:text-box>
              <text:p>bs_shift_o</text:p>
            </draw:text-box>
          </draw:frame>
          <draw:frame draw:style-name="gr1371" draw:text-style-name="P3" draw:layer="layout" svg:width="3.677cm" svg:height="0.962cm" svg:x="56.258cm" svg:y="23.2cm">
            <draw:text-box>
              <text:p>bs_clock_o</text:p>
            </draw:text-box>
          </draw:frame>
          <draw:frame draw:style-name="gr1372" draw:text-style-name="P3" draw:layer="layout" svg:width="3.288cm" svg:height="0.962cm" svg:x="56.647cm" svg:y="23.8cm">
            <draw:text-box>
              <text:p>bs_upd_o</text:p>
            </draw:text-box>
          </draw:frame>
          <draw:frame draw:style-name="gr1373" draw:text-style-name="P3" draw:layer="layout" svg:width="3.817cm" svg:height="0.962cm" svg:x="56.118cm" svg:y="24.4cm">
            <draw:text-box>
              <text:p>bs_mode_o</text:p>
            </draw:text-box>
          </draw:frame>
        </draw:g>
        <draw:line draw:style-name="gr38" draw:text-style-name="P4" draw:layer="layout" svg:x1="60cm" svg:y1="21.3cm" svg:x2="62cm" svg:y2="21.3cm">
          <text:p/>
        </draw:line>
        <draw:line draw:style-name="gr38" draw:text-style-name="P4" draw:layer="layout" svg:x1="62cm" svg:y1="21.3cm" svg:x2="62cm" svg:y2="12cm">
          <text:p/>
        </draw:line>
        <draw:line draw:style-name="gr146" draw:text-style-name="P4" draw:layer="layout" svg:x1="44.5cm" svg:y1="14cm" svg:x2="44.5cm" svg:y2="9.5cm">
          <text:p/>
        </draw:line>
        <draw:line draw:style-name="gr38" draw:text-style-name="P4" draw:layer="layout" svg:x1="44.5cm" svg:y1="2cm" svg:x2="44.5cm" svg:y2="4.5cm">
          <text:p/>
        </draw:line>
        <draw:line draw:style-name="gr146" draw:text-style-name="P4" draw:layer="layout" svg:x1="41.5cm" svg:y1="17.2cm" svg:x2="50cm" svg:y2="17.2cm">
          <text:p/>
        </draw:line>
        <draw:line draw:style-name="gr38" draw:text-style-name="P4" draw:layer="layout" svg:x1="60cm" svg:y1="19.4cm" svg:x2="61cm" svg:y2="19.4cm">
          <text:p/>
        </draw:line>
        <draw:line draw:style-name="gr38" draw:text-style-name="P4" draw:layer="layout" svg:x1="61cm" svg:y1="19.4cm" svg:x2="61cm" svg:y2="14cm">
          <text:p/>
        </draw:line>
        <draw:line draw:style-name="gr38" draw:text-style-name="P4" draw:layer="layout" svg:x1="61cm" svg:y1="14cm" svg:x2="44.5cm" svg:y2="14cm">
          <text:p/>
        </draw:line>
        <draw:line draw:style-name="gr38" draw:text-style-name="P4" draw:layer="layout" svg:x1="41.5cm" svg:y1="2cm" svg:x2="41.5cm" svg:y2="17.2cm">
          <text:p/>
        </draw:line>
        <draw:line draw:style-name="gr38" draw:text-style-name="P4" draw:layer="layout" svg:x1="41.5cm" svg:y1="2cm" svg:x2="44.5cm" svg:y2="2cm">
          <text:p/>
        </draw:line>
        <draw:g draw:style-name="gr1">
          <draw:g draw:style-name="gr1">
            <draw:custom-shape draw:style-name="gr1374" draw:text-style-name="P36" draw:layer="layout" svg:width="4.5cm" svg:height="3cm" svg:x="30.5cm" svg:y="4cm">
              <text:p text:style-name="P35"><text:span text:style-name="T10">mBPIData</text:span></text:p>
              <draw:enhanced-geometry svg:viewBox="0 0 21600 21600" draw:mirror-horizontal="false" draw:mirror-vertical="false" draw:type="rectangle" draw:enhanced-path="M 0 0 L 21600 0 21600 21600 0 21600 0 0 Z N"/>
            </draw:custom-shape>
            <draw:frame draw:style-name="gr546" draw:text-style-name="P37" draw:layer="layout" svg:width="2.551cm" svg:height="0.569cm" svg:x="30.6cm" svg:y="5.208cm">
              <draw:text-box>
                <text:p><text:span text:style-name="T10">dat_from_core_i</text:span></text:p>
              </draw:text-box>
            </draw:frame>
            <draw:frame draw:style-name="gr1375" draw:text-style-name="P37" draw:layer="layout" svg:width="1.289cm" svg:height="0.569cm" svg:x="30.6cm" svg:y="4.8cm">
              <draw:text-box>
                <text:p><text:span text:style-name="T10">addr_i</text:span></text:p>
              </draw:text-box>
            </draw:frame>
            <draw:frame draw:style-name="gr557" draw:text-style-name="P37" draw:layer="layout" svg:width="2.314cm" svg:height="0.569cm" svg:x="30.586cm" svg:y="6cm">
              <draw:text-box>
                <text:p><text:span text:style-name="T10">dat_to_core_o</text:span></text:p>
              </draw:text-box>
            </draw:frame>
            <draw:frame draw:style-name="gr1376" draw:text-style-name="P37" draw:layer="layout" svg:width="1.018cm" svg:height="0.569cm" svg:x="30.6cm" svg:y="5.616cm">
              <draw:text-box>
                <text:p><text:span text:style-name="T10">wr_i</text:span></text:p>
              </draw:text-box>
            </draw:frame>
            <draw:frame draw:style-name="gr1377" draw:text-style-name="P37" draw:layer="layout" svg:width="2.297cm" svg:height="0.569cm" svg:x="32.603cm" svg:y="4cm">
              <draw:text-box>
                <text:p><text:span text:style-name="T10">wb_m_addr_o</text:span></text:p>
              </draw:text-box>
            </draw:frame>
            <draw:frame draw:style-name="gr638" draw:text-style-name="P37" draw:layer="layout" svg:width="2.03cm" svg:height="0.569cm" svg:x="30.6cm" svg:y="4.023cm">
              <draw:text-box>
                <text:p><text:span text:style-name="T10">wb_m_dat_i</text:span></text:p>
              </draw:text-box>
            </draw:frame>
            <draw:frame draw:style-name="gr1378" draw:text-style-name="P37" draw:layer="layout" svg:width="2.123cm" svg:height="0.569cm" svg:x="32.777cm" svg:y="4.4cm">
              <draw:text-box>
                <text:p><text:span text:style-name="T10">wb_m_dat_o</text:span></text:p>
              </draw:text-box>
            </draw:frame>
            <draw:frame draw:style-name="gr670" draw:text-style-name="P37" draw:layer="layout" svg:width="2.094cm" svg:height="0.569cm" svg:x="32.806cm" svg:y="5.2cm">
              <draw:text-box>
                <text:p><text:span text:style-name="T10">wb_m_we_o</text:span></text:p>
              </draw:text-box>
            </draw:frame>
            <draw:frame draw:style-name="gr670" draw:text-style-name="P37" draw:layer="layout" svg:width="2.094cm" svg:height="0.569cm" svg:x="32.806cm" svg:y="4.8cm">
              <draw:text-box>
                <text:p><text:span text:style-name="T10">wb_m_sel_o</text:span></text:p>
              </draw:text-box>
            </draw:frame>
            <draw:frame draw:style-name="gr1379" draw:text-style-name="P37" draw:layer="layout" svg:width="2.106cm" svg:height="0.569cm" svg:x="32.794cm" svg:y="5.6cm">
              <draw:text-box>
                <text:p><text:span text:style-name="T10">wb_m_stb_o</text:span></text:p>
              </draw:text-box>
            </draw:frame>
            <draw:frame draw:style-name="gr384" draw:text-style-name="P37" draw:layer="layout" svg:width="2.077cm" svg:height="0.569cm" svg:x="30.6cm" svg:y="4.431cm">
              <draw:text-box>
                <text:p><text:span text:style-name="T10">wb_m_ack_i</text:span></text:p>
              </draw:text-box>
            </draw:frame>
            <draw:frame draw:style-name="gr1380" draw:text-style-name="P37" draw:layer="layout" svg:width="2.157cm" svg:height="0.569cm" svg:x="32.743cm" svg:y="6cm">
              <draw:text-box>
                <text:p><text:span text:style-name="T10">wb_m_cyc_o</text:span></text:p>
              </draw:text-box>
            </draw:frame>
          </draw:g>
          <draw:g draw:style-name="gr1">
            <draw:custom-shape draw:style-name="gr1374" draw:text-style-name="P36" draw:layer="layout" svg:width="4.5cm" svg:height="3cm" svg:x="30.5cm" svg:y="7.8cm">
              <text:p text:style-name="P35"><text:span text:style-name="T10">mBPIInstr</text:span></text:p>
              <draw:enhanced-geometry svg:viewBox="0 0 21600 21600" draw:mirror-horizontal="false" draw:mirror-vertical="false" draw:type="rectangle" draw:enhanced-path="M 0 0 L 21600 0 21600 21600 0 21600 0 0 Z N"/>
            </draw:custom-shape>
            <draw:frame draw:style-name="gr546" draw:text-style-name="P37" draw:layer="layout" svg:width="2.551cm" svg:height="0.569cm" svg:x="30.6cm" svg:y="9.008cm">
              <draw:text-box>
                <text:p><text:span text:style-name="T10">dat_from_core_i</text:span></text:p>
              </draw:text-box>
            </draw:frame>
            <draw:frame draw:style-name="gr1375" draw:text-style-name="P37" draw:layer="layout" svg:width="1.289cm" svg:height="0.569cm" svg:x="30.6cm" svg:y="8.6cm">
              <draw:text-box>
                <text:p><text:span text:style-name="T10">addr_i</text:span></text:p>
              </draw:text-box>
            </draw:frame>
            <draw:frame draw:style-name="gr557" draw:text-style-name="P37" draw:layer="layout" svg:width="2.314cm" svg:height="0.569cm" svg:x="30.586cm" svg:y="9.8cm">
              <draw:text-box>
                <text:p><text:span text:style-name="T10">dat_to_core_o</text:span></text:p>
              </draw:text-box>
            </draw:frame>
            <draw:frame draw:style-name="gr1376" draw:text-style-name="P37" draw:layer="layout" svg:width="1.018cm" svg:height="0.569cm" svg:x="30.6cm" svg:y="9.416cm">
              <draw:text-box>
                <text:p><text:span text:style-name="T10">wr_i</text:span></text:p>
              </draw:text-box>
            </draw:frame>
            <draw:frame draw:style-name="gr1377" draw:text-style-name="P37" draw:layer="layout" svg:width="2.297cm" svg:height="0.569cm" svg:x="32.603cm" svg:y="7.8cm">
              <draw:text-box>
                <text:p><text:span text:style-name="T10">wb_m_addr_o</text:span></text:p>
              </draw:text-box>
            </draw:frame>
            <draw:frame draw:style-name="gr638" draw:text-style-name="P37" draw:layer="layout" svg:width="2.03cm" svg:height="0.569cm" svg:x="30.6cm" svg:y="7.823cm">
              <draw:text-box>
                <text:p><text:span text:style-name="T10">wb_m_dat_i</text:span></text:p>
              </draw:text-box>
            </draw:frame>
            <draw:frame draw:style-name="gr1378" draw:text-style-name="P37" draw:layer="layout" svg:width="2.123cm" svg:height="0.569cm" svg:x="32.777cm" svg:y="8.2cm">
              <draw:text-box>
                <text:p><text:span text:style-name="T10">wb_m_dat_o</text:span></text:p>
              </draw:text-box>
            </draw:frame>
            <draw:frame draw:style-name="gr670" draw:text-style-name="P37" draw:layer="layout" svg:width="2.094cm" svg:height="0.569cm" svg:x="32.806cm" svg:y="9cm">
              <draw:text-box>
                <text:p><text:span text:style-name="T10">wb_m_we_o</text:span></text:p>
              </draw:text-box>
            </draw:frame>
            <draw:frame draw:style-name="gr670" draw:text-style-name="P37" draw:layer="layout" svg:width="2.094cm" svg:height="0.569cm" svg:x="32.806cm" svg:y="8.6cm">
              <draw:text-box>
                <text:p><text:span text:style-name="T10">wb_m_sel_o</text:span></text:p>
              </draw:text-box>
            </draw:frame>
            <draw:frame draw:style-name="gr1379" draw:text-style-name="P37" draw:layer="layout" svg:width="2.106cm" svg:height="0.569cm" svg:x="32.794cm" svg:y="9.4cm">
              <draw:text-box>
                <text:p><text:span text:style-name="T10">wb_m_stb_o</text:span></text:p>
              </draw:text-box>
            </draw:frame>
            <draw:frame draw:style-name="gr384" draw:text-style-name="P37" draw:layer="layout" svg:width="2.077cm" svg:height="0.569cm" svg:x="30.6cm" svg:y="8.231cm">
              <draw:text-box>
                <text:p><text:span text:style-name="T10">wb_m_ack_i</text:span></text:p>
              </draw:text-box>
            </draw:frame>
            <draw:frame draw:style-name="gr1380" draw:text-style-name="P37" draw:layer="layout" svg:width="2.157cm" svg:height="0.569cm" svg:x="32.743cm" svg:y="9.8cm">
              <draw:text-box>
                <text:p><text:span text:style-name="T10">wb_m_cyc_o</text:span></text:p>
              </draw:text-box>
            </draw:frame>
          </draw:g>
          <draw:polygon draw:style-name="gr1381" draw:text-style-name="P107" draw:layer="layout" svg:width="5.999cm" svg:height="6.799cm" svg:x="29cm" svg:y="4cm" svg:viewBox="0 0 6000 6800" draw:points="1000,0 100,0 0,0 0,6800 1100,6800 1100,3800 6000,3800 6000,3000 1100,3000 1100,0">
            <text:p/>
          </draw:polygon>
          <draw:frame draw:style-name="gr1382" draw:text-style-name="P37" draw:layer="layout" svg:width="1.806cm" svg:height="0.569cm" svg:x="31.5cm" svg:y="7.131cm">
            <draw:text-box>
              <text:p><text:span text:style-name="T10">CPU-Core</text:span></text:p>
            </draw:text-box>
          </draw:frame>
          <draw:line draw:style-name="gr146" draw:text-style-name="P4" draw:layer="layout" svg:x1="30.1cm" svg:y1="5.1cm" svg:x2="30.5cm" svg:y2="5.1cm">
            <text:p/>
          </draw:line>
          <draw:line draw:style-name="gr146" draw:text-style-name="P4" draw:layer="layout" svg:x1="30.1cm" svg:y1="5.5cm" svg:x2="30.5cm" svg:y2="5.5cm">
            <text:p/>
          </draw:line>
          <draw:line draw:style-name="gr146" draw:text-style-name="P4" draw:layer="layout" svg:x1="30.1cm" svg:y1="5.9cm" svg:x2="30.5cm" svg:y2="5.9cm">
            <text:p/>
          </draw:line>
          <draw:line draw:style-name="gr146" draw:text-style-name="P4" draw:layer="layout" svg:x1="30.5cm" svg:y1="6.3cm" svg:x2="30.1cm" svg:y2="6.3cm">
            <text:p/>
          </draw:line>
          <draw:line draw:style-name="gr146" draw:text-style-name="P4" draw:layer="layout" svg:x1="30.1cm" svg:y1="8.9cm" svg:x2="30.5cm" svg:y2="8.9cm">
            <text:p/>
          </draw:line>
          <draw:line draw:style-name="gr146" draw:text-style-name="P4" draw:layer="layout" svg:x1="30.5cm" svg:y1="10.1cm" svg:x2="30.1cm" svg:y2="10.1cm">
            <text:p/>
          </draw:line>
          <draw:frame draw:style-name="gr559" draw:text-style-name="P37" draw:layer="layout" svg:width="1.035cm" svg:height="0.569cm" svg:x="29.1cm" svg:y="7.232cm">
            <draw:text-box>
              <text:p><text:span text:style-name="T10">irq_i</text:span></text:p>
            </draw:text-box>
          </draw:frame>
        </draw:g>
        <draw:line draw:style-name="gr1383" draw:text-style-name="P4" draw:layer="layout" svg:x1="24cm" svg:y1="4.3cm" svg:x2="30.5cm" svg:y2="4.3cm">
          <text:p/>
        </draw:line>
        <draw:line draw:style-name="gr146" draw:text-style-name="P4" draw:layer="layout" svg:x1="27.7cm" svg:y1="4.7cm" svg:x2="30.5cm" svg:y2="4.7cm">
          <text:p/>
        </draw:line>
        <draw:line draw:style-name="gr38" draw:text-style-name="P4" draw:layer="layout" svg:x1="27.7cm" svg:y1="5cm" svg:x2="27.7cm" svg:y2="4.7cm">
          <text:p/>
        </draw:line>
        <draw:line draw:style-name="gr146" draw:text-style-name="P4" draw:layer="layout" svg:x1="25cm" svg:y1="5.5cm" svg:x2="26.5cm" svg:y2="5.5cm">
          <text:p/>
        </draw:line>
        <draw:line draw:style-name="gr146" draw:text-style-name="P4" draw:layer="layout" svg:x1="26.5cm" svg:y1="7.5cm" svg:x2="29cm" svg:y2="7.5cm">
          <text:p/>
        </draw:line>
        <draw:line draw:style-name="gr38" draw:text-style-name="P4" draw:layer="layout" svg:x1="35cm" svg:y1="8.1cm" svg:x2="42.5cm" svg:y2="8.1cm">
          <text:p/>
        </draw:line>
        <draw:line draw:style-name="gr38" draw:text-style-name="P4" draw:layer="layout" svg:x1="42.5cm" svg:y1="8.1cm" svg:x2="42.535cm" svg:y2="4cm">
          <text:p/>
        </draw:line>
        <draw:line draw:style-name="gr146" draw:text-style-name="P4" draw:layer="layout" svg:x1="28cm" svg:y1="8.1cm" svg:x2="30.5cm" svg:y2="8.1cm">
          <text:p/>
        </draw:line>
        <draw:line draw:style-name="gr38" draw:text-style-name="P4" draw:layer="layout" svg:x1="28cm" svg:y1="8.1cm" svg:x2="28cm" svg:y2="11.2cm">
          <text:p/>
        </draw:line>
        <draw:line draw:style-name="gr38" draw:text-style-name="P4" draw:layer="layout" svg:x1="28cm" svg:y1="11.2cm" svg:x2="42cm" svg:y2="11.2cm">
          <text:p/>
        </draw:line>
        <draw:line draw:style-name="gr38" draw:text-style-name="P4" draw:layer="layout" svg:x1="42cm" svg:y1="11.2cm" svg:x2="42cm" svg:y2="3cm">
          <text:p/>
        </draw:line>
      </draw:page>
      <draw:page draw:name="page31" draw:style-name="dp1" draw:master-page-name="Default">
        <draw:g draw:style-name="gr1">
          <draw:custom-shape draw:style-name="gr1384" draw:text-style-name="P12" draw:layer="layout" svg:width="4cm" svg:height="4cm" svg:x="23cm" svg:y="4cm">
            <text:p text:style-name="P1">D-Mem</text:p>
            <draw:enhanced-geometry svg:viewBox="0 0 21600 21600" draw:type="rectangle" draw:enhanced-path="M 0 0 L 21600 0 21600 21600 0 21600 0 0 Z N"/>
          </draw:custom-shape>
          <draw:frame draw:style-name="gr1385" draw:text-style-name="P9" draw:layer="layout" svg:width="0.878cm" svg:height="0.725cm" svg:x="24.522cm" svg:y="4cm">
            <draw:text-box>
              <text:p><text:span text:style-name="T2">re</text:span></text:p>
            </draw:text-box>
          </draw:frame>
          <draw:frame draw:style-name="gr1386" draw:text-style-name="P9" draw:layer="layout" svg:width="1.043cm" svg:height="0.725cm" svg:x="25.512cm" svg:y="7.275cm">
            <draw:text-box>
              <text:p><text:span text:style-name="T2">we</text:span></text:p>
            </draw:text-box>
          </draw:frame>
          <draw:frame draw:style-name="gr325" draw:text-style-name="P9" draw:layer="layout" svg:width="1.655cm" svg:height="0.725cm" svg:x="23cm" svg:y="5.6cm">
            <draw:text-box>
              <text:p><text:span text:style-name="T2">addrw</text:span></text:p>
            </draw:text-box>
          </draw:frame>
          <draw:frame draw:style-name="gr1387" draw:text-style-name="P9" draw:layer="layout" svg:width="1.49cm" svg:height="0.725cm" svg:x="23.01cm" svg:y="4.6cm">
            <draw:text-box>
              <text:p><text:span text:style-name="T2">addrr</text:span></text:p>
            </draw:text-box>
          </draw:frame>
          <draw:frame draw:style-name="gr344" draw:text-style-name="P9" draw:layer="layout" svg:width="1.632cm" svg:height="0.725cm" svg:x="23cm" svg:y="6.6cm">
            <draw:text-box>
              <text:p><text:span text:style-name="T2">dataw</text:span></text:p>
            </draw:text-box>
          </draw:frame>
          <draw:frame draw:style-name="gr56" draw:text-style-name="P9" draw:layer="layout" svg:width="1.467cm" svg:height="0.725cm" svg:x="25.5cm" svg:y="5.575cm">
            <draw:text-box>
              <text:p><text:span text:style-name="T2">datar</text:span></text:p>
            </draw:text-box>
          </draw:frame>
        </draw:g>
        <draw:g draw:style-name="gr1">
          <draw:custom-shape draw:style-name="gr1285" draw:text-style-name="P1" draw:layer="layout" svg:width="1cm" svg:height="2cm" svg:x="9cm" svg:y="6cm">
            <text:p/>
            <draw:enhanced-geometry svg:viewBox="0 0 21600 21600" draw:type="rectangle" draw:enhanced-path="M 0 0 L 21600 0 21600 21600 0 21600 0 0 Z N"/>
          </draw:custom-shape>
          <draw:polygon draw:style-name="gr155" draw:text-style-name="P14" draw:layer="layout" svg:width="0.199cm" svg:height="0.199cm" svg:x="9cm" svg:y="7.7cm" svg:viewBox="0 0 200 200" draw:points="0,200 200,100 0,0">
            <text:p/>
          </draw:polygon>
          <draw:frame draw:style-name="gr1287" draw:text-style-name="P101" draw:layer="layout" svg:width="0.888cm" svg:height="0.806cm" svg:x="9cm" svg:y="6.694cm">
            <draw:text-box>
              <text:p><text:span text:style-name="T44">di</text:span></text:p>
            </draw:text-box>
          </draw:frame>
          <draw:frame draw:style-name="gr1289" draw:text-style-name="P101" draw:layer="layout" svg:width="1.053cm" svg:height="0.806cm" svg:x="9cm" svg:y="6cm">
            <draw:text-box>
              <text:p><text:span text:style-name="T44">do</text:span></text:p>
            </draw:text-box>
          </draw:frame>
        </draw:g>
        <draw:g draw:style-name="gr1">
          <draw:custom-shape draw:style-name="gr1285" draw:text-style-name="P1" draw:layer="layout" svg:width="1cm" svg:height="2cm" svg:x="9cm" svg:y="3cm">
            <text:p/>
            <draw:enhanced-geometry svg:viewBox="0 0 21600 21600" draw:type="rectangle" draw:enhanced-path="M 0 0 L 21600 0 21600 21600 0 21600 0 0 Z N"/>
          </draw:custom-shape>
          <draw:polygon draw:style-name="gr155" draw:text-style-name="P14" draw:layer="layout" svg:width="0.199cm" svg:height="0.199cm" svg:x="9cm" svg:y="4.7cm" svg:viewBox="0 0 200 200" draw:points="0,200 200,100 0,0">
            <text:p/>
          </draw:polygon>
          <draw:frame draw:style-name="gr1287" draw:text-style-name="P101" draw:layer="layout" svg:width="0.888cm" svg:height="0.806cm" svg:x="9cm" svg:y="3.694cm">
            <draw:text-box>
              <text:p><text:span text:style-name="T44">di</text:span></text:p>
            </draw:text-box>
          </draw:frame>
          <draw:frame draw:style-name="gr1289" draw:text-style-name="P101" draw:layer="layout" svg:width="1.053cm" svg:height="0.806cm" svg:x="9cm" svg:y="3cm">
            <draw:text-box>
              <text:p><text:span text:style-name="T44">do</text:span></text:p>
            </draw:text-box>
          </draw:frame>
        </draw:g>
        <draw:g draw:style-name="gr1">
          <draw:custom-shape draw:style-name="gr1285" draw:text-style-name="P1" draw:layer="layout" svg:width="1cm" svg:height="2cm" svg:x="9cm" svg:y="9cm">
            <text:p/>
            <draw:enhanced-geometry svg:viewBox="0 0 21600 21600" draw:type="rectangle" draw:enhanced-path="M 0 0 L 21600 0 21600 21600 0 21600 0 0 Z N"/>
          </draw:custom-shape>
          <draw:polygon draw:style-name="gr155" draw:text-style-name="P14" draw:layer="layout" svg:width="0.199cm" svg:height="0.199cm" svg:x="9cm" svg:y="10.7cm" svg:viewBox="0 0 200 200" draw:points="0,200 200,100 0,0">
            <text:p/>
          </draw:polygon>
          <draw:frame draw:style-name="gr1287" draw:text-style-name="P101" draw:layer="layout" svg:width="0.888cm" svg:height="0.806cm" svg:x="9cm" svg:y="9.694cm">
            <draw:text-box>
              <text:p><text:span text:style-name="T44">di</text:span></text:p>
            </draw:text-box>
          </draw:frame>
          <draw:frame draw:style-name="gr1289" draw:text-style-name="P101" draw:layer="layout" svg:width="1.053cm" svg:height="0.806cm" svg:x="9cm" svg:y="9cm">
            <draw:text-box>
              <text:p><text:span text:style-name="T44">do</text:span></text:p>
            </draw:text-box>
          </draw:frame>
        </draw:g>
        <draw:g draw:style-name="gr1">
          <draw:custom-shape draw:style-name="gr1285" draw:text-style-name="P1" draw:layer="layout" svg:width="1cm" svg:height="2cm" svg:x="9cm" svg:y="12cm">
            <text:p/>
            <draw:enhanced-geometry svg:viewBox="0 0 21600 21600" draw:type="rectangle" draw:enhanced-path="M 0 0 L 21600 0 21600 21600 0 21600 0 0 Z N"/>
          </draw:custom-shape>
          <draw:polygon draw:style-name="gr155" draw:text-style-name="P14" draw:layer="layout" svg:width="0.199cm" svg:height="0.199cm" svg:x="9cm" svg:y="13.7cm" svg:viewBox="0 0 200 200" draw:points="0,200 200,100 0,0">
            <text:p/>
          </draw:polygon>
          <draw:frame draw:style-name="gr1287" draw:text-style-name="P101" draw:layer="layout" svg:width="0.888cm" svg:height="0.806cm" svg:x="9cm" svg:y="12.694cm">
            <draw:text-box>
              <text:p><text:span text:style-name="T44">di</text:span></text:p>
            </draw:text-box>
          </draw:frame>
          <draw:frame draw:style-name="gr1289" draw:text-style-name="P101" draw:layer="layout" svg:width="1.053cm" svg:height="0.806cm" svg:x="9cm" svg:y="12cm">
            <draw:text-box>
              <text:p><text:span text:style-name="T44">do</text:span></text:p>
            </draw:text-box>
          </draw:frame>
        </draw:g>
        <draw:line draw:style-name="gr38" draw:text-style-name="P4" draw:layer="layout" svg:x1="7cm" svg:y1="4cm" svg:x2="9cm" svg:y2="4cm">
          <text:p/>
        </draw:line>
        <draw:frame draw:style-name="gr1388" draw:text-style-name="P101" draw:layer="layout" svg:width="1.851cm" svg:height="0.806cm" svg:x="5cm" svg:y="3.5cm">
          <draw:text-box>
            <text:p><text:span text:style-name="T44">data_i</text:span></text:p>
          </draw:text-box>
        </draw:frame>
        <draw:line draw:style-name="gr38" draw:text-style-name="P4" draw:layer="layout" svg:x1="7.001cm" svg:y1="7cm" svg:x2="9.001cm" svg:y2="7cm">
          <text:p/>
        </draw:line>
        <draw:frame draw:style-name="gr1389" draw:text-style-name="P101" draw:layer="layout" svg:width="1.879cm" svg:height="0.806cm" svg:x="5.001cm" svg:y="6.5cm">
          <draw:text-box>
            <text:p><text:span text:style-name="T44">addr_i</text:span></text:p>
          </draw:text-box>
        </draw:frame>
        <draw:line draw:style-name="gr38" draw:text-style-name="P4" draw:layer="layout" svg:x1="7.001cm" svg:y1="10cm" svg:x2="9.001cm" svg:y2="10cm">
          <text:p/>
        </draw:line>
        <draw:frame draw:style-name="gr1390" draw:text-style-name="P101" draw:layer="layout" svg:width="2.016cm" svg:height="0.806cm" svg:x="5.001cm" svg:y="9.5cm">
          <draw:text-box>
            <text:p><text:span text:style-name="T44">wrEn_i</text:span></text:p>
          </draw:text-box>
        </draw:frame>
        <draw:line draw:style-name="gr38" draw:text-style-name="P4" draw:layer="layout" svg:x1="7.001cm" svg:y1="13cm" svg:x2="9.001cm" svg:y2="13cm">
          <text:p/>
        </draw:line>
        <draw:frame draw:style-name="gr1391" draw:text-style-name="P101" draw:layer="layout" svg:width="1.823cm" svg:height="0.806cm" svg:x="5.001cm" svg:y="12.5cm">
          <draw:text-box>
            <text:p><text:span text:style-name="T44">instr_i</text:span></text:p>
          </draw:text-box>
        </draw:frame>
        <draw:line draw:style-name="gr38" draw:text-style-name="P4" draw:layer="layout" svg:x1="10.001cm" svg:y1="3.5cm" svg:x2="13cm" svg:y2="3.5cm">
          <text:p/>
        </draw:line>
        <draw:line draw:style-name="gr38" draw:text-style-name="P4" draw:layer="layout" svg:x1="10.002cm" svg:y1="6.5cm" svg:x2="13.5cm" svg:y2="6.5cm">
          <text:p/>
        </draw:line>
        <draw:line draw:style-name="gr38" draw:text-style-name="P4" draw:layer="layout" svg:x1="10.002cm" svg:y1="9.5cm" svg:x2="14cm" svg:y2="9.5cm">
          <text:p/>
        </draw:line>
        <draw:line draw:style-name="gr38" draw:text-style-name="P4" draw:layer="layout" svg:x1="10.002cm" svg:y1="12.5cm" svg:x2="14.5cm" svg:y2="12.5cm">
          <text:p/>
        </draw:line>
        <draw:frame draw:style-name="gr1392" draw:text-style-name="P101" draw:layer="layout" svg:width="2.347cm" svg:height="0.806cm" svg:x="10.001cm" svg:y="2.9cm">
          <draw:text-box>
            <text:p><text:span text:style-name="T44">dataw_s</text:span></text:p>
          </draw:text-box>
        </draw:frame>
        <draw:frame draw:style-name="gr1390" draw:text-style-name="P101" draw:layer="layout" svg:width="2.016cm" svg:height="0.806cm" svg:x="10.002cm" svg:y="5.9cm">
          <draw:text-box>
            <text:p><text:span text:style-name="T44">addr_s</text:span></text:p>
          </draw:text-box>
        </draw:frame>
        <draw:frame draw:style-name="gr1393" draw:text-style-name="P101" draw:layer="layout" svg:width="1.658cm" svg:height="0.806cm" svg:x="10.002cm" svg:y="8.9cm">
          <draw:text-box>
            <text:p><text:span text:style-name="T44">we_s</text:span></text:p>
          </draw:text-box>
        </draw:frame>
        <draw:frame draw:style-name="gr1394" draw:text-style-name="P101" draw:layer="layout" svg:width="1.961cm" svg:height="0.806cm" svg:x="10.002cm" svg:y="11.9cm">
          <draw:text-box>
            <text:p><text:span text:style-name="T44">instr_s</text:span></text:p>
          </draw:text-box>
        </draw:frame>
        <draw:custom-shape draw:style-name="gr40" draw:text-style-name="P5" draw:layer="layout" svg:width="0.2cm" svg:height="0.2cm" svg:x="14.401cm" svg:y="7.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1">
          <draw:custom-shape draw:style-name="gr1395" draw:text-style-name="P12" draw:layer="layout" svg:width="5cm" svg:height="5cm" svg:x="16cm" svg:y="5cm">
            <text:p text:style-name="P1">STR-Coder</text:p>
            <draw:enhanced-geometry svg:viewBox="0 0 21600 21600" draw:type="rectangle" draw:enhanced-path="M 0 0 L 21600 0 21600 21600 0 21600 0 0 Z N"/>
          </draw:custom-shape>
          <draw:frame draw:style-name="gr1386" draw:text-style-name="P9" draw:layer="layout" svg:width="1.043cm" svg:height="0.725cm" svg:x="16cm" svg:y="5.588cm">
            <draw:text-box>
              <text:p><text:span text:style-name="T2">we</text:span></text:p>
            </draw:text-box>
          </draw:frame>
          <draw:frame draw:style-name="gr1396" draw:text-style-name="P9" draw:layer="layout" svg:width="1.891cm" svg:height="0.725cm" svg:x="16.001cm" svg:y="6.37cm">
            <draw:text-box>
              <text:p><text:span text:style-name="T2">opcode</text:span></text:p>
            </draw:text-box>
          </draw:frame>
          <draw:frame draw:style-name="gr344" draw:text-style-name="P9" draw:layer="layout" svg:width="1.632cm" svg:height="0.725cm" svg:x="16.002cm" svg:y="7.551cm">
            <draw:text-box>
              <text:p><text:span text:style-name="T2">dataw</text:span></text:p>
            </draw:text-box>
          </draw:frame>
          <draw:frame draw:style-name="gr48" draw:text-style-name="P9" draw:layer="layout" svg:width="1.349cm" svg:height="0.725cm" svg:x="16.002cm" svg:y="8.531cm">
            <draw:text-box>
              <text:p><text:span text:style-name="T2">addr</text:span></text:p>
            </draw:text-box>
          </draw:frame>
          <draw:frame draw:style-name="gr1397" draw:text-style-name="P9" draw:layer="layout" svg:width="1.773cm" svg:height="0.725cm" svg:x="19.365cm" svg:y="6.571cm">
            <draw:text-box>
              <text:p><text:span text:style-name="T2">datawr</text:span></text:p>
            </draw:text-box>
          </draw:frame>
          <draw:frame draw:style-name="gr1398" draw:text-style-name="P9" draw:layer="layout" svg:width="1.719cm" svg:height="0.725cm" svg:x="16.002cm" svg:y="6.971cm">
            <draw:text-box>
              <text:p><text:span text:style-name="T2">func3</text:span></text:p>
            </draw:text-box>
          </draw:frame>
        </draw:g>
        <draw:g draw:style-name="gr1">
          <draw:custom-shape draw:style-name="gr1395" draw:text-style-name="P12" draw:layer="layout" svg:width="5cm" svg:height="5cm" svg:x="32cm" svg:y="3cm">
            <text:p text:style-name="P1">LDR-Coder</text:p>
            <draw:enhanced-geometry svg:viewBox="0 0 21600 21600" draw:type="rectangle" draw:enhanced-path="M 0 0 L 21600 0 21600 21600 0 21600 0 0 Z N"/>
          </draw:custom-shape>
          <draw:frame draw:style-name="gr1399" draw:text-style-name="P9" draw:layer="layout" svg:width="0.948cm" svg:height="0.725cm" svg:x="32cm" svg:y="3.588cm">
            <draw:text-box>
              <text:p><text:span text:style-name="T2">re</text:span></text:p>
            </draw:text-box>
          </draw:frame>
          <draw:frame draw:style-name="gr1396" draw:text-style-name="P9" draw:layer="layout" svg:width="1.891cm" svg:height="0.725cm" svg:x="32.001cm" svg:y="4.37cm">
            <draw:text-box>
              <text:p><text:span text:style-name="T2">opcode</text:span></text:p>
            </draw:text-box>
          </draw:frame>
          <draw:frame draw:style-name="gr324" draw:text-style-name="P9" draw:layer="layout" svg:width="1.867cm" svg:height="0.725cm" svg:x="32.002cm" svg:y="5.551cm">
            <draw:text-box>
              <text:p><text:span text:style-name="T2">dataRd</text:span></text:p>
            </draw:text-box>
          </draw:frame>
          <draw:frame draw:style-name="gr48" draw:text-style-name="P9" draw:layer="layout" svg:width="1.349cm" svg:height="0.725cm" svg:x="32.002cm" svg:y="6.531cm">
            <draw:text-box>
              <text:p><text:span text:style-name="T2">addr</text:span></text:p>
            </draw:text-box>
          </draw:frame>
          <draw:frame draw:style-name="gr1400" draw:text-style-name="P9" draw:layer="layout" svg:width="1.612cm" svg:height="0.725cm" svg:x="35.365cm" svg:y="4.571cm">
            <draw:text-box>
              <text:p><text:span text:style-name="T2">datao</text:span></text:p>
            </draw:text-box>
          </draw:frame>
          <draw:frame draw:style-name="gr1398" draw:text-style-name="P9" draw:layer="layout" svg:width="1.719cm" svg:height="0.725cm" svg:x="32.002cm" svg:y="4.871cm">
            <draw:text-box>
              <text:p><text:span text:style-name="T2">func3</text:span></text:p>
            </draw:text-box>
          </draw:frame>
        </draw:g>
        <draw:line draw:style-name="gr38" draw:text-style-name="P4" draw:layer="layout" svg:x1="14cm" svg:y1="6cm" svg:x2="16cm" svg:y2="6cm">
          <text:p/>
        </draw:line>
        <draw:line draw:style-name="gr38" draw:text-style-name="P4" draw:layer="layout" svg:x1="14.5cm" svg:y1="6.8cm" svg:x2="16cm" svg:y2="6.8cm">
          <text:p/>
        </draw:line>
        <draw:line draw:style-name="gr38" draw:text-style-name="P4" draw:layer="layout" svg:x1="14.5cm" svg:y1="7.2cm" svg:x2="16cm" svg:y2="7.2cm">
          <text:p/>
        </draw:line>
        <draw:line draw:style-name="gr38" draw:text-style-name="P4" draw:layer="layout" svg:x1="13cm" svg:y1="8cm" svg:x2="16cm" svg:y2="8cm">
          <text:p/>
        </draw:line>
        <draw:line draw:style-name="gr38" draw:text-style-name="P4" draw:layer="layout" svg:x1="13.5cm" svg:y1="9cm" svg:x2="16cm" svg:y2="9cm">
          <text:p/>
        </draw:line>
        <draw:line draw:style-name="gr38" draw:text-style-name="P4" draw:layer="layout" svg:x1="13cm" svg:y1="3.5cm" svg:x2="13cm" svg:y2="8cm">
          <text:p/>
        </draw:line>
        <draw:line draw:style-name="gr38" draw:text-style-name="P4" draw:layer="layout" svg:x1="14cm" svg:y1="6cm" svg:x2="14cm" svg:y2="11cm">
          <text:p/>
        </draw:line>
        <draw:line draw:style-name="gr38" draw:text-style-name="P4" draw:layer="layout" svg:x1="14.5cm" svg:y1="6.8cm" svg:x2="14.5cm" svg:y2="12.5cm">
          <text:p/>
        </draw:line>
        <draw:line draw:style-name="gr38" draw:text-style-name="P4" draw:layer="layout" svg:x1="13.5cm" svg:y1="4cm" svg:x2="13.5cm" svg:y2="9cm">
          <text:p/>
        </draw:line>
        <draw:line draw:style-name="gr38" draw:text-style-name="P4" draw:layer="layout" svg:x1="21cm" svg:y1="7cm" svg:x2="23cm" svg:y2="7cm">
          <text:p/>
        </draw:line>
        <draw:line draw:style-name="gr38" draw:text-style-name="P4" draw:layer="layout" svg:x1="21.5cm" svg:y1="6cm" svg:x2="23cm" svg:y2="6cm">
          <text:p/>
        </draw:line>
        <draw:line draw:style-name="gr38" draw:text-style-name="P4" draw:layer="layout" svg:x1="21.5cm" svg:y1="4cm" svg:x2="21.5cm" svg:y2="6cm">
          <text:p/>
        </draw:line>
        <draw:custom-shape draw:style-name="gr40" draw:text-style-name="P5" draw:layer="layout" svg:width="0.2cm" svg:height="0.2cm" svg:x="13.402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3.5cm" svg:y1="4cm" svg:x2="21.5cm" svg:y2="4cm">
          <text:p/>
        </draw:line>
        <draw:line draw:style-name="gr38" draw:text-style-name="P4" draw:layer="layout" svg:x1="14cm" svg:y1="11cm" svg:x2="26cm" svg:y2="11cm">
          <text:p/>
        </draw:line>
        <draw:line draw:style-name="gr38" draw:text-style-name="P4" draw:layer="layout" svg:x1="26cm" svg:y1="11cm" svg:x2="26cm" svg:y2="8cm">
          <text:p/>
        </draw:line>
        <draw:custom-shape draw:style-name="gr40" draw:text-style-name="P5" draw:layer="layout" svg:width="0.2cm" svg:height="0.2cm" svg:x="13.903cm" svg:y="9.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01" draw:text-style-name="P101" draw:layer="layout" svg:width="1.934cm" svg:height="0.806cm" svg:x="5.001cm" svg:y="0.5cm">
          <draw:text-box>
            <text:p><text:span text:style-name="T44">rdEn_i</text:span></text:p>
          </draw:text-box>
        </draw:frame>
        <draw:line draw:style-name="gr38" draw:text-style-name="P4" draw:layer="layout" svg:x1="6.935cm" svg:y1="1cm" svg:x2="31cm" svg:y2="1cm">
          <text:p/>
        </draw:line>
        <draw:line draw:style-name="gr38" draw:text-style-name="P4" draw:layer="layout" svg:x1="25cm" svg:y1="1cm" svg:x2="25cm" svg:y2="4cm">
          <text:p/>
        </draw:line>
        <draw:line draw:style-name="gr38" draw:text-style-name="P4" draw:layer="layout" svg:x1="22cm" svg:y1="5cm" svg:x2="23cm" svg:y2="5cm">
          <text:p/>
        </draw:line>
        <draw:line draw:style-name="gr38" draw:text-style-name="P4" draw:layer="layout" svg:x1="22cm" svg:y1="2cm" svg:x2="22cm" svg:y2="5cm">
          <text:p/>
        </draw:line>
        <draw:line draw:style-name="gr38" draw:text-style-name="P4" draw:layer="layout" svg:x1="8cm" svg:y1="2cm" svg:x2="30cm" svg:y2="2cm">
          <text:p/>
        </draw:line>
        <draw:line draw:style-name="gr38" draw:text-style-name="P4" draw:layer="layout" svg:x1="8cm" svg:y1="7cm" svg:x2="8cm" svg:y2="2cm">
          <text:p/>
        </draw:line>
        <draw:custom-shape draw:style-name="gr40" draw:text-style-name="P5" draw:layer="layout" svg:width="0.2cm" svg:height="0.2cm" svg:x="7.903cm" svg:y="6.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7cm" svg:y1="6cm" svg:x2="32cm" svg:y2="6cm">
          <text:p/>
        </draw:line>
        <draw:line draw:style-name="gr38" draw:text-style-name="P4" draw:layer="layout" svg:x1="37cm" svg:y1="5cm" svg:x2="39cm" svg:y2="5cm">
          <text:p/>
        </draw:line>
        <draw:line draw:style-name="gr38" draw:text-style-name="P4" draw:layer="layout" svg:x1="31cm" svg:y1="4cm" svg:x2="32cm" svg:y2="4cm">
          <text:p/>
        </draw:line>
        <draw:line draw:style-name="gr38" draw:text-style-name="P4" draw:layer="layout" svg:x1="31cm" svg:y1="1cm" svg:x2="31cm" svg:y2="4cm">
          <text:p/>
        </draw:line>
        <draw:custom-shape draw:style-name="gr40" draw:text-style-name="P5" draw:layer="layout" svg:width="0.2cm" svg:height="0.2cm" svg:x="24.902cm" svg:y="0.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30.402cm" svg:y="5.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0.501cm" svg:y1="4.801cm" svg:x2="32.001cm" svg:y2="4.801cm">
          <text:p/>
        </draw:line>
        <draw:line draw:style-name="gr38" draw:text-style-name="P4" draw:layer="layout" svg:x1="30.501cm" svg:y1="5.201cm" svg:x2="32.001cm" svg:y2="5.201cm">
          <text:p/>
        </draw:line>
        <draw:custom-shape draw:style-name="gr40" draw:text-style-name="P5" draw:layer="layout" svg:width="0.2cm" svg:height="0.2cm" svg:x="7.904cm" svg:y="12.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8cm" svg:y1="13cm" svg:x2="8cm" svg:y2="15cm">
          <text:p/>
        </draw:line>
        <draw:line draw:style-name="gr38" draw:text-style-name="P4" draw:layer="layout" svg:x1="8cm" svg:y1="15cm" svg:x2="30.5cm" svg:y2="15cm">
          <text:p/>
        </draw:line>
        <draw:line draw:style-name="gr38" draw:text-style-name="P4" draw:layer="layout" svg:x1="30.5cm" svg:y1="15cm" svg:x2="30.501cm" svg:y2="4.801cm">
          <text:p/>
        </draw:line>
        <draw:custom-shape draw:style-name="gr40" draw:text-style-name="P5" draw:layer="layout" svg:width="0.2cm" svg:height="0.2cm" svg:x="21.903cm" svg:y="1.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0cm" svg:y1="2cm" svg:x2="30cm" svg:y2="7cm">
          <text:p/>
        </draw:line>
        <draw:line draw:style-name="gr38" draw:text-style-name="P4" draw:layer="layout" svg:x1="30cm" svg:y1="7cm" svg:x2="32cm" svg:y2="7cm">
          <text:p/>
        </draw:line>
        <draw:g draw:style-name="gr1">
          <draw:custom-shape draw:style-name="gr1395" draw:text-style-name="P12" draw:layer="layout" svg:width="5cm" svg:height="5cm" svg:x="10cm" svg:y="20cm">
            <text:p text:style-name="P1">STR-Coder</text:p>
            <draw:enhanced-geometry svg:viewBox="0 0 21600 21600" draw:type="rectangle" draw:enhanced-path="M 0 0 L 21600 0 21600 21600 0 21600 0 0 Z N"/>
          </draw:custom-shape>
          <draw:frame draw:style-name="gr1386" draw:text-style-name="P9" draw:layer="layout" svg:width="1.043cm" svg:height="0.725cm" svg:x="10cm" svg:y="20.588cm">
            <draw:text-box>
              <text:p><text:span text:style-name="T2">we</text:span></text:p>
            </draw:text-box>
          </draw:frame>
          <draw:frame draw:style-name="gr1396" draw:text-style-name="P9" draw:layer="layout" svg:width="1.891cm" svg:height="0.725cm" svg:x="10.001cm" svg:y="21.37cm">
            <draw:text-box>
              <text:p><text:span text:style-name="T2">opcode</text:span></text:p>
            </draw:text-box>
          </draw:frame>
          <draw:frame draw:style-name="gr344" draw:text-style-name="P9" draw:layer="layout" svg:width="1.632cm" svg:height="0.725cm" svg:x="10.002cm" svg:y="22.551cm">
            <draw:text-box>
              <text:p><text:span text:style-name="T2">dataw</text:span></text:p>
            </draw:text-box>
          </draw:frame>
          <draw:frame draw:style-name="gr48" draw:text-style-name="P9" draw:layer="layout" svg:width="1.349cm" svg:height="0.725cm" svg:x="10.002cm" svg:y="23.531cm">
            <draw:text-box>
              <text:p><text:span text:style-name="T2">addr</text:span></text:p>
            </draw:text-box>
          </draw:frame>
          <draw:frame draw:style-name="gr1397" draw:text-style-name="P9" draw:layer="layout" svg:width="1.773cm" svg:height="0.725cm" svg:x="13.365cm" svg:y="21.571cm">
            <draw:text-box>
              <text:p><text:span text:style-name="T2">datawr</text:span></text:p>
            </draw:text-box>
          </draw:frame>
          <draw:frame draw:style-name="gr1398" draw:text-style-name="P9" draw:layer="layout" svg:width="1.719cm" svg:height="0.725cm" svg:x="10.002cm" svg:y="21.971cm">
            <draw:text-box>
              <text:p><text:span text:style-name="T2">func3</text:span></text:p>
            </draw:text-box>
          </draw:frame>
        </draw:g>
        <draw:frame draw:style-name="gr1388" draw:text-style-name="P101" draw:layer="layout" svg:width="1.851cm" svg:height="0.806cm" svg:x="5.001cm" svg:y="18.5cm">
          <draw:text-box>
            <text:p><text:span text:style-name="T44">data_i</text:span></text:p>
          </draw:text-box>
        </draw:frame>
        <draw:frame draw:style-name="gr1389" draw:text-style-name="P101" draw:layer="layout" svg:width="1.879cm" svg:height="0.806cm" svg:x="5.002cm" svg:y="21.5cm">
          <draw:text-box>
            <text:p><text:span text:style-name="T44">addr_i</text:span></text:p>
          </draw:text-box>
        </draw:frame>
        <draw:frame draw:style-name="gr1390" draw:text-style-name="P101" draw:layer="layout" svg:width="2.016cm" svg:height="0.806cm" svg:x="5.002cm" svg:y="24.5cm">
          <draw:text-box>
            <text:p><text:span text:style-name="T44">wrEn_i</text:span></text:p>
          </draw:text-box>
        </draw:frame>
        <draw:frame draw:style-name="gr1391" draw:text-style-name="P101" draw:layer="layout" svg:width="1.823cm" svg:height="0.806cm" svg:x="5.002cm" svg:y="27.5cm">
          <draw:text-box>
            <text:p><text:span text:style-name="T44">instr_i</text:span></text:p>
          </draw:text-box>
        </draw:frame>
        <draw:frame draw:style-name="gr1401" draw:text-style-name="P101" draw:layer="layout" svg:width="1.934cm" svg:height="0.806cm" svg:x="5.002cm" svg:y="15.5cm">
          <draw:text-box>
            <text:p><text:span text:style-name="T44">rdEn_i</text:span></text:p>
          </draw:text-box>
        </draw:frame>
        <draw:g draw:style-name="gr1">
          <draw:custom-shape draw:style-name="gr1285" draw:text-style-name="P1" draw:layer="layout" svg:width="1cm" svg:height="2cm" svg:x="18cm" svg:y="20.001cm">
            <text:p/>
            <draw:enhanced-geometry svg:viewBox="0 0 21600 21600" draw:type="rectangle" draw:enhanced-path="M 0 0 L 21600 0 21600 21600 0 21600 0 0 Z N"/>
          </draw:custom-shape>
          <draw:polygon draw:style-name="gr155" draw:text-style-name="P14" draw:layer="layout" svg:width="0.199cm" svg:height="0.199cm" svg:x="18cm" svg:y="21.701cm" svg:viewBox="0 0 200 200" draw:points="0,200 200,100 0,0">
            <text:p/>
          </draw:polygon>
          <draw:frame draw:style-name="gr1287" draw:text-style-name="P101" draw:layer="layout" svg:width="0.888cm" svg:height="0.806cm" svg:x="18cm" svg:y="20.695cm">
            <draw:text-box>
              <text:p><text:span text:style-name="T44">di</text:span></text:p>
            </draw:text-box>
          </draw:frame>
          <draw:frame draw:style-name="gr1289" draw:text-style-name="P101" draw:layer="layout" svg:width="1.053cm" svg:height="0.806cm" svg:x="18cm" svg:y="20.001cm">
            <draw:text-box>
              <text:p><text:span text:style-name="T44">do</text:span></text:p>
            </draw:text-box>
          </draw:frame>
        </draw:g>
        <draw:g draw:style-name="gr1">
          <draw:custom-shape draw:style-name="gr1285" draw:text-style-name="P1" draw:layer="layout" svg:width="1cm" svg:height="2cm" svg:x="18cm" svg:y="17.001cm">
            <text:p/>
            <draw:enhanced-geometry svg:viewBox="0 0 21600 21600" draw:type="rectangle" draw:enhanced-path="M 0 0 L 21600 0 21600 21600 0 21600 0 0 Z N"/>
          </draw:custom-shape>
          <draw:polygon draw:style-name="gr155" draw:text-style-name="P14" draw:layer="layout" svg:width="0.199cm" svg:height="0.199cm" svg:x="18cm" svg:y="18.701cm" svg:viewBox="0 0 200 200" draw:points="0,200 200,100 0,0">
            <text:p/>
          </draw:polygon>
          <draw:frame draw:style-name="gr1287" draw:text-style-name="P101" draw:layer="layout" svg:width="0.888cm" svg:height="0.806cm" svg:x="18cm" svg:y="17.695cm">
            <draw:text-box>
              <text:p><text:span text:style-name="T44">di</text:span></text:p>
            </draw:text-box>
          </draw:frame>
          <draw:frame draw:style-name="gr1289" draw:text-style-name="P101" draw:layer="layout" svg:width="1.053cm" svg:height="0.806cm" svg:x="18cm" svg:y="17.001cm">
            <draw:text-box>
              <text:p><text:span text:style-name="T44">do</text:span></text:p>
            </draw:text-box>
          </draw:frame>
        </draw:g>
        <draw:g draw:style-name="gr1">
          <draw:custom-shape draw:style-name="gr1285" draw:text-style-name="P1" draw:layer="layout" svg:width="1cm" svg:height="2cm" svg:x="18cm" svg:y="23.001cm">
            <text:p/>
            <draw:enhanced-geometry svg:viewBox="0 0 21600 21600" draw:type="rectangle" draw:enhanced-path="M 0 0 L 21600 0 21600 21600 0 21600 0 0 Z N"/>
          </draw:custom-shape>
          <draw:polygon draw:style-name="gr155" draw:text-style-name="P14" draw:layer="layout" svg:width="0.199cm" svg:height="0.199cm" svg:x="18cm" svg:y="24.701cm" svg:viewBox="0 0 200 200" draw:points="0,200 200,100 0,0">
            <text:p/>
          </draw:polygon>
          <draw:frame draw:style-name="gr1287" draw:text-style-name="P101" draw:layer="layout" svg:width="0.888cm" svg:height="0.806cm" svg:x="18cm" svg:y="23.695cm">
            <draw:text-box>
              <text:p><text:span text:style-name="T44">di</text:span></text:p>
            </draw:text-box>
          </draw:frame>
          <draw:frame draw:style-name="gr1289" draw:text-style-name="P101" draw:layer="layout" svg:width="1.053cm" svg:height="0.806cm" svg:x="18cm" svg:y="23.001cm">
            <draw:text-box>
              <text:p><text:span text:style-name="T44">do</text:span></text:p>
            </draw:text-box>
          </draw:frame>
        </draw:g>
        <draw:g draw:style-name="gr1">
          <draw:custom-shape draw:style-name="gr1285" draw:text-style-name="P1" draw:layer="layout" svg:width="1cm" svg:height="2cm" svg:x="18cm" svg:y="26.001cm">
            <text:p/>
            <draw:enhanced-geometry svg:viewBox="0 0 21600 21600" draw:type="rectangle" draw:enhanced-path="M 0 0 L 21600 0 21600 21600 0 21600 0 0 Z N"/>
          </draw:custom-shape>
          <draw:polygon draw:style-name="gr155" draw:text-style-name="P14" draw:layer="layout" svg:width="0.199cm" svg:height="0.199cm" svg:x="18cm" svg:y="27.701cm" svg:viewBox="0 0 200 200" draw:points="0,200 200,100 0,0">
            <text:p/>
          </draw:polygon>
          <draw:frame draw:style-name="gr1287" draw:text-style-name="P101" draw:layer="layout" svg:width="0.888cm" svg:height="0.806cm" svg:x="18cm" svg:y="26.695cm">
            <draw:text-box>
              <text:p><text:span text:style-name="T44">di</text:span></text:p>
            </draw:text-box>
          </draw:frame>
          <draw:frame draw:style-name="gr1289" draw:text-style-name="P101" draw:layer="layout" svg:width="1.053cm" svg:height="0.806cm" svg:x="18cm" svg:y="26.001cm">
            <draw:text-box>
              <text:p><text:span text:style-name="T44">do</text:span></text:p>
            </draw:text-box>
          </draw:frame>
        </draw:g>
        <draw:frame draw:style-name="gr1392" draw:text-style-name="P101" draw:layer="layout" svg:width="2.347cm" svg:height="0.806cm" svg:x="19.001cm" svg:y="16.901cm">
          <draw:text-box>
            <text:p><text:span text:style-name="T44">dataw_s</text:span></text:p>
          </draw:text-box>
        </draw:frame>
        <draw:frame draw:style-name="gr1390" draw:text-style-name="P101" draw:layer="layout" svg:width="2.016cm" svg:height="0.806cm" svg:x="19.002cm" svg:y="19.901cm">
          <draw:text-box>
            <text:p><text:span text:style-name="T44">addr_s</text:span></text:p>
          </draw:text-box>
        </draw:frame>
        <draw:frame draw:style-name="gr1393" draw:text-style-name="P101" draw:layer="layout" svg:width="1.658cm" svg:height="0.806cm" svg:x="19.002cm" svg:y="22.901cm">
          <draw:text-box>
            <text:p><text:span text:style-name="T44">we_s</text:span></text:p>
          </draw:text-box>
        </draw:frame>
        <draw:frame draw:style-name="gr1394" draw:text-style-name="P101" draw:layer="layout" svg:width="1.961cm" svg:height="0.806cm" svg:x="19.002cm" svg:y="25.901cm">
          <draw:text-box>
            <text:p><text:span text:style-name="T44">instr_s</text:span></text:p>
          </draw:text-box>
        </draw:frame>
        <draw:g draw:style-name="gr1">
          <draw:custom-shape draw:style-name="gr1384" draw:text-style-name="P12" draw:layer="layout" svg:width="4cm" svg:height="4cm" svg:x="23cm" svg:y="20cm">
            <text:p text:style-name="P1">D-Mem</text:p>
            <draw:enhanced-geometry svg:viewBox="0 0 21600 21600" draw:type="rectangle" draw:enhanced-path="M 0 0 L 21600 0 21600 21600 0 21600 0 0 Z N"/>
          </draw:custom-shape>
          <draw:frame draw:style-name="gr1385" draw:text-style-name="P9" draw:layer="layout" svg:width="0.878cm" svg:height="0.725cm" svg:x="24.522cm" svg:y="20cm">
            <draw:text-box>
              <text:p><text:span text:style-name="T2">re</text:span></text:p>
            </draw:text-box>
          </draw:frame>
          <draw:frame draw:style-name="gr1386" draw:text-style-name="P9" draw:layer="layout" svg:width="1.043cm" svg:height="0.725cm" svg:x="25.512cm" svg:y="23.275cm">
            <draw:text-box>
              <text:p><text:span text:style-name="T2">we</text:span></text:p>
            </draw:text-box>
          </draw:frame>
          <draw:frame draw:style-name="gr325" draw:text-style-name="P9" draw:layer="layout" svg:width="1.655cm" svg:height="0.725cm" svg:x="23cm" svg:y="21.6cm">
            <draw:text-box>
              <text:p><text:span text:style-name="T2">addrw</text:span></text:p>
            </draw:text-box>
          </draw:frame>
          <draw:frame draw:style-name="gr1387" draw:text-style-name="P9" draw:layer="layout" svg:width="1.49cm" svg:height="0.725cm" svg:x="23.01cm" svg:y="20.6cm">
            <draw:text-box>
              <text:p><text:span text:style-name="T2">addrr</text:span></text:p>
            </draw:text-box>
          </draw:frame>
          <draw:frame draw:style-name="gr344" draw:text-style-name="P9" draw:layer="layout" svg:width="1.632cm" svg:height="0.725cm" svg:x="23cm" svg:y="22.6cm">
            <draw:text-box>
              <text:p><text:span text:style-name="T2">dataw</text:span></text:p>
            </draw:text-box>
          </draw:frame>
          <draw:frame draw:style-name="gr56" draw:text-style-name="P9" draw:layer="layout" svg:width="1.467cm" svg:height="0.725cm" svg:x="25.5cm" svg:y="21.575cm">
            <draw:text-box>
              <text:p><text:span text:style-name="T2">datar</text:span></text:p>
            </draw:text-box>
          </draw:frame>
        </draw:g>
        <draw:g draw:style-name="gr1">
          <draw:custom-shape draw:style-name="gr1395" draw:text-style-name="P12" draw:layer="layout" svg:width="5cm" svg:height="5cm" svg:x="32cm" svg:y="20cm">
            <text:p text:style-name="P1">LDR-Coder</text:p>
            <draw:enhanced-geometry svg:viewBox="0 0 21600 21600" draw:type="rectangle" draw:enhanced-path="M 0 0 L 21600 0 21600 21600 0 21600 0 0 Z N"/>
          </draw:custom-shape>
          <draw:frame draw:style-name="gr1399" draw:text-style-name="P9" draw:layer="layout" svg:width="0.948cm" svg:height="0.725cm" svg:x="32cm" svg:y="20.588cm">
            <draw:text-box>
              <text:p><text:span text:style-name="T2">re</text:span></text:p>
            </draw:text-box>
          </draw:frame>
          <draw:frame draw:style-name="gr1396" draw:text-style-name="P9" draw:layer="layout" svg:width="1.891cm" svg:height="0.725cm" svg:x="32.001cm" svg:y="21.37cm">
            <draw:text-box>
              <text:p><text:span text:style-name="T2">opcode</text:span></text:p>
            </draw:text-box>
          </draw:frame>
          <draw:frame draw:style-name="gr324" draw:text-style-name="P9" draw:layer="layout" svg:width="1.867cm" svg:height="0.725cm" svg:x="32.002cm" svg:y="22.551cm">
            <draw:text-box>
              <text:p><text:span text:style-name="T2">dataRd</text:span></text:p>
            </draw:text-box>
          </draw:frame>
          <draw:frame draw:style-name="gr48" draw:text-style-name="P9" draw:layer="layout" svg:width="1.349cm" svg:height="0.725cm" svg:x="32.002cm" svg:y="23.531cm">
            <draw:text-box>
              <text:p><text:span text:style-name="T2">addr</text:span></text:p>
            </draw:text-box>
          </draw:frame>
          <draw:frame draw:style-name="gr1400" draw:text-style-name="P9" draw:layer="layout" svg:width="1.612cm" svg:height="0.725cm" svg:x="35.365cm" svg:y="21.571cm">
            <draw:text-box>
              <text:p><text:span text:style-name="T2">datao</text:span></text:p>
            </draw:text-box>
          </draw:frame>
          <draw:frame draw:style-name="gr1398" draw:text-style-name="P9" draw:layer="layout" svg:width="1.719cm" svg:height="0.725cm" svg:x="32.002cm" svg:y="21.871cm">
            <draw:text-box>
              <text:p><text:span text:style-name="T2">func3</text:span></text:p>
            </draw:text-box>
          </draw:frame>
        </draw:g>
      </draw:page>
      <draw:page draw:name="page32" draw:style-name="dp1" draw:master-page-name="Default">
        <draw:frame draw:style-name="gr1402" draw:text-style-name="P3" draw:layer="layout" svg:width="3.642cm" svg:height="0.962cm" svg:x="1cm" svg:y="1.038cm">
          <draw:text-box>
            <text:p>Block RAM</text:p>
          </draw:text-box>
        </draw:frame>
        <draw:line draw:style-name="gr38" draw:text-style-name="P4" draw:layer="layout" svg:x1="5cm" svg:y1="4cm" svg:x2="6cm" svg:y2="4cm">
          <text:p/>
        </draw:line>
        <draw:line draw:style-name="gr38" draw:text-style-name="P4" draw:layer="layout" svg:x1="6cm" svg:y1="4cm" svg:x2="6cm" svg:y2="3cm">
          <text:p/>
        </draw:line>
        <draw:line draw:style-name="gr38" draw:text-style-name="P4" draw:layer="layout" svg:x1="6cm" svg:y1="3cm" svg:x2="7cm" svg:y2="3cm">
          <text:p/>
        </draw:line>
        <draw:line draw:style-name="gr38" draw:text-style-name="P4" draw:layer="layout" svg:x1="7cm" svg:y1="4cm" svg:x2="7cm" svg:y2="3cm">
          <text:p/>
        </draw:line>
        <draw:line draw:style-name="gr38" draw:text-style-name="P4" draw:layer="layout" svg:x1="7cm" svg:y1="4cm" svg:x2="8cm" svg:y2="4cm">
          <text:p/>
        </draw:line>
        <draw:line draw:style-name="gr38" draw:text-style-name="P4" draw:layer="layout" svg:x1="8cm" svg:y1="4cm" svg:x2="8cm" svg:y2="3cm">
          <text:p/>
        </draw:line>
        <draw:line draw:style-name="gr38" draw:text-style-name="P4" draw:layer="layout" svg:x1="8cm" svg:y1="3cm" svg:x2="9cm" svg:y2="3cm">
          <text:p/>
        </draw:line>
        <draw:line draw:style-name="gr38" draw:text-style-name="P4" draw:layer="layout" svg:x1="9cm" svg:y1="4cm" svg:x2="9cm" svg:y2="3cm">
          <text:p/>
        </draw:line>
        <draw:line draw:style-name="gr38" draw:text-style-name="P4" draw:layer="layout" svg:x1="9cm" svg:y1="4cm" svg:x2="10cm" svg:y2="4cm">
          <text:p/>
        </draw:line>
        <draw:line draw:style-name="gr38" draw:text-style-name="P4" draw:layer="layout" svg:x1="10cm" svg:y1="4cm" svg:x2="10cm" svg:y2="3cm">
          <text:p/>
        </draw:line>
        <draw:line draw:style-name="gr38" draw:text-style-name="P4" draw:layer="layout" svg:x1="10cm" svg:y1="3cm" svg:x2="11cm" svg:y2="3cm">
          <text:p/>
        </draw:line>
        <draw:line draw:style-name="gr38" draw:text-style-name="P4" draw:layer="layout" svg:x1="11cm" svg:y1="4cm" svg:x2="11cm" svg:y2="3cm">
          <text:p/>
        </draw:line>
        <draw:line draw:style-name="gr38" draw:text-style-name="P4" draw:layer="layout" svg:x1="11cm" svg:y1="4cm" svg:x2="12cm" svg:y2="4cm">
          <text:p/>
        </draw:line>
        <draw:line draw:style-name="gr38" draw:text-style-name="P4" draw:layer="layout" svg:x1="12cm" svg:y1="4cm" svg:x2="12cm" svg:y2="3cm">
          <text:p/>
        </draw:line>
        <draw:line draw:style-name="gr38" draw:text-style-name="P4" draw:layer="layout" svg:x1="12cm" svg:y1="3cm" svg:x2="13cm" svg:y2="3cm">
          <text:p/>
        </draw:line>
        <draw:line draw:style-name="gr38" draw:text-style-name="P4" draw:layer="layout" svg:x1="13cm" svg:y1="4cm" svg:x2="13cm" svg:y2="3cm">
          <text:p/>
        </draw:line>
        <draw:line draw:style-name="gr38" draw:text-style-name="P4" draw:layer="layout" svg:x1="13cm" svg:y1="4cm" svg:x2="14cm" svg:y2="4cm">
          <text:p/>
        </draw:line>
        <draw:line draw:style-name="gr38" draw:text-style-name="P4" draw:layer="layout" svg:x1="14cm" svg:y1="4cm" svg:x2="14cm" svg:y2="3cm">
          <text:p/>
        </draw:line>
        <draw:line draw:style-name="gr38" draw:text-style-name="P4" draw:layer="layout" svg:x1="14cm" svg:y1="3cm" svg:x2="15cm" svg:y2="3cm">
          <text:p/>
        </draw:line>
        <draw:line draw:style-name="gr38" draw:text-style-name="P4" draw:layer="layout" svg:x1="15cm" svg:y1="4cm" svg:x2="15cm" svg:y2="3cm">
          <text:p/>
        </draw:line>
        <draw:line draw:style-name="gr38" draw:text-style-name="P4" draw:layer="layout" svg:x1="15cm" svg:y1="4cm" svg:x2="16cm" svg:y2="4cm">
          <text:p/>
        </draw:line>
        <draw:line draw:style-name="gr38" draw:text-style-name="P4" draw:layer="layout" svg:x1="16cm" svg:y1="4cm" svg:x2="16cm" svg:y2="3cm">
          <text:p/>
        </draw:line>
        <draw:line draw:style-name="gr38" draw:text-style-name="P4" draw:layer="layout" svg:x1="16cm" svg:y1="3cm" svg:x2="17cm" svg:y2="3cm">
          <text:p/>
        </draw:line>
        <draw:line draw:style-name="gr38" draw:text-style-name="P4" draw:layer="layout" svg:x1="17cm" svg:y1="4cm" svg:x2="17cm" svg:y2="3cm">
          <text:p/>
        </draw:line>
        <draw:line draw:style-name="gr38" draw:text-style-name="P4" draw:layer="layout" svg:x1="17cm" svg:y1="4cm" svg:x2="18cm" svg:y2="4cm">
          <text:p/>
        </draw:line>
        <draw:line draw:style-name="gr38" draw:text-style-name="P4" draw:layer="layout" svg:x1="18cm" svg:y1="4cm" svg:x2="18cm" svg:y2="3cm">
          <text:p/>
        </draw:line>
        <draw:line draw:style-name="gr38" draw:text-style-name="P4" draw:layer="layout" svg:x1="18cm" svg:y1="3cm" svg:x2="19cm" svg:y2="3cm">
          <text:p/>
        </draw:line>
        <draw:line draw:style-name="gr38" draw:text-style-name="P4" draw:layer="layout" svg:x1="19cm" svg:y1="4cm" svg:x2="19cm" svg:y2="3cm">
          <text:p/>
        </draw:line>
        <draw:line draw:style-name="gr38" draw:text-style-name="P4" draw:layer="layout" svg:x1="19cm" svg:y1="4cm" svg:x2="20cm" svg:y2="4cm">
          <text:p/>
        </draw:line>
        <draw:line draw:style-name="gr38" draw:text-style-name="P4" draw:layer="layout" svg:x1="20cm" svg:y1="4cm" svg:x2="20cm" svg:y2="3cm">
          <text:p/>
        </draw:line>
        <draw:line draw:style-name="gr38" draw:text-style-name="P4" draw:layer="layout" svg:x1="20cm" svg:y1="3cm" svg:x2="21cm" svg:y2="3cm">
          <text:p/>
        </draw:line>
        <draw:line draw:style-name="gr38" draw:text-style-name="P4" draw:layer="layout" svg:x1="21cm" svg:y1="4cm" svg:x2="21cm" svg:y2="3cm">
          <text:p/>
        </draw:line>
        <draw:line draw:style-name="gr38" draw:text-style-name="P4" draw:layer="layout" svg:x1="21cm" svg:y1="4cm" svg:x2="22cm" svg:y2="4cm">
          <text:p/>
        </draw:line>
        <draw:line draw:style-name="gr38" draw:text-style-name="P4" draw:layer="layout" svg:x1="22cm" svg:y1="4cm" svg:x2="22cm" svg:y2="3cm">
          <text:p/>
        </draw:line>
        <draw:line draw:style-name="gr38" draw:text-style-name="P4" draw:layer="layout" svg:x1="22cm" svg:y1="3cm" svg:x2="23cm" svg:y2="3cm">
          <text:p/>
        </draw:line>
        <draw:line draw:style-name="gr38" draw:text-style-name="P4" draw:layer="layout" svg:x1="23cm" svg:y1="4cm" svg:x2="23cm" svg:y2="3cm">
          <text:p/>
        </draw:line>
        <draw:frame draw:style-name="gr1349" draw:text-style-name="P3" draw:layer="layout" svg:width="1.772cm" svg:height="0.962cm" svg:x="2.028cm" svg:y="3.038cm">
          <draw:text-box>
            <text:p>clk_i</text:p>
          </draw:text-box>
        </draw:frame>
        <draw:frame draw:style-name="gr1365" draw:text-style-name="P3" draw:layer="layout" svg:width="1.666cm" svg:height="0.962cm" svg:x="2.028cm" svg:y="5.038cm">
          <draw:text-box>
            <text:p>wr_i</text:p>
          </draw:text-box>
        </draw:frame>
        <draw:frame draw:style-name="gr1403" draw:text-style-name="P3" draw:layer="layout" svg:width="2.267cm" svg:height="0.962cm" svg:x="2.029cm" svg:y="7.038cm">
          <draw:text-box>
            <text:p>addr_i</text:p>
          </draw:text-box>
        </draw:frame>
        <draw:frame draw:style-name="gr1404" draw:text-style-name="P3" draw:layer="layout" svg:width="2.232cm" svg:height="0.962cm" svg:x="2.029cm" svg:y="9.038cm">
          <draw:text-box>
            <text:p>data_i</text:p>
          </draw:text-box>
        </draw:frame>
        <draw:frame draw:style-name="gr1405" draw:text-style-name="P3" draw:layer="layout" svg:width="1.913cm" svg:height="0.962cm" svg:x="2.029cm" svg:y="11.038cm">
          <draw:text-box>
            <text:p>mem</text:p>
          </draw:text-box>
        </draw:frame>
        <draw:frame draw:style-name="gr1345" draw:text-style-name="P3" draw:layer="layout" svg:width="2.444cm" svg:height="0.962cm" svg:x="2.029cm" svg:y="13.038cm">
          <draw:text-box>
            <text:p>data_o</text:p>
          </draw:text-box>
        </draw:frame>
        <draw:g draw:style-name="gr1">
          <draw:g draw:style-name="gr66">
            <draw:line draw:style-name="gr38" draw:text-style-name="P4" draw:layer="layout" svg:x1="6.9cm" svg:y1="8cm" svg:x2="7.1cm" svg:y2="7cm">
              <text:p/>
            </draw:line>
            <draw:line draw:style-name="gr38" draw:text-style-name="P4" draw:layer="layout" svg:x1="6.9cm" svg:y1="7cm" svg:x2="7.1cm" svg:y2="8cm">
              <text:p/>
            </draw:line>
          </draw:g>
          <draw:line draw:style-name="gr38" draw:text-style-name="P4" draw:layer="layout" svg:x1="7.1cm" svg:y1="7cm" svg:x2="8.9cm" svg:y2="7cm">
            <text:p/>
          </draw:line>
          <draw:g draw:style-name="gr66">
            <draw:line draw:style-name="gr38" draw:text-style-name="P4" draw:layer="layout" svg:x1="8.9cm" svg:y1="8cm" svg:x2="9.1cm" svg:y2="7cm">
              <text:p/>
            </draw:line>
            <draw:line draw:style-name="gr38" draw:text-style-name="P4" draw:layer="layout" svg:x1="8.9cm" svg:y1="7cm" svg:x2="9.1cm" svg:y2="8cm">
              <text:p/>
            </draw:line>
          </draw:g>
          <draw:line draw:style-name="gr38" draw:text-style-name="P4" draw:layer="layout" svg:x1="7.1cm" svg:y1="8cm" svg:x2="8.9cm" svg:y2="8cm">
            <text:p/>
          </draw:line>
        </draw:g>
        <draw:g draw:style-name="gr1">
          <draw:g draw:style-name="gr66">
            <draw:line draw:style-name="gr38" draw:text-style-name="P4" draw:layer="layout" svg:x1="6.9cm" svg:y1="10cm" svg:x2="7.1cm" svg:y2="9cm">
              <text:p/>
            </draw:line>
            <draw:line draw:style-name="gr38" draw:text-style-name="P4" draw:layer="layout" svg:x1="6.9cm" svg:y1="9cm" svg:x2="7.1cm" svg:y2="10cm">
              <text:p/>
            </draw:line>
          </draw:g>
          <draw:line draw:style-name="gr38" draw:text-style-name="P4" draw:layer="layout" svg:x1="7.1cm" svg:y1="9cm" svg:x2="8.9cm" svg:y2="9cm">
            <text:p/>
          </draw:line>
          <draw:g draw:style-name="gr66">
            <draw:line draw:style-name="gr38" draw:text-style-name="P4" draw:layer="layout" svg:x1="8.9cm" svg:y1="10cm" svg:x2="9.1cm" svg:y2="9cm">
              <text:p/>
            </draw:line>
            <draw:line draw:style-name="gr38" draw:text-style-name="P4" draw:layer="layout" svg:x1="8.9cm" svg:y1="9cm" svg:x2="9.1cm" svg:y2="10cm">
              <text:p/>
            </draw:line>
          </draw:g>
          <draw:line draw:style-name="gr38" draw:text-style-name="P4" draw:layer="layout" svg:x1="7.1cm" svg:y1="10cm" svg:x2="8.9cm" svg:y2="10cm">
            <text:p/>
          </draw:line>
        </draw:g>
        <draw:line draw:style-name="gr38" draw:text-style-name="P4" draw:layer="layout" svg:x1="6cm" svg:y1="6cm" svg:x2="7cm" svg:y2="6cm">
          <text:p/>
        </draw:line>
        <draw:line draw:style-name="gr38" draw:text-style-name="P4" draw:layer="layout" svg:x1="7cm" svg:y1="6cm" svg:x2="7cm" svg:y2="5cm">
          <text:p/>
        </draw:line>
        <draw:line draw:style-name="gr38" draw:text-style-name="P4" draw:layer="layout" svg:x1="7cm" svg:y1="5cm" svg:x2="9cm" svg:y2="5cm">
          <text:p/>
        </draw:line>
        <draw:line draw:style-name="gr38" draw:text-style-name="P4" draw:layer="layout" svg:x1="9cm" svg:y1="6cm" svg:x2="9cm" svg:y2="5cm">
          <text:p/>
        </draw:line>
        <draw:line draw:style-name="gr38" draw:text-style-name="P4" draw:layer="layout" svg:x1="9cm" svg:y1="6cm" svg:x2="10cm" svg:y2="6cm">
          <text:p/>
        </draw:line>
        <draw:g draw:style-name="gr1">
          <draw:g draw:style-name="gr66">
            <draw:line draw:style-name="gr38" draw:text-style-name="P4" draw:layer="layout" svg:x1="7.9cm" svg:y1="12cm" svg:x2="8.1cm" svg:y2="11cm">
              <text:p/>
            </draw:line>
            <draw:line draw:style-name="gr38" draw:text-style-name="P4" draw:layer="layout" svg:x1="7.9cm" svg:y1="11cm" svg:x2="8.1cm" svg:y2="12cm">
              <text:p/>
            </draw:line>
          </draw:g>
          <draw:line draw:style-name="gr38" draw:text-style-name="P4" draw:layer="layout" svg:x1="8.1cm" svg:y1="11cm" svg:x2="9.9cm" svg:y2="11cm">
            <text:p/>
          </draw:line>
          <draw:g draw:style-name="gr66">
            <draw:line draw:style-name="gr38" draw:text-style-name="P4" draw:layer="layout" svg:x1="9.9cm" svg:y1="12cm" svg:x2="10.1cm" svg:y2="11cm">
              <text:p/>
            </draw:line>
            <draw:line draw:style-name="gr38" draw:text-style-name="P4" draw:layer="layout" svg:x1="9.9cm" svg:y1="11cm" svg:x2="10.1cm" svg:y2="12cm">
              <text:p/>
            </draw:line>
          </draw:g>
          <draw:line draw:style-name="gr38" draw:text-style-name="P4" draw:layer="layout" svg:x1="8.1cm" svg:y1="12cm" svg:x2="9.9cm" svg:y2="12cm">
            <text:p/>
          </draw:line>
        </draw:g>
        <draw:line draw:style-name="gr1406" draw:text-style-name="P4" draw:layer="layout" svg:x1="8cm" svg:y1="4cm" svg:x2="8cm" svg:y2="12cm">
          <text:p/>
        </draw:line>
        <draw:g draw:style-name="gr1">
          <draw:g draw:style-name="gr66">
            <draw:line draw:style-name="gr38" draw:text-style-name="P4" draw:layer="layout" svg:x1="14.9cm" svg:y1="8cm" svg:x2="15.1cm" svg:y2="7cm">
              <text:p/>
            </draw:line>
            <draw:line draw:style-name="gr38" draw:text-style-name="P4" draw:layer="layout" svg:x1="14.9cm" svg:y1="7cm" svg:x2="15.1cm" svg:y2="8cm">
              <text:p/>
            </draw:line>
          </draw:g>
          <draw:line draw:style-name="gr38" draw:text-style-name="P4" draw:layer="layout" svg:x1="15.1cm" svg:y1="7cm" svg:x2="16.9cm" svg:y2="7cm">
            <text:p/>
          </draw:line>
          <draw:g draw:style-name="gr66">
            <draw:line draw:style-name="gr38" draw:text-style-name="P4" draw:layer="layout" svg:x1="16.9cm" svg:y1="8cm" svg:x2="17.1cm" svg:y2="7cm">
              <text:p/>
            </draw:line>
            <draw:line draw:style-name="gr38" draw:text-style-name="P4" draw:layer="layout" svg:x1="16.9cm" svg:y1="7cm" svg:x2="17.1cm" svg:y2="8cm">
              <text:p/>
            </draw:line>
          </draw:g>
          <draw:line draw:style-name="gr38" draw:text-style-name="P4" draw:layer="layout" svg:x1="15.1cm" svg:y1="8cm" svg:x2="16.9cm" svg:y2="8cm">
            <text:p/>
          </draw:line>
        </draw:g>
        <draw:line draw:style-name="gr1406" draw:text-style-name="P4" draw:layer="layout" svg:x1="16cm" svg:y1="4cm" svg:x2="16cm" svg:y2="14cm">
          <text:p/>
        </draw:line>
        <draw:line draw:style-name="gr38" draw:text-style-name="P4" draw:layer="layout" svg:x1="15cm" svg:y1="6cm" svg:x2="17cm" svg:y2="6cm">
          <text:p/>
        </draw:line>
        <draw:g draw:style-name="gr1">
          <draw:g draw:style-name="gr66">
            <draw:line draw:style-name="gr38" draw:text-style-name="P4" draw:layer="layout" svg:x1="15.9cm" svg:y1="14cm" svg:x2="16.1cm" svg:y2="13cm">
              <text:p/>
            </draw:line>
            <draw:line draw:style-name="gr38" draw:text-style-name="P4" draw:layer="layout" svg:x1="15.9cm" svg:y1="13cm" svg:x2="16.1cm" svg:y2="14cm">
              <text:p/>
            </draw:line>
          </draw:g>
          <draw:line draw:style-name="gr38" draw:text-style-name="P4" draw:layer="layout" svg:x1="16.1cm" svg:y1="13cm" svg:x2="17.9cm" svg:y2="13cm">
            <text:p/>
          </draw:line>
          <draw:g draw:style-name="gr66">
            <draw:line draw:style-name="gr38" draw:text-style-name="P4" draw:layer="layout" svg:x1="17.9cm" svg:y1="14cm" svg:x2="18.1cm" svg:y2="13cm">
              <text:p/>
            </draw:line>
            <draw:line draw:style-name="gr38" draw:text-style-name="P4" draw:layer="layout" svg:x1="17.9cm" svg:y1="13cm" svg:x2="18.1cm" svg:y2="14cm">
              <text:p/>
            </draw:line>
          </draw:g>
          <draw:line draw:style-name="gr38" draw:text-style-name="P4" draw:layer="layout" svg:x1="16.1cm" svg:y1="14cm" svg:x2="17.9cm" svg:y2="14cm">
            <text:p/>
          </draw:line>
        </draw:g>
        <draw:g draw:style-name="gr1">
          <draw:g draw:style-name="gr66">
            <draw:line draw:style-name="gr38" draw:text-style-name="P4" draw:layer="layout" svg:x1="14.9cm" svg:y1="12cm" svg:x2="15.1cm" svg:y2="11cm">
              <text:p/>
            </draw:line>
            <draw:line draw:style-name="gr38" draw:text-style-name="P4" draw:layer="layout" svg:x1="14.9cm" svg:y1="11cm" svg:x2="15.1cm" svg:y2="12cm">
              <text:p/>
            </draw:line>
          </draw:g>
          <draw:line draw:style-name="gr38" draw:text-style-name="P4" draw:layer="layout" svg:x1="15.1cm" svg:y1="11cm" svg:x2="16.9cm" svg:y2="11cm">
            <text:p/>
          </draw:line>
          <draw:g draw:style-name="gr66">
            <draw:line draw:style-name="gr38" draw:text-style-name="P4" draw:layer="layout" svg:x1="16.9cm" svg:y1="12cm" svg:x2="17.1cm" svg:y2="11cm">
              <text:p/>
            </draw:line>
            <draw:line draw:style-name="gr38" draw:text-style-name="P4" draw:layer="layout" svg:x1="16.9cm" svg:y1="11cm" svg:x2="17.1cm" svg:y2="12cm">
              <text:p/>
            </draw:line>
          </draw:g>
          <draw:line draw:style-name="gr38" draw:text-style-name="P4" draw:layer="layout" svg:x1="15.1cm" svg:y1="12cm" svg:x2="16.9cm" svg:y2="12cm">
            <text:p/>
          </draw:line>
        </draw:g>
        <draw:g draw:style-name="gr1">
          <draw:custom-shape draw:style-name="gr1285" draw:text-style-name="P1" draw:layer="layout" svg:width="1cm" svg:height="2cm" svg:x="8cm" svg:y="18cm">
            <text:p/>
            <draw:enhanced-geometry svg:viewBox="0 0 21600 21600" draw:type="rectangle" draw:enhanced-path="M 0 0 L 21600 0 21600 21600 0 21600 0 0 Z N"/>
          </draw:custom-shape>
          <draw:polygon draw:style-name="gr155" draw:text-style-name="P14" draw:layer="layout" svg:width="0.199cm" svg:height="0.199cm" svg:x="8cm" svg:y="19.7cm" svg:viewBox="0 0 200 200" draw:points="0,200 200,100 0,0">
            <text:p/>
          </draw:polygon>
          <draw:frame draw:style-name="gr1287" draw:text-style-name="P101" draw:layer="layout" svg:width="0.888cm" svg:height="0.806cm" svg:x="8cm" svg:y="18.694cm">
            <draw:text-box>
              <text:p><text:span text:style-name="T44">di</text:span></text:p>
            </draw:text-box>
          </draw:frame>
          <draw:frame draw:style-name="gr1289" draw:text-style-name="P101" draw:layer="layout" svg:width="1.053cm" svg:height="0.806cm" svg:x="8cm" svg:y="18cm">
            <draw:text-box>
              <text:p><text:span text:style-name="T44">do</text:span></text:p>
            </draw:text-box>
          </draw:frame>
        </draw:g>
        <draw:line draw:style-name="gr38" draw:text-style-name="P4" draw:layer="layout" svg:x1="7cm" svg:y1="19cm" svg:x2="8cm" svg:y2="19cm">
          <text:p/>
        </draw:line>
        <draw:frame draw:style-name="gr1404" draw:text-style-name="P3" draw:layer="layout" svg:width="2.232cm" svg:height="0.962cm" svg:x="5.029cm" svg:y="18.438cm">
          <draw:text-box>
            <text:p>data_i</text:p>
          </draw:text-box>
        </draw:frame>
        <draw:line draw:style-name="gr38" draw:text-style-name="P4" draw:layer="layout" svg:x1="9cm" svg:y1="18.5cm" svg:x2="10cm" svg:y2="18.5cm">
          <text:p/>
        </draw:line>
        <draw:custom-shape draw:style-name="gr1407" draw:text-style-name="P12" draw:layer="layout" svg:width="3cm" svg:height="3cm" svg:x="10cm" svg:y="17cm">
          <text:p text:style-name="P1">mem</text:p>
          <draw:enhanced-geometry svg:viewBox="0 0 21600 21600" draw:type="rectangle" draw:enhanced-path="M 0 0 L 21600 0 21600 21600 0 21600 0 0 Z N"/>
        </draw:custom-shape>
        <draw:frame draw:style-name="gr1287" draw:text-style-name="P101" draw:layer="layout" svg:width="0.888cm" svg:height="0.806cm" svg:x="10cm" svg:y="18.1cm">
          <draw:text-box>
            <text:p><text:span text:style-name="T44">di</text:span></text:p>
          </draw:text-box>
        </draw:frame>
        <draw:frame draw:style-name="gr1408" draw:text-style-name="P101" draw:layer="layout" svg:width="1.218cm" svg:height="0.806cm" svg:x="10cm" svg:y="17cm">
          <draw:text-box>
            <text:p><text:span text:style-name="T44">adr</text:span></text:p>
          </draw:text-box>
        </draw:frame>
        <draw:frame draw:style-name="gr1403" draw:text-style-name="P3" draw:layer="layout" svg:width="2.267cm" svg:height="0.962cm" svg:x="5.03cm" svg:y="17.038cm">
          <draw:text-box>
            <text:p>addr_i</text:p>
          </draw:text-box>
        </draw:frame>
        <draw:line draw:style-name="gr38" draw:text-style-name="P4" draw:layer="layout" svg:x1="7cm" svg:y1="17.4cm" svg:x2="10cm" svg:y2="17.4cm">
          <text:p/>
        </draw:line>
        <draw:frame draw:style-name="gr1289" draw:text-style-name="P101" draw:layer="layout" svg:width="1.053cm" svg:height="0.806cm" svg:x="12cm" svg:y="19cm">
          <draw:text-box>
            <text:p><text:span text:style-name="T44">do</text:span></text:p>
          </draw:text-box>
        </draw:frame>
        <draw:g draw:style-name="gr1">
          <draw:custom-shape draw:style-name="gr1285" draw:text-style-name="P1" draw:layer="layout" svg:width="1cm" svg:height="2cm" svg:x="14cm" svg:y="18cm">
            <text:p/>
            <draw:enhanced-geometry svg:viewBox="0 0 21600 21600" draw:type="rectangle" draw:enhanced-path="M 0 0 L 21600 0 21600 21600 0 21600 0 0 Z N"/>
          </draw:custom-shape>
          <draw:polygon draw:style-name="gr155" draw:text-style-name="P14" draw:layer="layout" svg:width="0.199cm" svg:height="0.199cm" svg:x="14cm" svg:y="19.7cm" svg:viewBox="0 0 200 200" draw:points="0,200 200,100 0,0">
            <text:p/>
          </draw:polygon>
          <draw:frame draw:style-name="gr1287" draw:text-style-name="P101" draw:layer="layout" svg:width="0.888cm" svg:height="0.806cm" svg:x="14cm" svg:y="18.694cm">
            <draw:text-box>
              <text:p><text:span text:style-name="T44">di</text:span></text:p>
            </draw:text-box>
          </draw:frame>
          <draw:frame draw:style-name="gr1289" draw:text-style-name="P101" draw:layer="layout" svg:width="1.053cm" svg:height="0.806cm" svg:x="14cm" svg:y="18cm">
            <draw:text-box>
              <text:p><text:span text:style-name="T44">do</text:span></text:p>
            </draw:text-box>
          </draw:frame>
        </draw:g>
        <draw:line draw:style-name="gr38" draw:text-style-name="P4" draw:layer="layout" svg:x1="13cm" svg:y1="19cm" svg:x2="14cm" svg:y2="19cm">
          <text:p/>
        </draw:line>
        <draw:line draw:style-name="gr38" draw:text-style-name="P4" draw:layer="layout" svg:x1="15cm" svg:y1="18.5cm" svg:x2="16cm" svg:y2="18.5cm">
          <text:p/>
        </draw:line>
        <draw:frame draw:style-name="gr1345" draw:text-style-name="P3" draw:layer="layout" svg:width="2.444cm" svg:height="0.962cm" svg:x="16cm" svg:y="18cm">
          <draw:text-box>
            <text:p>data_o</text:p>
          </draw:text-box>
        </draw:frame>
      </draw:page>
      <draw:page draw:name="page33" draw:style-name="dp1" draw:master-page-name="Default">
        <draw:frame draw:style-name="gr1409" draw:text-style-name="P3" draw:layer="layout" svg:width="5.37cm" svg:height="0.962cm" svg:x="2cm" svg:y="2.1cm">
          <draw:text-box>
            <text:p>GPIO-Peripheral:</text:p>
          </draw:text-box>
        </draw:frame>
        <draw:g draw:style-name="gr1">
          <draw:custom-shape draw:style-name="gr1285" draw:text-style-name="P1" draw:layer="layout" svg:width="1cm" svg:height="2cm" svg:x="10.947cm" svg:y="9.306cm">
            <text:p/>
            <draw:enhanced-geometry svg:viewBox="0 0 21600 21600" draw:type="rectangle" draw:enhanced-path="M 0 0 L 21600 0 21600 21600 0 21600 0 0 Z N"/>
          </draw:custom-shape>
          <draw:polygon draw:style-name="gr155" draw:text-style-name="P14" draw:layer="layout" svg:width="0.199cm" svg:height="0.199cm" svg:x="10.947cm" svg:y="11.006cm" svg:viewBox="0 0 200 200" draw:points="0,200 200,100 0,0">
            <text:p/>
          </draw:polygon>
          <draw:frame draw:style-name="gr1287" draw:text-style-name="P101" draw:layer="layout" svg:width="0.888cm" svg:height="0.806cm" svg:x="10.997cm" svg:y="9.3cm">
            <draw:text-box>
              <text:p><text:span text:style-name="T44">di</text:span></text:p>
            </draw:text-box>
          </draw:frame>
          <draw:frame draw:style-name="gr1289" draw:text-style-name="P101" draw:layer="layout" svg:width="1.053cm" svg:height="0.806cm" svg:x="10.947cm" svg:y="9.906cm">
            <draw:text-box>
              <text:p><text:span text:style-name="T44">do</text:span></text:p>
            </draw:text-box>
          </draw:frame>
        </draw:g>
        <draw:custom-shape draw:style-name="gr1410" draw:text-style-name="P1" draw:layer="layout" svg:width="0.7cm" svg:height="5cm" svg:x="3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411" draw:text-style-name="P3" draw:layer="layout" svg:width="2.83cm" svg:height="0.962cm" svg:x="2cm" svg:y="12.038cm">
          <draw:text-box>
            <text:p>WB-Bus</text:p>
          </draw:text-box>
        </draw:frame>
        <draw:custom-shape draw:style-name="gr1412" draw:text-style-name="P109" draw:layer="layout" svg:width="1cm" svg:height="1.5cm" svg:x="9cm" svg:y="9cm">
          <text:p text:style-name="P108"><text:span text:style-name="T44">MUX</text:span></text:p>
          <draw:enhanced-geometry svg:viewBox="0 0 21600 21600" draw:type="rectangle" draw:enhanced-path="M 0 0 L 21600 0 21600 21600 0 21600 0 0 Z N"/>
        </draw:custom-shape>
        <draw:line draw:style-name="gr38" draw:text-style-name="P4" draw:layer="layout" svg:x1="10cm" svg:y1="9.7cm" svg:x2="10.947cm" svg:y2="9.7cm">
          <text:p/>
        </draw:line>
        <draw:line draw:style-name="gr38" draw:text-style-name="P4" draw:layer="layout" svg:x1="5cm" svg:y1="9.3cm" svg:x2="9cm" svg:y2="9.3cm">
          <text:p/>
        </draw:line>
        <draw:line draw:style-name="gr38" draw:text-style-name="P4" draw:layer="layout" svg:x1="8cm" svg:y1="10.1cm" svg:x2="9cm" svg:y2="10.1cm">
          <text:p/>
        </draw:line>
        <draw:line draw:style-name="gr38" draw:text-style-name="P4" draw:layer="layout" svg:x1="9.5cm" svg:y1="9cm" svg:x2="9.5cm" svg:y2="8cm">
          <text:p/>
        </draw:line>
        <draw:g draw:style-name="gr1">
          <draw:custom-shape draw:style-name="gr1285" draw:text-style-name="P1" draw:layer="layout" svg:width="1cm" svg:height="2cm" svg:x="10.947cm" svg:y="5.006cm">
            <text:p/>
            <draw:enhanced-geometry svg:viewBox="0 0 21600 21600" draw:type="rectangle" draw:enhanced-path="M 0 0 L 21600 0 21600 21600 0 21600 0 0 Z N"/>
          </draw:custom-shape>
          <draw:polygon draw:style-name="gr155" draw:text-style-name="P14" draw:layer="layout" svg:width="0.199cm" svg:height="0.199cm" svg:x="10.947cm" svg:y="6.706cm" svg:viewBox="0 0 200 200" draw:points="0,200 200,100 0,0">
            <text:p/>
          </draw:polygon>
          <draw:frame draw:style-name="gr1287" draw:text-style-name="P101" draw:layer="layout" svg:width="0.888cm" svg:height="0.806cm" svg:x="10.997cm" svg:y="5cm">
            <draw:text-box>
              <text:p><text:span text:style-name="T44">di</text:span></text:p>
            </draw:text-box>
          </draw:frame>
          <draw:frame draw:style-name="gr1289" draw:text-style-name="P101" draw:layer="layout" svg:width="1.053cm" svg:height="0.806cm" svg:x="10.947cm" svg:y="5.606cm">
            <draw:text-box>
              <text:p><text:span text:style-name="T44">do</text:span></text:p>
            </draw:text-box>
          </draw:frame>
        </draw:g>
        <draw:frame draw:style-name="gr1413" draw:text-style-name="P3" draw:layer="layout" svg:width="4.028cm" svg:height="0.962cm" svg:x="10cm" svg:y="4cm">
          <draw:text-box>
            <text:p>direction-reg</text:p>
          </draw:text-box>
        </draw:frame>
        <draw:frame draw:style-name="gr1414" draw:text-style-name="P3" draw:layer="layout" svg:width="2.864cm" svg:height="0.962cm" svg:x="10.1cm" svg:y="8.3cm">
          <draw:text-box>
            <text:p>data-reg</text:p>
          </draw:text-box>
        </draw:frame>
        <draw:polygon draw:style-name="gr38" draw:text-style-name="P4" draw:layer="layout" svg:width="1.117cm" svg:height="0.893cm" draw:transform="rotate (-0.463733982254894) translate (13.0000431940872cm 9.99991363047652cm)" svg:viewBox="0 0 1118 894" draw:points="0,0 1118,0 447,894">
          <text:p/>
        </draw:polygon>
        <draw:line draw:style-name="gr38" draw:text-style-name="P4" draw:layer="layout" svg:x1="11.947cm" svg:y1="10.5cm" svg:x2="13cm" svg:y2="10.5cm">
          <text:p/>
        </draw:line>
        <draw:line draw:style-name="gr38" draw:text-style-name="P4" draw:layer="layout" svg:x1="11.947cm" svg:y1="6cm" svg:x2="13.5cm" svg:y2="6cm">
          <text:p/>
        </draw:line>
        <draw:line draw:style-name="gr38" draw:text-style-name="P4" draw:layer="layout" svg:x1="13.5cm" svg:y1="6cm" svg:x2="13.5cm" svg:y2="10.2cm">
          <text:p/>
        </draw:line>
        <draw:g draw:style-name="gr1">
          <draw:custom-shape draw:style-name="gr1354" draw:text-style-name="P14" draw:layer="layout" svg:width="1cm" svg:height="1cm" svg:x="17cm" svg:y="10cm">
            <text:p/>
            <draw:enhanced-geometry svg:viewBox="0 0 21600 21600" draw:mirror-horizontal="false" draw:mirror-vertical="false" draw:type="rectangle" draw:enhanced-path="M 0 0 L 21600 0 21600 21600 0 21600 0 0 Z N"/>
          </draw:custom-shape>
          <draw:line draw:style-name="gr38" draw:text-style-name="P4" draw:layer="layout" svg:x1="17cm" svg:y1="10cm" svg:x2="18cm" svg:y2="11cm">
            <text:p/>
          </draw:line>
          <draw:line draw:style-name="gr38" draw:text-style-name="P4" draw:layer="layout" svg:x1="17cm" svg:y1="11cm" svg:x2="18cm" svg:y2="10cm">
            <text:p/>
          </draw:line>
        </draw:g>
        <draw:frame draw:style-name="gr1415" draw:text-style-name="P3" draw:layer="layout" svg:width="1.628cm" svg:height="0.962cm" svg:x="16.7cm" svg:y="9cm">
          <draw:text-box>
            <text:p>Pad</text:p>
          </draw:text-box>
        </draw:frame>
        <draw:polygon draw:style-name="gr38" draw:text-style-name="P4" draw:layer="layout" svg:width="1.117cm" svg:height="0.893cm" draw:transform="rotate (-0.463733982254894) translate (13.0000431940872cm 9.99991363047652cm)" svg:viewBox="0 0 1118 894" draw:points="0,0 1118,0 447,894">
          <text:p/>
        </draw:polygon>
        <draw:line draw:style-name="gr38" draw:text-style-name="P4" draw:layer="layout" svg:x1="14cm" svg:y1="10.5cm" svg:x2="17.5cm" svg:y2="10.5cm">
          <text:p/>
        </draw:line>
        <draw:polygon draw:style-name="gr38" draw:text-style-name="P4" draw:layer="layout" svg:width="1.117cm" svg:height="0.893cm" draw:transform="rotate (0.463733982254893) translate (13cm 13.5cm)" svg:viewBox="0 0 1118 894" draw:points="1118,0 0,0 671,894">
          <text:p/>
        </draw:polygon>
        <draw:line draw:style-name="gr38" draw:text-style-name="P4" draw:layer="layout" svg:x1="15cm" svg:y1="10.5cm" svg:x2="15cm" svg:y2="13.5cm">
          <text:p/>
        </draw:line>
        <draw:line draw:style-name="gr38" draw:text-style-name="P4" draw:layer="layout" svg:x1="15cm" svg:y1="13.5cm" svg:x2="14cm" svg:y2="13.5cm">
          <text:p/>
        </draw:line>
        <draw:line draw:style-name="gr38" draw:text-style-name="P4" draw:layer="layout" svg:x1="13cm" svg:y1="13.5cm" svg:x2="8cm" svg:y2="13.5cm">
          <text:p/>
        </draw:line>
        <draw:line draw:style-name="gr38" draw:text-style-name="P4" draw:layer="layout" svg:x1="8cm" svg:y1="13.5cm" svg:x2="8cm" svg:y2="10.1cm">
          <text:p/>
        </draw:line>
        <draw:custom-shape draw:style-name="gr461" draw:text-style-name="P5" draw:layer="layout" svg:width="0.2cm" svg:height="0.2cm" svg:x="14.903cm" svg:y="10.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9.5cm" svg:y1="8cm" svg:x2="13.5cm" svg:y2="8cm">
          <text:p/>
        </draw:line>
        <draw:custom-shape draw:style-name="gr461" draw:text-style-name="P5" draw:layer="layout" svg:width="0.2cm" svg:height="0.2cm" svg:x="13.404cm" svg:y="7.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3.5cm" svg:y1="12cm" svg:x2="13.5cm" svg:y2="13.2cm">
          <text:p/>
        </draw:line>
        <draw:custom-shape draw:style-name="gr1416" draw:text-style-name="P14" draw:layer="layout" svg:width="0.2cm" svg:height="0.2cm" svg:x="13.402cm" svg:y="10.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1">
          <draw:custom-shape draw:style-name="gr1285" draw:text-style-name="P1" draw:layer="layout" svg:width="1cm" svg:height="2cm" svg:x="10cm" svg:y="16cm">
            <text:p/>
            <draw:enhanced-geometry svg:viewBox="0 0 21600 21600" draw:type="rectangle" draw:enhanced-path="M 0 0 L 21600 0 21600 21600 0 21600 0 0 Z N"/>
          </draw:custom-shape>
          <draw:polygon draw:style-name="gr155" draw:text-style-name="P14" draw:layer="layout" svg:width="0.199cm" svg:height="0.199cm" svg:x="10cm" svg:y="17.7cm" svg:viewBox="0 0 200 200" draw:points="0,200 200,100 0,0">
            <text:p/>
          </draw:polygon>
          <draw:frame draw:style-name="gr1287" draw:text-style-name="P101" draw:layer="layout" svg:width="0.888cm" svg:height="0.806cm" svg:x="10.05cm" svg:y="15.994cm">
            <draw:text-box>
              <text:p><text:span text:style-name="T44">di</text:span></text:p>
            </draw:text-box>
          </draw:frame>
          <draw:frame draw:style-name="gr1289" draw:text-style-name="P101" draw:layer="layout" svg:width="1.053cm" svg:height="0.806cm" svg:x="10cm" svg:y="16.6cm">
            <draw:text-box>
              <text:p><text:span text:style-name="T44">do</text:span></text:p>
            </draw:text-box>
          </draw:frame>
        </draw:g>
        <draw:g draw:style-name="gr1">
          <draw:custom-shape draw:style-name="gr1285" draw:text-style-name="P1" draw:layer="layout" svg:width="1cm" svg:height="2cm" svg:x="12cm" svg:y="16.006cm">
            <text:p/>
            <draw:enhanced-geometry svg:viewBox="0 0 21600 21600" draw:type="rectangle" draw:enhanced-path="M 0 0 L 21600 0 21600 21600 0 21600 0 0 Z N"/>
          </draw:custom-shape>
          <draw:polygon draw:style-name="gr155" draw:text-style-name="P14" draw:layer="layout" svg:width="0.199cm" svg:height="0.199cm" svg:x="12cm" svg:y="17.706cm" svg:viewBox="0 0 200 200" draw:points="0,200 200,100 0,0">
            <text:p/>
          </draw:polygon>
          <draw:frame draw:style-name="gr1287" draw:text-style-name="P101" draw:layer="layout" svg:width="0.888cm" svg:height="0.806cm" svg:x="12.05cm" svg:y="16cm">
            <draw:text-box>
              <text:p><text:span text:style-name="T44">di</text:span></text:p>
            </draw:text-box>
          </draw:frame>
          <draw:frame draw:style-name="gr1289" draw:text-style-name="P101" draw:layer="layout" svg:width="1.053cm" svg:height="0.806cm" svg:x="12cm" svg:y="16.606cm">
            <draw:text-box>
              <text:p><text:span text:style-name="T44">do</text:span></text:p>
            </draw:text-box>
          </draw:frame>
        </draw:g>
        <draw:custom-shape draw:style-name="gr280" draw:text-style-name="P109" draw:layer="layout" svg:width="1cm" svg:height="1cm" svg:x="14cm" svg:y="15.5cm">
          <text:p text:style-name="P108"><text:span text:style-name="T44">XOR</text:span></text:p>
          <draw:enhanced-geometry svg:viewBox="0 0 21600 21600" draw:type="rectangle" draw:enhanced-path="M 0 0 L 21600 0 21600 21600 0 21600 0 0 Z N"/>
        </draw:custom-shape>
        <draw:custom-shape draw:style-name="gr461" draw:text-style-name="P5" draw:layer="layout" svg:width="0.2cm" svg:height="0.2cm" svg:x="8.904cm" svg:y="13.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9cm" svg:y1="13.5cm" svg:x2="9cm" svg:y2="16.5cm">
          <text:p/>
        </draw:line>
        <draw:line draw:style-name="gr38" draw:text-style-name="P4" draw:layer="layout" svg:x1="9cm" svg:y1="16.5cm" svg:x2="10cm" svg:y2="16.5cm">
          <text:p/>
        </draw:line>
        <draw:line draw:style-name="gr38" draw:text-style-name="P4" draw:layer="layout" svg:x1="11cm" svg:y1="16.5cm" svg:x2="12cm" svg:y2="16.5cm">
          <text:p/>
        </draw:line>
        <draw:line draw:style-name="gr38" draw:text-style-name="P4" draw:layer="layout" svg:x1="13cm" svg:y1="16.3cm" svg:x2="14cm" svg:y2="16.3cm">
          <text:p/>
        </draw:line>
        <draw:custom-shape draw:style-name="gr461" draw:text-style-name="P5" draw:layer="layout" svg:width="0.2cm" svg:height="0.2cm" svg:x="11.405cm" svg:y="16.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1.5cm" svg:y1="16.5cm" svg:x2="11.5cm" svg:y2="15.7cm">
          <text:p/>
        </draw:line>
        <draw:line draw:style-name="gr38" draw:text-style-name="P4" draw:layer="layout" svg:x1="11.5cm" svg:y1="15.7cm" svg:x2="14cm" svg:y2="15.7cm">
          <text:p/>
        </draw:line>
        <draw:line draw:style-name="gr38" draw:text-style-name="P4" draw:layer="layout" svg:x1="15cm" svg:y1="16cm" svg:x2="16cm" svg:y2="16cm">
          <text:p/>
        </draw:line>
        <draw:frame draw:style-name="gr1415" draw:text-style-name="P3" draw:layer="layout" svg:width="1.628cm" svg:height="0.962cm" svg:x="15.8cm" svg:y="15.5cm">
          <draw:text-box>
            <text:p>IRQ</text:p>
          </draw:text-box>
        </draw:frame>
        <draw:line draw:style-name="gr38" draw:text-style-name="P4" draw:layer="layout" svg:x1="13.5cm" svg:y1="12cm" svg:x2="14.4cm" svg:y2="12cm">
          <text:p/>
        </draw:line>
        <draw:path draw:style-name="gr38" draw:text-style-name="P4" draw:layer="layout" svg:width="0.625cm" svg:height="0.312cm" draw:transform="rotate (-1.10706234454) translate (14.411cm 10.2cm)" svg:viewBox="0 0 626 313" svg:d="M0 0c447 0 626 313 626 313">
          <text:p/>
        </draw:path>
        <draw:line draw:style-name="gr38" draw:text-style-name="P4" draw:layer="layout" svg:x1="14.4cm" svg:y1="12cm" svg:x2="14.4cm" svg:y2="10.9cm">
          <text:p/>
        </draw:line>
        <draw:line draw:style-name="gr38" draw:text-style-name="P4" draw:layer="layout" svg:x1="14.411cm" svg:y1="10.2cm" svg:x2="14.4cm" svg:y2="8cm">
          <text:p/>
        </draw:line>
        <draw:line draw:style-name="gr38" draw:text-style-name="P4" draw:layer="layout" svg:x1="13.5cm" svg:y1="8.004cm" svg:x2="14.4cm" svg:y2="8cm">
          <text:p/>
        </draw:lin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face style:name="Arial2" svg:font-family="Arial" style:font-adornments="Standard" style:font-family-generic="swis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Gothic" svg:font-family="'MS Gothic'"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20" svg:d="M0 20l10-20 10 20z"/>
    <draw:marker draw:name="Arrow_20_short" draw:display-name="Arrow short" svg:viewBox="0 0 20 13" svg:d="M0 13l10-13 10 13z"/>
    <draw:marker draw:name="Arrowheads_20_1" draw:display-name="Arrowheads 1" svg:viewBox="0 0 3000 3000" svg:d="M1500 0l1500 3000h-3000zM1500 447l-1176 2353h2353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0" draw:display-name="Arrowheads 20"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4" draw:display-name="Arrowheads 34" svg:viewBox="0 0 20 20" svg:d="M0 20l10-20 10 20z"/>
    <draw:marker draw:name="Arrowheads_20_35" draw:display-name="Arrowheads 35" svg:viewBox="0 0 20 20" svg:d="M0 20l10-20 10 20z"/>
    <draw:marker draw:name="Arrowheads_20_36" draw:display-name="Arrowheads 36" svg:viewBox="0 0 20 20" svg:d="M0 20l10-20 10 20z"/>
    <draw:marker draw:name="Arrowheads_20_37" draw:display-name="Arrowheads 37" svg:viewBox="0 0 20 20" svg:d="M0 20l10-20 10 20z"/>
    <draw:marker draw:name="Arrowheads_20_38" draw:display-name="Arrowheads 38" svg:viewBox="0 0 20 20" svg:d="M0 20l10-20 10 20z"/>
    <draw:marker draw:name="Arrowheads_20_39" draw:display-name="Arrowheads 39" svg:viewBox="0 0 20 20" svg:d="M0 20l10-20 10 20z"/>
    <draw:marker draw:name="Arrowheads_20_40" draw:display-name="Arrowheads 40" svg:viewBox="0 0 20 20" svg:d="M0 20l10-20 10 20z"/>
    <draw:marker draw:name="Arrowheads_20_41" draw:display-name="Arrowheads 41" svg:viewBox="0 0 20 20" svg:d="M0 20l10-20 10 20z"/>
    <draw:marker draw:name="Arrowheads_20_42" draw:display-name="Arrowheads 42" svg:viewBox="0 0 20 13" svg:d="M0 13l10-13 10 13z"/>
    <draw:marker draw:name="Arrowheads_20_5" draw:display-name="Arrowheads 5" svg:viewBox="0 0 1131 902" svg:d="M564 0l-564 902h1131z"/>
    <draw:marker draw:name="Circle" svg:viewBox="0 0 1131 1131" svg:d="M462 1118l-102-29-102-51-93-72-72-93-51-102-29-102-13-105 13-102 29-106 51-102 72-89 93-72 102-50 102-34 106-9 101 9 106 34 98 50 93 72 72 89 51 102 29 106 13 102-13 105-29 102-51 102-72 93-93 72-98 51-106 29-101 13z"/>
    <draw:marker draw:name="Linienspitzen_20_11" draw:display-name="Linienspitzen 11" svg:viewBox="0 0 20 20" svg:d="M0 20l10-20 10 20z"/>
    <draw:marker draw:name="Linienspitzen_20_12" draw:display-name="Linienspitzen 12" svg:viewBox="0 0 20 20" svg:d="M0 20l10-20 10 20z"/>
    <draw:marker draw:name="Linienspitzen_20_13" draw:display-name="Linienspitzen 13" svg:viewBox="0 0 20 20" svg:d="M0 20l10-20 10 20z"/>
    <draw:marker draw:name="Linienspitzen_20_14" draw:display-name="Linienspitzen 14" svg:viewBox="0 0 20 20" svg:d="M0 20l10-20 10 20z"/>
    <draw:marker draw:name="Linienspitzen_20_15" draw:display-name="Linienspitzen 15" svg:viewBox="0 0 20 20" svg:d="M0 20l10-20 10 20z"/>
    <draw:marker draw:name="Linienspitzen_20_16" draw:display-name="Linienspitzen 16" svg:viewBox="0 0 20 20" svg:d="M0 20l10-20 10 20z"/>
    <draw:marker draw:name="Linienspitzen_20_18" draw:display-name="Linienspitzen 18" svg:viewBox="0 0 20 20" svg:d="M0 20l10-20 10 20z"/>
    <draw:marker draw:name="Linienspitzen_20_19" draw:display-name="Linienspitzen 19" svg:viewBox="0 0 20 20" svg:d="M0 20l10-20 10 20z"/>
    <draw:marker draw:name="Linienspitzen_20_20" draw:display-name="Linienspitzen 20" svg:viewBox="0 0 20 20" svg:d="M0 20l10-20 10 20z"/>
    <draw:marker draw:name="Linienspitzen_20_21" draw:display-name="Linienspitzen 21" svg:viewBox="0 0 20 20" svg:d="M0 20l10-20 10 20z"/>
    <draw:marker draw:name="Linienspitzen_20_22" draw:display-name="Linienspitzen 22" svg:viewBox="0 0 20 20" svg:d="M0 20l10-20 10 20z"/>
    <draw:marker draw:name="Linienspitzen_20_23" draw:display-name="Linienspitzen 23" svg:viewBox="0 0 20 20" svg:d="M0 20l10-20 10 20z"/>
    <draw:marker draw:name="Linienspitzen_20_24" draw:display-name="Linienspitzen 24" svg:viewBox="0 0 20 20" svg:d="M0 20l10-20 10 20z"/>
    <draw:marker draw:name="Linienspitzen_20_26" draw:display-name="Linienspitzen 26" svg:viewBox="0 0 20 20" svg:d="M0 20l10-20 10 20z"/>
    <draw:marker draw:name="Linienspitzen_20_27" draw:display-name="Linienspitzen 27" svg:viewBox="0 0 20 20" svg:d="M0 20l10-20 10 20z"/>
    <draw:marker draw:name="Linienspitzen_20_28" draw:display-name="Linienspitzen 28" svg:viewBox="0 0 20 20" svg:d="M0 20l10-20 10 20z"/>
    <draw:marker draw:name="Linienspitzen_20_29" draw:display-name="Linienspitzen 29" svg:viewBox="0 0 20 20" svg:d="M0 20l10-20 10 20z"/>
    <draw:marker draw:name="Linienspitzen_20_30" draw:display-name="Linienspitzen 30" svg:viewBox="0 0 20 20" svg:d="M0 20l10-20 10 20z"/>
    <draw:marker draw:name="Linienspitzen_20_31" draw:display-name="Linienspitzen 31" svg:viewBox="0 0 20 20" svg:d="M0 20l10-20 10 20z"/>
    <draw:marker draw:name="Linienspitzen_20_32" draw:display-name="Linienspitzen 32" svg:viewBox="0 0 20 20" svg:d="M0 20l10-20 10 20z"/>
    <draw:marker draw:name="Linienspitzen_20_33" draw:display-name="Linienspitzen 33" svg:viewBox="0 0 20 20" svg:d="M0 20l10-20 10 20z"/>
    <draw:marker draw:name="Linienspitzen_20_34" draw:display-name="Linienspitzen 34" svg:viewBox="0 0 20 20" svg:d="M0 20l10-20 10 20z"/>
    <draw:marker draw:name="Linienspitzen_20_35" draw:display-name="Linienspitzen 35" svg:viewBox="0 0 20 20" svg:d="M0 20l10-20 10 20z"/>
    <draw:marker draw:name="Linienspitzen_20_36" draw:display-name="Linienspitzen 36" svg:viewBox="0 0 20 20" svg:d="M0 20l10-20 10 20z"/>
    <draw:marker draw:name="Linienspitzen_20_37" draw:display-name="Linienspitzen 37" svg:viewBox="0 0 20 20" svg:d="M0 20l10-20 10 20z"/>
    <draw:marker draw:name="Linienspitzen_20_38" draw:display-name="Linienspitzen 38" svg:viewBox="0 0 20 20" svg:d="M0 20l10-20 10 20z"/>
    <draw:marker draw:name="Linienspitzen_20_39" draw:display-name="Linienspitzen 39" svg:viewBox="0 0 20 20" svg:d="M0 20l10-20 10 20z"/>
    <draw:marker draw:name="Linienspitzen_20_40" draw:display-name="Linienspitzen 40" svg:viewBox="0 0 20 20" svg:d="M0 20l10-20 10 20z"/>
    <draw:marker draw:name="Linienspitzen_20_41" draw:display-name="Linienspitzen 41" svg:viewBox="0 0 20 20" svg:d="M0 20l10-20 10 20z"/>
    <draw:marker draw:name="Linienspitzen_20_42" draw:display-name="Linienspitzen 42" svg:viewBox="0 0 20 20" svg:d="M0 20l10-20 10 20z"/>
    <draw:marker draw:name="Linienspitzen_20_43" draw:display-name="Linienspitzen 43" svg:viewBox="0 0 20 20" svg:d="M0 20l10-20 10 20z"/>
    <draw:marker draw:name="Linienspitzen_20_44" draw:display-name="Linienspitzen 44" svg:viewBox="0 0 20 20" svg:d="M0 20l10-20 10 20z"/>
    <draw:marker draw:name="Linienspitzen_20_45" draw:display-name="Linienspitzen 45" svg:viewBox="0 0 20 20" svg:d="M0 20l10-20 10 20z"/>
    <draw:marker draw:name="Linienspitzen_20_46" draw:display-name="Linienspitzen 46" svg:viewBox="0 0 20 20" svg:d="M0 20l10-20 10 20z"/>
    <draw:marker draw:name="Linienspitzen_20_47" draw:display-name="Linienspitzen 47" svg:viewBox="0 0 20 20" svg:d="M0 20l10-20 10 20z"/>
    <draw:marker draw:name="Linienspitzen_20_48" draw:display-name="Linienspitzen 48" svg:viewBox="0 0 20 20" svg:d="M0 20l10-20 10 20z"/>
    <draw:marker draw:name="Linienspitzen_20_49" draw:display-name="Linienspitzen 49" svg:viewBox="0 0 20 20" svg:d="M0 20l10-20 10 20z"/>
    <draw:marker draw:name="Linienspitzen_20_50" draw:display-name="Linienspitzen 50" svg:viewBox="0 0 20 20" svg:d="M0 20l10-20 10 20z"/>
    <draw:marker draw:name="Linienspitzen_20_51" draw:display-name="Linienspitzen 51" svg:viewBox="0 0 20 20" svg:d="M0 20l10-20 10 20z"/>
    <draw:marker draw:name="Linienspitzen_20_52" draw:display-name="Linienspitzen 52" svg:viewBox="0 0 20 20" svg:d="M0 20l10-20 10 20z"/>
    <draw:marker draw:name="Linienspitzen_20_53" draw:display-name="Linienspitzen 53" svg:viewBox="0 0 20 20" svg:d="M0 20l10-20 10 20z"/>
    <draw:marker draw:name="Linienspitzen_20_54" draw:display-name="Linienspitzen 54" svg:viewBox="0 0 20 20" svg:d="M0 20l10-20 10 20z"/>
    <draw:marker draw:name="Linienspitzen_20_55" draw:display-name="Linienspitzen 55" svg:viewBox="0 0 20 20" svg:d="M0 20l10-20 10 20z"/>
    <draw:marker draw:name="Linienspitzen_20_56" draw:display-name="Linienspitzen 56" svg:viewBox="0 0 20 20" svg:d="M0 20l10-20 10 20z"/>
    <draw:marker draw:name="Linienspitzen_20_57" draw:display-name="Linienspitzen 57" svg:viewBox="0 0 20 20" svg:d="M0 20l10-20 10 20z"/>
    <draw:marker draw:name="Linienspitzen_20_58" draw:display-name="Linienspitzen 58" svg:viewBox="0 0 20 20" svg:d="M0 20l10-20 10 20z"/>
    <draw:marker draw:name="Linienspitzen_20_59" draw:display-name="Linienspitzen 59" svg:viewBox="0 0 20 20" svg:d="M0 20l10-20 10 20z"/>
    <draw:marker draw:name="Linienspitzen_20_60" draw:display-name="Linienspitzen 60" svg:viewBox="0 0 20 20" svg:d="M0 20l10-20 10 20z"/>
    <draw:marker draw:name="Linienspitzen_20_61" draw:display-name="Linienspitzen 61" svg:viewBox="0 0 20 20" svg:d="M0 20l10-20 10 20z"/>
    <draw:marker draw:name="Linienspitzen_20_62" draw:display-name="Linienspitzen 62" svg:viewBox="0 0 20 20" svg:d="M0 20l10-20 10 20z"/>
    <draw:marker draw:name="Linienspitzen_20_63" draw:display-name="Linienspitzen 63" svg:viewBox="0 0 20 20" svg:d="M0 20l10-20 10 20z"/>
    <draw:marker draw:name="Linienspitzen_20_64" draw:display-name="Linienspitzen 64" svg:viewBox="0 0 20 20" svg:d="M0 20l10-20 10 20z"/>
    <draw:marker draw:name="Linienspitzen_20_65" draw:display-name="Linienspitzen 65" svg:viewBox="0 0 20 20" svg:d="M0 20l10-20 10 20z"/>
    <draw:marker draw:name="Linienspitzen_20_66" draw:display-name="Linienspitzen 66" svg:viewBox="0 0 20 20" svg:d="M0 20l10-20 10 20z"/>
    <draw:marker draw:name="Linienspitzen_20_67" draw:display-name="Linienspitzen 67" svg:viewBox="0 0 20 20" svg:d="M0 20l10-20 10 20z"/>
    <draw:marker draw:name="Linienspitzen_20_68" draw:display-name="Linienspitzen 68" svg:viewBox="0 0 20 20" svg:d="M0 20l10-20 10 20z"/>
    <draw:marker draw:name="Linienspitzen_20_69" draw:display-name="Linienspitzen 69" svg:viewBox="0 0 20 20" svg:d="M0 20l10-20 10 20z"/>
    <draw:marker draw:name="Linienspitzen_20_70" draw:display-name="Linienspitzen 70" svg:viewBox="0 0 20 20" svg:d="M0 20l10-20 10 20z"/>
    <draw:marker draw:name="Linienspitzen_20_71" draw:display-name="Linienspitzen 71" svg:viewBox="0 0 20 20" svg:d="M0 20l10-20 10 20z"/>
    <draw:marker draw:name="Linienspitzen_20_72" draw:display-name="Linienspitzen 72" svg:viewBox="0 0 20 20" svg:d="M0 20l10-20 10 20z"/>
    <draw:marker draw:name="Linienspitzen_20_73" draw:display-name="Linienspitzen 73" svg:viewBox="0 0 20 20" svg:d="M0 20l10-20 10 20z"/>
    <draw:marker draw:name="Linienspitzen_20_74" draw:display-name="Linienspitzen 74" svg:viewBox="0 0 20 20" svg:d="M0 20l10-20 10 20z"/>
    <draw:marker draw:name="Linienspitzen_20_75" draw:display-name="Linienspitzen 75" svg:viewBox="0 0 20 20" svg:d="M0 20l10-20 10 20z"/>
    <draw:marker draw:name="Linienspitzen_20_76" draw:display-name="Linienspitzen 76" svg:viewBox="0 0 20 20" svg:d="M0 20l10-20 10 20z"/>
    <draw:stroke-dash draw:name="Dashed_20__28_var_29_" draw:display-name="Dashed (var)" draw:style="rect" draw:dots1="1" draw:dots1-length="197%" draw:distance="127%"/>
    <draw:stroke-dash draw:name="Dashed_20__28_var_29__20_2" draw:display-name="Dashed (var) 2" draw:style="rect" draw:dots1="1" draw:dots1-length="0.02cm" draw:dots2="1" draw:dots2-length="0.02cm" draw:distance="0.02cm"/>
    <draw:stroke-dash draw:name="Dot" draw:style="rect" draw:dots1="1" draw:dots1-length="100%" draw:distance="100%"/>
    <draw:stroke-dash draw:name="Long_20_Dot" draw:display-name="Long Dot" draw:style="rect" draw:dots1="1" draw:dots1-length="1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0000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office:styles>
  <office:automatic-styles>
    <style:page-layout style:name="PM0">
      <style:page-layout-properties fo:margin-top="1cm" fo:margin-bottom="1cm" fo:margin-left="1cm" fo:margin-right="1cm" fo:page-width="84.1cm" fo:page-height="5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Standard"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Siggelkow</meta:initial-creator>
    <meta:creation-date>2019-10-11T16:06:04.982764706</meta:creation-date>
    <dc:date>2026-06-13T01:16:16.801907431</dc:date>
    <meta:editing-duration>P39DT4H9M34S</meta:editing-duration>
    <meta:editing-cycles>926</meta:editing-cycles>
    <meta:generator>LibreOffice/24.2.7.2$Linux_X86_64 LibreOffice_project/420$Build-2</meta:generator>
    <meta:print-date>2025-06-25T11:06:16.095434000</meta:print-date>
    <meta:printed-by>PDF files</meta:printed-by>
    <meta:document-statistic meta:object-count="9293"/>
  </office:meta>
</office:document-meta>
</file>